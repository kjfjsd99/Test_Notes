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805cm"/>
    </style:style>
    <style:style style:name="表格66.B" style:family="table-column">
      <style:table-column-properties style:column-width="5.133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2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3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4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7" style:family="paragraph" style:parent-style-name="Standard">
      <style:paragraph-properties fo:margin-top="2.822cm" fo:margin-bottom="0cm" style:contextual-spacing="false"/>
    </style:style>
    <style:style style:name="P8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0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14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15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16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17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9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0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22" style:family="paragraph" style:parent-style-name="Standard">
      <style:paragraph-properties fo:margin-top="0cm" fo:margin-bottom="0.388cm" style:contextual-spacing="false"/>
    </style:style>
    <style:style style:name="P23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6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officeooo:paragraph-rsid="01e58a9d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00e676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2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3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officeooo:paragraph-rsid="01f29294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4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officeooo:paragraph-rsid="0180fc3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officeooo:paragraph-rsid="0182828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5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53" style:family="paragraph" style:parent-style-name="Standard">
      <style:paragraph-properties fo:margin-top="0cm" fo:margin-bottom="0.353cm" style:contextual-spacing="false"/>
    </style:style>
    <style:style style:name="P54" style:family="paragraph" style:parent-style-name="Standard">
      <style:paragraph-properties fo:margin-top="0.035cm" fo:margin-bottom="0.106cm" style:contextual-spacing="false" fo:line-height="0.459cm"/>
    </style:style>
    <style:style style:name="P55" style:family="paragraph" style:parent-style-name="Standard">
      <style:paragraph-properties fo:margin-top="0cm" fo:margin-bottom="0.042cm" style:contextual-spacing="false" fo:line-height="0.455cm"/>
    </style:style>
    <style:style style:name="P56" style:family="paragraph" style:parent-style-name="Standard">
      <style:paragraph-properties fo:margin-top="0.042cm" fo:margin-bottom="0.042cm" style:contextual-spacing="false" fo:line-height="0.455cm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8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9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60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61" style:family="paragraph" style:parent-style-name="Heading_20_3">
      <style:paragraph-properties fo:margin-top="0.318cm" fo:margin-bottom="0.123cm" style:contextual-spacing="false"/>
    </style:style>
    <style:style style:name="P62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5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6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9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3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4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82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18ffff" loext:opacity="100%" style:font-name="Microsoft JhengHei" fo:font-size="12.5pt" fo:font-weight="bold" fo:background-color="#d500f9" style:font-name-asian="Microsoft JhengHei2" style:font-size-asian="12.5pt" style:font-weight-asian="bold" style:font-name-complex="Microsoft JhengHei2" style:font-size-complex="12.5pt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pt" fo:font-style="normal" fo:font-weight="bold" fo:background-color="#64ffda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7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4d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97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9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.5pt" fo:font-style="normal" fo:font-weight="bold" fo:background-color="#ff91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6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10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5ff" loext:opacity="100%" style:font-name="Microsoft JhengHei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48fb1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9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11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5cae9" loext:opacity="100%" style:font-name="Microsoft JhengHei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8bbd0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1bee7" loext:opacity="100%" style:font-name="Microsoft JhengHei" fo:font-size="9pt" fo:font-style="normal" fo:font-weight="bold" fo:background-color="#4a148c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pt" fo:font-style="normal" fo:font-weight="bold" fo:background-color="#ff91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pt" fo:font-style="normal" fo:font-weight="bold" fo:background-color="#e651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pt" fo:font-style="normal" fo:font-weight="bold" fo:background-color="#1a237e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64ffda" loext:opacity="100%" style:font-name="Microsoft JhengHei" fo:font-size="9pt" fo:font-style="normal" fo:font-weight="bold" fo:background-color="#004d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pt" fo:font-style="normal" fo:font-weight="bold" fo:background-color="#1b5e2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2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cdd2" loext:opacity="100%" style:font-name="Microsoft JhengHei" fo:font-size="9pt" fo:font-style="normal" fo:font-weight="bold" fo:background-color="#b71c1c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2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ce4ec" loext:opacity="100%" style:font-name="Microsoft JhengHei" fo:font-size="9pt" fo:font-style="normal" fo:font-weight="bold" fo:background-color="#ff4081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2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ea00" loext:opacity="100%" style:font-name="Microsoft JhengHei" fo:font-size="9pt" fo:font-style="normal" fo:font-weight="bold" fo:background-color="#3d5afe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2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pt" fo:font-style="normal" fo:font-weight="bold" fo:background-color="#64ffda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5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6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7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9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4" style:family="text">
      <style:text-properties fo:color="#2b2b2b" loext:opacity="100%" style:font-name="Microsoft JhengHei" fo:font-size="10.5pt" fo:font-style="normal" fo:font-weight="normal" fo:background-color="#311b92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" style:family="text">
      <style:text-properties fo:color="#2b2b2b" loext:opacity="100%" style:font-name="Microsoft JhengHei" fo:font-size="10.5pt" fo:font-style="normal" fo:font-weight="normal" fo:background-color="#311b92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" style:family="text">
      <style:text-properties fo:color="#2b2b2b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5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1f3a5c" loext:opacity="100%" style:font-name="Microsoft JhengHei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29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0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font-weight="bold" fo:background-color="#ffd740" loext:char-shading-value="0" style:font-weight-asian="bold" style:font-weight-complex="bold"/>
    </style:style>
    <style:style style:name="T41" style:family="text">
      <style:text-properties fo:font-weight="bold" fo:background-color="#ffd740" loext:char-shading-value="0" style:font-weight-asian="bold" style:font-weight-complex="bold"/>
    </style:style>
    <style:style style:name="T42" style:family="text">
      <style:text-properties fo:font-weight="bold" fo:background-color="#ffff00" loext:char-shading-value="0" style:font-weight-asian="bold" style:font-weight-complex="bold"/>
    </style:style>
    <style:style style:name="T43" style:family="text">
      <style:text-properties fo:font-weight="bold" fo:background-color="#ffff00" loext:char-shading-value="0" style:font-weight-asian="bold" style:font-weight-complex="bold"/>
    </style:style>
    <style:style style:name="T44" style:family="text">
      <style:text-properties fo:font-weight="bold" fo:background-color="#18ffff" loext:char-shading-value="0" style:font-weight-asian="bold" style:font-weight-complex="bold"/>
    </style:style>
    <style:style style:name="T45" style:family="text">
      <style:text-properties fo:font-weight="bold" fo:background-color="#00e676" loext:char-shading-value="0" style:font-weight-asian="bold" style:font-weight-complex="bold"/>
    </style:style>
    <style:style style:name="T46" style:family="text">
      <style:text-properties fo:font-weight="bold" fo:background-color="#ffea00" loext:char-shading-value="0" style:font-weight-asian="bold" style:font-weight-complex="bold"/>
    </style:style>
    <style:style style:name="T47" style:family="text">
      <style:text-properties fo:font-weight="bold" fo:background-color="#76ff03" loext:char-shading-value="0" style:font-weight-asian="bold" style:font-weight-complex="bold"/>
    </style:style>
    <style:style style:name="T48" style:family="text">
      <style:text-properties fo:font-weight="bold" fo:background-color="#ff4081" loext:char-shading-value="0" style:font-weight-asian="bold" style:font-weight-complex="bold"/>
    </style:style>
    <style:style style:name="T49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50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51" style:family="text">
      <style:text-properties fo:color="#000000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" style:family="text">
      <style:text-properties fo:background-color="#ffff00" loext:char-shading-value="0"/>
    </style:style>
    <style:style style:name="T53" style:family="text">
      <style:text-properties fo:background-color="#ffff00" loext:char-shading-value="0"/>
    </style:style>
    <style:style style:name="T54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55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58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0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1" style:family="text">
      <style:text-properties fo:color="#ff3d00" loext:opacity="100%" fo:font-weight="bold" fo:background-color="#18ffff" loext:char-shading-value="0" style:font-weight-asian="bold" style:font-weight-complex="bold"/>
    </style:style>
    <style:style style:name="T62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ff3d00" loext:opacity="100%" fo:background-color="#64ffda" loext:char-shading-value="0"/>
    </style:style>
    <style:style style:name="T64" style:family="text">
      <style:text-properties fo:background-color="#ffd740" loext:char-shading-value="0"/>
    </style:style>
    <style:style style:name="T65" style:family="text">
      <style:text-properties fo:background-color="#ffd740" loext:char-shading-value="0"/>
    </style:style>
    <style:style style:name="T66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8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9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70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71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72" style:family="text">
      <style:text-properties fo:color="#00e676" loext:opacity="100%" fo:font-weight="bold" fo:background-color="#1b5e20" loext:char-shading-value="0" style:font-weight-asian="bold" style:font-weight-complex="bold"/>
    </style:style>
    <style:style style:name="T73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4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5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6" style:family="text">
      <style:text-properties fo:color="#76ff03" loext:opacity="100%"/>
    </style:style>
    <style:style style:name="T77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7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79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8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2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83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84" style:family="text">
      <style:text-properties fo:color="#76ff03" loext:opacity="100%" fo:font-weight="bold" fo:background-color="#33691e" loext:char-shading-value="0" style:font-weight-asian="bold" style:font-weight-complex="bold"/>
    </style:style>
    <style:style style:name="T85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8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9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3" style:family="text">
      <style:text-properties fo:color="#76ff03" loext:opacity="100%" fo:background-color="#1b5e20" loext:char-shading-value="0"/>
    </style:style>
    <style:style style:name="T94" style:family="text">
      <style:text-properties fo:color="#76ff03" loext:opacity="100%" fo:background-color="#33691e" loext:char-shading-value="0"/>
    </style:style>
    <style:style style:name="T95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6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97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98" style:family="text">
      <style:text-properties fo:color="#ffff00" loext:opacity="100%" fo:font-weight="bold" fo:background-color="#ffc400" loext:char-shading-value="0" style:font-weight-asian="bold" style:font-weight-complex="bold"/>
    </style:style>
    <style:style style:name="T99" style:family="text">
      <style:text-properties fo:color="#ffff00" loext:opacity="100%" fo:font-weight="bold" fo:background-color="#bf360c" loext:char-shading-value="0" style:font-weight-asian="bold" style:font-weight-complex="bold"/>
    </style:style>
    <style:style style:name="T100" style:family="text">
      <style:text-properties fo:color="#ffff00" loext:opacity="100%" fo:font-weight="bold" fo:background-color="#bf360c" loext:char-shading-value="0" style:font-weight-asian="bold" style:font-weight-complex="bold"/>
    </style:style>
    <style:style style:name="T101" style:family="text">
      <style:text-properties fo:color="#ffff00" loext:opacity="100%" fo:font-weight="bold" fo:background-color="#d500f9" loext:char-shading-value="0" style:font-weight-asian="bold" style:font-weight-complex="bold"/>
    </style:style>
    <style:style style:name="T102" style:family="text">
      <style:text-properties fo:color="#ffff00" loext:opacity="100%" fo:font-weight="bold" fo:background-color="#ff6e40" loext:char-shading-value="0" style:font-weight-asian="bold" style:font-weight-complex="bold"/>
    </style:style>
    <style:style style:name="T103" style:family="text">
      <style:text-properties fo:color="#ffff00" loext:opacity="100%" fo:font-weight="bold" fo:background-color="#4a148c" loext:char-shading-value="0" style:font-weight-asian="bold" style:font-weight-complex="bold"/>
    </style:style>
    <style:style style:name="T104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105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6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7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8" style:family="text">
      <style:text-properties fo:color="#ffff00" loext:opacity="100%" style:font-name="Microsoft JhengHei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9" style:family="text">
      <style:text-properties fo:color="#ffff00" loext:opacity="100%" fo:background-color="#ff3d00" loext:char-shading-value="0"/>
    </style:style>
    <style:style style:name="T110" style:family="text">
      <style:text-properties fo:color="#ffff00" loext:opacity="100%" fo:background-color="#4a148c" loext:char-shading-value="0"/>
    </style:style>
    <style:style style:name="T111" style:family="text">
      <style:text-properties fo:color="#18ffff" loext:opacity="100%"/>
    </style:style>
    <style:style style:name="T112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4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115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16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7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18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19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20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21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22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18ffff" loext:opacity="100%" style:font-name="Microsoft JhengHei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18ffff" loext:opacity="100%" style:font-name="Microsoft JhengHei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8ffff" loext:opacity="100%" style:font-name="Microsoft JhengHei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fo:background-color="#d500f9" loext:char-shading-value="0"/>
    </style:style>
    <style:style style:name="T132" style:family="text">
      <style:text-properties fo:color="#18ffff" loext:opacity="100%" fo:background-color="#d500f9" loext:char-shading-value="0"/>
    </style:style>
    <style:style style:name="T133" style:family="text">
      <style:text-properties fo:color="#18ffff" loext:opacity="100%" fo:background-color="#1a237e" loext:char-shading-value="0"/>
    </style:style>
    <style:style style:name="T134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35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36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137" style:family="text">
      <style:text-properties fo:color="#c6ff00" loext:opacity="100%" fo:font-weight="bold" fo:background-color="#004d40" loext:char-shading-value="0" style:font-weight-asian="bold" style:font-weight-complex="bold"/>
    </style:style>
    <style:style style:name="T138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0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141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ff5252" loext:opacity="100%" fo:font-weight="bold" fo:background-color="#01579b" loext:char-shading-value="0" style:font-weight-asian="bold" style:font-weight-complex="bold"/>
    </style:style>
    <style:style style:name="T144" style:family="text">
      <style:text-properties fo:color="#ff5252" loext:opacity="100%" fo:font-weight="bold" fo:background-color="#1a237e" loext:char-shading-value="0" style:font-weight-asian="bold" style:font-weight-complex="bold"/>
    </style:style>
    <style:style style:name="T145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7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48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52" style:family="text">
      <style:text-properties fo:color="#ffd740" loext:opacity="100%" fo:font-weight="bold" fo:background-color="#bf360c" loext:char-shading-value="0" style:font-weight-asian="bold" style:font-weight-complex="bold"/>
    </style:style>
    <style:style style:name="T153" style:family="text">
      <style:text-properties fo:color="#ffd740" loext:opacity="100%" fo:font-weight="bold" fo:background-color="#b71c1c" loext:char-shading-value="0" style:font-weight-asian="bold" style:font-weight-complex="bold"/>
    </style:style>
    <style:style style:name="T154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155" style:family="text">
      <style:text-properties fo:color="#ffd740" loext:opacity="100%" fo:background-color="#3d5afe" loext:char-shading-value="0"/>
    </style:style>
    <style:style style:name="T156" style:family="text">
      <style:text-properties fo:color="#ffd740" loext:opacity="100%" fo:background-color="#bf360c" loext:char-shading-value="0"/>
    </style:style>
    <style:style style:name="T15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b83c6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162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163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6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65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66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67" style:family="text">
      <style:text-properties fo:color="#ffea00" loext:opacity="100%" fo:font-weight="bold" fo:background-color="#1b5e20" loext:char-shading-value="0" style:font-weight-asian="bold" style:font-weight-complex="bold"/>
    </style:style>
    <style:style style:name="T168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69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70" style:family="text">
      <style:text-properties fo:color="#ffea00" loext:opacity="100%" fo:font-weight="bold" fo:background-color="#e65100" loext:char-shading-value="0" style:font-weight-asian="bold" style:font-weight-complex="bold"/>
    </style:style>
    <style:style style:name="T171" style:family="text">
      <style:text-properties fo:color="#ffea00" loext:opacity="100%" fo:font-weight="bold" fo:background-color="#311b92" loext:char-shading-value="0" style:font-weight-asian="bold" style:font-weight-complex="bold"/>
    </style:style>
    <style:style style:name="T172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3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4" style:family="text">
      <style:text-properties fo:color="#ffea00" loext:opacity="100%" style:font-name="Microsoft JhengHei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5" style:family="text">
      <style:text-properties fo:color="#ffea00" loext:opacity="100%" fo:background-color="#bf360c" loext:char-shading-value="0"/>
    </style:style>
    <style:style style:name="T176" style:family="text">
      <style:text-properties fo:color="#ffea00" loext:opacity="100%" fo:background-color="#e65100" loext:char-shading-value="0"/>
    </style:style>
    <style:style style:name="T177" style:family="text">
      <style:text-properties fo:color="#ffea00" loext:opacity="100%" fo:background-color="#311b92" loext:char-shading-value="0"/>
    </style:style>
    <style:style style:name="T178" style:family="text">
      <style:text-properties fo:color="#ffea00" loext:opacity="100%" fo:background-color="#3d5afe" loext:char-shading-value="0"/>
    </style:style>
    <style:style style:name="T179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180" style:family="text">
      <style:text-properties fo:color="#64ffda" loext:opacity="100%"/>
    </style:style>
    <style:style style:name="T181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2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3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84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85" style:family="text">
      <style:text-properties fo:color="#64ffda" loext:opacity="100%" fo:font-weight="bold" fo:background-color="#0d47a1" loext:char-shading-value="0" style:font-weight-asian="bold" style:font-weight-complex="bold"/>
    </style:style>
    <style:style style:name="T186" style:family="text">
      <style:text-properties fo:color="#64ffda" loext:opacity="100%" fo:font-weight="bold" fo:background-color="#006064" loext:char-shading-value="0" style:font-weight-asian="bold" style:font-weight-complex="bold"/>
    </style:style>
    <style:style style:name="T187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188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b83227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0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91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2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93" style:family="text">
      <style:text-properties fo:color="#00e5ff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4" style:family="text">
      <style:text-properties fo:color="#00e5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5" style:family="text">
      <style:text-properties fo:color="#ffab9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6" style:family="text">
      <style:text-properties fo:color="#f06292" loext:opacity="100%" fo:font-weight="bold" fo:background-color="#880e4f" loext:char-shading-value="0" style:font-weight-asian="bold" style:font-weight-complex="bold"/>
    </style:style>
    <style:style style:name="T197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98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99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200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201" style:family="text">
      <style:text-properties fo:color="#ef9a9a" loext:opacity="100%" fo:font-weight="bold" fo:background-color="#b71c1c" loext:char-shading-value="0" style:font-weight-asian="bold" style:font-weight-complex="bold"/>
    </style:style>
    <style:style style:name="T202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203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204" style:family="text">
      <style:text-properties fo:color="#f8bbd0" loext:opacity="100%" fo:font-weight="bold" fo:background-color="#ff4081" loext:char-shading-value="0" style:font-weight-asian="bold" style:font-weight-complex="bold"/>
    </style:style>
    <style:style style:name="T205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206" style:family="text">
      <style:text-properties fo:background-color="#bf360c" loext:char-shading-value="0"/>
    </style:style>
    <style:style style:name="T207" style:family="text">
      <style:text-properties fo:background-color="#bf360c" loext:char-shading-value="0"/>
    </style:style>
    <style:style style:name="T208" style:family="text">
      <style:text-properties fo:background-color="#ff4081" loext:char-shading-value="0"/>
    </style:style>
    <style:style style:name="T209" style:family="text">
      <style:text-properties fo:background-color="#ff4081" loext:char-shading-value="0"/>
    </style:style>
    <style:style style:name="T210" style:family="text">
      <style:text-properties fo:background-color="#64ffda" loext:char-shading-value="0"/>
    </style:style>
    <style:style style:name="T211" style:family="text">
      <style:text-properties fo:background-color="#1b5e20" loext:char-shading-value="0"/>
    </style:style>
    <style:style style:name="T212" style:family="text">
      <style:text-properties fo:background-color="#1b5e20" loext:char-shading-value="0"/>
    </style:style>
    <style:style style:name="T213" style:family="text">
      <style:text-properties fo:background-color="#33691e" loext:char-shading-value="0"/>
    </style:style>
    <style:style style:name="T214" style:family="text">
      <style:text-properties fo:background-color="#33691e" loext:char-shading-value="0"/>
    </style:style>
    <style:style style:name="T215" style:family="text">
      <style:text-properties fo:background-color="#4a148c" loext:char-shading-value="0"/>
    </style:style>
    <style:style style:name="T216" style:family="text">
      <style:text-properties fo:background-color="#4a148c" loext:char-shading-value="0"/>
    </style:style>
    <style:style style:name="T217" style:family="text">
      <style:text-properties fo:background-color="#18ffff" loext:char-shading-value="0"/>
    </style:style>
    <style:style style:name="T218" style:family="text">
      <style:text-properties fo:background-color="#18ffff" loext:char-shading-value="0"/>
    </style:style>
    <style:style style:name="T219" style:family="text">
      <style:text-properties fo:background-color="#1a237e" loext:char-shading-value="0"/>
    </style:style>
    <style:style style:name="T220" style:family="text">
      <style:text-properties fo:background-color="#1a237e" loext:char-shading-value="0"/>
    </style:style>
    <style:style style:name="T221" style:family="text">
      <style:text-properties fo:background-color="#311b92" loext:char-shading-value="0"/>
    </style:style>
    <style:style style:name="T222" style:family="text">
      <style:text-properties fo:background-color="#311b92" loext:char-shading-value="0"/>
    </style:style>
    <style:style style:name="T223" style:family="text">
      <style:text-properties fo:color="#ce93d8" loext:opacity="100%" style:font-name="Microsoft JhengHei" fo:font-size="10.5pt" fo:font-style="normal" fo:font-weight="normal" fo:background-color="#311b92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4" style:family="text">
      <style:text-properties fo:color="#ce93d8" loext:opacity="100%" style:font-name="Microsoft JhengHei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1a237e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a237e" loext:opacity="100%" style:font-name="Microsoft JhengHei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background-color="#e65100" loext:char-shading-value="0"/>
    </style:style>
    <style:style style:name="T228" style:family="text">
      <style:text-properties fo:background-color="#e65100" loext:char-shading-value="0"/>
    </style:style>
    <style:style style:name="T229" style:family="text">
      <style:text-properties fo:background-color="#004d40" loext:char-shading-value="0"/>
    </style:style>
    <style:style style:name="T230" style:family="text">
      <style:text-properties fo:background-color="#004d40" loext:char-shading-value="0"/>
    </style:style>
    <style:style style:name="T231" style:family="text">
      <style:text-properties fo:color="#69f0ae" loext:opacity="100%" fo:background-color="#004d40" loext:char-shading-value="0"/>
    </style:style>
    <style:style style:name="T232" style:family="text">
      <style:text-properties fo:color="#69f0ae" loext:opacity="100%" fo:font-weight="bold" fo:background-color="#004d40" loext:char-shading-value="0" style:font-weight-asian="bold" style:font-weight-complex="bold"/>
    </style:style>
    <style:style style:name="T233" style:family="text">
      <style:text-properties fo:color="#fce4ec" loext:opacity="100%" fo:font-weight="bold" fo:background-color="#ff4081" loext:char-shading-value="0" style:font-weight-asian="bold" style:font-weight-complex="bold"/>
    </style:style>
    <style:style style:name="T234" style:family="text">
      <style:text-properties fo:background-color="#3d5afe" loext:char-shading-value="0"/>
    </style:style>
    <style:style style:name="T235" style:family="text">
      <style:text-properties fo:background-color="#3d5af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公職考試 · 資訊類</text:p>
      <text:p text:style-name="P15">網路概論 與 資訊安全</text:p>
      <text:p text:style-name="P16">完整整合筆記 · 最終版</text:p>
      <text:p text:style-name="P2">OSI / TCP/IP ‧ IP 子網 ‧ IPv6 ‧ ARP/NAT ‧ TCP ‧ DNS ‧ 路由 ‧ SDN/CDN/5G ‧ 無線 ‧ 資安全攻防</text:p>
      <text:p text:style-name="P22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23">涵蓋十大主題</text:p>
            </table:table-cell>
            <table:table-cell table:style-name="表格1.A1" office:value-type="string">
              <text:p text:style-name="P23">前置速記</text:p>
            </table:table-cell>
            <table:table-cell table:style-name="表格1.A1" office:value-type="string">
              <text:p text:style-name="P23">全程對照</text:p>
            </table:table-cell>
            <table:table-cell table:style-name="表格1.A1" office:value-type="string">
              <text:p text:style-name="P23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31">十篇章節</text:p>
          </table:table-cell>
          <table:table-cell table:style-name="表格1.A2" office:value-type="string">
            <text:p text:style-name="P31">口訣 + 表格</text:p>
          </table:table-cell>
          <table:table-cell table:style-name="表格1.A2" office:value-type="string">
            <text:p text:style-name="P31">陷阱 + 正解</text:p>
          </table:table-cell>
          <table:table-cell table:style-name="表格1.A2" office:value-type="string">
            <text:p text:style-name="P31">申論 + 選擇</text:p>
          </table:table-cell>
        </table:table-row>
      </table:table>
      <text:p text:style-name="P5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4"><text:span text:style-name="T4">📖 <text:s/></text:span><text:span text:style-name="T6">讀這份筆記的方法</text:span></text:p>
            <text:p text:style-name="P55"><text:span text:style-name="T7">使用方式：</text:span><text:span text:style-name="T9">第〇篇「考前速記總表」收錄全書所有口訣與必背表格，考前衝刺只看這篇即可；</text:span></text:p>
            <text:p text:style-name="P41">第一～十篇為完整詳解，建立觀念與申論寫法時閱讀。每篇皆附「常見陷阱」與「考試標準答案」。</text:p>
          </table:table-cell>
        </table:table-row>
      </table:table>
      <text:p text:style-name="P17">目　錄</text:p>
      <text:p text:style-name="P3">Table of Contents</text:p>
      <text:p text:style-name="P59"><text:span text:style-name="T6">第 〇 篇　考前速記總表 — 口訣 × 必背表格</text:span><text:span text:style-name="T2"><text:tab/>3</text:span></text:p>
      <text:p text:style-name="P59"><text:span text:style-name="T3">　　Part A　口訣大全（依主題分類）</text:span><text:span text:style-name="T2"><text:tab/>3</text:span></text:p>
      <text:p text:style-name="P59"><text:span text:style-name="T3">　　Part B　必背表格精選</text:span><text:span text:style-name="T2"><text:tab/>5</text:span></text:p>
      <text:p text:style-name="P60"><text:span text:style-name="T24">第 一 篇　網路基礎架構：OSI / TCP-IP · 協定 · ARP · Traceroute</text:span><text:span text:style-name="T2"><text:tab/>9</text:span></text:p>
      <text:p text:style-name="P59"><text:span text:style-name="T24">第 二 篇　IP 位址與封包處理：分類 · CIDR · VLSM · Fragmentation</text:span><text:span text:style-name="T2"><text:tab/>13</text:span></text:p>
      <text:p text:style-name="P59"><text:span text:style-name="T24">第 三 篇　IPv4 → IPv6 過渡技術</text:span><text:span text:style-name="T2"><text:tab/>19</text:span></text:p>
      <text:p text:style-name="P59"><text:span text:style-name="T24">第 四 篇　ARP、NAT 與完整上網流程</text:span><text:span text:style-name="T2"><text:tab/>21</text:span></text:p>
      <text:p text:style-name="P59"><text:span text:style-name="T24">第 五 篇　TCP 傳輸控制深入</text:span><text:span text:style-name="T2"><text:tab/>24</text:span></text:p>
      <text:p text:style-name="P59"><text:span text:style-name="T24">第 六 篇　DNS 與 DNSSEC</text:span><text:span text:style-name="T2"><text:tab/>28</text:span></text:p>
      <text:p text:style-name="P59"><text:span text:style-name="T24">第 七 篇　路由協定：OSPF 與 BGP</text:span><text:span text:style-name="T2"><text:tab/>31</text:span></text:p>
      <text:p text:style-name="P59"><text:span text:style-name="T24">第 八 篇　網路系統進階：SDN · LB · CDN · 5G</text:span><text:span text:style-name="T2"><text:tab/>34</text:span></text:p>
      <text:p text:style-name="P59"><text:span text:style-name="T24">第 九 篇　無線通訊：WiFi vs Bluetooth</text:span><text:span text:style-name="T2"><text:tab/>37</text:span></text:p>
      <text:p text:style-name="P59"><text:span text:style-name="T24">第 十 篇　資訊安全：設備 · 攻防 · 企業資安 · Zero Trust</text:span><text:span text:style-name="T2"><text:tab/>40</text:span></text:p>
      <text:p text:style-name="P60"><text:span text:style-name="T6">結　語　考前最後叮嚀</text:span><text:span text:style-name="T2"><text:tab/>51</text:span></text:p>
      <text:h text:style-name="P25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4"><text:span text:style-name="T4">⚡ <text:s/></text:span><text:span text:style-name="T24">本篇用途</text:span></text:p>
            <text:p text:style-name="P42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9" text:outline-level="2">Part A　口訣大全（依主題分類）</text:h>
      <text:h text:style-name="P61" text:outline-level="3"><text:span text:style-name="T29">▍</text:span><text:span text:style-name="T30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62">🔑 口訣</text:p>
            <text:p text:style-name="P55"><text:span text:style-name="T33">TCP/IP 四層心法：</text:span><text:span text:style-name="T9">應用層→給人用（HTTP/DNS/DHCP/SSH/MQTT）｜傳輸層→怎麼送（TCP 穩、UDP 快）｜網路層→走哪條路（IP/ICMP）｜連結層→同一區網怎麼接（Ethernet/ARP）</text:span></text:p>
            <text:p text:style-name="P56"><text:span text:style-name="T33">OSI vs TCP/IP：</text:span><text:span text:style-name="T9">OSI 7 層（理論）、TCP/IP 4 層（實際）；差別在 TCP/IP 把 Session＋Presentation 併入 Application。</text:span></text:p>
            <text:p text:style-name="P56"><text:span text:style-name="T33">TCP vs UDP：</text:span><text:span text:style-name="T9">TCP「穩定優先」（保證送達、會重傳）；UDP「速度優先」（不保證、不重傳）。</text:span></text:p>
            <text:p text:style-name="P56"><text:span text:style-name="T33">三件事：</text:span><text:span text:style-name="T9">IP→定位（目的地是誰）｜Routing→選路（怎麼走最快）｜ICMP→回報（出錯通知你）。</text:span></text:p>
            <text:p text:style-name="P56"><text:span text:style-name="T33">Traceroute＝</text:span><text:span text:style-name="T9">TTL 遞增 ＋ ICMP 回報，逐步「炸出」完整路徑。</text:span></text:p>
            <text:p text:style-name="P56"><text:span text:style-name="T33">ARP＝</text:span><text:span text:style-name="T9">用 IP 找 MAC，只在同一個 LAN 內使用。</text:span></text:p>
          </table:table-cell>
        </table:table-row>
      </table:table>
      <text:h text:style-name="P61" text:outline-level="3"><text:span text:style-name="T29">▍</text:span><text:span text:style-name="T30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2">🔑 口訣</text:p>
            <text:p text:style-name="P55"><text:span text:style-name="T33">VLSM 黃金公式：</text:span><text:span text:style-name="T9">需求 ＋2 → 找最小 2ⁿ → 前綴 /(32−n)。</text:span></text:p>
            <text:p text:style-name="P56"><text:span text:style-name="T33">可用主機數：</text:span><text:span text:style-name="T9">2^(主機 bit) − 2（扣掉網路位址與廣播位址）。</text:span></text:p>
            <text:p text:style-name="P56"><text:span text:style-name="T33">CIDR 合併：</text:span><text:span text:style-name="T9">連續 ＋ 數量 2ⁿ ＋ 起點對齊 → 合併 2ⁿ 個子網則「前綴減 n」。</text:span></text:p>
            <text:p text:style-name="P56"><text:span text:style-name="T33">前綴速背：</text:span><text:span text:style-name="T9">/25=126、/26=62、/27=30、/28=14、/29=6、/30=2。</text:span></text:p>
            <text:p text:style-name="P56"><text:span text:style-name="T33">封包切割：</text:span><text:span text:style-name="T9">封包 &gt; MTU 就切（Fragmentation）；Fragment Offset ＝ 起始位置 ÷ 8。</text:span></text:p>
            <text:p text:style-name="P56"><text:span text:style-name="T33">誰能切：</text:span><text:span text:style-name="T9">IPv4＝Router 或 Source 可切；IPv6＝只有 Source 切，必搭 PMTUD。</text:span></text:p>
            <text:p text:style-name="P56"><text:span text:style-name="T33">Protocol 值：</text:span><text:span text:style-name="T9">ICMP=1、TCP=6、UDP=17｜DF=1 禁止切、MF=1 後面還有分段｜MSS＝MTU−20−20＝1460。</text:span></text:p>
          </table:table-cell>
        </table:table-row>
      </table:table>
      <text:h text:style-name="P61" text:outline-level="3"><text:span text:style-name="T29">▍</text:span><text:span text:style-name="T30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62">🔑 口訣</text:p>
            <text:p text:style-name="P55"><text:span text:style-name="T33">IPv6 特點：</text:span><text:span text:style-name="T9">大（128 bit）＋ 安全（IPsec）＋ 快（固定 Header）＋ 自動（SLAAC）＋ 乾淨（無 Broadcast）。</text:span></text:p>
            <text:p text:style-name="P56"><text:span text:style-name="T33">三種過渡技術：</text:span><text:span text:style-name="T9">雙語（Dual Stack）＋ 偽裝（Tunneling）＋ 翻譯（Translation）。</text:span></text:p>
            <text:p text:style-name="P56"><text:span text:style-name="T33">生活比喻：</text:span><text:span text:style-name="T9">Dual Stack＝同時會中英文；Tunneling＝英文信裝進中文信封偷渡；Translation＝現場請翻譯口譯。</text:span></text:p>
          </table:table-cell>
        </table:table-row>
      </table:table>
      <text:h text:style-name="P61" text:outline-level="3"><text:span text:style-name="T29">▍</text:span><text:span text:style-name="T30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2">🔑 口訣</text:p>
            <text:p text:style-name="P55"><text:span text:style-name="T33">上網流程：</text:span><text:span text:style-name="T9">DNS → ARP → L2 封包 → NAT（去程）→ Internet → NAT（回程）→ 你。</text:span></text:p>
            <text:p text:style-name="P56"><text:span text:style-name="T33">核心觀念：</text:span><text:span text:style-name="T9">IP＝最終目的地（全程不變）；MAC＝下一站（每跳更換）。</text:span></text:p>
            <text:p text:style-name="P56"><text:span text:style-name="T33">最大地雷：</text:span><text:span text:style-name="T9">ARP 找的是「路由器（預設閘道）」的 MAC，不是 Google 的 MAC。</text:span></text:p>
            <text:p text:style-name="P56"><text:soft-page-break/><text:span text:style-name="T33">PAT：</text:span><text:span text:style-name="T9">多台共用一個公網 IP，靠 Port 號碼區分（最重要）。</text:span></text:p>
          </table:table-cell>
        </table:table-row>
      </table:table>
      <text:h text:style-name="P61" text:outline-level="3"><text:span text:style-name="T29">▍</text:span><text:span text:style-name="T30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62">🔑 口訣</text:p>
            <text:p text:style-name="P55"><text:span text:style-name="T33">三次握手：</text:span><text:span text:style-name="T9">SYN → SYN＋ACK → ACK，確認雙向都能通訊。</text:span></text:p>
            <text:p text:style-name="P56"><text:span text:style-name="T33">傳送量公式：</text:span><text:span text:style-name="T9">實際傳送量 ＝ min(rwnd, cwnd)。rwnd＝接收端限制、cwnd＝網路限制。</text:span></text:p>
            <text:p text:style-name="P56"><text:span text:style-name="T33">擁塞控制節奏：</text:span><text:span text:style-name="T9">Slow Start（指數成長）→ Congestion Avoidance（線性成長）→ 丟包（減速）。</text:span></text:p>
            <text:p text:style-name="P56"><text:span text:style-name="T33">丟包處理：</text:span><text:span text:style-name="T9">Timeout → cwnd 重設為 1 回 Slow Start；3 個重複 ACK → cwnd 減半續 CA。</text:span></text:p>
            <text:p text:style-name="P56"><text:span text:style-name="T33">AIMD：</text:span><text:span text:style-name="T9">沒丟包 每 RTT＋1（加法增長）；丟包 ×0.5（乘法減少）。</text:span></text:p>
            <text:p text:style-name="P56"><text:span text:style-name="T33">SYN Flood：</text:span><text:span text:style-name="T9">大量半連線（Half-open）耗盡 Server 資源 → DoS。</text:span></text:p>
          </table:table-cell>
        </table:table-row>
      </table:table>
      <text:h text:style-name="P61" text:outline-level="3"><text:span text:style-name="T29">▍</text:span><text:span text:style-name="T30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62">🔑 口訣</text:p>
            <text:p text:style-name="P55"><text:span text:style-name="T33">查詢流程：</text:span><text:span text:style-name="T9">Cache → Local → Root → TLD → Authoritative → 取得 IP。</text:span></text:p>
            <text:p text:style-name="P56"><text:span text:style-name="T33">Recursive：</text:span><text:span text:style-name="T9">「代查到底」（DNS 幫你問完，你只問一次）。</text:span></text:p>
            <text:p text:style-name="P56"><text:span text:style-name="T33">Iterative：</text:span><text:span text:style-name="T9">「逐層詢問」（你自己一層一層問）。</text:span></text:p>
            <text:p text:style-name="P56"><text:span text:style-name="T33">DNSSEC：</text:span><text:span text:style-name="T9">驗證真偽，不是加密、不防 DDoS。</text:span></text:p>
          </table:table-cell>
        </table:table-row>
      </table:table>
      <text:h text:style-name="P61" text:outline-level="3"><text:span text:style-name="T29">▍</text:span><text:span text:style-name="T30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62">🔑 口訣</text:p>
            <text:p text:style-name="P55"><text:span text:style-name="T33">範圍分類：</text:span><text:span text:style-name="T9">公司／校園內 → IGP（OSPF、RIP）；公司與公司間 → EGP（BGP）。</text:span></text:p>
            <text:p text:style-name="P56"><text:span text:style-name="T33">OSPF 規定：</text:span><text:span text:style-name="T9">所有 Area 一定要連到 Area 0（骨幹）才能互通。</text:span></text:p>
            <text:p text:style-name="P56"><text:span text:style-name="T33">OSPF 四種 Router：</text:span><text:span text:style-name="T9">Internal（不出 Area）／Backbone（在 Area 0）／ABR（跨 Area 橋樑）／ASBR（跨 AS 入口）。</text:span></text:p>
            <text:p text:style-name="P56"><text:span text:style-name="T33">BGP 選路順序：</text:span><text:span text:style-name="T9">Weight &gt; Local Pref &gt; 自己產生 &gt; AS-PATH &gt; Origin &gt; MED &gt; eBGP &gt; IGP cost &gt; Router ID。</text:span></text:p>
            <text:p text:style-name="P56"><text:span text:style-name="T33">BGP 本質：</text:span><text:span text:style-name="T9">政策導向（不是距離導向）；Local Preference 才是最重要的「通用」屬性（Weight 為 Cisco 私有）。</text:span></text:p>
            <text:p text:style-name="P56"><text:span text:style-name="T33">三層分工：</text:span><text:span text:style-name="T9">防火牆→「能不能走」｜NAT→「你是誰」｜BGP→「怎麼走」。</text:span></text:p>
          </table:table-cell>
        </table:table-row>
      </table:table>
      <text:h text:style-name="P61" text:outline-level="3"><text:span text:style-name="T29">▍</text:span><text:span text:style-name="T30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2">🔑 口訣</text:p>
            <text:p text:style-name="P55"><text:span text:style-name="T33">SDN：</text:span><text:span text:style-name="T9">「分平面、三層 App-控-基」＝控制／資料分離；Application → Control → Infrastructure。</text:span></text:p>
            <text:p text:style-name="P56"><text:span text:style-name="T33">Load Balancing：</text:span><text:span text:style-name="T9">「LB 輪、重、黏」＝Round Robin（輪流）／Weighted RR（加權）／Stickiness（同人同台）。</text:span></text:p>
            <text:p text:style-name="P56"><text:span text:style-name="T33">CDN：</text:span><text:span text:style-name="T9">「網址轉轉轉（CNAME），資料找最近（Edge）」；CNAME＝網址→網址（非 IP）。</text:span></text:p>
            <text:p text:style-name="P56"><text:span text:style-name="T33">5G：</text:span><text:span text:style-name="T9">「快、低、多、切」＝eMBB（高速）／URLLC（超低延遲）／mMTC（大量連線）／Network Slicing（切片）。</text:span></text:p>
            <text:p text:style-name="P56"><text:span text:style-name="T33">10 秒總背：</text:span><text:span text:style-name="T9">SDN 分離三層、LB 輪重黏、CDN CNAME→最近、5G 快低多切、WiFi 聽、BT 跳。</text:span></text:p>
          </table:table-cell>
        </table:table-row>
      </table:table>
      <text:h text:style-name="P61" text:outline-level="3"><text:span text:style-name="T29">▍</text:span><text:span text:style-name="T30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62">🔑 口訣</text:p>
            <text:p text:style-name="P55"><text:span text:style-name="T33">一句總綱：</text:span><text:span text:style-name="T9">「WiFi 先聽再說（CSMA/CA），Bluetooth 一直換頻道（FHSS）」。</text:span></text:p>
            <text:p text:style-name="P56"><text:span text:style-name="T33">本質對比：</text:span><text:span text:style-name="T9">WiFi＝搶頻道（菜市場）；BT＝排班（會議室預約）；時槽＝時間格子；SCO＝語音；L2CAP＝三通道。</text:span></text:p>
            <text:p text:style-name="P56"><text:soft-page-break/><text:span text:style-name="T33">最大陷阱：</text:span><text:span text:style-name="T9">有線 Ethernet＝CD（Detect 偵測）；無線 WiFi＝CA（Avoid 避免）。</text:span></text:p>
            <text:p text:style-name="P56"><text:span text:style-name="T33">QoS／語音：</text:span><text:span text:style-name="T9">WiFi QoS＝EDCA（急診室分級）；藍牙即時語音＝SCO／eSCO；L2CAP 位於 Data Link 層。</text:span></text:p>
          </table:table-cell>
        </table:table-row>
      </table:table>
      <text:h text:style-name="P61" text:outline-level="3"><text:span text:style-name="T29">▍</text:span><text:span text:style-name="T30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62">🔑 口訣</text:p>
            <text:p text:style-name="P55"><text:span text:style-name="T33">設備萬用口訣：</text:span><text:span text:style-name="T9">FW 封外、WAF 看內、NGFW 最強、DMZ 隔離、IOC 壞人、Proxy 幫客、Reverse 幫服。</text:span></text:p>
            <text:p text:style-name="P56"><text:span text:style-name="T33">IOC 四線索：</text:span><text:span text:style-name="T9">網（Domain）→ 檔（Hash）→ 連（IP）→ 控（C2）。</text:span></text:p>
            <text:p text:style-name="P56"><text:span text:style-name="T33">封包闖關順序：</text:span><text:span text:style-name="T9">Client → Proxy → Internet → FW/NGFW → DMZ → WAF → Reverse Proxy → 內部 Server。</text:span></text:p>
            <text:p text:style-name="P56"><text:span text:style-name="T33">三防分工：</text:span><text:span text:style-name="T9">Firewall 擋入口、IDS 只看、IPS 看＋擋；HIDS 看主機（Log）、NIDS 看網路（封包）。</text:span></text:p>
            <text:p text:style-name="P56"><text:span text:style-name="T33">易混兩協定：</text:span><text:span text:style-name="T9">SNMP 管理設備（應用層／UDP）、ICMP 診斷網路（網路層）。</text:span></text:p>
            <text:p text:style-name="P56"><text:span text:style-name="T33">SQL Injection：</text:span><text:span text:style-name="T9">攻擊＝' OR 1=1 --；防禦核心＝Prepared Statement（預備語句）。</text:span></text:p>
            <text:p text:style-name="P56"><text:span text:style-name="T33">Zero-Day：</text:span><text:span text:style-name="T9">最怕「沒有 Signature」；防禦＝Patch 更新 ＋ IDS/IPS ＋ 網路分段。</text:span></text:p>
            <text:p text:style-name="P56"><text:span text:style-name="T33">企業資安三階段：</text:span><text:span text:style-name="T9">事前預防 → 事中偵測 → 事後復原。RTO＝停機時間、RPO＝資料損失量。</text:span></text:p>
            <text:p text:style-name="P56"><text:span text:style-name="T33">EDR/MDR：</text:span><text:span text:style-name="T9">EDR＝自己買工具守、MDR＝請公司幫你守、ATT&amp;CK＝駭客招式教材、數位韌性＝撐住快速復原。</text:span></text:p>
            <text:p text:style-name="P56"><text:span text:style-name="T33">SSDLC：</text:span><text:span text:style-name="T9">Define→Design→Develop→Test→Deploy→Maintain，精神是「左移（Shift Left）」。</text:span></text:p>
            <text:p text:style-name="P56"><text:span text:style-name="T33">Zero Trust：</text:span><text:span text:style-name="T9">永不信任，始終驗證；查「人（Identity）機（Device）境（Context）」；配 MFA＋最小權限＋微分段＋持續監控。</text:span></text:p>
          </table:table-cell>
        </table:table-row>
      </table:table>
      <text:h text:style-name="P9" text:outline-level="2">Part B　必背表格精選（考前掃一遍）</text:h>
      <text:h text:style-name="P61" text:outline-level="3"><text:span text:style-name="T29">▍</text:span><text:span text:style-name="T30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23">前綴</text:p>
            </table:table-cell>
            <table:table-cell table:style-name="表格14.A1" office:value-type="string">
              <text:p text:style-name="P23">主機 bit</text:p>
            </table:table-cell>
            <table:table-cell table:style-name="表格14.A1" office:value-type="string">
              <text:p text:style-name="P23">IP 總數</text:p>
            </table:table-cell>
            <table:table-cell table:style-name="表格14.A1" office:value-type="string">
              <text:p text:style-name="P23">可用主機</text:p>
            </table:table-cell>
            <table:table-cell table:style-name="表格14.A1" office:value-type="string">
              <text:p text:style-name="P23">區塊步長</text:p>
            </table:table-cell>
            <table:table-cell table:style-name="表格14.A1" office:value-type="string">
              <text:p text:style-name="P23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32">/24</text:p>
          </table:table-cell>
          <table:table-cell table:style-name="表格14.A2" office:value-type="string">
            <text:p text:style-name="P31">8</text:p>
          </table:table-cell>
          <table:table-cell table:style-name="表格14.A2" office:value-type="string">
            <text:p text:style-name="P32">256</text:p>
          </table:table-cell>
          <table:table-cell table:style-name="表格14.A2" office:value-type="string">
            <text:p text:style-name="P10">254</text:p>
          </table:table-cell>
          <table:table-cell table:style-name="表格14.A2" office:value-type="string">
            <text:p text:style-name="P32">+256</text:p>
          </table:table-cell>
          <table:table-cell table:style-name="表格14.A2" office:value-type="string">
            <text:p text:style-name="P32">255</text:p>
          </table:table-cell>
        </table:table-row>
        <table:table-row table:style-name="表格14.1">
          <table:table-cell table:style-name="表格14.A3" office:value-type="string">
            <text:p text:style-name="P32">/25</text:p>
          </table:table-cell>
          <table:table-cell table:style-name="表格14.A3" office:value-type="string">
            <text:p text:style-name="P31">7</text:p>
          </table:table-cell>
          <table:table-cell table:style-name="表格14.A3" office:value-type="string">
            <text:p text:style-name="P32">128</text:p>
          </table:table-cell>
          <table:table-cell table:style-name="表格14.A3" office:value-type="string">
            <text:p text:style-name="P10">126</text:p>
          </table:table-cell>
          <table:table-cell table:style-name="表格14.A3" office:value-type="string">
            <text:p text:style-name="P32">+128</text:p>
          </table:table-cell>
          <table:table-cell table:style-name="表格14.A3" office:value-type="string">
            <text:p text:style-name="P32">127, 255</text:p>
          </table:table-cell>
        </table:table-row>
        <table:table-row table:style-name="表格14.1">
          <table:table-cell table:style-name="表格14.A2" office:value-type="string">
            <text:p text:style-name="P32">/26</text:p>
          </table:table-cell>
          <table:table-cell table:style-name="表格14.A2" office:value-type="string">
            <text:p text:style-name="P31">6</text:p>
          </table:table-cell>
          <table:table-cell table:style-name="表格14.A2" office:value-type="string">
            <text:p text:style-name="P32">64</text:p>
          </table:table-cell>
          <table:table-cell table:style-name="表格14.A2" office:value-type="string">
            <text:p text:style-name="P10">62</text:p>
          </table:table-cell>
          <table:table-cell table:style-name="表格14.A2" office:value-type="string">
            <text:p text:style-name="P32">+64</text:p>
          </table:table-cell>
          <table:table-cell table:style-name="表格14.A2" office:value-type="string">
            <text:p text:style-name="P32">63, 127, 191, 255</text:p>
          </table:table-cell>
        </table:table-row>
        <table:table-row table:style-name="表格14.1">
          <table:table-cell table:style-name="表格14.A3" office:value-type="string">
            <text:p text:style-name="P32">/27</text:p>
          </table:table-cell>
          <table:table-cell table:style-name="表格14.A3" office:value-type="string">
            <text:p text:style-name="P31">5</text:p>
          </table:table-cell>
          <table:table-cell table:style-name="表格14.A3" office:value-type="string">
            <text:p text:style-name="P32">32</text:p>
          </table:table-cell>
          <table:table-cell table:style-name="表格14.A3" office:value-type="string">
            <text:p text:style-name="P10">30</text:p>
          </table:table-cell>
          <table:table-cell table:style-name="表格14.A3" office:value-type="string">
            <text:p text:style-name="P32">+32</text:p>
          </table:table-cell>
          <table:table-cell table:style-name="表格14.A3" office:value-type="string">
            <text:p text:style-name="P32">31, 63, 95 …</text:p>
          </table:table-cell>
        </table:table-row>
        <table:table-row table:style-name="表格14.1">
          <table:table-cell table:style-name="表格14.A2" office:value-type="string">
            <text:p text:style-name="P32">/28</text:p>
          </table:table-cell>
          <table:table-cell table:style-name="表格14.A2" office:value-type="string">
            <text:p text:style-name="P31">4</text:p>
          </table:table-cell>
          <table:table-cell table:style-name="表格14.A2" office:value-type="string">
            <text:p text:style-name="P32">16</text:p>
          </table:table-cell>
          <table:table-cell table:style-name="表格14.A2" office:value-type="string">
            <text:p text:style-name="P10">14</text:p>
          </table:table-cell>
          <table:table-cell table:style-name="表格14.A2" office:value-type="string">
            <text:p text:style-name="P32">+16</text:p>
          </table:table-cell>
          <table:table-cell table:style-name="表格14.A2" office:value-type="string">
            <text:p text:style-name="P32">15, 31, 47 …</text:p>
          </table:table-cell>
        </table:table-row>
        <table:table-row table:style-name="表格14.1">
          <table:table-cell table:style-name="表格14.A3" office:value-type="string">
            <text:p text:style-name="P32">/29</text:p>
          </table:table-cell>
          <table:table-cell table:style-name="表格14.A3" office:value-type="string">
            <text:p text:style-name="P31">3</text:p>
          </table:table-cell>
          <table:table-cell table:style-name="表格14.A3" office:value-type="string">
            <text:p text:style-name="P32">8</text:p>
          </table:table-cell>
          <table:table-cell table:style-name="表格14.A3" office:value-type="string">
            <text:p text:style-name="P10">6</text:p>
          </table:table-cell>
          <table:table-cell table:style-name="表格14.A3" office:value-type="string">
            <text:p text:style-name="P32">+8</text:p>
          </table:table-cell>
          <table:table-cell table:style-name="表格14.A3" office:value-type="string">
            <text:p text:style-name="P32">7, 15, 23 …</text:p>
          </table:table-cell>
        </table:table-row>
        <table:table-row table:style-name="表格14.1">
          <table:table-cell table:style-name="表格14.A2" office:value-type="string">
            <text:p text:style-name="P32">/30</text:p>
          </table:table-cell>
          <table:table-cell table:style-name="表格14.A2" office:value-type="string">
            <text:p text:style-name="P31">2</text:p>
          </table:table-cell>
          <table:table-cell table:style-name="表格14.A2" office:value-type="string">
            <text:p text:style-name="P32">4</text:p>
          </table:table-cell>
          <table:table-cell table:style-name="表格14.A2" office:value-type="string">
            <text:p text:style-name="P10">2</text:p>
          </table:table-cell>
          <table:table-cell table:style-name="表格14.A2" office:value-type="string">
            <text:p text:style-name="P32">+4</text:p>
          </table:table-cell>
          <table:table-cell table:style-name="表格14.A2" office:value-type="string">
            <text:p text:style-name="P32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55"><text:span text:style-name="T36">例外 /31：</text:span><text:span text:style-name="T9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61" text:outline-level="3"><text:span text:style-name="T29">▍</text:span><text:span text:style-name="T30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6">比較項目</text:p>
            </table:table-cell>
            <table:table-cell table:style-name="表格15.A1" office:value-type="string">
              <text:p text:style-name="P26">TCP（穩定）</text:p>
            </table:table-cell>
            <table:table-cell table:style-name="表格15.A1" office:value-type="string">
              <text:p text:style-name="P26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5">連線方式</text:p>
          </table:table-cell>
          <table:table-cell table:style-name="表格15.A2" office:value-type="string">
            <text:p text:style-name="P45">三次握手才開始</text:p>
          </table:table-cell>
          <table:table-cell table:style-name="表格15.A2" office:value-type="string">
            <text:p text:style-name="P45">無連線，直接送</text:p>
          </table:table-cell>
        </table:table-row>
        <table:table-row table:style-name="表格15.1">
          <table:table-cell table:style-name="表格15.A3" office:value-type="string">
            <text:p text:style-name="P45">可靠性</text:p>
          </table:table-cell>
          <table:table-cell table:style-name="表格15.A3" office:value-type="string">
            <text:p text:style-name="P45">保證送達、會重傳</text:p>
          </table:table-cell>
          <table:table-cell table:style-name="表格15.A3" office:value-type="string">
            <text:p text:style-name="P45">不保證、不重傳</text:p>
          </table:table-cell>
        </table:table-row>
        <table:table-row table:style-name="表格15.1">
          <table:table-cell table:style-name="表格15.A2" office:value-type="string">
            <text:p text:style-name="P45">順序<text:soft-page-break/></text:p>
          </table:table-cell>
          <table:table-cell table:style-name="表格15.A2" office:value-type="string">
            <text:p text:style-name="P45">保證順序<text:soft-page-break/></text:p>
          </table:table-cell>
          <table:table-cell table:style-name="表格15.A2" office:value-type="string">
            <text:p text:style-name="P45">不保證順序<text:soft-page-break/></text:p>
          </table:table-cell>
        </table:table-row>
        <table:table-row table:style-name="表格15.1">
          <table:table-cell table:style-name="表格15.A3" office:value-type="string">
            <text:p text:style-name="P45">速度</text:p>
          </table:table-cell>
          <table:table-cell table:style-name="表格15.A3" office:value-type="string">
            <text:p text:style-name="P45">較慢（有控制機制）</text:p>
          </table:table-cell>
          <table:table-cell table:style-name="表格15.A3" office:value-type="string">
            <text:p text:style-name="P45">較快（無額外開銷）</text:p>
          </table:table-cell>
        </table:table-row>
        <table:table-row table:style-name="表格15.1">
          <table:table-cell table:style-name="表格15.A2" office:value-type="string">
            <text:p text:style-name="P45">適用</text:p>
          </table:table-cell>
          <table:table-cell table:style-name="表格15.A2" office:value-type="string">
            <text:p text:style-name="P45">網頁、Email、FTP、檔案</text:p>
          </table:table-cell>
          <table:table-cell table:style-name="表格15.A2" office:value-type="string">
            <text:p text:style-name="P45">串流、遊戲、VoIP、DNS</text:p>
          </table:table-cell>
        </table:table-row>
        <table:table-row table:style-name="表格15.1">
          <table:table-cell table:style-name="表格15.A3" office:value-type="string">
            <text:p text:style-name="P45">一句話</text:p>
          </table:table-cell>
          <table:table-cell table:style-name="表格15.A3" office:value-type="string">
            <text:p text:style-name="P63">「穩定優先」</text:p>
          </table:table-cell>
          <table:table-cell table:style-name="表格15.A3" office:value-type="string">
            <text:p text:style-name="P12">「速度優先」</text:p>
          </table:table-cell>
        </table:table-row>
      </table:table>
      <text:h text:style-name="P61" text:outline-level="3"><text:span text:style-name="T29">▍</text:span><text:span text:style-name="T30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4">比較項目</text:p>
            </table:table-cell>
            <table:table-cell table:style-name="表格16.A1" office:value-type="string">
              <text:p text:style-name="P24">✗ IPv4 問題</text:p>
            </table:table-cell>
            <table:table-cell table:style-name="表格16.A1" office:value-type="string">
              <text:p text:style-name="P24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32">位址長度</text:p>
          </table:table-cell>
          <table:table-cell table:style-name="表格16.A2" office:value-type="string">
            <text:p text:style-name="P32">32 bit，約 43 億個，已不足</text:p>
          </table:table-cell>
          <table:table-cell table:style-name="表格16.A2" office:value-type="string">
            <text:p text:style-name="P32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32">NAT</text:p>
          </table:table-cell>
          <table:table-cell table:style-name="表格16.A3" office:value-type="string">
            <text:p text:style-name="P32">需 NAT 共用 IP，破壞 E2E</text:p>
          </table:table-cell>
          <table:table-cell table:style-name="表格16.A3" office:value-type="string">
            <text:p text:style-name="P32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32">安全性</text:p>
          </table:table-cell>
          <table:table-cell table:style-name="表格16.A2" office:value-type="string">
            <text:p text:style-name="P32">無內建加密／驗證</text:p>
          </table:table-cell>
          <table:table-cell table:style-name="表格16.A2" office:value-type="string">
            <text:p text:style-name="P32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32">Header</text:p>
          </table:table-cell>
          <table:table-cell table:style-name="表格16.A3" office:value-type="string">
            <text:p text:style-name="P32">可變長度含 Options，效率低</text:p>
          </table:table-cell>
          <table:table-cell table:style-name="表格16.A3" office:value-type="string">
            <text:p text:style-name="P32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32">QoS</text:p>
          </table:table-cell>
          <table:table-cell table:style-name="表格16.A2" office:value-type="string">
            <text:p text:style-name="P32">無法標記優先權</text:p>
          </table:table-cell>
          <table:table-cell table:style-name="表格16.A2" office:value-type="string">
            <text:p text:style-name="P32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32">廣播</text:p>
          </table:table-cell>
          <table:table-cell table:style-name="表格16.A3" office:value-type="string">
            <text:p text:style-name="P32">Broadcast 發給所有人</text:p>
          </table:table-cell>
          <table:table-cell table:style-name="表格16.A3" office:value-type="string">
            <text:p text:style-name="P32">改用 Multicast／Anycast</text:p>
          </table:table-cell>
        </table:table-row>
        <table:table-row table:style-name="表格16.1">
          <table:table-cell table:style-name="表格16.A2" office:value-type="string">
            <text:p text:style-name="P32">IP 配置</text:p>
          </table:table-cell>
          <table:table-cell table:style-name="表格16.A2" office:value-type="string">
            <text:p text:style-name="P32">手動或 DHCP，繁瑣</text:p>
          </table:table-cell>
          <table:table-cell table:style-name="表格16.A2" office:value-type="string">
            <text:p text:style-name="P32">SLAAC 無狀態自動配置</text:p>
          </table:table-cell>
        </table:table-row>
      </table:table>
      <text:h text:style-name="P61" text:outline-level="3"><text:span text:style-name="T29">▍</text:span><text:span text:style-name="T30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4">丟包偵測</text:p>
            </table:table-cell>
            <table:table-cell table:style-name="表格17.A1" office:value-type="string">
              <text:p text:style-name="P24">代表意義</text:p>
            </table:table-cell>
            <table:table-cell table:style-name="表格17.A1" office:value-type="string">
              <text:p text:style-name="P24">ssthresh</text:p>
            </table:table-cell>
            <table:table-cell table:style-name="表格17.A1" office:value-type="string">
              <text:p text:style-name="P24">cwnd</text:p>
            </table:table-cell>
            <table:table-cell table:style-name="表格17.A1" office:value-type="string">
              <text:p text:style-name="P24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32">Timeout（逾時）</text:p>
          </table:table-cell>
          <table:table-cell table:style-name="表格17.A2" office:value-type="string">
            <text:p text:style-name="P32">網路嚴重擁塞</text:p>
          </table:table-cell>
          <table:table-cell table:style-name="表格17.A2" office:value-type="string">
            <text:p text:style-name="P32">= cwnd / 2</text:p>
          </table:table-cell>
          <table:table-cell table:style-name="表格17.A2" office:value-type="string">
            <text:p text:style-name="P67">重設為 1</text:p>
          </table:table-cell>
          <table:table-cell table:style-name="表格17.A2" office:value-type="string">
            <text:p text:style-name="P32">重回 Slow Start</text:p>
          </table:table-cell>
        </table:table-row>
        <table:table-row table:style-name="表格17.1">
          <table:table-cell table:style-name="表格17.A3" office:value-type="string">
            <text:p text:style-name="P32">3 個重複 ACK</text:p>
          </table:table-cell>
          <table:table-cell table:style-name="表格17.A3" office:value-type="string">
            <text:p text:style-name="P32">單一封包遺失</text:p>
          </table:table-cell>
          <table:table-cell table:style-name="表格17.A3" office:value-type="string">
            <text:p text:style-name="P32">= cwnd / 2</text:p>
          </table:table-cell>
          <table:table-cell table:style-name="表格17.A3" office:value-type="string">
            <text:p text:style-name="P11">= ssthresh（減半）</text:p>
          </table:table-cell>
          <table:table-cell table:style-name="表格17.A3" office:value-type="string">
            <text:p text:style-name="P32">續 Congestion Avoidance</text:p>
          </table:table-cell>
        </table:table-row>
      </table:table>
      <text:h text:style-name="P61" text:outline-level="3"><text:span text:style-name="T29">▍</text:span><text:span text:style-name="T30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順序</text:p>
            </table:table-cell>
            <table:table-cell table:style-name="表格18.A1" office:value-type="string">
              <text:p text:style-name="P23">屬性</text:p>
            </table:table-cell>
            <table:table-cell table:style-name="表格18.A1" office:value-type="string">
              <text:p text:style-name="P23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31">①</text:p>
          </table:table-cell>
          <table:table-cell table:style-name="表格18.A2" office:value-type="string">
            <text:p text:style-name="P32">Weight</text:p>
          </table:table-cell>
          <table:table-cell table:style-name="表格18.A2" office:value-type="string">
            <text:p text:style-name="P32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31">②</text:p>
          </table:table-cell>
          <table:table-cell table:style-name="表格18.A3" office:value-type="string">
            <text:p text:style-name="P11">Local Preference</text:p>
          </table:table-cell>
          <table:table-cell table:style-name="表格18.A3" office:value-type="string">
            <text:p text:style-name="P1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31">③</text:p>
          </table:table-cell>
          <table:table-cell table:style-name="表格18.A2" office:value-type="string">
            <text:p text:style-name="P32">本地產生</text:p>
          </table:table-cell>
          <table:table-cell table:style-name="表格18.A2" office:value-type="string">
            <text:p text:style-name="P32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31">④</text:p>
          </table:table-cell>
          <table:table-cell table:style-name="表格18.A3" office:value-type="string">
            <text:p text:style-name="P32">AS-PATH</text:p>
          </table:table-cell>
          <table:table-cell table:style-name="表格18.A3" office:value-type="string">
            <text:p text:style-name="P32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31">⑤</text:p>
          </table:table-cell>
          <table:table-cell table:style-name="表格18.A2" office:value-type="string">
            <text:p text:style-name="P32">Origin</text:p>
          </table:table-cell>
          <table:table-cell table:style-name="表格18.A2" office:value-type="string">
            <text:p text:style-name="P32">IGP &gt; EGP &gt; Incomplete</text:p>
          </table:table-cell>
        </table:table-row>
        <table:table-row table:style-name="表格18.1">
          <table:table-cell table:style-name="表格18.A3" office:value-type="string">
            <text:p text:style-name="P31">⑥</text:p>
          </table:table-cell>
          <table:table-cell table:style-name="表格18.A3" office:value-type="string">
            <text:p text:style-name="P32">MED</text:p>
          </table:table-cell>
          <table:table-cell table:style-name="表格18.A3" office:value-type="string">
            <text:p text:style-name="P32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31">⑦</text:p>
          </table:table-cell>
          <table:table-cell table:style-name="表格18.A2" office:value-type="string">
            <text:p text:style-name="P32">eBGP vs iBGP</text:p>
          </table:table-cell>
          <table:table-cell table:style-name="表格18.A2" office:value-type="string">
            <text:p text:style-name="P32">eBGP 優先於 iBGP</text:p>
          </table:table-cell>
        </table:table-row>
        <table:table-row table:style-name="表格18.1">
          <table:table-cell table:style-name="表格18.A3" office:value-type="string">
            <text:p text:style-name="P31">⑧</text:p>
          </table:table-cell>
          <table:table-cell table:style-name="表格18.A3" office:value-type="string">
            <text:p text:style-name="P32">IGP cost</text:p>
          </table:table-cell>
          <table:table-cell table:style-name="表格18.A3" office:value-type="string">
            <text:p text:style-name="P32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31">⑨</text:p>
          </table:table-cell>
          <table:table-cell table:style-name="表格18.A2" office:value-type="string">
            <text:p text:style-name="P32">Router ID</text:p>
          </table:table-cell>
          <table:table-cell table:style-name="表格18.A2" office:value-type="string">
            <text:p text:style-name="P32">Router ID 最小者優先（最後決勝點）</text:p>
          </table:table-cell>
        </table:table-row>
      </table:table>
      <text:h text:style-name="P61" text:outline-level="3"><text:span text:style-name="T29">▍</text:span><text:span text:style-name="T30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4">類型</text:p>
            </table:table-cell>
            <table:table-cell table:style-name="表格19.A1" office:value-type="string">
              <text:p text:style-name="P24">本質</text:p>
            </table:table-cell>
            <table:table-cell table:style-name="表格19.A1" office:value-type="string">
              <text:p text:style-name="P24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2">Internal</text:p>
          </table:table-cell>
          <table:table-cell table:style-name="表格19.A2" office:value-type="string">
            <text:p text:style-name="P32">不出 Area</text:p>
          </table:table-cell>
          <table:table-cell table:style-name="表格19.A2" office:value-type="string">
            <text:p text:style-name="P32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32">Backbone</text:p>
          </table:table-cell>
          <table:table-cell table:style-name="表格19.A3" office:value-type="string">
            <text:p text:style-name="P32">在 Area 0</text:p>
          </table:table-cell>
          <table:table-cell table:style-name="表格19.A3" office:value-type="string">
            <text:p text:style-name="P32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32">ABR</text:p>
          </table:table-cell>
          <table:table-cell table:style-name="表格19.A2" office:value-type="string">
            <text:p text:style-name="P32">跨 Area 橋樑</text:p>
          </table:table-cell>
          <table:table-cell table:style-name="表格19.A2" office:value-type="string">
            <text:p text:style-name="P32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32">ASBR</text:p>
          </table:table-cell>
          <table:table-cell table:style-name="表格19.A3" office:value-type="string">
            <text:p text:style-name="P32">跨 AS 入口</text:p>
          </table:table-cell>
          <table:table-cell table:style-name="表格19.A3" office:value-type="string">
            <text:p text:style-name="P32">把外部路由（BGP 等）帶進 OSPF，是對外的大門</text:p>
          </table:table-cell>
        </table:table-row>
      </table:table>
      <text:h text:style-name="P61" text:outline-level="3"><text:span text:style-name="T29">▍</text:span><text:span text:style-name="T30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能力</text:p>
            </table:table-cell>
            <table:table-cell table:style-name="表格20.A1" office:value-type="string">
              <text:p text:style-name="P23">FW</text:p>
            </table:table-cell>
            <table:table-cell table:style-name="表格20.A1" office:value-type="string">
              <text:p text:style-name="P23">WAF</text:p>
            </table:table-cell>
            <table:table-cell table:style-name="表格20.A1" office:value-type="string">
              <text:p text:style-name="P23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32">IP / Port 過濾</text:p>
          </table:table-cell>
          <table:table-cell table:style-name="表格20.A2" office:value-type="string">
            <text:p text:style-name="P70">○</text:p>
          </table:table-cell>
          <table:table-cell table:style-name="表格20.A2" office:value-type="string">
            <text:p text:style-name="P70">○</text:p>
          </table:table-cell>
          <table:table-cell table:style-name="表格20.A2" office:value-type="string">
            <text:p text:style-name="P70">○</text:p>
          </table:table-cell>
        </table:table-row>
        <table:table-row table:style-name="表格20.1">
          <table:table-cell table:style-name="表格20.A3" office:value-type="string">
            <text:p text:style-name="P32">HTTP 內容檢查</text:p>
          </table:table-cell>
          <table:table-cell table:style-name="表格20.A3" office:value-type="string">
            <text:p text:style-name="P69">✗</text:p>
          </table:table-cell>
          <table:table-cell table:style-name="表格20.A3" office:value-type="string">
            <text:p text:style-name="P70">○</text:p>
          </table:table-cell>
          <table:table-cell table:style-name="表格20.A3" office:value-type="string">
            <text:p text:style-name="P70">○</text:p>
          </table:table-cell>
        </table:table-row>
        <table:table-row table:style-name="表格20.1">
          <table:table-cell table:style-name="表格20.A2" office:value-type="string">
            <text:p text:style-name="P32">DPI 深度檢查</text:p>
          </table:table-cell>
          <table:table-cell table:style-name="表格20.A2" office:value-type="string">
            <text:p text:style-name="P69">✗</text:p>
          </table:table-cell>
          <table:table-cell table:style-name="表格20.A2" office:value-type="string">
            <text:p text:style-name="P69">✗</text:p>
          </table:table-cell>
          <table:table-cell table:style-name="表格20.A2" office:value-type="string">
            <text:p text:style-name="P70">○</text:p>
          </table:table-cell>
        </table:table-row>
        <table:table-row table:style-name="表格20.1">
          <table:table-cell table:style-name="表格20.A3" office:value-type="string">
            <text:p text:style-name="P32">App 識別 / IPS</text:p>
          </table:table-cell>
          <table:table-cell table:style-name="表格20.A3" office:value-type="string">
            <text:p text:style-name="P69">✗</text:p>
          </table:table-cell>
          <table:table-cell table:style-name="表格20.A3" office:value-type="string">
            <text:p text:style-name="P69">✗</text:p>
          </table:table-cell>
          <table:table-cell table:style-name="表格20.A3" office:value-type="string">
            <text:p text:style-name="P70">○</text:p>
          </table:table-cell>
        </table:table-row>
        <table:table-row table:style-name="表格20.1">
          <table:table-cell table:style-name="表格20.A2" office:value-type="string">
            <text:p text:style-name="P32">OSI 層</text:p>
          </table:table-cell>
          <table:table-cell table:style-name="表格20.A2" office:value-type="string">
            <text:p text:style-name="P31">L3 / L4</text:p>
          </table:table-cell>
          <table:table-cell table:style-name="表格20.A2" office:value-type="string">
            <text:p text:style-name="P10">L7</text:p>
          </table:table-cell>
          <table:table-cell table:style-name="表格20.A2" office:value-type="string">
            <text:p text:style-name="P31">L3–L7</text:p>
          </table:table-cell>
        </table:table-row>
      </table:table>
      <text:h text:style-name="P61" text:outline-level="3"><text:span text:style-name="T29">▍</text:span><text:span text:style-name="T30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4">工具</text:p>
            </table:table-cell>
            <table:table-cell table:style-name="表格21.A1" office:value-type="string">
              <text:p text:style-name="P24">角色</text:p>
            </table:table-cell>
            <table:table-cell table:style-name="表格21.A1" office:value-type="string">
              <text:p text:style-name="P24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32">Firewall</text:p>
          </table:table-cell>
          <table:table-cell table:style-name="表格21.A2" office:value-type="string">
            <text:p text:style-name="P32">大門警衛</text:p>
          </table:table-cell>
          <table:table-cell table:style-name="表格21.A2" office:value-type="string">
            <text:p text:style-name="P32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32">IDS</text:p>
          </table:table-cell>
          <table:table-cell table:style-name="表格21.A3" office:value-type="string">
            <text:p text:style-name="P32">監視器（只看）</text:p>
          </table:table-cell>
          <table:table-cell table:style-name="表格21.A3" office:value-type="string">
            <text:p text:style-name="P32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32">IPS</text:p>
          </table:table-cell>
          <table:table-cell table:style-name="表格21.A2" office:value-type="string">
            <text:p text:style-name="P32">監視器＋警衛</text:p>
          </table:table-cell>
          <table:table-cell table:style-name="表格21.A2" office:value-type="string">
            <text:p text:style-name="P32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32">HIDS</text:p>
          </table:table-cell>
          <table:table-cell table:style-name="表格21.A3" office:value-type="string">
            <text:p text:style-name="P32">主機型</text:p>
          </table:table-cell>
          <table:table-cell table:style-name="表格21.A3" office:value-type="string">
            <text:p text:style-name="P32">看主機 Log／系統行為</text:p>
          </table:table-cell>
        </table:table-row>
        <table:table-row table:style-name="表格21.1">
          <table:table-cell table:style-name="表格21.A2" office:value-type="string">
            <text:p text:style-name="P32">NIDS</text:p>
          </table:table-cell>
          <table:table-cell table:style-name="表格21.A2" office:value-type="string">
            <text:p text:style-name="P32">網路型</text:p>
          </table:table-cell>
          <table:table-cell table:style-name="表格21.A2" office:value-type="string">
            <text:p text:style-name="P32">看網路封包／流量</text:p>
          </table:table-cell>
        </table:table-row>
        <table:table-row table:style-name="表格21.1">
          <table:table-cell table:style-name="表格21.A3" office:value-type="string">
            <text:p text:style-name="P32">SNMP</text:p>
          </table:table-cell>
          <table:table-cell table:style-name="表格21.A3" office:value-type="string">
            <text:p text:style-name="P32">管理室</text:p>
          </table:table-cell>
          <table:table-cell table:style-name="表格21.A3" office:value-type="string">
            <text:p text:style-name="P32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32">ICMP</text:p>
          </table:table-cell>
          <table:table-cell table:style-name="表格21.A2" office:value-type="string">
            <text:p text:style-name="P32">網路測試員</text:p>
          </table:table-cell>
          <table:table-cell table:style-name="表格21.A2" office:value-type="string">
            <text:p text:style-name="P32">診斷網路連線（網路層／Ping）</text:p>
          </table:table-cell>
        </table:table-row>
      </table:table>
      <text:h text:style-name="P61" text:outline-level="3"><text:span text:style-name="T29">▍</text:span><text:span text:style-name="T30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口訣</text:p>
            </table:table-cell>
            <table:table-cell table:style-name="表格22.A1" office:value-type="string">
              <text:p text:style-name="P23">IOC 類型</text:p>
            </table:table-cell>
            <table:table-cell table:style-name="表格22.A1" office:value-type="string">
              <text:p text:style-name="P23">白話</text:p>
            </table:table-cell>
            <table:table-cell table:style-name="表格22.A1" office:value-type="string">
              <text:p text:style-name="P23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72">網</text:p>
          </table:table-cell>
          <table:table-cell table:style-name="表格22.A2" office:value-type="string">
            <text:p text:style-name="P32">惡意 Domain</text:p>
          </table:table-cell>
          <table:table-cell table:style-name="表格22.A2" office:value-type="string">
            <text:p text:style-name="P32">釣魚網站網址</text:p>
          </table:table-cell>
          <table:table-cell table:style-name="表格22.A2" office:value-type="string">
            <text:p text:style-name="P32">DNS 封鎖網域</text:p>
          </table:table-cell>
        </table:table-row>
        <table:table-row table:style-name="表格22.1">
          <table:table-cell table:style-name="表格22.A3" office:value-type="string">
            <text:p text:style-name="P72">檔</text:p>
          </table:table-cell>
          <table:table-cell table:style-name="表格22.A3" office:value-type="string">
            <text:p text:style-name="P32">惡意 Hash</text:p>
          </table:table-cell>
          <table:table-cell table:style-name="表格22.A3" office:value-type="string">
            <text:p text:style-name="P32">惡意程式特徵碼（改名也認得）</text:p>
          </table:table-cell>
          <table:table-cell table:style-name="表格22.A3" office:value-type="string">
            <text:p text:style-name="P32">防毒比對特徵</text:p>
          </table:table-cell>
        </table:table-row>
        <table:table-row table:style-name="表格22.1">
          <table:table-cell table:style-name="表格22.A2" office:value-type="string">
            <text:p text:style-name="P72">連</text:p>
          </table:table-cell>
          <table:table-cell table:style-name="表格22.A2" office:value-type="string">
            <text:p text:style-name="P32">惡意 IP</text:p>
          </table:table-cell>
          <table:table-cell table:style-name="表格22.A2" office:value-type="string">
            <text:p text:style-name="P32">感染後對外異常連線目標</text:p>
          </table:table-cell>
          <table:table-cell table:style-name="表格22.A2" office:value-type="string">
            <text:p text:style-name="P32">FW / NGFW 封鎖</text:p>
          </table:table-cell>
        </table:table-row>
        <table:table-row table:style-name="表格22.1">
          <table:table-cell table:style-name="表格22.A3" office:value-type="string">
            <text:p text:style-name="P72">控</text:p>
          </table:table-cell>
          <table:table-cell table:style-name="表格22.A3" office:value-type="string">
            <text:p text:style-name="P32">C2 Server</text:p>
          </table:table-cell>
          <table:table-cell table:style-name="表格22.A3" office:value-type="string">
            <text:p text:style-name="P32">駭客遠端操控總部</text:p>
          </table:table-cell>
          <table:table-cell table:style-name="表格22.A3" office:value-type="string">
            <text:p text:style-name="P32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55"><text:span text:style-name="T36">必記：</text:span><text:span text:style-name="T9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61" text:outline-level="3"><text:span text:style-name="T29">▍</text:span><text:span text:style-name="T30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6">項目</text:p>
            </table:table-cell>
            <table:table-cell table:style-name="表格23.A1" office:value-type="string">
              <text:p text:style-name="P26">Recursive 遞迴</text:p>
            </table:table-cell>
            <table:table-cell table:style-name="表格23.A1" office:value-type="string">
              <text:p text:style-name="P26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5">口訣</text:p>
          </table:table-cell>
          <table:table-cell table:style-name="表格23.A2" office:value-type="string">
            <text:p text:style-name="P63">代查到底</text:p>
          </table:table-cell>
          <table:table-cell table:style-name="表格23.A2" office:value-type="string">
            <text:p text:style-name="P12">逐層詢問</text:p>
          </table:table-cell>
        </table:table-row>
        <table:table-row table:style-name="表格23.1">
          <table:table-cell table:style-name="表格23.A3" office:value-type="string">
            <text:p text:style-name="P45">誰去問</text:p>
          </table:table-cell>
          <table:table-cell table:style-name="表格23.A3" office:value-type="string">
            <text:p text:style-name="P45">DNS 伺服器代你問完</text:p>
          </table:table-cell>
          <table:table-cell table:style-name="表格23.A3" office:value-type="string">
            <text:p text:style-name="P45">你自己逐層查詢</text:p>
          </table:table-cell>
        </table:table-row>
        <table:table-row table:style-name="表格23.1">
          <table:table-cell table:style-name="表格23.A2" office:value-type="string">
            <text:p text:style-name="P45">問幾次</text:p>
          </table:table-cell>
          <table:table-cell table:style-name="表格23.A2" office:value-type="string">
            <text:p text:style-name="P45">只問 1 次</text:p>
          </table:table-cell>
          <table:table-cell table:style-name="表格23.A2" office:value-type="string">
            <text:p text:style-name="P45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5">常見場合</text:p>
          </table:table-cell>
          <table:table-cell table:style-name="表格23.A3" office:value-type="string">
            <text:p text:style-name="P45">一般使用者 → Local DNS</text:p>
          </table:table-cell>
          <table:table-cell table:style-name="表格23.A3" office:value-type="string">
            <text:p text:style-name="P45">DNS 伺服器之間互查</text:p>
          </table:table-cell>
        </table:table-row>
      </table:table>
      <text:h text:style-name="P61" text:outline-level="3"><text:span text:style-name="T29">▍</text:span><text:span text:style-name="T30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4">指標 / 名詞</text:p>
            </table:table-cell>
            <table:table-cell table:style-name="表格24.A1" office:value-type="string">
              <text:p text:style-name="P24">意義</text:p>
            </table:table-cell>
            <table:table-cell table:style-name="表格24.A1" office:value-type="string">
              <text:p text:style-name="P24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32">RTO</text:p>
          </table:table-cell>
          <table:table-cell table:style-name="表格24.A2" office:value-type="string">
            <text:p text:style-name="P32">Recovery Time Objective 復原時間目標</text:p>
          </table:table-cell>
          <table:table-cell table:style-name="表格24.A2" office:value-type="string">
            <text:p text:style-name="P18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32">RPO</text:p>
          </table:table-cell>
          <table:table-cell table:style-name="表格24.A3" office:value-type="string">
            <text:p text:style-name="P32">Recovery Point Objective 復原點目標</text:p>
          </table:table-cell>
          <table:table-cell table:style-name="表格24.A3" office:value-type="string">
            <text:p text:style-name="P18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32">EDR</text:p>
          </table:table-cell>
          <table:table-cell table:style-name="表格24.A2" office:value-type="string">
            <text:p text:style-name="P32">Endpoint Detection &amp; Response</text:p>
          </table:table-cell>
          <table:table-cell table:style-name="表格24.A2" office:value-type="string">
            <text:p text:style-name="P32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32">MDR</text:p>
          </table:table-cell>
          <table:table-cell table:style-name="表格24.A3" office:value-type="string">
            <text:p text:style-name="P32">Managed Detection &amp; Response</text:p>
          </table:table-cell>
          <table:table-cell table:style-name="表格24.A3" office:value-type="string">
            <text:p text:style-name="P32">請資安公司委外守（24／7，適合中小企業）</text:p>
          </table:table-cell>
        </table:table-row>
      </table:table>
      <text:h text:style-name="P61" text:outline-level="3"><text:span text:style-name="T29">▍</text:span><text:span text:style-name="T30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23">Protocol 值</text:p>
            </table:table-cell>
            <table:table-cell table:style-name="表格25.A1" office:value-type="string">
              <text:p text:style-name="P23">DF Flag</text:p>
            </table:table-cell>
            <table:table-cell table:style-name="表格25.A1" office:value-type="string">
              <text:p text:style-name="P23">MF Flag</text:p>
            </table:table-cell>
            <table:table-cell table:style-name="表格25.A1" office:value-type="string">
              <text:p text:style-name="P23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32">ICMP=1 / TCP=6 / UDP=17</text:p>
          </table:table-cell>
          <table:table-cell table:style-name="表格25.A2" office:value-type="string">
            <text:p text:style-name="P32">DF=1：禁止切，太大就丟＋ICMP</text:p>
          </table:table-cell>
          <table:table-cell table:style-name="表格25.A2" office:value-type="string">
            <text:p text:style-name="P32">MF=1：後面還有分段（最後段=0）</text:p>
          </table:table-cell>
          <table:table-cell table:style-name="表格25.A2" office:value-type="string">
            <text:p text:style-name="P1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54"><text:span text:style-name="T4">✅ <text:s/></text:span><text:span text:style-name="T24">提醒</text:span></text:p>
            <text:p text:style-name="P42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25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54"><text:span text:style-name="T4">🌐 <text:s/></text:span><text:span text:style-name="T24">本篇重點</text:span></text:p>
            <text:p text:style-name="P42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9" text:outline-level="2">一、用「寄信」理解分層（修正版）</text:h>
      <text:p text:style-name="P44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4">TCP/IP 層</text:p>
            </table:table-cell>
            <table:table-cell table:style-name="表格27.A1" office:value-type="string">
              <text:p text:style-name="P24">郵寄比喻</text:p>
            </table:table-cell>
            <table:table-cell table:style-name="表格27.A1" office:value-type="string">
              <text:p text:style-name="P24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32">🟢 應用層 Application</text:p>
          </table:table-cell>
          <table:table-cell table:style-name="表格27.A2" office:value-type="string">
            <text:p text:style-name="P32">決定「<text:span text:style-name="T40">寄什麼內容</text:span>」（信的內容與格式）</text:p>
          </table:table-cell>
          <table:table-cell table:style-name="表格27.A2" office:value-type="string">
            <text:p text:style-name="P32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32">🟡 傳輸層 Transport</text:p>
          </table:table-cell>
          <table:table-cell table:style-name="表格27.A3" office:value-type="string">
            <text:p text:style-name="P75">切分、編頁碼、確認收件</text:p>
          </table:table-cell>
          <table:table-cell table:style-name="表格27.A3" office:value-type="string">
            <text:p text:style-name="P32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32">🔵 網路層 Network</text:p>
          </table:table-cell>
          <table:table-cell table:style-name="表格27.A2" office:value-type="string">
            <text:p text:style-name="P32"><text:span text:style-name="T49">寫地址＋規劃路線</text:span>（郵遞區號＋郵局選路）</text:p>
          </table:table-cell>
          <table:table-cell table:style-name="表格27.A2" office:value-type="string">
            <text:p text:style-name="P76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32">🟠 連結層 Link</text:p>
          </table:table-cell>
          <table:table-cell table:style-name="表格27.A3" office:value-type="string">
            <text:p text:style-name="P32">當前路段的區域配送</text:p>
          </table:table-cell>
          <table:table-cell table:style-name="表格27.A3" office:value-type="string">
            <text:p text:style-name="P83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54"><text:span text:style-name="T4">⚠️ <text:s/></text:span><text:span text:style-name="T39">舊版三大比喻的錯誤</text:span></text:p>
            <text:p text:style-name="P55"><text:span text:style-name="T16">❌ 舊：「寫地址 → 應用層」　</text:span><text:span text:style-name="T9">IP 位址屬於網路層；應用層負責的是「內容與格式」，不是地址。</text:span></text:p>
            <text:p text:style-name="P56"><text:span text:style-name="T16">❌ 舊：「打包 → 傳輸層」　</text:span><text:span text:style-name="T9">傳輸層還負責切割、編號、重傳、流量控制，遠不只「打包」。</text:span></text:p>
            <text:p text:style-name="P56"><text:span text:style-name="T16">❌ 舊：「實際搬運 → 連結層」　</text:span><text:span text:style-name="T9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9" text:outline-level="2">二、OSI 7 層 vs TCP/IP 4 層（完整對照）</text:h>
      <text:p text:style-name="P44"><text:span text:style-name="T42">OSI 是理論模型（7 層）</text:span>；<text:span text:style-name="T40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層號</text:p>
            </table:table-cell>
            <table:table-cell table:style-name="表格28.A1" office:value-type="string">
              <text:p text:style-name="P23">OSI 層名</text:p>
            </table:table-cell>
            <table:table-cell table:style-name="表格28.A1" office:value-type="string">
              <text:p text:style-name="P23">主要功能</text:p>
            </table:table-cell>
            <table:table-cell table:style-name="表格28.A1" office:value-type="string">
              <text:p text:style-name="P23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31">7</text:p>
          </table:table-cell>
          <table:table-cell table:style-name="表格28.A2" office:value-type="string">
            <text:p text:style-name="P32">Application <text:span text:style-name="T44">應</text:span>用層</text:p>
          </table:table-cell>
          <table:table-cell table:style-name="表格28.A2" office:value-type="string">
            <text:p text:style-name="P32">使用者直接操作：HTTP、DNS、DHCP</text:p>
          </table:table-cell>
          <table:table-cell table:style-name="表格28.A2" office:value-type="string">
            <text:p text:style-name="P32">Application</text:p>
          </table:table-cell>
        </table:table-row>
        <table:table-row table:style-name="表格28.1">
          <table:table-cell table:style-name="表格28.A3" office:value-type="string">
            <text:p text:style-name="P31">6</text:p>
          </table:table-cell>
          <table:table-cell table:style-name="表格28.A3" office:value-type="string">
            <text:p text:style-name="P32">Presentation <text:span text:style-name="T44">表</text:span>示層</text:p>
          </table:table-cell>
          <table:table-cell table:style-name="表格28.A3" office:value-type="string">
            <text:p text:style-name="P85">資料格式轉換、加解密、壓縮</text:p>
          </table:table-cell>
          <table:table-cell table:style-name="表格28.A3" office:value-type="string">
            <text:p text:style-name="P32">↑ 併入 Application</text:p>
          </table:table-cell>
        </table:table-row>
        <table:table-row table:style-name="表格28.1">
          <table:table-cell table:style-name="表格28.A2" office:value-type="string">
            <text:p text:style-name="P31">5</text:p>
          </table:table-cell>
          <table:table-cell table:style-name="表格28.A2" office:value-type="string">
            <text:p text:style-name="P32">Session <text:span text:style-name="T44">會</text:span>話層</text:p>
          </table:table-cell>
          <table:table-cell table:style-name="表格28.A2" office:value-type="string">
            <text:p text:style-name="P88">連線的建立、維持與終止</text:p>
          </table:table-cell>
          <table:table-cell table:style-name="表格28.A2" office:value-type="string">
            <text:p text:style-name="P32">↑ 併入 Application</text:p>
          </table:table-cell>
        </table:table-row>
        <table:table-row table:style-name="表格28.1">
          <table:table-cell table:style-name="表格28.A3" office:value-type="string">
            <text:p text:style-name="P31">4</text:p>
          </table:table-cell>
          <table:table-cell table:style-name="表格28.A3" office:value-type="string">
            <text:p text:style-name="P32">Transport <text:span text:style-name="T44">傳</text:span>輸層</text:p>
          </table:table-cell>
          <table:table-cell table:style-name="表格28.A3" office:value-type="string">
            <text:p text:style-name="P32">端對端傳輸控制（TCP / UDP）</text:p>
          </table:table-cell>
          <table:table-cell table:style-name="表格28.A3" office:value-type="string">
            <text:p text:style-name="P32">Transport</text:p>
          </table:table-cell>
        </table:table-row>
        <table:table-row table:style-name="表格28.1">
          <table:table-cell table:style-name="表格28.A2" office:value-type="string">
            <text:p text:style-name="P31">3</text:p>
          </table:table-cell>
          <table:table-cell table:style-name="表格28.A2" office:value-type="string">
            <text:p text:style-name="P32">Network <text:span text:style-name="T44">網</text:span>路層</text:p>
          </table:table-cell>
          <table:table-cell table:style-name="表格28.A2" office:value-type="string">
            <text:p text:style-name="P83">IP 路由、ICMP 錯誤回報</text:p>
          </table:table-cell>
          <table:table-cell table:style-name="表格28.A2" office:value-type="string">
            <text:p text:style-name="P32">Internet</text:p>
          </table:table-cell>
        </table:table-row>
        <table:table-row table:style-name="表格28.1">
          <table:table-cell table:style-name="表格28.A3" office:value-type="string">
            <text:p text:style-name="P31">2</text:p>
          </table:table-cell>
          <table:table-cell table:style-name="表格28.A3" office:value-type="string">
            <text:p text:style-name="P32">Data Link <text:span text:style-name="T50">資</text:span>料鏈結層</text:p>
          </table:table-cell>
          <table:table-cell table:style-name="表格28.A3" office:value-type="string">
            <text:p text:style-name="P90">MAC 位址、區域網路傳輸（ARP）</text:p>
          </table:table-cell>
          <table:table-cell table:style-name="表格28.A3" office:value-type="string">
            <text:p text:style-name="P32">Link</text:p>
          </table:table-cell>
        </table:table-row>
        <table:table-row table:style-name="表格28.1">
          <table:table-cell table:style-name="表格28.A2" office:value-type="string">
            <text:p text:style-name="P31">1</text:p>
          </table:table-cell>
          <table:table-cell table:style-name="表格28.A2" office:value-type="string">
            <text:p text:style-name="P32">Physical <text:span text:style-name="T44">實</text:span>體層</text:p>
          </table:table-cell>
          <table:table-cell table:style-name="表格28.A2" office:value-type="string">
            <text:p text:style-name="P32">電訊號、光訊號、無線電波</text:p>
          </table:table-cell>
          <table:table-cell table:style-name="表格28.A2" office:value-type="string">
            <text:p text:style-name="P32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54"><text:span text:style-name="T4">⚡ <text:s/></text:span><text:span text:style-name="T30">速記</text:span></text:p>
            <text:p text:style-name="P42"><text:span text:style-name="T42">OSI → 7 層（理論）</text:span>，<text:span text:style-name="T40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97" text:outline-level="2"><text:soft-page-break/><text:span text:style-name="T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23">🟢 Application 應用層</text:p>
            </table:table-cell>
            <table:table-cell table:style-name="表格29.A1" office:value-type="string">
              <text:p text:style-name="P23">🟡 Transport 傳輸層</text:p>
            </table:table-cell>
            <table:table-cell table:style-name="表格29.A1" office:value-type="string">
              <text:p text:style-name="P23">🔵 Network 網路層</text:p>
            </table:table-cell>
            <table:table-cell table:style-name="表格29.A1" office:value-type="string">
              <text:p text:style-name="P23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32">HTTP / HTTPS、DNS、DHCP、SSH、MQTT、<text:span text:style-name="T52">OSPF*</text:span></text:p>
          </table:table-cell>
          <table:table-cell table:style-name="表格29.A2" office:value-type="string">
            <text:p text:style-name="P98">TCP（可靠傳輸）、UDP（高速傳輸）</text:p>
          </table:table-cell>
          <table:table-cell table:style-name="表格29.A2" office:value-type="string">
            <text:p text:style-name="P32">IP（路由定址）、<text:span text:style-name="T54">ICMP（錯誤回報 / ping）</text:span></text:p>
          </table:table-cell>
          <table:table-cell table:style-name="表格29.A2" office:value-type="string">
            <text:p text:style-name="P32">Ethernet（有線網路）、<text:span text:style-name="T57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55"><text:span text:style-name="T36">OSPF 分層備註：</text:span><text:span text:style-name="T9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8">協定</text:p>
            </table:table-cell>
            <table:table-cell table:style-name="表格30.A1" office:value-type="string">
              <text:p text:style-name="P28">層級</text:p>
            </table:table-cell>
            <table:table-cell table:style-name="表格30.A1" office:value-type="string">
              <text:p text:style-name="P28">做什麼（白話）</text:p>
            </table:table-cell>
            <table:table-cell table:style-name="表格30.A1" office:value-type="string">
              <text:p text:style-name="P28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7"><text:span text:style-name="T64">DHCP</text:span> Dynamic Host Configuration Protocol</text:p>
          </table:table-cell>
          <table:table-cell table:style-name="表格30.A2" office:value-type="string">
            <text:p text:style-name="P47">應用層</text:p>
          </table:table-cell>
          <table:table-cell table:style-name="表格30.A2" office:value-type="string">
            <text:p text:style-name="P47"><text:span text:style-name="T42">連上 WiFi 時不必手動設定 IP</text:span>，DHCP 伺服器<text:span text:style-name="T58">自動分配一個 IP 給你</text:span>。</text:p>
          </table:table-cell>
          <table:table-cell table:style-name="表格30.A2" office:value-type="string">
            <text:p text:style-name="P47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7"><text:span text:style-name="T64">SSH</text:span> Secure Shell</text:p>
          </table:table-cell>
          <table:table-cell table:style-name="表格30.A3" office:value-type="string">
            <text:p text:style-name="P47">應用層</text:p>
          </table:table-cell>
          <table:table-cell table:style-name="表格30.A3" office:value-type="string">
            <text:p text:style-name="P47"><text:span text:style-name="T66">透過加密通道遠端操控</text:span>另一台 Linux／伺服器的終端機。</text:p>
          </table:table-cell>
          <table:table-cell table:style-name="表格30.A3" office:value-type="string">
            <text:p text:style-name="P47">加密版的遠端遙控器</text:p>
          </table:table-cell>
        </table:table-row>
        <table:table-row table:style-name="表格30.1">
          <table:table-cell table:style-name="表格30.A2" office:value-type="string">
            <text:p text:style-name="P47"><text:span text:style-name="T64">MQTT</text:span> Message Queuing Telemetry Transport</text:p>
          </table:table-cell>
          <table:table-cell table:style-name="表格30.A2" office:value-type="string">
            <text:p text:style-name="P47">應用層</text:p>
          </table:table-cell>
          <table:table-cell table:style-name="表格30.A2" office:value-type="string">
            <text:p text:style-name="P47"><text:span text:style-name="T77">IoT 裝置常用的輕量傳訊協定</text:span>，採<text:span text:style-name="T95">「發布／訂閱」模式</text:span>，非常省流量。</text:p>
          </table:table-cell>
          <table:table-cell table:style-name="表格30.A2" office:value-type="string">
            <text:p text:style-name="P47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7"><text:span text:style-name="T64">OSPF</text:span> Open Shortest Path First</text:p>
          </table:table-cell>
          <table:table-cell table:style-name="表格30.A3" office:value-type="string">
            <text:p text:style-name="P47">視模型而定 ⚠️</text:p>
          </table:table-cell>
          <table:table-cell table:style-name="表格30.A3" office:value-type="string">
            <text:p text:style-name="P47"><text:span text:style-name="T112">路由器之間使用</text:span>，<text:span text:style-name="T59">自動計算封包走哪條路徑最短、最快</text:span>。</text:p>
          </table:table-cell>
          <table:table-cell table:style-name="表格30.A3" office:value-type="string">
            <text:p text:style-name="P47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54"><text:span text:style-name="T4">💡 <text:s/></text:span><text:span text:style-name="T30">快速判斷層級的技巧</text:span></text:p>
            <text:p text:style-name="P55"><text:span text:style-name="T33">使用者／應用服務</text:span><text:span text:style-name="T9">（SSH、DHCP、MQTT、HTTP）→ 幾乎都是應用層。</text:span></text:p>
            <text:p text:style-name="P56"><text:span text:style-name="T33">幫路由器決定走哪條路</text:span><text:span text:style-name="T9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9" text:outline-level="2">五、網路層深度解析：IP · Routing · ICMP</text:h>
      <text:p text:style-name="P44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23">📍 IP（位址）</text:p>
            </table:table-cell>
            <table:table-cell table:style-name="表格31.A1" office:value-type="string">
              <text:p text:style-name="P23">🗺️ Routing（路由）</text:p>
            </table:table-cell>
            <table:table-cell table:style-name="表格31.A1" office:value-type="string">
              <text:p text:style-name="P23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32"><text:span text:style-name="T40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32"><text:span text:style-name="T40">決定「怎麼走最快」</text:span>。<text:span text:style-name="T42">封包經過很多路由器</text:span>，<text:span text:style-name="T66">每台都問「下一站往哪送？」</text:span><text:span text:style-name="T112">OSPF 等協定算出最短路徑。</text:span></text:p>
          </table:table-cell>
          <table:table-cell table:style-name="表格31.A2" office:value-type="string">
            <text:p text:style-name="P32"><text:span text:style-name="T40">回報「出了什麼問題」</text:span>。找不到主機、路不通、TTL 歸零 → <text:span text:style-name="T5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54"><text:span text:style-name="T4">🔍 <text:s/></text:span><text:span text:style-name="T24">ping 是什麼？為什麼跟 ICMP 有關？</text:span></text:p>
            <text:p text:style-name="P19"><text:span text:style-name="T64">ping google.com 的運作</text:span>：</text:p>
            <text:p text:style-name="P41">① 你的電腦發出 <text:span text:style-name="T42">ICMP Echo Request</text:span>（「你在嗎？」）</text:p>
            <text:p text:style-name="P41">② 目標主機回傳 <text:span text:style-name="T42">ICMP Echo Reply</text:span>（「我在！」）</text:p>
            <text:p text:style-name="P41">③ <text:span text:style-name="T134">顯示來回時間（ms），數字越小代表網路越暢通</text:span></text:p>
            <text:p text:style-name="P56"><text:span text:style-name="T36">⚠️ 重點：</text:span><text:span text:style-name="T62">ping 完全使用 ICMP，不走 TCP 也不走 UDP</text:span><text:span text:style-name="T9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54"><text:span text:style-name="T4">⚡ <text:s/></text:span><text:span text:style-name="T30">三個概念一次記清楚</text:span></text:p>
            <text:p text:style-name="P55"><text:span text:style-name="T33">📍 IP → </text:span><text:span text:style-name="T9">定位（目的地是誰）　</text:span><text:span text:style-name="T33">🗺️ Routing → </text:span><text:span text:style-name="T73">選路（怎麼走最快）</text:span><text:span text:style-name="T9">　</text:span><text:span text:style-name="T33">🚨 </text:span><text:span text:style-name="T34">ICMP → </text:span><text:span text:style-name="T62">回報（出錯了通知你）</text:span></text:p>
          </table:table-cell>
          <table:covered-table-cell/>
          <table:covered-table-cell/>
        </table:table-row>
      </table:table>
      <text:h text:style-name="P97" text:outline-level="2"><text:soft-page-break/><text:span text:style-name="T8">六、TCP vs UDP 差異比較</text:span></text:h>
      <text:p text:style-name="P44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6">比較項目</text:p>
            </table:table-cell>
            <table:table-cell table:style-name="表格32.A1" office:value-type="string">
              <text:p text:style-name="P26">TCP</text:p>
            </table:table-cell>
            <table:table-cell table:style-name="表格32.A1" office:value-type="string">
              <text:p text:style-name="P26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5">連線方式</text:p>
          </table:table-cell>
          <table:table-cell table:style-name="表格32.A2" office:value-type="string">
            <text:p text:style-name="P45">需要握手（三向交握）</text:p>
          </table:table-cell>
          <table:table-cell table:style-name="表格32.A2" office:value-type="string">
            <text:p text:style-name="P45">無連線，直接送出</text:p>
          </table:table-cell>
        </table:table-row>
        <table:table-row table:style-name="表格32.1">
          <table:table-cell table:style-name="表格32.A3" office:value-type="string">
            <text:p text:style-name="P45">可靠性</text:p>
          </table:table-cell>
          <table:table-cell table:style-name="表格32.A3" office:value-type="string">
            <text:p text:style-name="P81">保證送達，遺失會重傳</text:p>
          </table:table-cell>
          <table:table-cell table:style-name="表格32.A3" office:value-type="string">
            <text:p text:style-name="P96">不保證，遺失不補</text:p>
          </table:table-cell>
        </table:table-row>
        <table:table-row table:style-name="表格32.1">
          <table:table-cell table:style-name="表格32.A2" office:value-type="string">
            <text:p text:style-name="P45">速度</text:p>
          </table:table-cell>
          <table:table-cell table:style-name="表格32.A2" office:value-type="string">
            <text:p text:style-name="P46">較慢（有確認機制）</text:p>
          </table:table-cell>
          <table:table-cell table:style-name="表格32.A2" office:value-type="string">
            <text:p text:style-name="P46">較快（無確認機制）</text:p>
          </table:table-cell>
        </table:table-row>
        <table:table-row table:style-name="表格32.1">
          <table:table-cell table:style-name="表格32.A3" office:value-type="string">
            <text:p text:style-name="P45">使用情境</text:p>
          </table:table-cell>
          <table:table-cell table:style-name="表格32.A3" office:value-type="string">
            <text:p text:style-name="P45">HTTP、Email、FTP</text:p>
          </table:table-cell>
          <table:table-cell table:style-name="表格32.A3" office:value-type="string">
            <text:p text:style-name="P45">串流影音、VoIP、DNS</text:p>
          </table:table-cell>
        </table:table-row>
        <table:table-row table:style-name="表格32.1">
          <table:table-cell table:style-name="表格32.A2" office:value-type="string">
            <text:p text:style-name="P45">一句話</text:p>
          </table:table-cell>
          <table:table-cell table:style-name="表格32.A2" office:value-type="string">
            <text:p text:style-name="P64">「穩定優先」</text:p>
          </table:table-cell>
          <table:table-cell table:style-name="表格32.A2" office:value-type="string">
            <text:p text:style-name="P13">「速度優先」</text:p>
          </table:table-cell>
        </table:table-row>
      </table:table>
      <text:h text:style-name="P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4"><text:span text:style-name="T4">🔗 <text:s/></text:span><text:span text:style-name="T24">ARP 重點</text:span></text:p>
            <text:p text:style-name="P55"><text:span text:style-name="T25">ARP 做什麼？　</text:span><text:span text:style-name="T17">在</text:span><text:span text:style-name="T55">同一個</text:span><text:span text:style-name="T17">區域網路（LAN）中</text:span><text:span text:style-name="T9">，</text:span><text:span text:style-name="T138">將「IP 位址（邏輯位址）」轉換成「MAC 位址（實體位址）」</text:span><text:span text:style-name="T9">。</text:span></text:p>
            <text:p text:style-name="P56"><text:span text:style-name="T25">為何屬於 Link 層？　</text:span><text:span text:style-name="T62">ARP 的作用範圍僅限於同一區域網路內，</text:span><text:span text:style-name="T56">無法跨越路由器</text:span><text:span text:style-name="T9">，因此歸屬 Link（連結）層。</text:span></text:p>
            <text:p text:style-name="P20">運作流程：</text:p>
            <text:p text:style-name="P41">① <text:span text:style-name="T45">裝置 A 廣播詢問：</text:span>「<text:span text:style-name="T42">誰的 IP</text:span> 是 192.168.1.5？」</text:p>
            <text:p text:style-name="P41">② <text:span text:style-name="T44">裝置 B 回應：</text:span>「<text:span text:style-name="T40">是我！MAC 是</text:span> AA:BB:CC:DD:EE:FF」</text:p>
            <text:p text:style-name="P41">③ 裝置 A 記錄此對應至 ARP 快取，下次直接使用</text:p>
          </table:table-cell>
        </table:table-row>
      </table:table>
      <text:p text:style-name="P4">（ARP 完整流程、ARP Spoofing 與完整上網流程，詳見第四篇。）</text:p>
      <text:h text:style-name="P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55"><text:span text:style-name="T7">目的：</text:span><text:span text:style-name="T141">找出封包從來源到目的地</text:span><text:span text:style-name="T145">，</text:span><text:span text:style-name="T148">中間經過哪些路由器</text:span><text:span text:style-name="T9">（完整路徑偵測）。</text:span></text:p>
            <text:p text:style-name="P56"><text:span text:style-name="T149">TTL（Time To Live）</text:span><text:span text:style-name="T7">：</text:span><text:span text:style-name="T139">封包的「存活計數器」。每經過一個路由器就減 1</text:span><text:span text:style-name="T9">；</text:span><text:span text:style-name="T122">歸零時路由器丟棄封包</text:span><text:span text:style-name="T9">，並</text:span><text:span text:style-name="T85">回傳 ICMP Time Exceeded 給發送方</text:span><text:span text:style-name="T9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8">封包次數</text:p>
          </table:table-cell>
          <table:table-cell table:style-name="表格34.A2" office:value-type="string">
            <text:p text:style-name="P28">TTL 值</text:p>
          </table:table-cell>
          <table:table-cell table:style-name="表格34.A2" office:value-type="string">
            <text:p text:style-name="P28">發生什麼事</text:p>
          </table:table-cell>
          <table:table-cell table:style-name="表格34.A2" office:value-type="string">
            <text:p text:style-name="P28">取得資訊</text:p>
          </table:table-cell>
        </table:table-row>
        <table:table-row table:style-name="表格34.1">
          <table:table-cell table:style-name="表格34.A3" office:value-type="string">
            <text:p text:style-name="P47">第 1 次</text:p>
          </table:table-cell>
          <table:table-cell table:style-name="表格34.A3" office:value-type="string">
            <text:p text:style-name="P47">TTL = 1</text:p>
          </table:table-cell>
          <table:table-cell table:style-name="表格34.A3" office:value-type="string">
            <text:p text:style-name="P47"><text:span text:style-name="T40">抵達第 1 個 Router </text:span>→ TTL 歸零 → 回傳 ICMP Time Exceeded</text:p>
          </table:table-cell>
          <table:table-cell table:style-name="表格34.A3" office:value-type="string">
            <text:p text:style-name="P50">得知第 1 站位置</text:p>
          </table:table-cell>
        </table:table-row>
        <table:table-row table:style-name="表格34.1">
          <table:table-cell table:style-name="表格34.A4" office:value-type="string">
            <text:p text:style-name="P47">第 2 次</text:p>
          </table:table-cell>
          <table:table-cell table:style-name="表格34.A4" office:value-type="string">
            <text:p text:style-name="P47">TTL = 2</text:p>
          </table:table-cell>
          <table:table-cell table:style-name="表格34.A4" office:value-type="string">
            <text:p text:style-name="P47"><text:span text:style-name="T40">通過第 1 站 → 抵達第 2 個 Router</text:span> → TTL 歸零 → 回傳 ICMP</text:p>
          </table:table-cell>
          <table:table-cell table:style-name="表格34.A4" office:value-type="string">
            <text:p text:style-name="P50">得知第 2 站位置</text:p>
          </table:table-cell>
        </table:table-row>
        <table:table-row table:style-name="表格34.1">
          <table:table-cell table:style-name="表格34.A3" office:value-type="string">
            <text:p text:style-name="P47">第 N 次</text:p>
          </table:table-cell>
          <table:table-cell table:style-name="表格34.A3" office:value-type="string">
            <text:p text:style-name="P47">TTL = N</text:p>
          </table:table-cell>
          <table:table-cell table:style-name="表格34.A3" office:value-type="string">
            <text:p text:style-name="P47">以此類推，每次多走一站</text:p>
          </table:table-cell>
          <table:table-cell table:style-name="表格34.A3" office:value-type="string">
            <text:p text:style-name="P47">逐步還原完整路徑</text:p>
          </table:table-cell>
        </table:table-row>
        <table:table-row table:style-name="表格34.1">
          <table:table-cell table:style-name="表格34.A4" office:value-type="string">
            <text:p text:style-name="P47">最後</text:p>
          </table:table-cell>
          <table:table-cell table:style-name="表格34.A4" office:value-type="string">
            <text:p text:style-name="P47">TTL = 距離</text:p>
          </table:table-cell>
          <table:table-cell table:style-name="表格34.A4" office:value-type="string">
            <text:p text:style-name="P47">封包抵達目的地，回傳正常應答</text:p>
          </table:table-cell>
          <table:table-cell table:style-name="表格34.A4" office:value-type="string">
            <text:p text:style-name="P47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54"><text:span text:style-name="T4">⚡ <text:s/></text:span><text:span text:style-name="T30">一句話記憶</text:span></text:p>
            <text:p text:style-name="P42"><text:span text:style-name="T5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54"><text:span text:style-name="T4">🔥 <text:s/></text:span><text:span text:style-name="T157">TCP/IP 四層心法（背這個就夠）</text:span></text:p>
            <text:p text:style-name="P55"><text:span text:style-name="T158">🟢 Application（應用層） → </text:span><text:span text:style-name="T9">給人用（HTTP、DNS、DHCP、SSH、MQTT）</text:span></text:p>
            <text:p text:style-name="P57"><text:soft-page-break/><text:span text:style-name="T158">🟡 Transport（傳輸層） → </text:span><text:span text:style-name="T9">怎麼送（TCP＝穩定 / UDP＝快速）(</text:span><text:span text:style-name="T146">切分、編頁碼、確認收件</text:span><text:span text:style-name="T9">)</text:span></text:p>
            <text:p text:style-name="P56"><text:span text:style-name="T158">🔵 Network（網路層） → </text:span><text:span text:style-name="T9">走哪條路（IP、ICMP）</text:span></text:p>
            <text:p text:style-name="P58"><text:span text:style-name="T158">🟠 Link（連結層） → </text:span><text:span text:style-name="T9">同一區網怎麼接（Ethernet、ARP）(</text:span><text:span text:style-name="T26">ARP</text:span><text:span text:style-name="T25"> ：</text:span><text:span text:style-name="T17">在</text:span><text:span text:style-name="T55">同一個</text:span><text:span text:style-name="T17">區域網路（LAN）中</text:span><text:span text:style-name="T9">，</text:span><text:span text:style-name="T138">將「IP 位址（邏輯位址）」轉換成「MAC 位址（實體位址）」</text:span><text:span text:style-name="T9">)</text:span></text:p>
          </table:table-cell>
        </table:table-row>
      </table:table>
      <text:h text:style-name="P25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54"><text:span text:style-name="T4">📐 <text:s/></text:span><text:span text:style-name="T24">本篇重點</text:span></text:p>
            <text:p text:style-name="P42">本篇分兩大主軸：前半談「<text:span text:style-name="T40">IP 位址如何劃分</text:span>」（分類、CIDR、子網計算、VLSM、CIDR 合併）；後半談「<text:span text:style-name="T40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9" text:outline-level="2">壹、IP 位址基礎</text:h>
      <text:p text:style-name="P44"><text:span text:style-name="T42">IP 位址（IPv4）是</text:span><text:span text:style-name="T112">一組 32 個 bit</text:span>，用來<text:span text:style-name="T66">識別網路上每一台設備的「地址」</text:span>。<text:span text:style-name="T42">為了人類方便閱讀</text:span>，<text:span text:style-name="T40">這 32 個 bit 被分成 4 組</text:span>、<text:span text:style-name="T5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27">Octet 1</text:p>
            </table:table-cell>
            <table:table-cell table:style-name="表格37.A1" office:value-type="string">
              <text:p text:style-name="P27">Octet 2</text:p>
            </table:table-cell>
            <table:table-cell table:style-name="表格37.A1" office:value-type="string">
              <text:p text:style-name="P27">Octet 3</text:p>
            </table:table-cell>
            <table:table-cell table:style-name="表格37.A1" office:value-type="string">
              <text:p text:style-name="P27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5">192</text:p>
          </table:table-cell>
          <table:table-cell table:style-name="表格37.A2" office:value-type="string">
            <text:p text:style-name="P45">168</text:p>
          </table:table-cell>
          <table:table-cell table:style-name="表格37.A2" office:value-type="string">
            <text:p text:style-name="P45">1</text:p>
          </table:table-cell>
          <table:table-cell table:style-name="表格37.A2" office:value-type="string">
            <text:p text:style-name="P45">0</text:p>
          </table:table-cell>
        </table:table-row>
      </table:table>
      <text:p text:style-name="P5">→ <text:span text:style-name="T112">總共 4 × 8 = 32 個 bit</text:span>，<text:span text:style-name="T161">每組數字範圍 0～255</text:span>（因為 <text:span text:style-name="T16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54"><text:span text:style-name="T4">💡 <text:s/></text:span><text:span text:style-name="T39">為什麼 IP 數量一定是 2 的次方？</text:span></text:p>
            <text:p text:style-name="P42"><text:span text:style-name="T40">每一個 bit 只有 0 或 1 兩種狀態</text:span>。若有 n 個 bit 可自由變化，可能的組合數 ＝ 2ⁿ。</text:p>
            <text:p text:style-name="P41">因此<text:span text:style-name="T147">子網路的 IP 總數一定是 2、4、8、16、32、64、128、256… 等 2 的次方</text:span>，不可能是 100 或 50。這就是<text:span text:style-name="T162">計算子網時必須「找最接近的 2ⁿ」</text:span>的根本原因。</text:p>
          </table:table-cell>
        </table:table-row>
      </table:table>
      <text:h text:style-name="P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4">類別</text:p>
            </table:table-cell>
            <table:table-cell table:style-name="表格39.A1" office:value-type="string">
              <text:p text:style-name="P24">第一組數字範圍</text:p>
            </table:table-cell>
            <table:table-cell table:style-name="表格39.A1" office:value-type="string">
              <text:p text:style-name="P24">預設遮罩</text:p>
            </table:table-cell>
            <table:table-cell table:style-name="表格39.A1" office:value-type="string">
              <text:p text:style-name="P24">用途</text:p>
            </table:table-cell>
            <table:table-cell table:style-name="表格39.A1" office:value-type="string">
              <text:p text:style-name="P24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32">A 類</text:p>
          </table:table-cell>
          <table:table-cell table:style-name="表格39.A2" office:value-type="string">
            <text:p text:style-name="P83">1 ～ 126</text:p>
          </table:table-cell>
          <table:table-cell table:style-name="表格39.A2" office:value-type="string">
            <text:p text:style-name="P89">/8</text:p>
          </table:table-cell>
          <table:table-cell table:style-name="表格39.A2" office:value-type="string">
            <text:p text:style-name="P32">超大型網路</text:p>
          </table:table-cell>
          <table:table-cell table:style-name="表格39.A2" office:value-type="string">
            <text:p text:style-name="P32">約 1,677 萬</text:p>
          </table:table-cell>
        </table:table-row>
        <table:table-row table:style-name="表格39.1">
          <table:table-cell table:style-name="表格39.A3" office:value-type="string">
            <text:p text:style-name="P32">B 類</text:p>
          </table:table-cell>
          <table:table-cell table:style-name="表格39.A3" office:value-type="string">
            <text:p text:style-name="P83">128 ～ 191</text:p>
          </table:table-cell>
          <table:table-cell table:style-name="表格39.A3" office:value-type="string">
            <text:p text:style-name="P89">/16</text:p>
          </table:table-cell>
          <table:table-cell table:style-name="表格39.A3" office:value-type="string">
            <text:p text:style-name="P32">中型網路</text:p>
          </table:table-cell>
          <table:table-cell table:style-name="表格39.A3" office:value-type="string">
            <text:p text:style-name="P32">約 6.5 萬</text:p>
          </table:table-cell>
        </table:table-row>
        <table:table-row table:style-name="表格39.1">
          <table:table-cell table:style-name="表格39.A2" office:value-type="string">
            <text:p text:style-name="P32">C 類</text:p>
          </table:table-cell>
          <table:table-cell table:style-name="表格39.A2" office:value-type="string">
            <text:p text:style-name="P83">192 ～ 223</text:p>
          </table:table-cell>
          <table:table-cell table:style-name="表格39.A2" office:value-type="string">
            <text:p text:style-name="P89">/24</text:p>
          </table:table-cell>
          <table:table-cell table:style-name="表格39.A2" office:value-type="string">
            <text:p text:style-name="P32">小型網路</text:p>
          </table:table-cell>
          <table:table-cell table:style-name="表格39.A2" office:value-type="string">
            <text:p text:style-name="P32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55"><text:span text:style-name="T37">127.x.x.x 為何不在 A 類？　</text:span><text:span text:style-name="T10">127.0.0.1 是回送位址（Loopback），保留給本機自我測試</text:span><text:span text:style-name="T9">；</text:span><text:span text:style-name="T172">ping 127.0.0.1 可測本機協定是否正常，故 A 類跳過 127</text:span><text:span text:style-name="T9">，只到 126。</text:span></text:p>
            <text:p text:style-name="P56"><text:span text:style-name="T36">其他保留位址：</text:span><text:span text:style-name="T19">0.x.x.x＝代表「這個網路本身」</text:span><text:span text:style-name="T9">；</text:span><text:span text:style-name="T20">224～239＝D 類（群播 Multicast）</text:span><text:span text:style-name="T9">；</text:span><text:span text:style-name="T21">240～255＝E 類（實驗用）</text:span><text:span text:style-name="T9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2">參、CIDR 表示法（斜線 /幾）</text:h>
      <text:p text:style-name="P44"><text:span text:style-name="T42">CIDR（無類別網域間路由）</text:span>以<text:span text:style-name="T112">「IP + / + 數字」精確表示網路大小</text:span>，例如 192.168.1.0/24。<text:span text:style-name="T59">/ 後面的數字 ＝ 前幾個 bit 是「網路部分」（固定不變）</text:span>，<text:span text:style-name="T147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4">表示法</text:p>
            </table:table-cell>
            <table:table-cell table:style-name="表格40.A1" office:value-type="string">
              <text:p text:style-name="P24">網路 bit</text:p>
            </table:table-cell>
            <table:table-cell table:style-name="表格40.A1" office:value-type="string">
              <text:p text:style-name="P24">主機 bit</text:p>
            </table:table-cell>
            <table:table-cell table:style-name="表格40.A1" office:value-type="string">
              <text:p text:style-name="P24">IP 總數</text:p>
            </table:table-cell>
            <table:table-cell table:style-name="表格40.A1" office:value-type="string">
              <text:p text:style-name="P24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89">/8</text:p>
          </table:table-cell>
          <table:table-cell table:style-name="表格40.A2" office:value-type="string">
            <text:p text:style-name="P91">8</text:p>
          </table:table-cell>
          <table:table-cell table:style-name="表格40.A2" office:value-type="string">
            <text:p text:style-name="P77">24</text:p>
          </table:table-cell>
          <table:table-cell table:style-name="表格40.A2" office:value-type="string">
            <text:p text:style-name="P101">16,777,216</text:p>
          </table:table-cell>
          <table:table-cell table:style-name="表格40.A2" office:value-type="string">
            <text:p text:style-name="P32">第 1 組（A 類）</text:p>
          </table:table-cell>
        </table:table-row>
        <table:table-row table:style-name="表格40.1">
          <table:table-cell table:style-name="表格40.A3" office:value-type="string">
            <text:p text:style-name="P89">/16</text:p>
          </table:table-cell>
          <table:table-cell table:style-name="表格40.A3" office:value-type="string">
            <text:p text:style-name="P91">16</text:p>
          </table:table-cell>
          <table:table-cell table:style-name="表格40.A3" office:value-type="string">
            <text:p text:style-name="P77">16</text:p>
          </table:table-cell>
          <table:table-cell table:style-name="表格40.A3" office:value-type="string">
            <text:p text:style-name="P101">65,536</text:p>
          </table:table-cell>
          <table:table-cell table:style-name="表格40.A3" office:value-type="string">
            <text:p text:style-name="P32">第 1-2 組（B 類）</text:p>
          </table:table-cell>
        </table:table-row>
        <table:table-row table:style-name="表格40.1">
          <table:table-cell table:style-name="表格40.A2" office:value-type="string">
            <text:p text:style-name="P89">/24</text:p>
          </table:table-cell>
          <table:table-cell table:style-name="表格40.A2" office:value-type="string">
            <text:p text:style-name="P91">24</text:p>
          </table:table-cell>
          <table:table-cell table:style-name="表格40.A2" office:value-type="string">
            <text:p text:style-name="P77">8</text:p>
          </table:table-cell>
          <table:table-cell table:style-name="表格40.A2" office:value-type="string">
            <text:p text:style-name="P101">256</text:p>
          </table:table-cell>
          <table:table-cell table:style-name="表格40.A2" office:value-type="string">
            <text:p text:style-name="P32">第 1-3 組（C 類）</text:p>
          </table:table-cell>
        </table:table-row>
        <table:table-row table:style-name="表格40.1">
          <table:table-cell table:style-name="表格40.A3" office:value-type="string">
            <text:p text:style-name="P89">/25</text:p>
          </table:table-cell>
          <table:table-cell table:style-name="表格40.A3" office:value-type="string">
            <text:p text:style-name="P91">25</text:p>
          </table:table-cell>
          <table:table-cell table:style-name="表格40.A3" office:value-type="string">
            <text:p text:style-name="P77">7</text:p>
          </table:table-cell>
          <table:table-cell table:style-name="表格40.A3" office:value-type="string">
            <text:p text:style-name="P101">128</text:p>
          </table:table-cell>
          <table:table-cell table:style-name="表格40.A3" office:value-type="string">
            <text:p text:style-name="P32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89">/26</text:p>
          </table:table-cell>
          <table:table-cell table:style-name="表格40.A2" office:value-type="string">
            <text:p text:style-name="P92">26</text:p>
          </table:table-cell>
          <table:table-cell table:style-name="表格40.A2" office:value-type="string">
            <text:p text:style-name="P78">6</text:p>
          </table:table-cell>
          <table:table-cell table:style-name="表格40.A2" office:value-type="string">
            <text:p text:style-name="P101">64</text:p>
          </table:table-cell>
          <table:table-cell table:style-name="表格40.A2" office:value-type="string">
            <text:p text:style-name="P32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89">/27</text:p>
          </table:table-cell>
          <table:table-cell table:style-name="表格40.A3" office:value-type="string">
            <text:p text:style-name="P92">27</text:p>
          </table:table-cell>
          <table:table-cell table:style-name="表格40.A3" office:value-type="string">
            <text:p text:style-name="P78">5</text:p>
          </table:table-cell>
          <table:table-cell table:style-name="表格40.A3" office:value-type="string">
            <text:p text:style-name="P101">32</text:p>
          </table:table-cell>
          <table:table-cell table:style-name="表格40.A3" office:value-type="string">
            <text:p text:style-name="P32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89">/28</text:p>
          </table:table-cell>
          <table:table-cell table:style-name="表格40.A2" office:value-type="string">
            <text:p text:style-name="P92">28</text:p>
          </table:table-cell>
          <table:table-cell table:style-name="表格40.A2" office:value-type="string">
            <text:p text:style-name="P78">4</text:p>
          </table:table-cell>
          <table:table-cell table:style-name="表格40.A2" office:value-type="string">
            <text:p text:style-name="P101">16</text:p>
          </table:table-cell>
          <table:table-cell table:style-name="表格40.A2" office:value-type="string">
            <text:p text:style-name="P32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54"><text:span text:style-name="T4">▸ <text:s/></text:span><text:span text:style-name="T24">用 bit 切割理解 /26</text:span></text:p>
            <text:p text:style-name="P42">以 192.168.1.0<text:span text:style-name="T52">/26</text:span> 為例：</text:p>
            <text:p text:style-name="P56"><text:span text:style-name="T25">11000000 . 10101000 . 00000001 . 00</text:span><text:span text:style-name="T7">|000000</text:span></text:p>
            <text:p text:style-name="P41">└── <text:span text:style-name="T40">前 26 bit（固定＝網路）</text:span>──┘ └ <text:span text:style-name="T112">後 6 bit（可變＝主機）</text:span>┘</text:p>
            <text:p text:style-name="P41">→ <text:span text:style-name="T179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4">名稱</text:p>
            </table:table-cell>
            <table:table-cell table:style-name="表格41.A1" office:value-type="string">
              <text:p text:style-name="P24">位置</text:p>
            </table:table-cell>
            <table:table-cell table:style-name="表格41.A1" office:value-type="string">
              <text:p text:style-name="P24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104">網路位址 Network Address</text:p>
          </table:table-cell>
          <table:table-cell table:style-name="表格41.A2" office:value-type="string">
            <text:p text:style-name="P83">第一個 IP（最小）</text:p>
          </table:table-cell>
          <table:table-cell table:style-name="表格41.A2" office:value-type="string">
            <text:p text:style-name="P32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104">廣播位址 Broadcast Address</text:p>
          </table:table-cell>
          <table:table-cell table:style-name="表格41.A3" office:value-type="string">
            <text:p text:style-name="P83">最後一個 IP（最大）</text:p>
          </table:table-cell>
          <table:table-cell table:style-name="表格41.A3" office:value-type="string">
            <text:p text:style-name="P32"><text:span text:style-name="T134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73">可用主機數 ＝ IP 總數 − 2</text:p>
            <text:p text:style-name="P41">【/24 示範】<text:span text:style-name="T42">192.168.1.0＝網路位址（不能用）</text:span>… <text:span text:style-name="T44">192.168.1.255＝廣播位址（不能用）</text:span>→ <text:span text:style-name="T151">共 256 個，可用 254 個</text:span>。</text:p>
            <text:p text:style-name="P41">【/26 示範·最常考】<text:span text:style-name="T42">192.168.1.0＝網路位址</text:span> … <text:span text:style-name="T44">192.168.1.63＝廣播位址</text:span> → <text:span text:style-name="T15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55"><text:span text:style-name="T38">唯一例外 /31（點對點，RFC 3021）：</text:span><text:span text:style-name="T86">只有 2 個 IP</text:span><text:span text:style-name="T92">，</text:span><text:span text:style-name="T86">兩個都可用作主機</text:span><text:span text:style-name="T123">，沒有網路位址和廣播位址</text:span><text:span text:style-name="T9">。考試若未特別提到，預設仍要 −2。</text:span></text:p>
          </table:table-cell>
          <table:covered-table-cell/>
          <table:covered-table-cell/>
        </table:table-row>
      </table:table>
      <text:h text:style-name="P9" text:outline-level="2">伍、VLSM（可變長度子網路遮罩）</text:h>
      <text:p text:style-name="P44">VLSM 的做法：<text:span text:style-name="T42">依各部門「實際需求」分配</text:span><text:span text:style-name="T68">剛剛好大小</text:span><text:span text:style-name="T42">的子網路，</text:span><text:span text:style-name="T96">不多給、不浪費</text:span>。例如 A 部門 100 台、B 部門 50 台、C 部門 10 台，<text:span text:style-name="T7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54"><text:span text:style-name="T4">📋 <text:s/></text:span><text:span text:style-name="T30">VLSM 標準流程（三步驟）</text:span></text:p>
            <text:p text:style-name="P65">①<text:span text:style-name="T64"> 將需求由大到小排序</text:span></text:p>
            <text:p text:style-name="P56"><text:span text:style-name="T33">② </text:span><text:span text:style-name="T35">計算每個需求所需前綴</text:span><text:span text:style-name="T33">：</text:span><text:span text:style-name="T55">需求 + 2 → 找最小 2ⁿ → 前綴 = 32 − n</text:span></text:p>
            <text:p text:style-name="P66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55"><text:span text:style-name="T36">為什麼要「由大到小」？　</text:span><text:span text:style-name="T9">因為「對齊（Alignment）」：</text:span><text:span text:style-name="T123">子網路的起始位址必須是其大小的整數倍</text:span><text:span text:style-name="T9">。</text:span><text:span text:style-name="T181">大小 128 的子網只能從 0、128… 開始；大小 64 的只能從 0、64、128… 開始</text:span><text:span text:style-name="T9">。</text:span></text:p>
            <text:p text:style-name="P56"><text:span text:style-name="T36">反面示範：</text:span><text:span text:style-name="T9">若先切小的 C（/28，0～15），</text:span><text:span text:style-name="T74">再切大的 A（/25，128 個），最近可用對齊位址是 128</text:span><text:span text:style-name="T9"> → </text:span><text:span text:style-name="T124">中間 16～127 共 112 個 IP 全浪費！</text:span><text:span text:style-name="T9">正解：</text:span><text:span text:style-name="T62">先切大的，大的天然對齊，小的再從後面切</text:span><text:span text:style-name="T9">。</text:span></text:p>
          </table:table-cell>
        </table:table-row>
      </table:table>
      <text:h text:style-name="P61" text:outline-level="3"><text:span text:style-name="T29">▍</text:span><text:span text:style-name="T30"> </text:span><text:span text:style-name="T31">前綴計算公式詳解</text:span><text:span text:style-name="T30">（以</text:span><text:span text:style-name="T104">需要 100 台主機為例</text:span><text:span text:style-name="T30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2">① <text:span text:style-name="T40">加 2（預留網路 + 廣播）</text:span>：<text:span text:style-name="T52">100 + 2 = 102</text:span></text:p>
            <text:p text:style-name="P41">② <text:span text:style-name="T64">找「大於等於 102」的最小 2ⁿ</text:span>：2⁶ = 64（太小）、<text:span text:style-name="T112">2⁷ = 128（夠）→ n = 7</text:span></text:p>
            <text:p text:style-name="P41">③ <text:span text:style-name="T59">前綴 = 32 − n = 32 − 7 = 25</text:span> →<text:span text:style-name="T76"> </text:span><text:span text:style-name="T79">使用 /25（驗證：2⁷ = 128，可用 126 ≥ 100 ✔）</text:span></text:p>
            <text:p text:style-name="P14"><text:span text:style-name="T52">公式一句話</text:span>：<text:span text:style-name="T155">需求 +2 → 找最小 2ⁿ</text:span> → <text:span text:style-name="T131">/(32−n)</text:span></text:p>
          </table:table-cell>
        </table:table-row>
      </table:table>
      <text:h text:style-name="P61" text:outline-level="3"><text:soft-page-break/><text:span text:style-name="T29">▍</text:span><text:span text:style-name="T30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8">部門</text:p>
            </table:table-cell>
            <table:table-cell table:style-name="表格44.A1" office:value-type="string">
              <text:p text:style-name="P28">需求</text:p>
            </table:table-cell>
            <table:table-cell table:style-name="表格44.A1" office:value-type="string">
              <text:p text:style-name="P28">+2</text:p>
            </table:table-cell>
            <table:table-cell table:style-name="表格44.A1" office:value-type="string">
              <text:p text:style-name="P28">2ⁿ</text:p>
            </table:table-cell>
            <table:table-cell table:style-name="表格44.A1" office:value-type="string">
              <text:p text:style-name="P28">前綴</text:p>
            </table:table-cell>
            <table:table-cell table:style-name="表格44.A1" office:value-type="string">
              <text:p text:style-name="P28">切割結果（範圍）</text:p>
            </table:table-cell>
            <table:table-cell table:style-name="表格44.A1" office:value-type="string">
              <text:p text:style-name="P28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7">A</text:p>
          </table:table-cell>
          <table:table-cell table:style-name="表格44.A2" office:value-type="string">
            <text:p text:style-name="P47">100</text:p>
          </table:table-cell>
          <table:table-cell table:style-name="表格44.A2" office:value-type="string">
            <text:p text:style-name="P47">102</text:p>
          </table:table-cell>
          <table:table-cell table:style-name="表格44.A2" office:value-type="string">
            <text:p text:style-name="P47">128（2<text:span text:style-name="T42">⁷</text:span>）</text:p>
          </table:table-cell>
          <table:table-cell table:style-name="表格44.A2" office:value-type="string">
            <text:p text:style-name="P51">/25</text:p>
          </table:table-cell>
          <table:table-cell table:style-name="表格44.A2" office:value-type="string">
            <text:p text:style-name="P47">192.168.1.0<text:span text:style-name="T40">/25</text:span>（0～<text:span text:style-name="T77">127</text:span>）</text:p>
          </table:table-cell>
          <table:table-cell table:style-name="表格44.A2" office:value-type="string">
            <text:p text:style-name="P47">126 ≥ 100 ✔</text:p>
          </table:table-cell>
        </table:table-row>
        <table:table-row table:style-name="表格44.1">
          <table:table-cell table:style-name="表格44.A3" office:value-type="string">
            <text:p text:style-name="P47">B</text:p>
          </table:table-cell>
          <table:table-cell table:style-name="表格44.A3" office:value-type="string">
            <text:p text:style-name="P47">50</text:p>
          </table:table-cell>
          <table:table-cell table:style-name="表格44.A3" office:value-type="string">
            <text:p text:style-name="P47">52</text:p>
          </table:table-cell>
          <table:table-cell table:style-name="表格44.A3" office:value-type="string">
            <text:p text:style-name="P47">64（2<text:span text:style-name="T42">⁶</text:span>）</text:p>
          </table:table-cell>
          <table:table-cell table:style-name="表格44.A3" office:value-type="string">
            <text:p text:style-name="P51">/26</text:p>
          </table:table-cell>
          <table:table-cell table:style-name="表格44.A3" office:value-type="string">
            <text:p text:style-name="P47">192.168.1.128<text:span text:style-name="T40">/26</text:span>（128～<text:span text:style-name="T77">191</text:span>）</text:p>
          </table:table-cell>
          <table:table-cell table:style-name="表格44.A3" office:value-type="string">
            <text:p text:style-name="P47">62 ≥ 50 ✔</text:p>
          </table:table-cell>
        </table:table-row>
        <table:table-row table:style-name="表格44.1">
          <table:table-cell table:style-name="表格44.A2" office:value-type="string">
            <text:p text:style-name="P47">C</text:p>
          </table:table-cell>
          <table:table-cell table:style-name="表格44.A2" office:value-type="string">
            <text:p text:style-name="P47">10</text:p>
          </table:table-cell>
          <table:table-cell table:style-name="表格44.A2" office:value-type="string">
            <text:p text:style-name="P47">12</text:p>
          </table:table-cell>
          <table:table-cell table:style-name="表格44.A2" office:value-type="string">
            <text:p text:style-name="P47">16（2<text:span text:style-name="T42">⁴</text:span>）</text:p>
          </table:table-cell>
          <table:table-cell table:style-name="表格44.A2" office:value-type="string">
            <text:p text:style-name="P51">/28</text:p>
          </table:table-cell>
          <table:table-cell table:style-name="表格44.A2" office:value-type="string">
            <text:p text:style-name="P47">192.168.1.192<text:span text:style-name="T40">/28</text:span>（192～<text:span text:style-name="T77">207</text:span>）</text:p>
          </table:table-cell>
          <table:table-cell table:style-name="表格44.A2" office:value-type="string">
            <text:p text:style-name="P47">14 ≥ 10 ✔</text:p>
          </table:table-cell>
        </table:table-row>
      </table:table>
      <text:p text:style-name="P5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54"><text:span text:style-name="T4">💡 <text:s/></text:span><text:span text:style-name="T157">考試技巧</text:span></text:p>
            <text:p text:style-name="P42"><text:span text:style-name="T80">快速判斷一個 IP 屬於哪個 /26 子網</text:span>（<text:span text:style-name="T112">每段 64 個，起點 0、64、128、192</text:span>）：<text:span text:style-name="T42">看最後一個 Octet 落在哪個區間 </text:span>→</text:p>
            <text:p text:style-name="P41"><text:span text:style-name="T40">0～63</text:span> → x.0/26　｜　<text:span text:style-name="T40">64～127</text:span> → x.64/26　｜　<text:span text:style-name="T40">128～191</text:span> → x.128/26　｜　<text:span text:style-name="T40">192～255</text:span> → x.192/26</text:p>
          </table:table-cell>
        </table:table-row>
      </table:table>
      <text:h text:style-name="P9" text:outline-level="2">陸、CIDR（路由聚合 / 超網合併）</text:h>
      <text:p text:style-name="P44">CIDR 的合併功能是 VLSM 的「反向操作」：<text:span text:style-name="T66">VLSM 把大網路切小</text:span>；<text:span text:style-name="T81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54"><text:span text:style-name="T4">🔑 </text:span><text:span text:style-name="T5"><text:s/></text:span><text:span text:style-name="T32">合併三條件（缺一不可）</text:span></text:p>
            <text:p text:style-name="P55"><text:span text:style-name="T33">① </text:span><text:span text:style-name="T35">連續（Contiguous）</text:span><text:span text:style-name="T33">：</text:span><text:span text:style-name="T123">IP 範圍必須緊鄰</text:span><text:span text:style-name="T9">，</text:span><text:span text:style-name="T62">中間不能有空缺</text:span><text:span text:style-name="T9">。</text:span></text:p>
            <text:p text:style-name="P56"><text:span text:style-name="T33">② </text:span><text:span text:style-name="T35">數量是 2ⁿ</text:span><text:span text:style-name="T33">：</text:span><text:span text:style-name="T9">2、4、8…。</text:span></text:p>
            <text:p text:style-name="P56"><text:span text:style-name="T33">③ </text:span><text:span text:style-name="T35">起始位址對齊</text:span><text:span text:style-name="T33">：</text:span><text:span text:style-name="T9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54"><text:span text:style-name="T4">▸ <text:s/></text:span><text:span text:style-name="T24">合併範例與反例</text:span></text:p>
            <text:p text:style-name="P55"><text:span text:style-name="T16">範例：</text:span><text:span text:style-name="T87">2 個 /25 → 1 個 /24</text:span><text:span text:style-name="T16">　</text:span><text:span text:style-name="T9">192.168.1</text:span><text:span text:style-name="T17">.0</text:span><text:span text:style-name="T9">/25 ＋ 192.168.1</text:span><text:span text:style-name="T17">.128</text:span><text:span text:style-name="T9">/25 → ① 緊鄰✔ ② 2 個（2¹）✔ ③ 起點 .0，0÷256=0✔ → 合併為 192.168.1</text:span><text:span text:style-name="T17">.0</text:span><text:span text:style-name="T9">/24。</text:span></text:p>
            <text:p text:style-name="P56"><text:span text:style-name="T16">範例：</text:span><text:span text:style-name="T87">4 個 /24 → 1 個 /22</text:span><text:span text:style-name="T16">　</text:span><text:span text:style-name="T9">192.168</text:span><text:span text:style-name="T21">.0/1/2/3</text:span><text:span text:style-name="T9">.0/</text:span><text:span text:style-name="T10">24</text:span><text:span text:style-name="T9"> → 連續✔、4 個（2²）✔、對齊✔ → 合併為 192.168</text:span><text:span text:style-name="T12">.0</text:span><text:span text:style-name="T9">.0/</text:span><text:span text:style-name="T10">22</text:span><text:span text:style-name="T9">。</text:span></text:p>
            <text:p text:style-name="P56"><text:span text:style-name="T188">反例（無法合併）：</text:span><text:span text:style-name="T105">192.168.1.0/24 ＋ 192.168.2.0/24 → 雖數量為 2，但起點 .1 不對齊</text:span><text:span text:style-name="T9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55"><text:span text:style-name="T158">合併後前綴公式：</text:span><text:span text:style-name="T9">合併 2ⁿ 個子網 → 前綴減 n（</text:span><text:span text:style-name="T62">每合併一倍，/ 的數字減 1</text:span><text:span text:style-name="T9">）。</text:span></text:p>
            <text:p text:style-name="P41"><text:span text:style-name="T163">2 個 /26 → /25；4 個 /26 → /24；2 個 /24 → /23</text:span>。</text:p>
          </table:table-cell>
        </table:table-row>
      </table:table>
      <text:h text:style-name="P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4">概念</text:p>
            </table:table-cell>
            <table:table-cell table:style-name="表格47.A1" office:value-type="string">
              <text:p text:style-name="P24">關鍵字</text:p>
            </table:table-cell>
            <table:table-cell table:style-name="表格47.A1" office:value-type="string">
              <text:p text:style-name="P24">核心規則</text:p>
            </table:table-cell>
            <table:table-cell table:style-name="表格47.A1" office:value-type="string">
              <text:p text:style-name="P24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32">IP 分類</text:p>
          </table:table-cell>
          <table:table-cell table:style-name="表格47.A2" office:value-type="string">
            <text:p text:style-name="P32">A/B/C 類</text:p>
          </table:table-cell>
          <table:table-cell table:style-name="表格47.A2" office:value-type="string">
            <text:p text:style-name="P83">看第一組數字判斷類別</text:p>
          </table:table-cell>
          <table:table-cell table:style-name="表格47.A2" office:value-type="string">
            <text:p text:style-name="P32">土地大小分類</text:p>
          </table:table-cell>
        </table:table-row>
        <table:table-row table:style-name="表格47.1">
          <table:table-cell table:style-name="表格47.A3" office:value-type="string">
            <text:p text:style-name="P32">VLSM</text:p>
          </table:table-cell>
          <table:table-cell table:style-name="表格47.A3" office:value-type="string">
            <text:p text:style-name="P32">切子網路</text:p>
          </table:table-cell>
          <table:table-cell table:style-name="表格47.A3" office:value-type="string">
            <text:p text:style-name="P32"><text:span text:style-name="T40">由大到小</text:span>；<text:span text:style-name="T112">需求+2→2ⁿ→/(32−n)</text:span></text:p>
          </table:table-cell>
          <table:table-cell table:style-name="表格47.A3" office:value-type="string">
            <text:p text:style-name="P32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32">CIDR 合併</text:p>
          </table:table-cell>
          <table:table-cell table:style-name="表格47.A2" office:value-type="string">
            <text:p text:style-name="P32">聚合路由</text:p>
          </table:table-cell>
          <table:table-cell table:style-name="表格47.A2" office:value-type="string">
            <text:p text:style-name="P32"><text:span text:style-name="T59">連續</text:span> + 數量 2ⁿ + 對齊；<text:span text:style-name="T42">前綴減 n</text:span></text:p>
          </table:table-cell>
          <table:table-cell table:style-name="表格47.A2" office:value-type="string">
            <text:p text:style-name="P32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54"><text:span text:style-name="T4">🎯 <text:s/></text:span><text:span text:style-name="T190">考試標準解題流程</text:span></text:p>
            <text:p text:style-name="P55"><text:span text:style-name="T191">遇到 VLSM 題：</text:span><text:span text:style-name="T150">確認起始網路</text:span><text:span text:style-name="T9"> → </text:span><text:span text:style-name="T142">需求由大到小</text:span><text:span text:style-name="T9"> → </text:span><text:span text:style-name="T125">各需求 +2 找 2ⁿ 算前綴</text:span><text:span text:style-name="T9"> → </text:span><text:span text:style-name="T88">大的先切</text:span><text:span text:style-name="T9">依序往後 → </text:span><text:span text:style-name="T106">驗證網路位址/廣播位址/可用範圍</text:span><text:span text:style-name="T9">。</text:span></text:p>
            <text:p text:style-name="P56"><text:span text:style-name="T191">遇到 CIDR 合併題：</text:span><text:span text:style-name="T9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97" text:outline-level="2"><text:soft-page-break/><text:span text:style-name="T8">捌、MTU（最大傳輸單位）(</text:span><text:span text:style-name="T140">一條網路，一次最多</text:span><text:span text:style-name="T8">)</text:span></text:h>
      <text:p text:style-name="P44"><text:span text:style-name="T42">MTU</text:span> ＝ <text:span text:style-name="T95">Maximum Transmission Unit，</text:span><text:span text:style-name="T114">一條網路</text:span><text:span text:style-name="T95">「</text:span><text:span text:style-name="T69">一次最多</text:span><text:span text:style-name="T95">能傳送的</text:span><text:span text:style-name="T136">封包大小</text:span><text:span text:style-name="T95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4">網路類型</text:p>
            </table:table-cell>
            <table:table-cell table:style-name="表格48.A1" office:value-type="string">
              <text:p text:style-name="P24">MTU 值</text:p>
            </table:table-cell>
            <table:table-cell table:style-name="表格48.A1" office:value-type="string">
              <text:p text:style-name="P24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32">Ethernet（乙太網）</text:p>
          </table:table-cell>
          <table:table-cell table:style-name="表格48.A2" office:value-type="string">
            <text:p text:style-name="P32">1500 bytes</text:p>
          </table:table-cell>
          <table:table-cell table:style-name="表格48.A2" office:value-type="string">
            <text:p text:style-name="P32">最常見，99% 環境</text:p>
          </table:table-cell>
        </table:table-row>
        <table:table-row table:style-name="表格48.1">
          <table:table-cell table:style-name="表格48.A3" office:value-type="string">
            <text:p text:style-name="P32">Wi-Fi (802.11)</text:p>
          </table:table-cell>
          <table:table-cell table:style-name="表格48.A3" office:value-type="string">
            <text:p text:style-name="P32">2304 bytes</text:p>
          </table:table-cell>
          <table:table-cell table:style-name="表格48.A3" office:value-type="string">
            <text:p text:style-name="P32">無線區域網路</text:p>
          </table:table-cell>
        </table:table-row>
        <table:table-row table:style-name="表格48.1">
          <table:table-cell table:style-name="表格48.A2" office:value-type="string">
            <text:p text:style-name="P32">PPPoE（ADSL）</text:p>
          </table:table-cell>
          <table:table-cell table:style-name="表格48.A2" office:value-type="string">
            <text:p text:style-name="P32">1492 bytes</text:p>
          </table:table-cell>
          <table:table-cell table:style-name="表格48.A2" office:value-type="string">
            <text:p text:style-name="P32">需扣掉 PPPoE header</text:p>
          </table:table-cell>
        </table:table-row>
        <table:table-row table:style-name="表格48.1">
          <table:table-cell table:style-name="表格48.A3" office:value-type="string">
            <text:p text:style-name="P32">Loopback（本機）</text:p>
          </table:table-cell>
          <table:table-cell table:style-name="表格48.A3" office:value-type="string">
            <text:p text:style-name="P32">65536 bytes</text:p>
          </table:table-cell>
          <table:table-cell table:style-name="表格48.A3" office:value-type="string">
            <text:p text:style-name="P32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54"><text:span text:style-name="T4">❗ <text:s/></text:span><text:span text:style-name="T39">重點</text:span></text:p>
            <text:p text:style-name="P42"><text:span text:style-name="T59">若封包大小 &gt; MTU，就必須「切開」才能傳送</text:span>，這個動作就叫 <text:span text:style-name="T151">Fragmentation（分段）</text:span>。</text:p>
          </table:table-cell>
          <table:covered-table-cell/>
          <table:covered-table-cell/>
        </table:table-row>
      </table:table>
      <text:h text:style-name="P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54"><text:span text:style-name="T4">📦 <text:s/></text:span><text:span text:style-name="T24">怎麼切？</text:span></text:p>
            <text:p text:style-name="P42">範例：送出 4000 bytes、<text:span text:style-name="T40">MTU = 1500</text:span>（<text:span text:style-name="T112">每段扣掉 20 bytes IP Header</text:span>，<text:span text:style-name="T42">剩 1480 可放資料</text:span>）</text:p>
            <text:p text:style-name="P87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4">版本</text:p>
          </table:table-cell>
          <table:table-cell table:style-name="表格49.A2" office:value-type="string">
            <text:p text:style-name="P24">誰負責分段</text:p>
          </table:table-cell>
          <table:table-cell table:style-name="表格49.A2" office:value-type="string">
            <text:p text:style-name="P24">Router 可切？</text:p>
          </table:table-cell>
          <table:table-cell table:style-name="表格49.A2" office:value-type="string">
            <text:p text:style-name="P24">說明</text:p>
          </table:table-cell>
        </table:table-row>
        <table:table-row table:style-name="表格49.1">
          <table:table-cell table:style-name="表格49.A3" office:value-type="string">
            <text:p text:style-name="P34">IPv4</text:p>
          </table:table-cell>
          <table:table-cell table:style-name="表格49.A3" office:value-type="string">
            <text:p text:style-name="P32">Router 或 Source</text:p>
          </table:table-cell>
          <table:table-cell table:style-name="表格49.A3" office:value-type="string">
            <text:p text:style-name="P71">✅ 可以</text:p>
          </table:table-cell>
          <table:table-cell table:style-name="表格49.A3" office:value-type="string">
            <text:p text:style-name="P99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34">IPv6</text:p>
          </table:table-cell>
          <table:table-cell table:style-name="表格49.A4" office:value-type="string">
            <text:p text:style-name="P32">僅 Source（送端）</text:p>
          </table:table-cell>
          <table:table-cell table:style-name="表格49.A4" office:value-type="string">
            <text:p text:style-name="P68">❌ 不行</text:p>
          </table:table-cell>
          <table:table-cell table:style-name="表格49.A4" office:value-type="string">
            <text:p text:style-name="P32"><text:span text:style-name="T162">Router 不分段</text:span>，<text:span text:style-name="T66">由送端自行處理</text:span>，搭配 PMTUD</text:p>
          </table:table-cell>
        </table:table-row>
      </table:table>
      <text:h text:style-name="P9" text:outline-level="2">拾、IP Header 關鍵欄位</text:h>
      <text:p text:style-name="P44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55"><text:span text:style-name="T25">(1) </text:span><text:span text:style-name="T26">Total Length</text:span><text:span text:style-name="T25">：</text:span><text:span text:style-name="T9">封包總大小（Header + Data），最大 65535 bytes（16 bits）。</text:span></text:p>
            <text:p text:style-name="P56"><text:span text:style-name="T25">(2) </text:span><text:span text:style-name="T26">Identification</text:span><text:span text:style-name="T25">：</text:span><text:span text:style-name="T123">同一原始封包的所有分段共用同一 ID</text:span><text:span text:style-name="T9">；</text:span><text:span text:style-name="T89">接收端靠此 ID 判斷哪些 fragment 要拼在一起</text:span><text:span text:style-name="T9">。</text:span></text:p>
            <text:p text:style-name="P56"><text:span text:style-name="T25">(3) </text:span><text:span text:style-name="T26">Fragment Offset</text:span><text:span text:style-name="T25">：</text:span><text:span text:style-name="T62">這段資料在原始封包中的「起始位置」</text:span><text:span text:style-name="T9">。⚠️ 單位是 8 bytes（欄位僅 13 bits）→ </text:span><text:span text:style-name="T62">Offset = 起始位置 ÷ 8</text:span><text:span text:style-name="T9">。</text:span></text:p>
            <text:p text:style-name="P56"><text:span text:style-name="T25">(4) </text:span><text:span text:style-name="T26">TTL</text:span><text:span text:style-name="T25">：</text:span><text:span text:style-name="T173">最多可經過幾個 Router；每經過一個 −1</text:span><text:span text:style-name="T9">，</text:span><text:span text:style-name="T106">歸零時 Router 丟棄並回 ICMP「Time Exceeded」</text:span><text:span text:style-name="T9">。常見初始值 Linux=64、Windows=128。traceroute 即利用 TTL。</text:span></text:p>
            <text:p text:style-name="P56"><text:span text:style-name="T25">(5) </text:span><text:span text:style-name="T26">Protocol</text:span><text:span text:style-name="T25">：</text:span><text:span text:style-name="T9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4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4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32">第 1 段：資料 1480 bytes</text:p>
          </table:table-cell>
          <table:covered-table-cell/>
          <table:covered-table-cell/>
          <table:table-cell table:style-name="表格50.A3" office:value-type="string">
            <text:p text:style-name="P34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32">第 2 段：資料 1480 bytes</text:p>
          </table:table-cell>
          <table:covered-table-cell/>
          <table:covered-table-cell/>
          <table:table-cell table:style-name="表格50.A4" office:value-type="string">
            <text:p text:style-name="P32"><text:span text:style-name="T52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32">第 3 段：資料 1040 bytes</text:p>
          </table:table-cell>
          <table:covered-table-cell/>
          <table:covered-table-cell/>
          <table:table-cell table:style-name="表格50.A3" office:value-type="string">
            <text:p text:style-name="P32"><text:span text:style-name="T52">2960 ÷ 8</text:span> = 370</text:p>
          </table:table-cell>
        </table:table-row>
        <table:table-row table:style-name="表格50.1">
          <table:table-cell table:style-name="表格50.A2" office:value-type="string">
            <text:p text:style-name="P23">Protocol 值</text:p>
          </table:table-cell>
          <table:table-cell table:style-name="表格50.A2" office:value-type="string">
            <text:p text:style-name="P23">對應協定</text:p>
          </table:table-cell>
          <table:table-cell table:style-name="表格50.A2" table:number-columns-spanned="2" office:value-type="string">
            <text:p text:style-name="P23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32">1</text:p>
          </table:table-cell>
          <table:table-cell table:style-name="表格50.A3" office:value-type="string">
            <text:p text:style-name="P35">ICMP</text:p>
          </table:table-cell>
          <table:table-cell table:style-name="表格50.A3" table:number-columns-spanned="2" office:value-type="string">
            <text:p text:style-name="P86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32">6</text:p>
          </table:table-cell>
          <table:table-cell table:style-name="表格50.A4" office:value-type="string">
            <text:p text:style-name="P32">TCP</text:p>
          </table:table-cell>
          <table:table-cell table:style-name="表格50.A4" table:number-columns-spanned="2" office:value-type="string">
            <text:p text:style-name="P32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32">17</text:p>
          </table:table-cell>
          <table:table-cell table:style-name="表格50.A3" office:value-type="string">
            <text:p text:style-name="P32">UDP</text:p>
          </table:table-cell>
          <table:table-cell table:style-name="表格50.A3" table:number-columns-spanned="2" office:value-type="string">
            <text:p text:style-name="P32">DNS、DHCP、影音串流等速度優先</text:p>
          </table:table-cell>
          <table:covered-table-cell/>
        </table:table-row>
      </table:table>
      <text:h text:style-name="P97" text:outline-level="2"><text:soft-page-break/><text:span text:style-name="T8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4">Flag</text:p>
            </table:table-cell>
            <table:table-cell table:style-name="表格51.A1" office:value-type="string">
              <text:p text:style-name="P24">全名</text:p>
            </table:table-cell>
            <table:table-cell table:style-name="表格51.A1" office:value-type="string">
              <text:p text:style-name="P24">值 = 1 代表</text:p>
            </table:table-cell>
            <table:table-cell table:style-name="表格51.A1" office:value-type="string">
              <text:p text:style-name="P24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83">DF</text:p>
          </table:table-cell>
          <table:table-cell table:style-name="表格51.A2" office:value-type="string">
            <text:p text:style-name="P83">Don't Fragment</text:p>
          </table:table-cell>
          <table:table-cell table:style-name="表格51.A2" office:value-type="string">
            <text:p text:style-name="P32">❌ 不准切！超大就丟並回 ICMP</text:p>
          </table:table-cell>
          <table:table-cell table:style-name="表格51.A2" office:value-type="string">
            <text:p text:style-name="P32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76">MF</text:p>
          </table:table-cell>
          <table:table-cell table:style-name="表格51.A3" office:value-type="string">
            <text:p text:style-name="P76">More Fragments</text:p>
          </table:table-cell>
          <table:table-cell table:style-name="表格51.A3" office:value-type="string">
            <text:p text:style-name="P32">後面還有更多分段</text:p>
          </table:table-cell>
          <table:table-cell table:style-name="表格51.A3" office:value-type="string">
            <text:p text:style-name="P32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54"><text:span text:style-name="T4">▸ <text:s/></text:span><text:span text:style-name="T24">DF = 1 的完整流程</text:span></text:p>
            <text:p text:style-name="P42">① 送出封包（<text:span text:style-name="T42">DF=1，不准切</text:span>）→ ② 到某 Router，發現<text:span text:style-name="T115">封包 &gt; 該路段 MTU</text:span> → ③ <text:span text:style-name="T70">Router 不能切，直接丟棄 </text:span>→ ④ <text:span text:style-name="T164">Router 回傳 ICMP「Fragmentation Needed」（含可用 MTU 大小）</text:span>→ ⑤ <text:span text:style-name="T112">送端調整封包大小後</text:span><text:span text:style-name="T97">重送</text:span>。這就是 <text:span text:style-name="T40">PMTUD 的核心機制</text:span>。</text:p>
          </table:table-cell>
          <table:covered-table-cell/>
          <table:covered-table-cell/>
          <table:covered-table-cell/>
        </table:table-row>
      </table:table>
      <text:h text:style-name="P9" text:outline-level="2">拾貳、PMTUD（路徑 MTU 探測）</text:h>
      <text:p text:style-name="P44"><text:span text:style-name="T42">PMTUD </text:span>＝<text:span text:style-name="T97"> Path MTU Discovery，自動找出</text:span><text:span text:style-name="T192">來源到目的地</text:span><text:span text:style-name="T97">整條路徑中</text:span><text:span text:style-name="T166">最小的 MTU 值</text:span>。<text:span text:style-name="T44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4">版本</text:p>
            </table:table-cell>
            <table:table-cell table:style-name="表格52.A1" office:value-type="string">
              <text:p text:style-name="P24">Router 可分段？</text:p>
            </table:table-cell>
            <table:table-cell table:style-name="表格52.A1" office:value-type="string">
              <text:p text:style-name="P24">PMTUD 必要性</text:p>
            </table:table-cell>
            <table:table-cell table:style-name="表格52.A1" office:value-type="string">
              <text:p text:style-name="P24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36">IPv4</text:p>
          </table:table-cell>
          <table:table-cell table:style-name="表格52.A2" office:value-type="string">
            <text:p text:style-name="P37">✅ 可以（但不推薦）</text:p>
          </table:table-cell>
          <table:table-cell table:style-name="表格52.A2" office:value-type="string">
            <text:p text:style-name="P32">可選，但建議使用</text:p>
          </table:table-cell>
          <table:table-cell table:style-name="表格52.A2" office:value-type="string">
            <text:p text:style-name="P32">ICMP Fragmentation Needed</text:p>
          </table:table-cell>
        </table:table-row>
        <table:table-row table:style-name="表格52.1">
          <table:table-cell table:style-name="表格52.A3" office:value-type="string">
            <text:p text:style-name="P36">IPv6</text:p>
          </table:table-cell>
          <table:table-cell table:style-name="表格52.A3" office:value-type="string">
            <text:p text:style-name="P37">❌ 不行</text:p>
          </table:table-cell>
          <table:table-cell table:style-name="表格52.A3" office:value-type="string">
            <text:p text:style-name="P32">⚠️ 必須使用</text:p>
          </table:table-cell>
          <table:table-cell table:style-name="表格52.A3" office:value-type="string">
            <text:p text:style-name="P32">ICMPv6 Packet Too Big</text:p>
          </table:table-cell>
        </table:table-row>
      </table:table>
      <text:h text:style-name="P9" text:outline-level="2">拾參、TCP 如何避免 Fragmentation？</text:h>
      <text:p text:style-name="P44"><text:span text:style-name="T59">TCP 不依賴 IP 層切封包，而是「自己先控制好大小」</text:span>，<text:span text:style-name="T42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5"><text:span text:style-name="T25">MSS（Maximum Segment Size）：</text:span><text:span text:style-name="T126">MSS = MTU − IP Header − TCP Header </text:span><text:span text:style-name="T9">= </text:span><text:span text:style-name="T17">1500 − 20 − 20 = 1460 bytes</text:span><text:span text:style-name="T9">。</text:span><text:span text:style-name="T75">三向交握時雙方各自宣告 MSS，之後每段 ≤ MSS</text:span><text:span text:style-name="T9">，</text:span><text:span text:style-name="T17">讓 IP 層不需分段</text:span><text:span text:style-name="T9">。</text:span></text:p>
            <text:p text:style-name="P56"><text:span text:style-name="T25">搭配 DF=1 + PMTUD：</text:span><text:span text:style-name="T9">TCP 連線設 DF=1 禁止 Router 分段；</text:span><text:span text:style-name="T123">若收到 ICMP「Fragmentation Needed」，自動調低 MSS 重試</text:span><text:span text:style-name="T9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54"><text:span text:style-name="T4">✅ <text:s/></text:span><text:span text:style-name="T190">結論</text:span></text:p>
            <text:p text:style-name="P42"><text:span text:style-name="T151">TCP = 主動控制大小（MSS）＋ DF=1 ＋ PMTUD</text:span>，<text:span text:style-name="T116">從源頭就避免 Fragmentation 發生</text:span>。<text:span text:style-name="T82">TCP 做 Segmentation 的主要目的之一，就是讓每個封包符合 MTU</text:span>，從而避免 IP 再做 Fragmentation。</text:p>
          </table:table-cell>
        </table:table-row>
      </table:table>
      <text:h text:style-name="P9" text:outline-level="2">拾肆、Fragmentation DoS 攻擊</text:h>
      <text:p text:style-name="P44"><text:span text:style-name="T112">攻擊者利用「接收端重組封包很耗資源」這個特性</text:span>，<text:span text:style-name="T59">刻意製造大量異常 Fragment</text:span>。正常重組流程：收到 Fragment <text:span text:style-name="T95">放入緩衝區 </text:span>→ <text:span text:style-name="T164">等同一 ID 的所有 Fragment 到齊 → 依</text:span><text:span text:style-name="T58"> Offset </text:span><text:span text:style-name="T164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8">攻擊手法</text:p>
            </table:table-cell>
            <table:table-cell table:style-name="表格54.A1" office:value-type="string">
              <text:p text:style-name="P28">做法</text:p>
            </table:table-cell>
            <table:table-cell table:style-name="表格54.A1" office:value-type="string">
              <text:p text:style-name="P28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50">1 不完整 Fragment</text:p>
          </table:table-cell>
          <table:table-cell table:style-name="表格54.A2" office:value-type="string">
            <text:p text:style-name="P47">只送部分分段（缺其中一段）</text:p>
          </table:table-cell>
          <table:table-cell table:style-name="表格54.A2" office:value-type="string">
            <text:p text:style-name="P47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50">2 Offset 重疊</text:p>
          </table:table-cell>
          <table:table-cell table:style-name="表格54.A3" office:value-type="string">
            <text:p text:style-name="P47">送出 Offset 互相重疊的 Fragment</text:p>
          </table:table-cell>
          <table:table-cell table:style-name="表格54.A3" office:value-type="string">
            <text:p text:style-name="P47"><text:span text:style-name="T40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50">3 大量碎片</text:p>
          </table:table-cell>
          <table:table-cell table:style-name="表格54.A2" office:value-type="string">
            <text:p text:style-name="P47">送出數萬個 Fragment（同一 ID）</text:p>
          </table:table-cell>
          <table:table-cell table:style-name="表格54.A2" office:value-type="string">
            <text:p text:style-name="P47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54"><text:span text:style-name="T4">🛡️ <text:s/></text:span><text:span text:style-name="T190">防禦方式</text:span></text:p>
            <text:p text:style-name="P42">防禦：<text:span text:style-name="T46">設定重組 buffer 上限</text:span>避免無限占用記憶體；<text:span text:style-name="T47">丟棄等待過久或異常的 Fragment</text:span>；<text:span text:style-name="T44">部署 IDS / Firewall 偵測異常分段</text:span>模式。</text:p>
          </table:table-cell>
          <table:covered-table-cell/>
          <table:covered-table-cell/>
        </table:table-row>
      </table:table>
      <text:h text:style-name="P97" text:outline-level="2"><text:soft-page-break/><text:span text:style-name="T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4">技術概念</text:p>
            </table:table-cell>
            <table:table-cell table:style-name="表格55.A1" office:value-type="string">
              <text:p text:style-name="P24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2">MTU</text:p>
          </table:table-cell>
          <table:table-cell table:style-name="表格55.A2" office:value-type="string">
            <text:p text:style-name="P32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32">Fragmentation</text:p>
          </table:table-cell>
          <table:table-cell table:style-name="表格55.A3" office:value-type="string">
            <text:p text:style-name="P32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37">Identification</text:p>
          </table:table-cell>
          <table:table-cell table:style-name="表格55.A2" office:value-type="string">
            <text:p text:style-name="P36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37">Fragment Offset</text:p>
          </table:table-cell>
          <table:table-cell table:style-name="表格55.A3" office:value-type="string">
            <text:p text:style-name="P32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32">IPv4 / IPv6</text:p>
          </table:table-cell>
          <table:table-cell table:style-name="表格55.A2" office:value-type="string">
            <text:p text:style-name="P32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32">DF = 1</text:p>
          </table:table-cell>
          <table:table-cell table:style-name="表格55.A3" office:value-type="string">
            <text:p text:style-name="P32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93">PMTUD</text:p>
          </table:table-cell>
          <table:table-cell table:style-name="表格55.A2" office:value-type="string">
            <text:p text:style-name="P38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79">TTL</text:p>
          </table:table-cell>
          <table:table-cell table:style-name="表格55.A3" office:value-type="string">
            <text:p text:style-name="P39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37">MSS</text:p>
          </table:table-cell>
          <table:table-cell table:style-name="表格55.A2" office:value-type="string">
            <text:p text:style-name="P36">你自己量好每箱重量，確保不超重</text:p>
          </table:table-cell>
        </table:table-row>
      </table:table>
      <text:h text:style-name="P25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54"><text:span text:style-name="T4">💡 <text:s/></text:span><text:span text:style-name="T24">為什麼要從 IPv4 換到 IPv6？</text:span></text:p>
            <text:p text:style-name="P42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4">比較項目</text:p>
            </table:table-cell>
            <table:table-cell table:style-name="表格57.A1" office:value-type="string">
              <text:p text:style-name="P24">✗ IPv4 問題</text:p>
            </table:table-cell>
            <table:table-cell table:style-name="表格57.A1" office:value-type="string">
              <text:p text:style-name="P24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32">位址長度</text:p>
          </table:table-cell>
          <table:table-cell table:style-name="表格57.A2" office:value-type="string">
            <text:p text:style-name="P32"><text:span text:style-name="T112">32 bit</text:span>，約 43 億個 IP，已嚴重不足</text:p>
          </table:table-cell>
          <table:table-cell table:style-name="表格57.A2" office:value-type="string">
            <text:p text:style-name="P32"><text:span text:style-name="T82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32">NAT 位址轉換</text:p>
          </table:table-cell>
          <table:table-cell table:style-name="表格57.A3" office:value-type="string">
            <text:p text:style-name="P32"><text:span text:style-name="T42">需 NAT 共用 IP</text:span>，破壞 End-to-End</text:p>
          </table:table-cell>
          <table:table-cell table:style-name="表格57.A3" office:value-type="string">
            <text:p text:style-name="P32"><text:span text:style-name="T40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32">安全性</text:p>
          </table:table-cell>
          <table:table-cell table:style-name="表格57.A2" office:value-type="string">
            <text:p text:style-name="P32">無內建加密／驗證，<text:span text:style-name="T42">須另裝 VPN</text:span></text:p>
          </table:table-cell>
          <table:table-cell table:style-name="表格57.A2" office:value-type="string">
            <text:p text:style-name="P32"><text:span text:style-name="T117">支援 IPsec</text:span><text:span text:style-name="T40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32">Header 結構</text:p>
          </table:table-cell>
          <table:table-cell table:style-name="表格57.A3" office:value-type="string">
            <text:p text:style-name="P32"><text:span text:style-name="T42">可變長度</text:span>含 Options，Router 效率低</text:p>
          </table:table-cell>
          <table:table-cell table:style-name="表格57.A3" office:value-type="string">
            <text:p text:style-name="P32"><text:span text:style-name="T40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32">服務品質 QoS</text:p>
          </table:table-cell>
          <table:table-cell table:style-name="表格57.A2" office:value-type="string">
            <text:p text:style-name="P36">無法有效標記流量優先權</text:p>
          </table:table-cell>
          <table:table-cell table:style-name="表格57.A2" office:value-type="string">
            <text:p text:style-name="P32"><text:span text:style-name="T40">Flow Label 欄位</text:span>，<text:span text:style-name="T134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32">廣播方式</text:p>
          </table:table-cell>
          <table:table-cell table:style-name="表格57.A3" office:value-type="string">
            <text:p text:style-name="P32"><text:span text:style-name="T42">Broadcast</text:span>：一次發給所有人，浪費頻寬</text:p>
          </table:table-cell>
          <table:table-cell table:style-name="表格57.A3" office:value-type="string">
            <text:p text:style-name="P32">改用<text:span text:style-name="T40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32">IP 配置方式</text:p>
          </table:table-cell>
          <table:table-cell table:style-name="表格57.A2" office:value-type="string">
            <text:p text:style-name="P32"><text:span text:style-name="T44">需手動設定或 DHCP</text:span>，管理繁瑣</text:p>
          </table:table-cell>
          <table:table-cell table:style-name="表格57.A2" office:value-type="string">
            <text:p text:style-name="P32">SLAAC 無狀態自動配置，<text:span text:style-name="T59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54"><text:span text:style-name="T4">📌 <text:s/></text:span><text:span text:style-name="T39">補充：IPsec 強制 vs 建議</text:span></text:p>
            <text:p text:style-name="P42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5">① <text:span text:style-name="T64">Dual Stack（雙協定堆疊）</text:span>— 最常用、最推薦</text:p>
            <text:p text:style-name="P41"><text:span text:style-name="T71">裝置同時具備 IPv4 與 IPv6 兩套協定堆疊</text:span>。<text:span text:style-name="T42">DNS A record → 回傳 IPv4；DNS AAAA record → 回傳 IPv6</text:span>。連線時優先選用 IPv6，對端不支援則自動退回 IPv4。不需任何封包轉換，效能損耗最低。</text:p>
            <text:p text:style-name="P41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106">②<text:span text:style-name="T64"> Tunneling（隧道技術）</text:span>— 過渡期橋接方案</text:p>
            <text:p text:style-name="P41">中間網路只支援 IPv4，無法直接傳送 IPv6 封包。解法：<text:span text:style-name="T71">將 IPv6 封包完整封裝進 IPv4 外殼，抵達目的地後拆除外層 IPv4、還原 IPv6 封包</text:span>。常見技術：6in4、6to4、Teredo、ISATAP。</text:p>
            <text:p text:style-name="P41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74">③ <text:span text:style-name="T64">Translation（NAT64）</text:span>— 協定轉換、互通最後手段</text:p>
            <text:p text:style-name="P41">適用場景：IPv6-only 裝置需與 IPv4-only 裝置直接通訊。<text:span text:style-name="T116">透過轉換閘道器即時將封包表頭轉換為對方格式</text:span>。代表技術：NAT64 + DNS64。<text:span text:style-name="T115">複雜度最高，有額外效能損耗</text:span>。</text:p>
            <text:p text:style-name="P41">示意：IPv6 裝置 → [ NAT64 <text:span text:style-name="T95">轉換閘道</text:span> ] → IPv4 裝置（雙向互轉）。</text:p>
          </table:table-cell>
        </table:table-row>
      </table:table>
      <text:h text:style-name="P9" text:outline-level="2"><text:soft-page-break/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6">技術</text:p>
            </table:table-cell>
            <table:table-cell table:style-name="表格59.A1" office:value-type="string">
              <text:p text:style-name="P26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5">Dual Stack</text:p>
          </table:table-cell>
          <table:table-cell table:style-name="表格59.A2" office:value-type="string">
            <text:p text:style-name="P45">你<text:span text:style-name="T42">同時會中文 + 英文</text:span>，遇到誰說哪個</text:p>
          </table:table-cell>
        </table:table-row>
        <table:table-row table:style-name="表格59.1">
          <table:table-cell table:style-name="表格59.A3" office:value-type="string">
            <text:p text:style-name="P45">Tunneling</text:p>
          </table:table-cell>
          <table:table-cell table:style-name="表格59.A3" office:value-type="string">
            <text:p text:style-name="P45"><text:span text:style-name="T59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45">Translation</text:p>
          </table:table-cell>
          <table:table-cell table:style-name="表格59.A2" office:value-type="string">
            <text:p text:style-name="P45"><text:span text:style-name="T164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54"><text:span text:style-name="T4">🏠 <text:s/></text:span><text:span text:style-name="T24">用「寄信/門牌」理解</text:span></text:p>
            <text:p text:style-name="P55"><text:span text:style-name="T139">IPv4 的困境：整棟公寓共用一個門牌</text:span><text:span text:style-name="T107">（NAT）</text:span><text:span text:style-name="T9">，郵差只送到大門，裡面誰是誰要另外猜；地址快用光還在借號碼。</text:span></text:p>
            <text:p text:style-name="P56"><text:span text:style-name="T123">IPv6 的世界：每個人都有獨立門牌（公開 IP）</text:span><text:span text:style-name="T9">，地址多到用不完，郵件直接送到本人手上，不需中間人轉達。</text:span></text:p>
          </table:table-cell>
          <table:covered-table-cell/>
        </table:table-row>
      </table:table>
      <text:h text:style-name="P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54"><text:span text:style-name="T4">🧠 <text:s/></text:span><text:span text:style-name="T157">一句話記憶法</text:span></text:p>
            <text:p text:style-name="P55"><text:span text:style-name="T158">IPv6 特點：</text:span><text:span text:style-name="T9">大（128 bit）＋ </text:span><text:span text:style-name="T90">安全（IPsec）</text:span><text:span text:style-name="T9">＋ </text:span><text:span text:style-name="T106">快（固定 Header）</text:span><text:span text:style-name="T9">＋ 自動（SLAAC）＋ 乾淨（無 Broadcast）。</text:span></text:p>
            <text:p text:style-name="P56"><text:span text:style-name="T159">過渡技術</text:span><text:span text:style-name="T158">：</text:span><text:span text:style-name="T9">雙語（</text:span><text:span text:style-name="T17">Dual Stack</text:span><text:span text:style-name="T9">）＋ 偽裝（</text:span><text:span text:style-name="T17">Tunneling</text:span><text:span text:style-name="T9">）＋ 翻譯（</text:span><text:span text:style-name="T17">Translation</text:span><text:span text:style-name="T9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23">IPv4 七大問題</text:p>
          </table:table-cell>
          <table:table-cell table:style-name="表格60.A2" office:value-type="string">
            <text:p text:style-name="P23">IPv6 七大改進</text:p>
          </table:table-cell>
        </table:table-row>
        <table:table-row table:style-name="表格60.1">
          <table:table-cell table:style-name="表格60.A3" office:value-type="string">
            <text:p text:style-name="P32">位址不足（32 bit）／需 NAT 破壞 E2E／無加密驗證／<text:span text:style-name="T96">Header 可變效率低</text:span>／缺 QoS／用 Broadcast 浪費／IP 需手動設定</text:p>
          </table:table-cell>
          <table:table-cell table:style-name="表格60.A3" office:value-type="string">
            <text:p text:style-name="P32">128 bit 近乎無限／不需 NAT 恢復 E2E／<text:span text:style-name="T117">支援 IPsec</text:span>／<text:span text:style-name="T117">固定 40 bytes 轉送快</text:span>／Flow Label 支援 QoS／改用 Multicast/Anycast／SLAAC 自動配置</text:p>
          </table:table-cell>
        </table:table-row>
      </table:table>
      <text:h text:style-name="P25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54"><text:span text:style-name="T4">🔑 <text:s/></text:span><text:span text:style-name="T24">最基礎的比喻，先懂這個</text:span></text:p>
            <text:p text:style-name="P42">IP 位址決定「最終送到哪台電腦」；MAC 位址決定「目前這一跳要交給哪個網路設備」。</text:p>
            <text:p text:style-name="P41"><text:span text:style-name="T166">資料在網路中「實際傳送」靠 MAC</text:span>，<text:span text:style-name="T82">但我們只知道對方的 IP</text:span>——所以<text:span text:style-name="T134">需要一個轉換機制</text:span>，這就是 ARP 的工作。</text:p>
          </table:table-cell>
        </table:table-row>
      </table:table>
      <text:h text:style-name="P9" text:outline-level="2">一、ARP（Address Resolution Protocol）：<text:span text:style-name="T52">IP → MAC</text:span></text:h>
      <text:p text:style-name="P44">一句話定義：<text:span text:style-name="T40">ARP</text:span> ＝ <text:span text:style-name="T59">用 IP 找 MAC</text:span>，<text:span text:style-name="T112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54"><text:span text:style-name="T4">📋 <text:s/></text:span><text:span text:style-name="T24">ARP 運作流程（考試必考）</text:span></text:p>
            <text:p text:style-name="P55"><text:span text:style-name="T25">① </text:span><text:span text:style-name="T26">查 ARP Cache（筆記本）</text:span><text:span text:style-name="T25">：</text:span><text:span text:style-name="T9">先查自己的記錄「</text:span><text:span text:style-name="T182">我之前有沒有問過這個 IP？</text:span><text:span text:style-name="T9">」有 → 直接用。</text:span></text:p>
            <text:p text:style-name="P56"><text:span text:style-name="T25">② </text:span><text:span text:style-name="T26">發出 ARP Request（廣播）</text:span><text:span text:style-name="T25">：</text:span><text:span text:style-name="T9">沒記錄 →</text:span><text:span text:style-name="T173"> 對整個區網廣播</text:span><text:span text:style-name="T9">「誰是 192.168.1.5？</text:span><text:span text:style-name="T173">請告訴我你的 MAC！</text:span><text:span text:style-name="T9">」所有機器都收到。</text:span></text:p>
            <text:p text:style-name="P56"><text:span text:style-name="T25">③ </text:span><text:span text:style-name="T26">收到 ARP Reply（單播回應）</text:span><text:span text:style-name="T25">：</text:span><text:span text:style-name="T145">IP 是 192.168.1.5 的機器回應「我是！MAC 是 AA:BB:CC」</text:span><text:span text:style-name="T9">，其餘機器靜默忽略。</text:span></text:p>
            <text:p text:style-name="P56"><text:span text:style-name="T25">④ </text:span><text:span text:style-name="T26">存進 ARP Cache</text:span><text:span text:style-name="T25">：</text:span><text:span text:style-name="T87">把「IP ↔ MAC」對應記下</text:span><text:span text:style-name="T9">，</text:span><text:span text:style-name="T123">下次直接用</text:span><text:span text:style-name="T9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4">項目</text:p>
          </table:table-cell>
          <table:table-cell table:style-name="表格62.A2" office:value-type="string">
            <text:p text:style-name="P24">內容</text:p>
          </table:table-cell>
        </table:table-row>
        <table:table-row table:style-name="表格62.1">
          <table:table-cell table:style-name="表格62.A3" office:value-type="string">
            <text:p text:style-name="P105">ARP Spoofing（ARP 欺騙）</text:p>
          </table:table-cell>
          <table:table-cell table:style-name="表格62.A3" office:value-type="string">
            <text:p text:style-name="P32"><text:span text:style-name="T82">攻擊者</text:span><text:span text:style-name="T167">假冒他人</text:span><text:span text:style-name="T82">的 MAC，讓封包被送到錯的地方</text:span> → 中間人攻擊（MITM）</text:p>
          </table:table-cell>
        </table:table-row>
        <table:table-row table:style-name="表格62.1">
          <table:table-cell table:style-name="表格62.A4" office:value-type="string">
            <text:p text:style-name="P36">arp -a</text:p>
          </table:table-cell>
          <table:table-cell table:style-name="表格62.A4" office:value-type="string">
            <text:p text:style-name="P32"><text:span text:style-name="T166">查看本機的 ARP 對應表</text:span>（<text:span text:style-name="T46">IP ↔ MAC 清單</text:span>）</text:p>
          </table:table-cell>
        </table:table-row>
        <table:table-row table:style-name="表格62.1">
          <table:table-cell table:style-name="表格62.A3" office:value-type="string">
            <text:p text:style-name="P80">ping [IP]</text:p>
          </table:table-cell>
          <table:table-cell table:style-name="表格62.A3" office:value-type="string">
            <text:p text:style-name="P32"><text:span text:style-name="T59">觸發 ARP 運作</text:span>，<text:span text:style-name="T112">讓電腦主動查詢對應 MAC</text:span></text:p>
          </table:table-cell>
        </table:table-row>
      </table:table>
      <text:h text:style-name="P9" text:outline-level="2">二、NAT（Network Address Translation）：私網 → 公網</text:h>
      <text:p text:style-name="P44">一句話定義：<text:span text:style-name="T42">NAT</text:span> ＝ <text:span text:style-name="T183">路由器幫你把「私有 IP」改成「公網 IP」</text:span>，讓內部機器能夠上網。<text:span text:style-name="T147">私有 IP（如 192.168.1.2）外網看不到，只在家裡用</text:span>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54"><text:span text:style-name="T4">▸ <text:s/></text:span><text:span text:style-name="T24">NAT 運作流程</text:span></text:p>
            <text:p text:style-name="P42">① 你的電腦（192.168.1.2）發送資料給 Google → ② <text:span text:style-name="T134">封包抵達路由器</text:span>，<text:span text:style-name="T112">NAT 把來源 IP 改成公網 IP（220.x.x.x）</text:span><text:span text:style-name="T96">對外偽裝身份</text:span>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4">類型</text:p>
          </table:table-cell>
          <table:table-cell table:style-name="表格63.A2" office:value-type="string">
            <text:p text:style-name="P24">中文</text:p>
          </table:table-cell>
          <table:table-cell table:style-name="表格63.A2" office:value-type="string">
            <text:p text:style-name="P24">說明</text:p>
          </table:table-cell>
          <table:table-cell table:style-name="表格63.A2" office:value-type="string">
            <text:p text:style-name="P24">特點</text:p>
          </table:table-cell>
        </table:table-row>
        <table:table-row table:style-name="表格63.1">
          <table:table-cell table:style-name="表格63.A3" office:value-type="string">
            <text:p text:style-name="P37">Static NAT</text:p>
          </table:table-cell>
          <table:table-cell table:style-name="表格63.A3" office:value-type="string">
            <text:p text:style-name="P32">靜態 NAT</text:p>
          </table:table-cell>
          <table:table-cell table:style-name="表格63.A3" office:value-type="string">
            <text:p text:style-name="P100">一個私有 IP ↔ 一個公網 IP</text:p>
          </table:table-cell>
          <table:table-cell table:style-name="表格63.A3" office:value-type="string">
            <text:p text:style-name="P100">固定對應</text:p>
          </table:table-cell>
        </table:table-row>
        <table:table-row table:style-name="表格63.1">
          <table:table-cell table:style-name="表格63.A4" office:value-type="string">
            <text:p text:style-name="P37">Dynamic NAT</text:p>
          </table:table-cell>
          <table:table-cell table:style-name="表格63.A4" office:value-type="string">
            <text:p text:style-name="P32">動態 NAT</text:p>
          </table:table-cell>
          <table:table-cell table:style-name="表格63.A4" office:value-type="string">
            <text:p text:style-name="P107">多個私有 IP 對應 IP 池（pool）</text:p>
          </table:table-cell>
          <table:table-cell table:style-name="表格63.A4" office:value-type="string">
            <text:p text:style-name="P107">動態分配</text:p>
          </table:table-cell>
        </table:table-row>
        <table:table-row table:style-name="表格63.1">
          <table:table-cell table:style-name="表格63.A3" office:value-type="string">
            <text:p text:style-name="P105">PAT</text:p>
          </table:table-cell>
          <table:table-cell table:style-name="表格63.A3" office:value-type="string">
            <text:p text:style-name="P32">連接埠位址轉換</text:p>
          </table:table-cell>
          <table:table-cell table:style-name="表格63.A3" office:value-type="string">
            <text:p text:style-name="P108">多台共用一個公網 IP</text:p>
          </table:table-cell>
          <table:table-cell table:style-name="表格63.A3" office:value-type="string">
            <text:p text:style-name="P108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54"><text:span text:style-name="T4">⚠️ <text:s/></text:span><text:span text:style-name="T39">NAT 的缺點（考試超愛）</text:span></text:p>
            <text:p text:style-name="P55"><text:span text:style-name="T174">破壞 End-to-End 連線</text:span><text:span text:style-name="T36">（最重要）：</text:span><text:span text:style-name="T9">原本你↔對方是真正點對點；</text:span><text:span text:style-name="T17">有 NAT 後變成你→NAT→對方，多一層轉換，不再是端對端</text:span><text:span text:style-name="T9">。</text:span></text:p>
            <text:p text:style-name="P56"><text:span text:style-name="T174">P2P / VoIP 難以運作</text:span><text:span text:style-name="T36">：</text:span><text:span text:style-name="T123">外部機器找不到你（被藏在 NAT 後）</text:span><text:span text:style-name="T9">，P2P 下載、VoIP 通話等</text:span><text:span text:style-name="T193">直連功能受限</text:span><text:span text:style-name="T9">。</text:span></text:p>
            <text:p text:style-name="P56"><text:span text:style-name="T174">增加延遲</text:span><text:span text:style-name="T36">：</text:span><text:span text:style-name="T51">每個封包都需要</text:span><text:span text:style-name="T195">多一道 IP 轉換處理</text:span><text:span text:style-name="T9">。</text:span></text:p>
          </table:table-cell>
          <table:covered-table-cell/>
          <table:covered-table-cell/>
          <table:covered-table-cell/>
        </table:table-row>
      </table:table>
      <text:h text:style-name="P9" text:outline-level="2"><text:soft-page-break/>三、解決 NAT 限制的三種方法</text:h>
      <text:p text:style-name="P44"><text:span text:style-name="T42">核心問題</text:span>：<text:span text:style-name="T134">外面的人只看到一個公網 IP</text:span>，但<text:span text:style-name="T196">內部有多台機器，路由器不知道要轉給哪一台</text:span>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9">方法一：<text:span text:style-name="T64">Port Forwarding（手動指定轉發）</text:span></text:p>
            <text:p text:style-name="P41">比喻：<text:span text:style-name="T82">Port＝房間號碼</text:span>；<text:span text:style-name="T183">NAT 路由器＝大樓</text:span>；<text:span text:style-name="T82">Port Forwarding＝門口指示牌「80 號房 → 192.168.1.2」</text:span>。例：220.x.x.x:80 → 192.168.1.2:80（<text:span text:style-name="T180">網頁</text:span>）；220.x.x.x:25565 → 192.168.1.2:25565（Minecraft）。</text:p>
            <text:p text:style-name="P56"><text:span text:style-name="T16">優點：</text:span><text:span text:style-name="T9">設定直接、穩定，可精確控制。</text:span><text:span text:style-name="T16">缺點：</text:span><text:span text:style-name="T108">每個服務都要手動設定，IP 改變要重設</text:span><text:span text:style-name="T9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5">方法二：<text:span text:style-name="T64">UPnP（自動版 Port Forwarding）</text:span></text:p>
            <text:p text:style-name="P41"><text:span text:style-name="T118">讓裝置自動跟</text:span><text:span text:style-name="T143">路由器</text:span><text:span text:style-name="T118">要求「幫我開一個 Port」，不需人工設定。</text:span>① <text:span text:style-name="T184">應用程式發 UPnP 請求</text:span> → ② <text:span text:style-name="T144">路由器</text:span><text:span text:style-name="T184">自動新增 Port Forwarding 規則</text:span> → ③<text:span text:style-name="T117"> 服務結束後自動清除</text:span>（理想情況）。</text:p>
            <text:p text:style-name="P56"><text:span text:style-name="T16">優點：</text:span><text:span text:style-name="T9">全自動、對一般用戶友善。</text:span><text:span text:style-name="T188">安全風險（重要）：</text:span><text:span text:style-name="T108">惡意程式也能透過 UPnP 自動開 Port，可能讓攻擊者直接連入內網</text:span><text:span text:style-name="T9">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4">方法三：<text:span text:style-name="T64">STUN（打洞技術）</text:span></text:p>
            <text:p text:style-name="P41"><text:span text:style-name="T42">使用情境</text:span>：<text:span text:style-name="T197">兩端都在各自 NAT 後面，彼此都是私有 IP、互相找不到。STUN 先幫每端「查清楚自己對外的公網 IP + Port」，再交換資訊</text:span>嘗試直接打通。</text:p>
            <text:p text:style-name="P41">① <text:span text:style-name="T199">問 STUN 伺服器「我對外的 IP 和 Port 是什麼？」</text:span>② <text:span text:style-name="T199">STUN 回「你對外是 220.x.x.x:12345」</text:span>③ <text:span text:style-name="T147">朋友也做同樣的事</text:span> → ④ <text:span text:style-name="T199">兩端透過第三方交換彼此公網位址</text:span> → ⑤ <text:span text:style-name="T199">同時互相發送封包打洞（Hole Punching）</text:span>。</text:p>
            <text:p text:style-name="P56"><text:span text:style-name="T188">重要限制：</text:span><text:span text:style-name="T108">STUN 只對部分 NAT 類型有效</text:span><text:span text:style-name="T9">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4">方法</text:p>
          </table:table-cell>
          <table:table-cell table:style-name="表格64.A4" office:value-type="string">
            <text:p text:style-name="P24">設定方式</text:p>
          </table:table-cell>
          <table:table-cell table:style-name="表格64.A4" office:value-type="string">
            <text:p text:style-name="P24">典型場景</text:p>
          </table:table-cell>
          <table:table-cell table:style-name="表格64.A4" office:value-type="string">
            <text:p text:style-name="P24">主要限制</text:p>
          </table:table-cell>
        </table:table-row>
        <table:table-row table:style-name="表格64.1">
          <table:table-cell table:style-name="表格64.A5" office:value-type="string">
            <text:p text:style-name="P32">Port Forwarding</text:p>
          </table:table-cell>
          <table:table-cell table:style-name="表格64.A5" office:value-type="string">
            <text:p text:style-name="P37">手動設定路由器</text:p>
          </table:table-cell>
          <table:table-cell table:style-name="表格64.A5" office:value-type="string">
            <text:p text:style-name="P32">架設網頁／遊戲伺服器</text:p>
          </table:table-cell>
          <table:table-cell table:style-name="表格64.A5" office:value-type="string">
            <text:p text:style-name="P32">需要手動維護</text:p>
          </table:table-cell>
        </table:table-row>
        <table:table-row table:style-name="表格64.1">
          <table:table-cell table:style-name="表格64.A6" office:value-type="string">
            <text:p text:style-name="P32">UPnP</text:p>
          </table:table-cell>
          <table:table-cell table:style-name="表格64.A6" office:value-type="string">
            <text:p text:style-name="P37">應用程式自動設定</text:p>
          </table:table-cell>
          <table:table-cell table:style-name="表格64.A6" office:value-type="string">
            <text:p text:style-name="P32">一般遊戲、視訊軟體</text:p>
          </table:table-cell>
          <table:table-cell table:style-name="表格64.A6" office:value-type="string">
            <text:p text:style-name="P32">惡意程式可濫用</text:p>
          </table:table-cell>
        </table:table-row>
        <table:table-row table:style-name="表格64.1">
          <table:table-cell table:style-name="表格64.A5" office:value-type="string">
            <text:p text:style-name="P32">STUN</text:p>
          </table:table-cell>
          <table:table-cell table:style-name="表格64.A5" office:value-type="string">
            <text:p text:style-name="P37">無需路由器設定</text:p>
          </table:table-cell>
          <table:table-cell table:style-name="表格64.A5" office:value-type="string">
            <text:p text:style-name="P32">WebRTC、P2P 通話</text:p>
          </table:table-cell>
          <table:table-cell table:style-name="表格64.A5" office:value-type="string">
            <text:p text:style-name="P32">Symmetric NAT 會失敗</text:p>
          </table:table-cell>
        </table:table-row>
      </table:table>
      <text:h text:style-name="P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54"><text:span text:style-name="T4">🎯 <text:s/></text:span><text:span text:style-name="T157">最重要的核心觀念（先記住）</text:span></text:p>
            <text:p text:style-name="P55"><text:span text:style-name="T158">IP 位址＝</text:span><text:span text:style-name="T9">決定封包的最終目的地（整條路的終點），像信封上的收件地址。</text:span></text:p>
            <text:p text:style-name="P56"><text:span text:style-name="T158">MAC 位址＝</text:span><text:span text:style-name="T9">決定「下一站」要交給哪台機器，像快遞員每次只看下一站。</text:span></text:p>
            <text:p text:style-name="P56"><text:span text:style-name="T188">關鍵理解：</text:span><text:span text:style-name="T9">封包在傳送途中，IP 不變（始終是 Google 的 IP），但 MAC 每一跳都會更換。</text:span></text:p>
          </table:table-cell>
        </table:table-row>
      </table:table>
      <text:p text:style-name="P5"><text:span text:style-name="T42">場景</text:span>：<text:span text:style-name="T200">你電腦 192.168.1.2／路由器內網 IP 192.168.1.1／路由器公網 IP 220.x.x.x／目標 google.com</text:span>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8">步驟</text:p>
            </table:table-cell>
            <table:table-cell table:style-name="表格66.A1" office:value-type="string">
              <text:p text:style-name="P28">動作</text:p>
            </table:table-cell>
            <table:table-cell table:style-name="表格66.A1" office:value-type="string">
              <text:p text:style-name="P28">使用技術</text:p>
            </table:table-cell>
            <table:table-cell table:style-name="表格66.A1" office:value-type="string">
              <text:p text:style-name="P28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7">① DNS</text:p>
          </table:table-cell>
          <table:table-cell table:style-name="表格66.A2" office:value-type="string">
            <text:p text:style-name="P47">google.com → 142.250.xxx.xxx(<text:span text:style-name="T45">Google 的 IP</text:span>)</text:p>
            <text:p text:style-name="P47">(電腦必須知道目的地在哪)</text:p>
          </table:table-cell>
          <table:table-cell table:style-name="表格66.A2" office:value-type="string">
            <text:p text:style-name="P47">DNS</text:p>
          </table:table-cell>
          <table:table-cell table:style-name="表格66.A2" office:value-type="string">
            <text:p text:style-name="P47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7">② ARP</text:p>
          </table:table-cell>
          <table:table-cell table:style-name="表格66.A3" office:value-type="string">
            <text:p text:style-name="P48">找路由器（192.168.1.1）的 MAC(<text:span text:style-name="T82">發現 Google </text:span><text:span text:style-name="T167">不在同一個區網</text:span><text:span text:style-name="T82">，必須交給路由器幫忙送</text:span>)(<text:span text:style-name="T183">查詢路由器的 MAC，下一站是路由器</text:span>)</text:p>
          </table:table-cell>
          <table:table-cell table:style-name="表格66.A3" office:value-type="string">
            <text:p text:style-name="P47">ARP</text:p>
          </table:table-cell>
          <table:table-cell table:style-name="表格66.A3" office:value-type="string">
            <text:p text:style-name="P47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7">③ <text:span text:style-name="T96">送封包</text:span></text:p>
          </table:table-cell>
          <table:table-cell table:style-name="表格66.A2" office:value-type="string">
            <text:p text:style-name="P47">IP=Google；MAC=路由器(<text:span text:style-name="T120">IP 記</text:span><text:soft-page-break/><text:span text:style-name="T120">錄最終目的地；MAC 記錄下一站</text:span>)</text:p>
          </table:table-cell>
          <table:table-cell table:style-name="表格66.A2" office:value-type="string">
            <text:p text:style-name="P47">L2 傳輸</text:p>
          </table:table-cell>
          <table:table-cell table:style-name="表格66.A2" office:value-type="string">
            <text:p text:style-name="P47">IP=終點；MAC=下一站</text:p>
          </table:table-cell>
        </table:table-row>
        <table:table-row table:style-name="表格66.1">
          <table:table-cell table:style-name="表格66.A3" office:value-type="string">
            <text:p text:style-name="P47">④ NAT 去程</text:p>
          </table:table-cell>
          <table:table-cell table:style-name="表格66.A3" office:value-type="string">
            <text:p text:style-name="P49"><text:span text:style-name="T95">192.168.1.2 → 220.x.x.x</text:span>(<text:span text:style-name="T185">路由器收到後往 Internet 送</text:span>；路由器負責跨網路傳遞)(<text:span text:style-name="T185">私有 IP 換成公網 IP，因Internet 不認私有 IP</text:span>)</text:p>
          </table:table-cell>
          <table:table-cell table:style-name="表格66.A3" office:value-type="string">
            <text:p text:style-name="P47">NAT</text:p>
          </table:table-cell>
          <table:table-cell table:style-name="表格66.A3" office:value-type="string">
            <text:p text:style-name="P47">換身份才能上 Internet</text:p>
          </table:table-cell>
        </table:table-row>
        <table:table-row table:style-name="表格66.1">
          <table:table-cell table:style-name="表格66.A2" office:value-type="string">
            <text:p text:style-name="P47">⑤ 傳到 Google</text:p>
          </table:table-cell>
          <table:table-cell table:style-name="表格66.A2" office:value-type="string">
            <text:p text:style-name="P47"><text:span text:style-name="T134">封包抵達目的地</text:span>(<text:span text:style-name="T197">Google 看到公網 IP</text:span>)</text:p>
          </table:table-cell>
          <table:table-cell table:style-name="表格66.A2" office:value-type="string">
            <text:p text:style-name="P47">Internet</text:p>
          </table:table-cell>
          <table:table-cell table:style-name="表格66.A2" office:value-type="string">
            <text:p text:style-name="P47">Google 只看到公網 IP</text:p>
          </table:table-cell>
        </table:table-row>
        <table:table-row table:style-name="表格66.1">
          <table:table-cell table:style-name="表格66.A3" office:value-type="string">
            <text:p text:style-name="P47">⑥ Google 回應</text:p>
          </table:table-cell>
          <table:table-cell table:style-name="表格66.A3" office:value-type="string">
            <text:p text:style-name="P47"><text:span text:style-name="T97">回傳給 220.x.x.x</text:span>(<text:span text:style-name="T199">回到路由器再回到你電腦</text:span>)</text:p>
          </table:table-cell>
          <table:table-cell table:style-name="表格66.A3" office:value-type="string">
            <text:p text:style-name="P47">Internet</text:p>
          </table:table-cell>
          <table:table-cell table:style-name="表格66.A3" office:value-type="string">
            <text:p text:style-name="P47">路由器收到回應</text:p>
          </table:table-cell>
        </table:table-row>
        <table:table-row table:style-name="表格66.1">
          <table:table-cell table:style-name="表格66.A2" office:value-type="string">
            <text:p text:style-name="P47">⑦ NAT 回程</text:p>
          </table:table-cell>
          <table:table-cell table:style-name="表格66.A2" office:value-type="string">
            <text:p text:style-name="P47"><text:span text:style-name="T95">220.x.x.x → 192.168.1.2</text:span>(<text:span text:style-name="T82">NAT 依記錄轉回正確主機</text:span>)</text:p>
          </table:table-cell>
          <table:table-cell table:style-name="表格66.A2" office:value-type="string">
            <text:p text:style-name="P47">NAT</text:p>
          </table:table-cell>
          <table:table-cell table:style-name="表格66.A2" office:value-type="string">
            <text:p text:style-name="P47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7">⑧ 收到網頁</text:p>
          </table:table-cell>
          <table:table-cell table:style-name="表格66.A3" office:value-type="string">
            <text:p text:style-name="P47">瀏覽器顯示頁面</text:p>
          </table:table-cell>
          <table:table-cell table:style-name="表格66.A3" office:value-type="string">
            <text:p text:style-name="P47">—</text:p>
          </table:table-cell>
          <table:table-cell table:style-name="表格66.A3" office:value-type="string">
            <text:p text:style-name="P47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54"><text:span text:style-name="T4">💣 <text:s/></text:span><text:span text:style-name="T39">三個最容易搞錯的地方（考試地雷）</text:span></text:p>
            <text:p text:style-name="P55"><text:span text:style-name="T189">✗ 以為 ARP 是找 Google 的 MAC</text:span><text:span text:style-name="T188">　→　</text:span><text:span text:style-name="T194">✓ ARP 找的是「路由器」的 MAC！</text:span><text:span text:style-name="T9">因為 ARP 只能在同一個 LAN 內使用。</text:span></text:p>
            <text:p text:style-name="P56"><text:span text:style-name="T189">✗ 以為封包直接送到 Google</text:span><text:span text:style-name="T188">　→　</text:span><text:span text:style-name="T194">✓ 封包先送給路由器，路由器再轉到 Internet</text:span><text:span text:style-name="T9">。</text:span></text:p>
            <text:p text:style-name="P56"><text:span text:style-name="T189">✗ 以為 IP 在傳輸過程中一直不變</text:span><text:span text:style-name="T188">　→　</text:span><text:span text:style-name="T194">✓ NAT 會在去程改掉來源 IP，回程再改回去</text:span><text:span text:style-name="T9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54"><text:span text:style-name="T4">📝 <text:s/></text:span><text:span text:style-name="T190">考試標準答案（直接背）</text:span></text:p>
            <text:p text:style-name="P42"><text:span text:style-name="T40">使用者輸入網址後</text:span>，<text:span text:style-name="T72">先透過 DNS 將網域名稱解析為 IP</text:span>；<text:span text:style-name="T117">接著主機利用 ARP 取得路由器（預設閘道）的 MAC</text:span>，<text:span text:style-name="T117">將封包傳送至路由器</text:span>；<text:span text:style-name="T152">路由器透過 NAT 將私有 IP 轉換為公網 IP 後送往 Internet</text:span>；<text:span text:style-name="T147">目的主機回應後，路由器再透過 NAT 將封包轉回原內部主機</text:span>。</text:p>
          </table:table-cell>
          <table:covered-table-cell/>
          <table:covered-table-cell/>
          <table:covered-table-cell/>
        </table:table-row>
      </table:table>
      <text:h text:style-name="P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109"/>
            </table:table-cell>
            <table:table-cell table:style-name="表格67.A1" office:value-type="string">
              <text:p text:style-name="P24">ARP</text:p>
            </table:table-cell>
            <table:table-cell table:style-name="表格67.A1" office:value-type="string">
              <text:p text:style-name="P24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32">目的</text:p>
          </table:table-cell>
          <table:table-cell table:style-name="表格67.A2" office:value-type="string">
            <text:p text:style-name="P94">用 IP 找 MAC</text:p>
          </table:table-cell>
          <table:table-cell table:style-name="表格67.A2" office:value-type="string">
            <text:p text:style-name="P110">私有 IP 轉成公網 IP</text:p>
          </table:table-cell>
        </table:table-row>
        <table:table-row table:style-name="表格67.1">
          <table:table-cell table:style-name="表格67.A3" office:value-type="string">
            <text:p text:style-name="P32">使用範圍</text:p>
          </table:table-cell>
          <table:table-cell table:style-name="表格67.A3" office:value-type="string">
            <text:p text:style-name="P36">區域網路（LAN）內</text:p>
          </table:table-cell>
          <table:table-cell table:style-name="表格67.A3" office:value-type="string">
            <text:p text:style-name="P37">內網與 Internet 之間</text:p>
          </table:table-cell>
        </table:table-row>
        <table:table-row table:style-name="表格67.1">
          <table:table-cell table:style-name="表格67.A2" office:value-type="string">
            <text:p text:style-name="P32">運作層級</text:p>
          </table:table-cell>
          <table:table-cell table:style-name="表格67.A2" office:value-type="string">
            <text:p text:style-name="P102">L2 / L3 交界</text:p>
          </table:table-cell>
          <table:table-cell table:style-name="表格67.A2" office:value-type="string">
            <text:p text:style-name="P103">L3（網路層）</text:p>
          </table:table-cell>
        </table:table-row>
        <table:table-row table:style-name="表格67.1">
          <table:table-cell table:style-name="表格67.A3" office:value-type="string">
            <text:p text:style-name="P32">誰執行</text:p>
          </table:table-cell>
          <table:table-cell table:style-name="表格67.A3" office:value-type="string">
            <text:p text:style-name="P32">端點裝置（電腦）</text:p>
          </table:table-cell>
          <table:table-cell table:style-name="表格67.A3" office:value-type="string">
            <text:p text:style-name="P32">路由器</text:p>
          </table:table-cell>
        </table:table-row>
        <table:table-row table:style-name="表格67.1">
          <table:table-cell table:style-name="表格67.A2" office:value-type="string">
            <text:p text:style-name="P32">主要用途</text:p>
          </table:table-cell>
          <table:table-cell table:style-name="表格67.A2" office:value-type="string">
            <text:p text:style-name="P32">在區網內傳送封包</text:p>
          </table:table-cell>
          <table:table-cell table:style-name="表格67.A2" office:value-type="string">
            <text:p text:style-name="P32">讓內部主機能夠上網</text:p>
          </table:table-cell>
        </table:table-row>
      </table:table>
      <text:h text:style-name="P25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54"><text:span text:style-name="T4">🚦 <text:s/></text:span><text:span text:style-name="T24">本篇重點</text:span></text:p>
            <text:p text:style-name="P42">網路的本質是把資料從 A 電腦送到 B 電腦，但中間有四個麻煩，TCP 各自有對策。</text:p>
          </table:table-cell>
        </table:table-row>
      </table:table>
      <text:h text:style-name="P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4">問題</text:p>
            </table:table-cell>
            <table:table-cell table:style-name="表格69.A1" office:value-type="string">
              <text:p text:style-name="P24">說明</text:p>
            </table:table-cell>
            <table:table-cell table:style-name="表格69.A1" office:value-type="string">
              <text:p text:style-name="P24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36">資料可能丟失</text:p>
          </table:table-cell>
          <table:table-cell table:style-name="表格69.A2" office:value-type="string">
            <text:p text:style-name="P32">封包在網路中消失</text:p>
          </table:table-cell>
          <table:table-cell table:style-name="表格69.A2" office:value-type="string">
            <text:p text:style-name="P32"><text:span text:style-name="T40">重傳</text:span>機制（Retransmission）</text:p>
          </table:table-cell>
        </table:table-row>
        <table:table-row table:style-name="表格69.1">
          <table:table-cell table:style-name="表格69.A3" office:value-type="string">
            <text:p text:style-name="P36">順序可能亂掉</text:p>
          </table:table-cell>
          <table:table-cell table:style-name="表格69.A3" office:value-type="string">
            <text:p text:style-name="P32">封包走不同路徑先後到達</text:p>
          </table:table-cell>
          <table:table-cell table:style-name="表格69.A3" office:value-type="string">
            <text:p text:style-name="P32"><text:span text:style-name="T40">序號</text:span>機制（Sequence Number）</text:p>
          </table:table-cell>
        </table:table-row>
        <table:table-row table:style-name="表格69.1">
          <table:table-cell table:style-name="表格69.A2" office:value-type="string">
            <text:p text:style-name="P36">對方來不及收</text:p>
          </table:table-cell>
          <table:table-cell table:style-name="表格69.A2" office:value-type="string">
            <text:p text:style-name="P32">接收端 buffer 可能爆掉</text:p>
          </table:table-cell>
          <table:table-cell table:style-name="表格69.A2" office:value-type="string">
            <text:p text:style-name="P32"><text:span text:style-name="T40">流量</text:span>控制（Flow Control / rwnd）</text:p>
          </table:table-cell>
        </table:table-row>
        <table:table-row table:style-name="表格69.1">
          <table:table-cell table:style-name="表格69.A3" office:value-type="string">
            <text:p text:style-name="P36">網路可能塞車</text:p>
          </table:table-cell>
          <table:table-cell table:style-name="表格69.A3" office:value-type="string">
            <text:p text:style-name="P32">路由器排隊太長</text:p>
          </table:table-cell>
          <table:table-cell table:style-name="表格69.A3" office:value-type="string">
            <text:p text:style-name="P32"><text:span text:style-name="T40">擁塞</text:span>控制（Congestion Control / cwnd）</text:p>
          </table:table-cell>
        </table:table-row>
      </table:table>
      <text:h text:style-name="P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4">特性</text:p>
            </table:table-cell>
            <table:table-cell table:style-name="表格70.A1" office:value-type="string">
              <text:p text:style-name="P24">TCP（可靠模式）</text:p>
            </table:table-cell>
            <table:table-cell table:style-name="表格70.A1" office:value-type="string">
              <text:p text:style-name="P24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32">連線方式</text:p>
          </table:table-cell>
          <table:table-cell table:style-name="表格70.A2" office:value-type="string">
            <text:p text:style-name="P95">需要先建立連線</text:p>
          </table:table-cell>
          <table:table-cell table:style-name="表格70.A2" office:value-type="string">
            <text:p text:style-name="P80">無連線，直接送</text:p>
          </table:table-cell>
        </table:table-row>
        <table:table-row table:style-name="表格70.1">
          <table:table-cell table:style-name="表格70.A3" office:value-type="string">
            <text:p text:style-name="P32">可靠性</text:p>
          </table:table-cell>
          <table:table-cell table:style-name="表格70.A3" office:value-type="string">
            <text:p text:style-name="P32">保證送達（會重傳）</text:p>
          </table:table-cell>
          <table:table-cell table:style-name="表格70.A3" office:value-type="string">
            <text:p text:style-name="P32">不保證送達</text:p>
          </table:table-cell>
        </table:table-row>
        <table:table-row table:style-name="表格70.1">
          <table:table-cell table:style-name="表格70.A2" office:value-type="string">
            <text:p text:style-name="P32">順序</text:p>
          </table:table-cell>
          <table:table-cell table:style-name="表格70.A2" office:value-type="string">
            <text:p text:style-name="P32">保證順序正確</text:p>
          </table:table-cell>
          <table:table-cell table:style-name="表格70.A2" office:value-type="string">
            <text:p text:style-name="P32">不保證順序</text:p>
          </table:table-cell>
        </table:table-row>
        <table:table-row table:style-name="表格70.1">
          <table:table-cell table:style-name="表格70.A3" office:value-type="string">
            <text:p text:style-name="P32">速度</text:p>
          </table:table-cell>
          <table:table-cell table:style-name="表格70.A3" office:value-type="string">
            <text:p text:style-name="P32">較慢（有控制機制）</text:p>
          </table:table-cell>
          <table:table-cell table:style-name="表格70.A3" office:value-type="string">
            <text:p text:style-name="P32">較快（無額外開銷）</text:p>
          </table:table-cell>
        </table:table-row>
        <table:table-row table:style-name="表格70.1">
          <table:table-cell table:style-name="表格70.A2" office:value-type="string">
            <text:p text:style-name="P32">適合場景</text:p>
          </table:table-cell>
          <table:table-cell table:style-name="表格70.A2" office:value-type="string">
            <text:p text:style-name="P37">網頁、檔案傳輸、Email</text:p>
          </table:table-cell>
          <table:table-cell table:style-name="表格70.A2" office:value-type="string">
            <text:p text:style-name="P32"><text:span text:style-name="T40">直播、遊戲</text:span>、DNS 查詢</text:p>
          </table:table-cell>
        </table:table-row>
        <table:table-row table:style-name="表格70.1">
          <table:table-cell table:style-name="表格70.A3" office:value-type="string">
            <text:p text:style-name="P32">比喻</text:p>
          </table:table-cell>
          <table:table-cell table:style-name="表格70.A3" office:value-type="string">
            <text:p text:style-name="P36">專業物流（簽收確認）</text:p>
          </table:table-cell>
          <table:table-cell table:style-name="表格70.A3" office:value-type="string">
            <text:p text:style-name="P36">亂丟紙飛機</text:p>
          </table:table-cell>
        </table:table-row>
      </table:table>
      <text:h text:style-name="P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54"><text:span text:style-name="T4">🤝 <text:s/></text:span><text:span text:style-name="T24">握手流程</text:span></text:p>
            <text:p text:style-name="P55"><text:span text:style-name="T25">① Client → Server：</text:span><text:span text:style-name="T26">SYN</text:span><text:span text:style-name="T25">　</text:span><text:span text:style-name="T9">「我可以傳資料給你嗎？我準備好了。」（Synchronize 同步請求）</text:span></text:p>
            <text:p text:style-name="P56"><text:span text:style-name="T25">② Server → Client：</text:span><text:span text:style-name="T26">SYN + ACK</text:span><text:span text:style-name="T25">　</text:span><text:span text:style-name="T9">「可以！我收到你的請求了，我也準備好了。」（確認＋同步）</text:span></text:p>
            <text:p text:style-name="P56"><text:span text:style-name="T25">③ Client → Server：</text:span><text:span text:style-name="T26">ACK</text:span><text:span text:style-name="T25">　</text:span><text:span text:style-name="T9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54"><text:span text:style-name="T4">🎯 <text:s/></text:span><text:span text:style-name="T157">三次握手真正目的（考試必考）</text:span></text:p>
            <text:p text:style-name="P42">確認雙向都能傳資料（Client → Server 和 Server → Client 各自驗證）。</text:p>
            <text:p text:style-name="P41"><text:span text:style-name="T201">避免「</text:span><text:span text:style-name="T153">舊封包誤觸發新連線</text:span><text:span text:style-name="T201">」</text:span>：若少一次確認，<text:span text:style-name="T118">延遲的舊 SYN 封包可能讓 Server 誤以為要建立新連線</text:span>。</text:p>
          </table:table-cell>
        </table:table-row>
      </table:table>
      <text:h text:style-name="P9" text:outline-level="2">四、攻擊：SYN Flood</text:h>
      <text:p text:style-name="P44">攻擊原理：攻擊者大量發送 SYN 封包，但<text:span text:style-name="T137">故意不完成第三次握手（</text:span><text:span text:style-name="T112">不回 ACK</text:span><text:span text:style-name="T137">）</text:span>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23">步驟</text:p>
            </table:table-cell>
            <table:table-cell table:style-name="表格72.A1" office:value-type="string">
              <text:p text:style-name="P23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32">1</text:p>
          </table:table-cell>
          <table:table-cell table:style-name="表格72.A2" office:value-type="string">
            <text:p text:style-name="P32">攻擊者<text:span text:style-name="T42">送出大量 SYN</text:span>，每個都<text:span text:style-name="T40">假冒不同來源 IP</text:span>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32">2</text:p>
          </table:table-cell>
          <table:table-cell table:style-name="表格72.A3" office:value-type="string">
            <text:p text:style-name="P32"><text:span text:style-name="T186">Server 建立「半連線（Half-open Connection）」</text:span>，<text:span text:style-name="T95">每個都佔記憶體等待 ACK</text:span></text:p>
          </table:table-cell>
        </table:table-row>
        <table:table-row table:style-name="表格72.1">
          <table:table-cell table:style-name="表格72.A2" office:value-type="string">
            <text:p text:style-name="P32">3</text:p>
          </table:table-cell>
          <table:table-cell table:style-name="表格72.A2" office:value-type="string">
            <text:p text:style-name="P32"><text:span text:style-name="T197">攻擊者永遠不回 ACK</text:span>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32">4</text:p>
          </table:table-cell>
          <table:table-cell table:style-name="表格72.A3" office:value-type="string">
            <text:p text:style-name="P32"><text:span text:style-name="T42">正常用戶連線失敗</text:span>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54"><text:span text:style-name="T4">⚠️ <text:s/></text:span><text:span text:style-name="T39">本質</text:span></text:p>
            <text:p text:style-name="P42">這是一種 <text:span text:style-name="T40">DoS（拒絕服務）攻擊</text:span>，利用 TCP 三次握手機制的不對稱性。</text:p>
          </table:table-cell>
          <table:covered-table-cell/>
        </table:table-row>
      </table:table>
      <text:h text:style-name="P9" text:outline-level="2">五、傳送速度的兩個限制：<text:span text:style-name="T109">rwnd</text:span> 與 <text:span text:style-name="T109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23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23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32">接收端的限制。<text:span text:style-name="T184">對方 buffer（暫存區）還剩多少空間</text:span>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32">網路的限制。發送端根據網路狀況自行估計，<text:span text:style-name="T82">目前網路最多能承受多少資料量</text:span>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55"><text:span text:style-name="T160">實際傳送量 ＝ min(rwnd, cwnd)</text:span><text:span text:style-name="T158">　</text:span><text:span text:style-name="T17">取兩者最小值</text:span><text:span text:style-name="T9">。</text:span><text:span text:style-name="T23">對方吃不下就看 rwnd；網路塞就看 cwnd</text:span><text:span text:style-name="T9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23">情境</text:p>
          </table:table-cell>
          <table:table-cell table:style-name="表格73.A1" office:value-type="string">
            <text:p text:style-name="P23">cwnd</text:p>
          </table:table-cell>
          <table:table-cell table:style-name="表格73.A1" table:number-columns-spanned="2" office:value-type="string">
            <text:p text:style-name="P23">rwnd</text:p>
          </table:table-cell>
          <table:covered-table-cell/>
          <table:table-cell table:style-name="表格73.A1" office:value-type="string">
            <text:p text:style-name="P23">實際傳送量</text:p>
          </table:table-cell>
          <table:table-cell table:style-name="表格73.A1" office:value-type="string">
            <text:p text:style-name="P23">瓶頸原因</text:p>
          </table:table-cell>
        </table:table-row>
        <table:table-row table:style-name="表格73.1">
          <table:table-cell table:style-name="表格73.A2" office:value-type="string">
            <text:p text:style-name="P32">對方 buffer 快滿了</text:p>
          </table:table-cell>
          <table:table-cell table:style-name="表格73.A2" office:value-type="string">
            <text:p text:style-name="P32">10</text:p>
          </table:table-cell>
          <table:table-cell table:style-name="表格73.A2" table:number-columns-spanned="2" office:value-type="string">
            <text:p text:style-name="P32">3</text:p>
          </table:table-cell>
          <table:covered-table-cell/>
          <table:table-cell table:style-name="表格73.A2" office:value-type="string">
            <text:p text:style-name="P32">3</text:p>
          </table:table-cell>
          <table:table-cell table:style-name="表格73.A2" office:value-type="string">
            <text:p text:style-name="P32">接收端限制（rwnd）</text:p>
          </table:table-cell>
        </table:table-row>
        <table:table-row table:style-name="表格73.1">
          <table:table-cell table:style-name="表格73.A6" office:value-type="string">
            <text:p text:style-name="P32">網路很塞</text:p>
          </table:table-cell>
          <table:table-cell table:style-name="表格73.A6" office:value-type="string">
            <text:p text:style-name="P32">2</text:p>
          </table:table-cell>
          <table:table-cell table:style-name="表格73.A6" table:number-columns-spanned="2" office:value-type="string">
            <text:p text:style-name="P32">10</text:p>
          </table:table-cell>
          <table:covered-table-cell/>
          <table:table-cell table:style-name="表格73.A6" office:value-type="string">
            <text:p text:style-name="P32">2</text:p>
          </table:table-cell>
          <table:table-cell table:style-name="表格73.A6" office:value-type="string">
            <text:p text:style-name="P32">網路限制（cwnd）</text:p>
          </table:table-cell>
        </table:table-row>
        <table:table-row table:style-name="表格73.1">
          <table:table-cell table:style-name="表格73.A2" office:value-type="string">
            <text:p text:style-name="P32">兩者相近</text:p>
          </table:table-cell>
          <table:table-cell table:style-name="表格73.A2" office:value-type="string">
            <text:p text:style-name="P32">5</text:p>
          </table:table-cell>
          <table:table-cell table:style-name="表格73.A2" table:number-columns-spanned="2" office:value-type="string">
            <text:p text:style-name="P32">6</text:p>
          </table:table-cell>
          <table:covered-table-cell/>
          <table:table-cell table:style-name="表格73.A2" office:value-type="string">
            <text:p text:style-name="P32">5</text:p>
          </table:table-cell>
          <table:table-cell table:style-name="表格73.A2" office:value-type="string">
            <text:p text:style-name="P32">網路限制（cwnd）</text:p>
          </table:table-cell>
        </table:table-row>
      </table:table>
      <text:h text:style-name="P9" text:outline-level="2">六、滑動視窗（Sliding Window）</text:h>
      <text:p text:style-name="P44"><text:span text:style-name="T52">最笨的方法：送 1 個封包 → 等 ACK → 再送 1 個 → 等 ACK</text:span>，<text:span text:style-name="T153">大部分時間在閒置，非常浪費</text:span>。<text:span text:style-name="T40">TCP 的改進</text:span>：<text:span text:style-name="T202">不用等 ACK，先連續送出多個封包讓封包都在網路上飛（in-flight），ACK 再慢慢回來</text:span>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55"><text:span text:style-name="T188">✗ 常見錯誤：</text:span><text:span text:style-name="T9">視窗 = cwnd（擁塞視窗）。</text:span><text:span text:style-name="T191">✓ 正確：</text:span><text:span text:style-name="T128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4">時間點</text:p>
          </table:table-cell>
          <table:table-cell table:style-name="表格74.A2" office:value-type="string">
            <text:p text:style-name="P24">已確認</text:p>
          </table:table-cell>
          <table:table-cell table:style-name="表格74.A2" office:value-type="string">
            <text:p text:style-name="P24">視窗範圍（可送）</text:p>
          </table:table-cell>
          <table:table-cell table:style-name="表格74.A2" office:value-type="string">
            <text:p text:style-name="P24">等待中</text:p>
          </table:table-cell>
        </table:table-row>
        <table:table-row table:style-name="表格74.1">
          <table:table-cell table:style-name="表格74.A3" office:value-type="string">
            <text:p text:style-name="P32">初始狀態</text:p>
          </table:table-cell>
          <table:table-cell table:style-name="表格74.A3" office:value-type="string">
            <text:p text:style-name="P32">無</text:p>
          </table:table-cell>
          <table:table-cell table:style-name="表格74.A3" office:value-type="string">
            <text:p text:style-name="P32">封包 1, 2, 3</text:p>
          </table:table-cell>
          <table:table-cell table:style-name="表格74.A3" office:value-type="string">
            <text:p text:style-name="P32">4, 5, 6 …</text:p>
          </table:table-cell>
        </table:table-row>
        <table:table-row table:style-name="表格74.1">
          <table:table-cell table:style-name="表格74.A4" office:value-type="string">
            <text:p text:style-name="P35">收到 ACK 1</text:p>
          </table:table-cell>
          <table:table-cell table:style-name="表格74.A4" office:value-type="string">
            <text:p text:style-name="P40">封包 1</text:p>
          </table:table-cell>
          <table:table-cell table:style-name="表格74.A4" office:value-type="string">
            <text:p text:style-name="P32">封包 2, 3, 4</text:p>
          </table:table-cell>
          <table:table-cell table:style-name="表格74.A4" office:value-type="string">
            <text:p text:style-name="P32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35">收到 ACK 2</text:p>
          </table:table-cell>
          <table:table-cell table:style-name="表格74.A3" office:value-type="string">
            <text:p text:style-name="P40">封包 1, 2</text:p>
          </table:table-cell>
          <table:table-cell table:style-name="表格74.A3" office:value-type="string">
            <text:p text:style-name="P32">封包 3, 4, 5</text:p>
          </table:table-cell>
          <table:table-cell table:style-name="表格74.A3" office:value-type="string">
            <text:p text:style-name="P32">6, 7 …（繼續往右滑）</text:p>
          </table:table-cell>
        </table:table-row>
      </table:table>
      <text:p text:style-name="P5">關鍵理解：視窗大小決定效率（越大越快），<text:span text:style-name="T199">ACK 的回傳決定視窗位置（往前滑）</text:span>，兩者合作讓傳輸保持流暢。</text:p>
      <text:h text:style-name="P9" text:outline-level="2">七、擁塞控制：怎麼調整速度</text:h>
      <text:h text:style-name="P61" text:outline-level="3"><text:span text:style-name="T29">▍</text:span><text:span text:style-name="T30"> 階段一：Slow Start（慢啟動）— 指數成長</text:span></text:h>
      <text:p text:style-name="P44">雖叫「慢」啟動，實際成長非常快。規則：<text:span text:style-name="T95">每收到一個 ACK，cwnd 就 +1</text:span>；<text:span text:style-name="T183">送出 N 個封包 → 收回 N 個 ACK → cwnd 增加 N</text:span>，所以每輪自然翻倍。(<text:span text:style-name="T118">Slow Start = 每一輪變 2 倍，Congestion Avoidance = 每一輪只加 1</text:span>(「<text:span text:style-name="T154">Slow Start翻倍，壅塞避免加一</text:span>」))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ext:soft-page-break/>
          <table:table-row table:style-name="表格75.1">
            <table:table-cell table:style-name="表格75.A1" office:value-type="string">
              <text:p text:style-name="P23">輪次（RTT）</text:p>
            </table:table-cell>
            <table:table-cell table:style-name="表格75.A1" office:value-type="string">
              <text:p text:style-name="P23">cwnd</text:p>
            </table:table-cell>
            <table:table-cell table:style-name="表格75.A1" office:value-type="string">
              <text:p text:style-name="P23">送出封包數</text:p>
            </table:table-cell>
            <table:table-cell table:style-name="表格75.A1" office:value-type="string">
              <text:p text:style-name="P23">收回 ACK 數</text:p>
            </table:table-cell>
            <table:table-cell table:style-name="表格75.A1" office:value-type="string">
              <text:p text:style-name="P23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32">第 1 輪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2</text:p>
          </table:table-cell>
        </table:table-row>
        <table:table-row table:style-name="表格75.1">
          <table:table-cell table:style-name="表格75.A3" office:value-type="string">
            <text:p text:style-name="P32">第 2 輪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4</text:p>
          </table:table-cell>
        </table:table-row>
        <table:table-row table:style-name="表格75.1">
          <table:table-cell table:style-name="表格75.A2" office:value-type="string">
            <text:p text:style-name="P32">第 3 輪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8</text:p>
          </table:table-cell>
        </table:table-row>
        <table:table-row table:style-name="表格75.1">
          <table:table-cell table:style-name="表格75.A3" office:value-type="string">
            <text:p text:style-name="P32">第 4 輪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16</text:p>
          </table:table-cell>
        </table:table-row>
      </table:table>
      <text:h text:style-name="P61" text:outline-level="3"><text:span text:style-name="T29">▍</text:span><text:span text:style-name="T30"> 階段二：Congestion Avoidance（擁塞避免）— 線性成長</text:span></text:h>
      <text:p text:style-name="P44"><text:span text:style-name="T82">cwnd 成長到門檻值（ssthresh）後，改為線性成長</text:span>（<text:span text:style-name="T95">每個 RTT 只 +1</text:span>），<text:span text:style-name="T42">避免增長太快讓網路過載</text:span>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109"/>
            </table:table-cell>
            <table:table-cell table:style-name="表格76.A1" office:value-type="string">
              <text:p text:style-name="P24">Slow Start</text:p>
            </table:table-cell>
            <table:table-cell table:style-name="表格76.A1" office:value-type="string">
              <text:p text:style-name="P24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32">觸發條件</text:p>
          </table:table-cell>
          <table:table-cell table:style-name="表格76.A2" office:value-type="string">
            <text:p text:style-name="P35">cwnd &lt; ssthresh</text:p>
          </table:table-cell>
          <table:table-cell table:style-name="表格76.A2" office:value-type="string">
            <text:p text:style-name="P35">cwnd ≥ ssthresh</text:p>
          </table:table-cell>
        </table:table-row>
        <table:table-row table:style-name="表格76.1">
          <table:table-cell table:style-name="表格76.A3" office:value-type="string">
            <text:p text:style-name="P32">成長方式</text:p>
          </table:table-cell>
          <table:table-cell table:style-name="表格76.A3" office:value-type="string">
            <text:p text:style-name="P32"><text:span text:style-name="T183">指數成長</text:span>（<text:span text:style-name="T98">每個 ACK +1</text:span>）</text:p>
          </table:table-cell>
          <table:table-cell table:style-name="表格76.A3" office:value-type="string">
            <text:p text:style-name="P33"><text:span text:style-name="T197">線性成長</text:span>（<text:span text:style-name="T98">每個 RTT +1</text:span>）(<text:span text:style-name="T202">RTT ：Round Trip Time（往返時間）= 封包出去 + ACK 回來的一個來回時間</text:span>)</text:p>
          </table:table-cell>
        </table:table-row>
        <table:table-row table:style-name="表格76.1">
          <table:table-cell table:style-name="表格76.A2" office:value-type="string">
            <text:p text:style-name="P32">特性</text:p>
          </table:table-cell>
          <table:table-cell table:style-name="表格76.A2" office:value-type="string">
            <text:p text:style-name="P32">快速試探網路上限</text:p>
          </table:table-cell>
          <table:table-cell table:style-name="表格76.A2" office:value-type="string">
            <text:p text:style-name="P32">保守維持穩定傳輸</text:p>
          </table:table-cell>
        </table:table-row>
      </table:table>
      <text:h text:style-name="P61" text:outline-level="3"><text:span text:style-name="T29">▍</text:span><text:span text:style-name="T30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8">丟包偵測方式</text:p>
            </table:table-cell>
            <table:table-cell table:style-name="表格77.A1" office:value-type="string">
              <text:p text:style-name="P28">說明</text:p>
            </table:table-cell>
            <table:table-cell table:style-name="表格77.A1" office:value-type="string">
              <text:p text:style-name="P28">ssthresh</text:p>
            </table:table-cell>
            <table:table-cell table:style-name="表格77.A1" office:value-type="string">
              <text:p text:style-name="P28">cwnd</text:p>
            </table:table-cell>
            <table:table-cell table:style-name="表格77.A1" office:value-type="string">
              <text:p text:style-name="P28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51">Timeout（逾時）</text:p>
          </table:table-cell>
          <table:table-cell table:style-name="表格77.A2" office:value-type="string">
            <text:p text:style-name="P47"><text:span text:style-name="T42">等太久沒 ACK</text:span>，<text:span text:style-name="T115">網路嚴重擁塞</text:span></text:p>
          </table:table-cell>
          <table:table-cell table:style-name="表格77.A2" office:value-type="string">
            <text:p text:style-name="P47">= <text:span text:style-name="T112">cwnd / 2</text:span></text:p>
          </table:table-cell>
          <table:table-cell table:style-name="表格77.A2" office:value-type="string">
            <text:p text:style-name="P67">重設為 1</text:p>
          </table:table-cell>
          <table:table-cell table:style-name="表格77.A2" office:value-type="string">
            <text:p text:style-name="P84">重新進入 Slow Start</text:p>
          </table:table-cell>
        </table:table-row>
        <table:table-row table:style-name="表格77.1">
          <table:table-cell table:style-name="表格77.A3" office:value-type="string">
            <text:p text:style-name="P51">3 個重複 ACK (Fast Retransmit)</text:p>
          </table:table-cell>
          <table:table-cell table:style-name="表格77.A3" office:value-type="string">
            <text:p text:style-name="P47"><text:span text:style-name="T42">連續收 3 個同樣 ACK</text:span>，<text:span text:style-name="T78">單一封包丟失</text:span></text:p>
          </table:table-cell>
          <table:table-cell table:style-name="表格77.A3" office:value-type="string">
            <text:p text:style-name="P47">= <text:span text:style-name="T112">cwnd / 2</text:span></text:p>
          </table:table-cell>
          <table:table-cell table:style-name="表格77.A3" office:value-type="string">
            <text:p text:style-name="P11">= ssthresh（直接減半）</text:p>
          </table:table-cell>
          <table:table-cell table:style-name="表格77.A3" office:value-type="string">
            <text:p text:style-name="P84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54"><text:span text:style-name="T4">⚠️ <text:s/></text:span><text:span text:style-name="T39">重要區別</text:span></text:p>
            <text:p text:style-name="P43"><text:span text:style-name="T200">Timeout 代表網路嚴重問題</text:span>，<text:span text:style-name="T187">cwnd 重設回 1 從頭來</text:span>；<text:span text:style-name="T205">3 個重複 ACK 只是單一封包遺失</text:span>，<text:span text:style-name="T187">cwnd 直接減半後繼續 Congestion Avoidance，不用從頭重來</text:span>。(<text:span text:style-name="T120">Timeout → cwnd = 1；3Dup ACK → cwnd ÷ 2</text:span>)</text:p>
          </table:table-cell>
          <table:covered-table-cell/>
          <table:covered-table-cell/>
          <table:covered-table-cell/>
          <table:covered-table-cell/>
        </table:table-row>
      </table:table>
      <text:h text:style-name="P61" text:outline-level="3"><text:span text:style-name="T29">▍</text:span><text:span text:style-name="T30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23">AI：加法增長 Additive Increase</text:p>
            </table:table-cell>
            <table:table-cell table:style-name="表格78.A1" office:value-type="string">
              <text:p text:style-name="P23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32"><text:span text:style-name="T40">沒丟包 → 網路 OK </text:span>→ CA 階段線性增加（<text:span text:style-name="T42">每 RTT +1</text:span>），慢慢加速。</text:p>
          </table:table-cell>
          <table:table-cell table:style-name="表格78.A2" office:value-type="string">
            <text:p text:style-name="P32"><text:span text:style-name="T40">偵測到丟包 → 網路塞了 </text:span>→ <text:span text:style-name="T42">cwnd ×0.5（減半）</text:span>，快速降速避免繼續惡化。</text:p>
          </table:table-cell>
        </table:table-row>
      </table:table>
      <text:p text:style-name="P5"><text:span text:style-name="T99">AIMD 本質：用 ACK 當回饋，不斷探測網路的「最高速度」</text:span>——<text:span text:style-name="T59">慢慢加速找上限，遇到問題快速減速再重新找</text:span>，這個循環就是 TCP 傳輸的節奏。</text:p>
      <text:h text:style-name="P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54"><text:span text:style-name="T4">🔄 <text:s/></text:span><text:span text:style-name="T24">完整流程</text:span></text:p>
            <text:p text:style-name="P42">① 建立連線：三次握手（SYN → SYN+ACK → ACK）確認雙向通訊正常。</text:p>
            <text:p text:style-name="P41">② 開始傳資料 Slow Start：cwnd 從 1 開始，每個 ACK +1，指數成長快速試探上限。</text:p>
            <text:p text:style-name="P41">③ 達到門檻切換 CA：cwnd 到 ssthresh 後改每 RTT +1，線性保守維持穩定。（RTT＝來回時間：送出一個封包到收到 ACK 所花的時間）</text:p>
            <text:p text:style-name="P41">④ 每輪都考慮兩個限制：實際傳送量 = min(rwnd, cwnd)。</text:p>
            <text:p text:style-name="P41">⑤ 視窗持續滑動：每收到一個 ACK 視窗往前移，保持 pipeline 流暢。</text:p>
            <text:p text:style-name="P41">⑥ 偵測到丟包快速反應：Timeout → cwnd=1 重回 Slow Start；3 重複 ACK → cwnd 減半續 CA。</text:p>
            <text:p text:style-name="P41">⑦ 持續循環調整：送 → 收 ACK → 調整 cwnd → 再送，<text:span text:style-name="T95">用 ACK 當回饋不斷自我調節</text:span>。</text:p>
          </table:table-cell>
        </table:table-row>
      </table:table>
      <text:h text:style-name="P82" text:outline-level="2"><text:soft-page-break/>TCP 七字口訣 <text:s text:c="2"/>握(三次握手) → 衝(Slow Start 指數成長) → 穩(CA 線性成長) → 看(min(rwnd,cwnd)) → 滑(Sliding Window) → 救(Timeout / 3 Dup ACK) → 循(ACK 回饋循環)</text:h>
      <text:h text:style-name="P9" text:outline-level="2"/>
      <text:h text:style-name="P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4">步驟</text:p>
            </table:table-cell>
            <table:table-cell table:style-name="表格80.A1" office:value-type="string">
              <text:p text:style-name="P24">發生什麼</text:p>
            </table:table-cell>
            <table:table-cell table:style-name="表格80.A1" office:value-type="string">
              <text:p text:style-name="P24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32">DNS 解析</text:p>
          </table:table-cell>
          <table:table-cell table:style-name="表格80.A2" office:value-type="string">
            <text:p text:style-name="P32">google.com → 142.250.x.x</text:p>
          </table:table-cell>
          <table:table-cell table:style-name="表格80.A2" office:value-type="string">
            <text:p text:style-name="P32">DNS</text:p>
          </table:table-cell>
        </table:table-row>
        <table:table-row table:style-name="表格80.1">
          <table:table-cell table:style-name="表格80.A3" office:value-type="string">
            <text:p text:style-name="P32">ARP 找路由器</text:p>
          </table:table-cell>
          <table:table-cell table:style-name="表格80.A3" office:value-type="string">
            <text:p text:style-name="P32">找路由器的 MAC 位址</text:p>
          </table:table-cell>
          <table:table-cell table:style-name="表格80.A3" office:value-type="string">
            <text:p text:style-name="P32">ARP</text:p>
          </table:table-cell>
        </table:table-row>
        <table:table-row table:style-name="表格80.1">
          <table:table-cell table:style-name="表格80.A2" office:value-type="string">
            <text:p text:style-name="P32">NAT</text:p>
          </table:table-cell>
          <table:table-cell table:style-name="表格80.A2" office:value-type="string">
            <text:p text:style-name="P32">私有 IP 換成公網 IP</text:p>
          </table:table-cell>
          <table:table-cell table:style-name="表格80.A2" office:value-type="string">
            <text:p text:style-name="P32">NAT</text:p>
          </table:table-cell>
        </table:table-row>
        <table:table-row table:style-name="表格80.1">
          <table:table-cell table:style-name="表格80.A3" office:value-type="string">
            <text:p text:style-name="P32">TCP 三次握手</text:p>
          </table:table-cell>
          <table:table-cell table:style-name="表格80.A3" office:value-type="string">
            <text:p text:style-name="P32">與 Google 建立可靠連線</text:p>
          </table:table-cell>
          <table:table-cell table:style-name="表格80.A3" office:value-type="string">
            <text:p text:style-name="P32">TCP</text:p>
          </table:table-cell>
        </table:table-row>
        <table:table-row table:style-name="表格80.1">
          <table:table-cell table:style-name="表格80.A2" office:value-type="string">
            <text:p text:style-name="P32">傳資料（Slow Start → CA）</text:p>
          </table:table-cell>
          <table:table-cell table:style-name="表格80.A2" office:value-type="string">
            <text:p text:style-name="P32">cwnd 慢慢加速，滑動視窗持續傳送</text:p>
          </table:table-cell>
          <table:table-cell table:style-name="表格80.A2" office:value-type="string">
            <text:p text:style-name="P32">TCP 擁塞控制</text:p>
          </table:table-cell>
        </table:table-row>
        <table:table-row table:style-name="表格80.1">
          <table:table-cell table:style-name="表格80.A3" office:value-type="string">
            <text:p text:style-name="P32">Google 回應</text:p>
          </table:table-cell>
          <table:table-cell table:style-name="表格80.A3" office:value-type="string">
            <text:p text:style-name="P32">資料送回你的電腦</text:p>
          </table:table-cell>
          <table:table-cell table:style-name="表格80.A3" office:value-type="string">
            <text:p text:style-name="P32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54"><text:span text:style-name="T4">⚡ <text:s/></text:span><text:span text:style-name="T30">層次關係</text:span></text:p>
            <text:p text:style-name="P42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54"><text:span text:style-name="T4">🧠 <text:s/></text:span><text:span text:style-name="T157">考試直接用</text:span></text:p>
            <text:p text:style-name="P42">TCP 用三次握手建立連線，<text:span text:style-name="T40">用 rwnd（接收端）和 cwnd（網路）雙重限制控制傳送速度</text:span>，透過 Slow Start 指數試探、Congestion Avoidance 線性增長、丟包後快速降速，<text:span text:style-name="T137">持續用 ACK 當回饋調節</text:span>，確保資料可靠且高效地傳達。</text:p>
          </table:table-cell>
        </table:table-row>
      </table:table>
      <text:h text:style-name="P25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54"><text:span text:style-name="T4">💡 <text:s/></text:span><text:span text:style-name="T24">DNS 是什麼？</text:span></text:p>
            <text:p text:style-name="P42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4">類型</text:p>
            </table:table-cell>
            <table:table-cell table:style-name="表格83.A1" office:value-type="string">
              <text:p text:style-name="P24">全名</text:p>
            </table:table-cell>
            <table:table-cell table:style-name="表格83.A1" office:value-type="string">
              <text:p text:style-name="P24">用途</text:p>
            </table:table-cell>
            <table:table-cell table:style-name="表格83.A1" office:value-type="string">
              <text:p text:style-name="P24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37">A</text:p>
          </table:table-cell>
          <table:table-cell table:style-name="表格83.A2" office:value-type="string">
            <text:p text:style-name="P36">Address Record</text:p>
          </table:table-cell>
          <table:table-cell table:style-name="表格83.A2" office:value-type="string">
            <text:p text:style-name="P32">網域名稱 → <text:span text:style-name="T82">IPv4 位址</text:span></text:p>
          </table:table-cell>
          <table:table-cell table:style-name="表格83.A2" office:value-type="string">
            <text:p text:style-name="P32">google.com → 142.250.x.x</text:p>
          </table:table-cell>
        </table:table-row>
        <table:table-row table:style-name="表格83.1">
          <table:table-cell table:style-name="表格83.A3" office:value-type="string">
            <text:p text:style-name="P37">NS</text:p>
          </table:table-cell>
          <table:table-cell table:style-name="表格83.A3" office:value-type="string">
            <text:p text:style-name="P36">Name Server</text:p>
          </table:table-cell>
          <table:table-cell table:style-name="表格83.A3" office:value-type="string">
            <text:p text:style-name="P32">指定<text:span text:style-name="T120">管理該網域的 </text:span>DNS 伺服器</text:p>
          </table:table-cell>
          <table:table-cell table:style-name="表格83.A3" office:value-type="string">
            <text:p text:style-name="P32">google.com → ns1.google.com</text:p>
          </table:table-cell>
        </table:table-row>
        <table:table-row table:style-name="表格83.1">
          <table:table-cell table:style-name="表格83.A2" office:value-type="string">
            <text:p text:style-name="P37">MX</text:p>
          </table:table-cell>
          <table:table-cell table:style-name="表格83.A2" office:value-type="string">
            <text:p text:style-name="P36">Mail Exchange</text:p>
          </table:table-cell>
          <table:table-cell table:style-name="表格83.A2" office:value-type="string">
            <text:p text:style-name="P32">指定<text:span text:style-name="T183">負責收發郵件的</text:span>伺服器</text:p>
          </table:table-cell>
          <table:table-cell table:style-name="表格83.A2" office:value-type="string">
            <text:p text:style-name="P32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37">CNAME</text:p>
          </table:table-cell>
          <table:table-cell table:style-name="表格83.A3" office:value-type="string">
            <text:p text:style-name="P36">Canonical Name</text:p>
          </table:table-cell>
          <table:table-cell table:style-name="表格83.A3" office:value-type="string">
            <text:p text:style-name="P111">設定網域別名，指向另一個網域</text:p>
          </table:table-cell>
          <table:table-cell table:style-name="表格83.A3" office:value-type="string">
            <text:p text:style-name="P32">www → google.com</text:p>
          </table:table-cell>
        </table:table-row>
      </table:table>
      <text:p text:style-name="P4">（<text:span text:style-name="T52">補充：AAAA record → 回傳 IPv6 位址，見第三篇 Dual Stack。</text:span>）</text:p>
      <text:h text:style-name="P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54"><text:span text:style-name="T4">📚 <text:s/></text:span><text:span text:style-name="T24">圖書館找書比喻</text:span></text:p>
            <text:p text:style-name="P42">你要找一本書，書名叫「google.com」：</text:p>
            <text:p text:style-name="P41">① 先翻自己的筆記本（Cache）→ 記得放哪就直接去</text:p>
            <text:p text:style-name="P41">② 問圖書館員（Local DNS）→「你知道這本書嗎？」</text:p>
            <text:p text:style-name="P41">③ 館員問館長（Root DNS）→「這本是哪個分類？」→「外文區」</text:p>
            <text:p text:style-name="P41">④ 去外文區管理員（TLD：.com）→「google 在哪個書架？」</text:p>
            <text:p text:style-name="P41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29">步驟</text:p>
          </table:table-cell>
          <table:table-cell table:style-name="表格84.A2" office:value-type="string">
            <text:p text:style-name="P29">層級</text:p>
          </table:table-cell>
          <table:table-cell table:style-name="表格84.A2" office:value-type="string">
            <text:p text:style-name="P29">說明</text:p>
          </table:table-cell>
        </table:table-row>
        <table:table-row table:style-name="表格84.1">
          <table:table-cell table:style-name="表格84.A3" office:value-type="string">
            <text:p text:style-name="P47">1</text:p>
          </table:table-cell>
          <table:table-cell table:style-name="表格84.A3" office:value-type="string">
            <text:p text:style-name="P115">本機快取（Cache）</text:p>
          </table:table-cell>
          <table:table-cell table:style-name="表格84.A3" office:value-type="string">
            <text:p text:style-name="P114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7">2</text:p>
          </table:table-cell>
          <table:table-cell table:style-name="表格84.A4" office:value-type="string">
            <text:p text:style-name="P117">Local DNS 伺服器</text:p>
          </table:table-cell>
          <table:table-cell table:style-name="表格84.A4" office:value-type="string">
            <text:p text:style-name="P47">向 <text:span text:style-name="T43">ISP（如中華電信）</text:span>或<text:span text:style-name="T43">自設 DNS（如 8.8.8.8）</text:span>查詢。</text:p>
          </table:table-cell>
        </table:table-row>
        <table:table-row table:style-name="表格84.1">
          <table:table-cell table:style-name="表格84.A3" office:value-type="string">
            <text:p text:style-name="P47">3</text:p>
          </table:table-cell>
          <table:table-cell table:style-name="表格84.A3" office:value-type="string">
            <text:p text:style-name="P118">Root DNS 伺服器</text:p>
          </table:table-cell>
          <table:table-cell table:style-name="表格84.A3" office:value-type="string">
            <text:p text:style-name="P47"><text:span text:style-name="T168">全球共 13 組根 DNS</text:span>。不知道答案，但<text:span text:style-name="T41">會指向對應的 TLD DNS</text:span>。</text:p>
          </table:table-cell>
        </table:table-row>
        <table:table-row table:style-name="表格84.1">
          <table:table-cell table:style-name="表格84.A4" office:value-type="string">
            <text:p text:style-name="P47">4</text:p>
          </table:table-cell>
          <table:table-cell table:style-name="表格84.A4" office:value-type="string">
            <text:p text:style-name="P119">TLD DNS 伺服器</text:p>
          </table:table-cell>
          <table:table-cell table:style-name="表格84.A4" office:value-type="string">
            <text:p text:style-name="P47">負責<text:span text:style-name="T203">管理頂層網域（.com、.tw）</text:span>。<text:span text:style-name="T41">回應 Authoritative DNS 的位置。</text:span><text:span text:style-name="T113">「TLD 是 Top-Level Domain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47">5</text:p>
          </table:table-cell>
          <table:table-cell table:style-name="表格84.A3" office:value-type="string">
            <text:p text:style-name="P120">Authoritative DNS</text:p>
          </table:table-cell>
          <table:table-cell table:style-name="表格84.A3" office:value-type="string">
            <text:p text:style-name="P47"><text:span text:style-name="T43">真正儲存答案的伺服器</text:span>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7">6</text:p>
          </table:table-cell>
          <table:table-cell table:style-name="表格84.A4" office:value-type="string">
            <text:p text:style-name="P47">回傳 IP 位址 ✓</text:p>
          </table:table-cell>
          <table:table-cell table:style-name="表格84.A4" office:value-type="string">
            <text:p text:style-name="P47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54"><text:span text:style-name="T4">📌 <text:s/></text:span><text:span text:style-name="T157">一句話總結</text:span></text:p>
            <text:p text:style-name="P42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9" text:outline-level="2"><text:soft-page-break/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54"><text:span text:style-name="T4">⚠️ <text:s/></text:span><text:span text:style-name="T39">最關鍵的差別</text:span></text:p>
            <text:p text:style-name="P42"><text:span text:style-name="T41">兩種方式的路徑相同</text:span>（Cache → Local → Root → TLD → Auth），<text:span text:style-name="T60">唯一差別只有一件事：「誰去問」</text:span>。</text:p>
            <text:p text:style-name="P41">→ <text:span text:style-name="T119">DNS 幫你問完 ＝ Recursive（遞迴）</text:span>；<text:span text:style-name="T83">你自己去問 ＝ Iterative（反覆）</text:span>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4">比較項目</text:p>
          </table:table-cell>
          <table:table-cell table:style-name="表格85.A2" office:value-type="string">
            <text:p text:style-name="P24">Recursive（遞迴）</text:p>
          </table:table-cell>
          <table:table-cell table:style-name="表格85.A2" office:value-type="string">
            <text:p text:style-name="P24">Iterative（反覆）</text:p>
          </table:table-cell>
        </table:table-row>
        <table:table-row table:style-name="表格85.1">
          <table:table-cell table:style-name="表格85.A3" office:value-type="string">
            <text:p text:style-name="P32">誰去問</text:p>
          </table:table-cell>
          <table:table-cell table:style-name="表格85.A3" office:value-type="string">
            <text:p text:style-name="P112">DNS 伺服器代替你問完</text:p>
          </table:table-cell>
          <table:table-cell table:style-name="表格85.A3" office:value-type="string">
            <text:p text:style-name="P113">你自己逐層查詢</text:p>
          </table:table-cell>
        </table:table-row>
        <table:table-row table:style-name="表格85.1">
          <table:table-cell table:style-name="表格85.A4" office:value-type="string">
            <text:p text:style-name="P32">問幾次</text:p>
          </table:table-cell>
          <table:table-cell table:style-name="表格85.A4" office:value-type="string">
            <text:p text:style-name="P112">你只問 1 次</text:p>
          </table:table-cell>
          <table:table-cell table:style-name="表格85.A4" office:value-type="string">
            <text:p text:style-name="P11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32">常見場合</text:p>
          </table:table-cell>
          <table:table-cell table:style-name="表格85.A3" office:value-type="string">
            <text:p text:style-name="P32">一般使用者 → Local DNS</text:p>
          </table:table-cell>
          <table:table-cell table:style-name="表格85.A3" office:value-type="string">
            <text:p text:style-name="P32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32">記憶口訣</text:p>
          </table:table-cell>
          <table:table-cell table:style-name="表格85.A4" office:value-type="string">
            <text:p text:style-name="P63">代查到底</text:p>
          </table:table-cell>
          <table:table-cell table:style-name="表格85.A4" office:value-type="string">
            <text:p text:style-name="P12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54"><text:span text:style-name="T4">🗣️ <text:s/></text:span><text:span text:style-name="T24">問路比喻</text:span></text:p>
            <text:p text:style-name="P55"><text:span text:style-name="T27">Recursive（朋友幫你問完）</text:span><text:span text:style-name="T25">：</text:span><text:span text:style-name="T18">你只問朋友（Local DNS）一次</text:span><text:span text:style-name="T9">「台北101在哪？」朋友自己跑完 Root→TLD→Auth，回你 IP，你沒動過。</text:span></text:p>
            <text:p text:style-name="P56"><text:span text:style-name="T27">Iterative（你自己跑全程）</text:span><text:span text:style-name="T25">：</text:span><text:span text:style-name="T9">你問 Root「我不知道，去問 TLD」→ 你問 TLD「去問 Auth」→ 你問 Auth 拿到 IP，全程你自己跑。</text:span></text:p>
            <text:p text:style-name="P56"><text:span text:style-name="T7">為什麼有兩種？</text:span><text:span text:style-name="T129">一般使用者採 Recursive（簡單方便）</text:span><text:span text:style-name="T9">；</text:span><text:span text:style-name="T91">DNS 伺服器之間採 Iterative</text:span><text:span text:style-name="T9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9" text:outline-level="2">四、Open Resolver 風險</text:h>
      <text:p text:style-name="P44"><text:span text:style-name="T41">Open Resolver </text:span>是<text:span text:style-name="T198">對外完全開放、任何人都可以使用的 DNS 伺服器</text:span>；因為<text:span text:style-name="T43">沒有存取限制，容易成為攻擊目標</text:span>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23">⚠️ Cache Poisoning（快取污染）</text:p>
            </table:table-cell>
            <table:table-cell table:style-name="表格86.A1" office:value-type="string">
              <text:p text:style-name="P23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32"><text:span text:style-name="T100">攻擊者偽造 DNS 回應</text:span>，<text:span text:style-name="T61">將惡意 IP 植入 DNS 快取，使用者被引導至釣魚網站</text:span>。流程：偽造回應 → DNS 存假 IP → 用戶連到釣魚網站。</text:p>
          </table:table-cell>
          <table:table-cell table:style-name="表格86.A2" office:value-type="string">
            <text:p text:style-name="P32"><text:span text:style-name="T169">攻擊者偽造受害者 IP </text:span><text:span text:style-name="T135">發送查詢</text:span>，<text:span text:style-name="T61">DNS 回傳大量資料給受害者，形成流量放大效果</text:span>。流程：小封包 → DNS 回超大資料 → 灌爆受害者。</text:p>
          </table:table-cell>
        </table:table-row>
      </table:table>
      <text:h text:style-name="P9" text:outline-level="2">五、DNSSEC — DNS 安全機制</text:h>
      <text:p text:style-name="P44">DNSSEC（DNS Security Extensions）透過<text:span text:style-name="T101">數位簽章機制</text:span>，<text:span text:style-name="T67">讓接收方能驗證 DNS 回應的真實性與完整性</text:span>，<text:span text:style-name="T41">防止資料被偽造或篡改</text:span>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23">✅ DNSSEC 可以防禦</text:p>
            </table:table-cell>
            <table:table-cell table:style-name="表格87.A1" office:value-type="string">
              <text:p text:style-name="P23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32">防止 DNS Spoofing（假回應）／防止 Cache Poisoning（快取污染）／<text:span text:style-name="T102">驗證資料完整性與來源真實性</text:span></text:p>
          </table:table-cell>
          <table:table-cell table:style-name="表格87.A2" office:value-type="string">
            <text:p text:style-name="P32">不提供加密功能（非 HTTPS）／<text:span text:style-name="T121">無法防禦 DoS / DDoS 攻擊</text:span>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54"><text:span text:style-name="T4">⚠️ <text:s/></text:span><text:span text:style-name="T157">最重要的一句話</text:span></text:p>
            <text:p text:style-name="P74"><text:span text:style-name="T65">DNSSEC</text:span> = <text:span text:style-name="T53">驗證真偽，不是加密，不防 DDoS</text:span></text:p>
          </table:table-cell>
          <table:covered-table-cell/>
        </table:table-row>
      </table:table>
      <text:h text:style-name="P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54"><text:span text:style-name="T4">🔍 <text:s/></text:span><text:span text:style-name="T24">診斷結論</text:span></text:p>
            <text:p text:style-name="P42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54"><text:span text:style-name="T4">📝 <text:s/></text:span><text:span text:style-name="T190">申論題標準答案</text:span></text:p>
            <text:p text:style-name="P55"><text:span text:style-name="T191">一、DNS 功能：</text:span><text:span text:style-name="T9">DNS 為網際網路中負責</text:span><text:span text:style-name="T127">將網域名稱轉換為 IP 位址</text:span><text:span text:style-name="T9">的分散式系統。</text:span></text:p>
            <text:p text:style-name="P56"><text:span text:style-name="T191">二、查詢流程：</text:span><text:span text:style-name="T9">由</text:span><text:span text:style-name="T22">快取</text:span><text:span text:style-name="T9">開始，依序向 </text:span><text:span text:style-name="T22">Local DNS</text:span><text:span text:style-name="T9">、</text:span><text:span text:style-name="T22">Root DNS</text:span><text:span text:style-name="T9">、</text:span><text:span text:style-name="T22">TLD DNS</text:span><text:span text:style-name="T9">、</text:span><text:span text:style-name="T22">Authoritative DN</text:span><text:span text:style-name="T9">S 查詢，最終取得 IP 位址。</text:span></text:p>
            <text:p text:style-name="P56"><text:span text:style-name="T191">三、Recursive：</text:span><text:span text:style-name="T9">由 DNS 伺服器代替用戶端完整查詢並直接回傳最終 IP，用戶端只需等待結果。</text:span></text:p>
            <text:p text:style-name="P56"><text:span text:style-name="T191">四、Iterative：</text:span><text:span text:style-name="T9">DNS 伺服器僅回應下一步查詢位置，由用戶端自行逐層向各 DNS 查詢，直到取得 IP。</text:span></text:p>
            <text:p text:style-name="P56"><text:span text:style-name="T191">五、DNSSEC：</text:span><text:span text:style-name="T9">透過</text:span><text:span text:style-name="T22">數位簽章</text:span><text:span text:style-name="T224">驗證 DNS 回應真實性</text:span><text:span text:style-name="T9">，可防 DNS Spoofing 及 Cache Poisoning，但不提供加密，也</text:span><text:span text:style-name="T130">無法防禦 DDoS</text:span><text:span text:style-name="T9">。</text:span></text:p>
          </table:table-cell>
        </table:table-row>
      </table:table>
      <text:h text:style-name="P25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54"><text:span text:style-name="T4">🗺️ <text:s/></text:span><text:span text:style-name="T24">在解決什麼問題？</text:span></text:p>
            <text:p text:style-name="P42">網路上有無數個<text:span text:style-name="T41">路由器（Router）</text:span>，它們只有一個任務：「<text:span text:style-name="T113">資料要走哪條路才能抵達目的地？</text:span>」<text:span text:style-name="T60">它們需要一套共通的對話規則，這就是路由協定</text:span>。</text:p>
          </table:table-cell>
        </table:table-row>
      </table:table>
      <text:h text:style-name="P9" text:outline-level="2">一、路由協定兩大分類：<text:span text:style-name="T65">IGP</text:span> vs <text:span text:style-name="T65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23">🏢 IGP — 內部用</text:p>
            </table:table-cell>
            <table:table-cell table:style-name="表格90.A1" office:value-type="string">
              <text:p text:style-name="P23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32"><text:span text:style-name="T43">Interior Gateway Protocol</text:span>，在<text:span text:style-name="T83">同一個組織內部使用</text:span>（公司內網、校園網路）。常見：OSPF（最主流）、RIP（較舊）。</text:p>
          </table:table-cell>
          <table:table-cell table:style-name="表格90.A2" office:value-type="string">
            <text:p text:style-name="P32"><text:span text:style-name="T43">Exterior Gateway Protocol</text:span>，<text:span text:style-name="T121">在不同組織之間使用</text:span>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54"><text:span text:style-name="T4">⚡ <text:s/></text:span><text:span text:style-name="T30">一句話記憶法</text:span></text:p>
            <text:p text:style-name="P42"><text:span text:style-name="T168">公司／校園內 → 用 IGP</text:span>（<text:span text:style-name="T113">OSPF</text:span> 或 RIP）；<text:span text:style-name="T170">公司與公司間 → 用 EGP</text:span>（<text:span text:style-name="T113">BGP</text:span>）。</text:p>
          </table:table-cell>
          <table:covered-table-cell/>
        </table:table-row>
      </table:table>
      <text:h text:style-name="P9" text:outline-level="2">二、OSPF 的核心概念</text:h>
      <text:p text:style-name="P44"><text:span text:style-name="T113">OSPF（Open Shortest Path First）</text:span>是 <text:span text:style-name="T41">IGP 裡最主流的協定</text:span>，最大特色是<text:span text:style-name="T103">把網路切成多個區域（Area）管理</text:span>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54"><text:span text:style-name="T4">📌 <text:s/></text:span><text:span text:style-name="T157">最重要的規定</text:span></text:p>
            <text:p text:style-name="P42"><text:span text:style-name="T84">所有 Area 都必須連到 Area 0（骨幹區域）</text:span>。<text:span text:style-name="T171">Area 0 就像高速公路主幹道，其他 Area 是交流道</text:span>。</text:p>
          </table:table-cell>
        </table:table-row>
      </table:table>
      <text:h text:style-name="P9" text:outline-level="2">三、OSPF 的 4 種 Router（重點！）</text:h>
      <text:p text:style-name="P44">把整個 OSPF 網路想像成一座城市：<text:span text:style-name="T41">城市裡有很多「區（Area）」像大樓</text:span>；<text:span text:style-name="T232">中間一定有「主幹道」就是 Area 0；所有大樓要互通都必須先連到 Area 0</text:span>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8">類型</text:p>
            </table:table-cell>
            <table:table-cell table:style-name="表格92.A1" office:value-type="string">
              <text:p text:style-name="P28">本質</text:p>
            </table:table-cell>
            <table:table-cell table:style-name="表格92.A1" office:value-type="string">
              <text:p text:style-name="P28">核心記憶點</text:p>
            </table:table-cell>
            <table:table-cell table:style-name="表格92.A1" office:value-type="string">
              <text:p text:style-name="P28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7">① Internal</text:p>
          </table:table-cell>
          <table:table-cell table:style-name="表格92.A2" office:value-type="string">
            <text:p text:style-name="P47">不出 Area</text:p>
          </table:table-cell>
          <table:table-cell table:style-name="表格92.A2" office:value-type="string">
            <text:p text:style-name="P47">只在同一個 Area 裡活動，對外一無所知</text:p>
          </table:table-cell>
          <table:table-cell table:style-name="表格92.A2" office:value-type="string">
            <text:p text:style-name="P47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7">② <text:span text:style-name="T233">Backbone</text:span></text:p>
          </table:table-cell>
          <table:table-cell table:style-name="表格92.A3" office:value-type="string">
            <text:p text:style-name="P121">在 Area 0</text:p>
          </table:table-cell>
          <table:table-cell table:style-name="表格92.A3" office:value-type="string">
            <text:p text:style-name="P47"><text:span text:style-name="T233">核心骨幹節點</text:span>，所有跨區流量都經過這裡</text:p>
          </table:table-cell>
          <table:table-cell table:style-name="表格92.A3" office:value-type="string">
            <text:p text:style-name="P11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7">③ <text:span text:style-name="T165">ABR</text:span></text:p>
          </table:table-cell>
          <table:table-cell table:style-name="表格92.A2" office:value-type="string">
            <text:p text:style-name="P122">跨 Area 橋樑</text:p>
          </table:table-cell>
          <table:table-cell table:style-name="表格92.A2" office:value-type="string">
            <text:p text:style-name="P122">同時連 Area 0 與其他 Area，是區域間唯一合法的橋</text:p>
          </table:table-cell>
          <table:table-cell table:style-name="表格92.A2" office:value-type="string">
            <text:p text:style-name="P123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7">④ <text:span text:style-name="T83">ASBR</text:span></text:p>
          </table:table-cell>
          <table:table-cell table:style-name="表格92.A3" office:value-type="string">
            <text:p text:style-name="P47">跨 AS 入口</text:p>
          </table:table-cell>
          <table:table-cell table:style-name="表格92.A3" office:value-type="string">
            <text:p text:style-name="P47">把外部路由（BGP/靜態）引入 OSPF，<text:span text:style-name="T113">是對外入口</text:span></text:p>
          </table:table-cell>
          <table:table-cell table:style-name="表格92.A3" office:value-type="string">
            <text:p text:style-name="P47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54"><text:span text:style-name="T4">⚠️ <text:s/></text:span><text:span text:style-name="T39">考試最愛考的三個陷阱</text:span></text:p>
            <text:p text:style-name="P55"><text:span text:style-name="T188">✗ ABR 負責連接外部網路　→　</text:span><text:span text:style-name="T9">✓ ABR 只負責 Area 之間的橋樑，對外是 ASBR 的工作。</text:span></text:p>
            <text:p text:style-name="P56"><text:span text:style-name="T188">✗ ASBR 是用來跨越不同 Area　→　</text:span><text:span text:style-name="T9">✓ ASBR 是跨越不同 AS（整個系統），不是跨 Area。</text:span></text:p>
            <text:p text:style-name="P56"><text:span text:style-name="T188">✗ 任意兩個 Area 可直接相連　→　</text:span><text:span text:style-name="T9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9" text:outline-level="2"><text:soft-page-break/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23">📦 路由（Route）</text:p>
            </table:table-cell>
            <table:table-cell table:style-name="表格93.A1" office:value-type="string">
              <text:p text:style-name="P23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32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32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54"><text:span text:style-name="T4">📦 <text:s/></text:span><text:span text:style-name="T24">生活比喻：包裹寄送</text:span></text:p>
            <text:p text:style-name="P55"><text:span text:style-name="T16">路由（Route）→ </text:span><text:span text:style-name="T9">包裹實際走的路：台北 → 東京 → 美國。</text:span></text:p>
            <text:p text:style-name="P56"><text:span text:style-name="T16">AS-PATH → </text:span><text:span text:style-name="T9">貼在包裹上的紀錄：黑貓 → 日本郵政 → USPS。</text:span></text:p>
            <text:p text:style-name="P41">路由是「實際行動」，AS-PATH 是「行動的紀錄」。</text:p>
          </table:table-cell>
          <table:covered-table-cell/>
        </table:table-row>
      </table:table>
      <text:h text:style-name="P9" text:outline-level="2">五、BGP 怎麼選最佳路徑？（九步選路）</text:h>
      <text:p text:style-name="P44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29">步驟</text:p>
            </table:table-cell>
            <table:table-cell table:style-name="表格94.A1" office:value-type="string">
              <text:p text:style-name="P29">屬性</text:p>
            </table:table-cell>
            <table:table-cell table:style-name="表格94.A1" office:value-type="string">
              <text:p text:style-name="P29">說明</text:p>
            </table:table-cell>
            <table:table-cell table:style-name="表格94.A1" office:value-type="string">
              <text:p text:style-name="P2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31">①</text:p>
          </table:table-cell>
          <table:table-cell table:style-name="表格94.A2" office:value-type="string">
            <text:p text:style-name="P47">Weight</text:p>
          </table:table-cell>
          <table:table-cell table:style-name="表格94.A2" office:value-type="string">
            <text:p text:style-name="P47">數值越高越優先</text:p>
          </table:table-cell>
          <table:table-cell table:style-name="表格94.A2" office:value-type="string">
            <text:p text:style-name="P47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31">②</text:p>
          </table:table-cell>
          <table:table-cell table:style-name="表格94.A3" office:value-type="string">
            <text:p text:style-name="P11">Local Preference</text:p>
          </table:table-cell>
          <table:table-cell table:style-name="表格94.A3" office:value-type="string">
            <text:p text:style-name="P47">數值越高越優先</text:p>
          </table:table-cell>
          <table:table-cell table:style-name="表格94.A3" office:value-type="string">
            <text:p text:style-name="P1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31">③</text:p>
          </table:table-cell>
          <table:table-cell table:style-name="表格94.A2" office:value-type="string">
            <text:p text:style-name="P47">本地產生</text:p>
          </table:table-cell>
          <table:table-cell table:style-name="表格94.A2" office:value-type="string">
            <text:p text:style-name="P47">network / aggregate 產生的路由優先</text:p>
          </table:table-cell>
          <table:table-cell table:style-name="表格94.A2" office:value-type="string">
            <text:p text:style-name="P47">自己產生的路最可靠</text:p>
          </table:table-cell>
        </table:table-row>
        <table:table-row table:style-name="表格94.1">
          <table:table-cell table:style-name="表格94.A3" office:value-type="string">
            <text:p text:style-name="P31">④</text:p>
          </table:table-cell>
          <table:table-cell table:style-name="表格94.A3" office:value-type="string">
            <text:p text:style-name="P47">AS-PATH</text:p>
          </table:table-cell>
          <table:table-cell table:style-name="表格94.A3" office:value-type="string">
            <text:p text:style-name="P47">路徑越短（經過 AS 越少）越優先</text:p>
          </table:table-cell>
          <table:table-cell table:style-name="表格94.A3" office:value-type="string">
            <text:p text:style-name="P47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31">⑤</text:p>
          </table:table-cell>
          <table:table-cell table:style-name="表格94.A2" office:value-type="string">
            <text:p text:style-name="P47">Origin</text:p>
          </table:table-cell>
          <table:table-cell table:style-name="表格94.A2" office:value-type="string">
            <text:p text:style-name="P47">IGP &gt; EGP &gt; Incomplete</text:p>
          </table:table-cell>
          <table:table-cell table:style-name="表格94.A2" office:value-type="string">
            <text:p text:style-name="P47">來源越明確越好</text:p>
          </table:table-cell>
        </table:table-row>
        <table:table-row table:style-name="表格94.1">
          <table:table-cell table:style-name="表格94.A3" office:value-type="string">
            <text:p text:style-name="P31">⑥</text:p>
          </table:table-cell>
          <table:table-cell table:style-name="表格94.A3" office:value-type="string">
            <text:p text:style-name="P47">MED</text:p>
          </table:table-cell>
          <table:table-cell table:style-name="表格94.A3" office:value-type="string">
            <text:p text:style-name="P47">數值越小越優先</text:p>
          </table:table-cell>
          <table:table-cell table:style-name="表格94.A3" office:value-type="string">
            <text:p text:style-name="P47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31">⑦</text:p>
          </table:table-cell>
          <table:table-cell table:style-name="表格94.A2" office:value-type="string">
            <text:p text:style-name="P47">eBGP vs iBGP</text:p>
          </table:table-cell>
          <table:table-cell table:style-name="表格94.A2" office:value-type="string">
            <text:p text:style-name="P47">eBGP 優先於 iBGP</text:p>
          </table:table-cell>
          <table:table-cell table:style-name="表格94.A2" office:value-type="string">
            <text:p text:style-name="P47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31">⑧</text:p>
          </table:table-cell>
          <table:table-cell table:style-name="表格94.A3" office:value-type="string">
            <text:p text:style-name="P47">IGP cost</text:p>
          </table:table-cell>
          <table:table-cell table:style-name="表格94.A3" office:value-type="string">
            <text:p text:style-name="P47">到 next-hop 距離越小越優先</text:p>
          </table:table-cell>
          <table:table-cell table:style-name="表格94.A3" office:value-type="string">
            <text:p text:style-name="P47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31">⑨</text:p>
          </table:table-cell>
          <table:table-cell table:style-name="表格94.A2" office:value-type="string">
            <text:p text:style-name="P47">Router ID</text:p>
          </table:table-cell>
          <table:table-cell table:style-name="表格94.A2" office:value-type="string">
            <text:p text:style-name="P47">Router ID 最小的優先</text:p>
          </table:table-cell>
          <table:table-cell table:style-name="表格94.A2" office:value-type="string">
            <text:p text:style-name="P47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54"><text:span text:style-name="T4">🧠 <text:s/></text:span><text:span text:style-name="T157">白話理解（這句最重要）</text:span></text:p>
            <text:p text:style-name="P42">BGP 心裡在想：「哪條路比較值得信任？比較符合政策？」不是「哪條最短」（那是 OSPF 在做的事）。</text:p>
            <text:p text:style-name="P56"><text:span text:style-name="T158">一句話總結 → </text:span><text:span text:style-name="T9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54"><text:span text:style-name="T4">⚡ <text:s/></text:span><text:span text:style-name="T30">考試口訣（10 秒背）</text:span></text:p>
            <text:p text:style-name="P42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55"><text:span text:style-name="T188">✗ AS-PATH 是 BGP 選路最重要的屬性　→　</text:span><text:span text:style-name="T9">✓ Local Preference 才是最重要的通用屬性（Weight 是 Cisco 私有）。</text:span></text:p>
            <text:p text:style-name="P56"><text:span text:style-name="T188">✗ AS-PATH 越短就一定會選那條　→　</text:span><text:span text:style-name="T9">✓ 只有前面的屬性（Local Pref 等）完全相同時，才會比較 AS-PATH。</text:span></text:p>
            <text:p text:style-name="P56"><text:span text:style-name="T188">✗ BGP 會自己計算最短路徑　→　</text:span><text:span text:style-name="T9">✓ BGP 不算距離，OSPF 才做最短路徑計算。</text:span></text:p>
            <text:p text:style-name="P56"><text:span text:style-name="T188">✗ iBGP 比 eBGP 優先　→　</text:span><text:span text:style-name="T9">✓ eBGP 優先於 iBGP（外部路由更可信）。</text:span></text:p>
            <text:p text:style-name="P56"><text:span text:style-name="T188">✗ MED 可以跨不同 AS 互相比較　→　</text:span><text:span text:style-name="T9">✓ MED 只能比較來自同一個 AS 的路由。</text:span></text:p>
          </table:table-cell>
        </table:table-row>
      </table:table>
      <text:h text:style-name="P9" text:outline-level="2"><text:soft-page-break/>七、BGP + NAT + 防火牆 整合流程</text:h>
      <text:p text:style-name="P44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8">步驟</text:p>
            </table:table-cell>
            <table:table-cell table:style-name="表格96.A1" office:value-type="string">
              <text:p text:style-name="P28">動作</text:p>
            </table:table-cell>
            <table:table-cell table:style-name="表格96.A1" office:value-type="string">
              <text:p text:style-name="P28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7">1 封包產生</text:p>
          </table:table-cell>
          <table:table-cell table:style-name="表格96.A2" office:value-type="string">
            <text:p text:style-name="P47">你的電腦說「我要去健保署 IP」</text:p>
          </table:table-cell>
          <table:table-cell table:style-name="表格96.A2" office:value-type="string">
            <text:p text:style-name="P47">封包準備出發</text:p>
          </table:table-cell>
        </table:table-row>
        <table:table-row table:style-name="表格96.1">
          <table:table-cell table:style-name="表格96.A3" office:value-type="string">
            <text:p text:style-name="P47">2 防火牆 Firewall</text:p>
          </table:table-cell>
          <table:table-cell table:style-name="表格96.A3" office:value-type="string">
            <text:p text:style-name="P47">看來源/目的 IP、Port，不符就擋掉</text:p>
          </table:table-cell>
          <table:table-cell table:style-name="表格96.A3" office:value-type="string">
            <text:p text:style-name="P47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7">3 NAT</text:p>
          </table:table-cell>
          <table:table-cell table:style-name="表格96.A2" office:value-type="string">
            <text:p text:style-name="P47">把私有 IP 換成公網 IP（192.168.1.10 → 203.66.x.x）</text:p>
          </table:table-cell>
          <table:table-cell table:style-name="表格96.A2" office:value-type="string">
            <text:p text:style-name="P47">NAT 解決「你是誰」</text:p>
          </table:table-cell>
        </table:table-row>
        <table:table-row table:style-name="表格96.1">
          <table:table-cell table:style-name="表格96.A3" office:value-type="string">
            <text:p text:style-name="P47">4 BGP 選路</text:p>
          </table:table-cell>
          <table:table-cell table:style-name="表格96.A3" office:value-type="string">
            <text:p text:style-name="P47">比條件：若相同選 AS-PATH 較短路1；若中華電信 Local Pref 較高則不管長短走路1</text:p>
          </table:table-cell>
          <table:table-cell table:style-name="表格96.A3" office:value-type="string">
            <text:p text:style-name="P47">BGP 決定「怎麼走」</text:p>
          </table:table-cell>
        </table:table-row>
        <table:table-row table:style-name="表格96.1">
          <table:table-cell table:style-name="表格96.A2" office:value-type="string">
            <text:p text:style-name="P47">5 出 ISP 跨 AS</text:p>
          </table:table-cell>
          <table:table-cell table:style-name="表格96.A2" office:value-type="string">
            <text:p text:style-name="P47">封包經過多個 AS（這就是 AS-PATH 的來源）</text:p>
          </table:table-cell>
          <table:table-cell table:style-name="表格96.A2" office:value-type="string">
            <text:p text:style-name="P47">—</text:p>
          </table:table-cell>
        </table:table-row>
        <table:table-row table:style-name="表格96.1">
          <table:table-cell table:style-name="表格96.A3" office:value-type="string">
            <text:p text:style-name="P47">6 到達健保署</text:p>
          </table:table-cell>
          <table:table-cell table:style-name="表格96.A3" office:value-type="string">
            <text:p text:style-name="P47">健保署收到請求，完成連線</text:p>
          </table:table-cell>
          <table:table-cell table:style-name="表格96.A3" office:value-type="string">
            <text:p text:style-name="P47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54"><text:span text:style-name="T4">🎯 <text:s/></text:span><text:span text:style-name="T157">三層分工，一句話各自記</text:span></text:p>
            <text:p text:style-name="P55"><text:span text:style-name="T158">防火牆 → </text:span><text:span text:style-name="T9">決定「能不能走」｜</text:span><text:span text:style-name="T158">NAT → </text:span><text:span text:style-name="T9">解決「你是誰」｜</text:span><text:span text:style-name="T158">BGP → </text:span><text:span text:style-name="T9">決定「要怎麼走」</text:span></text:p>
            <text:p text:style-name="P41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54"><text:span text:style-name="T4">⚠️ <text:s/></text:span><text:span text:style-name="T39">整合情境的考試陷阱</text:span></text:p>
            <text:p text:style-name="P55"><text:span text:style-name="T188">✗ 封包送不出去 → 一定是 BGP 問題　→　</text:span><text:span text:style-name="T9">✓ 應依序排查：防火牆有沒有擋？NAT 有沒有設？BGP 有沒有路？</text:span></text:p>
            <text:p text:style-name="P56"><text:span text:style-name="T188">✗ 有路但連不到 → 是 BGP 路由問題　→　</text:span><text:span text:style-name="T9">✓ 通常是防火牆或 NAT 問題，不是 BGP。</text:span></text:p>
            <text:p text:style-name="P56"><text:span text:style-name="T188">✗ 走到錯誤的 ISP → 是 NAT 設定問題　→　</text:span><text:span text:style-name="T9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25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54"><text:span text:style-name="T4">🌐 <text:s/></text:span><text:span text:style-name="T24">本篇重點</text:span></text:p>
            <text:p text:style-name="P42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9" text:outline-level="2">一、SDN（軟體定義網路）</text:h>
      <text:p text:style-name="P44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54"><text:span text:style-name="T4">🟦 <text:s/></text:span><text:span text:style-name="T157">核心概念（考試最常考）</text:span></text:p>
            <text:p text:style-name="P55"><text:span text:style-name="T158">控制平面（Control Plane）：</text:span><text:span text:style-name="T9">決定資料「怎麼走」——負責路由決策的大腦。</text:span></text:p>
            <text:p text:style-name="P56"><text:span text:style-name="T158">資料平面（Data Plane）：</text:span><text:span text:style-name="T9">負責資料「實際傳送」——執行指令的手腳。</text:span></text:p>
            <text:p text:style-name="P56"><text:span text:style-name="T158">🔑 關鍵：</text:span><text:span text:style-name="T9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8">三層架構</text:p>
          </table:table-cell>
          <table:table-cell table:style-name="表格98.A2" office:value-type="string">
            <text:p text:style-name="P28">說明</text:p>
          </table:table-cell>
          <table:table-cell table:style-name="表格98.A2" office:value-type="string">
            <text:p text:style-name="P28">白話</text:p>
          </table:table-cell>
        </table:table-row>
        <table:table-row table:style-name="表格98.1">
          <table:table-cell table:style-name="表格98.A3" office:value-type="string">
            <text:p text:style-name="P47">🟦 Application Layer 應用層</text:p>
          </table:table-cell>
          <table:table-cell table:style-name="表格98.A3" office:value-type="string">
            <text:p text:style-name="P47">使用者所使用的服務，如網頁、API、App</text:p>
          </table:table-cell>
          <table:table-cell table:style-name="表格98.A3" office:value-type="string">
            <text:p text:style-name="P47">你真正在用的東西</text:p>
          </table:table-cell>
        </table:table-row>
        <table:table-row table:style-name="表格98.1">
          <table:table-cell table:style-name="表格98.A4" office:value-type="string">
            <text:p text:style-name="P47">🟨 Control Layer 控制層</text:p>
          </table:table-cell>
          <table:table-cell table:style-name="表格98.A4" office:value-type="string">
            <text:p text:style-name="P47">SDN Controller（大腦），決定資料流向、集中管理</text:p>
          </table:table-cell>
          <table:table-cell table:style-name="表格98.A4" office:value-type="string">
            <text:p text:style-name="P47">交通指揮中心</text:p>
          </table:table-cell>
        </table:table-row>
        <table:table-row table:style-name="表格98.1">
          <table:table-cell table:style-name="表格98.A3" office:value-type="string">
            <text:p text:style-name="P47">🟩 Infrastructure Layer 基礎層</text:p>
          </table:table-cell>
          <table:table-cell table:style-name="表格98.A3" office:value-type="string">
            <text:p text:style-name="P47">真正傳送資料的設備，如 Router、Switch</text:p>
          </table:table-cell>
          <table:table-cell table:style-name="表格98.A3" office:value-type="string">
            <text:p text:style-name="P47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54"><text:span text:style-name="T4">⚡ <text:s/></text:span><text:span text:style-name="T30">記憶口訣</text:span></text:p>
            <text:p text:style-name="P42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9" text:outline-level="2">二、Load Balancing（負載平衡）</text:h>
      <text:p text:style-name="P44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8">策略</text:p>
            </table:table-cell>
            <table:table-cell table:style-name="表格99.A1" office:value-type="string">
              <text:p text:style-name="P28">說明</text:p>
            </table:table-cell>
            <table:table-cell table:style-name="表格99.A1" office:value-type="string">
              <text:p text:style-name="P28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7">① Round Robin（輪詢）</text:p>
          </table:table-cell>
          <table:table-cell table:style-name="表格99.A2" office:value-type="string">
            <text:p text:style-name="P47">依序輪流分配，不考慮伺服器效能或負載</text:p>
          </table:table-cell>
          <table:table-cell table:style-name="表格99.A2" office:value-type="string">
            <text:p text:style-name="P47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7">② Weighted Round Robin（加權輪詢）</text:p>
          </table:table-cell>
          <table:table-cell table:style-name="表格99.A3" office:value-type="string">
            <text:p text:style-name="P47">依各伺服器處理能力設「權重」，能力強分到更多</text:p>
          </table:table-cell>
          <table:table-cell table:style-name="表格99.A3" office:value-type="string">
            <text:p text:style-name="P47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7">③ Session Stickiness（會話黏著）</text:p>
          </table:table-cell>
          <table:table-cell table:style-name="表格99.A2" office:value-type="string">
            <text:p text:style-name="P47">同一使用者所有請求固定導向同一台，維持連線狀態</text:p>
          </table:table-cell>
          <table:table-cell table:style-name="表格99.A2" office:value-type="string">
            <text:p text:style-name="P47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54"><text:span text:style-name="T4">⚡ <text:s/></text:span><text:span text:style-name="T30">記憶口訣</text:span></text:p>
            <text:p text:style-name="P42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9" text:outline-level="2"><text:soft-page-break/>三、CDN（內容傳遞網路）</text:h>
      <text:p text:style-name="P44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54"><text:span text:style-name="T4">🌍 <text:s/></text:span><text:span text:style-name="T24">CDN 完整流程（一定要記）</text:span></text:p>
            <text:p text:style-name="P42">Step 1 使用者輸入網址（www.example.com）</text:p>
            <text:p text:style-name="P41">Step 2 DNS 解析網址，找到對應 CDN 的 CNAME 記錄</text:p>
            <text:p text:style-name="P41">Step 3 CNAME 將請求轉向 CDN 服務商（如 cdn.example.net）</text:p>
            <text:p text:style-name="P41">Step 4 CDN 根據使用者地理位置，選擇最近的 Edge 伺服器</text:p>
            <text:p text:style-name="P41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4">關鍵名詞</text:p>
          </table:table-cell>
          <table:table-cell table:style-name="表格100.A2" office:value-type="string">
            <text:p text:style-name="P24">說明</text:p>
          </table:table-cell>
        </table:table-row>
        <table:table-row table:style-name="表格100.1">
          <table:table-cell table:style-name="表格100.A3" office:value-type="string">
            <text:p text:style-name="P32">CNAME（別名記錄）</text:p>
          </table:table-cell>
          <table:table-cell table:style-name="表格100.A3" office:value-type="string">
            <text:p text:style-name="P32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32">Edge Server（邊緣伺服器）</text:p>
          </table:table-cell>
          <table:table-cell table:style-name="表格100.A4" office:value-type="string">
            <text:p text:style-name="P32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54"><text:span text:style-name="T4">⚡ <text:s/></text:span><text:span text:style-name="T30">記憶口訣</text:span></text:p>
            <text:p text:style-name="P42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8">四大核心特性</text:p>
            </table:table-cell>
            <table:table-cell table:style-name="表格101.A1" office:value-type="string">
              <text:p text:style-name="P28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7">① 高速傳輸（eMBB）</text:p>
          </table:table-cell>
          <table:table-cell table:style-name="表格101.A2" office:value-type="string">
            <text:p text:style-name="P47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7">② 超低延遲（URLLC）</text:p>
          </table:table-cell>
          <table:table-cell table:style-name="表格101.A3" office:value-type="string">
            <text:p text:style-name="P47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7">③ 大量連線（mMTC）</text:p>
          </table:table-cell>
          <table:table-cell table:style-name="表格101.A2" office:value-type="string">
            <text:p text:style-name="P47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7">④ 網路切片（Network Slicing）</text:p>
          </table:table-cell>
          <table:table-cell table:style-name="表格101.A3" office:value-type="string">
            <text:p text:style-name="P47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54"><text:span text:style-name="T4">⚡ <text:s/></text:span><text:span text:style-name="T30">記憶口訣</text:span></text:p>
            <text:p text:style-name="P42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8">常見錯誤</text:p>
            </table:table-cell>
            <table:table-cell table:style-name="表格102.A1" office:value-type="string">
              <text:p text:style-name="P28">正確觀念</text:p>
            </table:table-cell>
            <table:table-cell table:style-name="表格102.A1" office:value-type="string">
              <text:p text:style-name="P28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7">SDN 是把控制與資料整合</text:p>
          </table:table-cell>
          <table:table-cell table:style-name="表格102.A2" office:value-type="string">
            <text:p text:style-name="P47">SDN = 控制與資料「分離」</text:p>
          </table:table-cell>
          <table:table-cell table:style-name="表格102.A2" office:value-type="string">
            <text:p text:style-name="P47">SDN</text:p>
          </table:table-cell>
        </table:table-row>
        <table:table-row table:style-name="表格102.1">
          <table:table-cell table:style-name="表格102.A3" office:value-type="string">
            <text:p text:style-name="P47">Round Robin 會考慮伺服器效能</text:p>
          </table:table-cell>
          <table:table-cell table:style-name="表格102.A3" office:value-type="string">
            <text:p text:style-name="P47">RR 不看效能，Weighted RR 才看</text:p>
          </table:table-cell>
          <table:table-cell table:style-name="表格102.A3" office:value-type="string">
            <text:p text:style-name="P47">LB</text:p>
          </table:table-cell>
        </table:table-row>
        <table:table-row table:style-name="表格102.1">
          <table:table-cell table:style-name="表格102.A2" office:value-type="string">
            <text:p text:style-name="P47">Stickiness 是平均分配流量</text:p>
          </table:table-cell>
          <table:table-cell table:style-name="表格102.A2" office:value-type="string">
            <text:p text:style-name="P47">Stickiness = 固定同一台 Server</text:p>
          </table:table-cell>
          <table:table-cell table:style-name="表格102.A2" office:value-type="string">
            <text:p text:style-name="P47">LB</text:p>
          </table:table-cell>
        </table:table-row>
        <table:table-row table:style-name="表格102.1">
          <table:table-cell table:style-name="表格102.A3" office:value-type="string">
            <text:p text:style-name="P47">CDN 是把資料放在中心機房</text:p>
          </table:table-cell>
          <table:table-cell table:style-name="表格102.A3" office:value-type="string">
            <text:p text:style-name="P47">CDN 放在靠近使用者的 Edge 節點</text:p>
          </table:table-cell>
          <table:table-cell table:style-name="表格102.A3" office:value-type="string">
            <text:p text:style-name="P47">CDN</text:p>
          </table:table-cell>
        </table:table-row>
        <table:table-row table:style-name="表格102.1">
          <table:table-cell table:style-name="表格102.A2" office:value-type="string">
            <text:p text:style-name="P47">CNAME 是 IP 位址的對應</text:p>
          </table:table-cell>
          <table:table-cell table:style-name="表格102.A2" office:value-type="string">
            <text:p text:style-name="P47">CNAME = 網址 → 網址（非 IP）</text:p>
          </table:table-cell>
          <table:table-cell table:style-name="表格102.A2" office:value-type="string">
            <text:p text:style-name="P47">CDN</text:p>
          </table:table-cell>
        </table:table-row>
        <table:table-row table:style-name="表格102.1">
          <table:table-cell table:style-name="表格102.A3" office:value-type="string">
            <text:p text:style-name="P47">WiFi 使用 CSMA/CD</text:p>
          </table:table-cell>
          <table:table-cell table:style-name="表格102.A3" office:value-type="string">
            <text:p text:style-name="P47">WiFi 用 CSMA/CA（CD 是有線網路）</text:p>
          </table:table-cell>
          <table:table-cell table:style-name="表格102.A3" office:value-type="string">
            <text:p text:style-name="P47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7">5G 只是速度變快</text:p>
          </table:table-cell>
          <table:table-cell table:style-name="表格102.A2" office:value-type="string">
            <text:p text:style-name="P47">5G 還有低延遲、大量連線、網路切片</text:p>
          </table:table-cell>
          <table:table-cell table:style-name="表格102.A2" office:value-type="string">
            <text:p text:style-name="P47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54"><text:span text:style-name="T4">🔗 <text:s/></text:span><text:span text:style-name="T24">使用情境串連（理解記憶）</text:span></text:p>
            <text:p text:style-name="P42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25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54"><text:span text:style-name="T4">💡 <text:s/></text:span><text:span text:style-name="T24">核心問題：大家同時說話會怎樣？</text:span></text:p>
            <text:p text:style-name="P42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9" text:outline-level="2">一、WiFi：先聽再講（CSMA/CA）</text:h>
      <text:p text:style-name="P44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4">CSMA/CA 拆解</text:p>
            </table:table-cell>
            <table:table-cell table:style-name="表格104.A1" office:value-type="string">
              <text:p text:style-name="P24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2">Carrier Sense 載波感測</text:p>
          </table:table-cell>
          <table:table-cell table:style-name="表格104.A2" office:value-type="string">
            <text:p text:style-name="P32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2">Multiple Access 多重存取</text:p>
          </table:table-cell>
          <table:table-cell table:style-name="表格104.A3" office:value-type="string">
            <text:p text:style-name="P32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2">Collision Avoidance 碰撞避免</text:p>
          </table:table-cell>
          <table:table-cell table:style-name="表格104.A2" office:value-type="string">
            <text:p text:style-name="P32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54"><text:span text:style-name="T4">📶 <text:s/></text:span><text:span text:style-name="T28">WiFi 高速基礎</text:span></text:p>
            <text:p text:style-name="P42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54"><text:span text:style-name="T4">🚑 <text:s/></text:span><text:span text:style-name="T30">WiFi 的 QoS：EDCA</text:span></text:p>
            <text:p text:style-name="P42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41">記憶口訣：WiFi = 急診室排隊制度（心臟病/語音視訊優先，小感冒/網頁下載等一下）。</text:p>
          </table:table-cell>
          <table:covered-table-cell/>
        </table:table-row>
      </table:table>
      <text:h text:style-name="P9" text:outline-level="2">二、Bluetooth：老大排班（Master-Slave）</text:h>
      <text:p text:style-name="P44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54"><text:span text:style-name="T4">🔵 <text:s/></text:span><text:span text:style-name="T28">為什麼要排班？</text:span></text:p>
            <text:p text:style-name="P42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41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4">即時語音</text:p>
          </table:table-cell>
          <table:table-cell table:style-name="表格105.A2" office:value-type="string">
            <text:p text:style-name="P24">全名</text:p>
          </table:table-cell>
          <table:table-cell table:style-name="表格105.A2" office:value-type="string">
            <text:p text:style-name="P24">說明</text:p>
          </table:table-cell>
          <table:table-cell table:style-name="表格105.A2" office:value-type="string">
            <text:p text:style-name="P24">用途</text:p>
          </table:table-cell>
        </table:table-row>
        <table:table-row table:style-name="表格105.1">
          <table:table-cell table:style-name="表格105.A3" office:value-type="string">
            <text:p text:style-name="P32">SCO</text:p>
          </table:table-cell>
          <table:table-cell table:style-name="表格105.A3" office:value-type="string">
            <text:p text:style-name="P32">Synchronous Connection-Oriented</text:p>
          </table:table-cell>
          <table:table-cell table:style-name="表格105.A3" office:value-type="string">
            <text:p text:style-name="P32">固定時槽、同步傳輸</text:p>
          </table:table-cell>
          <table:table-cell table:style-name="表格105.A3" office:value-type="string">
            <text:p text:style-name="P32">藍牙耳機通話</text:p>
          </table:table-cell>
        </table:table-row>
        <table:table-row table:style-name="表格105.1">
          <table:table-cell table:style-name="表格105.A4" office:value-type="string">
            <text:p text:style-name="P32">eSCO</text:p>
          </table:table-cell>
          <table:table-cell table:style-name="表格105.A4" office:value-type="string">
            <text:p text:style-name="P32">Enhanced SCO</text:p>
          </table:table-cell>
          <table:table-cell table:style-name="表格105.A4" office:value-type="string">
            <text:p text:style-name="P32">SCO 加強版、可重傳、品質更好</text:p>
          </table:table-cell>
          <table:table-cell table:style-name="表格105.A4" office:value-type="string">
            <text:p text:style-name="P32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54"><text:span text:style-name="T4">🔀 <text:s/></text:span><text:span text:style-name="T28">Bluetooth 抗干擾</text:span></text:p>
            <text:p text:style-name="P42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97" text:outline-level="2"><text:soft-page-break/><text:span text:style-name="T8">三、深入理解：時槽（Time Slot）</text:span></text:h>
      <text:p text:style-name="P44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8">三大好處</text:p>
            </table:table-cell>
            <table:table-cell table:style-name="表格106.A1" table:number-columns-spanned="2" office:value-type="string">
              <text:p text:style-name="P28">說明</text:p>
            </table:table-cell>
            <table:covered-table-cell/>
            <table:table-cell table:style-name="表格106.A1" office:value-type="string">
              <text:p text:style-name="P28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7">穩定不碰撞</text:p>
          </table:table-cell>
          <table:table-cell table:style-name="表格106.A2" table:number-columns-spanned="2" office:value-type="string">
            <text:p text:style-name="P47">每人有專屬時間，不會互相干擾</text:p>
          </table:table-cell>
          <table:covered-table-cell/>
          <table:table-cell table:style-name="表格106.A2" office:value-type="string">
            <text:p text:style-name="P47">公司會議室預約制</text:p>
          </table:table-cell>
        </table:table-row>
        <table:table-row table:style-name="表格106.1">
          <table:table-cell table:style-name="表格106.A3" office:value-type="string">
            <text:p text:style-name="P47">即時性保證</text:p>
          </table:table-cell>
          <table:table-cell table:style-name="表格106.A3" table:number-columns-spanned="2" office:value-type="string">
            <text:p text:style-name="P47">耳機每隔固定時間必定輪到，聲音不卡頓</text:p>
          </table:table-cell>
          <table:covered-table-cell/>
          <table:table-cell table:style-name="表格106.A3" office:value-type="string">
            <text:p text:style-name="P47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7">省電效果</text:p>
          </table:table-cell>
          <table:table-cell table:style-name="表格106.A2" table:number-columns-spanned="2" office:value-type="string">
            <text:p text:style-name="P47">裝置知道「還沒輪到我」，可先休眠等待</text:p>
          </table:table-cell>
          <table:covered-table-cell/>
          <table:table-cell table:style-name="表格106.A2" office:value-type="string">
            <text:p text:style-name="P47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23">WiFi 競爭制</text:p>
          </table:table-cell>
          <table:covered-table-cell/>
          <table:table-cell table:style-name="表格106.A1" table:number-columns-spanned="2" office:value-type="string">
            <text:p text:style-name="P23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32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32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54"><text:span text:style-name="T4">🕐 <text:s/></text:span><text:span text:style-name="T157">考試定義（背起來）</text:span></text:p>
            <text:p text:style-name="P42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4">項目</text:p>
            </table:table-cell>
            <table:table-cell table:style-name="表格107.A1" office:value-type="string">
              <text:p text:style-name="P24">WiFi</text:p>
            </table:table-cell>
            <table:table-cell table:style-name="表格107.A1" office:value-type="string">
              <text:p text:style-name="P24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32">核心機制</text:p>
          </table:table-cell>
          <table:table-cell table:style-name="表格107.A2" office:value-type="string">
            <text:p text:style-name="P32">CSMA/CA（先偵聽再傳）</text:p>
          </table:table-cell>
          <table:table-cell table:style-name="表格107.A2" office:value-type="string">
            <text:p text:style-name="P32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32">即時語音 / QoS</text:p>
          </table:table-cell>
          <table:table-cell table:style-name="表格107.A3" office:value-type="string">
            <text:p text:style-name="P32">EDCA（QoS 優先）</text:p>
          </table:table-cell>
          <table:table-cell table:style-name="表格107.A3" office:value-type="string">
            <text:p text:style-name="P32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32">速度</text:p>
          </table:table-cell>
          <table:table-cell table:style-name="表格107.A2" office:value-type="string">
            <text:p text:style-name="P32">高速（快）</text:p>
          </table:table-cell>
          <table:table-cell table:style-name="表格107.A2" office:value-type="string">
            <text:p text:style-name="P32">較慢</text:p>
          </table:table-cell>
        </table:table-row>
        <table:table-row table:style-name="表格107.1">
          <table:table-cell table:style-name="表格107.A3" office:value-type="string">
            <text:p text:style-name="P32">耗電量</text:p>
          </table:table-cell>
          <table:table-cell table:style-name="表格107.A3" office:value-type="string">
            <text:p text:style-name="P32">較高</text:p>
          </table:table-cell>
          <table:table-cell table:style-name="表格107.A3" office:value-type="string">
            <text:p text:style-name="P32">低功耗</text:p>
          </table:table-cell>
        </table:table-row>
        <table:table-row table:style-name="表格107.1">
          <table:table-cell table:style-name="表格107.A2" office:value-type="string">
            <text:p text:style-name="P32">傳輸距離</text:p>
          </table:table-cell>
          <table:table-cell table:style-name="表格107.A2" office:value-type="string">
            <text:p text:style-name="P32">較遠（數十~百公尺）</text:p>
          </table:table-cell>
          <table:table-cell table:style-name="表格107.A2" office:value-type="string">
            <text:p text:style-name="P32">較短（約 10 公尺）</text:p>
          </table:table-cell>
        </table:table-row>
        <table:table-row table:style-name="表格107.1">
          <table:table-cell table:style-name="表格107.A3" office:value-type="string">
            <text:p text:style-name="P32">穩定性</text:p>
          </table:table-cell>
          <table:table-cell table:style-name="表格107.A3" office:value-type="string">
            <text:p text:style-name="P32">受干擾影響較大</text:p>
          </table:table-cell>
          <table:table-cell table:style-name="表格107.A3" office:value-type="string">
            <text:p text:style-name="P32">固定時槽非常穩定</text:p>
          </table:table-cell>
        </table:table-row>
        <table:table-row table:style-name="表格107.1">
          <table:table-cell table:style-name="表格107.A2" office:value-type="string">
            <text:p text:style-name="P32">適用場景</text:p>
          </table:table-cell>
          <table:table-cell table:style-name="表格107.A2" office:value-type="string">
            <text:p text:style-name="P32">上網、看影片、大檔下載</text:p>
          </table:table-cell>
          <table:table-cell table:style-name="表格107.A2" office:value-type="string">
            <text:p text:style-name="P32">耳機、滑鼠、鍵盤、通話</text:p>
          </table:table-cell>
        </table:table-row>
      </table:table>
      <text:h text:style-name="P9" text:outline-level="2">五、L2CAP：藍牙的資料管理員</text:h>
      <text:p text:style-name="P44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8">三種邏輯通道</text:p>
            </table:table-cell>
            <table:table-cell table:style-name="表格108.A1" table:number-columns-spanned="2" office:value-type="string">
              <text:p text:style-name="P28">特性</text:p>
            </table:table-cell>
            <table:covered-table-cell/>
            <table:table-cell table:style-name="表格108.A1" office:value-type="string">
              <text:p text:style-name="P28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7">Connection-oriented（連線導向）</text:p>
          </table:table-cell>
          <table:table-cell table:style-name="表格108.A2" table:number-columns-spanned="2" office:value-type="string">
            <text:p text:style-name="P47">有建立連線、雙方確認，可靠、確保收到</text:p>
          </table:table-cell>
          <table:covered-table-cell/>
          <table:table-cell table:style-name="表格108.A2" office:value-type="string">
            <text:p text:style-name="P47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7">Connectionless（非連線）</text:p>
          </table:table-cell>
          <table:table-cell table:style-name="表格108.A3" table:number-columns-spanned="2" office:value-type="string">
            <text:p text:style-name="P47">直接送出、不確認，快速但可能遺失</text:p>
          </table:table-cell>
          <table:covered-table-cell/>
          <table:table-cell table:style-name="表格108.A3" office:value-type="string">
            <text:p text:style-name="P47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7">Signaling Channel（信令通道）</text:p>
          </table:table-cell>
          <table:table-cell table:style-name="表格108.A2" table:number-columns-spanned="2" office:value-type="string">
            <text:p text:style-name="P47">控制管理用，不傳資料只管控制</text:p>
          </table:table-cell>
          <table:covered-table-cell/>
          <table:table-cell table:style-name="表格108.A2" office:value-type="string">
            <text:p text:style-name="P47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4">OSI 層</text:p>
          </table:table-cell>
          <table:covered-table-cell/>
          <table:table-cell table:style-name="表格108.A1" table:number-columns-spanned="2" office:value-type="string">
            <text:p text:style-name="P24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32">應用層 Application</text:p>
          </table:table-cell>
          <table:covered-table-cell/>
          <table:table-cell table:style-name="表格108.A2" table:number-columns-spanned="2" office:value-type="string">
            <text:p text:style-name="P32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32">傳輸層 Transport</text:p>
          </table:table-cell>
          <table:covered-table-cell/>
          <table:table-cell table:style-name="表格108.A3" table:number-columns-spanned="2" office:value-type="string">
            <text:p text:style-name="P32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32">網路層 Network</text:p>
          </table:table-cell>
          <table:covered-table-cell/>
          <table:table-cell table:style-name="表格108.A2" table:number-columns-spanned="2" office:value-type="string">
            <text:p text:style-name="P32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32">資料鏈結層 Data Link</text:p>
          </table:table-cell>
          <table:covered-table-cell/>
          <table:table-cell table:style-name="表格108.A3" table:number-columns-spanned="2" office:value-type="string">
            <text:p text:style-name="P32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32">實體層 Physical</text:p>
          </table:table-cell>
          <table:covered-table-cell/>
          <table:table-cell table:style-name="表格108.A2" table:number-columns-spanned="2" office:value-type="string">
            <text:p text:style-name="P32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54"><text:span text:style-name="T4">📐 <text:s/></text:span><text:span text:style-name="T39">重要</text:span></text:p>
            <text:p text:style-name="P42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55"><text:span text:style-name="T16">WiFi 用什麼避免碰撞？　</text:span><text:span text:style-name="T9">✗ CSMA/CD（有線乙太網路機制）→ ✓ CSMA/CA（WiFi 用「避免」碰撞，不是「偵測」）。口訣：有線 Ethernet = CD（Detect），無線 WiFi = CA（Avoid）。</text:span></text:p>
            <text:p text:style-name="P56"><text:span text:style-name="T16">Bluetooth 是競爭制還是排程制？　</text:span><text:span text:style-name="T9">✓ 排程制（Master-Slave，老大安排時槽），不是競爭制。</text:span></text:p>
            <text:p text:style-name="P56"><text:span text:style-name="T16">藍牙即時語音用什麼？　</text:span><text:span text:style-name="T9">✓ SCO（同步連線）或 eSCO（加強版，可重傳）。</text:span></text:p>
            <text:p text:style-name="P56"><text:span text:style-name="T16">L2CAP 控制管理用哪個通道？　</text:span><text:span text:style-name="T9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54"><text:span text:style-name="T4">⏱ <text:s/></text:span><text:span text:style-name="T157">考前 30 秒濃縮</text:span></text:p>
            <text:p text:style-name="P42">WiFi＝搶頻道 · BT＝排班 · 時槽＝時間格子 · SCO＝語音 · L2CAP＝三通道（位於 Data Link 層）。</text:p>
          </table:table-cell>
        </table:table-row>
      </table:table>
      <text:h text:style-name="P25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54"><text:span text:style-name="T4">🛡️ <text:s/></text:span><text:span text:style-name="T24">本篇地圖</text:span></text:p>
            <text:p text:style-name="P42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9" text:outline-level="2">壹、資安與網路設備：FW · WAF · NGFW · DMZ · IOC · Proxy</text:h>
      <text:p text:style-name="P44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4">名詞</text:p>
            </table:table-cell>
            <table:table-cell table:style-name="表格111.A1" office:value-type="string">
              <text:p text:style-name="P24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32">FW</text:p>
          </table:table-cell>
          <table:table-cell table:style-name="表格111.A2" office:value-type="string">
            <text:p text:style-name="P32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32">WAF</text:p>
          </table:table-cell>
          <table:table-cell table:style-name="表格111.A3" office:value-type="string">
            <text:p text:style-name="P32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32">NGFW</text:p>
          </table:table-cell>
          <table:table-cell table:style-name="表格111.A2" office:value-type="string">
            <text:p text:style-name="P32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32">DMZ</text:p>
          </table:table-cell>
          <table:table-cell table:style-name="表格111.A3" office:value-type="string">
            <text:p text:style-name="P32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32">IOC</text:p>
          </table:table-cell>
          <table:table-cell table:style-name="表格111.A2" office:value-type="string">
            <text:p text:style-name="P32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32">Proxy</text:p>
          </table:table-cell>
          <table:table-cell table:style-name="表格111.A3" office:value-type="string">
            <text:p text:style-name="P32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32">Reverse Proxy</text:p>
          </table:table-cell>
          <table:table-cell table:style-name="表格111.A2" office:value-type="string">
            <text:p text:style-name="P32">反向代理，幫「伺服器（Server）」負載平衡、隱藏主機</text:p>
          </table:table-cell>
        </table:table-row>
      </table:table>
      <text:h text:style-name="P61" text:outline-level="3"><text:span text:style-name="T29">▍</text:span><text:span text:style-name="T30"> 防火牆 Firewall（FW）</text:span></text:h>
      <text:p text:style-name="P44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54"><text:span text:style-name="T4">⚠️ <text:s/></text:span><text:span text:style-name="T39">缺點</text:span></text:p>
            <text:p text:style-name="P42">FW 只看外面，不看封包裡面的內容，無法防止應用層攻擊（如 SQL Injection）。</text:p>
          </table:table-cell>
        </table:table-row>
      </table:table>
      <text:h text:style-name="P61" text:outline-level="3"><text:span text:style-name="T29">▍</text:span><text:span text:style-name="T30"> 網站應用防火牆 WAF</text:span></text:h>
      <text:p text:style-name="P44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4">比較項目</text:p>
            </table:table-cell>
            <table:table-cell table:style-name="表格113.A1" office:value-type="string">
              <text:p text:style-name="P24">FW</text:p>
            </table:table-cell>
            <table:table-cell table:style-name="表格113.A1" office:value-type="string">
              <text:p text:style-name="P24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32">檢查範圍</text:p>
          </table:table-cell>
          <table:table-cell table:style-name="表格113.A2" office:value-type="string">
            <text:p text:style-name="P32">封包外面（IP/Port）</text:p>
          </table:table-cell>
          <table:table-cell table:style-name="表格113.A2" office:value-type="string">
            <text:p text:style-name="P32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32">OSI 分層</text:p>
          </table:table-cell>
          <table:table-cell table:style-name="表格113.A3" office:value-type="string">
            <text:p text:style-name="P32">L3 / L4</text:p>
          </table:table-cell>
          <table:table-cell table:style-name="表格113.A3" office:value-type="string">
            <text:p text:style-name="P32">L7（應用層）</text:p>
          </table:table-cell>
        </table:table-row>
        <table:table-row table:style-name="表格113.1">
          <table:table-cell table:style-name="表格113.A2" office:value-type="string">
            <text:p text:style-name="P32">防禦 SQL Injection</text:p>
          </table:table-cell>
          <table:table-cell table:style-name="表格113.A2" office:value-type="string">
            <text:p text:style-name="P32">✗ 無法</text:p>
          </table:table-cell>
          <table:table-cell table:style-name="表格113.A2" office:value-type="string">
            <text:p text:style-name="P32">○ 可以</text:p>
          </table:table-cell>
        </table:table-row>
        <table:table-row table:style-name="表格113.1">
          <table:table-cell table:style-name="表格113.A3" office:value-type="string">
            <text:p text:style-name="P32">防禦 XSS</text:p>
          </table:table-cell>
          <table:table-cell table:style-name="表格113.A3" office:value-type="string">
            <text:p text:style-name="P32">✗ 無法</text:p>
          </table:table-cell>
          <table:table-cell table:style-name="表格113.A3" office:value-type="string">
            <text:p text:style-name="P32">○ 可以</text:p>
          </table:table-cell>
        </table:table-row>
      </table:table>
      <text:h text:style-name="P61" text:outline-level="3"><text:span text:style-name="T29">▍</text:span><text:span text:style-name="T30"> 次世代防火牆 NGFW</text:span></text:h>
      <text:p text:style-name="P44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23">能力</text:p>
            </table:table-cell>
            <table:table-cell table:style-name="表格114.A1" office:value-type="string">
              <text:p text:style-name="P23">FW</text:p>
            </table:table-cell>
            <table:table-cell table:style-name="表格114.A1" office:value-type="string">
              <text:p text:style-name="P23">WAF</text:p>
            </table:table-cell>
            <table:table-cell table:style-name="表格114.A1" office:value-type="string">
              <text:p text:style-name="P23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32">IP/Port 過濾</text:p>
          </table:table-cell>
          <table:table-cell table:style-name="表格114.A2" office:value-type="string">
            <text:p text:style-name="P70">○</text:p>
          </table:table-cell>
          <table:table-cell table:style-name="表格114.A2" office:value-type="string">
            <text:p text:style-name="P70">○</text:p>
          </table:table-cell>
          <table:table-cell table:style-name="表格114.A2" office:value-type="string">
            <text:p text:style-name="P70">○</text:p>
          </table:table-cell>
        </table:table-row>
        <table:table-row table:style-name="表格114.1">
          <table:table-cell table:style-name="表格114.A3" office:value-type="string">
            <text:p text:style-name="P32">HTTP 內容檢查</text:p>
          </table:table-cell>
          <table:table-cell table:style-name="表格114.A3" office:value-type="string">
            <text:p text:style-name="P69">✗</text:p>
          </table:table-cell>
          <table:table-cell table:style-name="表格114.A3" office:value-type="string">
            <text:p text:style-name="P70">○</text:p>
          </table:table-cell>
          <table:table-cell table:style-name="表格114.A3" office:value-type="string">
            <text:p text:style-name="P70">○</text:p>
          </table:table-cell>
        </table:table-row>
        <table:table-row table:style-name="表格114.1">
          <table:table-cell table:style-name="表格114.A2" office:value-type="string">
            <text:p text:style-name="P32">DPI 深度檢查</text:p>
          </table:table-cell>
          <table:table-cell table:style-name="表格114.A2" office:value-type="string">
            <text:p text:style-name="P69">✗</text:p>
          </table:table-cell>
          <table:table-cell table:style-name="表格114.A2" office:value-type="string">
            <text:p text:style-name="P69">✗</text:p>
          </table:table-cell>
          <table:table-cell table:style-name="表格114.A2" office:value-type="string">
            <text:p text:style-name="P70">○</text:p>
          </table:table-cell>
        </table:table-row>
        <table:table-row table:style-name="表格114.1">
          <table:table-cell table:style-name="表格114.A3" office:value-type="string">
            <text:p text:style-name="P32">App 識別</text:p>
          </table:table-cell>
          <table:table-cell table:style-name="表格114.A3" office:value-type="string">
            <text:p text:style-name="P69">✗</text:p>
          </table:table-cell>
          <table:table-cell table:style-name="表格114.A3" office:value-type="string">
            <text:p text:style-name="P69">✗</text:p>
          </table:table-cell>
          <table:table-cell table:style-name="表格114.A3" office:value-type="string">
            <text:p text:style-name="P70">○</text:p>
          </table:table-cell>
        </table:table-row>
        <table:table-row table:style-name="表格114.1">
          <table:table-cell table:style-name="表格114.A2" office:value-type="string">
            <text:p text:style-name="P32">IPS 入侵防禦</text:p>
          </table:table-cell>
          <table:table-cell table:style-name="表格114.A2" office:value-type="string">
            <text:p text:style-name="P69">✗</text:p>
          </table:table-cell>
          <table:table-cell table:style-name="表格114.A2" office:value-type="string">
            <text:p text:style-name="P69">✗</text:p>
          </table:table-cell>
          <table:table-cell table:style-name="表格114.A2" office:value-type="string">
            <text:p text:style-name="P70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54"><text:span text:style-name="T4">💡 <text:s/></text:span><text:span text:style-name="T30">實務說明</text:span></text:p>
            <text:p text:style-name="P42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61" text:outline-level="3"><text:span text:style-name="T29">▍</text:span><text:span text:style-name="T30"> DMZ（非軍事區 / 隔離區）</text:span></text:h>
      <text:p text:style-name="P44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54"><text:span text:style-name="T4">⚠️ <text:s/></text:span><text:span text:style-name="T39">考試陷阱</text:span></text:p>
            <text:p text:style-name="P42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61" text:outline-level="3"><text:span text:style-name="T29">▍</text:span><text:span text:style-name="T30"> IOC（入侵指標）</text:span></text:h>
      <text:p text:style-name="P44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54"><text:span text:style-name="T4">🎯 <text:s/></text:span><text:span text:style-name="T157">核心觀念</text:span></text:p>
            <text:p text:style-name="P42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29">口訣</text:p>
          </table:table-cell>
          <table:table-cell table:style-name="表格116.A2" office:value-type="string">
            <text:p text:style-name="P29">IOC 類型</text:p>
          </table:table-cell>
          <table:table-cell table:style-name="表格116.A2" office:value-type="string">
            <text:p text:style-name="P29">白話說明</text:p>
          </table:table-cell>
          <table:table-cell table:style-name="表格116.A2" office:value-type="string">
            <text:p text:style-name="P29">對應防禦工具</text:p>
          </table:table-cell>
        </table:table-row>
        <table:table-row table:style-name="表格116.1">
          <table:table-cell table:style-name="表格116.A3" office:value-type="string">
            <text:p text:style-name="P72">網</text:p>
          </table:table-cell>
          <table:table-cell table:style-name="表格116.A3" office:value-type="string">
            <text:p text:style-name="P47">惡意 Domain（網域）</text:p>
          </table:table-cell>
          <table:table-cell table:style-name="表格116.A3" office:value-type="string">
            <text:p text:style-name="P47">釣魚網站網址，用來騙帳密、假冒正規網站</text:p>
          </table:table-cell>
          <table:table-cell table:style-name="表格116.A3" office:value-type="string">
            <text:p text:style-name="P47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72">檔</text:p>
          </table:table-cell>
          <table:table-cell table:style-name="表格116.A4" office:value-type="string">
            <text:p text:style-name="P47">惡意 Hash（雜湊值）</text:p>
          </table:table-cell>
          <table:table-cell table:style-name="表格116.A4" office:value-type="string">
            <text:p text:style-name="P47">惡意程式的唯一特徵碼，改檔名也能識別</text:p>
          </table:table-cell>
          <table:table-cell table:style-name="表格116.A4" office:value-type="string">
            <text:p text:style-name="P47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72">連</text:p>
          </table:table-cell>
          <table:table-cell table:style-name="表格116.A3" office:value-type="string">
            <text:p text:style-name="P47">惡意 IP 位址</text:p>
          </table:table-cell>
          <table:table-cell table:style-name="表格116.A3" office:value-type="string">
            <text:p text:style-name="P47">感染後電腦對外異常連線的目標</text:p>
          </table:table-cell>
          <table:table-cell table:style-name="表格116.A3" office:value-type="string">
            <text:p text:style-name="P47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72">控</text:p>
          </table:table-cell>
          <table:table-cell table:style-name="表格116.A4" office:value-type="string">
            <text:p text:style-name="P47">C2 Server（指揮控制）</text:p>
          </table:table-cell>
          <table:table-cell table:style-name="表格116.A4" office:value-type="string">
            <text:p text:style-name="P47">駭客遠端操控被感染主機的總部</text:p>
          </table:table-cell>
          <table:table-cell table:style-name="表格116.A4" office:value-type="string">
            <text:p text:style-name="P47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54"><text:span text:style-name="T4">▸ <text:s/></text:span><text:span text:style-name="T24">攻擊全流程（IOC 出現在哪裡？）</text:span></text:p>
            <text:p text:style-name="P42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54"><text:span text:style-name="T4">⚡ <text:s/></text:span><text:span text:style-name="T30">10 秒口訣速記</text:span></text:p>
            <text:p text:style-name="P42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61" text:outline-level="3"><text:soft-page-break/><text:span text:style-name="T29">▍</text:span><text:span text:style-name="T30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23">🧍 Proxy（正向代理）— 幫 Client</text:p>
            </table:table-cell>
            <table:table-cell table:style-name="表格117.A1" office:value-type="string">
              <text:p text:style-name="P23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32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32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61" text:outline-level="3"><text:span text:style-name="T29">▍</text:span><text:span text:style-name="T30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54"><text:span text:style-name="T4">🚧 <text:s/></text:span><text:span text:style-name="T24">封包闖關順序</text:span></text:p>
            <text:p text:style-name="P42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41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54"><text:span text:style-name="T4">🔑 <text:s/></text:span><text:span text:style-name="T157">萬用口訣</text:span></text:p>
            <text:p text:style-name="P42">FW 封外、WAF 看內、NGFW 最強、DMZ 隔離、IOC 壞人、Proxy 幫客、Reverse 幫服。</text:p>
          </table:table-cell>
        </table:table-row>
      </table:table>
      <text:h text:style-name="P9" text:outline-level="2">貳、SQL Injection × Zero-Day × 防禦機制</text:h>
      <text:h text:style-name="P61" text:outline-level="3"><text:span text:style-name="T29">▍</text:span><text:span text:style-name="T30"> SQL Injection（SQL 注入攻擊）</text:span></text:h>
      <text:p text:style-name="P44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54"><text:span text:style-name="T4">💉 <text:s/></text:span><text:span text:style-name="T39">什麼是 SQL Injection？</text:span></text:p>
            <text:p text:style-name="P55"><text:span text:style-name="T36">核心一句話：</text:span><text:span text:style-name="T9">把原本只是「資料」的輸入，惡意改造成可執行的「SQL 指令」。</text:span></text:p>
            <text:p text:style-name="P41">駭客在帳號欄位輸入：' OR 1=1 --，拼入後變成：…WHERE account='' OR 1=1 -- ' AND password='1234'。</text:p>
            <text:p text:style-name="P41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23">❌ 攻擊成功的原因</text:p>
          </table:table-cell>
          <table:covered-table-cell/>
          <table:table-cell table:style-name="表格119.A2" office:value-type="string">
            <text:p text:style-name="P23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32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32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54"><text:span text:style-name="T4">🛡️ <text:s/></text:span><text:span text:style-name="T190">防禦核心：Prepared Statement（預備語句）</text:span></text:p>
            <text:p text:style-name="P55"><text:span text:style-name="T191">概念：</text:span><text:span text:style-name="T9">先把 SQL 骨架「鎖死」，使用者只能填入資料，完全無法修改 SQL 結構。</text:span></text:p>
            <text:p text:style-name="P41">❌ 危險寫法（字串拼接）：sql = "SELECT * FROM users WHERE id='" + input + "'"；輸入 ' OR 1=1 -- → 結構被竄改。</text:p>
            <text:p text:style-name="P41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8">輔助防禦手段</text:p>
          </table:table-cell>
          <table:table-cell table:style-name="表格119.A2" table:number-columns-spanned="2" office:value-type="string">
            <text:p text:style-name="P28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7">Prepared Statement</text:p>
          </table:table-cell>
          <table:table-cell table:style-name="表格119.A3" table:number-columns-spanned="2" office:value-type="string">
            <text:p text:style-name="P47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7">輸入驗證 (Input Validation)</text:p>
          </table:table-cell>
          <table:table-cell table:style-name="表格119.A7" table:number-columns-spanned="2" office:value-type="string">
            <text:p text:style-name="P47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7">WAF（網站應用防火牆）</text:p>
          </table:table-cell>
          <table:table-cell table:style-name="表格119.A3" table:number-columns-spanned="2" office:value-type="string">
            <text:p text:style-name="P47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7">最小權限原則</text:p>
          </table:table-cell>
          <table:table-cell table:style-name="表格119.A7" table:number-columns-spanned="2" office:value-type="string">
            <text:p text:style-name="P47">資料庫帳號只給應用程式必要的權限，避免帳號被拿下後資料全失。</text:p>
          </table:table-cell>
          <table:covered-table-cell/>
        </table:table-row>
      </table:table>
      <text:h text:style-name="P61" text:outline-level="3"><text:soft-page-break/><text:span text:style-name="T29">▍</text:span><text:span text:style-name="T30"> Zero-Day Attack（零時差攻擊）</text:span></text:h>
      <text:p text:style-name="P44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23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23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32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32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28">防禦層</text:p>
          </table:table-cell>
          <table:table-cell table:style-name="表格120.A1" office:value-type="string">
            <text:p text:style-name="P28">手段</text:p>
          </table:table-cell>
          <table:table-cell table:style-name="表格120.A1" table:number-columns-spanned="2" office:value-type="string">
            <text:p text:style-name="P28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7">修補</text:p>
          </table:table-cell>
          <table:table-cell table:style-name="表格120.A2" office:value-type="string">
            <text:p text:style-name="P47">Patch 更新</text:p>
          </table:table-cell>
          <table:table-cell table:style-name="表格120.A2" table:number-columns-spanned="2" office:value-type="string">
            <text:p text:style-name="P47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7">偵測</text:p>
          </table:table-cell>
          <table:table-cell table:style-name="表格120.A5" office:value-type="string">
            <text:p text:style-name="P47">IDS / IPS</text:p>
          </table:table-cell>
          <table:table-cell table:style-name="表格120.A5" table:number-columns-spanned="2" office:value-type="string">
            <text:p text:style-name="P47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7">深度檢查</text:p>
          </table:table-cell>
          <table:table-cell table:style-name="表格120.A2" office:value-type="string">
            <text:p text:style-name="P47">DPI（深度封包檢查）</text:p>
          </table:table-cell>
          <table:table-cell table:style-name="表格120.A2" table:number-columns-spanned="2" office:value-type="string">
            <text:p text:style-name="P47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7">隔離</text:p>
          </table:table-cell>
          <table:table-cell table:style-name="表格120.A5" office:value-type="string">
            <text:p text:style-name="P47">網路分段</text:p>
          </table:table-cell>
          <table:table-cell table:style-name="表格120.A5" table:number-columns-spanned="2" office:value-type="string">
            <text:p text:style-name="P47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7">降低風險</text:p>
          </table:table-cell>
          <table:table-cell table:style-name="表格120.A2" office:value-type="string">
            <text:p text:style-name="P47">最小權限原則</text:p>
          </table:table-cell>
          <table:table-cell table:style-name="表格120.A2" table:number-columns-spanned="2" office:value-type="string">
            <text:p text:style-name="P47">每個帳號只給必要的最低權限，減少淪陷後的損害</text:p>
          </table:table-cell>
          <table:covered-table-cell/>
        </table:table-row>
      </table:table>
      <text:h text:style-name="P61" text:outline-level="3"><text:span text:style-name="T29">▍</text:span><text:span text:style-name="T30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8">機制</text:p>
            </table:table-cell>
            <table:table-cell table:style-name="表格121.A1" office:value-type="string">
              <text:p text:style-name="P28">白話比喻</text:p>
            </table:table-cell>
            <table:table-cell table:style-name="表格121.A1" office:value-type="string">
              <text:p text:style-name="P28">主要功能</text:p>
            </table:table-cell>
            <table:table-cell table:style-name="表格121.A1" office:value-type="string">
              <text:p text:style-name="P28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7">Firewall</text:p>
          </table:table-cell>
          <table:table-cell table:style-name="表格121.A2" office:value-type="string">
            <text:p text:style-name="P47">社區大門保全</text:p>
          </table:table-cell>
          <table:table-cell table:style-name="表格121.A2" office:value-type="string">
            <text:p text:style-name="P47">依 IP、Port、協定決定允許或拒絕流量</text:p>
          </table:table-cell>
          <table:table-cell table:style-name="表格121.A2" office:value-type="string">
            <text:p text:style-name="P47">基礎但必要</text:p>
          </table:table-cell>
        </table:table-row>
        <table:table-row table:style-name="表格121.1">
          <table:table-cell table:style-name="表格121.A3" office:value-type="string">
            <text:p text:style-name="P47">IDS</text:p>
          </table:table-cell>
          <table:table-cell table:style-name="表格121.A3" office:value-type="string">
            <text:p text:style-name="P47">監視器</text:p>
          </table:table-cell>
          <table:table-cell table:style-name="表格121.A3" office:value-type="string">
            <text:p text:style-name="P47">偵測到異常流量後產生警報，不主動攔截</text:p>
          </table:table-cell>
          <table:table-cell table:style-name="表格121.A3" office:value-type="string">
            <text:p text:style-name="P47">只警告</text:p>
          </table:table-cell>
        </table:table-row>
        <table:table-row table:style-name="表格121.1">
          <table:table-cell table:style-name="表格121.A2" office:value-type="string">
            <text:p text:style-name="P47">IPS</text:p>
          </table:table-cell>
          <table:table-cell table:style-name="表格121.A2" office:value-type="string">
            <text:p text:style-name="P47">警衛直接攔人</text:p>
          </table:table-cell>
          <table:table-cell table:style-name="表格121.A2" office:value-type="string">
            <text:p text:style-name="P47">自動阻斷偵測到的攻擊流量</text:p>
          </table:table-cell>
          <table:table-cell table:style-name="表格121.A2" office:value-type="string">
            <text:p text:style-name="P47">直接阻擋</text:p>
          </table:table-cell>
        </table:table-row>
        <table:table-row table:style-name="表格121.1">
          <table:table-cell table:style-name="表格121.A3" office:value-type="string">
            <text:p text:style-name="P47">DPI</text:p>
          </table:table-cell>
          <table:table-cell table:style-name="表格121.A3" office:value-type="string">
            <text:p text:style-name="P47">海關拆包裹</text:p>
          </table:table-cell>
          <table:table-cell table:style-name="表格121.A3" office:value-type="string">
            <text:p text:style-name="P47">不只看封包表頭，深入檢查封包內容</text:p>
          </table:table-cell>
          <table:table-cell table:style-name="表格121.A3" office:value-type="string">
            <text:p text:style-name="P47">最深層檢查</text:p>
          </table:table-cell>
        </table:table-row>
        <table:table-row table:style-name="表格121.1">
          <table:table-cell table:style-name="表格121.A2" office:value-type="string">
            <text:p text:style-name="P47">WAF</text:p>
          </table:table-cell>
          <table:table-cell table:style-name="表格121.A2" office:value-type="string">
            <text:p text:style-name="P47">網站門口掃描機</text:p>
          </table:table-cell>
          <table:table-cell table:style-name="表格121.A2" office:value-type="string">
            <text:p text:style-name="P47">專門針對 Web 攻擊（SQLi、XSS）過濾</text:p>
          </table:table-cell>
          <table:table-cell table:style-name="表格121.A2" office:value-type="string">
            <text:p text:style-name="P47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54"><text:span text:style-name="T4">⚠️ <text:s/></text:span><text:span text:style-name="T39">考試常考</text:span></text:p>
            <text:p text:style-name="P42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61" text:outline-level="3"><text:span text:style-name="T29">▍</text:span><text:span text:style-name="T30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29">Step</text:p>
            </table:table-cell>
            <table:table-cell table:style-name="表格122.A1" office:value-type="string">
              <text:p text:style-name="P29">階段</text:p>
            </table:table-cell>
            <table:table-cell table:style-name="表格122.A1" office:value-type="string">
              <text:p text:style-name="P2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7">1</text:p>
          </table:table-cell>
          <table:table-cell table:style-name="表格122.A2" office:value-type="string">
            <text:p text:style-name="P47">偵察 Reconnaissance</text:p>
          </table:table-cell>
          <table:table-cell table:style-name="表格122.A2" office:value-type="string">
            <text:p text:style-name="P47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7">2</text:p>
          </table:table-cell>
          <table:table-cell table:style-name="表格122.A3" office:value-type="string">
            <text:p text:style-name="P47">試探 Probing</text:p>
          </table:table-cell>
          <table:table-cell table:style-name="表格122.A3" office:value-type="string">
            <text:p text:style-name="P47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7">3</text:p>
          </table:table-cell>
          <table:table-cell table:style-name="表格122.A2" office:value-type="string">
            <text:p text:style-name="P47">取得初步權限</text:p>
          </table:table-cell>
          <table:table-cell table:style-name="表格122.A2" office:value-type="string">
            <text:p text:style-name="P47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7">4</text:p>
          </table:table-cell>
          <table:table-cell table:style-name="表格122.A3" office:value-type="string">
            <text:p text:style-name="P47">橫向移動 Lateral Movement</text:p>
          </table:table-cell>
          <table:table-cell table:style-name="表格122.A3" office:value-type="string">
            <text:p text:style-name="P47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7">5</text:p>
          </table:table-cell>
          <table:table-cell table:style-name="表格122.A2" office:value-type="string">
            <text:p text:style-name="P47">竊取資料 Exfiltration</text:p>
          </table:table-cell>
          <table:table-cell table:style-name="表格122.A2" office:value-type="string">
            <text:p text:style-name="P47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7">6</text:p>
          </table:table-cell>
          <table:table-cell table:style-name="表格122.A3" office:value-type="string">
            <text:p text:style-name="P47">植入後門 Backdoor</text:p>
          </table:table-cell>
          <table:table-cell table:style-name="表格122.A3" office:value-type="string">
            <text:p text:style-name="P47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7">7</text:p>
          </table:table-cell>
          <table:table-cell table:style-name="表格122.A2" office:value-type="string">
            <text:p text:style-name="P47">勒索或變現</text:p>
          </table:table-cell>
          <table:table-cell table:style-name="表格122.A2" office:value-type="string">
            <text:p text:style-name="P47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54"><text:span text:style-name="T4">⚠️ <text:s/></text:span><text:span text:style-name="T39">公職考試常見陷阱</text:span></text:p>
            <text:p text:style-name="P55"><text:span text:style-name="T16">「輸入驗證」就足夠防 SQLi？　</text:span><text:span text:style-name="T9">❌ 不夠，過濾特殊字元有被繞過風險。✅ 真正防禦是 Prepared Statement。</text:span></text:p>
            <text:p text:style-name="P56"><text:span text:style-name="T16">WAF 可以完全防止所有攻擊？　</text:span><text:span text:style-name="T9">❌ 不能，WAF 是輔助防禦，新型攻擊可能繞過。✅ WAF + Prepared </text:span><text:soft-page-break/><text:span text:style-name="T9">Statement 才是正道。</text:span></text:p>
            <text:p text:style-name="P56"><text:span text:style-name="T16">Zero-Day 最危險是它「很強大」？　</text:span><text:span text:style-name="T9">❌ 不是，最危險的是「還沒人知道」，防毒無法識別。</text:span></text:p>
            <text:p text:style-name="P56"><text:span text:style-name="T16">IDS 可以阻擋攻擊？　</text:span><text:span text:style-name="T9">❌ 不行，IDS 只能偵測警報，能阻擋的是 IPS。</text:span></text:p>
          </table:table-cell>
          <table:covered-table-cell/>
          <table:covered-table-cell/>
        </table:table-row>
      </table:table>
      <text:h text:style-name="P9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4">工具</text:p>
            </table:table-cell>
            <table:table-cell table:style-name="表格123.A1" office:value-type="string">
              <text:p text:style-name="P24">角色</text:p>
            </table:table-cell>
            <table:table-cell table:style-name="表格123.A1" office:value-type="string">
              <text:p text:style-name="P24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32">🚪 Firewall</text:p>
          </table:table-cell>
          <table:table-cell table:style-name="表格123.A2" office:value-type="string">
            <text:p text:style-name="P32">大門警衛</text:p>
          </table:table-cell>
          <table:table-cell table:style-name="表格123.A2" office:value-type="string">
            <text:p text:style-name="P32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32">👀 IDS</text:p>
          </table:table-cell>
          <table:table-cell table:style-name="表格123.A3" office:value-type="string">
            <text:p text:style-name="P32">監視器（只看）</text:p>
          </table:table-cell>
          <table:table-cell table:style-name="表格123.A3" office:value-type="string">
            <text:p text:style-name="P32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32">🚨 IPS</text:p>
          </table:table-cell>
          <table:table-cell table:style-name="表格123.A2" office:value-type="string">
            <text:p text:style-name="P32">監視器＋警衛</text:p>
          </table:table-cell>
          <table:table-cell table:style-name="表格123.A2" office:value-type="string">
            <text:p text:style-name="P32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32">📊 SNMP</text:p>
          </table:table-cell>
          <table:table-cell table:style-name="表格123.A3" office:value-type="string">
            <text:p text:style-name="P32">管理室</text:p>
          </table:table-cell>
          <table:table-cell table:style-name="表格123.A3" office:value-type="string">
            <text:p text:style-name="P32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32">📶 ICMP</text:p>
          </table:table-cell>
          <table:table-cell table:style-name="表格123.A2" office:value-type="string">
            <text:p text:style-name="P32">網路測試員</text:p>
          </table:table-cell>
          <table:table-cell table:style-name="表格123.A2" office:value-type="string">
            <text:p text:style-name="P32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54"><text:span text:style-name="T4">⚡ <text:s/></text:span><text:span text:style-name="T30">核心記憶口訣</text:span></text:p>
            <text:p text:style-name="P42">Firewall 擋入口 · IDS 只看 · IPS 看＋擋。</text:p>
          </table:table-cell>
          <table:covered-table-cell/>
          <table:covered-table-cell/>
        </table:table-row>
      </table:table>
      <text:h text:style-name="P61" text:outline-level="3"><text:span text:style-name="T29">▍</text:span><text:span text:style-name="T30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109"/>
            </table:table-cell>
            <table:table-cell table:style-name="表格124.A1" office:value-type="string">
              <text:p text:style-name="P24">HIDS</text:p>
            </table:table-cell>
            <table:table-cell table:style-name="表格124.A1" office:value-type="string">
              <text:p text:style-name="P24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32">安裝位置</text:p>
          </table:table-cell>
          <table:table-cell table:style-name="表格124.A2" office:value-type="string">
            <text:p text:style-name="P32">裝在主機（電腦）內部</text:p>
          </table:table-cell>
          <table:table-cell table:style-name="表格124.A2" office:value-type="string">
            <text:p text:style-name="P32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32">監控內容</text:p>
          </table:table-cell>
          <table:table-cell table:style-name="表格124.A3" office:value-type="string">
            <text:p text:style-name="P32">系統 Log、使用者行為</text:p>
          </table:table-cell>
          <table:table-cell table:style-name="表格124.A3" office:value-type="string">
            <text:p text:style-name="P32">網路封包與流量</text:p>
          </table:table-cell>
        </table:table-row>
        <table:table-row table:style-name="表格124.1">
          <table:table-cell table:style-name="表格124.A2" office:value-type="string">
            <text:p text:style-name="P32">比喻</text:p>
          </table:table-cell>
          <table:table-cell table:style-name="表格124.A2" office:value-type="string">
            <text:p text:style-name="P32">電腦裡的監視器</text:p>
          </table:table-cell>
          <table:table-cell table:style-name="表格124.A2" office:value-type="string">
            <text:p text:style-name="P32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54"><text:span text:style-name="T4">⚡ <text:s/></text:span><text:span text:style-name="T30">一句話秒懂</text:span></text:p>
            <text:p text:style-name="P42">HIDS 看主機（Log）· NIDS 看網路（封包）。</text:p>
          </table:table-cell>
          <table:covered-table-cell/>
          <table:covered-table-cell/>
        </table:table-row>
      </table:table>
      <text:h text:style-name="P61" text:outline-level="3"><text:span text:style-name="T29">▍</text:span><text:span text:style-name="T30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109"/>
            </table:table-cell>
            <table:table-cell table:style-name="表格125.A1" office:value-type="string">
              <text:p text:style-name="P24">SNMP</text:p>
            </table:table-cell>
            <table:table-cell table:style-name="表格125.A1" office:value-type="string">
              <text:p text:style-name="P24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32">用途</text:p>
          </table:table-cell>
          <table:table-cell table:style-name="表格125.A2" office:value-type="string">
            <text:p text:style-name="P32">管理與監控網路設備</text:p>
          </table:table-cell>
          <table:table-cell table:style-name="表格125.A2" office:value-type="string">
            <text:p text:style-name="P32">測試網路是否連通</text:p>
          </table:table-cell>
        </table:table-row>
        <table:table-row table:style-name="表格125.1">
          <table:table-cell table:style-name="表格125.A3" office:value-type="string">
            <text:p text:style-name="P32">OSI 層</text:p>
          </table:table-cell>
          <table:table-cell table:style-name="表格125.A3" office:value-type="string">
            <text:p text:style-name="P32">Application Layer（應用層）</text:p>
          </table:table-cell>
          <table:table-cell table:style-name="表格125.A3" office:value-type="string">
            <text:p text:style-name="P32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32">傳輸協定</text:p>
          </table:table-cell>
          <table:table-cell table:style-name="表格125.A2" office:value-type="string">
            <text:p text:style-name="P32">UDP</text:p>
          </table:table-cell>
          <table:table-cell table:style-name="表格125.A2" office:value-type="string">
            <text:p text:style-name="P32">IP 的附屬協定</text:p>
          </table:table-cell>
        </table:table-row>
        <table:table-row table:style-name="表格125.1">
          <table:table-cell table:style-name="表格125.A3" office:value-type="string">
            <text:p text:style-name="P32">常見功能</text:p>
          </table:table-cell>
          <table:table-cell table:style-name="表格125.A3" office:value-type="string">
            <text:p text:style-name="P32">看 CPU 使用率、設備狀態、Trap 警報</text:p>
          </table:table-cell>
          <table:table-cell table:style-name="表格125.A3" office:value-type="string">
            <text:p text:style-name="P32">Ping、Traceroute</text:p>
          </table:table-cell>
        </table:table-row>
        <table:table-row table:style-name="表格125.1">
          <table:table-cell table:style-name="表格125.A2" office:value-type="string">
            <text:p text:style-name="P32">比喻</text:p>
          </table:table-cell>
          <table:table-cell table:style-name="表格125.A2" office:value-type="string">
            <text:p text:style-name="P32">大樓管理室的監控系統</text:p>
          </table:table-cell>
          <table:table-cell table:style-name="表格125.A2" office:value-type="string">
            <text:p text:style-name="P32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54"><text:span text:style-name="T4">⚡ <text:s/></text:span><text:span text:style-name="T30">核心差異</text:span></text:p>
            <text:p text:style-name="P42">SNMP 管理設備（應用層 / UDP）· ICMP 診斷網路（網路層）。</text:p>
          </table:table-cell>
          <table:covered-table-cell/>
          <table:covered-table-cell/>
        </table:table-row>
      </table:table>
      <text:h text:style-name="P61" text:outline-level="3"><text:span text:style-name="T29">▍</text:span><text:span text:style-name="T30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54"><text:span text:style-name="T4">🗺 <text:s/></text:span><text:span text:style-name="T24">工具各自負責的位置</text:span></text:p>
            <text:p text:style-name="P42">🌐 外部攻擊者 → 🚪 Firewall（第一道防線，依 IP/Port 規則過濾）→ 📡 NIDS / IPS（網路中間監控：IDS 分析封包發現異常只發警報；IPS 分析封包發現異常直接阻擋）→ 🖥 主機 / Server → 👀 <text:soft-page-break/>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54"><text:span text:style-name="T4">⚠️ <text:s/></text:span><text:span text:style-name="T39">考試陷阱整理</text:span></text:p>
            <text:p text:style-name="P55"><text:span text:style-name="T188">① IDS 可以自動阻擋攻擊　→　</text:span><text:span text:style-name="T9">✓ IDS 只偵測＋發警報，IPS 才會阻擋。</text:span></text:p>
            <text:p text:style-name="P56"><text:span text:style-name="T188">② Firewall 可以偵測異常行為　→　</text:span><text:span text:style-name="T9">✓ Firewall 依規則（IP/Port）過濾，不做行為分析。</text:span></text:p>
            <text:p text:style-name="P56"><text:span text:style-name="T188">③ HIDS 用來監控網路封包　→　</text:span><text:span text:style-name="T9">✓ HIDS 監控主機 Log 與系統行為，封包是 NIDS 的工作。</text:span></text:p>
            <text:p text:style-name="P56"><text:span text:style-name="T188">④ ICMP 用來監控設備狀態　→　</text:span><text:span text:style-name="T9">✓ ICMP 只診斷網路（Ping），監控設備是 SNMP。</text:span></text:p>
            <text:p text:style-name="P56"><text:span text:style-name="T188">⑤ ICMP 屬於 Application Layer　→　</text:span><text:span text:style-name="T9">✓ ICMP 屬 Network Layer，SNMP 才是 Application Layer。</text:span></text:p>
            <text:p text:style-name="P56"><text:span text:style-name="T188">⑥ IPS 就是防火牆　→　</text:span><text:span text:style-name="T9">✓ Firewall 靜態過濾（規則），IPS 動態偵測行為後阻擋，兩者不同。</text:span></text:p>
          </table:table-cell>
        </table:table-row>
      </table:table>
      <text:h text:style-name="P61" text:outline-level="3"><text:span text:style-name="T29">▍</text:span><text:span text:style-name="T30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30">題目</text:p>
            </table:table-cell>
            <table:table-cell table:style-name="表格127.A1" office:value-type="string">
              <text:p text:style-name="P30">答案</text:p>
            </table:table-cell>
            <table:table-cell table:style-name="表格127.A1" office:value-type="string">
              <text:p text:style-name="P3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52">Q1 何者負責「過濾進出網路流量」？</text:p>
          </table:table-cell>
          <table:table-cell table:style-name="表格127.A2" office:value-type="string">
            <text:p text:style-name="P52">Firewall</text:p>
          </table:table-cell>
          <table:table-cell table:style-name="表格127.A2" office:value-type="string">
            <text:p text:style-name="P52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52">Q2 IDS 的主要功能為何？</text:p>
          </table:table-cell>
          <table:table-cell table:style-name="表格127.A3" office:value-type="string">
            <text:p text:style-name="P52">偵測並發出警報</text:p>
          </table:table-cell>
          <table:table-cell table:style-name="表格127.A3" office:value-type="string">
            <text:p text:style-name="P52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52">Q3 IPS 與 IDS 最大差別？</text:p>
          </table:table-cell>
          <table:table-cell table:style-name="表格127.A2" office:value-type="string">
            <text:p text:style-name="P52">IPS 會阻擋，IDS 不會</text:p>
          </table:table-cell>
          <table:table-cell table:style-name="表格127.A2" office:value-type="string">
            <text:p text:style-name="P52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52">Q4 何者屬「主機型入侵偵測」？</text:p>
          </table:table-cell>
          <table:table-cell table:style-name="表格127.A3" office:value-type="string">
            <text:p text:style-name="P52">HIDS</text:p>
          </table:table-cell>
          <table:table-cell table:style-name="表格127.A3" office:value-type="string">
            <text:p text:style-name="P52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52">Q5 NIDS 主要監控什麼？</text:p>
          </table:table-cell>
          <table:table-cell table:style-name="表格127.A2" office:value-type="string">
            <text:p text:style-name="P52">網路封包</text:p>
          </table:table-cell>
          <table:table-cell table:style-name="表格127.A2" office:value-type="string">
            <text:p text:style-name="P52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52">Q6 SNMP 的主要用途？</text:p>
          </table:table-cell>
          <table:table-cell table:style-name="表格127.A3" office:value-type="string">
            <text:p text:style-name="P52">管理網路設備</text:p>
          </table:table-cell>
          <table:table-cell table:style-name="表格127.A3" office:value-type="string">
            <text:p text:style-name="P52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52">Q7 ICMP 常用於哪種工具？</text:p>
          </table:table-cell>
          <table:table-cell table:style-name="表格127.A2" office:value-type="string">
            <text:p text:style-name="P52">Ping</text:p>
          </table:table-cell>
          <table:table-cell table:style-name="表格127.A2" office:value-type="string">
            <text:p text:style-name="P52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52">Q8 ICMP 屬 OSI 哪一層？</text:p>
          </table:table-cell>
          <table:table-cell table:style-name="表格127.A3" office:value-type="string">
            <text:p text:style-name="P52">Network Layer</text:p>
          </table:table-cell>
          <table:table-cell table:style-name="表格127.A3" office:value-type="string">
            <text:p text:style-name="P52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52">Q9 何者用 UDP 且屬應用層？</text:p>
          </table:table-cell>
          <table:table-cell table:style-name="表格127.A2" office:value-type="string">
            <text:p text:style-name="P52">SNMP</text:p>
          </table:table-cell>
          <table:table-cell table:style-name="表格127.A2" office:value-type="string">
            <text:p text:style-name="P52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52">Q10 下列何者正確？</text:p>
          </table:table-cell>
          <table:table-cell table:style-name="表格127.A3" office:value-type="string">
            <text:p text:style-name="P52">SNMP 用於設備管理</text:p>
          </table:table-cell>
          <table:table-cell table:style-name="表格127.A3" office:value-type="string">
            <text:p text:style-name="P52">IDS 不阻擋；Firewall 不做行為分析；ICMP 只做網路診斷。</text:p>
          </table:table-cell>
        </table:table-row>
      </table:table>
      <text:h text:style-name="P9" text:outline-level="2">肆、企業資訊安全：預防 → 偵測 → 復原</text:h>
      <text:p text:style-name="P44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28">三大核心</text:p>
            </table:table-cell>
            <table:table-cell table:style-name="表格128.A1" office:value-type="string">
              <text:p text:style-name="P28">目標</text:p>
            </table:table-cell>
            <table:table-cell table:style-name="表格128.A1" office:value-type="string">
              <text:p text:style-name="P28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7">① 事前預防</text:p>
          </table:table-cell>
          <table:table-cell table:style-name="表格128.A2" office:value-type="string">
            <text:p text:style-name="P47">讓壞事不要發生</text:p>
          </table:table-cell>
          <table:table-cell table:style-name="表格128.A2" office:value-type="string">
            <text:p text:style-name="P47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7">② 事中偵測</text:p>
          </table:table-cell>
          <table:table-cell table:style-name="表格128.A3" office:value-type="string">
            <text:p text:style-name="P47">出事時盡快發現</text:p>
          </table:table-cell>
          <table:table-cell table:style-name="表格128.A3" office:value-type="string">
            <text:p text:style-name="P47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7">③ 事後復原</text:p>
          </table:table-cell>
          <table:table-cell table:style-name="表格128.A2" office:value-type="string">
            <text:p text:style-name="P47">壞掉後快速救回來</text:p>
          </table:table-cell>
          <table:table-cell table:style-name="表格128.A2" office:value-type="string">
            <text:p text:style-name="P47">備份還原、啟動備援系統、災難復原（BCP、RTO/RPO）</text:p>
          </table:table-cell>
        </table:table-row>
      </table:table>
      <text:h text:style-name="P61" text:outline-level="3"><text:span text:style-name="T29">▍</text:span><text:span text:style-name="T30"> 事前預防：MFA（多因素驗證）</text:span></text:h>
      <text:p text:style-name="P44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61" text:outline-level="3"><text:soft-page-break/><text:span text:style-name="T29">▍</text:span><text:span text:style-name="T30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8">工具</text:p>
            </table:table-cell>
            <table:table-cell table:style-name="表格129.A1" office:value-type="string">
              <text:p text:style-name="P28">全名 / 說明</text:p>
            </table:table-cell>
            <table:table-cell table:style-name="表格129.A1" office:value-type="string">
              <text:p text:style-name="P28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7">Firewall</text:p>
          </table:table-cell>
          <table:table-cell table:style-name="表格129.A2" office:value-type="string">
            <text:p text:style-name="P47">控制誰能進出網路</text:p>
          </table:table-cell>
          <table:table-cell table:style-name="表格129.A2" office:value-type="string">
            <text:p text:style-name="P47">✔ 會</text:p>
          </table:table-cell>
        </table:table-row>
        <table:table-row table:style-name="表格129.1">
          <table:table-cell table:style-name="表格129.A3" office:value-type="string">
            <text:p text:style-name="P47">NGFW</text:p>
          </table:table-cell>
          <table:table-cell table:style-name="表格129.A3" office:value-type="string">
            <text:p text:style-name="P47">次世代防火牆，能辨識應用層威脅</text:p>
          </table:table-cell>
          <table:table-cell table:style-name="表格129.A3" office:value-type="string">
            <text:p text:style-name="P47">✔ 會</text:p>
          </table:table-cell>
        </table:table-row>
        <table:table-row table:style-name="表格129.1">
          <table:table-cell table:style-name="表格129.A2" office:value-type="string">
            <text:p text:style-name="P47">IDS</text:p>
          </table:table-cell>
          <table:table-cell table:style-name="表格129.A2" office:value-type="string">
            <text:p text:style-name="P47">入侵偵測系統，發現異常就發警報</text:p>
          </table:table-cell>
          <table:table-cell table:style-name="表格129.A2" office:value-type="string">
            <text:p text:style-name="P47">✘ 不會</text:p>
          </table:table-cell>
        </table:table-row>
        <table:table-row table:style-name="表格129.1">
          <table:table-cell table:style-name="表格129.A3" office:value-type="string">
            <text:p text:style-name="P47">IPS</text:p>
          </table:table-cell>
          <table:table-cell table:style-name="表格129.A3" office:value-type="string">
            <text:p text:style-name="P47">入侵防禦系統，發現異常直接阻擋</text:p>
          </table:table-cell>
          <table:table-cell table:style-name="表格129.A3" office:value-type="string">
            <text:p text:style-name="P47">✔ 會</text:p>
          </table:table-cell>
        </table:table-row>
        <table:table-row table:style-name="表格129.1">
          <table:table-cell table:style-name="表格129.A2" office:value-type="string">
            <text:p text:style-name="P47">EDR</text:p>
          </table:table-cell>
          <table:table-cell table:style-name="表格129.A2" office:value-type="string">
            <text:p text:style-name="P47">Endpoint Detection &amp; Response，監控每台電腦行為</text:p>
          </table:table-cell>
          <table:table-cell table:style-name="表格129.A2" office:value-type="string">
            <text:p text:style-name="P47">✔ 會</text:p>
          </table:table-cell>
        </table:table-row>
        <table:table-row table:style-name="表格129.1">
          <table:table-cell table:style-name="表格129.A3" office:value-type="string">
            <text:p text:style-name="P47">MDR</text:p>
          </table:table-cell>
          <table:table-cell table:style-name="表格129.A3" office:value-type="string">
            <text:p text:style-name="P47">Managed D&amp;R，委外資安監控服務（24 小時）</text:p>
          </table:table-cell>
          <table:table-cell table:style-name="表格129.A3" office:value-type="string">
            <text:p text:style-name="P47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54"><text:span text:style-name="T4">🏠 <text:s/></text:span><text:span text:style-name="T24">比喻幫你秒懂（公司＝大樓）</text:span></text:p>
            <text:p text:style-name="P42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61" text:outline-level="3"><text:span text:style-name="T29">▍</text:span><text:span text:style-name="T30"> 事後復原：備份、RTO / RPO、BCP</text:span></text:h>
      <text:p text:style-name="P44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8">指標</text:p>
            </table:table-cell>
            <table:table-cell table:style-name="表格130.A1" office:value-type="string">
              <text:p text:style-name="P28">全名</text:p>
            </table:table-cell>
            <table:table-cell table:style-name="表格130.A1" office:value-type="string">
              <text:p text:style-name="P28">問什麼</text:p>
            </table:table-cell>
            <table:table-cell table:style-name="表格130.A1" office:value-type="string">
              <text:p text:style-name="P28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7">RTO</text:p>
          </table:table-cell>
          <table:table-cell table:style-name="表格130.A2" office:value-type="string">
            <text:p text:style-name="P47">Recovery Time Objective 復原時間目標</text:p>
          </table:table-cell>
          <table:table-cell table:style-name="表格130.A2" office:value-type="string">
            <text:p text:style-name="P47">系統出問題後，最多能停多久？</text:p>
          </table:table-cell>
          <table:table-cell table:style-name="表格130.A2" office:value-type="string">
            <text:p text:style-name="P47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7">RPO</text:p>
          </table:table-cell>
          <table:table-cell table:style-name="表格130.A3" office:value-type="string">
            <text:p text:style-name="P47">Recovery Point Objective 復原點目標</text:p>
          </table:table-cell>
          <table:table-cell table:style-name="表格130.A3" office:value-type="string">
            <text:p text:style-name="P47">最多能接受丟失幾小時的資料？</text:p>
          </table:table-cell>
          <table:table-cell table:style-name="表格130.A3" office:value-type="string">
            <text:p text:style-name="P47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54"><text:span text:style-name="T4">⏱ <text:s/></text:span><text:span text:style-name="T157">一句話記憶法</text:span></text:p>
            <text:p text:style-name="P55"><text:span text:style-name="T158">RTO = 停機時間</text:span><text:span text:style-name="T9">（能停多久？）　</text:span><text:span text:style-name="T158">RPO = 資料損失量</text:span><text:span text:style-name="T9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54"><text:span text:style-name="T4">🏢 <text:s/></text:span><text:span text:style-name="T24">BCP：公司炸掉了還能繼續運作嗎？</text:span></text:p>
            <text:p text:style-name="P42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61" text:outline-level="3"><text:span text:style-name="T29">▍</text:span><text:span text:style-name="T30"> SSDLC：軟體開發的每個階段都加入資安</text:span></text:h>
      <text:p text:style-name="P44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28">階段</text:p>
            </table:table-cell>
            <table:table-cell table:style-name="表格131.A1" office:value-type="string">
              <text:p text:style-name="P28">英文</text:p>
            </table:table-cell>
            <table:table-cell table:style-name="表格131.A1" office:value-type="string">
              <text:p text:style-name="P28">做什麼</text:p>
            </table:table-cell>
            <table:table-cell table:style-name="表格131.A1" office:value-type="string">
              <text:p text:style-name="P28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7">① 定義</text:p>
          </table:table-cell>
          <table:table-cell table:style-name="表格131.A2" office:value-type="string">
            <text:p text:style-name="P47">Define</text:p>
          </table:table-cell>
          <table:table-cell table:style-name="表格131.A2" office:value-type="string">
            <text:p text:style-name="P47">確認需求與範圍</text:p>
          </table:table-cell>
          <table:table-cell table:style-name="表格131.A2" office:value-type="string">
            <text:p text:style-name="P47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7">② 設計</text:p>
          </table:table-cell>
          <table:table-cell table:style-name="表格131.A3" office:value-type="string">
            <text:p text:style-name="P47">Design</text:p>
          </table:table-cell>
          <table:table-cell table:style-name="表格131.A3" office:value-type="string">
            <text:p text:style-name="P47">設計系統架構</text:p>
          </table:table-cell>
          <table:table-cell table:style-name="表格131.A3" office:value-type="string">
            <text:p text:style-name="P47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7">③ 開發</text:p>
          </table:table-cell>
          <table:table-cell table:style-name="表格131.A2" office:value-type="string">
            <text:p text:style-name="P47">Develop</text:p>
          </table:table-cell>
          <table:table-cell table:style-name="表格131.A2" office:value-type="string">
            <text:p text:style-name="P47">工程師寫程式</text:p>
          </table:table-cell>
          <table:table-cell table:style-name="表格131.A2" office:value-type="string">
            <text:p text:style-name="P47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7">④ 測試</text:p>
          </table:table-cell>
          <table:table-cell table:style-name="表格131.A3" office:value-type="string">
            <text:p text:style-name="P47">Test</text:p>
          </table:table-cell>
          <table:table-cell table:style-name="表格131.A3" office:value-type="string">
            <text:p text:style-name="P47">測試功能與安全</text:p>
          </table:table-cell>
          <table:table-cell table:style-name="表格131.A3" office:value-type="string">
            <text:p text:style-name="P47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7">⑤ 上線</text:p>
          </table:table-cell>
          <table:table-cell table:style-name="表格131.A2" office:value-type="string">
            <text:p text:style-name="P47">Deploy</text:p>
          </table:table-cell>
          <table:table-cell table:style-name="表格131.A2" office:value-type="string">
            <text:p text:style-name="P47">正式發布系統</text:p>
          </table:table-cell>
          <table:table-cell table:style-name="表格131.A2" office:value-type="string">
            <text:p text:style-name="P47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7">⑥ 維護</text:p>
          </table:table-cell>
          <table:table-cell table:style-name="表格131.A3" office:value-type="string">
            <text:p text:style-name="P47">Maintain</text:p>
          </table:table-cell>
          <table:table-cell table:style-name="表格131.A3" office:value-type="string">
            <text:p text:style-name="P47">持續監控與更新</text:p>
          </table:table-cell>
          <table:table-cell table:style-name="表格131.A3" office:value-type="string">
            <text:p text:style-name="P47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54"><text:span text:style-name="T4">🔑 <text:s/></text:span><text:span text:style-name="T30">SSDLC 核心</text:span></text:p>
            <text:p text:style-name="P42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61" text:outline-level="3"><text:span text:style-name="T29">▍</text:span><text:span text:style-name="T30"> ISO 27001：用制度管理資安</text:span></text:h>
      <text:p text:style-name="P44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8">四個面向</text:p>
            </table:table-cell>
            <table:table-cell table:style-name="表格132.A1" office:value-type="string">
              <text:p text:style-name="P28">管什麼</text:p>
            </table:table-cell>
            <table:table-cell table:style-name="表格132.A1" office:value-type="string">
              <text:p text:style-name="P28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7">人（People）</text:p>
          </table:table-cell>
          <table:table-cell table:style-name="表格132.A2" office:value-type="string">
            <text:p text:style-name="P47">管理人員的行為與責任</text:p>
          </table:table-cell>
          <table:table-cell table:style-name="表格132.A2" office:value-type="string">
            <text:p text:style-name="P47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7">技術（Technology）</text:p>
          </table:table-cell>
          <table:table-cell table:style-name="表格132.A3" office:value-type="string">
            <text:p text:style-name="P47">使用適當的安全技術</text:p>
          </table:table-cell>
          <table:table-cell table:style-name="表格132.A3" office:value-type="string">
            <text:p text:style-name="P47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7">組織（Organization）</text:p>
          </table:table-cell>
          <table:table-cell table:style-name="表格132.A2" office:value-type="string">
            <text:p text:style-name="P47">建立流程與管理制度</text:p>
          </table:table-cell>
          <table:table-cell table:style-name="表格132.A2" office:value-type="string">
            <text:p text:style-name="P47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7">實體（Physical）</text:p>
          </table:table-cell>
          <table:table-cell table:style-name="表格132.A3" office:value-type="string">
            <text:p text:style-name="P47">保護實體環境</text:p>
          </table:table-cell>
          <table:table-cell table:style-name="表格132.A3" office:value-type="string">
            <text:p text:style-name="P47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54"><text:span text:style-name="T4">🌟 <text:s/></text:span><text:span text:style-name="T157">考試必背三句話</text:span></text:p>
            <text:p text:style-name="P42">1. 資安三階段：事前預防 → 事中偵測 → 事後復原。</text:p>
            <text:p text:style-name="P41">2. SSDLC：六階段（Define→Design→Develop→Test→Deploy→Maintain）都加入資安。</text:p>
            <text:p text:style-name="P41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9" text:outline-level="2">伍、進階防禦：EDR · MDR · MITRE ATT&amp;CK · 數位韌性</text:h>
      <text:p text:style-name="P44">現代駭客不一定放病毒，而是偷登入帳號偽裝成正常使用者、長期潛伏、利用合法工具發動攻擊。因此資安核心已從「防毒」轉向「持續監控電腦行為，即時偵測並快速應變」。</text:p>
      <text:h text:style-name="P61" text:outline-level="3"><text:span text:style-name="T29">▍</text:span><text:span text:style-name="T30"> EDR — 自己監控的資安工具</text:span></text:h>
      <text:p text:style-name="P44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23">三大偵測範圍</text:p>
            </table:table-cell>
            <table:table-cell table:style-name="表格133.A1" office:value-type="string">
              <text:p text:style-name="P23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32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32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54"><text:span text:style-name="T4">💡 <text:s/></text:span><text:span text:style-name="T30">核心觀念</text:span></text:p>
            <text:p text:style-name="P42">EDR 是「買工具、自己守」。企業需要有內部資安人員負責查看警報並處理事件。</text:p>
          </table:table-cell>
          <table:covered-table-cell/>
        </table:table-row>
      </table:table>
      <text:h text:style-name="P61" text:outline-level="3"><text:span text:style-name="T29">▍</text:span><text:span text:style-name="T30"> MDR — 委外的資安託管服務</text:span></text:h>
      <text:p text:style-name="P44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4">比較項目</text:p>
            </table:table-cell>
            <table:table-cell table:style-name="表格134.A1" office:value-type="string">
              <text:p text:style-name="P24">EDR</text:p>
            </table:table-cell>
            <table:table-cell table:style-name="表格134.A1" office:value-type="string">
              <text:p text:style-name="P24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32">管理方式</text:p>
          </table:table-cell>
          <table:table-cell table:style-name="表格134.A2" office:value-type="string">
            <text:p text:style-name="P32">自行管理</text:p>
          </table:table-cell>
          <table:table-cell table:style-name="表格134.A2" office:value-type="string">
            <text:p text:style-name="P32">委外管理</text:p>
          </table:table-cell>
        </table:table-row>
        <table:table-row table:style-name="表格134.1">
          <table:table-cell table:style-name="表格134.A3" office:value-type="string">
            <text:p text:style-name="P32">監控時間</text:p>
          </table:table-cell>
          <table:table-cell table:style-name="表格134.A3" office:value-type="string">
            <text:p text:style-name="P32">視團隊而定</text:p>
          </table:table-cell>
          <table:table-cell table:style-name="表格134.A3" office:value-type="string">
            <text:p text:style-name="P32">24 / 7 全天</text:p>
          </table:table-cell>
        </table:table-row>
        <table:table-row table:style-name="表格134.1">
          <table:table-cell table:style-name="表格134.A2" office:value-type="string">
            <text:p text:style-name="P32">所需能力<text:soft-page-break/></text:p>
          </table:table-cell>
          <table:table-cell table:style-name="表格134.A2" office:value-type="string">
            <text:p text:style-name="P32">需內部資安人員<text:soft-page-break/></text:p>
          </table:table-cell>
          <table:table-cell table:style-name="表格134.A2" office:value-type="string">
            <text:p text:style-name="P32">無須自建團隊<text:soft-page-break/></text:p>
          </table:table-cell>
        </table:table-row>
        <table:table-row table:style-name="表格134.1">
          <table:table-cell table:style-name="表格134.A3" office:value-type="string">
            <text:p text:style-name="P32">適合對象</text:p>
          </table:table-cell>
          <table:table-cell table:style-name="表格134.A3" office:value-type="string">
            <text:p text:style-name="P32">大型企業</text:p>
          </table:table-cell>
          <table:table-cell table:style-name="表格134.A3" office:value-type="string">
            <text:p text:style-name="P32">中小企業</text:p>
          </table:table-cell>
        </table:table-row>
        <table:table-row table:style-name="表格134.1">
          <table:table-cell table:style-name="表格134.A2" office:value-type="string">
            <text:p text:style-name="P32">成本模式</text:p>
          </table:table-cell>
          <table:table-cell table:style-name="表格134.A2" office:value-type="string">
            <text:p text:style-name="P32">工具費 + 人力</text:p>
          </table:table-cell>
          <table:table-cell table:style-name="表格134.A2" office:value-type="string">
            <text:p text:style-name="P32">月費 / 年費訂閱</text:p>
          </table:table-cell>
        </table:table-row>
      </table:table>
      <text:h text:style-name="P61" text:outline-level="3"><text:span text:style-name="T29">▍</text:span><text:span text:style-name="T30"> MITRE ATT&amp;CK — 駭客招式大全</text:span></text:h>
      <text:p text:style-name="P44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8">TTP</text:p>
            </table:table-cell>
            <table:table-cell table:style-name="表格135.A1" office:value-type="string">
              <text:p text:style-name="P28">意義</text:p>
            </table:table-cell>
            <table:table-cell table:style-name="表格135.A1" office:value-type="string">
              <text:p text:style-name="P28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7">T - Tactics</text:p>
          </table:table-cell>
          <table:table-cell table:style-name="表格135.A2" office:value-type="string">
            <text:p text:style-name="P47">戰術（攻擊目的）</text:p>
          </table:table-cell>
          <table:table-cell table:style-name="表格135.A2" office:value-type="string">
            <text:p text:style-name="P47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7">T - Techniques</text:p>
          </table:table-cell>
          <table:table-cell table:style-name="表格135.A3" office:value-type="string">
            <text:p text:style-name="P47">技術（使用方法）</text:p>
          </table:table-cell>
          <table:table-cell table:style-name="表格135.A3" office:value-type="string">
            <text:p text:style-name="P47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7">P - Procedures</text:p>
          </table:table-cell>
          <table:table-cell table:style-name="表格135.A2" office:value-type="string">
            <text:p text:style-name="P47">流程（實際操作步驟）</text:p>
          </table:table-cell>
          <table:table-cell table:style-name="表格135.A2" office:value-type="string">
            <text:p text:style-name="P47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54"><text:span text:style-name="T4">💡 <text:s/></text:span><text:span text:style-name="T30">核心觀念</text:span></text:p>
            <text:p text:style-name="P42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61" text:outline-level="3"><text:span text:style-name="T29">▍</text:span><text:span text:style-name="T30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23">❌ 以前的想法</text:p>
            </table:table-cell>
            <table:table-cell table:style-name="表格136.A1" office:value-type="string">
              <text:p text:style-name="P23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32">「不能被攻擊」——重點：阻止所有入侵。</text:p>
          </table:table-cell>
          <table:table-cell table:style-name="表格136.A2" office:value-type="string">
            <text:p text:style-name="P32">「被打了還能撐住並快速恢復」——重點：強化復原能力。</text:p>
          </table:table-cell>
        </table:table-row>
      </table:table>
      <text:p text:style-name="P5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54"><text:span text:style-name="T4">📝 <text:s/></text:span><text:span text:style-name="T157">一行記憶法</text:span></text:p>
            <text:p text:style-name="P55"><text:span text:style-name="T158">🛡 EDR → </text:span><text:span text:style-name="T9">自己買工具守　</text:span><text:span text:style-name="T158">👥 MDR → </text:span><text:span text:style-name="T9">請公司幫你守</text:span></text:p>
            <text:p text:style-name="P56"><text:span text:style-name="T158">📖 ATT&amp;CK → </text:span><text:span text:style-name="T9">駭客招式教材　</text:span><text:span text:style-name="T158">💪 韌性 → </text:span><text:span text:style-name="T9">撐住、快速復原</text:span></text:p>
          </table:table-cell>
        </table:table-row>
      </table:table>
      <text:h text:style-name="P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54"><text:span text:style-name="T4">📋 <text:s/></text:span><text:span text:style-name="T39">內容審查說明</text:span></text:p>
            <text:p text:style-name="P42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4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109"/>
            </table:table-cell>
            <table:table-cell table:style-name="表格139.A1" office:value-type="string">
              <text:p text:style-name="P24">傳統（城堡思維）</text:p>
            </table:table-cell>
            <table:table-cell table:style-name="表格139.A1" office:value-type="string">
              <text:p text:style-name="P24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32">核心假設</text:p>
          </table:table-cell>
          <table:table-cell table:style-name="表格139.A2" office:value-type="string">
            <text:p text:style-name="P32">內網 = 可信任</text:p>
          </table:table-cell>
          <table:table-cell table:style-name="表格139.A2" office:value-type="string">
            <text:p text:style-name="P32">任何人都需持續驗證</text:p>
          </table:table-cell>
        </table:table-row>
        <table:table-row table:style-name="表格139.1">
          <table:table-cell table:style-name="表格139.A3" office:value-type="string">
            <text:p text:style-name="P32">防護重點</text:p>
          </table:table-cell>
          <table:table-cell table:style-name="表格139.A3" office:value-type="string">
            <text:p text:style-name="P32">網路邊界 / 防火牆</text:p>
          </table:table-cell>
          <table:table-cell table:style-name="表格139.A3" office:value-type="string">
            <text:p text:style-name="P32">身份 × 設備 × 情境</text:p>
          </table:table-cell>
        </table:table-row>
        <table:table-row table:style-name="表格139.1">
          <table:table-cell table:style-name="表格139.A2" office:value-type="string">
            <text:p text:style-name="P32">登入之後</text:p>
          </table:table-cell>
          <table:table-cell table:style-name="表格139.A2" office:value-type="string">
            <text:p text:style-name="P32">幾乎不再驗證</text:p>
          </table:table-cell>
          <table:table-cell table:style-name="表格139.A2" office:value-type="string">
            <text:p text:style-name="P32">每個操作持續驗證</text:p>
          </table:table-cell>
        </table:table-row>
        <table:table-row table:style-name="表格139.1">
          <table:table-cell table:style-name="表格139.A3" office:value-type="string">
            <text:p text:style-name="P32">駭客入侵後</text:p>
          </table:table-cell>
          <table:table-cell table:style-name="表格139.A3" office:value-type="string">
            <text:p text:style-name="P32">可橫向移動整個內網</text:p>
          </table:table-cell>
          <table:table-cell table:style-name="表格139.A3" office:value-type="string">
            <text:p text:style-name="P32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32">適合時代</text:p>
          </table:table-cell>
          <table:table-cell table:style-name="表格139.A2" office:value-type="string">
            <text:p text:style-name="P32">固定辦公室 / 單一內網</text:p>
          </table:table-cell>
          <table:table-cell table:style-name="表格139.A2" office:value-type="string">
            <text:p text:style-name="P32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54"><text:span text:style-name="T4">🔑 <text:s/></text:span><text:span text:style-name="T157">核心一句話</text:span></text:p>
            <text:p text:style-name="P74">❝ 永不信任，始終驗證 ❞（Never Trust, Always Verify）</text:p>
            <text:p text:style-name="P41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61" text:outline-level="3"><text:span text:style-name="T29">▍</text:span><text:span text:style-name="T30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8">支柱</text:p>
            </table:table-cell>
            <table:table-cell table:style-name="表格140.A1" office:value-type="string">
              <text:p text:style-name="P28">口訣</text:p>
            </table:table-cell>
            <table:table-cell table:style-name="表格140.A1" office:value-type="string">
              <text:p text:style-name="P28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7">🔑 Identity（身份驗證）</text:p>
          </table:table-cell>
          <table:table-cell table:style-name="表格140.A2" office:value-type="string">
            <text:p text:style-name="P47">人</text:p>
          </table:table-cell>
          <table:table-cell table:style-name="表格140.A2" office:value-type="string">
            <text:p text:style-name="P47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7">💻 Device（設備健康）</text:p>
          </table:table-cell>
          <table:table-cell table:style-name="表格140.A3" office:value-type="string">
            <text:p text:style-name="P47">機</text:p>
          </table:table-cell>
          <table:table-cell table:style-name="表格140.A3" office:value-type="string">
            <text:p text:style-name="P47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7">🌐 Context（存取情境）</text:p>
          </table:table-cell>
          <table:table-cell table:style-name="表格140.A2" office:value-type="string">
            <text:p text:style-name="P47">境</text:p>
          </table:table-cell>
          <table:table-cell table:style-name="表格140.A2" office:value-type="string">
            <text:p text:style-name="P47">評估環境是否異常：登入時間、地點、行為模式；凌晨從境外登入會觸發額外驗證</text:p>
          </table:table-cell>
        </table:table-row>
      </table:table>
      <text:h text:style-name="P61" text:outline-level="3"><text:span text:style-name="T29">▍</text:span><text:span text:style-name="T30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8">機制</text:p>
            </table:table-cell>
            <table:table-cell table:style-name="表格141.A1" office:value-type="string">
              <text:p text:style-name="P28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7">① MFA 多因素驗證</text:p>
          </table:table-cell>
          <table:table-cell table:style-name="表格141.A2" office:value-type="string">
            <text:p text:style-name="P47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7">② Least Privilege 最小權限</text:p>
          </table:table-cell>
          <table:table-cell table:style-name="表格141.A3" office:value-type="string">
            <text:p text:style-name="P47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7">③ Micro-Segmentation 微分段</text:p>
          </table:table-cell>
          <table:table-cell table:style-name="表格141.A2" office:value-type="string">
            <text:p text:style-name="P47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7">④ Continuous Monitoring 持續監控</text:p>
          </table:table-cell>
          <table:table-cell table:style-name="表格141.A3" office:value-type="string">
            <text:p text:style-name="P47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54"><text:span text:style-name="T4">🔥 <text:s/></text:span><text:span text:style-name="T30">考前 10 秒超濃縮</text:span></text:p>
            <text:p text:style-name="P42">ZT 核心：不信任任何人（含內網）；檢查三件事——人（Identity）、機（Device）、境（Context）；搭配四招——MFA ＋ 最小權限 ＋ 微分段 ＋ 持續監控。</text:p>
            <text:p text:style-name="P41">口訣：人機境，多驗、少給、切塊、一直看。</text:p>
          </table:table-cell>
          <table:covered-table-cell/>
        </table:table-row>
      </table:table>
      <text:h text:style-name="P61" text:outline-level="3"><text:span text:style-name="T29">▍</text:span><text:span text:style-name="T30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8">Step</text:p>
            </table:table-cell>
            <table:table-cell table:style-name="表格142.A1" office:value-type="string">
              <text:p text:style-name="P28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7">1 發出存取請求</text:p>
          </table:table-cell>
          <table:table-cell table:style-name="表格142.A2" office:value-type="string">
            <text:p text:style-name="P47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7">2 身份驗證 Identity</text:p>
          </table:table-cell>
          <table:table-cell table:style-name="表格142.A3" office:value-type="string">
            <text:p text:style-name="P47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7">3 設備驗證 Device</text:p>
          </table:table-cell>
          <table:table-cell table:style-name="表格142.A2" office:value-type="string">
            <text:p text:style-name="P47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7">4 情境評估 Context</text:p>
          </table:table-cell>
          <table:table-cell table:style-name="表格142.A3" office:value-type="string">
            <text:p text:style-name="P47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7">5 權限比對</text:p>
          </table:table-cell>
          <table:table-cell table:style-name="表格142.A2" office:value-type="string">
            <text:p text:style-name="P47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7">6 授權或拒絕</text:p>
          </table:table-cell>
          <table:table-cell table:style-name="表格142.A3" office:value-type="string">
            <text:p text:style-name="P47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7">7 持續監控</text:p>
          </table:table-cell>
          <table:table-cell table:style-name="表格142.A2" office:value-type="string">
            <text:p text:style-name="P47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54"><text:span text:style-name="T4">⚠️ <text:s/></text:span><text:span text:style-name="T39">公職考試陷阱整理</text:span></text:p>
            <text:p text:style-name="P55"><text:span text:style-name="T16">ZT = 完全不相信員工？　</text:span><text:span text:style-name="T9">✗ 重點是「每次都驗證」，驗證通過員工仍可正常使用，只是不再預設信任。</text:span></text:p>
            <text:p text:style-name="P56"><text:span text:style-name="T16">只有外網才危險？　</text:span><text:span text:style-name="T9">✗ 內網也可能：帳號被盜、設備中毒、內部人員惡意操作，故內網也須驗證。</text:span></text:p>
            <text:p text:style-name="P56"><text:span text:style-name="T16">登入一次後就永久可信？　</text:span><text:span text:style-name="T9">✗ 持續驗證，單次登入不代表長期信任，高風險行為會觸發重新驗證。</text:span></text:p>
            <text:p text:style-name="P56"><text:span text:style-name="T16">Zero Trust 重視網路位置？（超常考）　</text:span><text:span text:style-name="T9">✗ 完全相反！重點從「位置」轉移到「身份 / 設備 / 情境」。</text:span></text:p>
          </table:table-cell>
          <table:covered-table-cell/>
        </table:table-row>
      </table:table>
      <text:h text:style-name="P25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54"><text:span text:style-name="T4">✅ <text:s/></text:span><text:span text:style-name="T30">你已經完成一輪</text:span></text:p>
            <text:p text:style-name="P42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54"><text:span text:style-name="T4">🎯 <text:s/></text:span><text:span text:style-name="T157">五個高頻拿分重點</text:span></text:p>
            <text:p text:style-name="P42">① 分層先記責任：應用給人用、傳輸怎麼送、網路走哪條、連結同區網。</text:p>
            <text:p text:style-name="P41">② 計算題動手練：VLSM「需求+2→最小 2ⁿ→/(32−n)」、可用主機「2^主機bit −2」。</text:p>
            <text:p text:style-name="P41">③ 流程要會串：上網＝DNS→ARP→NAT；TCP＝握手→Slow Start→CA→丟包降速。</text:p>
            <text:p text:style-name="P41">④ 易混成對背：FW/WAF/NGFW、IDS/IPS、HIDS/NIDS、SNMP/ICMP、EDR/MDR、RTO/RPO、Recursive/Iterative。</text:p>
            <text:p text:style-name="P41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21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329</meta:editing-cycles>
    <meta:creation-date>2026-06-12T00:41:46.189000000</meta:creation-date>
    <dc:date>2026-06-16T11:33:24.479000000</dc:date>
    <meta:generator>MODA_ODF_Application_Tools/3.8.4.2$Windows_X86_64 LibreOffice_project/4fb77107d5af14329e08085efe4fa19b5633383a</meta:generator>
    <meta:editing-duration>P2DT6H55M35S</meta:editing-duration>
    <meta:document-statistic meta:table-count="143" meta:image-count="0" meta:object-count="0" meta:page-count="51" meta:paragraph-count="2294" meta:word-count="29876" meta:character-count="47197" meta:non-whitespace-character-count="42590"/>
  </office:meta>
</office:document-meta>
</file>