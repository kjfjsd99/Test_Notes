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805cm"/>
    </style:style>
    <style:style style:name="表格66.B" style:family="table-column">
      <style:table-column-properties style:column-width="5.133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5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6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ff91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5ff" loext:opacity="100%" style:font-name="Microsoft JhengHei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48fb1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officeooo:paragraph-rsid="0180fc3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9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officeooo:paragraph-rsid="0182828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94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9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4d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5cae9" loext:opacity="100%" style:font-name="Microsoft JhengHei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00e676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officeooo:paragraph-rsid="01e58a9d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10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pt" fo:font-style="normal" fo:font-weight="bold" fo:background-color="#64ffda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03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officeooo:paragraph-rsid="01f29294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04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18ffff" loext:opacity="100%" style:font-name="Microsoft JhengHei" fo:font-size="12.5pt" fo:font-weight="bold" fo:background-color="#d500f9" style:font-name-asian="Microsoft JhengHei2" style:font-size-asian="12.5pt" style:font-weight-asian="bold" style:font-name-complex="Microsoft JhengHei2" style:font-size-complex="12.5pt" style:font-weight-complex="bold"/>
    </style:style>
    <style:style style:name="P10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0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11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11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4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5" style:family="text">
      <style:text-properties fo:color="#76ff03" loext:opacity="100%"/>
    </style:style>
    <style:style style:name="T76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7" style:family="text">
      <style:text-properties fo:color="#ffd740" loext:opacity="100%" fo:background-color="#3d5afe" loext:char-shading-value="0"/>
    </style:style>
    <style:style style:name="T78" style:family="text">
      <style:text-properties fo:color="#18ffff" loext:opacity="100%" fo:background-color="#d500f9" loext:char-shading-value="0"/>
    </style:style>
    <style:style style:name="T7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1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82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83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5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88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9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1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3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4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96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97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98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99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02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103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04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5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06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07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8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9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0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11" style:family="text">
      <style:text-properties fo:font-weight="bold" fo:background-color="#ffea00" loext:char-shading-value="0" style:font-weight-asian="bold" style:font-weight-complex="bold"/>
    </style:style>
    <style:style style:name="T112" style:family="text">
      <style:text-properties fo:font-weight="bold" fo:background-color="#76ff03" loext:char-shading-value="0" style:font-weight-asian="bold" style:font-weight-complex="bold"/>
    </style:style>
    <style:style style:name="T113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14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115" style:family="text">
      <style:text-properties fo:color="#ffff00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6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8" style:family="text">
      <style:text-properties fo:color="#64ffda" loext:opacity="100%" style:font-name="Microsoft JhengHei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9" style:family="text">
      <style:text-properties fo:color="#ffea00" loext:opacity="100%" fo:font-weight="bold" fo:background-color="#1b5e20" loext:char-shading-value="0" style:font-weight-asian="bold" style:font-weight-complex="bold"/>
    </style:style>
    <style:style style:name="T120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21" style:family="text">
      <style:text-properties fo:color="#ffea00" loext:opacity="100%" style:font-name="Microsoft JhengHei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00e5ff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000000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ffab9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f06292" loext:opacity="100%" fo:font-weight="bold" fo:background-color="#880e4f" loext:char-shading-value="0" style:font-weight-asian="bold" style:font-weight-complex="bold"/>
    </style:style>
    <style:style style:name="T126" style:family="text">
      <style:text-properties fo:color="#64ffda" loext:opacity="100%"/>
    </style:style>
    <style:style style:name="T127" style:family="text">
      <style:text-properties fo:color="#ffff00" loext:opacity="100%" style:font-name="Microsoft JhengHei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29" style:family="text">
      <style:text-properties fo:color="#ff5252" loext:opacity="100%" fo:font-weight="bold" fo:background-color="#01579b" loext:char-shading-value="0" style:font-weight-asian="bold" style:font-weight-complex="bold"/>
    </style:style>
    <style:style style:name="T130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31" style:family="text">
      <style:text-properties fo:color="#ff5252" loext:opacity="100%" fo:font-weight="bold" fo:background-color="#1a237e" loext:char-shading-value="0" style:font-weight-asian="bold" style:font-weight-complex="bold"/>
    </style:style>
    <style:style style:name="T132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33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34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35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36" style:family="text">
      <style:text-properties fo:color="#64ffda" loext:opacity="100%" fo:font-weight="bold" fo:background-color="#0d47a1" loext:char-shading-value="0" style:font-weight-asian="bold" style:font-weight-complex="bold"/>
    </style:style>
    <style:style style:name="T137" style:family="text">
      <style:text-properties fo:color="#b83227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8" style:family="text">
      <style:text-properties fo:color="#00e5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9" style:family="text">
      <style:text-properties fo:color="#00e676" loext:opacity="100%" fo:font-weight="bold" fo:background-color="#1b5e20" loext:char-shading-value="0" style:font-weight-asian="bold" style:font-weight-complex="bold"/>
    </style:style>
    <style:style style:name="T140" style:family="text">
      <style:text-properties fo:color="#ffd740" loext:opacity="100%" fo:font-weight="bold" fo:background-color="#bf360c" loext:char-shading-value="0" style:font-weight-asian="bold" style:font-weight-complex="bold"/>
    </style:style>
    <style:style style:name="T141" style:family="text">
      <style:text-properties fo:color="#ef9a9a" loext:opacity="100%" fo:font-weight="bold" fo:background-color="#b71c1c" loext:char-shading-value="0" style:font-weight-asian="bold" style:font-weight-complex="bold"/>
    </style:style>
    <style:style style:name="T142" style:family="text">
      <style:text-properties fo:color="#ffd740" loext:opacity="100%" fo:font-weight="bold" fo:background-color="#b71c1c" loext:char-shading-value="0" style:font-weight-asian="bold" style:font-weight-complex="bold"/>
    </style:style>
    <style:style style:name="T143" style:family="text">
      <style:text-properties fo:color="#c6ff00" loext:opacity="100%" fo:font-weight="bold" fo:background-color="#004d40" loext:char-shading-value="0" style:font-weight-asian="bold" style:font-weight-complex="bold"/>
    </style:style>
    <style:style style:name="T144" style:family="text">
      <style:text-properties fo:color="#64ffda" loext:opacity="100%" fo:font-weight="bold" fo:background-color="#006064" loext:char-shading-value="0" style:font-weight-asian="bold" style:font-weight-complex="bold"/>
    </style:style>
    <style:style style:name="T145" style:family="text">
      <style:text-properties fo:color="#ffff00" loext:opacity="100%" fo:background-color="#ff3d00" loext:char-shading-value="0"/>
    </style:style>
    <style:style style:name="T146" style:family="text">
      <style:text-properties fo:color="#b83c6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149" style:family="text">
      <style:text-properties fo:color="#18ffff" loext:opacity="100%" style:font-name="Microsoft JhengHei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151" style:family="text">
      <style:text-properties fo:color="#ffff00" loext:opacity="100%" fo:font-weight="bold" fo:background-color="#ffc400" loext:char-shading-value="0" style:font-weight-asian="bold" style:font-weight-complex="bold"/>
    </style:style>
    <style:style style:name="T152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153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154" style:family="text">
      <style:text-properties fo:color="#ffff00" loext:opacity="100%" fo:font-weight="bold" fo:background-color="#bf360c" loext:char-shading-value="0" style:font-weight-asian="bold" style:font-weight-complex="bold"/>
    </style:style>
    <style:style style:name="T155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56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57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58" style:family="text">
      <style:text-properties fo:background-color="#ffff00" loext:char-shading-value="0"/>
    </style:style>
    <style:style style:name="T159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23"> 將需求由大到小排序</text:span></text:p>
            <text:p text:style-name="P22"><text:span text:style-name="T10">② </text:span><text:span text:style-name="T69">計算每個需求所需前綴</text:span><text:span text:style-name="T10">：</text:span><text:span text:style-name="T36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65">子網路的起始位址必須是其大小的整數倍</text:span><text:span text:style-name="T4">。</text:span><text:span text:style-name="T70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1">再切大的 A（/25，128 個），最近可用對齊位址是 128</text:span><text:span text:style-name="T4"> → </text:span><text:span text:style-name="T72">中間 16～127 共 112 個 IP 全浪費！</text:span><text:span text:style-name="T4">正解：</text:span><text:span text:style-name="T31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3">前綴計算公式詳解</text:span><text:span text:style-name="T9">（以</text:span><text:span text:style-name="T74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12">加 2（預留網路 + 廣播）</text:span>：<text:span text:style-name="T20">100 + 2 = 102</text:span></text:p>
            <text:p text:style-name="P12">② <text:span text:style-name="T23">找「大於等於 102」的最小 2ⁿ</text:span>：2⁶ = 64（太小）、<text:span text:style-name="T28">2⁷ = 128（夠）→ n = 7</text:span></text:p>
            <text:p text:style-name="P12">③ <text:span text:style-name="T29">前綴 = 32 − n = 32 − 7 = 25</text:span> →<text:span text:style-name="T75"> </text:span><text:span text:style-name="T76">使用 /25（驗證：2⁷ = 128，可用 126 ≥ 100 ✔）</text:span></text:p>
            <text:p text:style-name="P70"><text:span text:style-name="T20">公式一句話</text:span>：<text:span text:style-name="T77">需求 +2 → 找最小 2ⁿ</text:span> → <text:span text:style-name="T78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16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12">/25</text:span>（0～<text:span text:style-name="T26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16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12">/26</text:span>（128～<text:span text:style-name="T26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16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12">/28</text:span>（192～<text:span text:style-name="T26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79">快速判斷一個 IP 屬於哪個 /26 子網</text:span>（<text:span text:style-name="T28">每段 64 個，起點 0、64、128、192</text:span>）：<text:span text:style-name="T16">看最後一個 Octet 落在哪個區間 </text:span>→</text:p>
            <text:p text:style-name="P12"><text:span text:style-name="T12">0～63</text:span> → x.0/26　｜　<text:span text:style-name="T12">64～127</text:span> → x.64/26　｜　<text:span text:style-name="T12">128～191</text:span> → x.128/26　｜　<text:span text:style-name="T12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<text:span text:style-name="T25">VLSM 把大網路切小</text:span>；<text:span text:style-name="T80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/text:span><text:span text:style-name="T81"><text:s/></text:span><text:span text:style-name="T82">合併三條件（缺一不可）</text:span></text:p>
            <text:p text:style-name="P11"><text:span text:style-name="T10">① </text:span><text:span text:style-name="T69">連續（Contiguous）</text:span><text:span text:style-name="T10">：</text:span><text:span text:style-name="T65">IP 範圍必須緊鄰</text:span><text:span text:style-name="T4">，</text:span><text:span text:style-name="T31">中間不能有空缺</text:span><text:span text:style-name="T4">。</text:span></text:p>
            <text:p text:style-name="P22"><text:span text:style-name="T10">② </text:span><text:span text:style-name="T69">數量是 2ⁿ</text:span><text:span text:style-name="T10">：</text:span><text:span text:style-name="T4">2、4、8…。</text:span></text:p>
            <text:p text:style-name="P22"><text:span text:style-name="T10">③ </text:span><text:span text:style-name="T69">起始位址對齊</text:span><text:span text:style-name="T10">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</text:span><text:span text:style-name="T83">2 個 /25 → 1 個 /24</text:span><text:span text:style-name="T15">　</text:span><text:span text:style-name="T4">192.168.1</text:span><text:span text:style-name="T35">.0</text:span><text:span text:style-name="T4">/25 ＋ 192.168.1</text:span><text:span text:style-name="T35">.128</text:span><text:span text:style-name="T4">/25 → ① 緊鄰✔ ② 2 個（2¹）✔ ③ 起點 .0，0÷256=0✔ → 合併為 192.168.1</text:span><text:span text:style-name="T35">.0</text:span><text:span text:style-name="T4">/24。</text:span></text:p>
            <text:p text:style-name="P22"><text:span text:style-name="T15">範例：</text:span><text:span text:style-name="T83">4 個 /24 → 1 個 /22</text:span><text:span text:style-name="T15">　</text:span><text:span text:style-name="T4">192.168</text:span><text:span text:style-name="T59">.0/1/2/3</text:span><text:span text:style-name="T4">.0/</text:span><text:span text:style-name="T55">24</text:span><text:span text:style-name="T4"> → 連續✔、4 個（2²）✔、對齊✔ → 合併為 192.168</text:span><text:span text:style-name="T84">.0</text:span><text:span text:style-name="T4">.0/</text:span><text:span text:style-name="T55">22</text:span><text:span text:style-name="T4">。</text:span></text:p>
            <text:p text:style-name="P22"><text:span text:style-name="T85">反例（無法合併）：</text:span><text:span text:style-name="T86">192.168.1.0/24 ＋ 192.168.2.0/24 → 雖數量為 2，但起點 .1 不對齊</text:span><text:span text:style-name="T4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</text:span><text:span text:style-name="T31">每合併一倍，/ 的數字減 1</text:span><text:span text:style-name="T4">）。</text:span></text:p>
            <text:p text:style-name="P12"><text:span text:style-name="T87">2 個 /26 → /25；4 個 /26 → /24；2 個 /24 → /23</text:span>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39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<text:span text:style-name="T12">由大到小</text:span>；<text:span text:style-name="T28">需求+2→2ⁿ→/(32−n)</text:span>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<text:span text:style-name="T29">連續</text:span> + 數量 2ⁿ + 對齊；<text:span text:style-name="T16">前綴減 n</text:span>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88">考試標準解題流程</text:span></text:p>
            <text:p text:style-name="P11"><text:span text:style-name="T89">遇到 VLSM 題：</text:span><text:span text:style-name="T90">確認起始網路</text:span><text:span text:style-name="T4"> → </text:span><text:span text:style-name="T91">需求由大到小</text:span><text:span text:style-name="T4"> → </text:span><text:span text:style-name="T92">各需求 +2 找 2ⁿ 算前綴</text:span><text:span text:style-name="T4"> → </text:span><text:span text:style-name="T93">大的先切</text:span><text:span text:style-name="T4">依序往後 → </text:span><text:span text:style-name="T94">驗證網路位址/廣播位址/可用範圍</text:span><text:span text:style-name="T4">。</text:span></text:p>
            <text:p text:style-name="P22"><text:span text:style-name="T89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(</text:span><text:span text:style-name="T95">一條網路，一次最多</text:span><text:span text:style-name="T19">)</text:span></text:h>
      <text:p text:style-name="P36"><text:span text:style-name="T16">MTU</text:span> ＝ <text:span text:style-name="T27">Maximum Transmission Unit，</text:span><text:span text:style-name="T96">一條網路</text:span><text:span text:style-name="T27">「</text:span><text:span text:style-name="T97">一次最多</text:span><text:span text:style-name="T27">能傳送的</text:span><text:span text:style-name="T98">封包大小</text:span><text:span text:style-name="T27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<text:span text:style-name="T29">若封包大小 &gt; MTU，就必須「切開」才能傳送</text:span>，這個動作就叫 <text:span text:style-name="T61">Fragmentation（分段）</text:span>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<text:span text:style-name="T12">MTU = 1500</text:span>（<text:span text:style-name="T28">每段扣掉 20 bytes IP Header</text:span>，<text:span text:style-name="T16">剩 1480 可放資料</text:span>）</text:p>
            <text:p text:style-name="P7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7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4">✅ 可以</text:p>
          </table:table-cell>
          <table:table-cell table:style-name="表格49.A3" office:value-type="string">
            <text:p text:style-name="P75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7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6">❌ 不行</text:p>
          </table:table-cell>
          <table:table-cell table:style-name="表格49.A4" office:value-type="string">
            <text:p text:style-name="P23"><text:span text:style-name="T53">Router 不分段</text:span>，<text:span text:style-name="T25">由送端自行處理</text:span>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</text:span><text:span text:style-name="T50">Total Length</text:span><text:span text:style-name="T34">：</text:span><text:span text:style-name="T4">封包總大小（Header + Data），最大 65535 bytes（16 bits）。</text:span></text:p>
            <text:p text:style-name="P22"><text:span text:style-name="T34">(2) </text:span><text:span text:style-name="T50">Identification</text:span><text:span text:style-name="T34">：</text:span><text:span text:style-name="T65">同一原始封包的所有分段共用同一 ID</text:span><text:span text:style-name="T4">；</text:span><text:span text:style-name="T99">接收端靠此 ID 判斷哪些 fragment 要拼在一起</text:span><text:span text:style-name="T4">。</text:span></text:p>
            <text:p text:style-name="P22"><text:span text:style-name="T34">(3) </text:span><text:span text:style-name="T50">Fragment Offset</text:span><text:span text:style-name="T34">：</text:span><text:span text:style-name="T31">這段資料在原始封包中的「起始位置」</text:span><text:span text:style-name="T4">。⚠️ 單位是 8 bytes（欄位僅 13 bits）→ </text:span><text:span text:style-name="T31">Offset = 起始位置 ÷ 8</text:span><text:span text:style-name="T4">。</text:span></text:p>
            <text:p text:style-name="P22"><text:span text:style-name="T34">(4) </text:span><text:span text:style-name="T50">TTL</text:span><text:span text:style-name="T34">：</text:span><text:span text:style-name="T100">最多可經過幾個 Router；每經過一個 −1</text:span><text:span text:style-name="T4">，</text:span><text:span text:style-name="T94">歸零時 Router 丟棄並回 ICMP「Time Exceeded」</text:span><text:span text:style-name="T4">。常見初始值 Linux=64、Windows=128。traceroute 即利用 TTL。</text:span></text:p>
            <text:p text:style-name="P22"><text:span text:style-name="T34">(5) </text:span><text:span text:style-name="T50">Protocol</text:span><text:span text:style-name="T34">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7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<text:span text:style-name="T20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<text:span text:style-name="T20">2960 ÷ 8</text:span>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77">ICMP</text:p>
          </table:table-cell>
          <table:table-cell table:style-name="表格50.A3" table:number-columns-spanned="2" office:value-type="string">
            <text:p text:style-name="P78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39">DF</text:p>
          </table:table-cell>
          <table:table-cell table:style-name="表格51.A2" office:value-type="string">
            <text:p text:style-name="P39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38">MF</text:p>
          </table:table-cell>
          <table:table-cell table:style-name="表格51.A3" office:value-type="string">
            <text:p text:style-name="P38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<text:span text:style-name="T16">DF=1，不准切</text:span>）→ ② 到某 Router，發現<text:span text:style-name="T101">封包 &gt; 該路段 MTU</text:span> → ③ <text:span text:style-name="T102">Router 不能切，直接丟棄 </text:span>→ ④ <text:span text:style-name="T103">Router 回傳 ICMP「Fragmentation Needed」（含可用 MTU 大小）</text:span>→ ⑤ <text:span text:style-name="T28">送端調整封包大小後</text:span><text:span text:style-name="T104">重送</text:span>。這就是 <text:span text:style-name="T12">PMTUD 的核心機制</text:span>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<text:span text:style-name="T16">PMTUD </text:span>＝<text:span text:style-name="T104"> Path MTU Discovery，自動找出</text:span><text:span text:style-name="T105">來源到目的地</text:span><text:span text:style-name="T104">整條路徑中</text:span><text:span text:style-name="T106">最小的 MTU 值</text:span>。<text:span text:style-name="T17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79">IPv4</text:p>
          </table:table-cell>
          <table:table-cell table:style-name="表格52.A2" office:value-type="string">
            <text:p text:style-name="P80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79">IPv6</text:p>
          </table:table-cell>
          <table:table-cell table:style-name="表格52.A3" office:value-type="string">
            <text:p text:style-name="P80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<text:span text:style-name="T29">TCP 不依賴 IP 層切封包，而是「自己先控制好大小」</text:span>，<text:span text:style-name="T16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107">MSS = MTU − IP Header − TCP Header </text:span><text:span text:style-name="T4">= </text:span><text:span text:style-name="T35">1500 − 20 − 20 = 1460 bytes</text:span><text:span text:style-name="T4">。</text:span><text:span text:style-name="T108">三向交握時雙方各自宣告 MSS，之後每段 ≤ MSS</text:span><text:span text:style-name="T4">，</text:span><text:span text:style-name="T35">讓 IP 層不需分段</text:span><text:span text:style-name="T4">。</text:span></text:p>
            <text:p text:style-name="P22"><text:span text:style-name="T34">搭配 DF=1 + PMTUD：</text:span><text:span text:style-name="T4">TCP 連線設 DF=1 禁止 Router 分段；</text:span><text:span text:style-name="T65">若收到 ICMP「Fragmentation Needed」，自動調低 MSS 重試</text:span><text:span text:style-name="T4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88">結論</text:span></text:p>
            <text:p text:style-name="P18"><text:span text:style-name="T61">TCP = 主動控制大小（MSS）＋ DF=1 ＋ PMTUD</text:span>，<text:span text:style-name="T109">從源頭就避免 Fragmentation 發生</text:span>。<text:span text:style-name="T110">TCP 做 Segmentation 的主要目的之一，就是讓每個封包符合 MTU</text:span>，從而避免 IP 再做 Fragmentation。</text:p>
          </table:table-cell>
        </table:table-row>
      </table:table>
      <text:h text:style-name="P19" text:outline-level="2">拾肆、Fragmentation DoS 攻擊</text:h>
      <text:p text:style-name="P36"><text:span text:style-name="T28">攻擊者利用「接收端重組封包很耗資源」這個特性</text:span>，<text:span text:style-name="T29">刻意製造大量異常 Fragment</text:span>。正常重組流程：收到 Fragment <text:span text:style-name="T27">放入緩衝區 </text:span>→ <text:span text:style-name="T103">等同一 ID 的所有 Fragment 到齊 → 依</text:span><text:span text:style-name="T24"> Offset </text:span><text:span text:style-name="T103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55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55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<text:span text:style-name="T12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55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88">防禦方式</text:span></text:p>
            <text:p text:style-name="P18">防禦：<text:span text:style-name="T111">設定重組 buffer 上限</text:span>避免無限占用記憶體；<text:span text:style-name="T112">丟棄等待過久或異常的 Fragment</text:span>；<text:span text:style-name="T17">部署 IDS / Firewall 偵測異常分段</text:span>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80">Identification</text:p>
          </table:table-cell>
          <table:table-cell table:style-name="表格55.A2" office:value-type="string">
            <text:p text:style-name="P79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80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81">PMTUD</text:p>
          </table:table-cell>
          <table:table-cell table:style-name="表格55.A2" office:value-type="string">
            <text:p text:style-name="P82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83">TTL</text:p>
          </table:table-cell>
          <table:table-cell table:style-name="表格55.A3" office:value-type="string">
            <text:p text:style-name="P84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80">MSS</text:p>
          </table:table-cell>
          <table:table-cell table:style-name="表格55.A2" office:value-type="string">
            <text:p text:style-name="P79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<text:span text:style-name="T28">32 bit</text:span>，約 43 億個 IP，已嚴重不足</text:p>
          </table:table-cell>
          <table:table-cell table:style-name="表格57.A2" office:value-type="string">
            <text:p text:style-name="P23"><text:span text:style-name="T110">128 bit</text:span>，約 3.4×10³⁸ 個，幾乎用不完</text:p>
          </table:table-cell>
        </table:table-row>
        <table:table-row table:style-name="表格57.3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<text:span text:style-name="T16">需 NAT 共用 IP</text:span>，破壞 End-to-End</text:p>
          </table:table-cell>
          <table:table-cell table:style-name="表格57.A3" office:value-type="string">
            <text:p text:style-name="P23"><text:span text:style-name="T12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<text:span text:style-name="T16">須另裝 VPN</text:span></text:p>
          </table:table-cell>
          <table:table-cell table:style-name="表格57.A2" office:value-type="string">
            <text:p text:style-name="P23"><text:span text:style-name="T113">支援 IPsec</text:span><text:span text:style-name="T12">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<text:span text:style-name="T16">可變長度</text:span>含 Options，Router 效率低</text:p>
          </table:table-cell>
          <table:table-cell table:style-name="表格57.A3" office:value-type="string">
            <text:p text:style-name="P23"><text:span text:style-name="T12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79">無法有效標記流量優先權</text:p>
          </table:table-cell>
          <table:table-cell table:style-name="表格57.A2" office:value-type="string">
            <text:p text:style-name="P23"><text:span text:style-name="T12">Flow Label 欄位</text:span>，<text:span text:style-name="T30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<text:span text:style-name="T16">Broadcast</text:span>：一次發給所有人，浪費頻寬</text:p>
          </table:table-cell>
          <table:table-cell table:style-name="表格57.A3" office:value-type="string">
            <text:p text:style-name="P23">改用<text:span text:style-name="T12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<text:span text:style-name="T17">需手動設定或 DHCP</text:span>，管理繁瑣</text:p>
          </table:table-cell>
          <table:table-cell table:style-name="表格57.A2" office:value-type="string">
            <text:p text:style-name="P23">SLAAC 無狀態自動配置，<text:span text:style-name="T29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<text:span text:style-name="T23">Dual Stack（雙協定堆疊）</text:span>— 最常用、最推薦</text:p>
            <text:p text:style-name="P12"><text:span text:style-name="T114">裝置同時具備 IPv4 與 IPv6 兩套協定堆疊</text:span>。<text:span text:style-name="T16">DNS A record → 回傳 IPv4；DNS AAAA record → 回傳 IPv6</text:span>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85">②<text:span text:style-name="T23"> Tunneling（隧道技術）</text:span>— 過渡期橋接方案</text:p>
            <text:p text:style-name="P12">中間網路只支援 IPv4，無法直接傳送 IPv6 封包。解法：<text:span text:style-name="T114">將 IPv6 封包完整封裝進 IPv4 外殼，抵達目的地後拆除外層 IPv4、還原 IPv6 封包</text:span>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86">③ <text:span text:style-name="T23">Translation（NAT64）</text:span>— 協定轉換、互通最後手段</text:p>
            <text:p text:style-name="P12">適用場景：IPv6-only 裝置需與 IPv4-only 裝置直接通訊。<text:span text:style-name="T109">透過轉換閘道器即時將封包表頭轉換為對方格式</text:span>。代表技術：NAT64 + DNS64。<text:span text:style-name="T101">複雜度最高，有額外效能損耗</text:span>。</text:p>
            <text:p text:style-name="P12">示意：IPv6 裝置 → [ NAT64 <text:span text:style-name="T27">轉換閘道</text:span>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<text:span text:style-name="T16">同時會中文 + 英文</text:span>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<text:span text:style-name="T29">把英文信裝進中文信封偷渡過去</text:span>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<text:span text:style-name="T103">現場請翻譯員</text:span>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44">IPv4 的困境：整棟公寓共用一個門牌</text:span><text:span text:style-name="T115">（NAT）</text:span><text:span text:style-name="T4">，郵差只送到大門，裡面誰是誰要另外猜；地址快用光還在借號碼。</text:span></text:p>
            <text:p text:style-name="P22"><text:span text:style-name="T65">IPv6 的世界：每個人都有獨立門牌（公開 IP）</text:span><text:span text:style-name="T4">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</text:span><text:span text:style-name="T116">安全（IPsec）</text:span><text:span text:style-name="T4">＋ </text:span><text:span text:style-name="T94">快（固定 Header）</text:span><text:span text:style-name="T4">＋ 自動（SLAAC）＋ 乾淨（無 Broadcast）。</text:span></text:p>
            <text:p text:style-name="P22"><text:span text:style-name="T117">過渡技術</text:span><text:span text:style-name="T48">：</text:span><text:span text:style-name="T4">雙語（</text:span><text:span text:style-name="T35">Dual Stack</text:span><text:span text:style-name="T4">）＋ 偽裝（</text:span><text:span text:style-name="T35">Tunneling</text:span><text:span text:style-name="T4">）＋ 翻譯（</text:span><text:span text:style-name="T35">Translation</text:span><text:span text:style-name="T4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<text:span text:style-name="T67">Header 可變效率低</text:span>／缺 QoS／用 Broadcast 浪費／IP 需手動設定</text:p>
          </table:table-cell>
          <table:table-cell table:style-name="表格60.A3" office:value-type="string">
            <text:p text:style-name="P23">128 bit 近乎無限／不需 NAT 恢復 E2E／<text:span text:style-name="T113">支援 IPsec</text:span>／<text:span text:style-name="T113">固定 40 bytes 轉送快</text:span>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8">IP 位址決定「最終送到哪台電腦」；MAC 位址決定「目前這一跳要交給哪個網路設備」。</text:p>
            <text:p text:style-name="P12"><text:span text:style-name="T106">資料在網路中「實際傳送」靠 MAC</text:span>，<text:span text:style-name="T110">但我們只知道對方的 IP</text:span>——所以<text:span text:style-name="T30">需要一個轉換機制</text:span>，這就是 ARP 的工作。</text:p>
          </table:table-cell>
        </table:table-row>
      </table:table>
      <text:h text:style-name="P19" text:outline-level="2">一、ARP（Address Resolution Protocol）：<text:span text:style-name="T20">IP → MAC</text:span></text:h>
      <text:p text:style-name="P36">一句話定義：<text:span text:style-name="T12">ARP</text:span> ＝ <text:span text:style-name="T29">用 IP 找 MAC</text:span>，<text:span text:style-name="T28">只在同一個區域網路（LAN）內使用</text:span>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</text:span><text:span text:style-name="T50">查 ARP Cache（筆記本）</text:span><text:span text:style-name="T34">：</text:span><text:span text:style-name="T4">先查自己的記錄「</text:span><text:span text:style-name="T118">我之前有沒有問過這個 IP？</text:span><text:span text:style-name="T4">」有 → 直接用。</text:span></text:p>
            <text:p text:style-name="P22"><text:span text:style-name="T34">② </text:span><text:span text:style-name="T50">發出 ARP Request（廣播）</text:span><text:span text:style-name="T34">：</text:span><text:span text:style-name="T4">沒記錄 →</text:span><text:span text:style-name="T100"> 對整個區網廣播</text:span><text:span text:style-name="T4">「誰是 192.168.1.5？</text:span><text:span text:style-name="T100">請告訴我你的 MAC！</text:span><text:span text:style-name="T4">」所有機器都收到。</text:span></text:p>
            <text:p text:style-name="P22"><text:span text:style-name="T34">③ </text:span><text:span text:style-name="T50">收到 ARP Reply（單播回應）</text:span><text:span text:style-name="T34">：</text:span><text:span text:style-name="T41">IP 是 192.168.1.5 的機器回應「我是！MAC 是 AA:BB:CC」</text:span><text:span text:style-name="T4">，其餘機器靜默忽略。</text:span></text:p>
            <text:p text:style-name="P22"><text:span text:style-name="T34">④ </text:span><text:span text:style-name="T50">存進 ARP Cache</text:span><text:span text:style-name="T34">：</text:span><text:span text:style-name="T83">把「IP ↔ MAC」對應記下</text:span><text:span text:style-name="T4">，</text:span><text:span text:style-name="T65">下次直接用</text:span><text:span text:style-name="T4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87">ARP Spoofing（ARP 欺騙）</text:p>
          </table:table-cell>
          <table:table-cell table:style-name="表格62.A3" office:value-type="string">
            <text:p text:style-name="P23"><text:span text:style-name="T110">攻擊者</text:span><text:span text:style-name="T119">假冒他人</text:span><text:span text:style-name="T110">的 MAC，讓封包被送到錯的地方</text:span> → 中間人攻擊（MITM）</text:p>
          </table:table-cell>
        </table:table-row>
        <table:table-row table:style-name="表格62.1">
          <table:table-cell table:style-name="表格62.A4" office:value-type="string">
            <text:p text:style-name="P79">arp -a</text:p>
          </table:table-cell>
          <table:table-cell table:style-name="表格62.A4" office:value-type="string">
            <text:p text:style-name="P23"><text:span text:style-name="T106">查看本機的 ARP 對應表</text:span>（<text:span text:style-name="T111">IP ↔ MAC 清單</text:span>）</text:p>
          </table:table-cell>
        </table:table-row>
        <table:table-row table:style-name="表格62.1">
          <table:table-cell table:style-name="表格62.A3" office:value-type="string">
            <text:p text:style-name="P88">ping [IP]</text:p>
          </table:table-cell>
          <table:table-cell table:style-name="表格62.A3" office:value-type="string">
            <text:p text:style-name="P23"><text:span text:style-name="T29">觸發 ARP 運作</text:span>，<text:span text:style-name="T28">讓電腦主動查詢對應 MAC</text:span></text:p>
          </table:table-cell>
        </table:table-row>
      </table:table>
      <text:h text:style-name="P19" text:outline-level="2">二、NAT（Network Address Translation）：私網 → 公網</text:h>
      <text:p text:style-name="P36">一句話定義：<text:span text:style-name="T16">NAT</text:span> ＝ <text:span text:style-name="T120">路由器幫你把「私有 IP」改成「公網 IP」</text:span>，讓內部機器能夠上網。<text:span text:style-name="T52">私有 IP（如 192.168.1.2）外網看不到，只在家裡用</text:span>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<text:span text:style-name="T30">封包抵達路由器</text:span>，<text:span text:style-name="T28">NAT 把來源 IP 改成公網 IP（220.x.x.x）</text:span><text:span text:style-name="T67">對外偽裝身份</text:span>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80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89">一個私有 IP ↔ 一個公網 IP</text:p>
          </table:table-cell>
          <table:table-cell table:style-name="表格63.A3" office:value-type="string">
            <text:p text:style-name="P89">固定對應</text:p>
          </table:table-cell>
        </table:table-row>
        <table:table-row table:style-name="表格63.1">
          <table:table-cell table:style-name="表格63.A4" office:value-type="string">
            <text:p text:style-name="P80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90">多個私有 IP 對應 IP 池（pool）</text:p>
          </table:table-cell>
          <table:table-cell table:style-name="表格63.A4" office:value-type="string">
            <text:p text:style-name="P90">動態分配</text:p>
          </table:table-cell>
        </table:table-row>
        <table:table-row table:style-name="表格63.1">
          <table:table-cell table:style-name="表格63.A3" office:value-type="string">
            <text:p text:style-name="P87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91">多台共用一個公網 IP</text:p>
          </table:table-cell>
          <table:table-cell table:style-name="表格63.A3" office:value-type="string">
            <text:p text:style-name="P91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21">破壞 End-to-End 連線</text:span><text:span text:style-name="T11">（最重要）：</text:span><text:span text:style-name="T4">原本你↔對方是真正點對點；</text:span><text:span text:style-name="T35">有 NAT 後變成你→NAT→對方，多一層轉換，不再是端對端</text:span><text:span text:style-name="T4">。</text:span></text:p>
            <text:p text:style-name="P22"><text:span text:style-name="T121">P2P / VoIP 難以運作</text:span><text:span text:style-name="T11">：</text:span><text:span text:style-name="T65">外部機器找不到你（被藏在 NAT 後）</text:span><text:span text:style-name="T4">，P2P 下載、VoIP 通話等</text:span><text:span text:style-name="T122">直連功能受限</text:span><text:span text:style-name="T4">。</text:span></text:p>
            <text:p text:style-name="P22"><text:span text:style-name="T121">增加延遲</text:span><text:span text:style-name="T11">：</text:span><text:span text:style-name="T123">每個封包都需要</text:span><text:span text:style-name="T124">多一道 IP 轉換處理</text:span><text:span text:style-name="T4">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<text:span text:style-name="T16">核心問題</text:span>：<text:span text:style-name="T30">外面的人只看到一個公網 IP</text:span>，但<text:span text:style-name="T125">內部有多台機器，路由器不知道要轉給哪一台</text:span>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<text:span text:style-name="T23">Port Forwarding（手動指定轉發）</text:span></text:p>
            <text:p text:style-name="P12">比喻：<text:span text:style-name="T110">Port＝房間號碼</text:span>；<text:span text:style-name="T120">NAT 路由器＝大樓</text:span>；<text:span text:style-name="T110">Port Forwarding＝門口指示牌「80 號房 → 192.168.1.2」</text:span>。例：220.x.x.x:80 → 192.168.1.2:80（<text:span text:style-name="T126">網頁</text:span>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127">每個服務都要手動設定，IP 改變要重設</text:span><text:span text:style-name="T4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<text:span text:style-name="T23">UPnP（自動版 Port Forwarding）</text:span></text:p>
            <text:p text:style-name="P12"><text:span text:style-name="T128">讓裝置自動跟</text:span><text:span text:style-name="T129">路由器</text:span><text:span text:style-name="T128">要求「幫我開一個 Port」，不需人工設定。</text:span>① <text:span text:style-name="T130">應用程式發 UPnP 請求</text:span> → ② <text:span text:style-name="T131">路由器</text:span><text:span text:style-name="T130">自動新增 Port Forwarding 規則</text:span> → ③<text:span text:style-name="T113"> 服務結束後自動清除</text:span>（理想情況）。</text:p>
            <text:p text:style-name="P22"><text:span text:style-name="T15">優點：</text:span><text:span text:style-name="T4">全自動、對一般用戶友善。</text:span><text:span text:style-name="T85">安全風險（重要）：</text:span><text:span text:style-name="T127">惡意程式也能透過 UPnP 自動開 Port，可能讓攻擊者直接連入內網</text:span><text:span text:style-name="T4">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86">方法三：<text:span text:style-name="T23">STUN（打洞技術）</text:span></text:p>
            <text:p text:style-name="P12"><text:span text:style-name="T16">使用情境</text:span>：<text:span text:style-name="T132">兩端都在各自 NAT 後面，彼此都是私有 IP、互相找不到。STUN 先幫每端「查清楚自己對外的公網 IP + Port」，再交換資訊</text:span>嘗試直接打通。</text:p>
            <text:p text:style-name="P12">① <text:span text:style-name="T133">問 STUN 伺服器「我對外的 IP 和 Port 是什麼？」</text:span>② <text:span text:style-name="T133">STUN 回「你對外是 220.x.x.x:12345」</text:span>③ <text:span text:style-name="T52">朋友也做同樣的事</text:span> → ④ <text:span text:style-name="T133">兩端透過第三方交換彼此公網位址</text:span> → ⑤ <text:span text:style-name="T133">同時互相發送封包打洞（Hole Punching）</text:span>。</text:p>
            <text:p text:style-name="P22"><text:span text:style-name="T85">重要限制：</text:span><text:span text:style-name="T127">STUN 只對部分 NAT 類型有效</text:span><text:span text:style-name="T4">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80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80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80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85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<text:span text:style-name="T16">場景</text:span>：<text:span text:style-name="T134">你電腦 192.168.1.2／路由器內網 IP 192.168.1.1／路由器公網 IP 220.x.x.x／目標 google.com</text:span>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(<text:span text:style-name="T39">Google 的 IP</text:span>)</text:p>
            <text:p text:style-name="P46">(電腦必須知道目的地在哪)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92">找路由器（192.168.1.1）的 MAC(<text:span text:style-name="T110">發現 Google </text:span><text:span text:style-name="T119">不在同一個區網</text:span><text:span text:style-name="T110">，必須交給路由器幫忙送</text:span>)(<text:span text:style-name="T120">查詢路由器的 MAC，下一站是路由器</text:span>)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<text:span text:style-name="T67">送封包</text:span></text:p>
          </table:table-cell>
          <table:table-cell table:style-name="表格66.A2" office:value-type="string">
            <text:p text:style-name="P46">IP=Google；MAC=路由器(<text:span text:style-name="T135">IP 記</text:span><text:soft-page-break/><text:span text:style-name="T135">錄最終目的地；MAC 記錄下一站</text:span>)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93"><text:span text:style-name="T27">192.168.1.2 → 220.x.x.x</text:span>(<text:span text:style-name="T136">路由器收到後往 Internet 送</text:span>；路由器負責跨網路傳遞)(<text:span text:style-name="T136">私有 IP 換成公網 IP，因Internet 不認私有 IP</text:span>)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<text:span text:style-name="T30">封包抵達目的地</text:span>(<text:span text:style-name="T132">Google 看到公網 IP</text:span>)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<text:span text:style-name="T104">回傳給 220.x.x.x</text:span>(<text:span text:style-name="T133">回到路由器再回到你電腦</text:span>)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<text:span text:style-name="T27">220.x.x.x → 192.168.1.2</text:span>(<text:span text:style-name="T110">NAT 依記錄轉回正確主機</text:span>)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137">✗ 以為 ARP 是找 Google 的 MAC</text:span><text:span text:style-name="T85">　→　</text:span><text:span text:style-name="T138">✓ ARP 找的是「路由器」的 MAC！</text:span><text:span text:style-name="T4">因為 ARP 只能在同一個 LAN 內使用。</text:span></text:p>
            <text:p text:style-name="P22"><text:span text:style-name="T137">✗ 以為封包直接送到 Google</text:span><text:span text:style-name="T85">　→　</text:span><text:span text:style-name="T138">✓ 封包先送給路由器，路由器再轉到 Internet</text:span><text:span text:style-name="T4">。</text:span></text:p>
            <text:p text:style-name="P22"><text:span text:style-name="T137">✗ 以為 IP 在傳輸過程中一直不變</text:span><text:span text:style-name="T85">　→　</text:span><text:span text:style-name="T138">✓ NAT 會在去程改掉來源 IP，回程再改回去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88">考試標準答案（直接背）</text:span></text:p>
            <text:p text:style-name="P18"><text:span text:style-name="T12">使用者輸入網址後</text:span>，<text:span text:style-name="T139">先透過 DNS 將網域名稱解析為 IP</text:span>；<text:span text:style-name="T113">接著主機利用 ARP 取得路由器（預設閘道）的 MAC</text:span>，<text:span text:style-name="T113">將封包傳送至路由器</text:span>；<text:span text:style-name="T140">路由器透過 NAT 將私有 IP 轉換為公網 IP 後送往 Internet</text:span>；<text:span text:style-name="T52">目的主機回應後，路由器再透過 NAT 將封包轉回原內部主機</text:span>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94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95">用 IP 找 MAC</text:p>
          </table:table-cell>
          <table:table-cell table:style-name="表格67.A2" office:value-type="string">
            <text:p text:style-name="P96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79">區域網路（LAN）內</text:p>
          </table:table-cell>
          <table:table-cell table:style-name="表格67.A3" office:value-type="string">
            <text:p text:style-name="P80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97">L2 / L3 交界</text:p>
          </table:table-cell>
          <table:table-cell table:style-name="表格67.A2" office:value-type="string">
            <text:p text:style-name="P98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79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<text:span text:style-name="T12">重傳</text:span>機制（Retransmission）</text:p>
          </table:table-cell>
        </table:table-row>
        <table:table-row table:style-name="表格69.1">
          <table:table-cell table:style-name="表格69.A3" office:value-type="string">
            <text:p text:style-name="P79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<text:span text:style-name="T12">序號</text:span>機制（Sequence Number）</text:p>
          </table:table-cell>
        </table:table-row>
        <table:table-row table:style-name="表格69.1">
          <table:table-cell table:style-name="表格69.A2" office:value-type="string">
            <text:p text:style-name="P79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<text:span text:style-name="T12">流量</text:span>控制（Flow Control / rwnd）</text:p>
          </table:table-cell>
        </table:table-row>
        <table:table-row table:style-name="表格69.1">
          <table:table-cell table:style-name="表格69.A3" office:value-type="string">
            <text:p text:style-name="P79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<text:span text:style-name="T12">擁塞</text:span>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99">需要先建立連線</text:p>
          </table:table-cell>
          <table:table-cell table:style-name="表格70.A2" office:value-type="string">
            <text:p text:style-name="P88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80">網頁、檔案傳輸、Email</text:p>
          </table:table-cell>
          <table:table-cell table:style-name="表格70.A2" office:value-type="string">
            <text:p text:style-name="P23"><text:span text:style-name="T12">直播、遊戲</text:span>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79">專業物流（簽收確認）</text:p>
          </table:table-cell>
          <table:table-cell table:style-name="表格70.A3" office:value-type="string">
            <text:p text:style-name="P79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</text:span><text:span text:style-name="T50">SYN</text:span><text:span text:style-name="T34">　</text:span><text:span text:style-name="T4">「我可以傳資料給你嗎？我準備好了。」（Synchronize 同步請求）</text:span></text:p>
            <text:p text:style-name="P22"><text:span text:style-name="T34">② Server → Client：</text:span><text:span text:style-name="T50">SYN + ACK</text:span><text:span text:style-name="T34">　</text:span><text:span text:style-name="T4">「可以！我收到你的請求了，我也準備好了。」（確認＋同步）</text:span></text:p>
            <text:p text:style-name="P22"><text:span text:style-name="T34">③ Client → Server：</text:span><text:span text:style-name="T50">ACK</text:span><text:span text:style-name="T34">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<text:span text:style-name="T141">避免「</text:span><text:span text:style-name="T142">舊封包誤觸發新連線</text:span><text:span text:style-name="T141">」</text:span>：若少一次確認，<text:span text:style-name="T128">延遲的舊 SYN 封包可能讓 Server 誤以為要建立新連線</text:span>。</text:p>
          </table:table-cell>
        </table:table-row>
      </table:table>
      <text:h text:style-name="P19" text:outline-level="2">四、攻擊：SYN Flood</text:h>
      <text:p text:style-name="P36">攻擊原理：攻擊者大量發送 SYN 封包，但<text:span text:style-name="T143">故意不完成第三次握手（</text:span><text:span text:style-name="T28">不回 ACK</text:span><text:span text:style-name="T143">）</text:span>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<text:span text:style-name="T16">送出大量 SYN</text:span>，每個都<text:span text:style-name="T12">假冒不同來源 IP</text:span>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<text:span text:style-name="T144">Server 建立「半連線（Half-open Connection）」</text:span>，<text:span text:style-name="T27">每個都佔記憶體等待 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<text:span text:style-name="T132">攻擊者永遠不回 ACK</text:span>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<text:span text:style-name="T16">正常用戶連線失敗</text:span>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<text:span text:style-name="T12">DoS（拒絕服務）攻擊</text:span>，利用 TCP 三次握手機制的不對稱性。</text:p>
          </table:table-cell>
          <table:covered-table-cell/>
        </table:table-row>
      </table:table>
      <text:h text:style-name="P19" text:outline-level="2">五、傳送速度的兩個限制：<text:span text:style-name="T145">rwnd</text:span> 與 <text:span text:style-name="T145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<text:span text:style-name="T130">對方 buffer（暫存區）還剩多少空間</text:span>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<text:span text:style-name="T110">目前網路最多能承受多少資料量</text:span>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146">實際傳送量 ＝ min(rwnd, cwnd)</text:span><text:span text:style-name="T48">　</text:span><text:span text:style-name="T35">取兩者最小值</text:span><text:span text:style-name="T4">。</text:span><text:span text:style-name="T147">對方吃不下就看 rwnd；網路塞就看 cwnd</text:span><text:span text:style-name="T4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<text:span text:style-name="T20">最笨的方法：送 1 個封包 → 等 ACK → 再送 1 個 → 等 ACK</text:span>，<text:span text:style-name="T142">大部分時間在閒置，非常浪費</text:span>。<text:span text:style-name="T12">TCP 的改進</text:span>：<text:span text:style-name="T148">不用等 ACK，先連續送出多個封包讓封包都在網路上飛（in-flight），ACK 再慢慢回來</text:span>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85">✗ 常見錯誤：</text:span><text:span text:style-name="T4">視窗 = cwnd（擁塞視窗）。</text:span><text:span text:style-name="T89">✓ 正確：</text:span><text:span text:style-name="T149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77">收到 ACK 1</text:p>
          </table:table-cell>
          <table:table-cell table:style-name="表格74.A4" office:value-type="string">
            <text:p text:style-name="P100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77">收到 ACK 2</text:p>
          </table:table-cell>
          <table:table-cell table:style-name="表格74.A3" office:value-type="string">
            <text:p text:style-name="P100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<text:span text:style-name="T133">ACK 的回傳決定視窗位置（往前滑）</text:span>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<text:span text:style-name="T27">每收到一個 ACK，cwnd 就 +1</text:span>；<text:span text:style-name="T120">送出 N 個封包 → 收回 N 個 ACK → cwnd 增加 N</text:span>，所以每輪自然翻倍。(<text:span text:style-name="T128">Slow Start = 每一輪變 2 倍，Congestion Avoidance = 每一輪只加 1</text:span>(「<text:span text:style-name="T150">Slow Start翻倍，壅塞避免加一</text:span>」))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<text:span text:style-name="T110">cwnd 成長到門檻值（ssthresh）後，改為線性成長</text:span>（<text:span text:style-name="T27">每個 RTT 只 +1</text:span>），<text:span text:style-name="T16">避免增長太快讓網路過載</text:span>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94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77">cwnd &lt; ssthresh</text:p>
          </table:table-cell>
          <table:table-cell table:style-name="表格76.A2" office:value-type="string">
            <text:p text:style-name="P77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<text:span text:style-name="T120">指數成長</text:span>（<text:span text:style-name="T151">每個 ACK +1</text:span>）</text:p>
          </table:table-cell>
          <table:table-cell table:style-name="表格76.A3" office:value-type="string">
            <text:p text:style-name="P101"><text:span text:style-name="T132">線性成長</text:span>（<text:span text:style-name="T151">每個 RTT +1</text:span>）(<text:span text:style-name="T148">RTT ：Round Trip Time（往返時間）= 封包出去 + ACK 回來的一個來回時間</text:span>)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71">Timeout（逾時）</text:p>
          </table:table-cell>
          <table:table-cell table:style-name="表格77.A2" office:value-type="string">
            <text:p text:style-name="P46"><text:span text:style-name="T16">等太久沒 ACK</text:span>，<text:span text:style-name="T101">網路嚴重擁塞</text:span></text:p>
          </table:table-cell>
          <table:table-cell table:style-name="表格77.A2" office:value-type="string">
            <text:p text:style-name="P46">= <text:span text:style-name="T28">cwnd / 2</text:span>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102">重新進入 Slow Start</text:p>
          </table:table-cell>
        </table:table-row>
        <table:table-row table:style-name="表格77.1">
          <table:table-cell table:style-name="表格77.A3" office:value-type="string">
            <text:p text:style-name="P71">3 個重複 ACK (Fast Retransmit)</text:p>
          </table:table-cell>
          <table:table-cell table:style-name="表格77.A3" office:value-type="string">
            <text:p text:style-name="P46"><text:span text:style-name="T16">連續收 3 個同樣 ACK</text:span>，<text:span text:style-name="T68">單一封包丟失</text:span></text:p>
          </table:table-cell>
          <table:table-cell table:style-name="表格77.A3" office:value-type="string">
            <text:p text:style-name="P46">= <text:span text:style-name="T28">cwnd / 2</text:span>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102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03"><text:span text:style-name="T134">Timeout 代表網路嚴重問題</text:span>，<text:span text:style-name="T152">cwnd 重設回 1 從頭來</text:span>；<text:span text:style-name="T153">3 個重複 ACK 只是單一封包遺失</text:span>，<text:span text:style-name="T152">cwnd 直接減半後繼續 Congestion Avoidance，不用從頭重來</text:span>。(<text:span text:style-name="T135">Timeout → cwnd = 1；3Dup ACK → cwnd ÷ 2</text:span>)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<text:span text:style-name="T12">沒丟包 → 網路 OK </text:span>→ CA 階段線性增加（<text:span text:style-name="T16">每 RTT +1</text:span>），慢慢加速。</text:p>
          </table:table-cell>
          <table:table-cell table:style-name="表格78.A2" office:value-type="string">
            <text:p text:style-name="P23"><text:span text:style-name="T12">偵測到丟包 → 網路塞了 </text:span>→ <text:span text:style-name="T16">cwnd ×0.5（減半）</text:span>，快速降速避免繼續惡化。</text:p>
          </table:table-cell>
        </table:table-row>
      </table:table>
      <text:p text:style-name="P59"><text:span text:style-name="T154">AIMD 本質：用 ACK 當回饋，不斷探測網路的「最高速度」</text:span>——<text:span text:style-name="T29">慢慢加速找上限，遇到問題快速減速再重新找</text:span>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<text:span text:style-name="T27">用 ACK 當回饋不斷自我調節</text:span>。</text:p>
          </table:table-cell>
        </table:table-row>
      </table:table>
      <text:h text:style-name="P104" text:outline-level="2"><text:soft-page-break/>TCP 七字口訣 <text:s text:c="2"/>握(三次握手) → 衝(Slow Start 指數成長) → 穩(CA 線性成長) → 看(min(rwnd,cwnd)) → 滑(Sliding Window) → 救(Timeout / 3 Dup ACK) → 循(ACK 回饋循環)</text:h>
      <text:h text:style-name="P19" text:outline-level="2"/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<text:span text:style-name="T12">用 rwnd（接收端）和 cwnd（網路）雙重限制控制傳送速度</text:span>，透過 Slow Start 指數試探、Congestion Avoidance 線性增長、丟包後快速降速，<text:span text:style-name="T143">持續用 ACK 當回饋調節</text:span>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105">A</text:p>
          </table:table-cell>
          <table:table-cell table:style-name="表格83.A2" office:value-type="string">
            <text:p text:style-name="P106">Address Record</text:p>
          </table:table-cell>
          <table:table-cell table:style-name="表格83.A2" office:value-type="string">
            <text:p text:style-name="P23">網域名稱 → <text:span text:style-name="T155">IPv4 位址</text:span>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105">NS</text:p>
          </table:table-cell>
          <table:table-cell table:style-name="表格83.A3" office:value-type="string">
            <text:p text:style-name="P106">Name Server</text:p>
          </table:table-cell>
          <table:table-cell table:style-name="表格83.A3" office:value-type="string">
            <text:p text:style-name="P23">指定<text:span text:style-name="T156">管理該網域的 </text:span>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105">MX</text:p>
          </table:table-cell>
          <table:table-cell table:style-name="表格83.A2" office:value-type="string">
            <text:p text:style-name="P106">Mail Exchange</text:p>
          </table:table-cell>
          <table:table-cell table:style-name="表格83.A2" office:value-type="string">
            <text:p text:style-name="P23">指定<text:span text:style-name="T157">負責收發郵件的</text:span>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105">CNAME</text:p>
          </table:table-cell>
          <table:table-cell table:style-name="表格83.A3" office:value-type="string">
            <text:p text:style-name="P106">Canonical Name</text:p>
          </table:table-cell>
          <table:table-cell table:style-name="表格83.A3" office:value-type="string">
            <text:p text:style-name="P107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<text:span text:style-name="T158">補充：AAAA record → 回傳 IPv6 位址，見第三篇 Dual Stack。</text:span>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108">步驟</text:p>
          </table:table-cell>
          <table:table-cell table:style-name="表格84.A2" office:value-type="string">
            <text:p text:style-name="P108">層級</text:p>
          </table:table-cell>
          <table:table-cell table:style-name="表格84.A2" office:value-type="string">
            <text:p text:style-name="P108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86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88">申論題標準答案</text:span></text:p>
            <text:p text:style-name="P11"><text:span text:style-name="T89">一、DNS 功能：</text:span><text:span text:style-name="T4">DNS 為網際網路中負責將網域名稱轉換為 IP 位址的分散式系統。</text:span></text:p>
            <text:p text:style-name="P22"><text:soft-page-break/><text:span text:style-name="T89">二、查詢流程：</text:span><text:span text:style-name="T4">由快取開始，依序向 Local DNS、Root DNS、TLD DNS、Authoritative DNS 查詢，最終取得 IP 位址。</text:span></text:p>
            <text:p text:style-name="P22"><text:span text:style-name="T89">三、Recursive：</text:span><text:span text:style-name="T4">由 DNS 伺服器代替用戶端完整查詢並直接回傳最終 IP，用戶端只需等待結果。</text:span></text:p>
            <text:p text:style-name="P22"><text:span text:style-name="T89">四、Iterative：</text:span><text:span text:style-name="T4">DNS 伺服器僅回應下一步查詢位置，由用戶端自行逐層向各 DNS 查詢，直到取得 IP。</text:span></text:p>
            <text:p text:style-name="P22"><text:span text:style-name="T89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85">✗ ABR 負責連接外部網路　→　</text:span><text:span text:style-name="T4">✓ ABR 只負責 Area 之間的橋樑，對外是 ASBR 的工作。</text:span></text:p>
            <text:p text:style-name="P22"><text:span text:style-name="T85">✗ ASBR 是用來跨越不同 Area　→　</text:span><text:span text:style-name="T4">✓ ASBR 是跨越不同 AS（整個系統），不是跨 Area。</text:span></text:p>
            <text:p text:style-name="P22"><text:span text:style-name="T85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108">步驟</text:p>
            </table:table-cell>
            <table:table-cell table:style-name="表格94.A1" office:value-type="string">
              <text:p text:style-name="P108">屬性</text:p>
            </table:table-cell>
            <table:table-cell table:style-name="表格94.A1" office:value-type="string">
              <text:p text:style-name="P108">說明</text:p>
            </table:table-cell>
            <table:table-cell table:style-name="表格94.A1" office:value-type="string">
              <text:p text:style-name="P108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85">✗ AS-PATH 是 BGP 選路最重要的屬性　→　</text:span><text:span text:style-name="T4">✓ Local Preference 才是最重要的通用屬性（Weight 是 Cisco 私有）。</text:span></text:p>
            <text:p text:style-name="P22"><text:span text:style-name="T85">✗ AS-PATH 越短就一定會選那條　→　</text:span><text:span text:style-name="T4">✓ 只有前面的屬性（Local Pref 等）完全相同時，才會比較 AS-PATH。</text:span></text:p>
            <text:p text:style-name="P22"><text:span text:style-name="T85">✗ BGP 會自己計算最短路徑　→　</text:span><text:span text:style-name="T4">✓ BGP 不算距離，OSPF 才做最短路徑計算。</text:span></text:p>
            <text:p text:style-name="P22"><text:span text:style-name="T85">✗ iBGP 比 eBGP 優先　→　</text:span><text:span text:style-name="T4">✓ eBGP 優先於 iBGP（外部路由更可信）。</text:span></text:p>
            <text:p text:style-name="P22"><text:span text:style-name="T85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85">✗ 封包送不出去 → 一定是 BGP 問題　→　</text:span><text:span text:style-name="T4">✓ 應依序排查：防火牆有沒有擋？NAT 有沒有設？BGP 有沒有路？</text:span></text:p>
            <text:p text:style-name="P22"><text:span text:style-name="T85">✗ 有路但連不到 → 是 BGP 路由問題　→　</text:span><text:span text:style-name="T4">✓ 通常是防火牆或 NAT 問題，不是 BGP。</text:span></text:p>
            <text:p text:style-name="P22"><text:span text:style-name="T85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159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159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159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108">口訣</text:p>
          </table:table-cell>
          <table:table-cell table:style-name="表格116.A2" office:value-type="string">
            <text:p text:style-name="P108">IOC 類型</text:p>
          </table:table-cell>
          <table:table-cell table:style-name="表格116.A2" office:value-type="string">
            <text:p text:style-name="P108">白話說明</text:p>
          </table:table-cell>
          <table:table-cell table:style-name="表格116.A2" office:value-type="string">
            <text:p text:style-name="P108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88">防禦核心：Prepared Statement（預備語句）</text:span></text:p>
            <text:p text:style-name="P11"><text:span text:style-name="T89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108">Step</text:p>
            </table:table-cell>
            <table:table-cell table:style-name="表格122.A1" office:value-type="string">
              <text:p text:style-name="P108">階段</text:p>
            </table:table-cell>
            <table:table-cell table:style-name="表格122.A1" office:value-type="string">
              <text:p text:style-name="P108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94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94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85">① IDS 可以自動阻擋攻擊　→　</text:span><text:span text:style-name="T4">✓ IDS 只偵測＋發警報，IPS 才會阻擋。</text:span></text:p>
            <text:p text:style-name="P22"><text:span text:style-name="T85">② Firewall 可以偵測異常行為　→　</text:span><text:span text:style-name="T4">✓ Firewall 依規則（IP/Port）過濾，不做行為分析。</text:span></text:p>
            <text:p text:style-name="P22"><text:soft-page-break/><text:span text:style-name="T85">③ HIDS 用來監控網路封包　→　</text:span><text:span text:style-name="T4">✓ HIDS 監控主機 Log 與系統行為，封包是 NIDS 的工作。</text:span></text:p>
            <text:p text:style-name="P22"><text:span text:style-name="T85">④ ICMP 用來監控設備狀態　→　</text:span><text:span text:style-name="T4">✓ ICMP 只診斷網路（Ping），監控設備是 SNMP。</text:span></text:p>
            <text:p text:style-name="P22"><text:span text:style-name="T85">⑤ ICMP 屬於 Application Layer　→　</text:span><text:span text:style-name="T4">✓ ICMP 屬 Network Layer，SNMP 才是 Application Layer。</text:span></text:p>
            <text:p text:style-name="P22"><text:span text:style-name="T85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109">題目</text:p>
            </table:table-cell>
            <table:table-cell table:style-name="表格127.A1" office:value-type="string">
              <text:p text:style-name="P109">答案</text:p>
            </table:table-cell>
            <table:table-cell table:style-name="表格127.A1" office:value-type="string">
              <text:p text:style-name="P109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110">Q1 何者負責「過濾進出網路流量」？</text:p>
          </table:table-cell>
          <table:table-cell table:style-name="表格127.A2" office:value-type="string">
            <text:p text:style-name="P110">Firewall</text:p>
          </table:table-cell>
          <table:table-cell table:style-name="表格127.A2" office:value-type="string">
            <text:p text:style-name="P110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110">Q2 IDS 的主要功能為何？</text:p>
          </table:table-cell>
          <table:table-cell table:style-name="表格127.A3" office:value-type="string">
            <text:p text:style-name="P110">偵測並發出警報</text:p>
          </table:table-cell>
          <table:table-cell table:style-name="表格127.A3" office:value-type="string">
            <text:p text:style-name="P110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110">Q3 IPS 與 IDS 最大差別？</text:p>
          </table:table-cell>
          <table:table-cell table:style-name="表格127.A2" office:value-type="string">
            <text:p text:style-name="P110">IPS 會阻擋，IDS 不會</text:p>
          </table:table-cell>
          <table:table-cell table:style-name="表格127.A2" office:value-type="string">
            <text:p text:style-name="P110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110">Q4 何者屬「主機型入侵偵測」？</text:p>
          </table:table-cell>
          <table:table-cell table:style-name="表格127.A3" office:value-type="string">
            <text:p text:style-name="P110">HIDS</text:p>
          </table:table-cell>
          <table:table-cell table:style-name="表格127.A3" office:value-type="string">
            <text:p text:style-name="P110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110">Q5 NIDS 主要監控什麼？</text:p>
          </table:table-cell>
          <table:table-cell table:style-name="表格127.A2" office:value-type="string">
            <text:p text:style-name="P110">網路封包</text:p>
          </table:table-cell>
          <table:table-cell table:style-name="表格127.A2" office:value-type="string">
            <text:p text:style-name="P110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110">Q6 SNMP 的主要用途？</text:p>
          </table:table-cell>
          <table:table-cell table:style-name="表格127.A3" office:value-type="string">
            <text:p text:style-name="P110">管理網路設備</text:p>
          </table:table-cell>
          <table:table-cell table:style-name="表格127.A3" office:value-type="string">
            <text:p text:style-name="P110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110">Q7 ICMP 常用於哪種工具？</text:p>
          </table:table-cell>
          <table:table-cell table:style-name="表格127.A2" office:value-type="string">
            <text:p text:style-name="P110">Ping</text:p>
          </table:table-cell>
          <table:table-cell table:style-name="表格127.A2" office:value-type="string">
            <text:p text:style-name="P110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110">Q8 ICMP 屬 OSI 哪一層？</text:p>
          </table:table-cell>
          <table:table-cell table:style-name="表格127.A3" office:value-type="string">
            <text:p text:style-name="P110">Network Layer</text:p>
          </table:table-cell>
          <table:table-cell table:style-name="表格127.A3" office:value-type="string">
            <text:p text:style-name="P110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110">Q9 何者用 UDP 且屬應用層？</text:p>
          </table:table-cell>
          <table:table-cell table:style-name="表格127.A2" office:value-type="string">
            <text:p text:style-name="P110">SNMP</text:p>
          </table:table-cell>
          <table:table-cell table:style-name="表格127.A2" office:value-type="string">
            <text:p text:style-name="P110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110">Q10 下列何者正確？</text:p>
          </table:table-cell>
          <table:table-cell table:style-name="表格127.A3" office:value-type="string">
            <text:p text:style-name="P110">SNMP 用於設備管理</text:p>
          </table:table-cell>
          <table:table-cell table:style-name="表格127.A3" office:value-type="string">
            <text:p text:style-name="P110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94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86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111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294</meta:editing-cycles>
    <meta:creation-date>2026-06-12T00:41:46.189000000</meta:creation-date>
    <dc:date>2026-06-15T19:02:18.203157800</dc:date>
    <meta:generator>LibreOffice/26.2.3.2$Windows_X86_64 LibreOffice_project/70e089b17412e4cb7773e41413306b17a2328c34</meta:generator>
    <meta:editing-duration>P2DT3H9M38S</meta:editing-duration>
    <meta:document-statistic meta:table-count="143" meta:image-count="0" meta:object-count="0" meta:page-count="51" meta:paragraph-count="2294" meta:word-count="29857" meta:character-count="47167" meta:non-whitespace-character-count="42556"/>
  </office:meta>
</office:document-meta>
</file>