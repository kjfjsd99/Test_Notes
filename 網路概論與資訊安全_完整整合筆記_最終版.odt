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4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9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officeooo:paragraph-rsid="01e58a9d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10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0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officeooo:paragraph-rsid="01f29294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4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18ffff" loext:opacity="100%" style:font-name="Microsoft JhengHei" fo:font-size="12.5pt" fo:font-weight="bold" fo:background-color="#d500f9" style:font-name-asian="Microsoft JhengHei2" style:font-size-asian="12.5pt" style:font-weight-asian="bold" style:font-name-complex="Microsoft JhengHei2" style:font-size-complex="12.5pt" style:font-weight-complex="bold"/>
    </style:style>
    <style:style style:name="P10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0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11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11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4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5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06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07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8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9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1" style:family="text">
      <style:text-properties fo:font-weight="bold" fo:background-color="#ffea00" loext:char-shading-value="0" style:font-weight-asian="bold" style:font-weight-complex="bold"/>
    </style:style>
    <style:style style:name="T112" style:family="text">
      <style:text-properties fo:font-weight="bold" fo:background-color="#76ff03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4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15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21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26" style:family="text">
      <style:text-properties fo:color="#64ffda" loext:opacity="100%"/>
    </style:style>
    <style:style style:name="T127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29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30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31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32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33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34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35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36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37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140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1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142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43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44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45" style:family="text">
      <style:text-properties fo:color="#ffff00" loext:opacity="100%" fo:background-color="#ff3d00" loext:char-shading-value="0"/>
    </style:style>
    <style:style style:name="T146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49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51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152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153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154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155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56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57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58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6">DF=1，不准切</text:span>）→ ② 到某 Router，發現<text:span text:style-name="T101">封包 &gt; 該路段 MTU</text:span> → ③ <text:span text:style-name="T102">Router 不能切，直接丟棄 </text:span>→ ④ <text:span text:style-name="T103">Router 回傳 ICMP「Fragmentation Needed」（含可用 MTU 大小）</text:span>→ ⑤ <text:span text:style-name="T28">送端調整封包大小後</text:span><text:span text:style-name="T104">重送</text:span>。這就是 <text:span text:style-name="T12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6">PMTUD </text:span>＝<text:span text:style-name="T104"> Path MTU Discovery，自動找出</text:span><text:span text:style-name="T105">來源到目的地</text:span><text:span text:style-name="T104">整條路徑中</text:span><text:span text:style-name="T106">最小的 MTU 值</text:span>。<text:span text:style-name="T17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29">TCP 不依賴 IP 層切封包，而是「自己先控制好大小」</text:span>，<text:span text:style-name="T16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07">MSS = MTU − IP Header − TCP Header </text:span><text:span text:style-name="T4">= </text:span><text:span text:style-name="T35">1500 − 20 − 20 = 1460 bytes</text:span><text:span text:style-name="T4">。</text:span><text:span text:style-name="T108">三向交握時雙方各自宣告 MSS，之後每段 ≤ MSS</text:span><text:span text:style-name="T4">，</text:span><text:span text:style-name="T35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65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61">TCP = 主動控制大小（MSS）＋ DF=1 ＋ PMTUD</text:span>，<text:span text:style-name="T109">從源頭就避免 Fragmentation 發生</text:span>。<text:span text:style-name="T110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28">攻擊者利用「接收端重組封包很耗資源」這個特性</text:span>，<text:span text:style-name="T29">刻意製造大量異常 Fragment</text:span>。正常重組流程：收到 Fragment <text:span text:style-name="T27">放入緩衝區 </text:span>→ <text:span text:style-name="T103">等同一 ID 的所有 Fragment 到齊 → 依</text:span><text:span text:style-name="T24"> Offset </text:span><text:span text:style-name="T103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55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55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2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55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11">設定重組 buffer 上限</text:span>避免無限占用記憶體；<text:span text:style-name="T112">丟棄等待過久或異常的 Fragment</text:span>；<text:span text:style-name="T17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1">PMTUD</text:p>
          </table:table-cell>
          <table:table-cell table:style-name="表格55.A2" office:value-type="string">
            <text:p text:style-name="P8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3">TTL</text:p>
          </table:table-cell>
          <table:table-cell table:style-name="表格55.A3" office:value-type="string">
            <text:p text:style-name="P84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28">32 bit</text:span>，約 43 億個 IP，已嚴重不足</text:p>
          </table:table-cell>
          <table:table-cell table:style-name="表格57.A2" office:value-type="string">
            <text:p text:style-name="P23"><text:span text:style-name="T110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6">需 NAT 共用 IP</text:span>，破壞 End-to-End</text:p>
          </table:table-cell>
          <table:table-cell table:style-name="表格57.A3" office:value-type="string">
            <text:p text:style-name="P23"><text:span text:style-name="T12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6">須另裝 VPN</text:span></text:p>
          </table:table-cell>
          <table:table-cell table:style-name="表格57.A2" office:value-type="string">
            <text:p text:style-name="P23"><text:span text:style-name="T113">支援 IPsec</text:span><text:span text:style-name="T12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6">可變長度</text:span>含 Options，Router 效率低</text:p>
          </table:table-cell>
          <table:table-cell table:style-name="表格57.A3" office:value-type="string">
            <text:p text:style-name="P23"><text:span text:style-name="T12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2">Flow Label 欄位</text:span>，<text:span text:style-name="T30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6">Broadcast</text:span>：一次發給所有人，浪費頻寬</text:p>
          </table:table-cell>
          <table:table-cell table:style-name="表格57.A3" office:value-type="string">
            <text:p text:style-name="P23">改用<text:span text:style-name="T12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7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29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23">Dual Stack（雙協定堆疊）</text:span>— 最常用、最推薦</text:p>
            <text:p text:style-name="P12"><text:span text:style-name="T114">裝置同時具備 IPv4 與 IPv6 兩套協定堆疊</text:span>。<text:span text:style-name="T16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5">②<text:span text:style-name="T23"> Tunneling（隧道技術）</text:span>— 過渡期橋接方案</text:p>
            <text:p text:style-name="P12">中間網路只支援 IPv4，無法直接傳送 IPv6 封包。解法：<text:span text:style-name="T114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6">③ <text:span text:style-name="T23">Translation（NAT64）</text:span>— 協定轉換、互通最後手段</text:p>
            <text:p text:style-name="P12">適用場景：IPv6-only 裝置需與 IPv4-only 裝置直接通訊。<text:span text:style-name="T109">透過轉換閘道器即時將封包表頭轉換為對方格式</text:span>。代表技術：NAT64 + DNS64。<text:span text:style-name="T101">複雜度最高，有額外效能損耗</text:span>。</text:p>
            <text:p text:style-name="P12">示意：IPv6 裝置 → [ NAT64 <text:span text:style-name="T27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6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29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3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44">IPv4 的困境：整棟公寓共用一個門牌</text:span><text:span text:style-name="T115">（NAT）</text:span><text:span text:style-name="T4">，郵差只送到大門，裡面誰是誰要另外猜；地址快用光還在借號碼。</text:span></text:p>
            <text:p text:style-name="P22"><text:span text:style-name="T65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16">安全（IPsec）</text:span><text:span text:style-name="T4">＋ </text:span><text:span text:style-name="T94">快（固定 Header）</text:span><text:span text:style-name="T4">＋ 自動（SLAAC）＋ 乾淨（無 Broadcast）。</text:span></text:p>
            <text:p text:style-name="P22"><text:span text:style-name="T117">過渡技術</text:span><text:span text:style-name="T48">：</text:span><text:span text:style-name="T4">雙語（</text:span><text:span text:style-name="T35">Dual Stack</text:span><text:span text:style-name="T4">）＋ 偽裝（</text:span><text:span text:style-name="T35">Tunneling</text:span><text:span text:style-name="T4">）＋ 翻譯（</text:span><text:span text:style-name="T35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67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13">支援 IPsec</text:span>／<text:span text:style-name="T113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8">IP 位址決定「最終送到哪台電腦」；MAC 位址決定「目前這一跳要交給哪個網路設備」。</text:p>
            <text:p text:style-name="P12"><text:span text:style-name="T106">資料在網路中「實際傳送」靠 MAC</text:span>，<text:span text:style-name="T110">但我們只知道對方的 IP</text:span>——所以<text:span text:style-name="T30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20">IP → MAC</text:span></text:h>
      <text:p text:style-name="P36">一句話定義：<text:span text:style-name="T12">ARP</text:span> ＝ <text:span text:style-name="T29">用 IP 找 MAC</text:span>，<text:span text:style-name="T28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50">查 ARP Cache（筆記本）</text:span><text:span text:style-name="T34">：</text:span><text:span text:style-name="T4">先查自己的記錄「</text:span><text:span text:style-name="T118">我之前有沒有問過這個 IP？</text:span><text:span text:style-name="T4">」有 → 直接用。</text:span></text:p>
            <text:p text:style-name="P22"><text:span text:style-name="T34">② </text:span><text:span text:style-name="T50">發出 ARP Request（廣播）</text:span><text:span text:style-name="T34">：</text:span><text:span text:style-name="T4">沒記錄 →</text:span><text:span text:style-name="T100"> 對整個區網廣播</text:span><text:span text:style-name="T4">「誰是 192.168.1.5？</text:span><text:span text:style-name="T100">請告訴我你的 MAC！</text:span><text:span text:style-name="T4">」所有機器都收到。</text:span></text:p>
            <text:p text:style-name="P22"><text:span text:style-name="T34">③ </text:span><text:span text:style-name="T50">收到 ARP Reply（單播回應）</text:span><text:span text:style-name="T34">：</text:span><text:span text:style-name="T41">IP 是 192.168.1.5 的機器回應「我是！MAC 是 AA:BB:CC」</text:span><text:span text:style-name="T4">，其餘機器靜默忽略。</text:span></text:p>
            <text:p text:style-name="P22"><text:span text:style-name="T34">④ </text:span><text:span text:style-name="T50">存進 ARP Cache</text:span><text:span text:style-name="T34">：</text:span><text:span text:style-name="T83">把「IP ↔ MAC」對應記下</text:span><text:span text:style-name="T4">，</text:span><text:span text:style-name="T65">下次直接用</text:span><text:span text:style-name="T4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87">ARP Spoofing（ARP 欺騙）</text:p>
          </table:table-cell>
          <table:table-cell table:style-name="表格62.A3" office:value-type="string">
            <text:p text:style-name="P23"><text:span text:style-name="T110">攻擊者</text:span><text:span text:style-name="T119">假冒他人</text:span><text:span text:style-name="T110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79">arp -a</text:p>
          </table:table-cell>
          <table:table-cell table:style-name="表格62.A4" office:value-type="string">
            <text:p text:style-name="P23"><text:span text:style-name="T106">查看本機的 ARP 對應表</text:span>（<text:span text:style-name="T111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8">ping [IP]</text:p>
          </table:table-cell>
          <table:table-cell table:style-name="表格62.A3" office:value-type="string">
            <text:p text:style-name="P23"><text:span text:style-name="T29">觸發 ARP 運作</text:span>，<text:span text:style-name="T28">讓電腦主動查詢對應 MAC</text:span></text:p>
          </table:table-cell>
        </table:table-row>
      </table:table>
      <text:h text:style-name="P19" text:outline-level="2">二、NAT（Network Address Translation）：私網 → 公網</text:h>
      <text:p text:style-name="P36">一句話定義：<text:span text:style-name="T16">NAT</text:span> ＝ <text:span text:style-name="T120">路由器幫你把「私有 IP」改成「公網 IP」</text:span>，讓內部機器能夠上網。<text:span text:style-name="T5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<text:span text:style-name="T30">封包抵達路由器</text:span>，<text:span text:style-name="T28">NAT 把來源 IP 改成公網 IP（220.x.x.x）</text:span><text:span text:style-name="T67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80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89">一個私有 IP ↔ 一個公網 IP</text:p>
          </table:table-cell>
          <table:table-cell table:style-name="表格63.A3" office:value-type="string">
            <text:p text:style-name="P89">固定對應</text:p>
          </table:table-cell>
        </table:table-row>
        <table:table-row table:style-name="表格63.1">
          <table:table-cell table:style-name="表格63.A4" office:value-type="string">
            <text:p text:style-name="P80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90">多個私有 IP 對應 IP 池（pool）</text:p>
          </table:table-cell>
          <table:table-cell table:style-name="表格63.A4" office:value-type="string">
            <text:p text:style-name="P90">動態分配</text:p>
          </table:table-cell>
        </table:table-row>
        <table:table-row table:style-name="表格63.1">
          <table:table-cell table:style-name="表格63.A3" office:value-type="string">
            <text:p text:style-name="P87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91">多台共用一個公網 IP</text:p>
          </table:table-cell>
          <table:table-cell table:style-name="表格63.A3" office:value-type="string">
            <text:p text:style-name="P91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21">破壞 End-to-End 連線</text:span><text:span text:style-name="T11">（最重要）：</text:span><text:span text:style-name="T4">原本你↔對方是真正點對點；</text:span><text:span text:style-name="T35">有 NAT 後變成你→NAT→對方，多一層轉換，不再是端對端</text:span><text:span text:style-name="T4">。</text:span></text:p>
            <text:p text:style-name="P22"><text:span text:style-name="T121">P2P / VoIP 難以運作</text:span><text:span text:style-name="T11">：</text:span><text:span text:style-name="T65">外部機器找不到你（被藏在 NAT 後）</text:span><text:span text:style-name="T4">，P2P 下載、VoIP 通話等</text:span><text:span text:style-name="T122">直連功能受限</text:span><text:span text:style-name="T4">。</text:span></text:p>
            <text:p text:style-name="P22"><text:span text:style-name="T121">增加延遲</text:span><text:span text:style-name="T11">：</text:span><text:span text:style-name="T123">每個封包都需要</text:span><text:span text:style-name="T124">多一道 IP 轉換處理</text:span><text:span text:style-name="T4">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<text:span text:style-name="T16">核心問題</text:span>：<text:span text:style-name="T30">外面的人只看到一個公網 IP</text:span>，但<text:span text:style-name="T125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<text:span text:style-name="T23">Port Forwarding（手動指定轉發）</text:span></text:p>
            <text:p text:style-name="P12">比喻：<text:span text:style-name="T110">Port＝房間號碼</text:span>；<text:span text:style-name="T120">NAT 路由器＝大樓</text:span>；<text:span text:style-name="T110">Port Forwarding＝門口指示牌「80 號房 → 192.168.1.2」</text:span>。例：220.x.x.x:80 → 192.168.1.2:80（<text:span text:style-name="T126">網頁</text:span>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127">每個服務都要手動設定，IP 改變要重設</text:span><text:span text:style-name="T4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<text:span text:style-name="T23">UPnP（自動版 Port Forwarding）</text:span></text:p>
            <text:p text:style-name="P12"><text:span text:style-name="T128">讓裝置自動跟</text:span><text:span text:style-name="T129">路由器</text:span><text:span text:style-name="T128">要求「幫我開一個 Port」，不需人工設定。</text:span>① <text:span text:style-name="T130">應用程式發 UPnP 請求</text:span> → ② <text:span text:style-name="T131">路由器</text:span><text:span text:style-name="T130">自動新增 Port Forwarding 規則</text:span> → ③<text:span text:style-name="T113"> 服務結束後自動清除</text:span>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127">惡意程式也能透過 UPnP 自動開 Port，可能讓攻擊者直接連入內網</text:span><text:span text:style-name="T4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6">方法三：<text:span text:style-name="T23">STUN（打洞技術）</text:span></text:p>
            <text:p text:style-name="P12"><text:span text:style-name="T16">使用情境</text:span>：<text:span text:style-name="T132">兩端都在各自 NAT 後面，彼此都是私有 IP、互相找不到。STUN 先幫每端「查清楚自己對外的公網 IP + Port」，再交換資訊</text:span>嘗試直接打通。</text:p>
            <text:p text:style-name="P12">① <text:span text:style-name="T133">問 STUN 伺服器「我對外的 IP 和 Port 是什麼？」</text:span>② <text:span text:style-name="T133">STUN 回「你對外是 220.x.x.x:12345」</text:span>③ <text:span text:style-name="T52">朋友也做同樣的事</text:span> → ④ <text:span text:style-name="T133">兩端透過第三方交換彼此公網位址</text:span> → ⑤ <text:span text:style-name="T133">同時互相發送封包打洞（Hole Punching）</text:span>。</text:p>
            <text:p text:style-name="P22"><text:span text:style-name="T85">重要限制：</text:span><text:span text:style-name="T127">STUN 只對部分 NAT 類型有效</text:span><text:span text:style-name="T4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80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80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80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<text:span text:style-name="T16">場景</text:span>：<text:span text:style-name="T134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(<text:span text:style-name="T39">Google 的 IP</text:span>)</text:p>
            <text:p text:style-name="P46">(電腦必須知道目的地在哪)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92">找路由器（192.168.1.1）的 MAC(<text:span text:style-name="T110">發現 Google </text:span><text:span text:style-name="T119">不在同一個區網</text:span><text:span text:style-name="T110">，必須交給路由器幫忙送</text:span>)(<text:span text:style-name="T120">查詢路由器的 MAC，下一站是路由器</text:span>)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<text:span text:style-name="T67">送封包</text:span></text:p>
          </table:table-cell>
          <table:table-cell table:style-name="表格66.A2" office:value-type="string">
            <text:p text:style-name="P46">IP=Google；MAC=路由器(<text:span text:style-name="T135">IP 記</text:span><text:soft-page-break/><text:span text:style-name="T135">錄最終目的地；MAC 記錄下一站</text:span>)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93"><text:span text:style-name="T27">192.168.1.2 → 220.x.x.x</text:span>(<text:span text:style-name="T136">路由器收到後往 Internet 送</text:span>；路由器負責跨網路傳遞)(<text:span text:style-name="T136">私有 IP 換成公網 IP，因Internet 不認私有 IP</text:span>)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<text:span text:style-name="T30">封包抵達目的地</text:span>(<text:span text:style-name="T132">Google 看到公網 IP</text:span>)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<text:span text:style-name="T104">回傳給 220.x.x.x</text:span>(<text:span text:style-name="T133">回到路由器再回到你電腦</text:span>)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<text:span text:style-name="T27">220.x.x.x → 192.168.1.2</text:span>(<text:span text:style-name="T110">NAT 依記錄轉回正確主機</text:span>)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137">✗ 以為 ARP 是找 Google 的 MAC</text:span><text:span text:style-name="T85">　→　</text:span><text:span text:style-name="T138">✓ ARP 找的是「路由器」的 MAC！</text:span><text:span text:style-name="T4">因為 ARP 只能在同一個 LAN 內使用。</text:span></text:p>
            <text:p text:style-name="P22"><text:span text:style-name="T137">✗ 以為封包直接送到 Google</text:span><text:span text:style-name="T85">　→　</text:span><text:span text:style-name="T138">✓ 封包先送給路由器，路由器再轉到 Internet</text:span><text:span text:style-name="T4">。</text:span></text:p>
            <text:p text:style-name="P22"><text:span text:style-name="T137">✗ 以為 IP 在傳輸過程中一直不變</text:span><text:span text:style-name="T85">　→　</text:span><text:span text:style-name="T138">✓ NAT 會在去程改掉來源 IP，回程再改回去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<text:span text:style-name="T12">使用者輸入網址後</text:span>，<text:span text:style-name="T139">先透過 DNS 將網域名稱解析為 IP</text:span>；<text:span text:style-name="T113">接著主機利用 ARP 取得路由器（預設閘道）的 MAC</text:span>，<text:span text:style-name="T113">將封包傳送至路由器</text:span>；<text:span text:style-name="T140">路由器透過 NAT 將私有 IP 轉換為公網 IP 後送往 Internet</text:span>；<text:span text:style-name="T52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94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95">用 IP 找 MAC</text:p>
          </table:table-cell>
          <table:table-cell table:style-name="表格67.A2" office:value-type="string">
            <text:p text:style-name="P96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79">區域網路（LAN）內</text:p>
          </table:table-cell>
          <table:table-cell table:style-name="表格67.A3" office:value-type="string">
            <text:p text:style-name="P80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97">L2 / L3 交界</text:p>
          </table:table-cell>
          <table:table-cell table:style-name="表格67.A2" office:value-type="string">
            <text:p text:style-name="P98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79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<text:span text:style-name="T12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79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<text:span text:style-name="T12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79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<text:span text:style-name="T12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79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<text:span text:style-name="T12">擁塞</text:span>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99">需要先建立連線</text:p>
          </table:table-cell>
          <table:table-cell table:style-name="表格70.A2" office:value-type="string">
            <text:p text:style-name="P88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80">網頁、檔案傳輸、Email</text:p>
          </table:table-cell>
          <table:table-cell table:style-name="表格70.A2" office:value-type="string">
            <text:p text:style-name="P23"><text:span text:style-name="T12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79">專業物流（簽收確認）</text:p>
          </table:table-cell>
          <table:table-cell table:style-name="表格70.A3" office:value-type="string">
            <text:p text:style-name="P79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</text:span><text:span text:style-name="T50">SYN</text:span><text:span text:style-name="T34">　</text:span><text:span text:style-name="T4">「我可以傳資料給你嗎？我準備好了。」（Synchronize 同步請求）</text:span></text:p>
            <text:p text:style-name="P22"><text:span text:style-name="T34">② Server → Client：</text:span><text:span text:style-name="T50">SYN + ACK</text:span><text:span text:style-name="T34">　</text:span><text:span text:style-name="T4">「可以！我收到你的請求了，我也準備好了。」（確認＋同步）</text:span></text:p>
            <text:p text:style-name="P22"><text:span text:style-name="T34">③ Client → Server：</text:span><text:span text:style-name="T50">ACK</text:span><text:span text:style-name="T34">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<text:span text:style-name="T141">避免「</text:span><text:span text:style-name="T142">舊封包誤觸發新連線</text:span><text:span text:style-name="T141">」</text:span>：若少一次確認，<text:span text:style-name="T128">延遲的舊 SYN 封包可能讓 Server 誤以為要建立新連線</text:span>。</text:p>
          </table:table-cell>
        </table:table-row>
      </table:table>
      <text:h text:style-name="P19" text:outline-level="2">四、攻擊：SYN Flood</text:h>
      <text:p text:style-name="P36">攻擊原理：攻擊者大量發送 SYN 封包，但<text:span text:style-name="T143">故意不完成第三次握手（</text:span><text:span text:style-name="T28">不回 ACK</text:span><text:span text:style-name="T143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<text:span text:style-name="T16">送出大量 SYN</text:span>，每個都<text:span text:style-name="T12">假冒不同來源 IP</text:span>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<text:span text:style-name="T144">Server 建立「半連線（Half-open Connection）」</text:span>，<text:span text:style-name="T27">每個都佔記憶體等待 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<text:span text:style-name="T132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<text:span text:style-name="T16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<text:span text:style-name="T12">DoS（拒絕服務）攻擊</text:span>，利用 TCP 三次握手機制的不對稱性。</text:p>
          </table:table-cell>
          <table:covered-table-cell/>
        </table:table-row>
      </table:table>
      <text:h text:style-name="P19" text:outline-level="2">五、傳送速度的兩個限制：<text:span text:style-name="T145">rwnd</text:span> 與 <text:span text:style-name="T145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<text:span text:style-name="T130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<text:span text:style-name="T110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146">實際傳送量 ＝ min(rwnd, cwnd)</text:span><text:span text:style-name="T48">　</text:span><text:span text:style-name="T35">取兩者最小值</text:span><text:span text:style-name="T4">。</text:span><text:span text:style-name="T147">對方吃不下就看 rwnd；網路塞就看 cwnd</text:span><text:span text:style-name="T4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<text:span text:style-name="T20">最笨的方法：送 1 個封包 → 等 ACK → 再送 1 個 → 等 ACK</text:span>，<text:span text:style-name="T142">大部分時間在閒置，非常浪費</text:span>。<text:span text:style-name="T12">TCP 的改進</text:span>：<text:span text:style-name="T148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149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77">收到 ACK 1</text:p>
          </table:table-cell>
          <table:table-cell table:style-name="表格74.A4" office:value-type="string">
            <text:p text:style-name="P100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77">收到 ACK 2</text:p>
          </table:table-cell>
          <table:table-cell table:style-name="表格74.A3" office:value-type="string">
            <text:p text:style-name="P100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<text:span text:style-name="T133">ACK 的回傳決定視窗位置（往前滑）</text:span>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<text:span text:style-name="T27">每收到一個 ACK，cwnd 就 +1</text:span>；<text:span text:style-name="T120">送出 N 個封包 → 收回 N 個 ACK → cwnd 增加 N</text:span>，所以每輪自然翻倍。(<text:span text:style-name="T128">Slow Start = 每一輪變 2 倍，Congestion Avoidance = 每一輪只加 1</text:span>(「<text:span text:style-name="T150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<text:span text:style-name="T110">cwnd 成長到門檻值（ssthresh）後，改為線性成長</text:span>（<text:span text:style-name="T27">每個 RTT 只 +1</text:span>），<text:span text:style-name="T16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94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77">cwnd &lt; ssthresh</text:p>
          </table:table-cell>
          <table:table-cell table:style-name="表格76.A2" office:value-type="string">
            <text:p text:style-name="P77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<text:span text:style-name="T120">指數成長</text:span>（<text:span text:style-name="T151">每個 ACK +1</text:span>）</text:p>
          </table:table-cell>
          <table:table-cell table:style-name="表格76.A3" office:value-type="string">
            <text:p text:style-name="P101"><text:span text:style-name="T132">線性成長</text:span>（<text:span text:style-name="T151">每個 RTT +1</text:span>）(<text:span text:style-name="T148">RTT ：Round Trip Time（往返時間）= 封包出去 + ACK 回來的一個來回時間</text:span>)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71">Timeout（逾時）</text:p>
          </table:table-cell>
          <table:table-cell table:style-name="表格77.A2" office:value-type="string">
            <text:p text:style-name="P46"><text:span text:style-name="T16">等太久沒 ACK</text:span>，<text:span text:style-name="T101">網路嚴重擁塞</text:span></text:p>
          </table:table-cell>
          <table:table-cell table:style-name="表格77.A2" office:value-type="string">
            <text:p text:style-name="P46">= <text:span text:style-name="T28">cwnd / 2</text:span>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102">重新進入 Slow Start</text:p>
          </table:table-cell>
        </table:table-row>
        <table:table-row table:style-name="表格77.1">
          <table:table-cell table:style-name="表格77.A3" office:value-type="string">
            <text:p text:style-name="P71">3 個重複 ACK (Fast Retransmit)</text:p>
          </table:table-cell>
          <table:table-cell table:style-name="表格77.A3" office:value-type="string">
            <text:p text:style-name="P46"><text:span text:style-name="T16">連續收 3 個同樣 ACK</text:span>，<text:span text:style-name="T68">單一封包丟失</text:span></text:p>
          </table:table-cell>
          <table:table-cell table:style-name="表格77.A3" office:value-type="string">
            <text:p text:style-name="P46">= <text:span text:style-name="T28">cwnd / 2</text:span>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102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03"><text:span text:style-name="T134">Timeout 代表網路嚴重問題</text:span>，<text:span text:style-name="T152">cwnd 重設回 1 從頭來</text:span>；<text:span text:style-name="T153">3 個重複 ACK 只是單一封包遺失</text:span>，<text:span text:style-name="T152">cwnd 直接減半後繼續 Congestion Avoidance，不用從頭重來</text:span>。(<text:span text:style-name="T135">Timeout → cwnd = 1；3Dup ACK → cwnd ÷ 2</text:span>)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<text:span text:style-name="T12">沒丟包 → 網路 OK </text:span>→ CA 階段線性增加（<text:span text:style-name="T16">每 RTT +1</text:span>），慢慢加速。</text:p>
          </table:table-cell>
          <table:table-cell table:style-name="表格78.A2" office:value-type="string">
            <text:p text:style-name="P23"><text:span text:style-name="T12">偵測到丟包 → 網路塞了 </text:span>→ <text:span text:style-name="T16">cwnd ×0.5（減半）</text:span>，快速降速避免繼續惡化。</text:p>
          </table:table-cell>
        </table:table-row>
      </table:table>
      <text:p text:style-name="P59"><text:span text:style-name="T154">AIMD 本質：用 ACK 當回饋，不斷探測網路的「最高速度」</text:span>——<text:span text:style-name="T29">慢慢加速找上限，遇到問題快速減速再重新找</text:span>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<text:span text:style-name="T27">用 ACK 當回饋不斷自我調節</text:span>。</text:p>
          </table:table-cell>
        </table:table-row>
      </table:table>
      <text:h text:style-name="P104" text:outline-level="2"><text:soft-page-break/>TCP 七字口訣 <text:s text:c="2"/>握(三次握手) → 衝(Slow Start 指數成長) → 穩(CA 線性成長) → 看(min(rwnd,cwnd)) → 滑(Sliding Window) → 救(Timeout / 3 Dup ACK) → 循(ACK 回饋循環)</text:h>
      <text:h text:style-name="P19" text:outline-level="2"/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<text:span text:style-name="T12">用 rwnd（接收端）和 cwnd（網路）雙重限制控制傳送速度</text:span>，透過 Slow Start 指數試探、Congestion Avoidance 線性增長、丟包後快速降速，<text:span text:style-name="T143">持續用 ACK 當回饋調節</text:span>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105">A</text:p>
          </table:table-cell>
          <table:table-cell table:style-name="表格83.A2" office:value-type="string">
            <text:p text:style-name="P106">Address Record</text:p>
          </table:table-cell>
          <table:table-cell table:style-name="表格83.A2" office:value-type="string">
            <text:p text:style-name="P23">網域名稱 → <text:span text:style-name="T155">IPv4 位址</text:span>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105">NS</text:p>
          </table:table-cell>
          <table:table-cell table:style-name="表格83.A3" office:value-type="string">
            <text:p text:style-name="P106">Name Server</text:p>
          </table:table-cell>
          <table:table-cell table:style-name="表格83.A3" office:value-type="string">
            <text:p text:style-name="P23">指定<text:span text:style-name="T156">管理該網域的 </text:span>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105">MX</text:p>
          </table:table-cell>
          <table:table-cell table:style-name="表格83.A2" office:value-type="string">
            <text:p text:style-name="P106">Mail Exchange</text:p>
          </table:table-cell>
          <table:table-cell table:style-name="表格83.A2" office:value-type="string">
            <text:p text:style-name="P23">指定<text:span text:style-name="T157">負責收發郵件的</text:span>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105">CNAME</text:p>
          </table:table-cell>
          <table:table-cell table:style-name="表格83.A3" office:value-type="string">
            <text:p text:style-name="P106">Canonical Name</text:p>
          </table:table-cell>
          <table:table-cell table:style-name="表格83.A3" office:value-type="string">
            <text:p text:style-name="P107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108">步驟</text:p>
          </table:table-cell>
          <table:table-cell table:style-name="表格84.A2" office:value-type="string">
            <text:p text:style-name="P108">層級</text:p>
          </table:table-cell>
          <table:table-cell table:style-name="表格84.A2" office:value-type="string">
            <text:p text:style-name="P108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6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108">步驟</text:p>
            </table:table-cell>
            <table:table-cell table:style-name="表格94.A1" office:value-type="string">
              <text:p text:style-name="P108">屬性</text:p>
            </table:table-cell>
            <table:table-cell table:style-name="表格94.A1" office:value-type="string">
              <text:p text:style-name="P108">說明</text:p>
            </table:table-cell>
            <table:table-cell table:style-name="表格94.A1" office:value-type="string">
              <text:p text:style-name="P10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58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58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58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108">口訣</text:p>
          </table:table-cell>
          <table:table-cell table:style-name="表格116.A2" office:value-type="string">
            <text:p text:style-name="P108">IOC 類型</text:p>
          </table:table-cell>
          <table:table-cell table:style-name="表格116.A2" office:value-type="string">
            <text:p text:style-name="P108">白話說明</text:p>
          </table:table-cell>
          <table:table-cell table:style-name="表格116.A2" office:value-type="string">
            <text:p text:style-name="P108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108">Step</text:p>
            </table:table-cell>
            <table:table-cell table:style-name="表格122.A1" office:value-type="string">
              <text:p text:style-name="P108">階段</text:p>
            </table:table-cell>
            <table:table-cell table:style-name="表格122.A1" office:value-type="string">
              <text:p text:style-name="P10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94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94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109">題目</text:p>
            </table:table-cell>
            <table:table-cell table:style-name="表格127.A1" office:value-type="string">
              <text:p text:style-name="P109">答案</text:p>
            </table:table-cell>
            <table:table-cell table:style-name="表格127.A1" office:value-type="string">
              <text:p text:style-name="P10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110">Q1 何者負責「過濾進出網路流量」？</text:p>
          </table:table-cell>
          <table:table-cell table:style-name="表格127.A2" office:value-type="string">
            <text:p text:style-name="P110">Firewall</text:p>
          </table:table-cell>
          <table:table-cell table:style-name="表格127.A2" office:value-type="string">
            <text:p text:style-name="P11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110">Q2 IDS 的主要功能為何？</text:p>
          </table:table-cell>
          <table:table-cell table:style-name="表格127.A3" office:value-type="string">
            <text:p text:style-name="P110">偵測並發出警報</text:p>
          </table:table-cell>
          <table:table-cell table:style-name="表格127.A3" office:value-type="string">
            <text:p text:style-name="P11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110">Q3 IPS 與 IDS 最大差別？</text:p>
          </table:table-cell>
          <table:table-cell table:style-name="表格127.A2" office:value-type="string">
            <text:p text:style-name="P110">IPS 會阻擋，IDS 不會</text:p>
          </table:table-cell>
          <table:table-cell table:style-name="表格127.A2" office:value-type="string">
            <text:p text:style-name="P11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110">Q4 何者屬「主機型入侵偵測」？</text:p>
          </table:table-cell>
          <table:table-cell table:style-name="表格127.A3" office:value-type="string">
            <text:p text:style-name="P110">HIDS</text:p>
          </table:table-cell>
          <table:table-cell table:style-name="表格127.A3" office:value-type="string">
            <text:p text:style-name="P11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110">Q5 NIDS 主要監控什麼？</text:p>
          </table:table-cell>
          <table:table-cell table:style-name="表格127.A2" office:value-type="string">
            <text:p text:style-name="P110">網路封包</text:p>
          </table:table-cell>
          <table:table-cell table:style-name="表格127.A2" office:value-type="string">
            <text:p text:style-name="P11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110">Q6 SNMP 的主要用途？</text:p>
          </table:table-cell>
          <table:table-cell table:style-name="表格127.A3" office:value-type="string">
            <text:p text:style-name="P110">管理網路設備</text:p>
          </table:table-cell>
          <table:table-cell table:style-name="表格127.A3" office:value-type="string">
            <text:p text:style-name="P11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110">Q7 ICMP 常用於哪種工具？</text:p>
          </table:table-cell>
          <table:table-cell table:style-name="表格127.A2" office:value-type="string">
            <text:p text:style-name="P110">Ping</text:p>
          </table:table-cell>
          <table:table-cell table:style-name="表格127.A2" office:value-type="string">
            <text:p text:style-name="P11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110">Q8 ICMP 屬 OSI 哪一層？</text:p>
          </table:table-cell>
          <table:table-cell table:style-name="表格127.A3" office:value-type="string">
            <text:p text:style-name="P110">Network Layer</text:p>
          </table:table-cell>
          <table:table-cell table:style-name="表格127.A3" office:value-type="string">
            <text:p text:style-name="P11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110">Q9 何者用 UDP 且屬應用層？</text:p>
          </table:table-cell>
          <table:table-cell table:style-name="表格127.A2" office:value-type="string">
            <text:p text:style-name="P110">SNMP</text:p>
          </table:table-cell>
          <table:table-cell table:style-name="表格127.A2" office:value-type="string">
            <text:p text:style-name="P11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110">Q10 下列何者正確？</text:p>
          </table:table-cell>
          <table:table-cell table:style-name="表格127.A3" office:value-type="string">
            <text:p text:style-name="P110">SNMP 用於設備管理</text:p>
          </table:table-cell>
          <table:table-cell table:style-name="表格127.A3" office:value-type="string">
            <text:p text:style-name="P110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94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6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11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293</meta:editing-cycles>
    <meta:creation-date>2026-06-12T00:41:46.189000000</meta:creation-date>
    <dc:date>2026-06-15T18:58:42.834355600</dc:date>
    <meta:generator>LibreOffice/26.2.3.2$Windows_X86_64 LibreOffice_project/70e089b17412e4cb7773e41413306b17a2328c34</meta:generator>
    <meta:editing-duration>P2DT3H6M3S</meta:editing-duration>
    <meta:document-statistic meta:table-count="143" meta:image-count="0" meta:object-count="0" meta:page-count="51" meta:paragraph-count="2294" meta:word-count="29857" meta:character-count="47167" meta:non-whitespace-character-count="42556"/>
  </office:meta>
</office:document-meta>
</file>