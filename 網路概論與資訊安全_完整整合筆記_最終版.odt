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2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7" style:family="paragraph" style:parent-style-name="Standard">
      <style:paragraph-properties fo:margin-top="2.822cm" fo:margin-bottom="0cm" style:contextual-spacing="false"/>
    </style:style>
    <style:style style:name="P8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4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5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1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17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9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0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22" style:family="paragraph" style:parent-style-name="Standard">
      <style:paragraph-properties fo:margin-top="0cm" fo:margin-bottom="0.388cm" style:contextual-spacing="false"/>
    </style:style>
    <style:style style:name="P23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0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1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0" style:family="paragraph" style:parent-style-name="Standard">
      <style:paragraph-properties fo:margin-top="0cm" fo:margin-bottom="0.353cm" style:contextual-spacing="false"/>
    </style:style>
    <style:style style:name="P51" style:family="paragraph" style:parent-style-name="Standard">
      <style:paragraph-properties fo:margin-top="0.035cm" fo:margin-bottom="0.106cm" style:contextual-spacing="false" fo:line-height="0.459cm"/>
    </style:style>
    <style:style style:name="P52" style:family="paragraph" style:parent-style-name="Standard">
      <style:paragraph-properties fo:margin-top="0cm" fo:margin-bottom="0.042cm" style:contextual-spacing="false" fo:line-height="0.455cm"/>
    </style:style>
    <style:style style:name="P53" style:family="paragraph" style:parent-style-name="Standard">
      <style:paragraph-properties fo:margin-top="0.042cm" fo:margin-bottom="0.042cm" style:contextual-spacing="false" fo:line-height="0.455cm"/>
    </style:style>
    <style:style style:name="P54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5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6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58" style:family="paragraph" style:parent-style-name="Heading_20_3">
      <style:paragraph-properties fo:margin-top="0.318cm" fo:margin-bottom="0.123cm" style:contextual-spacing="false"/>
    </style:style>
    <style:style style:name="P59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3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6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0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91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9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0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3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10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5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0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5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6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7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9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" style:family="text">
      <style:text-properties fo:color="#2b2b2b" loext:opacity="100%" style:font-name="Microsoft JhengHei" fo:font-size="10.5pt" fo:font-style="normal" fo:font-weight="normal" fo:background-color="#ffab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" style:family="text">
      <style:text-properties fo:color="#2b2b2b" loext:opacity="100%" style:font-name="Microsoft JhengHei" fo:font-size="10.5pt" fo:font-style="normal" fo:font-weight="normal" fo:background-color="#ffab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fo:background-color="#ffc4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2b2b2b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2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0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font-weight="bold" fo:background-color="#ffd740" loext:char-shading-value="0" style:font-weight-asian="bold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weight-asian="bold" style:font-weight-complex="bold"/>
    </style:style>
    <style:style style:name="T43" style:family="text">
      <style:text-properties fo:font-weight="bold" fo:background-color="#18ffff" loext:char-shading-value="0" style:font-weight-asian="bold" style:font-weight-complex="bold"/>
    </style:style>
    <style:style style:name="T44" style:family="text">
      <style:text-properties fo:font-weight="bold" fo:background-color="#00e676" loext:char-shading-value="0" style:font-weight-asian="bold" style:font-weight-complex="bold"/>
    </style:style>
    <style:style style:name="T45" style:family="text">
      <style:text-properties fo:font-weight="bold" fo:background-color="#ffea00" loext:char-shading-value="0" style:font-weight-asian="bold" style:font-weight-complex="bold"/>
    </style:style>
    <style:style style:name="T46" style:family="text">
      <style:text-properties fo:font-weight="bold" fo:background-color="#76ff03" loext:char-shading-value="0" style:font-weight-asian="bold" style:font-weight-complex="bold"/>
    </style:style>
    <style:style style:name="T47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4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49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" style:family="text">
      <style:text-properties fo:background-color="#ffff00" loext:char-shading-value="0"/>
    </style:style>
    <style:style style:name="T51" style:family="text">
      <style:text-properties fo:background-color="#ffff00" loext:char-shading-value="0"/>
    </style:style>
    <style:style style:name="T52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3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56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8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background-color="#ffd740" loext:char-shading-value="0"/>
    </style:style>
    <style:style style:name="T60" style:family="text">
      <style:text-properties fo:background-color="#ffd740" loext:char-shading-value="0"/>
    </style:style>
    <style:style style:name="T6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2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3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6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5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66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67" style:family="text">
      <style:text-properties fo:color="#00e676" loext:opacity="100%" fo:font-weight="bold" fo:background-color="#004d40" loext:char-shading-value="0" style:font-weight-asian="bold" style:font-weight-complex="bold"/>
    </style:style>
    <style:style style:name="T68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fo:background-color="#004d40" loext:char-shading-value="0"/>
    </style:style>
    <style:style style:name="T72" style:family="text">
      <style:text-properties fo:color="#76ff03" loext:opacity="100%"/>
    </style:style>
    <style:style style:name="T73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74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5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6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77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78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7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0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1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7" style:family="text">
      <style:text-properties fo:color="#76ff03" loext:opacity="100%" fo:background-color="#1b5e20" loext:char-shading-value="0"/>
    </style:style>
    <style:style style:name="T88" style:family="text">
      <style:text-properties fo:color="#ffff00" loext:opacity="100%"/>
    </style:style>
    <style:style style:name="T8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1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92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93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6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7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8" style:family="text">
      <style:text-properties fo:color="#ffff00" loext:opacity="100%" fo:background-color="#ff9100" loext:char-shading-value="0"/>
    </style:style>
    <style:style style:name="T99" style:family="text">
      <style:text-properties fo:color="#ffff00" loext:opacity="100%" fo:background-color="#ff9100" loext:char-shading-value="0"/>
    </style:style>
    <style:style style:name="T100" style:family="text">
      <style:text-properties fo:color="#ffff00" loext:opacity="100%" fo:background-color="#ff3d00" loext:char-shading-value="0"/>
    </style:style>
    <style:style style:name="T10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3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104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06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07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08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09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10" style:family="text">
      <style:text-properties fo:color="#18ffff" loext:opacity="100%" fo:font-weight="bold" fo:background-color="#ffff00" loext:char-shading-value="0" style:font-weight-asian="bold" style:font-weight-complex="bold"/>
    </style:style>
    <style:style style:name="T111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2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3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18ffff" loext:opacity="100%" fo:background-color="#d500f9" loext:char-shading-value="0"/>
    </style:style>
    <style:style style:name="T117" style:family="text">
      <style:text-properties fo:color="#18ffff" loext:opacity="100%" fo:background-color="#1a237e" loext:char-shading-value="0"/>
    </style:style>
    <style:style style:name="T118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19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20" style:family="text">
      <style:text-properties fo:color="#c6ff00" loext:opacity="100%" fo:font-weight="bold" fo:background-color="#004d40" loext:char-shading-value="0" style:font-weight-asian="bold" style:font-weight-complex="bold"/>
    </style:style>
    <style:style style:name="T121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124" style:family="text">
      <style:text-properties fo:color="#c6ff00" loext:opacity="100%" fo:background-color="#004d40" loext:char-shading-value="0"/>
    </style:style>
    <style:style style:name="T125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28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29" style:family="text">
      <style:text-properties fo:color="#ff5252" loext:opacity="100%" fo:font-weight="bold" fo:background-color="#b71c1c" loext:char-shading-value="0" style:font-weight-asian="bold" style:font-weight-complex="bold"/>
    </style:style>
    <style:style style:name="T130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33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4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5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37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38" style:family="text">
      <style:text-properties fo:color="#ffd740" loext:opacity="100%" fo:font-weight="bold" fo:background-color="#b71c1c" loext:char-shading-value="0" style:font-weight-asian="bold" style:font-weight-complex="bold"/>
    </style:style>
    <style:style style:name="T139" style:family="text">
      <style:text-properties fo:color="#ffd740" loext:opacity="100%" fo:background-color="#3d5afe" loext:char-shading-value="0"/>
    </style:style>
    <style:style style:name="T140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41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146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14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48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49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50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51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2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3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155" style:family="text">
      <style:text-properties fo:color="#64ffda" loext:opacity="100%"/>
    </style:style>
    <style:style style:name="T156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59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60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61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62" style:family="text">
      <style:text-properties fo:color="#64ffda" loext:opacity="100%" fo:font-weight="bold" fo:background-color="#006064" loext:char-shading-value="0" style:font-weight-asian="bold" style:font-weight-complex="bold"/>
    </style:style>
    <style:style style:name="T163" style:family="text">
      <style:text-properties fo:color="#64ffda" loext:opacity="100%" fo:background-color="#006064" loext:char-shading-value="0"/>
    </style:style>
    <style:style style:name="T164" style:family="text">
      <style:text-properties fo:color="#64ffda" loext:opacity="100%" fo:background-color="#1a237e" loext:char-shading-value="0"/>
    </style:style>
    <style:style style:name="T16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6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7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8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70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3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74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75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76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77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78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79" style:family="text">
      <style:text-properties fo:color="#ffcdd2" loext:opacity="100%" fo:background-color="#b71c1c" loext:char-shading-value="0"/>
    </style:style>
    <style:style style:name="T180" style:family="text">
      <style:text-properties fo:background-color="#b71c1c" loext:char-shading-value="0"/>
    </style:style>
    <style:style style:name="T181" style:family="text">
      <style:text-properties fo:background-color="#b71c1c" loext:char-shading-value="0"/>
    </style:style>
    <style:style style:name="T182" style:family="text">
      <style:text-properties fo:color="#ef9a9a" loext:opacity="100%" fo:font-weight="bold" fo:background-color="#b71c1c" loext:char-shading-value="0" style:font-weight-asian="bold" style:font-weight-complex="bold"/>
    </style:style>
    <style:style style:name="T183" style:family="text">
      <style:text-properties fo:background-color="#01579b" loext:char-shading-value="0"/>
    </style:style>
    <style:style style:name="T184" style:family="text">
      <style:text-properties fo:background-color="#01579b" loext:char-shading-value="0"/>
    </style:style>
    <style:style style:name="T185" style:family="text">
      <style:text-properties fo:color="#40c4ff" loext:opacity="100%" fo:background-color="#01579b" loext:char-shading-value="0"/>
    </style:style>
    <style:style style:name="T186" style:family="text">
      <style:text-properties fo:color="#40c4ff" loext:opacity="100%" fo:font-weight="bold" fo:background-color="#01579b" loext:char-shading-value="0" style:font-weight-asian="bold" style:font-weight-complex="bold"/>
    </style:style>
    <style:style style:name="T187" style:family="text">
      <style:text-properties fo:background-color="#004d40" loext:char-shading-value="0"/>
    </style:style>
    <style:style style:name="T188" style:family="text">
      <style:text-properties fo:background-color="#004d40" loext:char-shading-value="0"/>
    </style:style>
    <style:style style:name="T189" style:family="text">
      <style:text-properties fo:color="#ffab40" loext:opacity="100%" fo:font-weight="bold" fo:background-color="#004d40" loext:char-shading-value="0" style:font-weight-asian="bold" style:font-weight-complex="bold"/>
    </style:style>
    <style:style style:name="T190" style:family="text">
      <style:text-properties fo:color="#ffab40" loext:opacity="100%" fo:font-weight="bold" fo:background-color="#ffff00" loext:char-shading-value="0" style:font-weight-asian="bold" style:font-weight-complex="bold"/>
    </style:style>
    <style:style style:name="T191" style:family="text">
      <style:text-properties fo:background-color="#006064" loext:char-shading-value="0"/>
    </style:style>
    <style:style style:name="T192" style:family="text">
      <style:text-properties fo:background-color="#006064" loext:char-shading-value="0"/>
    </style:style>
    <style:style style:name="T193" style:family="text">
      <style:text-properties fo:background-color="#ff9100" loext:char-shading-value="0"/>
    </style:style>
    <style:style style:name="T194" style:family="text">
      <style:text-properties fo:background-color="#ff9100" loext:char-shading-value="0"/>
    </style:style>
    <style:style style:name="T195" style:family="text">
      <style:text-properties fo:background-color="#4a148c" loext:char-shading-value="0"/>
    </style:style>
    <style:style style:name="T196" style:family="text">
      <style:text-properties fo:background-color="#4a148c" loext:char-shading-value="0"/>
    </style:style>
    <style:style style:name="T197" style:family="text">
      <style:text-properties fo:color="#e040fb" loext:opacity="100%" fo:background-color="#4a148c" loext:char-shading-value="0"/>
    </style:style>
    <style:style style:name="T198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199" style:family="text">
      <style:text-properties fo:background-color="#1a237e" loext:char-shading-value="0"/>
    </style:style>
    <style:style style:name="T200" style:family="text">
      <style:text-properties fo:background-color="#1a237e" loext:char-shading-value="0"/>
    </style:style>
    <style:style style:name="T201" style:family="text">
      <style:text-properties fo:color="#536dfe" loext:opacity="100%" fo:background-color="#1a237e" loext:char-shading-value="0"/>
    </style:style>
    <style:style style:name="T202" style:family="text">
      <style:text-properties fo:background-color="#1b5e2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公職考試 · 資訊類</text:p>
      <text:p text:style-name="P15">網路概論 與 資訊安全</text:p>
      <text:p text:style-name="P16">完整整合筆記 · 最終版</text:p>
      <text:p text:style-name="P2">OSI / TCP/IP ‧ IP 子網 ‧ IPv6 ‧ ARP/NAT ‧ TCP ‧ DNS ‧ 路由 ‧ SDN/CDN/5G ‧ 無線 ‧ 資安全攻防</text:p>
      <text:p text:style-name="P22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3">涵蓋十大主題</text:p>
            </table:table-cell>
            <table:table-cell table:style-name="表格1.A1" office:value-type="string">
              <text:p text:style-name="P23">前置速記</text:p>
            </table:table-cell>
            <table:table-cell table:style-name="表格1.A1" office:value-type="string">
              <text:p text:style-name="P23">全程對照</text:p>
            </table:table-cell>
            <table:table-cell table:style-name="表格1.A1" office:value-type="string">
              <text:p text:style-name="P23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31">十篇章節</text:p>
          </table:table-cell>
          <table:table-cell table:style-name="表格1.A2" office:value-type="string">
            <text:p text:style-name="P31">口訣 + 表格</text:p>
          </table:table-cell>
          <table:table-cell table:style-name="表格1.A2" office:value-type="string">
            <text:p text:style-name="P31">陷阱 + 正解</text:p>
          </table:table-cell>
          <table:table-cell table:style-name="表格1.A2" office:value-type="string">
            <text:p text:style-name="P31">申論 + 選擇</text:p>
          </table:table-cell>
        </table:table-row>
      </table:table>
      <text:p text:style-name="P5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1"><text:span text:style-name="T4">📖 <text:s/></text:span><text:span text:style-name="T6">讀這份筆記的方法</text:span></text:p>
            <text:p text:style-name="P52"><text:span text:style-name="T7">使用方式：</text:span><text:span text:style-name="T9">第〇篇「考前速記總表」收錄全書所有口訣與必背表格，考前衝刺只看這篇即可；</text:span></text:p>
            <text:p text:style-name="P39">第一～十篇為完整詳解，建立觀念與申論寫法時閱讀。每篇皆附「常見陷阱」與「考試標準答案」。</text:p>
          </table:table-cell>
        </table:table-row>
      </table:table>
      <text:p text:style-name="P17">目　錄</text:p>
      <text:p text:style-name="P3">Table of Contents</text:p>
      <text:p text:style-name="P56"><text:span text:style-name="T6">第 〇 篇　考前速記總表 — 口訣 × 必背表格</text:span><text:span text:style-name="T2"><text:tab/>3</text:span></text:p>
      <text:p text:style-name="P56"><text:span text:style-name="T3">　　Part A　口訣大全（依主題分類）</text:span><text:span text:style-name="T2"><text:tab/>3</text:span></text:p>
      <text:p text:style-name="P56"><text:span text:style-name="T3">　　Part B　必背表格精選</text:span><text:span text:style-name="T2"><text:tab/>5</text:span></text:p>
      <text:p text:style-name="P57"><text:span text:style-name="T23">第 一 篇　網路基礎架構：OSI / TCP-IP · 協定 · ARP · Traceroute</text:span><text:span text:style-name="T2"><text:tab/>9</text:span></text:p>
      <text:p text:style-name="P56"><text:span text:style-name="T23">第 二 篇　IP 位址與封包處理：分類 · CIDR · VLSM · Fragmentation</text:span><text:span text:style-name="T2"><text:tab/>13</text:span></text:p>
      <text:p text:style-name="P56"><text:span text:style-name="T23">第 三 篇　IPv4 → IPv6 過渡技術</text:span><text:span text:style-name="T2"><text:tab/>19</text:span></text:p>
      <text:p text:style-name="P56"><text:span text:style-name="T23">第 四 篇　ARP、NAT 與完整上網流程</text:span><text:span text:style-name="T2"><text:tab/>21</text:span></text:p>
      <text:p text:style-name="P56"><text:span text:style-name="T23">第 五 篇　TCP 傳輸控制深入</text:span><text:span text:style-name="T2"><text:tab/>24</text:span></text:p>
      <text:p text:style-name="P56"><text:span text:style-name="T23">第 六 篇　DNS 與 DNSSEC</text:span><text:span text:style-name="T2"><text:tab/>28</text:span></text:p>
      <text:p text:style-name="P56"><text:span text:style-name="T23">第 七 篇　路由協定：OSPF 與 BGP</text:span><text:span text:style-name="T2"><text:tab/>31</text:span></text:p>
      <text:p text:style-name="P56"><text:span text:style-name="T23">第 八 篇　網路系統進階：SDN · LB · CDN · 5G</text:span><text:span text:style-name="T2"><text:tab/>34</text:span></text:p>
      <text:p text:style-name="P56"><text:span text:style-name="T23">第 九 篇　無線通訊：WiFi vs Bluetooth</text:span><text:span text:style-name="T2"><text:tab/>37</text:span></text:p>
      <text:p text:style-name="P56"><text:span text:style-name="T23">第 十 篇　資訊安全：設備 · 攻防 · 企業資安 · Zero Trust</text:span><text:span text:style-name="T2"><text:tab/>40</text:span></text:p>
      <text:p text:style-name="P57"><text:span text:style-name="T6">結　語　考前最後叮嚀</text:span><text:span text:style-name="T2"><text:tab/>51</text:span></text:p>
      <text:h text:style-name="P25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1"><text:span text:style-name="T4">⚡ <text:s/></text:span><text:span text:style-name="T23">本篇用途</text:span></text:p>
            <text:p text:style-name="P40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9" text:outline-level="2">Part A　口訣大全（依主題分類）</text:h>
      <text:h text:style-name="P58" text:outline-level="3"><text:span text:style-name="T28">▍</text:span><text:span text:style-name="T2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9">🔑 口訣</text:p>
            <text:p text:style-name="P52"><text:span text:style-name="T32">TCP/IP 四層心法：</text:span><text:span text:style-name="T9">應用層→給人用（HTTP/DNS/DHCP/SSH/MQTT）｜傳輸層→怎麼送（TCP 穩、UDP 快）｜網路層→走哪條路（IP/ICMP）｜連結層→同一區網怎麼接（Ethernet/ARP）</text:span></text:p>
            <text:p text:style-name="P53"><text:span text:style-name="T32">OSI vs TCP/IP：</text:span><text:span text:style-name="T9">OSI 7 層（理論）、TCP/IP 4 層（實際）；差別在 TCP/IP 把 Session＋Presentation 併入 Application。</text:span></text:p>
            <text:p text:style-name="P53"><text:span text:style-name="T32">TCP vs UDP：</text:span><text:span text:style-name="T9">TCP「穩定優先」（保證送達、會重傳）；UDP「速度優先」（不保證、不重傳）。</text:span></text:p>
            <text:p text:style-name="P53"><text:span text:style-name="T32">三件事：</text:span><text:span text:style-name="T9">IP→定位（目的地是誰）｜Routing→選路（怎麼走最快）｜ICMP→回報（出錯通知你）。</text:span></text:p>
            <text:p text:style-name="P53"><text:span text:style-name="T32">Traceroute＝</text:span><text:span text:style-name="T9">TTL 遞增 ＋ ICMP 回報，逐步「炸出」完整路徑。</text:span></text:p>
            <text:p text:style-name="P53"><text:span text:style-name="T32">ARP＝</text:span><text:span text:style-name="T9">用 IP 找 MAC，只在同一個 LAN 內使用。</text:span></text:p>
          </table:table-cell>
        </table:table-row>
      </table:table>
      <text:h text:style-name="P58" text:outline-level="3"><text:span text:style-name="T28">▍</text:span><text:span text:style-name="T2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9">🔑 口訣</text:p>
            <text:p text:style-name="P52"><text:span text:style-name="T32">VLSM 黃金公式：</text:span><text:span text:style-name="T9">需求 ＋2 → 找最小 2ⁿ → 前綴 /(32−n)。</text:span></text:p>
            <text:p text:style-name="P53"><text:span text:style-name="T32">可用主機數：</text:span><text:span text:style-name="T9">2^(主機 bit) − 2（扣掉網路位址與廣播位址）。</text:span></text:p>
            <text:p text:style-name="P53"><text:span text:style-name="T32">CIDR 合併：</text:span><text:span text:style-name="T9">連續 ＋ 數量 2ⁿ ＋ 起點對齊 → 合併 2ⁿ 個子網則「前綴減 n」。</text:span></text:p>
            <text:p text:style-name="P53"><text:span text:style-name="T32">前綴速背：</text:span><text:span text:style-name="T9">/25=126、/26=62、/27=30、/28=14、/29=6、/30=2。</text:span></text:p>
            <text:p text:style-name="P53"><text:span text:style-name="T32">封包切割：</text:span><text:span text:style-name="T9">封包 &gt; MTU 就切（Fragmentation）；Fragment Offset ＝ 起始位置 ÷ 8。</text:span></text:p>
            <text:p text:style-name="P53"><text:span text:style-name="T32">誰能切：</text:span><text:span text:style-name="T9">IPv4＝Router 或 Source 可切；IPv6＝只有 Source 切，必搭 PMTUD。</text:span></text:p>
            <text:p text:style-name="P53"><text:span text:style-name="T32">Protocol 值：</text:span><text:span text:style-name="T9">ICMP=1、TCP=6、UDP=17｜DF=1 禁止切、MF=1 後面還有分段｜MSS＝MTU−20−20＝1460。</text:span></text:p>
          </table:table-cell>
        </table:table-row>
      </table:table>
      <text:h text:style-name="P58" text:outline-level="3"><text:span text:style-name="T28">▍</text:span><text:span text:style-name="T2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9">🔑 口訣</text:p>
            <text:p text:style-name="P52"><text:span text:style-name="T32">IPv6 特點：</text:span><text:span text:style-name="T9">大（128 bit）＋ 安全（IPsec）＋ 快（固定 Header）＋ 自動（SLAAC）＋ 乾淨（無 Broadcast）。</text:span></text:p>
            <text:p text:style-name="P53"><text:span text:style-name="T32">三種過渡技術：</text:span><text:span text:style-name="T9">雙語（Dual Stack）＋ 偽裝（Tunneling）＋ 翻譯（Translation）。</text:span></text:p>
            <text:p text:style-name="P53"><text:span text:style-name="T32">生活比喻：</text:span><text:span text:style-name="T9">Dual Stack＝同時會中英文；Tunneling＝英文信裝進中文信封偷渡；Translation＝現場請翻譯口譯。</text:span></text:p>
          </table:table-cell>
        </table:table-row>
      </table:table>
      <text:h text:style-name="P58" text:outline-level="3"><text:span text:style-name="T28">▍</text:span><text:span text:style-name="T2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9">🔑 口訣</text:p>
            <text:p text:style-name="P52"><text:span text:style-name="T32">上網流程：</text:span><text:span text:style-name="T9">DNS → ARP → L2 封包 → NAT（去程）→ Internet → NAT（回程）→ 你。</text:span></text:p>
            <text:p text:style-name="P53"><text:span text:style-name="T32">核心觀念：</text:span><text:span text:style-name="T9">IP＝最終目的地（全程不變）；MAC＝下一站（每跳更換）。</text:span></text:p>
            <text:p text:style-name="P53"><text:span text:style-name="T32">最大地雷：</text:span><text:span text:style-name="T9">ARP 找的是「路由器（預設閘道）」的 MAC，不是 Google 的 MAC。</text:span></text:p>
            <text:p text:style-name="P53"><text:soft-page-break/><text:span text:style-name="T32">PAT：</text:span><text:span text:style-name="T9">多台共用一個公網 IP，靠 Port 號碼區分（最重要）。</text:span></text:p>
          </table:table-cell>
        </table:table-row>
      </table:table>
      <text:h text:style-name="P58" text:outline-level="3"><text:span text:style-name="T28">▍</text:span><text:span text:style-name="T2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9">🔑 口訣</text:p>
            <text:p text:style-name="P52"><text:span text:style-name="T32">三次握手：</text:span><text:span text:style-name="T9">SYN → SYN＋ACK → ACK，確認雙向都能通訊。</text:span></text:p>
            <text:p text:style-name="P53"><text:span text:style-name="T32">傳送量公式：</text:span><text:span text:style-name="T9">實際傳送量 ＝ min(rwnd, cwnd)。rwnd＝接收端限制、cwnd＝網路限制。</text:span></text:p>
            <text:p text:style-name="P53"><text:span text:style-name="T32">擁塞控制節奏：</text:span><text:span text:style-name="T9">Slow Start（指數成長）→ Congestion Avoidance（線性成長）→ 丟包（減速）。</text:span></text:p>
            <text:p text:style-name="P53"><text:span text:style-name="T32">丟包處理：</text:span><text:span text:style-name="T9">Timeout → cwnd 重設為 1 回 Slow Start；3 個重複 ACK → cwnd 減半續 CA。</text:span></text:p>
            <text:p text:style-name="P53"><text:span text:style-name="T32">AIMD：</text:span><text:span text:style-name="T9">沒丟包 每 RTT＋1（加法增長）；丟包 ×0.5（乘法減少）。</text:span></text:p>
            <text:p text:style-name="P53"><text:span text:style-name="T32">SYN Flood：</text:span><text:span text:style-name="T9">大量半連線（Half-open）耗盡 Server 資源 → DoS。</text:span></text:p>
          </table:table-cell>
        </table:table-row>
      </table:table>
      <text:h text:style-name="P58" text:outline-level="3"><text:span text:style-name="T28">▍</text:span><text:span text:style-name="T2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9">🔑 口訣</text:p>
            <text:p text:style-name="P52"><text:span text:style-name="T32">查詢流程：</text:span><text:span text:style-name="T9">Cache → Local → Root → TLD → Authoritative → 取得 IP。</text:span></text:p>
            <text:p text:style-name="P53"><text:span text:style-name="T32">Recursive：</text:span><text:span text:style-name="T9">「代查到底」（DNS 幫你問完，你只問一次）。</text:span></text:p>
            <text:p text:style-name="P53"><text:span text:style-name="T32">Iterative：</text:span><text:span text:style-name="T9">「逐層詢問」（你自己一層一層問）。</text:span></text:p>
            <text:p text:style-name="P53"><text:span text:style-name="T32">DNSSEC：</text:span><text:span text:style-name="T9">驗證真偽，不是加密、不防 DDoS。</text:span></text:p>
          </table:table-cell>
        </table:table-row>
      </table:table>
      <text:h text:style-name="P58" text:outline-level="3"><text:span text:style-name="T28">▍</text:span><text:span text:style-name="T2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9">🔑 口訣</text:p>
            <text:p text:style-name="P52"><text:span text:style-name="T32">範圍分類：</text:span><text:span text:style-name="T9">公司／校園內 → IGP（OSPF、RIP）；公司與公司間 → EGP（BGP）。</text:span></text:p>
            <text:p text:style-name="P53"><text:span text:style-name="T32">OSPF 規定：</text:span><text:span text:style-name="T9">所有 Area 一定要連到 Area 0（骨幹）才能互通。</text:span></text:p>
            <text:p text:style-name="P53"><text:span text:style-name="T32">OSPF 四種 Router：</text:span><text:span text:style-name="T9">Internal（不出 Area）／Backbone（在 Area 0）／ABR（跨 Area 橋樑）／ASBR（跨 AS 入口）。</text:span></text:p>
            <text:p text:style-name="P53"><text:span text:style-name="T32">BGP 選路順序：</text:span><text:span text:style-name="T9">Weight &gt; Local Pref &gt; 自己產生 &gt; AS-PATH &gt; Origin &gt; MED &gt; eBGP &gt; IGP cost &gt; Router ID。</text:span></text:p>
            <text:p text:style-name="P53"><text:span text:style-name="T32">BGP 本質：</text:span><text:span text:style-name="T9">政策導向（不是距離導向）；Local Preference 才是最重要的「通用」屬性（Weight 為 Cisco 私有）。</text:span></text:p>
            <text:p text:style-name="P53"><text:span text:style-name="T32">三層分工：</text:span><text:span text:style-name="T9">防火牆→「能不能走」｜NAT→「你是誰」｜BGP→「怎麼走」。</text:span></text:p>
          </table:table-cell>
        </table:table-row>
      </table:table>
      <text:h text:style-name="P58" text:outline-level="3"><text:span text:style-name="T28">▍</text:span><text:span text:style-name="T2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9">🔑 口訣</text:p>
            <text:p text:style-name="P52"><text:span text:style-name="T32">SDN：</text:span><text:span text:style-name="T9">「分平面、三層 App-控-基」＝控制／資料分離；Application → Control → Infrastructure。</text:span></text:p>
            <text:p text:style-name="P53"><text:span text:style-name="T32">Load Balancing：</text:span><text:span text:style-name="T9">「LB 輪、重、黏」＝Round Robin（輪流）／Weighted RR（加權）／Stickiness（同人同台）。</text:span></text:p>
            <text:p text:style-name="P53"><text:span text:style-name="T32">CDN：</text:span><text:span text:style-name="T9">「網址轉轉轉（CNAME），資料找最近（Edge）」；CNAME＝網址→網址（非 IP）。</text:span></text:p>
            <text:p text:style-name="P53"><text:span text:style-name="T32">5G：</text:span><text:span text:style-name="T9">「快、低、多、切」＝eMBB（高速）／URLLC（超低延遲）／mMTC（大量連線）／Network Slicing（切片）。</text:span></text:p>
            <text:p text:style-name="P53"><text:span text:style-name="T32">10 秒總背：</text:span><text:span text:style-name="T9">SDN 分離三層、LB 輪重黏、CDN CNAME→最近、5G 快低多切、WiFi 聽、BT 跳。</text:span></text:p>
          </table:table-cell>
        </table:table-row>
      </table:table>
      <text:h text:style-name="P58" text:outline-level="3"><text:span text:style-name="T28">▍</text:span><text:span text:style-name="T2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9">🔑 口訣</text:p>
            <text:p text:style-name="P52"><text:span text:style-name="T32">一句總綱：</text:span><text:span text:style-name="T9">「WiFi 先聽再說（CSMA/CA），Bluetooth 一直換頻道（FHSS）」。</text:span></text:p>
            <text:p text:style-name="P53"><text:span text:style-name="T32">本質對比：</text:span><text:span text:style-name="T9">WiFi＝搶頻道（菜市場）；BT＝排班（會議室預約）；時槽＝時間格子；SCO＝語音；L2CAP＝三通道。</text:span></text:p>
            <text:p text:style-name="P53"><text:soft-page-break/><text:span text:style-name="T32">最大陷阱：</text:span><text:span text:style-name="T9">有線 Ethernet＝CD（Detect 偵測）；無線 WiFi＝CA（Avoid 避免）。</text:span></text:p>
            <text:p text:style-name="P53"><text:span text:style-name="T32">QoS／語音：</text:span><text:span text:style-name="T9">WiFi QoS＝EDCA（急診室分級）；藍牙即時語音＝SCO／eSCO；L2CAP 位於 Data Link 層。</text:span></text:p>
          </table:table-cell>
        </table:table-row>
      </table:table>
      <text:h text:style-name="P58" text:outline-level="3"><text:span text:style-name="T28">▍</text:span><text:span text:style-name="T2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9">🔑 口訣</text:p>
            <text:p text:style-name="P52"><text:span text:style-name="T32">設備萬用口訣：</text:span><text:span text:style-name="T9">FW 封外、WAF 看內、NGFW 最強、DMZ 隔離、IOC 壞人、Proxy 幫客、Reverse 幫服。</text:span></text:p>
            <text:p text:style-name="P53"><text:span text:style-name="T32">IOC 四線索：</text:span><text:span text:style-name="T9">網（Domain）→ 檔（Hash）→ 連（IP）→ 控（C2）。</text:span></text:p>
            <text:p text:style-name="P53"><text:span text:style-name="T32">封包闖關順序：</text:span><text:span text:style-name="T9">Client → Proxy → Internet → FW/NGFW → DMZ → WAF → Reverse Proxy → 內部 Server。</text:span></text:p>
            <text:p text:style-name="P53"><text:span text:style-name="T32">三防分工：</text:span><text:span text:style-name="T9">Firewall 擋入口、IDS 只看、IPS 看＋擋；HIDS 看主機（Log）、NIDS 看網路（封包）。</text:span></text:p>
            <text:p text:style-name="P53"><text:span text:style-name="T32">易混兩協定：</text:span><text:span text:style-name="T9">SNMP 管理設備（應用層／UDP）、ICMP 診斷網路（網路層）。</text:span></text:p>
            <text:p text:style-name="P53"><text:span text:style-name="T32">SQL Injection：</text:span><text:span text:style-name="T9">攻擊＝' OR 1=1 --；防禦核心＝Prepared Statement（預備語句）。</text:span></text:p>
            <text:p text:style-name="P53"><text:span text:style-name="T32">Zero-Day：</text:span><text:span text:style-name="T9">最怕「沒有 Signature」；防禦＝Patch 更新 ＋ IDS/IPS ＋ 網路分段。</text:span></text:p>
            <text:p text:style-name="P53"><text:span text:style-name="T32">企業資安三階段：</text:span><text:span text:style-name="T9">事前預防 → 事中偵測 → 事後復原。RTO＝停機時間、RPO＝資料損失量。</text:span></text:p>
            <text:p text:style-name="P53"><text:span text:style-name="T32">EDR/MDR：</text:span><text:span text:style-name="T9">EDR＝自己買工具守、MDR＝請公司幫你守、ATT&amp;CK＝駭客招式教材、數位韌性＝撐住快速復原。</text:span></text:p>
            <text:p text:style-name="P53"><text:span text:style-name="T32">SSDLC：</text:span><text:span text:style-name="T9">Define→Design→Develop→Test→Deploy→Maintain，精神是「左移（Shift Left）」。</text:span></text:p>
            <text:p text:style-name="P53"><text:span text:style-name="T32">Zero Trust：</text:span><text:span text:style-name="T9">永不信任，始終驗證；查「人（Identity）機（Device）境（Context）」；配 MFA＋最小權限＋微分段＋持續監控。</text:span></text:p>
          </table:table-cell>
        </table:table-row>
      </table:table>
      <text:h text:style-name="P9" text:outline-level="2">Part B　必背表格精選（考前掃一遍）</text:h>
      <text:h text:style-name="P58" text:outline-level="3"><text:span text:style-name="T28">▍</text:span><text:span text:style-name="T2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3">前綴</text:p>
            </table:table-cell>
            <table:table-cell table:style-name="表格14.A1" office:value-type="string">
              <text:p text:style-name="P23">主機 bit</text:p>
            </table:table-cell>
            <table:table-cell table:style-name="表格14.A1" office:value-type="string">
              <text:p text:style-name="P23">IP 總數</text:p>
            </table:table-cell>
            <table:table-cell table:style-name="表格14.A1" office:value-type="string">
              <text:p text:style-name="P23">可用主機</text:p>
            </table:table-cell>
            <table:table-cell table:style-name="表格14.A1" office:value-type="string">
              <text:p text:style-name="P23">區塊步長</text:p>
            </table:table-cell>
            <table:table-cell table:style-name="表格14.A1" office:value-type="string">
              <text:p text:style-name="P23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32">/24</text:p>
          </table:table-cell>
          <table:table-cell table:style-name="表格14.A2" office:value-type="string">
            <text:p text:style-name="P31">8</text:p>
          </table:table-cell>
          <table:table-cell table:style-name="表格14.A2" office:value-type="string">
            <text:p text:style-name="P32">256</text:p>
          </table:table-cell>
          <table:table-cell table:style-name="表格14.A2" office:value-type="string">
            <text:p text:style-name="P10">254</text:p>
          </table:table-cell>
          <table:table-cell table:style-name="表格14.A2" office:value-type="string">
            <text:p text:style-name="P32">+256</text:p>
          </table:table-cell>
          <table:table-cell table:style-name="表格14.A2" office:value-type="string">
            <text:p text:style-name="P32">255</text:p>
          </table:table-cell>
        </table:table-row>
        <table:table-row table:style-name="表格14.1">
          <table:table-cell table:style-name="表格14.A3" office:value-type="string">
            <text:p text:style-name="P32">/25</text:p>
          </table:table-cell>
          <table:table-cell table:style-name="表格14.A3" office:value-type="string">
            <text:p text:style-name="P31">7</text:p>
          </table:table-cell>
          <table:table-cell table:style-name="表格14.A3" office:value-type="string">
            <text:p text:style-name="P32">128</text:p>
          </table:table-cell>
          <table:table-cell table:style-name="表格14.A3" office:value-type="string">
            <text:p text:style-name="P10">126</text:p>
          </table:table-cell>
          <table:table-cell table:style-name="表格14.A3" office:value-type="string">
            <text:p text:style-name="P32">+128</text:p>
          </table:table-cell>
          <table:table-cell table:style-name="表格14.A3" office:value-type="string">
            <text:p text:style-name="P32">127, 255</text:p>
          </table:table-cell>
        </table:table-row>
        <table:table-row table:style-name="表格14.1">
          <table:table-cell table:style-name="表格14.A2" office:value-type="string">
            <text:p text:style-name="P32">/26</text:p>
          </table:table-cell>
          <table:table-cell table:style-name="表格14.A2" office:value-type="string">
            <text:p text:style-name="P31">6</text:p>
          </table:table-cell>
          <table:table-cell table:style-name="表格14.A2" office:value-type="string">
            <text:p text:style-name="P32">64</text:p>
          </table:table-cell>
          <table:table-cell table:style-name="表格14.A2" office:value-type="string">
            <text:p text:style-name="P10">62</text:p>
          </table:table-cell>
          <table:table-cell table:style-name="表格14.A2" office:value-type="string">
            <text:p text:style-name="P32">+64</text:p>
          </table:table-cell>
          <table:table-cell table:style-name="表格14.A2" office:value-type="string">
            <text:p text:style-name="P32">63, 127, 191, 255</text:p>
          </table:table-cell>
        </table:table-row>
        <table:table-row table:style-name="表格14.1">
          <table:table-cell table:style-name="表格14.A3" office:value-type="string">
            <text:p text:style-name="P32">/27</text:p>
          </table:table-cell>
          <table:table-cell table:style-name="表格14.A3" office:value-type="string">
            <text:p text:style-name="P31">5</text:p>
          </table:table-cell>
          <table:table-cell table:style-name="表格14.A3" office:value-type="string">
            <text:p text:style-name="P32">32</text:p>
          </table:table-cell>
          <table:table-cell table:style-name="表格14.A3" office:value-type="string">
            <text:p text:style-name="P10">30</text:p>
          </table:table-cell>
          <table:table-cell table:style-name="表格14.A3" office:value-type="string">
            <text:p text:style-name="P32">+32</text:p>
          </table:table-cell>
          <table:table-cell table:style-name="表格14.A3" office:value-type="string">
            <text:p text:style-name="P32">31, 63, 95 …</text:p>
          </table:table-cell>
        </table:table-row>
        <table:table-row table:style-name="表格14.1">
          <table:table-cell table:style-name="表格14.A2" office:value-type="string">
            <text:p text:style-name="P32">/28</text:p>
          </table:table-cell>
          <table:table-cell table:style-name="表格14.A2" office:value-type="string">
            <text:p text:style-name="P31">4</text:p>
          </table:table-cell>
          <table:table-cell table:style-name="表格14.A2" office:value-type="string">
            <text:p text:style-name="P32">16</text:p>
          </table:table-cell>
          <table:table-cell table:style-name="表格14.A2" office:value-type="string">
            <text:p text:style-name="P10">14</text:p>
          </table:table-cell>
          <table:table-cell table:style-name="表格14.A2" office:value-type="string">
            <text:p text:style-name="P32">+16</text:p>
          </table:table-cell>
          <table:table-cell table:style-name="表格14.A2" office:value-type="string">
            <text:p text:style-name="P32">15, 31, 47 …</text:p>
          </table:table-cell>
        </table:table-row>
        <table:table-row table:style-name="表格14.1">
          <table:table-cell table:style-name="表格14.A3" office:value-type="string">
            <text:p text:style-name="P32">/29</text:p>
          </table:table-cell>
          <table:table-cell table:style-name="表格14.A3" office:value-type="string">
            <text:p text:style-name="P31">3</text:p>
          </table:table-cell>
          <table:table-cell table:style-name="表格14.A3" office:value-type="string">
            <text:p text:style-name="P32">8</text:p>
          </table:table-cell>
          <table:table-cell table:style-name="表格14.A3" office:value-type="string">
            <text:p text:style-name="P10">6</text:p>
          </table:table-cell>
          <table:table-cell table:style-name="表格14.A3" office:value-type="string">
            <text:p text:style-name="P32">+8</text:p>
          </table:table-cell>
          <table:table-cell table:style-name="表格14.A3" office:value-type="string">
            <text:p text:style-name="P32">7, 15, 23 …</text:p>
          </table:table-cell>
        </table:table-row>
        <table:table-row table:style-name="表格14.1">
          <table:table-cell table:style-name="表格14.A2" office:value-type="string">
            <text:p text:style-name="P32">/30</text:p>
          </table:table-cell>
          <table:table-cell table:style-name="表格14.A2" office:value-type="string">
            <text:p text:style-name="P31">2</text:p>
          </table:table-cell>
          <table:table-cell table:style-name="表格14.A2" office:value-type="string">
            <text:p text:style-name="P32">4</text:p>
          </table:table-cell>
          <table:table-cell table:style-name="表格14.A2" office:value-type="string">
            <text:p text:style-name="P10">2</text:p>
          </table:table-cell>
          <table:table-cell table:style-name="表格14.A2" office:value-type="string">
            <text:p text:style-name="P32">+4</text:p>
          </table:table-cell>
          <table:table-cell table:style-name="表格14.A2" office:value-type="string">
            <text:p text:style-name="P3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52"><text:span text:style-name="T35">例外 /31：</text:span><text:span text:style-name="T9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58" text:outline-level="3"><text:span text:style-name="T28">▍</text:span><text:span text:style-name="T2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6">比較項目</text:p>
            </table:table-cell>
            <table:table-cell table:style-name="表格15.A1" office:value-type="string">
              <text:p text:style-name="P26">TCP（穩定）</text:p>
            </table:table-cell>
            <table:table-cell table:style-name="表格15.A1" office:value-type="string">
              <text:p text:style-name="P2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2">連線方式</text:p>
          </table:table-cell>
          <table:table-cell table:style-name="表格15.A2" office:value-type="string">
            <text:p text:style-name="P42">三次握手才開始</text:p>
          </table:table-cell>
          <table:table-cell table:style-name="表格15.A2" office:value-type="string">
            <text:p text:style-name="P42">無連線，直接送</text:p>
          </table:table-cell>
        </table:table-row>
        <table:table-row table:style-name="表格15.1">
          <table:table-cell table:style-name="表格15.A3" office:value-type="string">
            <text:p text:style-name="P42">可靠性</text:p>
          </table:table-cell>
          <table:table-cell table:style-name="表格15.A3" office:value-type="string">
            <text:p text:style-name="P42">保證送達、會重傳</text:p>
          </table:table-cell>
          <table:table-cell table:style-name="表格15.A3" office:value-type="string">
            <text:p text:style-name="P42">不保證、不重傳</text:p>
          </table:table-cell>
        </table:table-row>
        <table:table-row table:style-name="表格15.1">
          <table:table-cell table:style-name="表格15.A2" office:value-type="string">
            <text:p text:style-name="P42">順序<text:soft-page-break/></text:p>
          </table:table-cell>
          <table:table-cell table:style-name="表格15.A2" office:value-type="string">
            <text:p text:style-name="P42">保證順序<text:soft-page-break/></text:p>
          </table:table-cell>
          <table:table-cell table:style-name="表格15.A2" office:value-type="string">
            <text:p text:style-name="P42">不保證順序<text:soft-page-break/></text:p>
          </table:table-cell>
        </table:table-row>
        <table:table-row table:style-name="表格15.1">
          <table:table-cell table:style-name="表格15.A3" office:value-type="string">
            <text:p text:style-name="P42">速度</text:p>
          </table:table-cell>
          <table:table-cell table:style-name="表格15.A3" office:value-type="string">
            <text:p text:style-name="P42">較慢（有控制機制）</text:p>
          </table:table-cell>
          <table:table-cell table:style-name="表格15.A3" office:value-type="string">
            <text:p text:style-name="P42">較快（無額外開銷）</text:p>
          </table:table-cell>
        </table:table-row>
        <table:table-row table:style-name="表格15.1">
          <table:table-cell table:style-name="表格15.A2" office:value-type="string">
            <text:p text:style-name="P42">適用</text:p>
          </table:table-cell>
          <table:table-cell table:style-name="表格15.A2" office:value-type="string">
            <text:p text:style-name="P42">網頁、Email、FTP、檔案</text:p>
          </table:table-cell>
          <table:table-cell table:style-name="表格15.A2" office:value-type="string">
            <text:p text:style-name="P42">串流、遊戲、VoIP、DNS</text:p>
          </table:table-cell>
        </table:table-row>
        <table:table-row table:style-name="表格15.1">
          <table:table-cell table:style-name="表格15.A3" office:value-type="string">
            <text:p text:style-name="P42">一句話</text:p>
          </table:table-cell>
          <table:table-cell table:style-name="表格15.A3" office:value-type="string">
            <text:p text:style-name="P60">「穩定優先」</text:p>
          </table:table-cell>
          <table:table-cell table:style-name="表格15.A3" office:value-type="string">
            <text:p text:style-name="P12">「速度優先」</text:p>
          </table:table-cell>
        </table:table-row>
      </table:table>
      <text:h text:style-name="P58" text:outline-level="3"><text:span text:style-name="T28">▍</text:span><text:span text:style-name="T2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4">比較項目</text:p>
            </table:table-cell>
            <table:table-cell table:style-name="表格16.A1" office:value-type="string">
              <text:p text:style-name="P24">✗ IPv4 問題</text:p>
            </table:table-cell>
            <table:table-cell table:style-name="表格16.A1" office:value-type="string">
              <text:p text:style-name="P24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32">位址長度</text:p>
          </table:table-cell>
          <table:table-cell table:style-name="表格16.A2" office:value-type="string">
            <text:p text:style-name="P32">32 bit，約 43 億個，已不足</text:p>
          </table:table-cell>
          <table:table-cell table:style-name="表格16.A2" office:value-type="string">
            <text:p text:style-name="P3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32">NAT</text:p>
          </table:table-cell>
          <table:table-cell table:style-name="表格16.A3" office:value-type="string">
            <text:p text:style-name="P32">需 NAT 共用 IP，破壞 E2E</text:p>
          </table:table-cell>
          <table:table-cell table:style-name="表格16.A3" office:value-type="string">
            <text:p text:style-name="P3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32">安全性</text:p>
          </table:table-cell>
          <table:table-cell table:style-name="表格16.A2" office:value-type="string">
            <text:p text:style-name="P32">無內建加密／驗證</text:p>
          </table:table-cell>
          <table:table-cell table:style-name="表格16.A2" office:value-type="string">
            <text:p text:style-name="P3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32">Header</text:p>
          </table:table-cell>
          <table:table-cell table:style-name="表格16.A3" office:value-type="string">
            <text:p text:style-name="P32">可變長度含 Options，效率低</text:p>
          </table:table-cell>
          <table:table-cell table:style-name="表格16.A3" office:value-type="string">
            <text:p text:style-name="P3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32">QoS</text:p>
          </table:table-cell>
          <table:table-cell table:style-name="表格16.A2" office:value-type="string">
            <text:p text:style-name="P32">無法標記優先權</text:p>
          </table:table-cell>
          <table:table-cell table:style-name="表格16.A2" office:value-type="string">
            <text:p text:style-name="P3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32">廣播</text:p>
          </table:table-cell>
          <table:table-cell table:style-name="表格16.A3" office:value-type="string">
            <text:p text:style-name="P32">Broadcast 發給所有人</text:p>
          </table:table-cell>
          <table:table-cell table:style-name="表格16.A3" office:value-type="string">
            <text:p text:style-name="P32">改用 Multicast／Anycast</text:p>
          </table:table-cell>
        </table:table-row>
        <table:table-row table:style-name="表格16.1">
          <table:table-cell table:style-name="表格16.A2" office:value-type="string">
            <text:p text:style-name="P32">IP 配置</text:p>
          </table:table-cell>
          <table:table-cell table:style-name="表格16.A2" office:value-type="string">
            <text:p text:style-name="P32">手動或 DHCP，繁瑣</text:p>
          </table:table-cell>
          <table:table-cell table:style-name="表格16.A2" office:value-type="string">
            <text:p text:style-name="P32">SLAAC 無狀態自動配置</text:p>
          </table:table-cell>
        </table:table-row>
      </table:table>
      <text:h text:style-name="P58" text:outline-level="3"><text:span text:style-name="T28">▍</text:span><text:span text:style-name="T2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4">丟包偵測</text:p>
            </table:table-cell>
            <table:table-cell table:style-name="表格17.A1" office:value-type="string">
              <text:p text:style-name="P24">代表意義</text:p>
            </table:table-cell>
            <table:table-cell table:style-name="表格17.A1" office:value-type="string">
              <text:p text:style-name="P24">ssthresh</text:p>
            </table:table-cell>
            <table:table-cell table:style-name="表格17.A1" office:value-type="string">
              <text:p text:style-name="P24">cwnd</text:p>
            </table:table-cell>
            <table:table-cell table:style-name="表格17.A1" office:value-type="string">
              <text:p text:style-name="P24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32">Timeout（逾時）</text:p>
          </table:table-cell>
          <table:table-cell table:style-name="表格17.A2" office:value-type="string">
            <text:p text:style-name="P32">網路嚴重擁塞</text:p>
          </table:table-cell>
          <table:table-cell table:style-name="表格17.A2" office:value-type="string">
            <text:p text:style-name="P32">= cwnd / 2</text:p>
          </table:table-cell>
          <table:table-cell table:style-name="表格17.A2" office:value-type="string">
            <text:p text:style-name="P64">重設為 1</text:p>
          </table:table-cell>
          <table:table-cell table:style-name="表格17.A2" office:value-type="string">
            <text:p text:style-name="P32">重回 Slow Start</text:p>
          </table:table-cell>
        </table:table-row>
        <table:table-row table:style-name="表格17.1">
          <table:table-cell table:style-name="表格17.A3" office:value-type="string">
            <text:p text:style-name="P32">3 個重複 ACK</text:p>
          </table:table-cell>
          <table:table-cell table:style-name="表格17.A3" office:value-type="string">
            <text:p text:style-name="P32">單一封包遺失</text:p>
          </table:table-cell>
          <table:table-cell table:style-name="表格17.A3" office:value-type="string">
            <text:p text:style-name="P32">= cwnd / 2</text:p>
          </table:table-cell>
          <table:table-cell table:style-name="表格17.A3" office:value-type="string">
            <text:p text:style-name="P11">= ssthresh（減半）</text:p>
          </table:table-cell>
          <table:table-cell table:style-name="表格17.A3" office:value-type="string">
            <text:p text:style-name="P32">續 Congestion Avoidance</text:p>
          </table:table-cell>
        </table:table-row>
      </table:table>
      <text:h text:style-name="P58" text:outline-level="3"><text:span text:style-name="T28">▍</text:span><text:span text:style-name="T2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順序</text:p>
            </table:table-cell>
            <table:table-cell table:style-name="表格18.A1" office:value-type="string">
              <text:p text:style-name="P23">屬性</text:p>
            </table:table-cell>
            <table:table-cell table:style-name="表格18.A1" office:value-type="string">
              <text:p text:style-name="P23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31">①</text:p>
          </table:table-cell>
          <table:table-cell table:style-name="表格18.A2" office:value-type="string">
            <text:p text:style-name="P32">Weight</text:p>
          </table:table-cell>
          <table:table-cell table:style-name="表格18.A2" office:value-type="string">
            <text:p text:style-name="P3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31">②</text:p>
          </table:table-cell>
          <table:table-cell table:style-name="表格18.A3" office:value-type="string">
            <text:p text:style-name="P11">Local Preference</text:p>
          </table:table-cell>
          <table:table-cell table:style-name="表格18.A3" office:value-type="string">
            <text:p text:style-name="P1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31">③</text:p>
          </table:table-cell>
          <table:table-cell table:style-name="表格18.A2" office:value-type="string">
            <text:p text:style-name="P32">本地產生</text:p>
          </table:table-cell>
          <table:table-cell table:style-name="表格18.A2" office:value-type="string">
            <text:p text:style-name="P3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31">④</text:p>
          </table:table-cell>
          <table:table-cell table:style-name="表格18.A3" office:value-type="string">
            <text:p text:style-name="P32">AS-PATH</text:p>
          </table:table-cell>
          <table:table-cell table:style-name="表格18.A3" office:value-type="string">
            <text:p text:style-name="P3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31">⑤</text:p>
          </table:table-cell>
          <table:table-cell table:style-name="表格18.A2" office:value-type="string">
            <text:p text:style-name="P32">Origin</text:p>
          </table:table-cell>
          <table:table-cell table:style-name="表格18.A2" office:value-type="string">
            <text:p text:style-name="P32">IGP &gt; EGP &gt; Incomplete</text:p>
          </table:table-cell>
        </table:table-row>
        <table:table-row table:style-name="表格18.1">
          <table:table-cell table:style-name="表格18.A3" office:value-type="string">
            <text:p text:style-name="P31">⑥</text:p>
          </table:table-cell>
          <table:table-cell table:style-name="表格18.A3" office:value-type="string">
            <text:p text:style-name="P32">MED</text:p>
          </table:table-cell>
          <table:table-cell table:style-name="表格18.A3" office:value-type="string">
            <text:p text:style-name="P3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31">⑦</text:p>
          </table:table-cell>
          <table:table-cell table:style-name="表格18.A2" office:value-type="string">
            <text:p text:style-name="P32">eBGP vs iBGP</text:p>
          </table:table-cell>
          <table:table-cell table:style-name="表格18.A2" office:value-type="string">
            <text:p text:style-name="P32">eBGP 優先於 iBGP</text:p>
          </table:table-cell>
        </table:table-row>
        <table:table-row table:style-name="表格18.1">
          <table:table-cell table:style-name="表格18.A3" office:value-type="string">
            <text:p text:style-name="P31">⑧</text:p>
          </table:table-cell>
          <table:table-cell table:style-name="表格18.A3" office:value-type="string">
            <text:p text:style-name="P32">IGP cost</text:p>
          </table:table-cell>
          <table:table-cell table:style-name="表格18.A3" office:value-type="string">
            <text:p text:style-name="P3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31">⑨</text:p>
          </table:table-cell>
          <table:table-cell table:style-name="表格18.A2" office:value-type="string">
            <text:p text:style-name="P32">Router ID</text:p>
          </table:table-cell>
          <table:table-cell table:style-name="表格18.A2" office:value-type="string">
            <text:p text:style-name="P32">Router ID 最小者優先（最後決勝點）</text:p>
          </table:table-cell>
        </table:table-row>
      </table:table>
      <text:h text:style-name="P58" text:outline-level="3"><text:span text:style-name="T28">▍</text:span><text:span text:style-name="T2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4">類型</text:p>
            </table:table-cell>
            <table:table-cell table:style-name="表格19.A1" office:value-type="string">
              <text:p text:style-name="P24">本質</text:p>
            </table:table-cell>
            <table:table-cell table:style-name="表格19.A1" office:value-type="string">
              <text:p text:style-name="P24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>Internal</text:p>
          </table:table-cell>
          <table:table-cell table:style-name="表格19.A2" office:value-type="string">
            <text:p text:style-name="P32">不出 Area</text:p>
          </table:table-cell>
          <table:table-cell table:style-name="表格19.A2" office:value-type="string">
            <text:p text:style-name="P3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32">Backbone</text:p>
          </table:table-cell>
          <table:table-cell table:style-name="表格19.A3" office:value-type="string">
            <text:p text:style-name="P32">在 Area 0</text:p>
          </table:table-cell>
          <table:table-cell table:style-name="表格19.A3" office:value-type="string">
            <text:p text:style-name="P3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32">ABR</text:p>
          </table:table-cell>
          <table:table-cell table:style-name="表格19.A2" office:value-type="string">
            <text:p text:style-name="P32">跨 Area 橋樑</text:p>
          </table:table-cell>
          <table:table-cell table:style-name="表格19.A2" office:value-type="string">
            <text:p text:style-name="P3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32">ASBR</text:p>
          </table:table-cell>
          <table:table-cell table:style-name="表格19.A3" office:value-type="string">
            <text:p text:style-name="P32">跨 AS 入口</text:p>
          </table:table-cell>
          <table:table-cell table:style-name="表格19.A3" office:value-type="string">
            <text:p text:style-name="P32">把外部路由（BGP 等）帶進 OSPF，是對外的大門</text:p>
          </table:table-cell>
        </table:table-row>
      </table:table>
      <text:h text:style-name="P58" text:outline-level="3"><text:span text:style-name="T28">▍</text:span><text:span text:style-name="T2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能力</text:p>
            </table:table-cell>
            <table:table-cell table:style-name="表格20.A1" office:value-type="string">
              <text:p text:style-name="P23">FW</text:p>
            </table:table-cell>
            <table:table-cell table:style-name="表格20.A1" office:value-type="string">
              <text:p text:style-name="P23">WAF</text:p>
            </table:table-cell>
            <table:table-cell table:style-name="表格20.A1" office:value-type="string">
              <text:p text:style-name="P23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32">IP / Port 過濾</text:p>
          </table:table-cell>
          <table:table-cell table:style-name="表格20.A2" office:value-type="string">
            <text:p text:style-name="P67">○</text:p>
          </table:table-cell>
          <table:table-cell table:style-name="表格20.A2" office:value-type="string">
            <text:p text:style-name="P67">○</text:p>
          </table:table-cell>
          <table:table-cell table:style-name="表格20.A2" office:value-type="string">
            <text:p text:style-name="P67">○</text:p>
          </table:table-cell>
        </table:table-row>
        <table:table-row table:style-name="表格20.1">
          <table:table-cell table:style-name="表格20.A3" office:value-type="string">
            <text:p text:style-name="P32">HTTP 內容檢查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7">○</text:p>
          </table:table-cell>
          <table:table-cell table:style-name="表格20.A3" office:value-type="string">
            <text:p text:style-name="P67">○</text:p>
          </table:table-cell>
        </table:table-row>
        <table:table-row table:style-name="表格20.1">
          <table:table-cell table:style-name="表格20.A2" office:value-type="string">
            <text:p text:style-name="P32">DPI 深度檢查</text:p>
          </table:table-cell>
          <table:table-cell table:style-name="表格20.A2" office:value-type="string">
            <text:p text:style-name="P66">✗</text:p>
          </table:table-cell>
          <table:table-cell table:style-name="表格20.A2" office:value-type="string">
            <text:p text:style-name="P66">✗</text:p>
          </table:table-cell>
          <table:table-cell table:style-name="表格20.A2" office:value-type="string">
            <text:p text:style-name="P67">○</text:p>
          </table:table-cell>
        </table:table-row>
        <table:table-row table:style-name="表格20.1">
          <table:table-cell table:style-name="表格20.A3" office:value-type="string">
            <text:p text:style-name="P32">App 識別 / IPS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7">○</text:p>
          </table:table-cell>
        </table:table-row>
        <table:table-row table:style-name="表格20.1">
          <table:table-cell table:style-name="表格20.A2" office:value-type="string">
            <text:p text:style-name="P32">OSI 層</text:p>
          </table:table-cell>
          <table:table-cell table:style-name="表格20.A2" office:value-type="string">
            <text:p text:style-name="P31">L3 / L4</text:p>
          </table:table-cell>
          <table:table-cell table:style-name="表格20.A2" office:value-type="string">
            <text:p text:style-name="P10">L7</text:p>
          </table:table-cell>
          <table:table-cell table:style-name="表格20.A2" office:value-type="string">
            <text:p text:style-name="P31">L3–L7</text:p>
          </table:table-cell>
        </table:table-row>
      </table:table>
      <text:h text:style-name="P58" text:outline-level="3"><text:span text:style-name="T28">▍</text:span><text:span text:style-name="T2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4">工具</text:p>
            </table:table-cell>
            <table:table-cell table:style-name="表格21.A1" office:value-type="string">
              <text:p text:style-name="P24">角色</text:p>
            </table:table-cell>
            <table:table-cell table:style-name="表格21.A1" office:value-type="string">
              <text:p text:style-name="P24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32">Firewall</text:p>
          </table:table-cell>
          <table:table-cell table:style-name="表格21.A2" office:value-type="string">
            <text:p text:style-name="P32">大門警衛</text:p>
          </table:table-cell>
          <table:table-cell table:style-name="表格21.A2" office:value-type="string">
            <text:p text:style-name="P3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32">IDS</text:p>
          </table:table-cell>
          <table:table-cell table:style-name="表格21.A3" office:value-type="string">
            <text:p text:style-name="P32">監視器（只看）</text:p>
          </table:table-cell>
          <table:table-cell table:style-name="表格21.A3" office:value-type="string">
            <text:p text:style-name="P3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32">IPS</text:p>
          </table:table-cell>
          <table:table-cell table:style-name="表格21.A2" office:value-type="string">
            <text:p text:style-name="P32">監視器＋警衛</text:p>
          </table:table-cell>
          <table:table-cell table:style-name="表格21.A2" office:value-type="string">
            <text:p text:style-name="P3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32">HIDS</text:p>
          </table:table-cell>
          <table:table-cell table:style-name="表格21.A3" office:value-type="string">
            <text:p text:style-name="P32">主機型</text:p>
          </table:table-cell>
          <table:table-cell table:style-name="表格21.A3" office:value-type="string">
            <text:p text:style-name="P32">看主機 Log／系統行為</text:p>
          </table:table-cell>
        </table:table-row>
        <table:table-row table:style-name="表格21.1">
          <table:table-cell table:style-name="表格21.A2" office:value-type="string">
            <text:p text:style-name="P32">NIDS</text:p>
          </table:table-cell>
          <table:table-cell table:style-name="表格21.A2" office:value-type="string">
            <text:p text:style-name="P32">網路型</text:p>
          </table:table-cell>
          <table:table-cell table:style-name="表格21.A2" office:value-type="string">
            <text:p text:style-name="P32">看網路封包／流量</text:p>
          </table:table-cell>
        </table:table-row>
        <table:table-row table:style-name="表格21.1">
          <table:table-cell table:style-name="表格21.A3" office:value-type="string">
            <text:p text:style-name="P32">SNMP</text:p>
          </table:table-cell>
          <table:table-cell table:style-name="表格21.A3" office:value-type="string">
            <text:p text:style-name="P32">管理室</text:p>
          </table:table-cell>
          <table:table-cell table:style-name="表格21.A3" office:value-type="string">
            <text:p text:style-name="P3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32">ICMP</text:p>
          </table:table-cell>
          <table:table-cell table:style-name="表格21.A2" office:value-type="string">
            <text:p text:style-name="P32">網路測試員</text:p>
          </table:table-cell>
          <table:table-cell table:style-name="表格21.A2" office:value-type="string">
            <text:p text:style-name="P32">診斷網路連線（網路層／Ping）</text:p>
          </table:table-cell>
        </table:table-row>
      </table:table>
      <text:h text:style-name="P58" text:outline-level="3"><text:span text:style-name="T28">▍</text:span><text:span text:style-name="T2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口訣</text:p>
            </table:table-cell>
            <table:table-cell table:style-name="表格22.A1" office:value-type="string">
              <text:p text:style-name="P23">IOC 類型</text:p>
            </table:table-cell>
            <table:table-cell table:style-name="表格22.A1" office:value-type="string">
              <text:p text:style-name="P23">白話</text:p>
            </table:table-cell>
            <table:table-cell table:style-name="表格22.A1" office:value-type="string">
              <text:p text:style-name="P23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69">網</text:p>
          </table:table-cell>
          <table:table-cell table:style-name="表格22.A2" office:value-type="string">
            <text:p text:style-name="P32">惡意 Domain</text:p>
          </table:table-cell>
          <table:table-cell table:style-name="表格22.A2" office:value-type="string">
            <text:p text:style-name="P32">釣魚網站網址</text:p>
          </table:table-cell>
          <table:table-cell table:style-name="表格22.A2" office:value-type="string">
            <text:p text:style-name="P32">DNS 封鎖網域</text:p>
          </table:table-cell>
        </table:table-row>
        <table:table-row table:style-name="表格22.1">
          <table:table-cell table:style-name="表格22.A3" office:value-type="string">
            <text:p text:style-name="P69">檔</text:p>
          </table:table-cell>
          <table:table-cell table:style-name="表格22.A3" office:value-type="string">
            <text:p text:style-name="P32">惡意 Hash</text:p>
          </table:table-cell>
          <table:table-cell table:style-name="表格22.A3" office:value-type="string">
            <text:p text:style-name="P32">惡意程式特徵碼（改名也認得）</text:p>
          </table:table-cell>
          <table:table-cell table:style-name="表格22.A3" office:value-type="string">
            <text:p text:style-name="P32">防毒比對特徵</text:p>
          </table:table-cell>
        </table:table-row>
        <table:table-row table:style-name="表格22.1">
          <table:table-cell table:style-name="表格22.A2" office:value-type="string">
            <text:p text:style-name="P69">連</text:p>
          </table:table-cell>
          <table:table-cell table:style-name="表格22.A2" office:value-type="string">
            <text:p text:style-name="P32">惡意 IP</text:p>
          </table:table-cell>
          <table:table-cell table:style-name="表格22.A2" office:value-type="string">
            <text:p text:style-name="P32">感染後對外異常連線目標</text:p>
          </table:table-cell>
          <table:table-cell table:style-name="表格22.A2" office:value-type="string">
            <text:p text:style-name="P32">FW / NGFW 封鎖</text:p>
          </table:table-cell>
        </table:table-row>
        <table:table-row table:style-name="表格22.1">
          <table:table-cell table:style-name="表格22.A3" office:value-type="string">
            <text:p text:style-name="P69">控</text:p>
          </table:table-cell>
          <table:table-cell table:style-name="表格22.A3" office:value-type="string">
            <text:p text:style-name="P32">C2 Server</text:p>
          </table:table-cell>
          <table:table-cell table:style-name="表格22.A3" office:value-type="string">
            <text:p text:style-name="P32">駭客遠端操控總部</text:p>
          </table:table-cell>
          <table:table-cell table:style-name="表格22.A3" office:value-type="string">
            <text:p text:style-name="P3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52"><text:span text:style-name="T35">必記：</text:span><text:span text:style-name="T9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8">▍</text:span><text:span text:style-name="T2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6">項目</text:p>
            </table:table-cell>
            <table:table-cell table:style-name="表格23.A1" office:value-type="string">
              <text:p text:style-name="P26">Recursive 遞迴</text:p>
            </table:table-cell>
            <table:table-cell table:style-name="表格23.A1" office:value-type="string">
              <text:p text:style-name="P2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2">口訣</text:p>
          </table:table-cell>
          <table:table-cell table:style-name="表格23.A2" office:value-type="string">
            <text:p text:style-name="P60">代查到底</text:p>
          </table:table-cell>
          <table:table-cell table:style-name="表格23.A2" office:value-type="string">
            <text:p text:style-name="P12">逐層詢問</text:p>
          </table:table-cell>
        </table:table-row>
        <table:table-row table:style-name="表格23.1">
          <table:table-cell table:style-name="表格23.A3" office:value-type="string">
            <text:p text:style-name="P42">誰去問</text:p>
          </table:table-cell>
          <table:table-cell table:style-name="表格23.A3" office:value-type="string">
            <text:p text:style-name="P42">DNS 伺服器代你問完</text:p>
          </table:table-cell>
          <table:table-cell table:style-name="表格23.A3" office:value-type="string">
            <text:p text:style-name="P42">你自己逐層查詢</text:p>
          </table:table-cell>
        </table:table-row>
        <table:table-row table:style-name="表格23.1">
          <table:table-cell table:style-name="表格23.A2" office:value-type="string">
            <text:p text:style-name="P42">問幾次</text:p>
          </table:table-cell>
          <table:table-cell table:style-name="表格23.A2" office:value-type="string">
            <text:p text:style-name="P42">只問 1 次</text:p>
          </table:table-cell>
          <table:table-cell table:style-name="表格23.A2" office:value-type="string">
            <text:p text:style-name="P42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2">常見場合</text:p>
          </table:table-cell>
          <table:table-cell table:style-name="表格23.A3" office:value-type="string">
            <text:p text:style-name="P42">一般使用者 → Local DNS</text:p>
          </table:table-cell>
          <table:table-cell table:style-name="表格23.A3" office:value-type="string">
            <text:p text:style-name="P42">DNS 伺服器之間互查</text:p>
          </table:table-cell>
        </table:table-row>
      </table:table>
      <text:h text:style-name="P58" text:outline-level="3"><text:span text:style-name="T28">▍</text:span><text:span text:style-name="T2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4">指標 / 名詞</text:p>
            </table:table-cell>
            <table:table-cell table:style-name="表格24.A1" office:value-type="string">
              <text:p text:style-name="P24">意義</text:p>
            </table:table-cell>
            <table:table-cell table:style-name="表格24.A1" office:value-type="string">
              <text:p text:style-name="P24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32">RTO</text:p>
          </table:table-cell>
          <table:table-cell table:style-name="表格24.A2" office:value-type="string">
            <text:p text:style-name="P32">Recovery Time Objective 復原時間目標</text:p>
          </table:table-cell>
          <table:table-cell table:style-name="表格24.A2" office:value-type="string">
            <text:p text:style-name="P18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32">RPO</text:p>
          </table:table-cell>
          <table:table-cell table:style-name="表格24.A3" office:value-type="string">
            <text:p text:style-name="P32">Recovery Point Objective 復原點目標</text:p>
          </table:table-cell>
          <table:table-cell table:style-name="表格24.A3" office:value-type="string">
            <text:p text:style-name="P18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32">EDR</text:p>
          </table:table-cell>
          <table:table-cell table:style-name="表格24.A2" office:value-type="string">
            <text:p text:style-name="P32">Endpoint Detection &amp; Response</text:p>
          </table:table-cell>
          <table:table-cell table:style-name="表格24.A2" office:value-type="string">
            <text:p text:style-name="P3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32">MDR</text:p>
          </table:table-cell>
          <table:table-cell table:style-name="表格24.A3" office:value-type="string">
            <text:p text:style-name="P32">Managed Detection &amp; Response</text:p>
          </table:table-cell>
          <table:table-cell table:style-name="表格24.A3" office:value-type="string">
            <text:p text:style-name="P32">請資安公司委外守（24／7，適合中小企業）</text:p>
          </table:table-cell>
        </table:table-row>
      </table:table>
      <text:h text:style-name="P58" text:outline-level="3"><text:span text:style-name="T28">▍</text:span><text:span text:style-name="T2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3">Protocol 值</text:p>
            </table:table-cell>
            <table:table-cell table:style-name="表格25.A1" office:value-type="string">
              <text:p text:style-name="P23">DF Flag</text:p>
            </table:table-cell>
            <table:table-cell table:style-name="表格25.A1" office:value-type="string">
              <text:p text:style-name="P23">MF Flag</text:p>
            </table:table-cell>
            <table:table-cell table:style-name="表格25.A1" office:value-type="string">
              <text:p text:style-name="P23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32">ICMP=1 / TCP=6 / UDP=17</text:p>
          </table:table-cell>
          <table:table-cell table:style-name="表格25.A2" office:value-type="string">
            <text:p text:style-name="P32">DF=1：禁止切，太大就丟＋ICMP</text:p>
          </table:table-cell>
          <table:table-cell table:style-name="表格25.A2" office:value-type="string">
            <text:p text:style-name="P32">MF=1：後面還有分段（最後段=0）</text:p>
          </table:table-cell>
          <table:table-cell table:style-name="表格25.A2" office:value-type="string">
            <text:p text:style-name="P1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51"><text:span text:style-name="T4">✅ <text:s/></text:span><text:span text:style-name="T23">提醒</text:span></text:p>
            <text:p text:style-name="P40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25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1"><text:span text:style-name="T4">🌐 <text:s/></text:span><text:span text:style-name="T23">本篇重點</text:span></text:p>
            <text:p text:style-name="P40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9" text:outline-level="2">一、用「寄信」理解分層（修正版）</text:h>
      <text:p text:style-name="P41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4">TCP/IP 層</text:p>
            </table:table-cell>
            <table:table-cell table:style-name="表格27.A1" office:value-type="string">
              <text:p text:style-name="P24">郵寄比喻</text:p>
            </table:table-cell>
            <table:table-cell table:style-name="表格27.A1" office:value-type="string">
              <text:p text:style-name="P24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32">🟢 應用層 Application</text:p>
          </table:table-cell>
          <table:table-cell table:style-name="表格27.A2" office:value-type="string">
            <text:p text:style-name="P32">決定「<text:span text:style-name="T39">寄什麼內容</text:span>」（信的內容與格式）</text:p>
          </table:table-cell>
          <table:table-cell table:style-name="表格27.A2" office:value-type="string">
            <text:p text:style-name="P3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32">🟡 傳輸層 Transport</text:p>
          </table:table-cell>
          <table:table-cell table:style-name="表格27.A3" office:value-type="string">
            <text:p text:style-name="P72">切分、編頁碼、確認收件</text:p>
          </table:table-cell>
          <table:table-cell table:style-name="表格27.A3" office:value-type="string">
            <text:p text:style-name="P3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32">🔵 網路層 Network</text:p>
          </table:table-cell>
          <table:table-cell table:style-name="表格27.A2" office:value-type="string">
            <text:p text:style-name="P32"><text:span text:style-name="T47">寫地址＋規劃路線</text:span>（郵遞區號＋郵局選路）</text:p>
          </table:table-cell>
          <table:table-cell table:style-name="表格27.A2" office:value-type="string">
            <text:p text:style-name="P73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32">🟠 連結層 Link</text:p>
          </table:table-cell>
          <table:table-cell table:style-name="表格27.A3" office:value-type="string">
            <text:p text:style-name="P32">當前路段的區域配送</text:p>
          </table:table-cell>
          <table:table-cell table:style-name="表格27.A3" office:value-type="string">
            <text:p text:style-name="P7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51"><text:span text:style-name="T4">⚠️ <text:s/></text:span><text:span text:style-name="T38">舊版三大比喻的錯誤</text:span></text:p>
            <text:p text:style-name="P52"><text:span text:style-name="T16">❌ 舊：「寫地址 → 應用層」　</text:span><text:span text:style-name="T9">IP 位址屬於網路層；應用層負責的是「內容與格式」，不是地址。</text:span></text:p>
            <text:p text:style-name="P53"><text:span text:style-name="T16">❌ 舊：「打包 → 傳輸層」　</text:span><text:span text:style-name="T9">傳輸層還負責切割、編號、重傳、流量控制，遠不只「打包」。</text:span></text:p>
            <text:p text:style-name="P53"><text:span text:style-name="T16">❌ 舊：「實際搬運 → 連結層」　</text:span><text:span text:style-name="T9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9" text:outline-level="2">二、OSI 7 層 vs TCP/IP 4 層（完整對照）</text:h>
      <text:p text:style-name="P41"><text:span text:style-name="T41">OSI 是理論模型（7 層）</text:span>；<text:span text:style-name="T39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層號</text:p>
            </table:table-cell>
            <table:table-cell table:style-name="表格28.A1" office:value-type="string">
              <text:p text:style-name="P23">OSI 層名</text:p>
            </table:table-cell>
            <table:table-cell table:style-name="表格28.A1" office:value-type="string">
              <text:p text:style-name="P23">主要功能</text:p>
            </table:table-cell>
            <table:table-cell table:style-name="表格28.A1" office:value-type="string">
              <text:p text:style-name="P23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31">7</text:p>
          </table:table-cell>
          <table:table-cell table:style-name="表格28.A2" office:value-type="string">
            <text:p text:style-name="P32">Application <text:span text:style-name="T43">應</text:span>用層</text:p>
          </table:table-cell>
          <table:table-cell table:style-name="表格28.A2" office:value-type="string">
            <text:p text:style-name="P32">使用者直接操作：HTTP、DNS、DHCP</text:p>
          </table:table-cell>
          <table:table-cell table:style-name="表格28.A2" office:value-type="string">
            <text:p text:style-name="P32">Application</text:p>
          </table:table-cell>
        </table:table-row>
        <table:table-row table:style-name="表格28.1">
          <table:table-cell table:style-name="表格28.A3" office:value-type="string">
            <text:p text:style-name="P31">6</text:p>
          </table:table-cell>
          <table:table-cell table:style-name="表格28.A3" office:value-type="string">
            <text:p text:style-name="P32">Presentation <text:span text:style-name="T43">表</text:span>示層</text:p>
          </table:table-cell>
          <table:table-cell table:style-name="表格28.A3" office:value-type="string">
            <text:p text:style-name="P80">資料格式轉換、加解密、壓縮</text:p>
          </table:table-cell>
          <table:table-cell table:style-name="表格28.A3" office:value-type="string">
            <text:p text:style-name="P32">↑ 併入 Application</text:p>
          </table:table-cell>
        </table:table-row>
        <table:table-row table:style-name="表格28.1">
          <table:table-cell table:style-name="表格28.A2" office:value-type="string">
            <text:p text:style-name="P31">5</text:p>
          </table:table-cell>
          <table:table-cell table:style-name="表格28.A2" office:value-type="string">
            <text:p text:style-name="P32">Session <text:span text:style-name="T43">會</text:span>話層</text:p>
          </table:table-cell>
          <table:table-cell table:style-name="表格28.A2" office:value-type="string">
            <text:p text:style-name="P83">連線的建立、維持與終止</text:p>
          </table:table-cell>
          <table:table-cell table:style-name="表格28.A2" office:value-type="string">
            <text:p text:style-name="P32">↑ 併入 Application</text:p>
          </table:table-cell>
        </table:table-row>
        <table:table-row table:style-name="表格28.1">
          <table:table-cell table:style-name="表格28.A3" office:value-type="string">
            <text:p text:style-name="P31">4</text:p>
          </table:table-cell>
          <table:table-cell table:style-name="表格28.A3" office:value-type="string">
            <text:p text:style-name="P32">Transport <text:span text:style-name="T43">傳</text:span>輸層</text:p>
          </table:table-cell>
          <table:table-cell table:style-name="表格28.A3" office:value-type="string">
            <text:p text:style-name="P32">端對端傳輸控制（TCP / UDP）</text:p>
          </table:table-cell>
          <table:table-cell table:style-name="表格28.A3" office:value-type="string">
            <text:p text:style-name="P32">Transport</text:p>
          </table:table-cell>
        </table:table-row>
        <table:table-row table:style-name="表格28.1">
          <table:table-cell table:style-name="表格28.A2" office:value-type="string">
            <text:p text:style-name="P31">3</text:p>
          </table:table-cell>
          <table:table-cell table:style-name="表格28.A2" office:value-type="string">
            <text:p text:style-name="P32">Network <text:span text:style-name="T43">網</text:span>路層</text:p>
          </table:table-cell>
          <table:table-cell table:style-name="表格28.A2" office:value-type="string">
            <text:p text:style-name="P79">IP 路由、ICMP 錯誤回報</text:p>
          </table:table-cell>
          <table:table-cell table:style-name="表格28.A2" office:value-type="string">
            <text:p text:style-name="P32">Internet</text:p>
          </table:table-cell>
        </table:table-row>
        <table:table-row table:style-name="表格28.1">
          <table:table-cell table:style-name="表格28.A3" office:value-type="string">
            <text:p text:style-name="P31">2</text:p>
          </table:table-cell>
          <table:table-cell table:style-name="表格28.A3" office:value-type="string">
            <text:p text:style-name="P32">Data Link <text:span text:style-name="T48">資</text:span>料鏈結層</text:p>
          </table:table-cell>
          <table:table-cell table:style-name="表格28.A3" office:value-type="string">
            <text:p text:style-name="P85">MAC 位址、區域網路傳輸（ARP）</text:p>
          </table:table-cell>
          <table:table-cell table:style-name="表格28.A3" office:value-type="string">
            <text:p text:style-name="P32">Link</text:p>
          </table:table-cell>
        </table:table-row>
        <table:table-row table:style-name="表格28.1">
          <table:table-cell table:style-name="表格28.A2" office:value-type="string">
            <text:p text:style-name="P31">1</text:p>
          </table:table-cell>
          <table:table-cell table:style-name="表格28.A2" office:value-type="string">
            <text:p text:style-name="P32">Physical <text:span text:style-name="T43">實</text:span>體層</text:p>
          </table:table-cell>
          <table:table-cell table:style-name="表格28.A2" office:value-type="string">
            <text:p text:style-name="P32">電訊號、光訊號、無線電波</text:p>
          </table:table-cell>
          <table:table-cell table:style-name="表格28.A2" office:value-type="string">
            <text:p text:style-name="P3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51"><text:span text:style-name="T4">⚡ <text:s/></text:span><text:span text:style-name="T29">速記</text:span></text:p>
            <text:p text:style-name="P40"><text:span text:style-name="T41">OSI → 7 層（理論）</text:span>，<text:span text:style-name="T39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3">🟢 Application 應用層</text:p>
            </table:table-cell>
            <table:table-cell table:style-name="表格29.A1" office:value-type="string">
              <text:p text:style-name="P23">🟡 Transport 傳輸層</text:p>
            </table:table-cell>
            <table:table-cell table:style-name="表格29.A1" office:value-type="string">
              <text:p text:style-name="P23">🔵 Network 網路層</text:p>
            </table:table-cell>
            <table:table-cell table:style-name="表格29.A1" office:value-type="string">
              <text:p text:style-name="P23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32">HTTP / HTTPS、DNS、DHCP、SSH、MQTT、<text:span text:style-name="T50">OSPF*</text:span></text:p>
          </table:table-cell>
          <table:table-cell table:style-name="表格29.A2" office:value-type="string">
            <text:p text:style-name="P92">TCP（可靠傳輸）、UDP（高速傳輸）</text:p>
          </table:table-cell>
          <table:table-cell table:style-name="表格29.A2" office:value-type="string">
            <text:p text:style-name="P32">IP（路由定址）、<text:span text:style-name="T52">ICMP（錯誤回報 / ping）</text:span></text:p>
          </table:table-cell>
          <table:table-cell table:style-name="表格29.A2" office:value-type="string">
            <text:p text:style-name="P32">Ethernet（有線網路）、<text:span text:style-name="T55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52"><text:span text:style-name="T35">OSPF 分層備註：</text:span><text:span text:style-name="T9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8">協定</text:p>
            </table:table-cell>
            <table:table-cell table:style-name="表格30.A1" office:value-type="string">
              <text:p text:style-name="P28">層級</text:p>
            </table:table-cell>
            <table:table-cell table:style-name="表格30.A1" office:value-type="string">
              <text:p text:style-name="P28">做什麼（白話）</text:p>
            </table:table-cell>
            <table:table-cell table:style-name="表格30.A1" office:value-type="string">
              <text:p text:style-name="P2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4"><text:span text:style-name="T59">DHCP</text:span> Dynamic Host Configuration Protocol</text:p>
          </table:table-cell>
          <table:table-cell table:style-name="表格30.A2" office:value-type="string">
            <text:p text:style-name="P44">應用層</text:p>
          </table:table-cell>
          <table:table-cell table:style-name="表格30.A2" office:value-type="string">
            <text:p text:style-name="P44"><text:span text:style-name="T41">連上 WiFi 時不必手動設定 IP</text:span>，DHCP 伺服器<text:span text:style-name="T56">自動分配一個 IP 給你</text:span>。</text:p>
          </table:table-cell>
          <table:table-cell table:style-name="表格30.A2" office:value-type="string">
            <text:p text:style-name="P44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4"><text:span text:style-name="T59">SSH</text:span> Secure Shell</text:p>
          </table:table-cell>
          <table:table-cell table:style-name="表格30.A3" office:value-type="string">
            <text:p text:style-name="P44">應用層</text:p>
          </table:table-cell>
          <table:table-cell table:style-name="表格30.A3" office:value-type="string">
            <text:p text:style-name="P44"><text:span text:style-name="T61">透過加密通道遠端操控</text:span>另一台 Linux／伺服器的終端機。</text:p>
          </table:table-cell>
          <table:table-cell table:style-name="表格30.A3" office:value-type="string">
            <text:p text:style-name="P44">加密版的遠端遙控器</text:p>
          </table:table-cell>
        </table:table-row>
        <table:table-row table:style-name="表格30.1">
          <table:table-cell table:style-name="表格30.A2" office:value-type="string">
            <text:p text:style-name="P44"><text:span text:style-name="T59">MQTT</text:span> Message Queuing Telemetry Transport</text:p>
          </table:table-cell>
          <table:table-cell table:style-name="表格30.A2" office:value-type="string">
            <text:p text:style-name="P44">應用層</text:p>
          </table:table-cell>
          <table:table-cell table:style-name="表格30.A2" office:value-type="string">
            <text:p text:style-name="P44"><text:span text:style-name="T73">IoT 裝置常用的輕量傳訊協定</text:span>，採<text:span text:style-name="T89">「發布／訂閱」模式</text:span>，非常省流量。</text:p>
          </table:table-cell>
          <table:table-cell table:style-name="表格30.A2" office:value-type="string">
            <text:p text:style-name="P44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4"><text:span text:style-name="T59">OSPF</text:span> Open Shortest Path First</text:p>
          </table:table-cell>
          <table:table-cell table:style-name="表格30.A3" office:value-type="string">
            <text:p text:style-name="P44">視模型而定 ⚠️</text:p>
          </table:table-cell>
          <table:table-cell table:style-name="表格30.A3" office:value-type="string">
            <text:p text:style-name="P44"><text:span text:style-name="T101">路由器之間使用</text:span>，<text:span text:style-name="T57">自動計算封包走哪條路徑最短、最快</text:span>。</text:p>
          </table:table-cell>
          <table:table-cell table:style-name="表格30.A3" office:value-type="string">
            <text:p text:style-name="P44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51"><text:span text:style-name="T4">💡 <text:s/></text:span><text:span text:style-name="T29">快速判斷層級的技巧</text:span></text:p>
            <text:p text:style-name="P52"><text:span text:style-name="T32">使用者／應用服務</text:span><text:span text:style-name="T9">（SSH、DHCP、MQTT、HTTP）→ 幾乎都是應用層。</text:span></text:p>
            <text:p text:style-name="P53"><text:span text:style-name="T32">幫路由器決定走哪條路</text:span><text:span text:style-name="T9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9" text:outline-level="2">五、網路層深度解析：IP · Routing · ICMP</text:h>
      <text:p text:style-name="P41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3">📍 IP（位址）</text:p>
            </table:table-cell>
            <table:table-cell table:style-name="表格31.A1" office:value-type="string">
              <text:p text:style-name="P23">🗺️ Routing（路由）</text:p>
            </table:table-cell>
            <table:table-cell table:style-name="表格31.A1" office:value-type="string">
              <text:p text:style-name="P23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32"><text:span text:style-name="T39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32"><text:span text:style-name="T39">決定「怎麼走最快」</text:span>。<text:span text:style-name="T41">封包經過很多路由器</text:span>，<text:span text:style-name="T61">每台都問「下一站往哪送？」</text:span><text:span text:style-name="T101">OSPF 等協定算出最短路徑。</text:span></text:p>
          </table:table-cell>
          <table:table-cell table:style-name="表格31.A2" office:value-type="string">
            <text:p text:style-name="P32"><text:span text:style-name="T39">回報「出了什麼問題」</text:span>。找不到主機、路不通、TTL 歸零 → <text:span text:style-name="T57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51"><text:span text:style-name="T4">🔍 <text:s/></text:span><text:span text:style-name="T23">ping 是什麼？為什麼跟 ICMP 有關？</text:span></text:p>
            <text:p text:style-name="P19"><text:span text:style-name="T59">ping google.com 的運作</text:span>：</text:p>
            <text:p text:style-name="P39">① 你的電腦發出 <text:span text:style-name="T41">ICMP Echo Request</text:span>（「你在嗎？」）</text:p>
            <text:p text:style-name="P39">② 目標主機回傳 <text:span text:style-name="T41">ICMP Echo Reply</text:span>（「我在！」）</text:p>
            <text:p text:style-name="P39">③ <text:span text:style-name="T118">顯示來回時間（ms），數字越小代表網路越暢通</text:span></text:p>
            <text:p text:style-name="P53"><text:span text:style-name="T35">⚠️ 重點：</text:span><text:span text:style-name="T58">ping 完全使用 ICMP，不走 TCP 也不走 UDP</text:span><text:span text:style-name="T9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51"><text:span text:style-name="T4">⚡ <text:s/></text:span><text:span text:style-name="T29">三個概念一次記清楚</text:span></text:p>
            <text:p text:style-name="P52"><text:span text:style-name="T32">📍 IP → </text:span><text:span text:style-name="T9">定位（目的地是誰）　</text:span><text:span text:style-name="T32">🗺️ Routing → </text:span><text:span text:style-name="T68">選路（怎麼走最快）</text:span><text:span text:style-name="T9">　</text:span><text:span text:style-name="T32">🚨 </text:span><text:span text:style-name="T33">ICMP → </text:span><text:span text:style-name="T58">回報（出錯了通知你）</text:span></text:p>
          </table:table-cell>
          <table:covered-table-cell/>
          <table:covered-table-cell/>
        </table:table-row>
      </table:table>
      <text:h text:style-name="P91" text:outline-level="2"><text:soft-page-break/><text:span text:style-name="T8">六、TCP vs UDP 差異比較</text:span></text:h>
      <text:p text:style-name="P41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6">比較項目</text:p>
            </table:table-cell>
            <table:table-cell table:style-name="表格32.A1" office:value-type="string">
              <text:p text:style-name="P26">TCP</text:p>
            </table:table-cell>
            <table:table-cell table:style-name="表格32.A1" office:value-type="string">
              <text:p text:style-name="P2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2">連線方式</text:p>
          </table:table-cell>
          <table:table-cell table:style-name="表格32.A2" office:value-type="string">
            <text:p text:style-name="P42">需要握手（三向交握）</text:p>
          </table:table-cell>
          <table:table-cell table:style-name="表格32.A2" office:value-type="string">
            <text:p text:style-name="P42">無連線，直接送出</text:p>
          </table:table-cell>
        </table:table-row>
        <table:table-row table:style-name="表格32.1">
          <table:table-cell table:style-name="表格32.A3" office:value-type="string">
            <text:p text:style-name="P42">可靠性</text:p>
          </table:table-cell>
          <table:table-cell table:style-name="表格32.A3" office:value-type="string">
            <text:p text:style-name="P78">保證送達，遺失會重傳</text:p>
          </table:table-cell>
          <table:table-cell table:style-name="表格32.A3" office:value-type="string">
            <text:p text:style-name="P90">不保證，遺失不補</text:p>
          </table:table-cell>
        </table:table-row>
        <table:table-row table:style-name="表格32.1">
          <table:table-cell table:style-name="表格32.A2" office:value-type="string">
            <text:p text:style-name="P42">速度</text:p>
          </table:table-cell>
          <table:table-cell table:style-name="表格32.A2" office:value-type="string">
            <text:p text:style-name="P43">較慢（有確認機制）</text:p>
          </table:table-cell>
          <table:table-cell table:style-name="表格32.A2" office:value-type="string">
            <text:p text:style-name="P43">較快（無確認機制）</text:p>
          </table:table-cell>
        </table:table-row>
        <table:table-row table:style-name="表格32.1">
          <table:table-cell table:style-name="表格32.A3" office:value-type="string">
            <text:p text:style-name="P42">使用情境</text:p>
          </table:table-cell>
          <table:table-cell table:style-name="表格32.A3" office:value-type="string">
            <text:p text:style-name="P42">HTTP、Email、FTP</text:p>
          </table:table-cell>
          <table:table-cell table:style-name="表格32.A3" office:value-type="string">
            <text:p text:style-name="P42">串流影音、VoIP、DNS</text:p>
          </table:table-cell>
        </table:table-row>
        <table:table-row table:style-name="表格32.1">
          <table:table-cell table:style-name="表格32.A2" office:value-type="string">
            <text:p text:style-name="P42">一句話</text:p>
          </table:table-cell>
          <table:table-cell table:style-name="表格32.A2" office:value-type="string">
            <text:p text:style-name="P61">「穩定優先」</text:p>
          </table:table-cell>
          <table:table-cell table:style-name="表格32.A2" office:value-type="string">
            <text:p text:style-name="P13">「速度優先」</text:p>
          </table:table-cell>
        </table:table-row>
      </table:table>
      <text:h text:style-name="P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1"><text:span text:style-name="T4">🔗 <text:s/></text:span><text:span text:style-name="T23">ARP 重點</text:span></text:p>
            <text:p text:style-name="P52"><text:span text:style-name="T24">ARP 做什麼？　</text:span><text:span text:style-name="T17">在</text:span><text:span text:style-name="T53">同一個</text:span><text:span text:style-name="T17">區域網路（LAN）中</text:span><text:span text:style-name="T9">，</text:span><text:span text:style-name="T121">將「IP 位址（邏輯位址）」轉換成「MAC 位址（實體位址）」</text:span><text:span text:style-name="T9">。</text:span></text:p>
            <text:p text:style-name="P53"><text:span text:style-name="T24">為何屬於 Link 層？　</text:span><text:span text:style-name="T58">ARP 的作用範圍僅限於同一區域網路內，</text:span><text:span text:style-name="T54">無法跨越路由器</text:span><text:span text:style-name="T9">，因此歸屬 Link（連結）層。</text:span></text:p>
            <text:p text:style-name="P20">運作流程：</text:p>
            <text:p text:style-name="P39">① <text:span text:style-name="T44">裝置 A 廣播詢問：</text:span>「<text:span text:style-name="T41">誰的 IP</text:span> 是 192.168.1.5？」</text:p>
            <text:p text:style-name="P39">② <text:span text:style-name="T43">裝置 B 回應：</text:span>「<text:span text:style-name="T39">是我！MAC 是</text:span> AA:BB:CC:DD:EE:FF」</text:p>
            <text:p text:style-name="P39">③ 裝置 A 記錄此對應至 ARP 快取，下次直接使用</text:p>
          </table:table-cell>
        </table:table-row>
      </table:table>
      <text:p text:style-name="P4">（ARP 完整流程、ARP Spoofing 與完整上網流程，詳見第四篇。）</text:p>
      <text:h text:style-name="P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52"><text:span text:style-name="T7">目的：</text:span><text:span text:style-name="T125">找出封包從來源到目的地</text:span><text:span text:style-name="T130">，</text:span><text:span text:style-name="T133">中間經過哪些路由器</text:span><text:span text:style-name="T9">（完整路徑偵測）。</text:span></text:p>
            <text:p text:style-name="P53"><text:span text:style-name="T134">TTL（Time To Live）</text:span><text:span text:style-name="T7">：</text:span><text:span text:style-name="T122">封包的「存活計數器」。每經過一個路由器就減 1</text:span><text:span text:style-name="T9">；</text:span><text:span text:style-name="T111">歸零時路由器丟棄封包</text:span><text:span text:style-name="T9">，並</text:span><text:span text:style-name="T80">回傳 ICMP Time Exceeded 給發送方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8">封包次數</text:p>
          </table:table-cell>
          <table:table-cell table:style-name="表格34.A2" office:value-type="string">
            <text:p text:style-name="P28">TTL 值</text:p>
          </table:table-cell>
          <table:table-cell table:style-name="表格34.A2" office:value-type="string">
            <text:p text:style-name="P28">發生什麼事</text:p>
          </table:table-cell>
          <table:table-cell table:style-name="表格34.A2" office:value-type="string">
            <text:p text:style-name="P28">取得資訊</text:p>
          </table:table-cell>
        </table:table-row>
        <table:table-row table:style-name="表格34.1">
          <table:table-cell table:style-name="表格34.A3" office:value-type="string">
            <text:p text:style-name="P44">第 1 次</text:p>
          </table:table-cell>
          <table:table-cell table:style-name="表格34.A3" office:value-type="string">
            <text:p text:style-name="P44">TTL = 1</text:p>
          </table:table-cell>
          <table:table-cell table:style-name="表格34.A3" office:value-type="string">
            <text:p text:style-name="P44"><text:span text:style-name="T39">抵達第 1 個 Router </text:span>→ TTL 歸零 → 回傳 ICMP Time Exceeded</text:p>
          </table:table-cell>
          <table:table-cell table:style-name="表格34.A3" office:value-type="string">
            <text:p text:style-name="P47">得知第 1 站位置</text:p>
          </table:table-cell>
        </table:table-row>
        <table:table-row table:style-name="表格34.1">
          <table:table-cell table:style-name="表格34.A4" office:value-type="string">
            <text:p text:style-name="P44">第 2 次</text:p>
          </table:table-cell>
          <table:table-cell table:style-name="表格34.A4" office:value-type="string">
            <text:p text:style-name="P44">TTL = 2</text:p>
          </table:table-cell>
          <table:table-cell table:style-name="表格34.A4" office:value-type="string">
            <text:p text:style-name="P44"><text:span text:style-name="T39">通過第 1 站 → 抵達第 2 個 Router</text:span> → TTL 歸零 → 回傳 ICMP</text:p>
          </table:table-cell>
          <table:table-cell table:style-name="表格34.A4" office:value-type="string">
            <text:p text:style-name="P47">得知第 2 站位置</text:p>
          </table:table-cell>
        </table:table-row>
        <table:table-row table:style-name="表格34.1">
          <table:table-cell table:style-name="表格34.A3" office:value-type="string">
            <text:p text:style-name="P44">第 N 次</text:p>
          </table:table-cell>
          <table:table-cell table:style-name="表格34.A3" office:value-type="string">
            <text:p text:style-name="P44">TTL = N</text:p>
          </table:table-cell>
          <table:table-cell table:style-name="表格34.A3" office:value-type="string">
            <text:p text:style-name="P44">以此類推，每次多走一站</text:p>
          </table:table-cell>
          <table:table-cell table:style-name="表格34.A3" office:value-type="string">
            <text:p text:style-name="P44">逐步還原完整路徑</text:p>
          </table:table-cell>
        </table:table-row>
        <table:table-row table:style-name="表格34.1">
          <table:table-cell table:style-name="表格34.A4" office:value-type="string">
            <text:p text:style-name="P44">最後</text:p>
          </table:table-cell>
          <table:table-cell table:style-name="表格34.A4" office:value-type="string">
            <text:p text:style-name="P44">TTL = 距離</text:p>
          </table:table-cell>
          <table:table-cell table:style-name="表格34.A4" office:value-type="string">
            <text:p text:style-name="P44">封包抵達目的地，回傳正常應答</text:p>
          </table:table-cell>
          <table:table-cell table:style-name="表格34.A4" office:value-type="string">
            <text:p text:style-name="P44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51"><text:span text:style-name="T4">⚡ <text:s/></text:span><text:span text:style-name="T29">一句話記憶</text:span></text:p>
            <text:p text:style-name="P40"><text:span text:style-name="T57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51"><text:span text:style-name="T4">🔥 <text:s/></text:span><text:span text:style-name="T140">TCP/IP 四層心法（背這個就夠）</text:span></text:p>
            <text:p text:style-name="P52"><text:span text:style-name="T141">🟢 Application（應用層） → </text:span><text:span text:style-name="T9">給人用（HTTP、DNS、DHCP、SSH、MQTT）</text:span></text:p>
            <text:p text:style-name="P54"><text:soft-page-break/><text:span text:style-name="T141">🟡 Transport（傳輸層） → </text:span><text:span text:style-name="T9">怎麼送（TCP＝穩定 / UDP＝快速）(</text:span><text:span text:style-name="T131">切分、編頁碼、確認收件</text:span><text:span text:style-name="T9">)</text:span></text:p>
            <text:p text:style-name="P53"><text:span text:style-name="T141">🔵 Network（網路層） → </text:span><text:span text:style-name="T9">走哪條路（IP、ICMP）</text:span></text:p>
            <text:p text:style-name="P55"><text:span text:style-name="T141">🟠 Link（連結層） → </text:span><text:span text:style-name="T9">同一區網怎麼接（Ethernet、ARP）(</text:span><text:span text:style-name="T25">ARP</text:span><text:span text:style-name="T24"> ：</text:span><text:span text:style-name="T17">在</text:span><text:span text:style-name="T53">同一個</text:span><text:span text:style-name="T17">區域網路（LAN）中</text:span><text:span text:style-name="T9">，</text:span><text:span text:style-name="T121">將「IP 位址（邏輯位址）」轉換成「MAC 位址（實體位址）」</text:span><text:span text:style-name="T9">)</text:span></text:p>
          </table:table-cell>
        </table:table-row>
      </table:table>
      <text:h text:style-name="P25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1"><text:span text:style-name="T4">📐 <text:s/></text:span><text:span text:style-name="T23">本篇重點</text:span></text:p>
            <text:p text:style-name="P40">本篇分兩大主軸：前半談「<text:span text:style-name="T39">IP 位址如何劃分</text:span>」（分類、CIDR、子網計算、VLSM、CIDR 合併）；後半談「<text:span text:style-name="T39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9" text:outline-level="2">壹、IP 位址基礎</text:h>
      <text:p text:style-name="P41"><text:span text:style-name="T41">IP 位址（IPv4）是</text:span><text:span text:style-name="T101">一組 32 個 bit</text:span>，用來<text:span text:style-name="T61">識別網路上每一台設備的「地址」</text:span>。<text:span text:style-name="T41">為了人類方便閱讀</text:span>，<text:span text:style-name="T39">這 32 個 bit 被分成 4 組</text:span>、<text:span text:style-name="T57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7">Octet 1</text:p>
            </table:table-cell>
            <table:table-cell table:style-name="表格37.A1" office:value-type="string">
              <text:p text:style-name="P27">Octet 2</text:p>
            </table:table-cell>
            <table:table-cell table:style-name="表格37.A1" office:value-type="string">
              <text:p text:style-name="P27">Octet 3</text:p>
            </table:table-cell>
            <table:table-cell table:style-name="表格37.A1" office:value-type="string">
              <text:p text:style-name="P2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2">192</text:p>
          </table:table-cell>
          <table:table-cell table:style-name="表格37.A2" office:value-type="string">
            <text:p text:style-name="P42">168</text:p>
          </table:table-cell>
          <table:table-cell table:style-name="表格37.A2" office:value-type="string">
            <text:p text:style-name="P42">1</text:p>
          </table:table-cell>
          <table:table-cell table:style-name="表格37.A2" office:value-type="string">
            <text:p text:style-name="P42">0</text:p>
          </table:table-cell>
        </table:table-row>
      </table:table>
      <text:p text:style-name="P5">→ <text:span text:style-name="T101">總共 4 × 8 = 32 個 bit</text:span>，<text:span text:style-name="T145">每組數字範圍 0～255</text:span>（因為 <text:span text:style-name="T145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51"><text:span text:style-name="T4">💡 <text:s/></text:span><text:span text:style-name="T38">為什麼 IP 數量一定是 2 的次方？</text:span></text:p>
            <text:p text:style-name="P40"><text:span text:style-name="T39">每一個 bit 只有 0 或 1 兩種狀態</text:span>。若有 n 個 bit 可自由變化，可能的組合數 ＝ 2ⁿ。</text:p>
            <text:p text:style-name="P39">因此<text:span text:style-name="T132">子網路的 IP 總數一定是 2、4、8、16、32、64、128、256… 等 2 的次方</text:span>，不可能是 100 或 50。這就是<text:span text:style-name="T146">計算子網時必須「找最接近的 2ⁿ」</text:span>的根本原因。</text:p>
          </table:table-cell>
        </table:table-row>
      </table:table>
      <text:h text:style-name="P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4">類別</text:p>
            </table:table-cell>
            <table:table-cell table:style-name="表格39.A1" office:value-type="string">
              <text:p text:style-name="P24">第一組數字範圍</text:p>
            </table:table-cell>
            <table:table-cell table:style-name="表格39.A1" office:value-type="string">
              <text:p text:style-name="P24">預設遮罩</text:p>
            </table:table-cell>
            <table:table-cell table:style-name="表格39.A1" office:value-type="string">
              <text:p text:style-name="P24">用途</text:p>
            </table:table-cell>
            <table:table-cell table:style-name="表格39.A1" office:value-type="string">
              <text:p text:style-name="P24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32">A 類</text:p>
          </table:table-cell>
          <table:table-cell table:style-name="表格39.A2" office:value-type="string">
            <text:p text:style-name="P79">1 ～ 126</text:p>
          </table:table-cell>
          <table:table-cell table:style-name="表格39.A2" office:value-type="string">
            <text:p text:style-name="P84">/8</text:p>
          </table:table-cell>
          <table:table-cell table:style-name="表格39.A2" office:value-type="string">
            <text:p text:style-name="P32">超大型網路</text:p>
          </table:table-cell>
          <table:table-cell table:style-name="表格39.A2" office:value-type="string">
            <text:p text:style-name="P32">約 1,677 萬</text:p>
          </table:table-cell>
        </table:table-row>
        <table:table-row table:style-name="表格39.1">
          <table:table-cell table:style-name="表格39.A3" office:value-type="string">
            <text:p text:style-name="P32">B 類</text:p>
          </table:table-cell>
          <table:table-cell table:style-name="表格39.A3" office:value-type="string">
            <text:p text:style-name="P79">128 ～ 191</text:p>
          </table:table-cell>
          <table:table-cell table:style-name="表格39.A3" office:value-type="string">
            <text:p text:style-name="P84">/16</text:p>
          </table:table-cell>
          <table:table-cell table:style-name="表格39.A3" office:value-type="string">
            <text:p text:style-name="P32">中型網路</text:p>
          </table:table-cell>
          <table:table-cell table:style-name="表格39.A3" office:value-type="string">
            <text:p text:style-name="P32">約 6.5 萬</text:p>
          </table:table-cell>
        </table:table-row>
        <table:table-row table:style-name="表格39.1">
          <table:table-cell table:style-name="表格39.A2" office:value-type="string">
            <text:p text:style-name="P32">C 類</text:p>
          </table:table-cell>
          <table:table-cell table:style-name="表格39.A2" office:value-type="string">
            <text:p text:style-name="P79">192 ～ 223</text:p>
          </table:table-cell>
          <table:table-cell table:style-name="表格39.A2" office:value-type="string">
            <text:p text:style-name="P84">/24</text:p>
          </table:table-cell>
          <table:table-cell table:style-name="表格39.A2" office:value-type="string">
            <text:p text:style-name="P32">小型網路</text:p>
          </table:table-cell>
          <table:table-cell table:style-name="表格39.A2" office:value-type="string">
            <text:p text:style-name="P3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52"><text:span text:style-name="T36">127.x.x.x 為何不在 A 類？　</text:span><text:span text:style-name="T10">127.0.0.1 是回送位址（Loopback），保留給本機自我測試</text:span><text:span text:style-name="T9">；</text:span><text:span text:style-name="T151">ping 127.0.0.1 可測本機協定是否正常，故 A 類跳過 127</text:span><text:span text:style-name="T9">，只到 126。</text:span></text:p>
            <text:p text:style-name="P53"><text:span text:style-name="T35">其他保留位址：</text:span><text:span text:style-name="T19">0.x.x.x＝代表「這個網路本身」</text:span><text:span text:style-name="T9">；</text:span><text:span text:style-name="T20">224～239＝D 類（群播 Multicast）</text:span><text:span text:style-name="T9">；</text:span><text:span text:style-name="T21">240～255＝E 類（實驗用）</text:span><text:span text:style-name="T9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參、CIDR 表示法（斜線 /幾）</text:h>
      <text:p text:style-name="P41"><text:span text:style-name="T41">CIDR（無類別網域間路由）</text:span>以<text:span text:style-name="T101">「IP + / + 數字」精確表示網路大小</text:span>，例如 192.168.1.0/24。<text:span text:style-name="T57">/ 後面的數字 ＝ 前幾個 bit 是「網路部分」（固定不變）</text:span>，<text:span text:style-name="T13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4">表示法</text:p>
            </table:table-cell>
            <table:table-cell table:style-name="表格40.A1" office:value-type="string">
              <text:p text:style-name="P24">網路 bit</text:p>
            </table:table-cell>
            <table:table-cell table:style-name="表格40.A1" office:value-type="string">
              <text:p text:style-name="P24">主機 bit</text:p>
            </table:table-cell>
            <table:table-cell table:style-name="表格40.A1" office:value-type="string">
              <text:p text:style-name="P24">IP 總數</text:p>
            </table:table-cell>
            <table:table-cell table:style-name="表格40.A1" office:value-type="string">
              <text:p text:style-name="P24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84">/8</text:p>
          </table:table-cell>
          <table:table-cell table:style-name="表格40.A2" office:value-type="string">
            <text:p text:style-name="P86">8</text:p>
          </table:table-cell>
          <table:table-cell table:style-name="表格40.A2" office:value-type="string">
            <text:p text:style-name="P74">24</text:p>
          </table:table-cell>
          <table:table-cell table:style-name="表格40.A2" office:value-type="string">
            <text:p text:style-name="P95">16,777,216</text:p>
          </table:table-cell>
          <table:table-cell table:style-name="表格40.A2" office:value-type="string">
            <text:p text:style-name="P32">第 1 組（A 類）</text:p>
          </table:table-cell>
        </table:table-row>
        <table:table-row table:style-name="表格40.1">
          <table:table-cell table:style-name="表格40.A3" office:value-type="string">
            <text:p text:style-name="P84">/16</text:p>
          </table:table-cell>
          <table:table-cell table:style-name="表格40.A3" office:value-type="string">
            <text:p text:style-name="P86">16</text:p>
          </table:table-cell>
          <table:table-cell table:style-name="表格40.A3" office:value-type="string">
            <text:p text:style-name="P74">16</text:p>
          </table:table-cell>
          <table:table-cell table:style-name="表格40.A3" office:value-type="string">
            <text:p text:style-name="P95">65,536</text:p>
          </table:table-cell>
          <table:table-cell table:style-name="表格40.A3" office:value-type="string">
            <text:p text:style-name="P32">第 1-2 組（B 類）</text:p>
          </table:table-cell>
        </table:table-row>
        <table:table-row table:style-name="表格40.1">
          <table:table-cell table:style-name="表格40.A2" office:value-type="string">
            <text:p text:style-name="P84">/24</text:p>
          </table:table-cell>
          <table:table-cell table:style-name="表格40.A2" office:value-type="string">
            <text:p text:style-name="P86">24</text:p>
          </table:table-cell>
          <table:table-cell table:style-name="表格40.A2" office:value-type="string">
            <text:p text:style-name="P74">8</text:p>
          </table:table-cell>
          <table:table-cell table:style-name="表格40.A2" office:value-type="string">
            <text:p text:style-name="P95">256</text:p>
          </table:table-cell>
          <table:table-cell table:style-name="表格40.A2" office:value-type="string">
            <text:p text:style-name="P32">第 1-3 組（C 類）</text:p>
          </table:table-cell>
        </table:table-row>
        <table:table-row table:style-name="表格40.1">
          <table:table-cell table:style-name="表格40.A3" office:value-type="string">
            <text:p text:style-name="P84">/25</text:p>
          </table:table-cell>
          <table:table-cell table:style-name="表格40.A3" office:value-type="string">
            <text:p text:style-name="P86">25</text:p>
          </table:table-cell>
          <table:table-cell table:style-name="表格40.A3" office:value-type="string">
            <text:p text:style-name="P74">7</text:p>
          </table:table-cell>
          <table:table-cell table:style-name="表格40.A3" office:value-type="string">
            <text:p text:style-name="P95">128</text:p>
          </table:table-cell>
          <table:table-cell table:style-name="表格40.A3" office:value-type="string">
            <text:p text:style-name="P3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84">/26</text:p>
          </table:table-cell>
          <table:table-cell table:style-name="表格40.A2" office:value-type="string">
            <text:p text:style-name="P87">26</text:p>
          </table:table-cell>
          <table:table-cell table:style-name="表格40.A2" office:value-type="string">
            <text:p text:style-name="P75">6</text:p>
          </table:table-cell>
          <table:table-cell table:style-name="表格40.A2" office:value-type="string">
            <text:p text:style-name="P95">64</text:p>
          </table:table-cell>
          <table:table-cell table:style-name="表格40.A2" office:value-type="string">
            <text:p text:style-name="P3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84">/27</text:p>
          </table:table-cell>
          <table:table-cell table:style-name="表格40.A3" office:value-type="string">
            <text:p text:style-name="P87">27</text:p>
          </table:table-cell>
          <table:table-cell table:style-name="表格40.A3" office:value-type="string">
            <text:p text:style-name="P75">5</text:p>
          </table:table-cell>
          <table:table-cell table:style-name="表格40.A3" office:value-type="string">
            <text:p text:style-name="P95">32</text:p>
          </table:table-cell>
          <table:table-cell table:style-name="表格40.A3" office:value-type="string">
            <text:p text:style-name="P3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84">/28</text:p>
          </table:table-cell>
          <table:table-cell table:style-name="表格40.A2" office:value-type="string">
            <text:p text:style-name="P87">28</text:p>
          </table:table-cell>
          <table:table-cell table:style-name="表格40.A2" office:value-type="string">
            <text:p text:style-name="P75">4</text:p>
          </table:table-cell>
          <table:table-cell table:style-name="表格40.A2" office:value-type="string">
            <text:p text:style-name="P95">16</text:p>
          </table:table-cell>
          <table:table-cell table:style-name="表格40.A2" office:value-type="string">
            <text:p text:style-name="P3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51"><text:span text:style-name="T4">▸ <text:s/></text:span><text:span text:style-name="T23">用 bit 切割理解 /26</text:span></text:p>
            <text:p text:style-name="P40">以 192.168.1.0<text:span text:style-name="T50">/26</text:span> 為例：</text:p>
            <text:p text:style-name="P53"><text:span text:style-name="T24">11000000 . 10101000 . 00000001 . 00</text:span><text:span text:style-name="T7">|000000</text:span></text:p>
            <text:p text:style-name="P39">└── <text:span text:style-name="T39">前 26 bit（固定＝網路）</text:span>──┘ └ <text:span text:style-name="T101">後 6 bit（可變＝主機）</text:span>┘</text:p>
            <text:p text:style-name="P39">→ <text:span text:style-name="T154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4">名稱</text:p>
            </table:table-cell>
            <table:table-cell table:style-name="表格41.A1" office:value-type="string">
              <text:p text:style-name="P24">位置</text:p>
            </table:table-cell>
            <table:table-cell table:style-name="表格41.A1" office:value-type="string">
              <text:p text:style-name="P24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98">網路位址 Network Address</text:p>
          </table:table-cell>
          <table:table-cell table:style-name="表格41.A2" office:value-type="string">
            <text:p text:style-name="P79">第一個 IP（最小）</text:p>
          </table:table-cell>
          <table:table-cell table:style-name="表格41.A2" office:value-type="string">
            <text:p text:style-name="P3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98">廣播位址 Broadcast Address</text:p>
          </table:table-cell>
          <table:table-cell table:style-name="表格41.A3" office:value-type="string">
            <text:p text:style-name="P79">最後一個 IP（最大）</text:p>
          </table:table-cell>
          <table:table-cell table:style-name="表格41.A3" office:value-type="string">
            <text:p text:style-name="P32"><text:span text:style-name="T118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0">可用主機數 ＝ IP 總數 − 2</text:p>
            <text:p text:style-name="P39">【/24 示範】<text:span text:style-name="T41">192.168.1.0＝網路位址（不能用）</text:span>… <text:span text:style-name="T43">192.168.1.255＝廣播位址（不能用）</text:span>→ <text:span text:style-name="T136">共 256 個，可用 254 個</text:span>。</text:p>
            <text:p text:style-name="P39">【/26 示範·最常考】<text:span text:style-name="T41">192.168.1.0＝網路位址</text:span> … <text:span text:style-name="T43">192.168.1.63＝廣播位址</text:span> → <text:span text:style-name="T136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52"><text:span text:style-name="T37">唯一例外 /31（點對點，RFC 3021）：</text:span><text:span text:style-name="T81">只有 2 個 IP</text:span><text:span text:style-name="T86">，</text:span><text:span text:style-name="T81">兩個都可用作主機</text:span><text:span text:style-name="T112">，沒有網路位址和廣播位址</text:span><text:span text:style-name="T9">。考試若未特別提到，預設仍要 −2。</text:span></text:p>
          </table:table-cell>
          <table:covered-table-cell/>
          <table:covered-table-cell/>
        </table:table-row>
      </table:table>
      <text:h text:style-name="P9" text:outline-level="2">伍、VLSM（可變長度子網路遮罩）</text:h>
      <text:p text:style-name="P41">VLSM 的做法：<text:span text:style-name="T41">依各部門「實際需求」分配</text:span><text:span text:style-name="T62">剛剛好大小</text:span><text:span text:style-name="T41">的子網路，</text:span><text:span text:style-name="T91">不多給、不浪費</text:span>。例如 A 部門 100 台、B 部門 50 台、C 部門 10 台，<text:span text:style-name="T74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51"><text:span text:style-name="T4">📋 <text:s/></text:span><text:span text:style-name="T29">VLSM 標準流程（三步驟）</text:span></text:p>
            <text:p text:style-name="P62">①<text:span text:style-name="T59"> 將需求由大到小排序</text:span></text:p>
            <text:p text:style-name="P53"><text:span text:style-name="T32">② </text:span><text:span text:style-name="T34">計算每個需求所需前綴</text:span><text:span text:style-name="T32">：</text:span><text:span text:style-name="T53">需求 + 2 → 找最小 2ⁿ → 前綴 = 32 − n</text:span></text:p>
            <text:p text:style-name="P63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52"><text:span text:style-name="T35">為什麼要「由大到小」？　</text:span><text:span text:style-name="T9">因為「對齊（Alignment）」：</text:span><text:span text:style-name="T112">子網路的起始位址必須是其大小的整數倍</text:span><text:span text:style-name="T9">。</text:span><text:span text:style-name="T156">大小 128 的子網只能從 0、128… 開始；大小 64 的只能從 0、64、128… 開始</text:span><text:span text:style-name="T9">。</text:span></text:p>
            <text:p text:style-name="P53"><text:span text:style-name="T35">反面示範：</text:span><text:span text:style-name="T9">若先切小的 C（/28，0～15），</text:span><text:span text:style-name="T69">再切大的 A（/25，128 個），最近可用對齊位址是 128</text:span><text:span text:style-name="T9"> → </text:span><text:span text:style-name="T113">中間 16～127 共 112 個 IP 全浪費！</text:span><text:span text:style-name="T9">正解：</text:span><text:span text:style-name="T58">先切大的，大的天然對齊，小的再從後面切</text:span><text:span text:style-name="T9">。</text:span></text:p>
          </table:table-cell>
        </table:table-row>
      </table:table>
      <text:h text:style-name="P58" text:outline-level="3"><text:span text:style-name="T28">▍</text:span><text:span text:style-name="T29"> </text:span><text:span text:style-name="T30">前綴計算公式詳解</text:span><text:span text:style-name="T29">（以</text:span><text:span text:style-name="T93">需要 100 台主機為例</text:span><text:span text:style-name="T2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0">① <text:span text:style-name="T39">加 2（預留網路 + 廣播）</text:span>：<text:span text:style-name="T50">100 + 2 = 102</text:span></text:p>
            <text:p text:style-name="P39">② <text:span text:style-name="T59">找「大於等於 102」的最小 2ⁿ</text:span>：2⁶ = 64（太小）、<text:span text:style-name="T101">2⁷ = 128（夠）→ n = 7</text:span></text:p>
            <text:p text:style-name="P39">③ <text:span text:style-name="T57">前綴 = 32 − n = 32 − 7 = 25</text:span> →<text:span text:style-name="T72"> </text:span><text:span text:style-name="T75">使用 /25（驗證：2⁷ = 128，可用 126 ≥ 100 ✔）</text:span></text:p>
            <text:p text:style-name="P14"><text:span text:style-name="T50">公式一句話</text:span>：<text:span text:style-name="T139">需求 +2 → 找最小 2ⁿ</text:span> → <text:span text:style-name="T116">/(32−n)</text:span></text:p>
          </table:table-cell>
        </table:table-row>
      </table:table>
      <text:h text:style-name="P58" text:outline-level="3"><text:soft-page-break/><text:span text:style-name="T28">▍</text:span><text:span text:style-name="T2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8">部門</text:p>
            </table:table-cell>
            <table:table-cell table:style-name="表格44.A1" office:value-type="string">
              <text:p text:style-name="P28">需求</text:p>
            </table:table-cell>
            <table:table-cell table:style-name="表格44.A1" office:value-type="string">
              <text:p text:style-name="P28">+2</text:p>
            </table:table-cell>
            <table:table-cell table:style-name="表格44.A1" office:value-type="string">
              <text:p text:style-name="P28">2ⁿ</text:p>
            </table:table-cell>
            <table:table-cell table:style-name="表格44.A1" office:value-type="string">
              <text:p text:style-name="P28">前綴</text:p>
            </table:table-cell>
            <table:table-cell table:style-name="表格44.A1" office:value-type="string">
              <text:p text:style-name="P28">切割結果（範圍）</text:p>
            </table:table-cell>
            <table:table-cell table:style-name="表格44.A1" office:value-type="string">
              <text:p text:style-name="P2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4">A</text:p>
          </table:table-cell>
          <table:table-cell table:style-name="表格44.A2" office:value-type="string">
            <text:p text:style-name="P44">100</text:p>
          </table:table-cell>
          <table:table-cell table:style-name="表格44.A2" office:value-type="string">
            <text:p text:style-name="P44">102</text:p>
          </table:table-cell>
          <table:table-cell table:style-name="表格44.A2" office:value-type="string">
            <text:p text:style-name="P44">128（2<text:span text:style-name="T41">⁷</text:span>）</text:p>
          </table:table-cell>
          <table:table-cell table:style-name="表格44.A2" office:value-type="string">
            <text:p text:style-name="P48">/25</text:p>
          </table:table-cell>
          <table:table-cell table:style-name="表格44.A2" office:value-type="string">
            <text:p text:style-name="P44">192.168.1.0<text:span text:style-name="T39">/25</text:span>（0～<text:span text:style-name="T73">127</text:span>）</text:p>
          </table:table-cell>
          <table:table-cell table:style-name="表格44.A2" office:value-type="string">
            <text:p text:style-name="P44">126 ≥ 100 ✔</text:p>
          </table:table-cell>
        </table:table-row>
        <table:table-row table:style-name="表格44.1">
          <table:table-cell table:style-name="表格44.A3" office:value-type="string">
            <text:p text:style-name="P44">B</text:p>
          </table:table-cell>
          <table:table-cell table:style-name="表格44.A3" office:value-type="string">
            <text:p text:style-name="P44">50</text:p>
          </table:table-cell>
          <table:table-cell table:style-name="表格44.A3" office:value-type="string">
            <text:p text:style-name="P44">52</text:p>
          </table:table-cell>
          <table:table-cell table:style-name="表格44.A3" office:value-type="string">
            <text:p text:style-name="P44">64（2<text:span text:style-name="T41">⁶</text:span>）</text:p>
          </table:table-cell>
          <table:table-cell table:style-name="表格44.A3" office:value-type="string">
            <text:p text:style-name="P48">/26</text:p>
          </table:table-cell>
          <table:table-cell table:style-name="表格44.A3" office:value-type="string">
            <text:p text:style-name="P44">192.168.1.128<text:span text:style-name="T39">/26</text:span>（128～<text:span text:style-name="T73">191</text:span>）</text:p>
          </table:table-cell>
          <table:table-cell table:style-name="表格44.A3" office:value-type="string">
            <text:p text:style-name="P44">62 ≥ 50 ✔</text:p>
          </table:table-cell>
        </table:table-row>
        <table:table-row table:style-name="表格44.1">
          <table:table-cell table:style-name="表格44.A2" office:value-type="string">
            <text:p text:style-name="P44">C</text:p>
          </table:table-cell>
          <table:table-cell table:style-name="表格44.A2" office:value-type="string">
            <text:p text:style-name="P44">10</text:p>
          </table:table-cell>
          <table:table-cell table:style-name="表格44.A2" office:value-type="string">
            <text:p text:style-name="P44">12</text:p>
          </table:table-cell>
          <table:table-cell table:style-name="表格44.A2" office:value-type="string">
            <text:p text:style-name="P44">16（2<text:span text:style-name="T41">⁴</text:span>）</text:p>
          </table:table-cell>
          <table:table-cell table:style-name="表格44.A2" office:value-type="string">
            <text:p text:style-name="P48">/28</text:p>
          </table:table-cell>
          <table:table-cell table:style-name="表格44.A2" office:value-type="string">
            <text:p text:style-name="P44">192.168.1.192<text:span text:style-name="T39">/28</text:span>（192～<text:span text:style-name="T73">207</text:span>）</text:p>
          </table:table-cell>
          <table:table-cell table:style-name="表格44.A2" office:value-type="string">
            <text:p text:style-name="P44">14 ≥ 10 ✔</text:p>
          </table:table-cell>
        </table:table-row>
      </table:table>
      <text:p text:style-name="P5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1"><text:span text:style-name="T4">💡 <text:s/></text:span><text:span text:style-name="T140">考試技巧</text:span></text:p>
            <text:p text:style-name="P40"><text:span text:style-name="T76">快速判斷一個 IP 屬於哪個 /26 子網</text:span>（<text:span text:style-name="T101">每段 64 個，起點 0、64、128、192</text:span>）：<text:span text:style-name="T41">看最後一個 Octet 落在哪個區間 </text:span>→</text:p>
            <text:p text:style-name="P39"><text:span text:style-name="T39">0～63</text:span> → x.0/26　｜　<text:span text:style-name="T39">64～127</text:span> → x.64/26　｜　<text:span text:style-name="T39">128～191</text:span> → x.128/26　｜　<text:span text:style-name="T39">192～255</text:span> → x.192/26</text:p>
          </table:table-cell>
        </table:table-row>
      </table:table>
      <text:h text:style-name="P9" text:outline-level="2">陸、CIDR（路由聚合 / 超網合併）</text:h>
      <text:p text:style-name="P41">CIDR 的合併功能是 VLSM 的「反向操作」：<text:span text:style-name="T61">VLSM 把大網路切小</text:span>；<text:span text:style-name="T77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51"><text:span text:style-name="T4">🔑 </text:span><text:span text:style-name="T5"><text:s/></text:span><text:span text:style-name="T31">合併三條件（缺一不可）</text:span></text:p>
            <text:p text:style-name="P52"><text:span text:style-name="T32">① </text:span><text:span text:style-name="T34">連續（Contiguous）</text:span><text:span text:style-name="T32">：</text:span><text:span text:style-name="T112">IP 範圍必須緊鄰</text:span><text:span text:style-name="T9">，</text:span><text:span text:style-name="T58">中間不能有空缺</text:span><text:span text:style-name="T9">。</text:span></text:p>
            <text:p text:style-name="P53"><text:span text:style-name="T32">② </text:span><text:span text:style-name="T34">數量是 2ⁿ</text:span><text:span text:style-name="T32">：</text:span><text:span text:style-name="T9">2、4、8…。</text:span></text:p>
            <text:p text:style-name="P53"><text:span text:style-name="T32">③ </text:span><text:span text:style-name="T34">起始位址對齊</text:span><text:span text:style-name="T32">：</text:span><text:span text:style-name="T9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51"><text:span text:style-name="T4">▸ <text:s/></text:span><text:span text:style-name="T23">合併範例與反例</text:span></text:p>
            <text:p text:style-name="P52"><text:span text:style-name="T16">範例：</text:span><text:span text:style-name="T82">2 個 /25 → 1 個 /24</text:span><text:span text:style-name="T16">　</text:span><text:span text:style-name="T9">192.168.1</text:span><text:span text:style-name="T17">.0</text:span><text:span text:style-name="T9">/25 ＋ 192.168.1</text:span><text:span text:style-name="T17">.128</text:span><text:span text:style-name="T9">/25 → ① 緊鄰✔ ② 2 個（2¹）✔ ③ 起點 .0，0÷256=0✔ → 合併為 192.168.1</text:span><text:span text:style-name="T17">.0</text:span><text:span text:style-name="T9">/24。</text:span></text:p>
            <text:p text:style-name="P53"><text:span text:style-name="T16">範例：</text:span><text:span text:style-name="T82">4 個 /24 → 1 個 /22</text:span><text:span text:style-name="T16">　</text:span><text:span text:style-name="T9">192.168</text:span><text:span text:style-name="T21">.0/1/2/3</text:span><text:span text:style-name="T9">.0/</text:span><text:span text:style-name="T10">24</text:span><text:span text:style-name="T9"> → 連續✔、4 個（2²）✔、對齊✔ → 合併為 192.168</text:span><text:span text:style-name="T12">.0</text:span><text:span text:style-name="T9">.0/</text:span><text:span text:style-name="T10">22</text:span><text:span text:style-name="T9">。</text:span></text:p>
            <text:p text:style-name="P53"><text:span text:style-name="T165">反例（無法合併）：</text:span><text:span text:style-name="T94">192.168.1.0/24 ＋ 192.168.2.0/24 → 雖數量為 2，但起點 .1 不對齊</text:span><text:span text:style-name="T9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52"><text:span text:style-name="T141">合併後前綴公式：</text:span><text:span text:style-name="T9">合併 2ⁿ 個子網 → 前綴減 n（</text:span><text:span text:style-name="T58">每合併一倍，/ 的數字減 1</text:span><text:span text:style-name="T9">）。</text:span></text:p>
            <text:p text:style-name="P39"><text:span text:style-name="T147">2 個 /26 → /25；4 個 /26 → /24；2 個 /24 → /23</text:span>。</text:p>
          </table:table-cell>
        </table:table-row>
      </table:table>
      <text:h text:style-name="P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4">概念</text:p>
            </table:table-cell>
            <table:table-cell table:style-name="表格47.A1" office:value-type="string">
              <text:p text:style-name="P24">關鍵字</text:p>
            </table:table-cell>
            <table:table-cell table:style-name="表格47.A1" office:value-type="string">
              <text:p text:style-name="P24">核心規則</text:p>
            </table:table-cell>
            <table:table-cell table:style-name="表格47.A1" office:value-type="string">
              <text:p text:style-name="P24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32">IP 分類</text:p>
          </table:table-cell>
          <table:table-cell table:style-name="表格47.A2" office:value-type="string">
            <text:p text:style-name="P32">A/B/C 類</text:p>
          </table:table-cell>
          <table:table-cell table:style-name="表格47.A2" office:value-type="string">
            <text:p text:style-name="P79">看第一組數字判斷類別</text:p>
          </table:table-cell>
          <table:table-cell table:style-name="表格47.A2" office:value-type="string">
            <text:p text:style-name="P32">土地大小分類</text:p>
          </table:table-cell>
        </table:table-row>
        <table:table-row table:style-name="表格47.1">
          <table:table-cell table:style-name="表格47.A3" office:value-type="string">
            <text:p text:style-name="P32">VLSM</text:p>
          </table:table-cell>
          <table:table-cell table:style-name="表格47.A3" office:value-type="string">
            <text:p text:style-name="P32">切子網路</text:p>
          </table:table-cell>
          <table:table-cell table:style-name="表格47.A3" office:value-type="string">
            <text:p text:style-name="P32"><text:span text:style-name="T39">由大到小</text:span>；<text:span text:style-name="T101">需求+2→2ⁿ→/(32−n)</text:span></text:p>
          </table:table-cell>
          <table:table-cell table:style-name="表格47.A3" office:value-type="string">
            <text:p text:style-name="P3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32">CIDR 合併</text:p>
          </table:table-cell>
          <table:table-cell table:style-name="表格47.A2" office:value-type="string">
            <text:p text:style-name="P32">聚合路由</text:p>
          </table:table-cell>
          <table:table-cell table:style-name="表格47.A2" office:value-type="string">
            <text:p text:style-name="P32"><text:span text:style-name="T57">連續</text:span> + 數量 2ⁿ + 對齊；<text:span text:style-name="T41">前綴減 n</text:span></text:p>
          </table:table-cell>
          <table:table-cell table:style-name="表格47.A2" office:value-type="string">
            <text:p text:style-name="P3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51"><text:span text:style-name="T4">🎯 <text:s/></text:span><text:span text:style-name="T167">考試標準解題流程</text:span></text:p>
            <text:p text:style-name="P52"><text:span text:style-name="T168">遇到 VLSM 題：</text:span><text:span text:style-name="T135">確認起始網路</text:span><text:span text:style-name="T9"> → </text:span><text:span text:style-name="T126">需求由大到小</text:span><text:span text:style-name="T9"> → </text:span><text:span text:style-name="T114">各需求 +2 找 2ⁿ 算前綴</text:span><text:span text:style-name="T9"> → </text:span><text:span text:style-name="T83">大的先切</text:span><text:span text:style-name="T9">依序往後 → </text:span><text:span text:style-name="T95">驗證網路位址/廣播位址/可用範圍</text:span><text:span text:style-name="T9">。</text:span></text:p>
            <text:p text:style-name="P53"><text:span text:style-name="T168">遇到 CIDR 合併題：</text:span><text:span text:style-name="T9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捌、MTU（最大傳輸單位）(</text:span><text:span text:style-name="T123">一條網路，一次最多</text:span><text:span text:style-name="T8">)</text:span></text:h>
      <text:p text:style-name="P41"><text:span text:style-name="T41">MTU</text:span> ＝ <text:span text:style-name="T89">Maximum Transmission Unit，</text:span><text:span text:style-name="T103">一條網路</text:span><text:span text:style-name="T89">「</text:span><text:span text:style-name="T63">一次最多</text:span><text:span text:style-name="T89">能傳送的</text:span><text:span text:style-name="T119">封包大小</text:span><text:span text:style-name="T89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4">網路類型</text:p>
            </table:table-cell>
            <table:table-cell table:style-name="表格48.A1" office:value-type="string">
              <text:p text:style-name="P24">MTU 值</text:p>
            </table:table-cell>
            <table:table-cell table:style-name="表格48.A1" office:value-type="string">
              <text:p text:style-name="P24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32">Ethernet（乙太網）</text:p>
          </table:table-cell>
          <table:table-cell table:style-name="表格48.A2" office:value-type="string">
            <text:p text:style-name="P32">1500 bytes</text:p>
          </table:table-cell>
          <table:table-cell table:style-name="表格48.A2" office:value-type="string">
            <text:p text:style-name="P32">最常見，99% 環境</text:p>
          </table:table-cell>
        </table:table-row>
        <table:table-row table:style-name="表格48.1">
          <table:table-cell table:style-name="表格48.A3" office:value-type="string">
            <text:p text:style-name="P32">Wi-Fi (802.11)</text:p>
          </table:table-cell>
          <table:table-cell table:style-name="表格48.A3" office:value-type="string">
            <text:p text:style-name="P32">2304 bytes</text:p>
          </table:table-cell>
          <table:table-cell table:style-name="表格48.A3" office:value-type="string">
            <text:p text:style-name="P32">無線區域網路</text:p>
          </table:table-cell>
        </table:table-row>
        <table:table-row table:style-name="表格48.1">
          <table:table-cell table:style-name="表格48.A2" office:value-type="string">
            <text:p text:style-name="P32">PPPoE（ADSL）</text:p>
          </table:table-cell>
          <table:table-cell table:style-name="表格48.A2" office:value-type="string">
            <text:p text:style-name="P32">1492 bytes</text:p>
          </table:table-cell>
          <table:table-cell table:style-name="表格48.A2" office:value-type="string">
            <text:p text:style-name="P32">需扣掉 PPPoE header</text:p>
          </table:table-cell>
        </table:table-row>
        <table:table-row table:style-name="表格48.1">
          <table:table-cell table:style-name="表格48.A3" office:value-type="string">
            <text:p text:style-name="P32">Loopback（本機）</text:p>
          </table:table-cell>
          <table:table-cell table:style-name="表格48.A3" office:value-type="string">
            <text:p text:style-name="P32">65536 bytes</text:p>
          </table:table-cell>
          <table:table-cell table:style-name="表格48.A3" office:value-type="string">
            <text:p text:style-name="P3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51"><text:span text:style-name="T4">❗ <text:s/></text:span><text:span text:style-name="T38">重點</text:span></text:p>
            <text:p text:style-name="P40"><text:span text:style-name="T57">若封包大小 &gt; MTU，就必須「切開」才能傳送</text:span>，這個動作就叫 <text:span text:style-name="T136">Fragmentation（分段）</text:span>。</text:p>
          </table:table-cell>
          <table:covered-table-cell/>
          <table:covered-table-cell/>
        </table:table-row>
      </table:table>
      <text:h text:style-name="P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51"><text:span text:style-name="T4">📦 <text:s/></text:span><text:span text:style-name="T23">怎麼切？</text:span></text:p>
            <text:p text:style-name="P40">範例：送出 4000 bytes、<text:span text:style-name="T39">MTU = 1500</text:span>（<text:span text:style-name="T101">每段扣掉 20 bytes IP Header</text:span>，<text:span text:style-name="T41">剩 1480 可放資料</text:span>）</text:p>
            <text:p text:style-name="P8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4">版本</text:p>
          </table:table-cell>
          <table:table-cell table:style-name="表格49.A2" office:value-type="string">
            <text:p text:style-name="P24">誰負責分段</text:p>
          </table:table-cell>
          <table:table-cell table:style-name="表格49.A2" office:value-type="string">
            <text:p text:style-name="P24">Router 可切？</text:p>
          </table:table-cell>
          <table:table-cell table:style-name="表格49.A2" office:value-type="string">
            <text:p text:style-name="P24">說明</text:p>
          </table:table-cell>
        </table:table-row>
        <table:table-row table:style-name="表格49.1">
          <table:table-cell table:style-name="表格49.A3" office:value-type="string">
            <text:p text:style-name="P33">IPv4</text:p>
          </table:table-cell>
          <table:table-cell table:style-name="表格49.A3" office:value-type="string">
            <text:p text:style-name="P32">Router 或 Source</text:p>
          </table:table-cell>
          <table:table-cell table:style-name="表格49.A3" office:value-type="string">
            <text:p text:style-name="P68">✅ 可以</text:p>
          </table:table-cell>
          <table:table-cell table:style-name="表格49.A3" office:value-type="string">
            <text:p text:style-name="P93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33">IPv6</text:p>
          </table:table-cell>
          <table:table-cell table:style-name="表格49.A4" office:value-type="string">
            <text:p text:style-name="P32">僅 Source（送端）</text:p>
          </table:table-cell>
          <table:table-cell table:style-name="表格49.A4" office:value-type="string">
            <text:p text:style-name="P65">❌ 不行</text:p>
          </table:table-cell>
          <table:table-cell table:style-name="表格49.A4" office:value-type="string">
            <text:p text:style-name="P32"><text:span text:style-name="T146">Router 不分段</text:span>，<text:span text:style-name="T61">由送端自行處理</text:span>，搭配 PMTUD</text:p>
          </table:table-cell>
        </table:table-row>
      </table:table>
      <text:h text:style-name="P9" text:outline-level="2">拾、IP Header 關鍵欄位</text:h>
      <text:p text:style-name="P41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52"><text:span text:style-name="T24">(1) </text:span><text:span text:style-name="T25">Total Length</text:span><text:span text:style-name="T24">：</text:span><text:span text:style-name="T9">封包總大小（Header + Data），最大 65535 bytes（16 bits）。</text:span></text:p>
            <text:p text:style-name="P53"><text:span text:style-name="T24">(2) </text:span><text:span text:style-name="T25">Identification</text:span><text:span text:style-name="T24">：</text:span><text:span text:style-name="T112">同一原始封包的所有分段共用同一 ID</text:span><text:span text:style-name="T9">；</text:span><text:span text:style-name="T84">接收端靠此 ID 判斷哪些 fragment 要拼在一起</text:span><text:span text:style-name="T9">。</text:span></text:p>
            <text:p text:style-name="P53"><text:span text:style-name="T24">(3) </text:span><text:span text:style-name="T25">Fragment Offset</text:span><text:span text:style-name="T24">：</text:span><text:span text:style-name="T58">這段資料在原始封包中的「起始位置」</text:span><text:span text:style-name="T9">。⚠️ 單位是 8 bytes（欄位僅 13 bits）→ </text:span><text:span text:style-name="T58">Offset = 起始位置 ÷ 8</text:span><text:span text:style-name="T9">。</text:span></text:p>
            <text:p text:style-name="P53"><text:span text:style-name="T24">(4) </text:span><text:span text:style-name="T25">TTL</text:span><text:span text:style-name="T24">：</text:span><text:span text:style-name="T152">最多可經過幾個 Router；每經過一個 −1</text:span><text:span text:style-name="T9">，</text:span><text:span text:style-name="T95">歸零時 Router 丟棄並回 ICMP「Time Exceeded」</text:span><text:span text:style-name="T9">。常見初始值 Linux=64、Windows=128。traceroute 即利用 TTL。</text:span></text:p>
            <text:p text:style-name="P53"><text:span text:style-name="T24">(5) </text:span><text:span text:style-name="T25">Protocol</text:span><text:span text:style-name="T24">：</text:span><text:span text:style-name="T9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4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4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1 段：資料 1480 bytes</text:p>
          </table:table-cell>
          <table:covered-table-cell/>
          <table:covered-table-cell/>
          <table:table-cell table:style-name="表格50.A3" office:value-type="string">
            <text:p text:style-name="P3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32">第 2 段：資料 1480 bytes</text:p>
          </table:table-cell>
          <table:covered-table-cell/>
          <table:covered-table-cell/>
          <table:table-cell table:style-name="表格50.A4" office:value-type="string">
            <text:p text:style-name="P32"><text:span text:style-name="T5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3 段：資料 1040 bytes</text:p>
          </table:table-cell>
          <table:covered-table-cell/>
          <table:covered-table-cell/>
          <table:table-cell table:style-name="表格50.A3" office:value-type="string">
            <text:p text:style-name="P32"><text:span text:style-name="T50">2960 ÷ 8</text:span> = 370</text:p>
          </table:table-cell>
        </table:table-row>
        <table:table-row table:style-name="表格50.1">
          <table:table-cell table:style-name="表格50.A2" office:value-type="string">
            <text:p text:style-name="P23">Protocol 值</text:p>
          </table:table-cell>
          <table:table-cell table:style-name="表格50.A2" office:value-type="string">
            <text:p text:style-name="P23">對應協定</text:p>
          </table:table-cell>
          <table:table-cell table:style-name="表格50.A2" table:number-columns-spanned="2" office:value-type="string">
            <text:p text:style-name="P23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</text:p>
          </table:table-cell>
          <table:table-cell table:style-name="表格50.A3" office:value-type="string">
            <text:p text:style-name="P34">ICMP</text:p>
          </table:table-cell>
          <table:table-cell table:style-name="表格50.A3" table:number-columns-spanned="2" office:value-type="string">
            <text:p text:style-name="P81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32">6</text:p>
          </table:table-cell>
          <table:table-cell table:style-name="表格50.A4" office:value-type="string">
            <text:p text:style-name="P32">TCP</text:p>
          </table:table-cell>
          <table:table-cell table:style-name="表格50.A4" table:number-columns-spanned="2" office:value-type="string">
            <text:p text:style-name="P3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7</text:p>
          </table:table-cell>
          <table:table-cell table:style-name="表格50.A3" office:value-type="string">
            <text:p text:style-name="P32">UDP</text:p>
          </table:table-cell>
          <table:table-cell table:style-name="表格50.A3" table:number-columns-spanned="2" office:value-type="string">
            <text:p text:style-name="P32">DNS、DHCP、影音串流等速度優先</text:p>
          </table:table-cell>
          <table:covered-table-cell/>
        </table:table-row>
      </table:table>
      <text:h text:style-name="P91" text:outline-level="2"><text:soft-page-break/><text:span text:style-name="T8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4">Flag</text:p>
            </table:table-cell>
            <table:table-cell table:style-name="表格51.A1" office:value-type="string">
              <text:p text:style-name="P24">全名</text:p>
            </table:table-cell>
            <table:table-cell table:style-name="表格51.A1" office:value-type="string">
              <text:p text:style-name="P24">值 = 1 代表</text:p>
            </table:table-cell>
            <table:table-cell table:style-name="表格51.A1" office:value-type="string">
              <text:p text:style-name="P24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79">DF</text:p>
          </table:table-cell>
          <table:table-cell table:style-name="表格51.A2" office:value-type="string">
            <text:p text:style-name="P79">Don't Fragment</text:p>
          </table:table-cell>
          <table:table-cell table:style-name="表格51.A2" office:value-type="string">
            <text:p text:style-name="P32">❌ 不准切！超大就丟並回 ICMP</text:p>
          </table:table-cell>
          <table:table-cell table:style-name="表格51.A2" office:value-type="string">
            <text:p text:style-name="P3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73">MF</text:p>
          </table:table-cell>
          <table:table-cell table:style-name="表格51.A3" office:value-type="string">
            <text:p text:style-name="P73">More Fragments</text:p>
          </table:table-cell>
          <table:table-cell table:style-name="表格51.A3" office:value-type="string">
            <text:p text:style-name="P32">後面還有更多分段</text:p>
          </table:table-cell>
          <table:table-cell table:style-name="表格51.A3" office:value-type="string">
            <text:p text:style-name="P3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51"><text:span text:style-name="T4">▸ <text:s/></text:span><text:span text:style-name="T23">DF = 1 的完整流程</text:span></text:p>
            <text:p text:style-name="P40">① 送出封包（<text:span text:style-name="T41">DF=1，不准切</text:span>）→ ② 到某 Router，發現<text:span text:style-name="T104">封包 &gt; 該路段 MTU</text:span> → ③ <text:span text:style-name="T64">Router 不能切，直接丟棄 </text:span>→ ④ <text:span text:style-name="T148">Router 回傳 ICMP「Fragmentation Needed」（含可用 MTU 大小）</text:span>→ ⑤ <text:span text:style-name="T101">送端調整封包大小後</text:span><text:span text:style-name="T92">重送</text:span>。這就是 <text:span text:style-name="T39">PMTUD 的核心機制</text:span>。</text:p>
          </table:table-cell>
          <table:covered-table-cell/>
          <table:covered-table-cell/>
          <table:covered-table-cell/>
        </table:table-row>
      </table:table>
      <text:h text:style-name="P9" text:outline-level="2">拾貳、PMTUD（路徑 MTU 探測）</text:h>
      <text:p text:style-name="P41"><text:span text:style-name="T41">PMTUD </text:span>＝<text:span text:style-name="T92"> Path MTU Discovery，自動找出</text:span><text:span text:style-name="T169">來源到目的地</text:span><text:span text:style-name="T92">整條路徑中</text:span><text:span text:style-name="T149">最小的 MTU 值</text:span>。<text:span text:style-name="T43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4">版本</text:p>
            </table:table-cell>
            <table:table-cell table:style-name="表格52.A1" office:value-type="string">
              <text:p text:style-name="P24">Router 可分段？</text:p>
            </table:table-cell>
            <table:table-cell table:style-name="表格52.A1" office:value-type="string">
              <text:p text:style-name="P24">PMTUD 必要性</text:p>
            </table:table-cell>
            <table:table-cell table:style-name="表格52.A1" office:value-type="string">
              <text:p text:style-name="P24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35">IPv4</text:p>
          </table:table-cell>
          <table:table-cell table:style-name="表格52.A2" office:value-type="string">
            <text:p text:style-name="P36">✅ 可以（但不推薦）</text:p>
          </table:table-cell>
          <table:table-cell table:style-name="表格52.A2" office:value-type="string">
            <text:p text:style-name="P32">可選，但建議使用</text:p>
          </table:table-cell>
          <table:table-cell table:style-name="表格52.A2" office:value-type="string">
            <text:p text:style-name="P32">ICMP Fragmentation Needed</text:p>
          </table:table-cell>
        </table:table-row>
        <table:table-row table:style-name="表格52.1">
          <table:table-cell table:style-name="表格52.A3" office:value-type="string">
            <text:p text:style-name="P35">IPv6</text:p>
          </table:table-cell>
          <table:table-cell table:style-name="表格52.A3" office:value-type="string">
            <text:p text:style-name="P36">❌ 不行</text:p>
          </table:table-cell>
          <table:table-cell table:style-name="表格52.A3" office:value-type="string">
            <text:p text:style-name="P32">⚠️ 必須使用</text:p>
          </table:table-cell>
          <table:table-cell table:style-name="表格52.A3" office:value-type="string">
            <text:p text:style-name="P32">ICMPv6 Packet Too Big</text:p>
          </table:table-cell>
        </table:table-row>
      </table:table>
      <text:h text:style-name="P9" text:outline-level="2">拾參、TCP 如何避免 Fragmentation？</text:h>
      <text:p text:style-name="P41"><text:span text:style-name="T57">TCP 不依賴 IP 層切封包，而是「自己先控制好大小」</text:span>，<text:span text:style-name="T41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2"><text:span text:style-name="T24">MSS（Maximum Segment Size）：</text:span><text:span text:style-name="T115">MSS = MTU − IP Header − TCP Header </text:span><text:span text:style-name="T9">= </text:span><text:span text:style-name="T17">1500 − 20 − 20 = 1460 bytes</text:span><text:span text:style-name="T9">。</text:span><text:span text:style-name="T70">三向交握時雙方各自宣告 MSS，之後每段 ≤ MSS</text:span><text:span text:style-name="T9">，</text:span><text:span text:style-name="T17">讓 IP 層不需分段</text:span><text:span text:style-name="T9">。</text:span></text:p>
            <text:p text:style-name="P53"><text:span text:style-name="T24">搭配 DF=1 + PMTUD：</text:span><text:span text:style-name="T9">TCP 連線設 DF=1 禁止 Router 分段；</text:span><text:span text:style-name="T112">若收到 ICMP「Fragmentation Needed」，自動調低 MSS 重試</text:span><text:span text:style-name="T9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51"><text:span text:style-name="T4">✅ <text:s/></text:span><text:span text:style-name="T167">結論</text:span></text:p>
            <text:p text:style-name="P40"><text:span text:style-name="T136">TCP = 主動控制大小（MSS）＋ DF=1 ＋ PMTUD</text:span>，<text:span text:style-name="T105">從源頭就避免 Fragmentation 發生</text:span>。<text:span text:style-name="T78">TCP 做 Segmentation 的主要目的之一，就是讓每個封包符合 MTU</text:span>，從而避免 IP 再做 Fragmentation。</text:p>
          </table:table-cell>
        </table:table-row>
      </table:table>
      <text:h text:style-name="P9" text:outline-level="2">拾肆、Fragmentation DoS 攻擊</text:h>
      <text:p text:style-name="P41"><text:span text:style-name="T101">攻擊者利用「接收端重組封包很耗資源」這個特性</text:span>，<text:span text:style-name="T57">刻意製造大量異常 Fragment</text:span>。正常重組流程：收到 Fragment <text:span text:style-name="T89">放入緩衝區 </text:span>→ <text:span text:style-name="T148">等同一 ID 的所有 Fragment 到齊 → 依</text:span><text:span text:style-name="T56"> Offset </text:span><text:span text:style-name="T148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8">攻擊手法</text:p>
            </table:table-cell>
            <table:table-cell table:style-name="表格54.A1" office:value-type="string">
              <text:p text:style-name="P28">做法</text:p>
            </table:table-cell>
            <table:table-cell table:style-name="表格54.A1" office:value-type="string">
              <text:p text:style-name="P2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7">1 不完整 Fragment</text:p>
          </table:table-cell>
          <table:table-cell table:style-name="表格54.A2" office:value-type="string">
            <text:p text:style-name="P44">只送部分分段（缺其中一段）</text:p>
          </table:table-cell>
          <table:table-cell table:style-name="表格54.A2" office:value-type="string">
            <text:p text:style-name="P44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7">2 Offset 重疊</text:p>
          </table:table-cell>
          <table:table-cell table:style-name="表格54.A3" office:value-type="string">
            <text:p text:style-name="P44">送出 Offset 互相重疊的 Fragment</text:p>
          </table:table-cell>
          <table:table-cell table:style-name="表格54.A3" office:value-type="string">
            <text:p text:style-name="P44"><text:span text:style-name="T39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47">3 大量碎片</text:p>
          </table:table-cell>
          <table:table-cell table:style-name="表格54.A2" office:value-type="string">
            <text:p text:style-name="P44">送出數萬個 Fragment（同一 ID）</text:p>
          </table:table-cell>
          <table:table-cell table:style-name="表格54.A2" office:value-type="string">
            <text:p text:style-name="P44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51"><text:span text:style-name="T4">🛡️ <text:s/></text:span><text:span text:style-name="T167">防禦方式</text:span></text:p>
            <text:p text:style-name="P40">防禦：<text:span text:style-name="T45">設定重組 buffer 上限</text:span>避免無限占用記憶體；<text:span text:style-name="T46">丟棄等待過久或異常的 Fragment</text:span>；<text:span text:style-name="T43">部署 IDS / Firewall 偵測異常分段</text:span>模式。</text:p>
          </table:table-cell>
          <table:covered-table-cell/>
          <table:covered-table-cell/>
        </table:table-row>
      </table:table>
      <text:h text:style-name="P91" text:outline-level="2"><text:soft-page-break/><text:span text:style-name="T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4">技術概念</text:p>
            </table:table-cell>
            <table:table-cell table:style-name="表格55.A1" office:value-type="string">
              <text:p text:style-name="P24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>MTU</text:p>
          </table:table-cell>
          <table:table-cell table:style-name="表格55.A2" office:value-type="string">
            <text:p text:style-name="P3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32">Fragmentation</text:p>
          </table:table-cell>
          <table:table-cell table:style-name="表格55.A3" office:value-type="string">
            <text:p text:style-name="P3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36">Identification</text:p>
          </table:table-cell>
          <table:table-cell table:style-name="表格55.A2" office:value-type="string">
            <text:p text:style-name="P35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36">Fragment Offset</text:p>
          </table:table-cell>
          <table:table-cell table:style-name="表格55.A3" office:value-type="string">
            <text:p text:style-name="P3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32">IPv4 / IPv6</text:p>
          </table:table-cell>
          <table:table-cell table:style-name="表格55.A2" office:value-type="string">
            <text:p text:style-name="P3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32">DF = 1</text:p>
          </table:table-cell>
          <table:table-cell table:style-name="表格55.A3" office:value-type="string">
            <text:p text:style-name="P3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8">PMTUD</text:p>
          </table:table-cell>
          <table:table-cell table:style-name="表格55.A2" office:value-type="string">
            <text:p text:style-name="P37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76">TTL</text:p>
          </table:table-cell>
          <table:table-cell table:style-name="表格55.A3" office:value-type="string">
            <text:p text:style-name="P38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36">MSS</text:p>
          </table:table-cell>
          <table:table-cell table:style-name="表格55.A2" office:value-type="string">
            <text:p text:style-name="P35">你自己量好每箱重量，確保不超重</text:p>
          </table:table-cell>
        </table:table-row>
      </table:table>
      <text:h text:style-name="P25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51"><text:span text:style-name="T4">💡 <text:s/></text:span><text:span text:style-name="T23">為什麼要從 IPv4 換到 IPv6？</text:span></text:p>
            <text:p text:style-name="P40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4">比較項目</text:p>
            </table:table-cell>
            <table:table-cell table:style-name="表格57.A1" office:value-type="string">
              <text:p text:style-name="P24">✗ IPv4 問題</text:p>
            </table:table-cell>
            <table:table-cell table:style-name="表格57.A1" office:value-type="string">
              <text:p text:style-name="P24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32">位址長度</text:p>
          </table:table-cell>
          <table:table-cell table:style-name="表格57.A2" office:value-type="string">
            <text:p text:style-name="P32"><text:span text:style-name="T101">32 bit</text:span>，約 43 億個 IP，已嚴重不足</text:p>
          </table:table-cell>
          <table:table-cell table:style-name="表格57.A2" office:value-type="string">
            <text:p text:style-name="P32"><text:span text:style-name="T78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32">NAT 位址轉換</text:p>
          </table:table-cell>
          <table:table-cell table:style-name="表格57.A3" office:value-type="string">
            <text:p text:style-name="P32"><text:span text:style-name="T41">需 NAT 共用 IP</text:span>，破壞 End-to-End</text:p>
          </table:table-cell>
          <table:table-cell table:style-name="表格57.A3" office:value-type="string">
            <text:p text:style-name="P32"><text:span text:style-name="T39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32">安全性</text:p>
          </table:table-cell>
          <table:table-cell table:style-name="表格57.A2" office:value-type="string">
            <text:p text:style-name="P32">無內建加密／驗證，<text:span text:style-name="T41">須另裝 VPN</text:span></text:p>
          </table:table-cell>
          <table:table-cell table:style-name="表格57.A2" office:value-type="string">
            <text:p text:style-name="P32"><text:span text:style-name="T106">支援 IPsec</text:span><text:span text:style-name="T39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32">Header 結構</text:p>
          </table:table-cell>
          <table:table-cell table:style-name="表格57.A3" office:value-type="string">
            <text:p text:style-name="P32"><text:span text:style-name="T41">可變長度</text:span>含 Options，Router 效率低</text:p>
          </table:table-cell>
          <table:table-cell table:style-name="表格57.A3" office:value-type="string">
            <text:p text:style-name="P32"><text:span text:style-name="T39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32">服務品質 QoS</text:p>
          </table:table-cell>
          <table:table-cell table:style-name="表格57.A2" office:value-type="string">
            <text:p text:style-name="P35">無法有效標記流量優先權</text:p>
          </table:table-cell>
          <table:table-cell table:style-name="表格57.A2" office:value-type="string">
            <text:p text:style-name="P32"><text:span text:style-name="T39">Flow Label 欄位</text:span>，<text:span text:style-name="T118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32">廣播方式</text:p>
          </table:table-cell>
          <table:table-cell table:style-name="表格57.A3" office:value-type="string">
            <text:p text:style-name="P32"><text:span text:style-name="T41">Broadcast</text:span>：一次發給所有人，浪費頻寬</text:p>
          </table:table-cell>
          <table:table-cell table:style-name="表格57.A3" office:value-type="string">
            <text:p text:style-name="P32">改用<text:span text:style-name="T39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32">IP 配置方式</text:p>
          </table:table-cell>
          <table:table-cell table:style-name="表格57.A2" office:value-type="string">
            <text:p text:style-name="P32"><text:span text:style-name="T43">需手動設定或 DHCP</text:span>，管理繁瑣</text:p>
          </table:table-cell>
          <table:table-cell table:style-name="表格57.A2" office:value-type="string">
            <text:p text:style-name="P32">SLAAC 無狀態自動配置，<text:span text:style-name="T57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51"><text:span text:style-name="T4">📌 <text:s/></text:span><text:span text:style-name="T38">補充：IPsec 強制 vs 建議</text:span></text:p>
            <text:p text:style-name="P40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2">① <text:span text:style-name="T59">Dual Stack（雙協定堆疊）</text:span>— 最常用、最推薦</text:p>
            <text:p text:style-name="P39"><text:span text:style-name="T65">裝置同時具備 IPv4 與 IPv6 兩套協定堆疊</text:span>。<text:span text:style-name="T41">DNS A record → 回傳 IPv4；DNS AAAA record → 回傳 IPv6</text:span>。連線時優先選用 IPv6，對端不支援則自動退回 IPv4。不需任何封包轉換，效能損耗最低。</text:p>
            <text:p text:style-name="P39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100">②<text:span text:style-name="T59"> Tunneling（隧道技術）</text:span>— 過渡期橋接方案</text:p>
            <text:p text:style-name="P39">中間網路只支援 IPv4，無法直接傳送 IPv6 封包。解法：<text:span text:style-name="T65">將 IPv6 封包完整封裝進 IPv4 外殼，抵達目的地後拆除外層 IPv4、還原 IPv6 封包</text:span>。常見技術：6in4、6to4、Teredo、ISATAP。</text:p>
            <text:p text:style-name="P39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1">③ <text:span text:style-name="T59">Translation（NAT64）</text:span>— 協定轉換、互通最後手段</text:p>
            <text:p text:style-name="P39">適用場景：IPv6-only 裝置需與 IPv4-only 裝置直接通訊。<text:span text:style-name="T105">透過轉換閘道器即時將封包表頭轉換為對方格式</text:span>。代表技術：NAT64 + DNS64。<text:span text:style-name="T104">複雜度最高，有額外效能損耗</text:span>。</text:p>
            <text:p text:style-name="P39">示意：IPv6 裝置 → [ NAT64 <text:span text:style-name="T89">轉換閘道</text:span> ] → IPv4 裝置（雙向互轉）。</text:p>
          </table:table-cell>
        </table:table-row>
      </table:table>
      <text:h text:style-name="P9" text:outline-level="2"><text:soft-page-break/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6">技術</text:p>
            </table:table-cell>
            <table:table-cell table:style-name="表格59.A1" office:value-type="string">
              <text:p text:style-name="P2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2">Dual Stack</text:p>
          </table:table-cell>
          <table:table-cell table:style-name="表格59.A2" office:value-type="string">
            <text:p text:style-name="P42">你<text:span text:style-name="T41">同時會中文 + 英文</text:span>，遇到誰說哪個</text:p>
          </table:table-cell>
        </table:table-row>
        <table:table-row table:style-name="表格59.1">
          <table:table-cell table:style-name="表格59.A3" office:value-type="string">
            <text:p text:style-name="P42">Tunneling</text:p>
          </table:table-cell>
          <table:table-cell table:style-name="表格59.A3" office:value-type="string">
            <text:p text:style-name="P42"><text:span text:style-name="T57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42">Translation</text:p>
          </table:table-cell>
          <table:table-cell table:style-name="表格59.A2" office:value-type="string">
            <text:p text:style-name="P42"><text:span text:style-name="T148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51"><text:span text:style-name="T4">🏠 <text:s/></text:span><text:span text:style-name="T23">用「寄信/門牌」理解</text:span></text:p>
            <text:p text:style-name="P52"><text:span text:style-name="T122">IPv4 的困境：整棟公寓共用一個門牌</text:span><text:span text:style-name="T96">（NAT）</text:span><text:span text:style-name="T9">，郵差只送到大門，裡面誰是誰要另外猜；地址快用光還在借號碼。</text:span></text:p>
            <text:p text:style-name="P53"><text:span text:style-name="T112">IPv6 的世界：每個人都有獨立門牌（公開 IP）</text:span><text:span text:style-name="T9">，地址多到用不完，郵件直接送到本人手上，不需中間人轉達。</text:span></text:p>
          </table:table-cell>
          <table:covered-table-cell/>
        </table:table-row>
      </table:table>
      <text:h text:style-name="P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51"><text:span text:style-name="T4">🧠 <text:s/></text:span><text:span text:style-name="T140">一句話記憶法</text:span></text:p>
            <text:p text:style-name="P52"><text:span text:style-name="T141">IPv6 特點：</text:span><text:span text:style-name="T9">大（128 bit）＋ </text:span><text:span text:style-name="T85">安全（IPsec）</text:span><text:span text:style-name="T9">＋ </text:span><text:span text:style-name="T95">快（固定 Header）</text:span><text:span text:style-name="T9">＋ 自動（SLAAC）＋ 乾淨（無 Broadcast）。</text:span></text:p>
            <text:p text:style-name="P53"><text:span text:style-name="T142">過渡技術</text:span><text:span text:style-name="T141">：</text:span><text:span text:style-name="T9">雙語（</text:span><text:span text:style-name="T17">Dual Stack</text:span><text:span text:style-name="T9">）＋ 偽裝（</text:span><text:span text:style-name="T17">Tunneling</text:span><text:span text:style-name="T9">）＋ 翻譯（</text:span><text:span text:style-name="T17">Translation</text:span><text:span text:style-name="T9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3">IPv4 七大問題</text:p>
          </table:table-cell>
          <table:table-cell table:style-name="表格60.A2" office:value-type="string">
            <text:p text:style-name="P23">IPv6 七大改進</text:p>
          </table:table-cell>
        </table:table-row>
        <table:table-row table:style-name="表格60.1">
          <table:table-cell table:style-name="表格60.A3" office:value-type="string">
            <text:p text:style-name="P32">位址不足（32 bit）／需 NAT 破壞 E2E／無加密驗證／<text:span text:style-name="T91">Header 可變效率低</text:span>／缺 QoS／用 Broadcast 浪費／IP 需手動設定</text:p>
          </table:table-cell>
          <table:table-cell table:style-name="表格60.A3" office:value-type="string">
            <text:p text:style-name="P32">128 bit 近乎無限／不需 NAT 恢復 E2E／<text:span text:style-name="T106">支援 IPsec</text:span>／<text:span text:style-name="T106">固定 40 bytes 轉送快</text:span>／Flow Label 支援 QoS／改用 Multicast/Anycast／SLAAC 自動配置</text:p>
          </table:table-cell>
        </table:table-row>
      </table:table>
      <text:h text:style-name="P25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51"><text:span text:style-name="T4">🔑 <text:s/></text:span><text:span text:style-name="T23">最基礎的比喻，先懂這個</text:span></text:p>
            <text:p text:style-name="P40">IP 位址決定「最終送到哪台電腦」；MAC 位址決定「目前這一跳要交給哪個網路設備」。</text:p>
            <text:p text:style-name="P39"><text:span text:style-name="T149">資料在網路中「實際傳送」靠 MAC</text:span>，<text:span text:style-name="T78">但我們只知道對方的 IP</text:span>——所以<text:span text:style-name="T118">需要一個轉換機制</text:span>，這就是 ARP 的工作。</text:p>
          </table:table-cell>
        </table:table-row>
      </table:table>
      <text:h text:style-name="P9" text:outline-level="2">一、ARP（Address Resolution Protocol）：<text:span text:style-name="T50">IP → MAC</text:span></text:h>
      <text:p text:style-name="P41">一句話定義：<text:span text:style-name="T39">ARP</text:span> ＝ <text:span text:style-name="T57">用 IP 找 MAC</text:span>，<text:span text:style-name="T101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51"><text:span text:style-name="T4">📋 <text:s/></text:span><text:span text:style-name="T23">ARP 運作流程（考試必考）</text:span></text:p>
            <text:p text:style-name="P52"><text:span text:style-name="T24">① </text:span><text:span text:style-name="T25">查 ARP Cache（筆記本）</text:span><text:span text:style-name="T24">：</text:span><text:span text:style-name="T9">先查自己的記錄「</text:span><text:span text:style-name="T157">我之前有沒有問過這個 IP？</text:span><text:span text:style-name="T9">」有 → 直接用。</text:span></text:p>
            <text:p text:style-name="P53"><text:span text:style-name="T24">② </text:span><text:span text:style-name="T25">發出 ARP Request（廣播）</text:span><text:span text:style-name="T24">：</text:span><text:span text:style-name="T9">沒記錄 →</text:span><text:span text:style-name="T152"> 對整個區網廣播</text:span><text:span text:style-name="T9">「誰是 192.168.1.5？</text:span><text:span text:style-name="T152">請告訴我你的 MAC！</text:span><text:span text:style-name="T9">」所有機器都收到。</text:span></text:p>
            <text:p text:style-name="P53"><text:span text:style-name="T24">③ </text:span><text:span text:style-name="T25">收到 ARP Reply（單播回應）</text:span><text:span text:style-name="T24">：</text:span><text:span text:style-name="T130">IP 是 192.168.1.5 的機器回應「我是！MAC 是 AA:BB:CC」</text:span><text:span text:style-name="T9">，其餘機器靜默忽略。</text:span></text:p>
            <text:p text:style-name="P53"><text:span text:style-name="T24">④ </text:span><text:span text:style-name="T25">存進 ARP Cache</text:span><text:span text:style-name="T24">：</text:span><text:span text:style-name="T82">把「IP ↔ MAC」對應記下</text:span><text:span text:style-name="T9">，</text:span><text:span text:style-name="T112">下次直接用</text:span><text:span text:style-name="T9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4">項目</text:p>
          </table:table-cell>
          <table:table-cell table:style-name="表格62.A2" office:value-type="string">
            <text:p text:style-name="P24">內容</text:p>
          </table:table-cell>
        </table:table-row>
        <table:table-row table:style-name="表格62.1">
          <table:table-cell table:style-name="表格62.A3" office:value-type="string">
            <text:p text:style-name="P99">ARP Spoofing（ARP 欺騙）</text:p>
          </table:table-cell>
          <table:table-cell table:style-name="表格62.A3" office:value-type="string">
            <text:p text:style-name="P32"><text:span text:style-name="T78">攻擊者</text:span><text:span text:style-name="T150">假冒他人</text:span><text:span text:style-name="T78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35">arp -a</text:p>
          </table:table-cell>
          <table:table-cell table:style-name="表格62.A4" office:value-type="string">
            <text:p text:style-name="P32"><text:span text:style-name="T149">查看本機的 ARP 對應表</text:span>（<text:span text:style-name="T45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77">ping [IP]</text:p>
          </table:table-cell>
          <table:table-cell table:style-name="表格62.A3" office:value-type="string">
            <text:p text:style-name="P32"><text:span text:style-name="T57">觸發 ARP 運作</text:span>，<text:span text:style-name="T101">讓電腦主動查詢對應 MAC</text:span></text:p>
          </table:table-cell>
        </table:table-row>
      </table:table>
      <text:h text:style-name="P9" text:outline-level="2">二、NAT（Network Address Translation）：私網 → 公網</text:h>
      <text:p text:style-name="P41">一句話定義：<text:span text:style-name="T41">NAT</text:span> ＝ <text:span text:style-name="T158">路由器幫你把「私有 IP」改成「公網 IP」</text:span>，讓內部機器能夠上網。<text:span text:style-name="T132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51"><text:span text:style-name="T4">▸ <text:s/></text:span><text:span text:style-name="T23">NAT 運作流程</text:span></text:p>
            <text:p text:style-name="P40">① 你的電腦（192.168.1.2）發送資料給 Google → ② <text:span text:style-name="T118">封包抵達路由器</text:span>，<text:span text:style-name="T101">NAT 把來源 IP 改成公網 IP（220.x.x.x）</text:span><text:span text:style-name="T91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4">類型</text:p>
          </table:table-cell>
          <table:table-cell table:style-name="表格63.A2" office:value-type="string">
            <text:p text:style-name="P24">中文</text:p>
          </table:table-cell>
          <table:table-cell table:style-name="表格63.A2" office:value-type="string">
            <text:p text:style-name="P24">說明</text:p>
          </table:table-cell>
          <table:table-cell table:style-name="表格63.A2" office:value-type="string">
            <text:p text:style-name="P24">特點</text:p>
          </table:table-cell>
        </table:table-row>
        <table:table-row table:style-name="表格63.1">
          <table:table-cell table:style-name="表格63.A3" office:value-type="string">
            <text:p text:style-name="P36">Static NAT</text:p>
          </table:table-cell>
          <table:table-cell table:style-name="表格63.A3" office:value-type="string">
            <text:p text:style-name="P32">靜態 NAT</text:p>
          </table:table-cell>
          <table:table-cell table:style-name="表格63.A3" office:value-type="string">
            <text:p text:style-name="P94">一個私有 IP ↔ 一個公網 IP</text:p>
          </table:table-cell>
          <table:table-cell table:style-name="表格63.A3" office:value-type="string">
            <text:p text:style-name="P94">固定對應</text:p>
          </table:table-cell>
        </table:table-row>
        <table:table-row table:style-name="表格63.1">
          <table:table-cell table:style-name="表格63.A4" office:value-type="string">
            <text:p text:style-name="P36">Dynamic NAT</text:p>
          </table:table-cell>
          <table:table-cell table:style-name="表格63.A4" office:value-type="string">
            <text:p text:style-name="P32">動態 NAT</text:p>
          </table:table-cell>
          <table:table-cell table:style-name="表格63.A4" office:value-type="string">
            <text:p text:style-name="P101">多個私有 IP 對應 IP 池（pool）</text:p>
          </table:table-cell>
          <table:table-cell table:style-name="表格63.A4" office:value-type="string">
            <text:p text:style-name="P101">動態分配</text:p>
          </table:table-cell>
        </table:table-row>
        <table:table-row table:style-name="表格63.1">
          <table:table-cell table:style-name="表格63.A3" office:value-type="string">
            <text:p text:style-name="P99">PAT</text:p>
          </table:table-cell>
          <table:table-cell table:style-name="表格63.A3" office:value-type="string">
            <text:p text:style-name="P32">連接埠位址轉換</text:p>
          </table:table-cell>
          <table:table-cell table:style-name="表格63.A3" office:value-type="string">
            <text:p text:style-name="P102">多台共用一個公網 IP</text:p>
          </table:table-cell>
          <table:table-cell table:style-name="表格63.A3" office:value-type="string">
            <text:p text:style-name="P10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51"><text:span text:style-name="T4">⚠️ <text:s/></text:span><text:span text:style-name="T38">NAT 的缺點（考試超愛）</text:span></text:p>
            <text:p text:style-name="P52"><text:span text:style-name="T153">破壞 End-to-End 連線</text:span><text:span text:style-name="T35">（最重要）：</text:span><text:span text:style-name="T9">原本你↔對方是真正點對點；</text:span><text:span text:style-name="T17">有 NAT 後變成你→NAT→對方，多一層轉換，不再是端對端</text:span><text:span text:style-name="T9">。</text:span></text:p>
            <text:p text:style-name="P53"><text:span text:style-name="T153">P2P / VoIP 難以運作</text:span><text:span text:style-name="T35">：</text:span><text:span text:style-name="T112">外部機器找不到你（被藏在 NAT 後）</text:span><text:span text:style-name="T9">，P2P 下載、VoIP 通話等</text:span><text:span text:style-name="T170">直連功能受限</text:span><text:span text:style-name="T9">。</text:span></text:p>
            <text:p text:style-name="P53"><text:span text:style-name="T153">增加延遲</text:span><text:span text:style-name="T35">：</text:span><text:span text:style-name="T49">每個封包都需要</text:span><text:span text:style-name="T172">多一道 IP 轉換處理</text:span><text:span text:style-name="T9">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三、解決 NAT 限制的三種方法</text:h>
      <text:p text:style-name="P41"><text:span text:style-name="T41">核心問題</text:span>：<text:span text:style-name="T118">外面的人只看到一個公網 IP</text:span>，但<text:span text:style-name="T173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9">方法一：<text:span text:style-name="T59">Port Forwarding（手動指定轉發）</text:span></text:p>
            <text:p text:style-name="P39">比喻：<text:span text:style-name="T78">Port＝房間號碼</text:span>；<text:span text:style-name="T158">NAT 路由器＝大樓</text:span>；<text:span text:style-name="T78">Port Forwarding＝門口指示牌「80 號房 → 192.168.1.2」</text:span>。例：220.x.x.x:80 → 192.168.1.2:80（<text:span text:style-name="T155">網頁</text:span>）；220.x.x.x:25565 → 192.168.1.2:25565（Minecraft）。</text:p>
            <text:p text:style-name="P53"><text:span text:style-name="T16">優點：</text:span><text:span text:style-name="T9">設定直接、穩定，可精確控制。</text:span><text:span text:style-name="T16">缺點：</text:span><text:span text:style-name="T97">每個服務都要手動設定，IP 改變要重設</text:span><text:span text:style-name="T9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2">方法二：<text:span text:style-name="T59">UPnP（自動版 Port Forwarding）</text:span></text:p>
            <text:p text:style-name="P39"><text:span text:style-name="T107">讓裝置自動跟</text:span><text:span text:style-name="T127">路由器</text:span><text:span text:style-name="T107">要求「幫我開一個 Port」，不需人工設定。</text:span>① <text:span text:style-name="T159">應用程式發 UPnP 請求</text:span> → ② <text:span text:style-name="T128">路由器</text:span><text:span text:style-name="T159">自動新增 Port Forwarding 規則</text:span> → ③<text:span text:style-name="T106"> 服務結束後自動清除</text:span>（理想情況）。</text:p>
            <text:p text:style-name="P53"><text:span text:style-name="T16">優點：</text:span><text:span text:style-name="T9">全自動、對一般用戶友善。</text:span><text:span text:style-name="T165">安全風險（重要）：</text:span><text:span text:style-name="T97">惡意程式也能透過 UPnP 自動開 Port，可能讓攻擊者直接連入內網</text:span><text:span text:style-name="T9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1">方法三：<text:span text:style-name="T59">STUN（打洞技術）</text:span></text:p>
            <text:p text:style-name="P39"><text:span text:style-name="T41">使用情境</text:span>：<text:span text:style-name="T174">兩端都在各自 NAT 後面，彼此都是私有 IP、互相找不到。STUN 先幫每端「查清楚自己對外的公網 IP + Port」，再交換資訊</text:span>嘗試直接打通。</text:p>
            <text:p text:style-name="P39">① <text:span text:style-name="T176">問 STUN 伺服器「我對外的 IP 和 Port 是什麼？」</text:span>② <text:span text:style-name="T176">STUN 回「你對外是 220.x.x.x:12345」</text:span>③ <text:span text:style-name="T132">朋友也做同樣的事</text:span> → ④ <text:span text:style-name="T176">兩端透過第三方交換彼此公網位址</text:span> → ⑤ <text:span text:style-name="T176">同時互相發送封包打洞（Hole Punching）</text:span>。</text:p>
            <text:p text:style-name="P53"><text:span text:style-name="T165">重要限制：</text:span><text:span text:style-name="T97">STUN 只對部分 NAT 類型有效</text:span><text:span text:style-name="T9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4">方法</text:p>
          </table:table-cell>
          <table:table-cell table:style-name="表格64.A4" office:value-type="string">
            <text:p text:style-name="P24">設定方式</text:p>
          </table:table-cell>
          <table:table-cell table:style-name="表格64.A4" office:value-type="string">
            <text:p text:style-name="P24">典型場景</text:p>
          </table:table-cell>
          <table:table-cell table:style-name="表格64.A4" office:value-type="string">
            <text:p text:style-name="P24">主要限制</text:p>
          </table:table-cell>
        </table:table-row>
        <table:table-row table:style-name="表格64.1">
          <table:table-cell table:style-name="表格64.A5" office:value-type="string">
            <text:p text:style-name="P32">Port Forwarding</text:p>
          </table:table-cell>
          <table:table-cell table:style-name="表格64.A5" office:value-type="string">
            <text:p text:style-name="P36">手動設定路由器</text:p>
          </table:table-cell>
          <table:table-cell table:style-name="表格64.A5" office:value-type="string">
            <text:p text:style-name="P32">架設網頁／遊戲伺服器</text:p>
          </table:table-cell>
          <table:table-cell table:style-name="表格64.A5" office:value-type="string">
            <text:p text:style-name="P32">需要手動維護</text:p>
          </table:table-cell>
        </table:table-row>
        <table:table-row table:style-name="表格64.1">
          <table:table-cell table:style-name="表格64.A6" office:value-type="string">
            <text:p text:style-name="P32">UPnP</text:p>
          </table:table-cell>
          <table:table-cell table:style-name="表格64.A6" office:value-type="string">
            <text:p text:style-name="P36">應用程式自動設定</text:p>
          </table:table-cell>
          <table:table-cell table:style-name="表格64.A6" office:value-type="string">
            <text:p text:style-name="P32">一般遊戲、視訊軟體</text:p>
          </table:table-cell>
          <table:table-cell table:style-name="表格64.A6" office:value-type="string">
            <text:p text:style-name="P32">惡意程式可濫用</text:p>
          </table:table-cell>
        </table:table-row>
        <table:table-row table:style-name="表格64.1">
          <table:table-cell table:style-name="表格64.A5" office:value-type="string">
            <text:p text:style-name="P32">STUN</text:p>
          </table:table-cell>
          <table:table-cell table:style-name="表格64.A5" office:value-type="string">
            <text:p text:style-name="P36">無需路由器設定</text:p>
          </table:table-cell>
          <table:table-cell table:style-name="表格64.A5" office:value-type="string">
            <text:p text:style-name="P32">WebRTC、P2P 通話</text:p>
          </table:table-cell>
          <table:table-cell table:style-name="表格64.A5" office:value-type="string">
            <text:p text:style-name="P32">Symmetric NAT 會失敗</text:p>
          </table:table-cell>
        </table:table-row>
      </table:table>
      <text:h text:style-name="P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51"><text:span text:style-name="T4">🎯 <text:s/></text:span><text:span text:style-name="T140">最重要的核心觀念（先記住）</text:span></text:p>
            <text:p text:style-name="P52"><text:span text:style-name="T141">IP 位址＝</text:span><text:span text:style-name="T9">決定封包的最終目的地（整條路的終點），像信封上的收件地址。</text:span></text:p>
            <text:p text:style-name="P53"><text:span text:style-name="T141">MAC 位址＝</text:span><text:span text:style-name="T9">決定「下一站」要交給哪台機器，像快遞員每次只看下一站。</text:span></text:p>
            <text:p text:style-name="P53"><text:span text:style-name="T165">關鍵理解：</text:span><text:span text:style-name="T9">封包在傳送途中，IP 不變（始終是 Google 的 IP），但 MAC 每一跳都會更換。</text:span></text:p>
          </table:table-cell>
        </table:table-row>
      </table:table>
      <text:p text:style-name="P5"><text:span text:style-name="T41">場景</text:span>：<text:span text:style-name="T177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8">步驟</text:p>
            </table:table-cell>
            <table:table-cell table:style-name="表格66.A1" office:value-type="string">
              <text:p text:style-name="P28">動作</text:p>
            </table:table-cell>
            <table:table-cell table:style-name="表格66.A1" office:value-type="string">
              <text:p text:style-name="P28">使用技術</text:p>
            </table:table-cell>
            <table:table-cell table:style-name="表格66.A1" office:value-type="string">
              <text:p text:style-name="P2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4">① DNS</text:p>
          </table:table-cell>
          <table:table-cell table:style-name="表格66.A2" office:value-type="string">
            <text:p text:style-name="P44">google.com → 142.250.xxx.xxx(<text:span text:style-name="T44">Google 的 IP</text:span>)</text:p>
            <text:p text:style-name="P44">(電腦必須知道目的地在哪)</text:p>
          </table:table-cell>
          <table:table-cell table:style-name="表格66.A2" office:value-type="string">
            <text:p text:style-name="P44">DNS</text:p>
          </table:table-cell>
          <table:table-cell table:style-name="表格66.A2" office:value-type="string">
            <text:p text:style-name="P44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4">② ARP</text:p>
          </table:table-cell>
          <table:table-cell table:style-name="表格66.A3" office:value-type="string">
            <text:p text:style-name="P45">找路由器（192.168.1.1）的 MAC(<text:span text:style-name="T78">發現 Google </text:span><text:span text:style-name="T150">不在同一個區網</text:span><text:span text:style-name="T78">，必須交給路由器幫忙送</text:span>)(<text:span text:style-name="T158">查詢路由器的 MAC，下一站是路由器</text:span>)</text:p>
          </table:table-cell>
          <table:table-cell table:style-name="表格66.A3" office:value-type="string">
            <text:p text:style-name="P44">ARP</text:p>
          </table:table-cell>
          <table:table-cell table:style-name="表格66.A3" office:value-type="string">
            <text:p text:style-name="P44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4">③ <text:span text:style-name="T91">送封包</text:span></text:p>
          </table:table-cell>
          <table:table-cell table:style-name="表格66.A2" office:value-type="string">
            <text:p text:style-name="P44">IP=Google；MAC=路由器(<text:span text:style-name="T109">IP 記</text:span><text:soft-page-break/><text:span text:style-name="T109">錄最終目的地；MAC 記錄下一站</text:span>)</text:p>
          </table:table-cell>
          <table:table-cell table:style-name="表格66.A2" office:value-type="string">
            <text:p text:style-name="P44">L2 傳輸</text:p>
          </table:table-cell>
          <table:table-cell table:style-name="表格66.A2" office:value-type="string">
            <text:p text:style-name="P44">IP=終點；MAC=下一站</text:p>
          </table:table-cell>
        </table:table-row>
        <table:table-row table:style-name="表格66.1">
          <table:table-cell table:style-name="表格66.A3" office:value-type="string">
            <text:p text:style-name="P44">④ NAT 去程</text:p>
          </table:table-cell>
          <table:table-cell table:style-name="表格66.A3" office:value-type="string">
            <text:p text:style-name="P46"><text:span text:style-name="T89">192.168.1.2 → 220.x.x.x</text:span>(<text:span text:style-name="T161">路由器收到後往 Internet 送</text:span>；路由器負責跨網路傳遞)(<text:span text:style-name="T161">私有 IP 換成公網 IP，因Internet 不認私有 IP</text:span>)</text:p>
          </table:table-cell>
          <table:table-cell table:style-name="表格66.A3" office:value-type="string">
            <text:p text:style-name="P44">NAT</text:p>
          </table:table-cell>
          <table:table-cell table:style-name="表格66.A3" office:value-type="string">
            <text:p text:style-name="P44">換身份才能上 Internet</text:p>
          </table:table-cell>
        </table:table-row>
        <table:table-row table:style-name="表格66.1">
          <table:table-cell table:style-name="表格66.A2" office:value-type="string">
            <text:p text:style-name="P44">⑤ 傳到 Google</text:p>
          </table:table-cell>
          <table:table-cell table:style-name="表格66.A2" office:value-type="string">
            <text:p text:style-name="P44"><text:span text:style-name="T118">封包抵達目的地</text:span>(<text:span text:style-name="T174">Google 看到公網 IP</text:span>)</text:p>
          </table:table-cell>
          <table:table-cell table:style-name="表格66.A2" office:value-type="string">
            <text:p text:style-name="P44">Internet</text:p>
          </table:table-cell>
          <table:table-cell table:style-name="表格66.A2" office:value-type="string">
            <text:p text:style-name="P44">Google 只看到公網 IP</text:p>
          </table:table-cell>
        </table:table-row>
        <table:table-row table:style-name="表格66.1">
          <table:table-cell table:style-name="表格66.A3" office:value-type="string">
            <text:p text:style-name="P44">⑥ Google 回應</text:p>
          </table:table-cell>
          <table:table-cell table:style-name="表格66.A3" office:value-type="string">
            <text:p text:style-name="P44"><text:span text:style-name="T92">回傳給 220.x.x.x</text:span>(<text:span text:style-name="T176">回到路由器再回到你電腦</text:span>)</text:p>
          </table:table-cell>
          <table:table-cell table:style-name="表格66.A3" office:value-type="string">
            <text:p text:style-name="P44">Internet</text:p>
          </table:table-cell>
          <table:table-cell table:style-name="表格66.A3" office:value-type="string">
            <text:p text:style-name="P44">路由器收到回應</text:p>
          </table:table-cell>
        </table:table-row>
        <table:table-row table:style-name="表格66.1">
          <table:table-cell table:style-name="表格66.A2" office:value-type="string">
            <text:p text:style-name="P44">⑦ NAT 回程</text:p>
          </table:table-cell>
          <table:table-cell table:style-name="表格66.A2" office:value-type="string">
            <text:p text:style-name="P44"><text:span text:style-name="T89">220.x.x.x → 192.168.1.2</text:span>(<text:span text:style-name="T78">NAT 依記錄轉回正確主機</text:span>)</text:p>
          </table:table-cell>
          <table:table-cell table:style-name="表格66.A2" office:value-type="string">
            <text:p text:style-name="P44">NAT</text:p>
          </table:table-cell>
          <table:table-cell table:style-name="表格66.A2" office:value-type="string">
            <text:p text:style-name="P44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4">⑧ 收到網頁</text:p>
          </table:table-cell>
          <table:table-cell table:style-name="表格66.A3" office:value-type="string">
            <text:p text:style-name="P44">瀏覽器顯示頁面</text:p>
          </table:table-cell>
          <table:table-cell table:style-name="表格66.A3" office:value-type="string">
            <text:p text:style-name="P44">—</text:p>
          </table:table-cell>
          <table:table-cell table:style-name="表格66.A3" office:value-type="string">
            <text:p text:style-name="P44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51"><text:span text:style-name="T4">💣 <text:s/></text:span><text:span text:style-name="T38">三個最容易搞錯的地方（考試地雷）</text:span></text:p>
            <text:p text:style-name="P52"><text:span text:style-name="T166">✗ 以為 ARP 是找 Google 的 MAC</text:span><text:span text:style-name="T165">　→　</text:span><text:span text:style-name="T171">✓ ARP 找的是「路由器」的 MAC！</text:span><text:span text:style-name="T9">因為 ARP 只能在同一個 LAN 內使用。</text:span></text:p>
            <text:p text:style-name="P53"><text:span text:style-name="T166">✗ 以為封包直接送到 Google</text:span><text:span text:style-name="T165">　→　</text:span><text:span text:style-name="T171">✓ 封包先送給路由器，路由器再轉到 Internet</text:span><text:span text:style-name="T9">。</text:span></text:p>
            <text:p text:style-name="P53"><text:span text:style-name="T166">✗ 以為 IP 在傳輸過程中一直不變</text:span><text:span text:style-name="T165">　→　</text:span><text:span text:style-name="T171">✓ NAT 會在去程改掉來源 IP，回程再改回去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51"><text:span text:style-name="T4">📝 <text:s/></text:span><text:span text:style-name="T167">考試標準答案（直接背）</text:span></text:p>
            <text:p text:style-name="P40"><text:span text:style-name="T39">使用者輸入網址後</text:span>，<text:span text:style-name="T66">先透過 DNS 將網域名稱解析為 IP</text:span>；<text:span text:style-name="T106">接著主機利用 ARP 取得路由器（預設閘道）的 MAC</text:span>，<text:span text:style-name="T106">將封包傳送至路由器</text:span>；<text:span text:style-name="T137">路由器透過 NAT 將私有 IP 轉換為公網 IP 後送往 Internet</text:span>；<text:span text:style-name="T132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103"/>
            </table:table-cell>
            <table:table-cell table:style-name="表格67.A1" office:value-type="string">
              <text:p text:style-name="P24">ARP</text:p>
            </table:table-cell>
            <table:table-cell table:style-name="表格67.A1" office:value-type="string">
              <text:p text:style-name="P24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32">目的</text:p>
          </table:table-cell>
          <table:table-cell table:style-name="表格67.A2" office:value-type="string">
            <text:p text:style-name="P89">用 IP 找 MAC</text:p>
          </table:table-cell>
          <table:table-cell table:style-name="表格67.A2" office:value-type="string">
            <text:p text:style-name="P104">私有 IP 轉成公網 IP</text:p>
          </table:table-cell>
        </table:table-row>
        <table:table-row table:style-name="表格67.1">
          <table:table-cell table:style-name="表格67.A3" office:value-type="string">
            <text:p text:style-name="P32">使用範圍</text:p>
          </table:table-cell>
          <table:table-cell table:style-name="表格67.A3" office:value-type="string">
            <text:p text:style-name="P35">區域網路（LAN）內</text:p>
          </table:table-cell>
          <table:table-cell table:style-name="表格67.A3" office:value-type="string">
            <text:p text:style-name="P36">內網與 Internet 之間</text:p>
          </table:table-cell>
        </table:table-row>
        <table:table-row table:style-name="表格67.1">
          <table:table-cell table:style-name="表格67.A2" office:value-type="string">
            <text:p text:style-name="P32">運作層級</text:p>
          </table:table-cell>
          <table:table-cell table:style-name="表格67.A2" office:value-type="string">
            <text:p text:style-name="P96">L2 / L3 交界</text:p>
          </table:table-cell>
          <table:table-cell table:style-name="表格67.A2" office:value-type="string">
            <text:p text:style-name="P97">L3（網路層）</text:p>
          </table:table-cell>
        </table:table-row>
        <table:table-row table:style-name="表格67.1">
          <table:table-cell table:style-name="表格67.A3" office:value-type="string">
            <text:p text:style-name="P32">誰執行</text:p>
          </table:table-cell>
          <table:table-cell table:style-name="表格67.A3" office:value-type="string">
            <text:p text:style-name="P32">端點裝置（電腦）</text:p>
          </table:table-cell>
          <table:table-cell table:style-name="表格67.A3" office:value-type="string">
            <text:p text:style-name="P32">路由器</text:p>
          </table:table-cell>
        </table:table-row>
        <table:table-row table:style-name="表格67.1">
          <table:table-cell table:style-name="表格67.A2" office:value-type="string">
            <text:p text:style-name="P32">主要用途</text:p>
          </table:table-cell>
          <table:table-cell table:style-name="表格67.A2" office:value-type="string">
            <text:p text:style-name="P32">在區網內傳送封包</text:p>
          </table:table-cell>
          <table:table-cell table:style-name="表格67.A2" office:value-type="string">
            <text:p text:style-name="P32">讓內部主機能夠上網</text:p>
          </table:table-cell>
        </table:table-row>
      </table:table>
      <text:h text:style-name="P25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51"><text:span text:style-name="T4">🚦 <text:s/></text:span><text:span text:style-name="T23">本篇重點</text:span></text:p>
            <text:p text:style-name="P40">網路的本質是把資料從 A 電腦送到 B 電腦，但中間有四個麻煩，TCP 各自有對策。</text:p>
          </table:table-cell>
        </table:table-row>
      </table:table>
      <text:h text:style-name="P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4">問題</text:p>
            </table:table-cell>
            <table:table-cell table:style-name="表格69.A1" office:value-type="string">
              <text:p text:style-name="P24">說明</text:p>
            </table:table-cell>
            <table:table-cell table:style-name="表格69.A1" office:value-type="string">
              <text:p text:style-name="P24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106">資料可能丟失</text:p>
          </table:table-cell>
          <table:table-cell table:style-name="表格69.A2" office:value-type="string">
            <text:p text:style-name="P32">封包在網路中消失</text:p>
          </table:table-cell>
          <table:table-cell table:style-name="表格69.A2" office:value-type="string">
            <text:p text:style-name="P32"><text:span text:style-name="T40">重傳</text:span>機制（Retransmission）</text:p>
          </table:table-cell>
        </table:table-row>
        <table:table-row table:style-name="表格69.1">
          <table:table-cell table:style-name="表格69.A3" office:value-type="string">
            <text:p text:style-name="P106">順序可能亂掉</text:p>
          </table:table-cell>
          <table:table-cell table:style-name="表格69.A3" office:value-type="string">
            <text:p text:style-name="P32">封包走不同路徑先後到達</text:p>
          </table:table-cell>
          <table:table-cell table:style-name="表格69.A3" office:value-type="string">
            <text:p text:style-name="P32"><text:span text:style-name="T40">序號</text:span>機制（Sequence Number）</text:p>
          </table:table-cell>
        </table:table-row>
        <table:table-row table:style-name="表格69.1">
          <table:table-cell table:style-name="表格69.A2" office:value-type="string">
            <text:p text:style-name="P106">對方來不及收</text:p>
          </table:table-cell>
          <table:table-cell table:style-name="表格69.A2" office:value-type="string">
            <text:p text:style-name="P32">接收端 buffer 可能爆掉</text:p>
          </table:table-cell>
          <table:table-cell table:style-name="表格69.A2" office:value-type="string">
            <text:p text:style-name="P32"><text:span text:style-name="T40">流量</text:span>控制（Flow Control / rwnd）</text:p>
          </table:table-cell>
        </table:table-row>
        <table:table-row table:style-name="表格69.1">
          <table:table-cell table:style-name="表格69.A3" office:value-type="string">
            <text:p text:style-name="P106">網路可能塞車</text:p>
          </table:table-cell>
          <table:table-cell table:style-name="表格69.A3" office:value-type="string">
            <text:p text:style-name="P32">路由器排隊太長</text:p>
          </table:table-cell>
          <table:table-cell table:style-name="表格69.A3" office:value-type="string">
            <text:p text:style-name="P32"><text:span text:style-name="T40">擁塞</text:span>控制（Congestion Control / cwnd）</text:p>
          </table:table-cell>
        </table:table-row>
      </table:table>
      <text:h text:style-name="P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4">特性</text:p>
            </table:table-cell>
            <table:table-cell table:style-name="表格70.A1" office:value-type="string">
              <text:p text:style-name="P24">TCP（可靠模式）</text:p>
            </table:table-cell>
            <table:table-cell table:style-name="表格70.A1" office:value-type="string">
              <text:p text:style-name="P24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32">連線方式</text:p>
          </table:table-cell>
          <table:table-cell table:style-name="表格70.A2" office:value-type="string">
            <text:p text:style-name="P108">需要先建立連線</text:p>
          </table:table-cell>
          <table:table-cell table:style-name="表格70.A2" office:value-type="string">
            <text:p text:style-name="P109">無連線，直接送</text:p>
          </table:table-cell>
        </table:table-row>
        <table:table-row table:style-name="表格70.1">
          <table:table-cell table:style-name="表格70.A3" office:value-type="string">
            <text:p text:style-name="P32">可靠性</text:p>
          </table:table-cell>
          <table:table-cell table:style-name="表格70.A3" office:value-type="string">
            <text:p text:style-name="P32">保證送達（會重傳）</text:p>
          </table:table-cell>
          <table:table-cell table:style-name="表格70.A3" office:value-type="string">
            <text:p text:style-name="P32">不保證送達</text:p>
          </table:table-cell>
        </table:table-row>
        <table:table-row table:style-name="表格70.1">
          <table:table-cell table:style-name="表格70.A2" office:value-type="string">
            <text:p text:style-name="P32">順序</text:p>
          </table:table-cell>
          <table:table-cell table:style-name="表格70.A2" office:value-type="string">
            <text:p text:style-name="P32">保證順序正確</text:p>
          </table:table-cell>
          <table:table-cell table:style-name="表格70.A2" office:value-type="string">
            <text:p text:style-name="P32">不保證順序</text:p>
          </table:table-cell>
        </table:table-row>
        <table:table-row table:style-name="表格70.1">
          <table:table-cell table:style-name="表格70.A3" office:value-type="string">
            <text:p text:style-name="P32">速度</text:p>
          </table:table-cell>
          <table:table-cell table:style-name="表格70.A3" office:value-type="string">
            <text:p text:style-name="P32">較慢（有控制機制）</text:p>
          </table:table-cell>
          <table:table-cell table:style-name="表格70.A3" office:value-type="string">
            <text:p text:style-name="P32">較快（無額外開銷）</text:p>
          </table:table-cell>
        </table:table-row>
        <table:table-row table:style-name="表格70.1">
          <table:table-cell table:style-name="表格70.A2" office:value-type="string">
            <text:p text:style-name="P32">適合場景</text:p>
          </table:table-cell>
          <table:table-cell table:style-name="表格70.A2" office:value-type="string">
            <text:p text:style-name="P107">網頁、檔案傳輸、Email</text:p>
          </table:table-cell>
          <table:table-cell table:style-name="表格70.A2" office:value-type="string">
            <text:p text:style-name="P32"><text:span text:style-name="T40">直播、遊戲</text:span>、DNS 查詢</text:p>
          </table:table-cell>
        </table:table-row>
        <table:table-row table:style-name="表格70.1">
          <table:table-cell table:style-name="表格70.A3" office:value-type="string">
            <text:p text:style-name="P32">比喻</text:p>
          </table:table-cell>
          <table:table-cell table:style-name="表格70.A3" office:value-type="string">
            <text:p text:style-name="P106">專業物流（簽收確認）</text:p>
          </table:table-cell>
          <table:table-cell table:style-name="表格70.A3" office:value-type="string">
            <text:p text:style-name="P106">亂丟紙飛機</text:p>
          </table:table-cell>
        </table:table-row>
      </table:table>
      <text:h text:style-name="P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51"><text:span text:style-name="T4">🤝 <text:s/></text:span><text:span text:style-name="T23">握手流程</text:span></text:p>
            <text:p text:style-name="P52"><text:span text:style-name="T24">① Client → Server：</text:span><text:span text:style-name="T26">SYN</text:span><text:span text:style-name="T24">　</text:span><text:span text:style-name="T9">「我可以傳資料給你嗎？我準備好了。」（Synchronize 同步請求）</text:span></text:p>
            <text:p text:style-name="P53"><text:span text:style-name="T24">② Server → Client：</text:span><text:span text:style-name="T26">SYN + ACK</text:span><text:span text:style-name="T24">　</text:span><text:span text:style-name="T9">「可以！我收到你的請求了，我也準備好了。」（確認＋同步）</text:span></text:p>
            <text:p text:style-name="P53"><text:span text:style-name="T24">③ Client → Server：</text:span><text:span text:style-name="T26">ACK</text:span><text:span text:style-name="T24">　</text:span><text:span text:style-name="T9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51"><text:span text:style-name="T4">🎯 <text:s/></text:span><text:span text:style-name="T140">三次握手真正目的（考試必考）</text:span></text:p>
            <text:p text:style-name="P40">確認雙向都能傳資料（Client → Server 和 Server → Client 各自驗證）。</text:p>
            <text:p text:style-name="P39"><text:span text:style-name="T182">避免「</text:span><text:span text:style-name="T138">舊封包誤觸發新連線</text:span><text:span text:style-name="T182">」</text:span>：若少一次確認，<text:span text:style-name="T108">延遲的舊 SYN 封包可能讓 Server 誤以為要建立新連線</text:span>。</text:p>
          </table:table-cell>
        </table:table-row>
      </table:table>
      <text:h text:style-name="P9" text:outline-level="2">四、攻擊：SYN Flood</text:h>
      <text:p text:style-name="P41">攻擊原理：攻擊者大量發送 SYN 封包，但<text:span text:style-name="T120">故意不完成第三次握手（</text:span><text:span text:style-name="T102">不回 ACK</text:span><text:span text:style-name="T120">）</text:span>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3">步驟</text:p>
            </table:table-cell>
            <table:table-cell table:style-name="表格72.A1" office:value-type="string">
              <text:p text:style-name="P23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32">1</text:p>
          </table:table-cell>
          <table:table-cell table:style-name="表格72.A2" office:value-type="string">
            <text:p text:style-name="P32">攻擊者<text:span text:style-name="T42">送出大量 SYN</text:span>，每個都<text:span text:style-name="T40">假冒不同來源 IP</text:span>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32">2</text:p>
          </table:table-cell>
          <table:table-cell table:style-name="表格72.A3" office:value-type="string">
            <text:p text:style-name="P32"><text:span text:style-name="T162">Server 建立「半連線（Half-open Connection）」</text:span>，<text:span text:style-name="T90">每個都佔記憶體等待 ACK</text:span></text:p>
          </table:table-cell>
        </table:table-row>
        <table:table-row table:style-name="表格72.1">
          <table:table-cell table:style-name="表格72.A2" office:value-type="string">
            <text:p text:style-name="P32">3</text:p>
          </table:table-cell>
          <table:table-cell table:style-name="表格72.A2" office:value-type="string">
            <text:p text:style-name="P32"><text:span text:style-name="T175">攻擊者永遠不回 ACK</text:span>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32">4</text:p>
          </table:table-cell>
          <table:table-cell table:style-name="表格72.A3" office:value-type="string">
            <text:p text:style-name="P32"><text:span text:style-name="T42">正常用戶連線失敗</text:span>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51"><text:span text:style-name="T4">⚠️ <text:s/></text:span><text:span text:style-name="T38">本質</text:span></text:p>
            <text:p text:style-name="P40">這是一種 <text:span text:style-name="T40">DoS（拒絕服務）攻擊</text:span>，利用 TCP 三次握手機制的不對稱性。</text:p>
          </table:table-cell>
          <table:covered-table-cell/>
        </table:table-row>
      </table:table>
      <text:h text:style-name="P9" text:outline-level="2">五、傳送速度的兩個限制：<text:span text:style-name="T100">rwnd</text:span> 與 <text:span text:style-name="T100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3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3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32">接收端的限制。<text:span text:style-name="T160">對方 buffer（暫存區）還剩多少空間</text:span>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32">網路的限制。發送端根據網路狀況自行估計，<text:span text:style-name="T79">目前網路最多能承受多少資料量</text:span>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52"><text:span text:style-name="T144">實際傳送量 ＝ min(rwnd, cwnd)</text:span><text:span text:style-name="T141">　</text:span><text:span text:style-name="T18">取兩者最小值</text:span><text:span text:style-name="T9">。</text:span><text:span text:style-name="T22">對方吃不下就看 rwnd；網路塞就看 cwnd</text:span><text:span text:style-name="T9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3">情境</text:p>
          </table:table-cell>
          <table:table-cell table:style-name="表格73.A1" office:value-type="string">
            <text:p text:style-name="P23">cwnd</text:p>
          </table:table-cell>
          <table:table-cell table:style-name="表格73.A1" table:number-columns-spanned="2" office:value-type="string">
            <text:p text:style-name="P23">rwnd</text:p>
          </table:table-cell>
          <table:covered-table-cell/>
          <table:table-cell table:style-name="表格73.A1" office:value-type="string">
            <text:p text:style-name="P23">實際傳送量</text:p>
          </table:table-cell>
          <table:table-cell table:style-name="表格73.A1" office:value-type="string">
            <text:p text:style-name="P23">瓶頸原因</text:p>
          </table:table-cell>
        </table:table-row>
        <table:table-row table:style-name="表格73.1">
          <table:table-cell table:style-name="表格73.A2" office:value-type="string">
            <text:p text:style-name="P32">對方 buffer 快滿了</text:p>
          </table:table-cell>
          <table:table-cell table:style-name="表格73.A2" office:value-type="string">
            <text:p text:style-name="P32">10</text:p>
          </table:table-cell>
          <table:table-cell table:style-name="表格73.A2" table:number-columns-spanned="2" office:value-type="string">
            <text:p text:style-name="P32">3</text:p>
          </table:table-cell>
          <table:covered-table-cell/>
          <table:table-cell table:style-name="表格73.A2" office:value-type="string">
            <text:p text:style-name="P32">3</text:p>
          </table:table-cell>
          <table:table-cell table:style-name="表格73.A2" office:value-type="string">
            <text:p text:style-name="P32">接收端限制（rwnd）</text:p>
          </table:table-cell>
        </table:table-row>
        <table:table-row table:style-name="表格73.1">
          <table:table-cell table:style-name="表格73.A6" office:value-type="string">
            <text:p text:style-name="P32">網路很塞</text:p>
          </table:table-cell>
          <table:table-cell table:style-name="表格73.A6" office:value-type="string">
            <text:p text:style-name="P32">2</text:p>
          </table:table-cell>
          <table:table-cell table:style-name="表格73.A6" table:number-columns-spanned="2" office:value-type="string">
            <text:p text:style-name="P32">10</text:p>
          </table:table-cell>
          <table:covered-table-cell/>
          <table:table-cell table:style-name="表格73.A6" office:value-type="string">
            <text:p text:style-name="P32">2</text:p>
          </table:table-cell>
          <table:table-cell table:style-name="表格73.A6" office:value-type="string">
            <text:p text:style-name="P32">網路限制（cwnd）</text:p>
          </table:table-cell>
        </table:table-row>
        <table:table-row table:style-name="表格73.1">
          <table:table-cell table:style-name="表格73.A2" office:value-type="string">
            <text:p text:style-name="P32">兩者相近</text:p>
          </table:table-cell>
          <table:table-cell table:style-name="表格73.A2" office:value-type="string">
            <text:p text:style-name="P32">5</text:p>
          </table:table-cell>
          <table:table-cell table:style-name="表格73.A2" table:number-columns-spanned="2" office:value-type="string">
            <text:p text:style-name="P32">6</text:p>
          </table:table-cell>
          <table:covered-table-cell/>
          <table:table-cell table:style-name="表格73.A2" office:value-type="string">
            <text:p text:style-name="P32">5</text:p>
          </table:table-cell>
          <table:table-cell table:style-name="表格73.A2" office:value-type="string">
            <text:p text:style-name="P32">網路限制（cwnd）</text:p>
          </table:table-cell>
        </table:table-row>
      </table:table>
      <text:h text:style-name="P9" text:outline-level="2">六、滑動視窗（Sliding Window）</text:h>
      <text:p text:style-name="P41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52"><text:span text:style-name="T165">✗ 常見錯誤：</text:span><text:span text:style-name="T9">視窗 = cwnd（擁塞視窗）。</text:span><text:span text:style-name="T168">✓ 正確：</text:span><text:span text:style-name="T9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4">時間點</text:p>
          </table:table-cell>
          <table:table-cell table:style-name="表格74.A2" office:value-type="string">
            <text:p text:style-name="P24">已確認</text:p>
          </table:table-cell>
          <table:table-cell table:style-name="表格74.A2" office:value-type="string">
            <text:p text:style-name="P24">視窗範圍（可送）</text:p>
          </table:table-cell>
          <table:table-cell table:style-name="表格74.A2" office:value-type="string">
            <text:p text:style-name="P24">等待中</text:p>
          </table:table-cell>
        </table:table-row>
        <table:table-row table:style-name="表格74.1">
          <table:table-cell table:style-name="表格74.A3" office:value-type="string">
            <text:p text:style-name="P32">初始狀態</text:p>
          </table:table-cell>
          <table:table-cell table:style-name="表格74.A3" office:value-type="string">
            <text:p text:style-name="P32">無</text:p>
          </table:table-cell>
          <table:table-cell table:style-name="表格74.A3" office:value-type="string">
            <text:p text:style-name="P32">封包 1, 2, 3</text:p>
          </table:table-cell>
          <table:table-cell table:style-name="表格74.A3" office:value-type="string">
            <text:p text:style-name="P32">4, 5, 6 …</text:p>
          </table:table-cell>
        </table:table-row>
        <table:table-row table:style-name="表格74.1">
          <table:table-cell table:style-name="表格74.A4" office:value-type="string">
            <text:p text:style-name="P32">收到 ACK 1</text:p>
          </table:table-cell>
          <table:table-cell table:style-name="表格74.A4" office:value-type="string">
            <text:p text:style-name="P32">封包 1</text:p>
          </table:table-cell>
          <table:table-cell table:style-name="表格74.A4" office:value-type="string">
            <text:p text:style-name="P32">封包 2, 3, 4</text:p>
          </table:table-cell>
          <table:table-cell table:style-name="表格74.A4" office:value-type="string">
            <text:p text:style-name="P3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32">收到 ACK 2</text:p>
          </table:table-cell>
          <table:table-cell table:style-name="表格74.A3" office:value-type="string">
            <text:p text:style-name="P32">封包 1, 2</text:p>
          </table:table-cell>
          <table:table-cell table:style-name="表格74.A3" office:value-type="string">
            <text:p text:style-name="P32">封包 3, 4, 5</text:p>
          </table:table-cell>
          <table:table-cell table:style-name="表格74.A3" office:value-type="string">
            <text:p text:style-name="P32">6, 7 …（繼續往右滑）</text:p>
          </table:table-cell>
        </table:table-row>
      </table:table>
      <text:p text:style-name="P5">關鍵理解：視窗大小決定效率（越大越快），ACK 的回傳決定視窗位置（往前滑），兩者合作讓傳輸保持流暢。</text:p>
      <text:h text:style-name="P9" text:outline-level="2">七、擁塞控制：怎麼調整速度</text:h>
      <text:h text:style-name="P58" text:outline-level="3"><text:span text:style-name="T28">▍</text:span><text:span text:style-name="T29"> 階段一：Slow Start（慢啟動）— 指數成長</text:span></text:h>
      <text:p text:style-name="P41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3">輪次（RTT）</text:p>
            </table:table-cell>
            <table:table-cell table:style-name="表格75.A1" office:value-type="string">
              <text:p text:style-name="P23">cwnd</text:p>
            </table:table-cell>
            <table:table-cell table:style-name="表格75.A1" office:value-type="string">
              <text:p text:style-name="P23">送出封包數</text:p>
            </table:table-cell>
            <table:table-cell table:style-name="表格75.A1" office:value-type="string">
              <text:p text:style-name="P23">收回 ACK 數</text:p>
            </table:table-cell>
            <table:table-cell table:style-name="表格75.A1" office:value-type="string">
              <text:p text:style-name="P23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32">第 1 輪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32">第 2 輪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4</text:p>
          </table:table-cell>
        </table:table-row>
        <table:table-row table:style-name="表格75.1">
          <table:table-cell table:style-name="表格75.A2" office:value-type="string">
            <text:p text:style-name="P32">第 3 輪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8</text:p>
          </table:table-cell>
        </table:table-row>
        <table:table-row table:style-name="表格75.1">
          <table:table-cell table:style-name="表格75.A3" office:value-type="string">
            <text:p text:style-name="P32">第 4 輪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16</text:p>
          </table:table-cell>
        </table:table-row>
      </table:table>
      <text:h text:style-name="P58" text:outline-level="3"><text:span text:style-name="T28">▍</text:span><text:span text:style-name="T29"> 階段二：Congestion Avoidance（擁塞避免）— 線性成長</text:span></text:h>
      <text:p text:style-name="P41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103"/>
            </table:table-cell>
            <table:table-cell table:style-name="表格76.A1" office:value-type="string">
              <text:p text:style-name="P24">Slow Start</text:p>
            </table:table-cell>
            <table:table-cell table:style-name="表格76.A1" office:value-type="string">
              <text:p text:style-name="P24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32">觸發條件</text:p>
          </table:table-cell>
          <table:table-cell table:style-name="表格76.A2" office:value-type="string">
            <text:p text:style-name="P32">cwnd &lt; ssthresh</text:p>
          </table:table-cell>
          <table:table-cell table:style-name="表格76.A2" office:value-type="string">
            <text:p text:style-name="P32">cwnd ≥ ssthresh</text:p>
          </table:table-cell>
        </table:table-row>
        <table:table-row table:style-name="表格76.1">
          <table:table-cell table:style-name="表格76.A3" office:value-type="string">
            <text:p text:style-name="P32">成長方式</text:p>
          </table:table-cell>
          <table:table-cell table:style-name="表格76.A3" office:value-type="string">
            <text:p text:style-name="P32">指數成長（每個 ACK +1）</text:p>
          </table:table-cell>
          <table:table-cell table:style-name="表格76.A3" office:value-type="string">
            <text:p text:style-name="P32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32">特性</text:p>
          </table:table-cell>
          <table:table-cell table:style-name="表格76.A2" office:value-type="string">
            <text:p text:style-name="P32">快速試探網路上限</text:p>
          </table:table-cell>
          <table:table-cell table:style-name="表格76.A2" office:value-type="string">
            <text:p text:style-name="P32">保守維持穩定傳輸</text:p>
          </table:table-cell>
        </table:table-row>
      </table:table>
      <text:h text:style-name="P58" text:outline-level="3"><text:span text:style-name="T28">▍</text:span><text:span text:style-name="T2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8">丟包偵測方式</text:p>
            </table:table-cell>
            <table:table-cell table:style-name="表格77.A1" office:value-type="string">
              <text:p text:style-name="P28">說明</text:p>
            </table:table-cell>
            <table:table-cell table:style-name="表格77.A1" office:value-type="string">
              <text:p text:style-name="P28">ssthresh</text:p>
            </table:table-cell>
            <table:table-cell table:style-name="表格77.A1" office:value-type="string">
              <text:p text:style-name="P28">cwnd</text:p>
            </table:table-cell>
            <table:table-cell table:style-name="表格77.A1" office:value-type="string">
              <text:p text:style-name="P2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4">Timeout（逾時）</text:p>
          </table:table-cell>
          <table:table-cell table:style-name="表格77.A2" office:value-type="string">
            <text:p text:style-name="P44">等太久沒 ACK，網路嚴重擁塞</text:p>
          </table:table-cell>
          <table:table-cell table:style-name="表格77.A2" office:value-type="string">
            <text:p text:style-name="P44">= cwnd / 2</text:p>
          </table:table-cell>
          <table:table-cell table:style-name="表格77.A2" office:value-type="string">
            <text:p text:style-name="P64">重設為 1</text:p>
          </table:table-cell>
          <table:table-cell table:style-name="表格77.A2" office:value-type="string">
            <text:p text:style-name="P44">重新進入 Slow Start</text:p>
          </table:table-cell>
        </table:table-row>
        <table:table-row table:style-name="表格77.1">
          <table:table-cell table:style-name="表格77.A3" office:value-type="string">
            <text:p text:style-name="P44">3 個重複 ACK (Fast Retransmit)</text:p>
          </table:table-cell>
          <table:table-cell table:style-name="表格77.A3" office:value-type="string">
            <text:p text:style-name="P44">連續收 3 個同樣 ACK，單一封包丟失</text:p>
          </table:table-cell>
          <table:table-cell table:style-name="表格77.A3" office:value-type="string">
            <text:p text:style-name="P44">= cwnd / 2</text:p>
          </table:table-cell>
          <table:table-cell table:style-name="表格77.A3" office:value-type="string">
            <text:p text:style-name="P11">= ssthresh（直接減半）</text:p>
          </table:table-cell>
          <table:table-cell table:style-name="表格77.A3" office:value-type="string">
            <text:p text:style-name="P44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51"><text:span text:style-name="T4">⚠️ <text:s/></text:span><text:span text:style-name="T38">重要區別</text:span></text:p>
            <text:p text:style-name="P40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58" text:outline-level="3"><text:span text:style-name="T28">▍</text:span><text:span text:style-name="T2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3">AI：加法增長 Additive Increase</text:p>
            </table:table-cell>
            <table:table-cell table:style-name="表格78.A1" office:value-type="string">
              <text:p text:style-name="P23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32">沒丟包 → 網路 OK → CA 階段線性增加（每 RTT +1），慢慢加速。</text:p>
          </table:table-cell>
          <table:table-cell table:style-name="表格78.A2" office:value-type="string">
            <text:p text:style-name="P32">偵測到丟包 → 網路塞了 → cwnd ×0.5（減半），快速降速避免繼續惡化。</text:p>
          </table:table-cell>
        </table:table-row>
      </table:table>
      <text:p text:style-name="P5">AIMD 本質：用 ACK 當回饋，不斷探測網路的「最高速度」——慢慢加速找上限，遇到問題快速減速再重新找，這個循環就是 TCP 傳輸的節奏。</text:p>
      <text:h text:style-name="P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1"><text:span text:style-name="T4">🔄 <text:s/></text:span><text:span text:style-name="T23">完整流程</text:span></text:p>
            <text:p text:style-name="P40">① 建立連線：三次握手（SYN → SYN+ACK → ACK）確認雙向通訊正常。</text:p>
            <text:p text:style-name="P39">② 開始傳資料 Slow Start：cwnd 從 1 開始，每個 ACK +1，指數成長快速試探上限。</text:p>
            <text:p text:style-name="P39">③ 達到門檻切換 CA：cwnd 到 ssthresh 後改每 RTT +1，線性保守維持穩定。（RTT＝來回時間：送出一個封包到收到 ACK 所花的時間）</text:p>
            <text:p text:style-name="P39">④ 每輪都考慮兩個限制：實際傳送量 = min(rwnd, cwnd)。</text:p>
            <text:p text:style-name="P39">⑤ 視窗持續滑動：每收到一個 ACK 視窗往前移，保持 pipeline 流暢。</text:p>
            <text:p text:style-name="P39">⑥ 偵測到丟包快速反應：Timeout → cwnd=1 重回 Slow Start；3 重複 ACK → cwnd 減半續 CA。</text:p>
            <text:p text:style-name="P39">⑦ 持續循環調整：送 → 收 ACK → 調整 cwnd → 再送，用 ACK 當回饋不斷自我調節。</text:p>
          </table:table-cell>
        </table:table-row>
      </table:table>
      <text:h text:style-name="P9" text:outline-level="2"><text:soft-page-break/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4">步驟</text:p>
            </table:table-cell>
            <table:table-cell table:style-name="表格80.A1" office:value-type="string">
              <text:p text:style-name="P24">發生什麼</text:p>
            </table:table-cell>
            <table:table-cell table:style-name="表格80.A1" office:value-type="string">
              <text:p text:style-name="P24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32">DNS 解析</text:p>
          </table:table-cell>
          <table:table-cell table:style-name="表格80.A2" office:value-type="string">
            <text:p text:style-name="P32">google.com → 142.250.x.x</text:p>
          </table:table-cell>
          <table:table-cell table:style-name="表格80.A2" office:value-type="string">
            <text:p text:style-name="P32">DNS</text:p>
          </table:table-cell>
        </table:table-row>
        <table:table-row table:style-name="表格80.1">
          <table:table-cell table:style-name="表格80.A3" office:value-type="string">
            <text:p text:style-name="P32">ARP 找路由器</text:p>
          </table:table-cell>
          <table:table-cell table:style-name="表格80.A3" office:value-type="string">
            <text:p text:style-name="P32">找路由器的 MAC 位址</text:p>
          </table:table-cell>
          <table:table-cell table:style-name="表格80.A3" office:value-type="string">
            <text:p text:style-name="P32">ARP</text:p>
          </table:table-cell>
        </table:table-row>
        <table:table-row table:style-name="表格80.1">
          <table:table-cell table:style-name="表格80.A2" office:value-type="string">
            <text:p text:style-name="P32">NAT</text:p>
          </table:table-cell>
          <table:table-cell table:style-name="表格80.A2" office:value-type="string">
            <text:p text:style-name="P32">私有 IP 換成公網 IP</text:p>
          </table:table-cell>
          <table:table-cell table:style-name="表格80.A2" office:value-type="string">
            <text:p text:style-name="P32">NAT</text:p>
          </table:table-cell>
        </table:table-row>
        <table:table-row table:style-name="表格80.1">
          <table:table-cell table:style-name="表格80.A3" office:value-type="string">
            <text:p text:style-name="P32">TCP 三次握手</text:p>
          </table:table-cell>
          <table:table-cell table:style-name="表格80.A3" office:value-type="string">
            <text:p text:style-name="P32">與 Google 建立可靠連線</text:p>
          </table:table-cell>
          <table:table-cell table:style-name="表格80.A3" office:value-type="string">
            <text:p text:style-name="P32">TCP</text:p>
          </table:table-cell>
        </table:table-row>
        <table:table-row table:style-name="表格80.1">
          <table:table-cell table:style-name="表格80.A2" office:value-type="string">
            <text:p text:style-name="P32">傳資料（Slow Start → CA）</text:p>
          </table:table-cell>
          <table:table-cell table:style-name="表格80.A2" office:value-type="string">
            <text:p text:style-name="P32">cwnd 慢慢加速，滑動視窗持續傳送</text:p>
          </table:table-cell>
          <table:table-cell table:style-name="表格80.A2" office:value-type="string">
            <text:p text:style-name="P32">TCP 擁塞控制</text:p>
          </table:table-cell>
        </table:table-row>
        <table:table-row table:style-name="表格80.1">
          <table:table-cell table:style-name="表格80.A3" office:value-type="string">
            <text:p text:style-name="P32">Google 回應</text:p>
          </table:table-cell>
          <table:table-cell table:style-name="表格80.A3" office:value-type="string">
            <text:p text:style-name="P32">資料送回你的電腦</text:p>
          </table:table-cell>
          <table:table-cell table:style-name="表格80.A3" office:value-type="string">
            <text:p text:style-name="P3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51"><text:span text:style-name="T4">⚡ <text:s/></text:span><text:span text:style-name="T29">層次關係</text:span></text:p>
            <text:p text:style-name="P40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51"><text:span text:style-name="T4">🧠 <text:s/></text:span><text:span text:style-name="T140">考試直接用</text:span></text:p>
            <text:p text:style-name="P40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25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1"><text:span text:style-name="T4">💡 <text:s/></text:span><text:span text:style-name="T23">DNS 是什麼？</text:span></text:p>
            <text:p text:style-name="P40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4">類型</text:p>
            </table:table-cell>
            <table:table-cell table:style-name="表格83.A1" office:value-type="string">
              <text:p text:style-name="P24">全名</text:p>
            </table:table-cell>
            <table:table-cell table:style-name="表格83.A1" office:value-type="string">
              <text:p text:style-name="P24">用途</text:p>
            </table:table-cell>
            <table:table-cell table:style-name="表格83.A1" office:value-type="string">
              <text:p text:style-name="P24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32">A</text:p>
          </table:table-cell>
          <table:table-cell table:style-name="表格83.A2" office:value-type="string">
            <text:p text:style-name="P32">Address Record</text:p>
          </table:table-cell>
          <table:table-cell table:style-name="表格83.A2" office:value-type="string">
            <text:p text:style-name="P32">網域名稱 → IPv4 位址</text:p>
          </table:table-cell>
          <table:table-cell table:style-name="表格83.A2" office:value-type="string">
            <text:p text:style-name="P32">google.com → 142.250.x.x</text:p>
          </table:table-cell>
        </table:table-row>
        <table:table-row table:style-name="表格83.1">
          <table:table-cell table:style-name="表格83.A3" office:value-type="string">
            <text:p text:style-name="P32">NS</text:p>
          </table:table-cell>
          <table:table-cell table:style-name="表格83.A3" office:value-type="string">
            <text:p text:style-name="P32">Name Server</text:p>
          </table:table-cell>
          <table:table-cell table:style-name="表格83.A3" office:value-type="string">
            <text:p text:style-name="P32">指定管理該網域的 DNS 伺服器</text:p>
          </table:table-cell>
          <table:table-cell table:style-name="表格83.A3" office:value-type="string">
            <text:p text:style-name="P3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32">MX</text:p>
          </table:table-cell>
          <table:table-cell table:style-name="表格83.A2" office:value-type="string">
            <text:p text:style-name="P32">Mail Exchange</text:p>
          </table:table-cell>
          <table:table-cell table:style-name="表格83.A2" office:value-type="string">
            <text:p text:style-name="P32">指定負責收發郵件的伺服器</text:p>
          </table:table-cell>
          <table:table-cell table:style-name="表格83.A2" office:value-type="string">
            <text:p text:style-name="P3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32">CNAME</text:p>
          </table:table-cell>
          <table:table-cell table:style-name="表格83.A3" office:value-type="string">
            <text:p text:style-name="P32">Canonical Name</text:p>
          </table:table-cell>
          <table:table-cell table:style-name="表格83.A3" office:value-type="string">
            <text:p text:style-name="P32">設定網域別名，指向另一個網域</text:p>
          </table:table-cell>
          <table:table-cell table:style-name="表格83.A3" office:value-type="string">
            <text:p text:style-name="P32">www → google.com</text:p>
          </table:table-cell>
        </table:table-row>
      </table:table>
      <text:p text:style-name="P4">（補充：AAAA record → 回傳 IPv6 位址，見第三篇 Dual Stack。）</text:p>
      <text:h text:style-name="P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51"><text:span text:style-name="T4">📚 <text:s/></text:span><text:span text:style-name="T23">圖書館找書比喻</text:span></text:p>
            <text:p text:style-name="P40">你要找一本書，書名叫「google.com」：</text:p>
            <text:p text:style-name="P39">① 先翻自己的筆記本（Cache）→ 記得放哪就直接去</text:p>
            <text:p text:style-name="P39">② 問圖書館員（Local DNS）→「你知道這本書嗎？」</text:p>
            <text:p text:style-name="P39">③ 館員問館長（Root DNS）→「這本是哪個分類？」→「外文區」</text:p>
            <text:p text:style-name="P39">④ 去外文區管理員（TLD：.com）→「google 在哪個書架？」</text:p>
            <text:p text:style-name="P39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9">步驟</text:p>
          </table:table-cell>
          <table:table-cell table:style-name="表格84.A2" office:value-type="string">
            <text:p text:style-name="P29">層級</text:p>
          </table:table-cell>
          <table:table-cell table:style-name="表格84.A2" office:value-type="string">
            <text:p text:style-name="P29">說明</text:p>
          </table:table-cell>
        </table:table-row>
        <table:table-row table:style-name="表格84.1">
          <table:table-cell table:style-name="表格84.A3" office:value-type="string">
            <text:p text:style-name="P44">1</text:p>
          </table:table-cell>
          <table:table-cell table:style-name="表格84.A3" office:value-type="string">
            <text:p text:style-name="P44">本機快取（Cache）</text:p>
          </table:table-cell>
          <table:table-cell table:style-name="表格84.A3" office:value-type="string">
            <text:p text:style-name="P44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4">2</text:p>
          </table:table-cell>
          <table:table-cell table:style-name="表格84.A4" office:value-type="string">
            <text:p text:style-name="P44">Local DNS 伺服器</text:p>
          </table:table-cell>
          <table:table-cell table:style-name="表格84.A4" office:value-type="string">
            <text:p text:style-name="P44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4">3</text:p>
          </table:table-cell>
          <table:table-cell table:style-name="表格84.A3" office:value-type="string">
            <text:p text:style-name="P44">Root DNS 伺服器</text:p>
          </table:table-cell>
          <table:table-cell table:style-name="表格84.A3" office:value-type="string">
            <text:p text:style-name="P44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4">4</text:p>
          </table:table-cell>
          <table:table-cell table:style-name="表格84.A4" office:value-type="string">
            <text:p text:style-name="P44">TLD DNS 伺服器</text:p>
          </table:table-cell>
          <table:table-cell table:style-name="表格84.A4" office:value-type="string">
            <text:p text:style-name="P44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4">5</text:p>
          </table:table-cell>
          <table:table-cell table:style-name="表格84.A3" office:value-type="string">
            <text:p text:style-name="P44">Authoritative DNS</text:p>
          </table:table-cell>
          <table:table-cell table:style-name="表格84.A3" office:value-type="string">
            <text:p text:style-name="P44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4">6</text:p>
          </table:table-cell>
          <table:table-cell table:style-name="表格84.A4" office:value-type="string">
            <text:p text:style-name="P44">回傳 IP 位址 ✓</text:p>
          </table:table-cell>
          <table:table-cell table:style-name="表格84.A4" office:value-type="string">
            <text:p text:style-name="P44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51"><text:span text:style-name="T4">📌 <text:s/></text:span><text:span text:style-name="T140">一句話總結</text:span></text:p>
            <text:p text:style-name="P40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9" text:outline-level="2"><text:soft-page-break/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51"><text:span text:style-name="T4">⚠️ <text:s/></text:span><text:span text:style-name="T38">最關鍵的差別</text:span></text:p>
            <text:p text:style-name="P40">兩種方式的路徑相同（Cache → Local → Root → TLD → Auth），唯一差別只有一件事：「誰去問」。</text:p>
            <text:p text:style-name="P39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4">比較項目</text:p>
          </table:table-cell>
          <table:table-cell table:style-name="表格85.A2" office:value-type="string">
            <text:p text:style-name="P24">Recursive（遞迴）</text:p>
          </table:table-cell>
          <table:table-cell table:style-name="表格85.A2" office:value-type="string">
            <text:p text:style-name="P24">Iterative（反覆）</text:p>
          </table:table-cell>
        </table:table-row>
        <table:table-row table:style-name="表格85.1">
          <table:table-cell table:style-name="表格85.A3" office:value-type="string">
            <text:p text:style-name="P32">誰去問</text:p>
          </table:table-cell>
          <table:table-cell table:style-name="表格85.A3" office:value-type="string">
            <text:p text:style-name="P32">DNS 伺服器代替你問完</text:p>
          </table:table-cell>
          <table:table-cell table:style-name="表格85.A3" office:value-type="string">
            <text:p text:style-name="P32">你自己逐層查詢</text:p>
          </table:table-cell>
        </table:table-row>
        <table:table-row table:style-name="表格85.1">
          <table:table-cell table:style-name="表格85.A4" office:value-type="string">
            <text:p text:style-name="P32">問幾次</text:p>
          </table:table-cell>
          <table:table-cell table:style-name="表格85.A4" office:value-type="string">
            <text:p text:style-name="P32">你只問 1 次</text:p>
          </table:table-cell>
          <table:table-cell table:style-name="表格85.A4" office:value-type="string">
            <text:p text:style-name="P32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32">常見場合</text:p>
          </table:table-cell>
          <table:table-cell table:style-name="表格85.A3" office:value-type="string">
            <text:p text:style-name="P32">一般使用者 → Local DNS</text:p>
          </table:table-cell>
          <table:table-cell table:style-name="表格85.A3" office:value-type="string">
            <text:p text:style-name="P3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32">記憶口訣</text:p>
          </table:table-cell>
          <table:table-cell table:style-name="表格85.A4" office:value-type="string">
            <text:p text:style-name="P60">代查到底</text:p>
          </table:table-cell>
          <table:table-cell table:style-name="表格85.A4" office:value-type="string">
            <text:p text:style-name="P12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51"><text:span text:style-name="T4">🗣️ <text:s/></text:span><text:span text:style-name="T23">問路比喻</text:span></text:p>
            <text:p text:style-name="P52"><text:span text:style-name="T24">Recursive（朋友幫你問完）：</text:span><text:span text:style-name="T9">你只問朋友（Local DNS）一次「台北101在哪？」朋友自己跑完 Root→TLD→Auth，回你 IP，你沒動過。</text:span></text:p>
            <text:p text:style-name="P53"><text:span text:style-name="T24">Iterative（你自己跑全程）：</text:span><text:span text:style-name="T9">你問 Root「我不知道，去問 TLD」→ 你問 TLD「去問 Auth」→ 你問 Auth 拿到 IP，全程你自己跑。</text:span></text:p>
            <text:p text:style-name="P53"><text:span text:style-name="T7">為什麼有兩種？</text:span><text:span text:style-name="T9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9" text:outline-level="2">四、Open Resolver 風險</text:h>
      <text:p text:style-name="P41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3">⚠️ Cache Poisoning（快取污染）</text:p>
            </table:table-cell>
            <table:table-cell table:style-name="表格86.A1" office:value-type="string">
              <text:p text:style-name="P23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32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32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9" text:outline-level="2">五、DNSSEC — DNS 安全機制</text:h>
      <text:p text:style-name="P41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3">✅ DNSSEC 可以防禦</text:p>
            </table:table-cell>
            <table:table-cell table:style-name="表格87.A1" office:value-type="string">
              <text:p text:style-name="P23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3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3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51"><text:span text:style-name="T4">⚠️ <text:s/></text:span><text:span text:style-name="T140">最重要的一句話</text:span></text:p>
            <text:p text:style-name="P71">DNSSEC = 驗證真偽，不是加密，不防 DDoS</text:p>
          </table:table-cell>
          <table:covered-table-cell/>
        </table:table-row>
      </table:table>
      <text:h text:style-name="P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51"><text:span text:style-name="T4">🔍 <text:s/></text:span><text:span text:style-name="T23">診斷結論</text:span></text:p>
            <text:p text:style-name="P40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51"><text:span text:style-name="T4">📝 <text:s/></text:span><text:span text:style-name="T167">申論題標準答案</text:span></text:p>
            <text:p text:style-name="P52"><text:span text:style-name="T168">一、DNS 功能：</text:span><text:span text:style-name="T9">DNS 為網際網路中負責將網域名稱轉換為 IP 位址的分散式系統。</text:span></text:p>
            <text:p text:style-name="P53"><text:span text:style-name="T168">二、查詢流程：</text:span><text:span text:style-name="T9">由快取開始，依序向 Local DNS、Root DNS、TLD DNS、Authoritative DNS 查詢，最終取得 IP 位址。</text:span></text:p>
            <text:p text:style-name="P53"><text:span text:style-name="T168">三、Recursive：</text:span><text:span text:style-name="T9">由 DNS 伺服器代替用戶端完整查詢並直接回傳最終 IP，用戶端只需等待結果。</text:span></text:p>
            <text:p text:style-name="P53"><text:span text:style-name="T168">四、Iterative：</text:span><text:span text:style-name="T9">DNS 伺服器僅回應下一步查詢位置，由用戶端自行逐層向各 DNS 查詢，直到取得 IP。</text:span></text:p>
            <text:p text:style-name="P53"><text:span text:style-name="T168">五、DNSSEC：</text:span><text:span text:style-name="T9">透過數位簽章驗證 DNS 回應真實性，可防 DNS Spoofing 及 Cache Poisoning，但不提供加密，也無法防禦 DDoS。</text:span></text:p>
          </table:table-cell>
        </table:table-row>
      </table:table>
      <text:h text:style-name="P25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51"><text:span text:style-name="T4">🗺️ <text:s/></text:span><text:span text:style-name="T23">在解決什麼問題？</text:span></text:p>
            <text:p text:style-name="P40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3">🏢 IGP — 內部用</text:p>
            </table:table-cell>
            <table:table-cell table:style-name="表格90.A1" office:value-type="string">
              <text:p text:style-name="P23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3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3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51"><text:span text:style-name="T4">⚡ <text:s/></text:span><text:span text:style-name="T29">一句話記憶法</text:span></text:p>
            <text:p text:style-name="P40">公司／校園內 → 用 IGP（OSPF 或 RIP）；公司與公司間 → 用 EGP（BGP）。</text:p>
          </table:table-cell>
          <table:covered-table-cell/>
        </table:table-row>
      </table:table>
      <text:h text:style-name="P9" text:outline-level="2">二、OSPF 的核心概念</text:h>
      <text:p text:style-name="P41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51"><text:span text:style-name="T4">📌 <text:s/></text:span><text:span text:style-name="T140">最重要的規定</text:span></text:p>
            <text:p text:style-name="P40">所有 Area 都必須連到 Area 0（骨幹區域）。Area 0 就像高速公路主幹道，其他 Area 是交流道。</text:p>
          </table:table-cell>
        </table:table-row>
      </table:table>
      <text:h text:style-name="P9" text:outline-level="2">三、OSPF 的 4 種 Router（重點！）</text:h>
      <text:p text:style-name="P41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8">類型</text:p>
            </table:table-cell>
            <table:table-cell table:style-name="表格92.A1" office:value-type="string">
              <text:p text:style-name="P28">本質</text:p>
            </table:table-cell>
            <table:table-cell table:style-name="表格92.A1" office:value-type="string">
              <text:p text:style-name="P28">核心記憶點</text:p>
            </table:table-cell>
            <table:table-cell table:style-name="表格92.A1" office:value-type="string">
              <text:p text:style-name="P2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4">① Internal</text:p>
          </table:table-cell>
          <table:table-cell table:style-name="表格92.A2" office:value-type="string">
            <text:p text:style-name="P44">不出 Area</text:p>
          </table:table-cell>
          <table:table-cell table:style-name="表格92.A2" office:value-type="string">
            <text:p text:style-name="P44">只在同一個 Area 裡活動，對外一無所知</text:p>
          </table:table-cell>
          <table:table-cell table:style-name="表格92.A2" office:value-type="string">
            <text:p text:style-name="P44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4">② Backbone</text:p>
          </table:table-cell>
          <table:table-cell table:style-name="表格92.A3" office:value-type="string">
            <text:p text:style-name="P44">在 Area 0</text:p>
          </table:table-cell>
          <table:table-cell table:style-name="表格92.A3" office:value-type="string">
            <text:p text:style-name="P44">核心骨幹節點，所有跨區流量都經過這裡</text:p>
          </table:table-cell>
          <table:table-cell table:style-name="表格92.A3" office:value-type="string">
            <text:p text:style-name="P44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4">③ ABR</text:p>
          </table:table-cell>
          <table:table-cell table:style-name="表格92.A2" office:value-type="string">
            <text:p text:style-name="P44">跨 Area 橋樑</text:p>
          </table:table-cell>
          <table:table-cell table:style-name="表格92.A2" office:value-type="string">
            <text:p text:style-name="P44">同時連 Area 0 與其他 Area，是區域間唯一合法的橋</text:p>
          </table:table-cell>
          <table:table-cell table:style-name="表格92.A2" office:value-type="string">
            <text:p text:style-name="P44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4">④ ASBR</text:p>
          </table:table-cell>
          <table:table-cell table:style-name="表格92.A3" office:value-type="string">
            <text:p text:style-name="P44">跨 AS 入口</text:p>
          </table:table-cell>
          <table:table-cell table:style-name="表格92.A3" office:value-type="string">
            <text:p text:style-name="P44">把外部路由（BGP/靜態）引入 OSPF，是對外入口</text:p>
          </table:table-cell>
          <table:table-cell table:style-name="表格92.A3" office:value-type="string">
            <text:p text:style-name="P44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51"><text:span text:style-name="T4">⚠️ <text:s/></text:span><text:span text:style-name="T38">考試最愛考的三個陷阱</text:span></text:p>
            <text:p text:style-name="P52"><text:span text:style-name="T165">✗ ABR 負責連接外部網路　→　</text:span><text:span text:style-name="T9">✓ ABR 只負責 Area 之間的橋樑，對外是 ASBR 的工作。</text:span></text:p>
            <text:p text:style-name="P53"><text:span text:style-name="T165">✗ ASBR 是用來跨越不同 Area　→　</text:span><text:span text:style-name="T9">✓ ASBR 是跨越不同 AS（整個系統），不是跨 Area。</text:span></text:p>
            <text:p text:style-name="P53"><text:span text:style-name="T165">✗ 任意兩個 Area 可直接相連　→　</text:span><text:span text:style-name="T9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3">📦 路由（Route）</text:p>
            </table:table-cell>
            <table:table-cell table:style-name="表格93.A1" office:value-type="string">
              <text:p text:style-name="P23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3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3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51"><text:span text:style-name="T4">📦 <text:s/></text:span><text:span text:style-name="T23">生活比喻：包裹寄送</text:span></text:p>
            <text:p text:style-name="P52"><text:span text:style-name="T16">路由（Route）→ </text:span><text:span text:style-name="T9">包裹實際走的路：台北 → 東京 → 美國。</text:span></text:p>
            <text:p text:style-name="P53"><text:span text:style-name="T16">AS-PATH → </text:span><text:span text:style-name="T9">貼在包裹上的紀錄：黑貓 → 日本郵政 → USPS。</text:span></text:p>
            <text:p text:style-name="P39">路由是「實際行動」，AS-PATH 是「行動的紀錄」。</text:p>
          </table:table-cell>
          <table:covered-table-cell/>
        </table:table-row>
      </table:table>
      <text:h text:style-name="P9" text:outline-level="2">五、BGP 怎麼選最佳路徑？（九步選路）</text:h>
      <text:p text:style-name="P41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9">步驟</text:p>
            </table:table-cell>
            <table:table-cell table:style-name="表格94.A1" office:value-type="string">
              <text:p text:style-name="P29">屬性</text:p>
            </table:table-cell>
            <table:table-cell table:style-name="表格94.A1" office:value-type="string">
              <text:p text:style-name="P29">說明</text:p>
            </table:table-cell>
            <table:table-cell table:style-name="表格94.A1" office:value-type="string">
              <text:p text:style-name="P2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31">①</text:p>
          </table:table-cell>
          <table:table-cell table:style-name="表格94.A2" office:value-type="string">
            <text:p text:style-name="P44">Weight</text:p>
          </table:table-cell>
          <table:table-cell table:style-name="表格94.A2" office:value-type="string">
            <text:p text:style-name="P44">數值越高越優先</text:p>
          </table:table-cell>
          <table:table-cell table:style-name="表格94.A2" office:value-type="string">
            <text:p text:style-name="P44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31">②</text:p>
          </table:table-cell>
          <table:table-cell table:style-name="表格94.A3" office:value-type="string">
            <text:p text:style-name="P11">Local Preference</text:p>
          </table:table-cell>
          <table:table-cell table:style-name="表格94.A3" office:value-type="string">
            <text:p text:style-name="P44">數值越高越優先</text:p>
          </table:table-cell>
          <table:table-cell table:style-name="表格94.A3" office:value-type="string">
            <text:p text:style-name="P1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31">③</text:p>
          </table:table-cell>
          <table:table-cell table:style-name="表格94.A2" office:value-type="string">
            <text:p text:style-name="P44">本地產生</text:p>
          </table:table-cell>
          <table:table-cell table:style-name="表格94.A2" office:value-type="string">
            <text:p text:style-name="P44">network / aggregate 產生的路由優先</text:p>
          </table:table-cell>
          <table:table-cell table:style-name="表格94.A2" office:value-type="string">
            <text:p text:style-name="P44">自己產生的路最可靠</text:p>
          </table:table-cell>
        </table:table-row>
        <table:table-row table:style-name="表格94.1">
          <table:table-cell table:style-name="表格94.A3" office:value-type="string">
            <text:p text:style-name="P31">④</text:p>
          </table:table-cell>
          <table:table-cell table:style-name="表格94.A3" office:value-type="string">
            <text:p text:style-name="P44">AS-PATH</text:p>
          </table:table-cell>
          <table:table-cell table:style-name="表格94.A3" office:value-type="string">
            <text:p text:style-name="P44">路徑越短（經過 AS 越少）越優先</text:p>
          </table:table-cell>
          <table:table-cell table:style-name="表格94.A3" office:value-type="string">
            <text:p text:style-name="P44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31">⑤</text:p>
          </table:table-cell>
          <table:table-cell table:style-name="表格94.A2" office:value-type="string">
            <text:p text:style-name="P44">Origin</text:p>
          </table:table-cell>
          <table:table-cell table:style-name="表格94.A2" office:value-type="string">
            <text:p text:style-name="P44">IGP &gt; EGP &gt; Incomplete</text:p>
          </table:table-cell>
          <table:table-cell table:style-name="表格94.A2" office:value-type="string">
            <text:p text:style-name="P44">來源越明確越好</text:p>
          </table:table-cell>
        </table:table-row>
        <table:table-row table:style-name="表格94.1">
          <table:table-cell table:style-name="表格94.A3" office:value-type="string">
            <text:p text:style-name="P31">⑥</text:p>
          </table:table-cell>
          <table:table-cell table:style-name="表格94.A3" office:value-type="string">
            <text:p text:style-name="P44">MED</text:p>
          </table:table-cell>
          <table:table-cell table:style-name="表格94.A3" office:value-type="string">
            <text:p text:style-name="P44">數值越小越優先</text:p>
          </table:table-cell>
          <table:table-cell table:style-name="表格94.A3" office:value-type="string">
            <text:p text:style-name="P44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31">⑦</text:p>
          </table:table-cell>
          <table:table-cell table:style-name="表格94.A2" office:value-type="string">
            <text:p text:style-name="P44">eBGP vs iBGP</text:p>
          </table:table-cell>
          <table:table-cell table:style-name="表格94.A2" office:value-type="string">
            <text:p text:style-name="P44">eBGP 優先於 iBGP</text:p>
          </table:table-cell>
          <table:table-cell table:style-name="表格94.A2" office:value-type="string">
            <text:p text:style-name="P44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31">⑧</text:p>
          </table:table-cell>
          <table:table-cell table:style-name="表格94.A3" office:value-type="string">
            <text:p text:style-name="P44">IGP cost</text:p>
          </table:table-cell>
          <table:table-cell table:style-name="表格94.A3" office:value-type="string">
            <text:p text:style-name="P44">到 next-hop 距離越小越優先</text:p>
          </table:table-cell>
          <table:table-cell table:style-name="表格94.A3" office:value-type="string">
            <text:p text:style-name="P44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31">⑨</text:p>
          </table:table-cell>
          <table:table-cell table:style-name="表格94.A2" office:value-type="string">
            <text:p text:style-name="P44">Router ID</text:p>
          </table:table-cell>
          <table:table-cell table:style-name="表格94.A2" office:value-type="string">
            <text:p text:style-name="P44">Router ID 最小的優先</text:p>
          </table:table-cell>
          <table:table-cell table:style-name="表格94.A2" office:value-type="string">
            <text:p text:style-name="P44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51"><text:span text:style-name="T4">🧠 <text:s/></text:span><text:span text:style-name="T140">白話理解（這句最重要）</text:span></text:p>
            <text:p text:style-name="P40">BGP 心裡在想：「哪條路比較值得信任？比較符合政策？」不是「哪條最短」（那是 OSPF 在做的事）。</text:p>
            <text:p text:style-name="P53"><text:span text:style-name="T141">一句話總結 → </text:span><text:span text:style-name="T9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51"><text:span text:style-name="T4">⚡ <text:s/></text:span><text:span text:style-name="T29">考試口訣（10 秒背）</text:span></text:p>
            <text:p text:style-name="P40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52"><text:span text:style-name="T165">✗ AS-PATH 是 BGP 選路最重要的屬性　→　</text:span><text:span text:style-name="T9">✓ Local Preference 才是最重要的通用屬性（Weight 是 Cisco 私有）。</text:span></text:p>
            <text:p text:style-name="P53"><text:span text:style-name="T165">✗ AS-PATH 越短就一定會選那條　→　</text:span><text:span text:style-name="T9">✓ 只有前面的屬性（Local Pref 等）完全相同時，才會比較 AS-PATH。</text:span></text:p>
            <text:p text:style-name="P53"><text:span text:style-name="T165">✗ BGP 會自己計算最短路徑　→　</text:span><text:span text:style-name="T9">✓ BGP 不算距離，OSPF 才做最短路徑計算。</text:span></text:p>
            <text:p text:style-name="P53"><text:span text:style-name="T165">✗ iBGP 比 eBGP 優先　→　</text:span><text:span text:style-name="T9">✓ eBGP 優先於 iBGP（外部路由更可信）。</text:span></text:p>
            <text:p text:style-name="P53"><text:span text:style-name="T165">✗ MED 可以跨不同 AS 互相比較　→　</text:span><text:span text:style-name="T9">✓ MED 只能比較來自同一個 AS 的路由。</text:span></text:p>
          </table:table-cell>
        </table:table-row>
      </table:table>
      <text:h text:style-name="P9" text:outline-level="2"><text:soft-page-break/>七、BGP + NAT + 防火牆 整合流程</text:h>
      <text:p text:style-name="P41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8">步驟</text:p>
            </table:table-cell>
            <table:table-cell table:style-name="表格96.A1" office:value-type="string">
              <text:p text:style-name="P28">動作</text:p>
            </table:table-cell>
            <table:table-cell table:style-name="表格96.A1" office:value-type="string">
              <text:p text:style-name="P2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4">1 封包產生</text:p>
          </table:table-cell>
          <table:table-cell table:style-name="表格96.A2" office:value-type="string">
            <text:p text:style-name="P44">你的電腦說「我要去健保署 IP」</text:p>
          </table:table-cell>
          <table:table-cell table:style-name="表格96.A2" office:value-type="string">
            <text:p text:style-name="P44">封包準備出發</text:p>
          </table:table-cell>
        </table:table-row>
        <table:table-row table:style-name="表格96.1">
          <table:table-cell table:style-name="表格96.A3" office:value-type="string">
            <text:p text:style-name="P44">2 防火牆 Firewall</text:p>
          </table:table-cell>
          <table:table-cell table:style-name="表格96.A3" office:value-type="string">
            <text:p text:style-name="P44">看來源/目的 IP、Port，不符就擋掉</text:p>
          </table:table-cell>
          <table:table-cell table:style-name="表格96.A3" office:value-type="string">
            <text:p text:style-name="P44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4">3 NAT</text:p>
          </table:table-cell>
          <table:table-cell table:style-name="表格96.A2" office:value-type="string">
            <text:p text:style-name="P44">把私有 IP 換成公網 IP（192.168.1.10 → 203.66.x.x）</text:p>
          </table:table-cell>
          <table:table-cell table:style-name="表格96.A2" office:value-type="string">
            <text:p text:style-name="P44">NAT 解決「你是誰」</text:p>
          </table:table-cell>
        </table:table-row>
        <table:table-row table:style-name="表格96.1">
          <table:table-cell table:style-name="表格96.A3" office:value-type="string">
            <text:p text:style-name="P44">4 BGP 選路</text:p>
          </table:table-cell>
          <table:table-cell table:style-name="表格96.A3" office:value-type="string">
            <text:p text:style-name="P44">比條件：若相同選 AS-PATH 較短路1；若中華電信 Local Pref 較高則不管長短走路1</text:p>
          </table:table-cell>
          <table:table-cell table:style-name="表格96.A3" office:value-type="string">
            <text:p text:style-name="P44">BGP 決定「怎麼走」</text:p>
          </table:table-cell>
        </table:table-row>
        <table:table-row table:style-name="表格96.1">
          <table:table-cell table:style-name="表格96.A2" office:value-type="string">
            <text:p text:style-name="P44">5 出 ISP 跨 AS</text:p>
          </table:table-cell>
          <table:table-cell table:style-name="表格96.A2" office:value-type="string">
            <text:p text:style-name="P44">封包經過多個 AS（這就是 AS-PATH 的來源）</text:p>
          </table:table-cell>
          <table:table-cell table:style-name="表格96.A2" office:value-type="string">
            <text:p text:style-name="P44">—</text:p>
          </table:table-cell>
        </table:table-row>
        <table:table-row table:style-name="表格96.1">
          <table:table-cell table:style-name="表格96.A3" office:value-type="string">
            <text:p text:style-name="P44">6 到達健保署</text:p>
          </table:table-cell>
          <table:table-cell table:style-name="表格96.A3" office:value-type="string">
            <text:p text:style-name="P44">健保署收到請求，完成連線</text:p>
          </table:table-cell>
          <table:table-cell table:style-name="表格96.A3" office:value-type="string">
            <text:p text:style-name="P44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51"><text:span text:style-name="T4">🎯 <text:s/></text:span><text:span text:style-name="T140">三層分工，一句話各自記</text:span></text:p>
            <text:p text:style-name="P52"><text:span text:style-name="T141">防火牆 → </text:span><text:span text:style-name="T9">決定「能不能走」｜</text:span><text:span text:style-name="T141">NAT → </text:span><text:span text:style-name="T9">解決「你是誰」｜</text:span><text:span text:style-name="T141">BGP → </text:span><text:span text:style-name="T9">決定「要怎麼走」</text:span></text:p>
            <text:p text:style-name="P39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51"><text:span text:style-name="T4">⚠️ <text:s/></text:span><text:span text:style-name="T38">整合情境的考試陷阱</text:span></text:p>
            <text:p text:style-name="P52"><text:span text:style-name="T165">✗ 封包送不出去 → 一定是 BGP 問題　→　</text:span><text:span text:style-name="T9">✓ 應依序排查：防火牆有沒有擋？NAT 有沒有設？BGP 有沒有路？</text:span></text:p>
            <text:p text:style-name="P53"><text:span text:style-name="T165">✗ 有路但連不到 → 是 BGP 路由問題　→　</text:span><text:span text:style-name="T9">✓ 通常是防火牆或 NAT 問題，不是 BGP。</text:span></text:p>
            <text:p text:style-name="P53"><text:span text:style-name="T165">✗ 走到錯誤的 ISP → 是 NAT 設定問題　→　</text:span><text:span text:style-name="T9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25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51"><text:span text:style-name="T4">🌐 <text:s/></text:span><text:span text:style-name="T23">本篇重點</text:span></text:p>
            <text:p text:style-name="P40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9" text:outline-level="2">一、SDN（軟體定義網路）</text:h>
      <text:p text:style-name="P41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51"><text:span text:style-name="T4">🟦 <text:s/></text:span><text:span text:style-name="T140">核心概念（考試最常考）</text:span></text:p>
            <text:p text:style-name="P52"><text:span text:style-name="T141">控制平面（Control Plane）：</text:span><text:span text:style-name="T9">決定資料「怎麼走」——負責路由決策的大腦。</text:span></text:p>
            <text:p text:style-name="P53"><text:span text:style-name="T141">資料平面（Data Plane）：</text:span><text:span text:style-name="T9">負責資料「實際傳送」——執行指令的手腳。</text:span></text:p>
            <text:p text:style-name="P53"><text:span text:style-name="T141">🔑 關鍵：</text:span><text:span text:style-name="T9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8">三層架構</text:p>
          </table:table-cell>
          <table:table-cell table:style-name="表格98.A2" office:value-type="string">
            <text:p text:style-name="P28">說明</text:p>
          </table:table-cell>
          <table:table-cell table:style-name="表格98.A2" office:value-type="string">
            <text:p text:style-name="P28">白話</text:p>
          </table:table-cell>
        </table:table-row>
        <table:table-row table:style-name="表格98.1">
          <table:table-cell table:style-name="表格98.A3" office:value-type="string">
            <text:p text:style-name="P44">🟦 Application Layer 應用層</text:p>
          </table:table-cell>
          <table:table-cell table:style-name="表格98.A3" office:value-type="string">
            <text:p text:style-name="P44">使用者所使用的服務，如網頁、API、App</text:p>
          </table:table-cell>
          <table:table-cell table:style-name="表格98.A3" office:value-type="string">
            <text:p text:style-name="P44">你真正在用的東西</text:p>
          </table:table-cell>
        </table:table-row>
        <table:table-row table:style-name="表格98.1">
          <table:table-cell table:style-name="表格98.A4" office:value-type="string">
            <text:p text:style-name="P44">🟨 Control Layer 控制層</text:p>
          </table:table-cell>
          <table:table-cell table:style-name="表格98.A4" office:value-type="string">
            <text:p text:style-name="P44">SDN Controller（大腦），決定資料流向、集中管理</text:p>
          </table:table-cell>
          <table:table-cell table:style-name="表格98.A4" office:value-type="string">
            <text:p text:style-name="P44">交通指揮中心</text:p>
          </table:table-cell>
        </table:table-row>
        <table:table-row table:style-name="表格98.1">
          <table:table-cell table:style-name="表格98.A3" office:value-type="string">
            <text:p text:style-name="P44">🟩 Infrastructure Layer 基礎層</text:p>
          </table:table-cell>
          <table:table-cell table:style-name="表格98.A3" office:value-type="string">
            <text:p text:style-name="P44">真正傳送資料的設備，如 Router、Switch</text:p>
          </table:table-cell>
          <table:table-cell table:style-name="表格98.A3" office:value-type="string">
            <text:p text:style-name="P44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51"><text:span text:style-name="T4">⚡ <text:s/></text:span><text:span text:style-name="T29">記憶口訣</text:span></text:p>
            <text:p text:style-name="P40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9" text:outline-level="2">二、Load Balancing（負載平衡）</text:h>
      <text:p text:style-name="P41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8">策略</text:p>
            </table:table-cell>
            <table:table-cell table:style-name="表格99.A1" office:value-type="string">
              <text:p text:style-name="P28">說明</text:p>
            </table:table-cell>
            <table:table-cell table:style-name="表格99.A1" office:value-type="string">
              <text:p text:style-name="P2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4">① Round Robin（輪詢）</text:p>
          </table:table-cell>
          <table:table-cell table:style-name="表格99.A2" office:value-type="string">
            <text:p text:style-name="P44">依序輪流分配，不考慮伺服器效能或負載</text:p>
          </table:table-cell>
          <table:table-cell table:style-name="表格99.A2" office:value-type="string">
            <text:p text:style-name="P44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4">② Weighted Round Robin（加權輪詢）</text:p>
          </table:table-cell>
          <table:table-cell table:style-name="表格99.A3" office:value-type="string">
            <text:p text:style-name="P44">依各伺服器處理能力設「權重」，能力強分到更多</text:p>
          </table:table-cell>
          <table:table-cell table:style-name="表格99.A3" office:value-type="string">
            <text:p text:style-name="P44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4">③ Session Stickiness（會話黏著）</text:p>
          </table:table-cell>
          <table:table-cell table:style-name="表格99.A2" office:value-type="string">
            <text:p text:style-name="P44">同一使用者所有請求固定導向同一台，維持連線狀態</text:p>
          </table:table-cell>
          <table:table-cell table:style-name="表格99.A2" office:value-type="string">
            <text:p text:style-name="P44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51"><text:span text:style-name="T4">⚡ <text:s/></text:span><text:span text:style-name="T29">記憶口訣</text:span></text:p>
            <text:p text:style-name="P40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9" text:outline-level="2"><text:soft-page-break/>三、CDN（內容傳遞網路）</text:h>
      <text:p text:style-name="P41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51"><text:span text:style-name="T4">🌍 <text:s/></text:span><text:span text:style-name="T23">CDN 完整流程（一定要記）</text:span></text:p>
            <text:p text:style-name="P40">Step 1 使用者輸入網址（www.example.com）</text:p>
            <text:p text:style-name="P39">Step 2 DNS 解析網址，找到對應 CDN 的 CNAME 記錄</text:p>
            <text:p text:style-name="P39">Step 3 CNAME 將請求轉向 CDN 服務商（如 cdn.example.net）</text:p>
            <text:p text:style-name="P39">Step 4 CDN 根據使用者地理位置，選擇最近的 Edge 伺服器</text:p>
            <text:p text:style-name="P39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4">關鍵名詞</text:p>
          </table:table-cell>
          <table:table-cell table:style-name="表格100.A2" office:value-type="string">
            <text:p text:style-name="P24">說明</text:p>
          </table:table-cell>
        </table:table-row>
        <table:table-row table:style-name="表格100.1">
          <table:table-cell table:style-name="表格100.A3" office:value-type="string">
            <text:p text:style-name="P32">CNAME（別名記錄）</text:p>
          </table:table-cell>
          <table:table-cell table:style-name="表格100.A3" office:value-type="string">
            <text:p text:style-name="P3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32">Edge Server（邊緣伺服器）</text:p>
          </table:table-cell>
          <table:table-cell table:style-name="表格100.A4" office:value-type="string">
            <text:p text:style-name="P3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51"><text:span text:style-name="T4">⚡ <text:s/></text:span><text:span text:style-name="T29">記憶口訣</text:span></text:p>
            <text:p text:style-name="P40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8">四大核心特性</text:p>
            </table:table-cell>
            <table:table-cell table:style-name="表格101.A1" office:value-type="string">
              <text:p text:style-name="P2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4">① 高速傳輸（eMBB）</text:p>
          </table:table-cell>
          <table:table-cell table:style-name="表格101.A2" office:value-type="string">
            <text:p text:style-name="P44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4">② 超低延遲（URLLC）</text:p>
          </table:table-cell>
          <table:table-cell table:style-name="表格101.A3" office:value-type="string">
            <text:p text:style-name="P44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4">③ 大量連線（mMTC）</text:p>
          </table:table-cell>
          <table:table-cell table:style-name="表格101.A2" office:value-type="string">
            <text:p text:style-name="P44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4">④ 網路切片（Network Slicing）</text:p>
          </table:table-cell>
          <table:table-cell table:style-name="表格101.A3" office:value-type="string">
            <text:p text:style-name="P44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51"><text:span text:style-name="T4">⚡ <text:s/></text:span><text:span text:style-name="T29">記憶口訣</text:span></text:p>
            <text:p text:style-name="P40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8">常見錯誤</text:p>
            </table:table-cell>
            <table:table-cell table:style-name="表格102.A1" office:value-type="string">
              <text:p text:style-name="P28">正確觀念</text:p>
            </table:table-cell>
            <table:table-cell table:style-name="表格102.A1" office:value-type="string">
              <text:p text:style-name="P2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4">SDN 是把控制與資料整合</text:p>
          </table:table-cell>
          <table:table-cell table:style-name="表格102.A2" office:value-type="string">
            <text:p text:style-name="P44">SDN = 控制與資料「分離」</text:p>
          </table:table-cell>
          <table:table-cell table:style-name="表格102.A2" office:value-type="string">
            <text:p text:style-name="P44">SDN</text:p>
          </table:table-cell>
        </table:table-row>
        <table:table-row table:style-name="表格102.1">
          <table:table-cell table:style-name="表格102.A3" office:value-type="string">
            <text:p text:style-name="P44">Round Robin 會考慮伺服器效能</text:p>
          </table:table-cell>
          <table:table-cell table:style-name="表格102.A3" office:value-type="string">
            <text:p text:style-name="P44">RR 不看效能，Weighted RR 才看</text:p>
          </table:table-cell>
          <table:table-cell table:style-name="表格102.A3" office:value-type="string">
            <text:p text:style-name="P44">LB</text:p>
          </table:table-cell>
        </table:table-row>
        <table:table-row table:style-name="表格102.1">
          <table:table-cell table:style-name="表格102.A2" office:value-type="string">
            <text:p text:style-name="P44">Stickiness 是平均分配流量</text:p>
          </table:table-cell>
          <table:table-cell table:style-name="表格102.A2" office:value-type="string">
            <text:p text:style-name="P44">Stickiness = 固定同一台 Server</text:p>
          </table:table-cell>
          <table:table-cell table:style-name="表格102.A2" office:value-type="string">
            <text:p text:style-name="P44">LB</text:p>
          </table:table-cell>
        </table:table-row>
        <table:table-row table:style-name="表格102.1">
          <table:table-cell table:style-name="表格102.A3" office:value-type="string">
            <text:p text:style-name="P44">CDN 是把資料放在中心機房</text:p>
          </table:table-cell>
          <table:table-cell table:style-name="表格102.A3" office:value-type="string">
            <text:p text:style-name="P44">CDN 放在靠近使用者的 Edge 節點</text:p>
          </table:table-cell>
          <table:table-cell table:style-name="表格102.A3" office:value-type="string">
            <text:p text:style-name="P44">CDN</text:p>
          </table:table-cell>
        </table:table-row>
        <table:table-row table:style-name="表格102.1">
          <table:table-cell table:style-name="表格102.A2" office:value-type="string">
            <text:p text:style-name="P44">CNAME 是 IP 位址的對應</text:p>
          </table:table-cell>
          <table:table-cell table:style-name="表格102.A2" office:value-type="string">
            <text:p text:style-name="P44">CNAME = 網址 → 網址（非 IP）</text:p>
          </table:table-cell>
          <table:table-cell table:style-name="表格102.A2" office:value-type="string">
            <text:p text:style-name="P44">CDN</text:p>
          </table:table-cell>
        </table:table-row>
        <table:table-row table:style-name="表格102.1">
          <table:table-cell table:style-name="表格102.A3" office:value-type="string">
            <text:p text:style-name="P44">WiFi 使用 CSMA/CD</text:p>
          </table:table-cell>
          <table:table-cell table:style-name="表格102.A3" office:value-type="string">
            <text:p text:style-name="P44">WiFi 用 CSMA/CA（CD 是有線網路）</text:p>
          </table:table-cell>
          <table:table-cell table:style-name="表格102.A3" office:value-type="string">
            <text:p text:style-name="P44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4">5G 只是速度變快</text:p>
          </table:table-cell>
          <table:table-cell table:style-name="表格102.A2" office:value-type="string">
            <text:p text:style-name="P44">5G 還有低延遲、大量連線、網路切片</text:p>
          </table:table-cell>
          <table:table-cell table:style-name="表格102.A2" office:value-type="string">
            <text:p text:style-name="P44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51"><text:span text:style-name="T4">🔗 <text:s/></text:span><text:span text:style-name="T23">使用情境串連（理解記憶）</text:span></text:p>
            <text:p text:style-name="P40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25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51"><text:span text:style-name="T4">💡 <text:s/></text:span><text:span text:style-name="T23">核心問題：大家同時說話會怎樣？</text:span></text:p>
            <text:p text:style-name="P40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9" text:outline-level="2">一、WiFi：先聽再講（CSMA/CA）</text:h>
      <text:p text:style-name="P41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4">CSMA/CA 拆解</text:p>
            </table:table-cell>
            <table:table-cell table:style-name="表格104.A1" office:value-type="string">
              <text:p text:style-name="P24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2">Carrier Sense 載波感測</text:p>
          </table:table-cell>
          <table:table-cell table:style-name="表格104.A2" office:value-type="string">
            <text:p text:style-name="P3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2">Multiple Access 多重存取</text:p>
          </table:table-cell>
          <table:table-cell table:style-name="表格104.A3" office:value-type="string">
            <text:p text:style-name="P3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2">Collision Avoidance 碰撞避免</text:p>
          </table:table-cell>
          <table:table-cell table:style-name="表格104.A2" office:value-type="string">
            <text:p text:style-name="P3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51"><text:span text:style-name="T4">📶 <text:s/></text:span><text:span text:style-name="T27">WiFi 高速基礎</text:span></text:p>
            <text:p text:style-name="P40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51"><text:span text:style-name="T4">🚑 <text:s/></text:span><text:span text:style-name="T29">WiFi 的 QoS：EDCA</text:span></text:p>
            <text:p text:style-name="P40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39">記憶口訣：WiFi = 急診室排隊制度（心臟病/語音視訊優先，小感冒/網頁下載等一下）。</text:p>
          </table:table-cell>
          <table:covered-table-cell/>
        </table:table-row>
      </table:table>
      <text:h text:style-name="P9" text:outline-level="2">二、Bluetooth：老大排班（Master-Slave）</text:h>
      <text:p text:style-name="P41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51"><text:span text:style-name="T4">🔵 <text:s/></text:span><text:span text:style-name="T27">為什麼要排班？</text:span></text:p>
            <text:p text:style-name="P40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39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4">即時語音</text:p>
          </table:table-cell>
          <table:table-cell table:style-name="表格105.A2" office:value-type="string">
            <text:p text:style-name="P24">全名</text:p>
          </table:table-cell>
          <table:table-cell table:style-name="表格105.A2" office:value-type="string">
            <text:p text:style-name="P24">說明</text:p>
          </table:table-cell>
          <table:table-cell table:style-name="表格105.A2" office:value-type="string">
            <text:p text:style-name="P24">用途</text:p>
          </table:table-cell>
        </table:table-row>
        <table:table-row table:style-name="表格105.1">
          <table:table-cell table:style-name="表格105.A3" office:value-type="string">
            <text:p text:style-name="P32">SCO</text:p>
          </table:table-cell>
          <table:table-cell table:style-name="表格105.A3" office:value-type="string">
            <text:p text:style-name="P32">Synchronous Connection-Oriented</text:p>
          </table:table-cell>
          <table:table-cell table:style-name="表格105.A3" office:value-type="string">
            <text:p text:style-name="P32">固定時槽、同步傳輸</text:p>
          </table:table-cell>
          <table:table-cell table:style-name="表格105.A3" office:value-type="string">
            <text:p text:style-name="P32">藍牙耳機通話</text:p>
          </table:table-cell>
        </table:table-row>
        <table:table-row table:style-name="表格105.1">
          <table:table-cell table:style-name="表格105.A4" office:value-type="string">
            <text:p text:style-name="P32">eSCO</text:p>
          </table:table-cell>
          <table:table-cell table:style-name="表格105.A4" office:value-type="string">
            <text:p text:style-name="P32">Enhanced SCO</text:p>
          </table:table-cell>
          <table:table-cell table:style-name="表格105.A4" office:value-type="string">
            <text:p text:style-name="P32">SCO 加強版、可重傳、品質更好</text:p>
          </table:table-cell>
          <table:table-cell table:style-name="表格105.A4" office:value-type="string">
            <text:p text:style-name="P3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51"><text:span text:style-name="T4">🔀 <text:s/></text:span><text:span text:style-name="T27">Bluetooth 抗干擾</text:span></text:p>
            <text:p text:style-name="P40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三、深入理解：時槽（Time Slot）</text:span></text:h>
      <text:p text:style-name="P41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8">三大好處</text:p>
            </table:table-cell>
            <table:table-cell table:style-name="表格106.A1" table:number-columns-spanned="2" office:value-type="string">
              <text:p text:style-name="P28">說明</text:p>
            </table:table-cell>
            <table:covered-table-cell/>
            <table:table-cell table:style-name="表格106.A1" office:value-type="string">
              <text:p text:style-name="P2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4">穩定不碰撞</text:p>
          </table:table-cell>
          <table:table-cell table:style-name="表格106.A2" table:number-columns-spanned="2" office:value-type="string">
            <text:p text:style-name="P44">每人有專屬時間，不會互相干擾</text:p>
          </table:table-cell>
          <table:covered-table-cell/>
          <table:table-cell table:style-name="表格106.A2" office:value-type="string">
            <text:p text:style-name="P44">公司會議室預約制</text:p>
          </table:table-cell>
        </table:table-row>
        <table:table-row table:style-name="表格106.1">
          <table:table-cell table:style-name="表格106.A3" office:value-type="string">
            <text:p text:style-name="P44">即時性保證</text:p>
          </table:table-cell>
          <table:table-cell table:style-name="表格106.A3" table:number-columns-spanned="2" office:value-type="string">
            <text:p text:style-name="P44">耳機每隔固定時間必定輪到，聲音不卡頓</text:p>
          </table:table-cell>
          <table:covered-table-cell/>
          <table:table-cell table:style-name="表格106.A3" office:value-type="string">
            <text:p text:style-name="P44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4">省電效果</text:p>
          </table:table-cell>
          <table:table-cell table:style-name="表格106.A2" table:number-columns-spanned="2" office:value-type="string">
            <text:p text:style-name="P44">裝置知道「還沒輪到我」，可先休眠等待</text:p>
          </table:table-cell>
          <table:covered-table-cell/>
          <table:table-cell table:style-name="表格106.A2" office:value-type="string">
            <text:p text:style-name="P44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3">WiFi 競爭制</text:p>
          </table:table-cell>
          <table:covered-table-cell/>
          <table:table-cell table:style-name="表格106.A1" table:number-columns-spanned="2" office:value-type="string">
            <text:p text:style-name="P23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3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3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51"><text:span text:style-name="T4">🕐 <text:s/></text:span><text:span text:style-name="T140">考試定義（背起來）</text:span></text:p>
            <text:p text:style-name="P40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4">項目</text:p>
            </table:table-cell>
            <table:table-cell table:style-name="表格107.A1" office:value-type="string">
              <text:p text:style-name="P24">WiFi</text:p>
            </table:table-cell>
            <table:table-cell table:style-name="表格107.A1" office:value-type="string">
              <text:p text:style-name="P24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32">核心機制</text:p>
          </table:table-cell>
          <table:table-cell table:style-name="表格107.A2" office:value-type="string">
            <text:p text:style-name="P32">CSMA/CA（先偵聽再傳）</text:p>
          </table:table-cell>
          <table:table-cell table:style-name="表格107.A2" office:value-type="string">
            <text:p text:style-name="P3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32">即時語音 / QoS</text:p>
          </table:table-cell>
          <table:table-cell table:style-name="表格107.A3" office:value-type="string">
            <text:p text:style-name="P32">EDCA（QoS 優先）</text:p>
          </table:table-cell>
          <table:table-cell table:style-name="表格107.A3" office:value-type="string">
            <text:p text:style-name="P3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32">速度</text:p>
          </table:table-cell>
          <table:table-cell table:style-name="表格107.A2" office:value-type="string">
            <text:p text:style-name="P32">高速（快）</text:p>
          </table:table-cell>
          <table:table-cell table:style-name="表格107.A2" office:value-type="string">
            <text:p text:style-name="P32">較慢</text:p>
          </table:table-cell>
        </table:table-row>
        <table:table-row table:style-name="表格107.1">
          <table:table-cell table:style-name="表格107.A3" office:value-type="string">
            <text:p text:style-name="P32">耗電量</text:p>
          </table:table-cell>
          <table:table-cell table:style-name="表格107.A3" office:value-type="string">
            <text:p text:style-name="P32">較高</text:p>
          </table:table-cell>
          <table:table-cell table:style-name="表格107.A3" office:value-type="string">
            <text:p text:style-name="P32">低功耗</text:p>
          </table:table-cell>
        </table:table-row>
        <table:table-row table:style-name="表格107.1">
          <table:table-cell table:style-name="表格107.A2" office:value-type="string">
            <text:p text:style-name="P32">傳輸距離</text:p>
          </table:table-cell>
          <table:table-cell table:style-name="表格107.A2" office:value-type="string">
            <text:p text:style-name="P32">較遠（數十~百公尺）</text:p>
          </table:table-cell>
          <table:table-cell table:style-name="表格107.A2" office:value-type="string">
            <text:p text:style-name="P32">較短（約 10 公尺）</text:p>
          </table:table-cell>
        </table:table-row>
        <table:table-row table:style-name="表格107.1">
          <table:table-cell table:style-name="表格107.A3" office:value-type="string">
            <text:p text:style-name="P32">穩定性</text:p>
          </table:table-cell>
          <table:table-cell table:style-name="表格107.A3" office:value-type="string">
            <text:p text:style-name="P32">受干擾影響較大</text:p>
          </table:table-cell>
          <table:table-cell table:style-name="表格107.A3" office:value-type="string">
            <text:p text:style-name="P32">固定時槽非常穩定</text:p>
          </table:table-cell>
        </table:table-row>
        <table:table-row table:style-name="表格107.1">
          <table:table-cell table:style-name="表格107.A2" office:value-type="string">
            <text:p text:style-name="P32">適用場景</text:p>
          </table:table-cell>
          <table:table-cell table:style-name="表格107.A2" office:value-type="string">
            <text:p text:style-name="P32">上網、看影片、大檔下載</text:p>
          </table:table-cell>
          <table:table-cell table:style-name="表格107.A2" office:value-type="string">
            <text:p text:style-name="P32">耳機、滑鼠、鍵盤、通話</text:p>
          </table:table-cell>
        </table:table-row>
      </table:table>
      <text:h text:style-name="P9" text:outline-level="2">五、L2CAP：藍牙的資料管理員</text:h>
      <text:p text:style-name="P41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8">三種邏輯通道</text:p>
            </table:table-cell>
            <table:table-cell table:style-name="表格108.A1" table:number-columns-spanned="2" office:value-type="string">
              <text:p text:style-name="P28">特性</text:p>
            </table:table-cell>
            <table:covered-table-cell/>
            <table:table-cell table:style-name="表格108.A1" office:value-type="string">
              <text:p text:style-name="P2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4">Connection-oriented（連線導向）</text:p>
          </table:table-cell>
          <table:table-cell table:style-name="表格108.A2" table:number-columns-spanned="2" office:value-type="string">
            <text:p text:style-name="P44">有建立連線、雙方確認，可靠、確保收到</text:p>
          </table:table-cell>
          <table:covered-table-cell/>
          <table:table-cell table:style-name="表格108.A2" office:value-type="string">
            <text:p text:style-name="P44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4">Connectionless（非連線）</text:p>
          </table:table-cell>
          <table:table-cell table:style-name="表格108.A3" table:number-columns-spanned="2" office:value-type="string">
            <text:p text:style-name="P44">直接送出、不確認，快速但可能遺失</text:p>
          </table:table-cell>
          <table:covered-table-cell/>
          <table:table-cell table:style-name="表格108.A3" office:value-type="string">
            <text:p text:style-name="P44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4">Signaling Channel（信令通道）</text:p>
          </table:table-cell>
          <table:table-cell table:style-name="表格108.A2" table:number-columns-spanned="2" office:value-type="string">
            <text:p text:style-name="P44">控制管理用，不傳資料只管控制</text:p>
          </table:table-cell>
          <table:covered-table-cell/>
          <table:table-cell table:style-name="表格108.A2" office:value-type="string">
            <text:p text:style-name="P44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4">OSI 層</text:p>
          </table:table-cell>
          <table:covered-table-cell/>
          <table:table-cell table:style-name="表格108.A1" table:number-columns-spanned="2" office:value-type="string">
            <text:p text:style-name="P24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應用層 Application</text:p>
          </table:table-cell>
          <table:covered-table-cell/>
          <table:table-cell table:style-name="表格108.A2" table:number-columns-spanned="2" office:value-type="string">
            <text:p text:style-name="P3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傳輸層 Transport</text:p>
          </table:table-cell>
          <table:covered-table-cell/>
          <table:table-cell table:style-name="表格108.A3" table:number-columns-spanned="2" office:value-type="string">
            <text:p text:style-name="P3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32">網路層 Network</text:p>
          </table:table-cell>
          <table:covered-table-cell/>
          <table:table-cell table:style-name="表格108.A2" table:number-columns-spanned="2" office:value-type="string">
            <text:p text:style-name="P3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資料鏈結層 Data Link</text:p>
          </table:table-cell>
          <table:covered-table-cell/>
          <table:table-cell table:style-name="表格108.A3" table:number-columns-spanned="2" office:value-type="string">
            <text:p text:style-name="P3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實體層 Physical</text:p>
          </table:table-cell>
          <table:covered-table-cell/>
          <table:table-cell table:style-name="表格108.A2" table:number-columns-spanned="2" office:value-type="string">
            <text:p text:style-name="P3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51"><text:span text:style-name="T4">📐 <text:s/></text:span><text:span text:style-name="T38">重要</text:span></text:p>
            <text:p text:style-name="P40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52"><text:span text:style-name="T16">WiFi 用什麼避免碰撞？　</text:span><text:span text:style-name="T9">✗ CSMA/CD（有線乙太網路機制）→ ✓ CSMA/CA（WiFi 用「避免」碰撞，不是「偵測」）。口訣：有線 Ethernet = CD（Detect），無線 WiFi = CA（Avoid）。</text:span></text:p>
            <text:p text:style-name="P53"><text:span text:style-name="T16">Bluetooth 是競爭制還是排程制？　</text:span><text:span text:style-name="T9">✓ 排程制（Master-Slave，老大安排時槽），不是競爭制。</text:span></text:p>
            <text:p text:style-name="P53"><text:span text:style-name="T16">藍牙即時語音用什麼？　</text:span><text:span text:style-name="T9">✓ SCO（同步連線）或 eSCO（加強版，可重傳）。</text:span></text:p>
            <text:p text:style-name="P53"><text:span text:style-name="T16">L2CAP 控制管理用哪個通道？　</text:span><text:span text:style-name="T9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51"><text:span text:style-name="T4">⏱ <text:s/></text:span><text:span text:style-name="T140">考前 30 秒濃縮</text:span></text:p>
            <text:p text:style-name="P40">WiFi＝搶頻道 · BT＝排班 · 時槽＝時間格子 · SCO＝語音 · L2CAP＝三通道（位於 Data Link 層）。</text:p>
          </table:table-cell>
        </table:table-row>
      </table:table>
      <text:h text:style-name="P25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51"><text:span text:style-name="T4">🛡️ <text:s/></text:span><text:span text:style-name="T23">本篇地圖</text:span></text:p>
            <text:p text:style-name="P40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9" text:outline-level="2">壹、資安與網路設備：FW · WAF · NGFW · DMZ · IOC · Proxy</text:h>
      <text:p text:style-name="P41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4">名詞</text:p>
            </table:table-cell>
            <table:table-cell table:style-name="表格111.A1" office:value-type="string">
              <text:p text:style-name="P24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32">FW</text:p>
          </table:table-cell>
          <table:table-cell table:style-name="表格111.A2" office:value-type="string">
            <text:p text:style-name="P3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32">WAF</text:p>
          </table:table-cell>
          <table:table-cell table:style-name="表格111.A3" office:value-type="string">
            <text:p text:style-name="P3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32">NGFW</text:p>
          </table:table-cell>
          <table:table-cell table:style-name="表格111.A2" office:value-type="string">
            <text:p text:style-name="P3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32">DMZ</text:p>
          </table:table-cell>
          <table:table-cell table:style-name="表格111.A3" office:value-type="string">
            <text:p text:style-name="P3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32">IOC</text:p>
          </table:table-cell>
          <table:table-cell table:style-name="表格111.A2" office:value-type="string">
            <text:p text:style-name="P3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32">Proxy</text:p>
          </table:table-cell>
          <table:table-cell table:style-name="表格111.A3" office:value-type="string">
            <text:p text:style-name="P3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32">Reverse Proxy</text:p>
          </table:table-cell>
          <table:table-cell table:style-name="表格111.A2" office:value-type="string">
            <text:p text:style-name="P32">反向代理，幫「伺服器（Server）」負載平衡、隱藏主機</text:p>
          </table:table-cell>
        </table:table-row>
      </table:table>
      <text:h text:style-name="P58" text:outline-level="3"><text:span text:style-name="T28">▍</text:span><text:span text:style-name="T29"> 防火牆 Firewall（FW）</text:span></text:h>
      <text:p text:style-name="P41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1"><text:span text:style-name="T4">⚠️ <text:s/></text:span><text:span text:style-name="T38">缺點</text:span></text:p>
            <text:p text:style-name="P40">FW 只看外面，不看封包裡面的內容，無法防止應用層攻擊（如 SQL Injection）。</text:p>
          </table:table-cell>
        </table:table-row>
      </table:table>
      <text:h text:style-name="P58" text:outline-level="3"><text:span text:style-name="T28">▍</text:span><text:span text:style-name="T29"> 網站應用防火牆 WAF</text:span></text:h>
      <text:p text:style-name="P41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4">比較項目</text:p>
            </table:table-cell>
            <table:table-cell table:style-name="表格113.A1" office:value-type="string">
              <text:p text:style-name="P24">FW</text:p>
            </table:table-cell>
            <table:table-cell table:style-name="表格113.A1" office:value-type="string">
              <text:p text:style-name="P24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32">檢查範圍</text:p>
          </table:table-cell>
          <table:table-cell table:style-name="表格113.A2" office:value-type="string">
            <text:p text:style-name="P32">封包外面（IP/Port）</text:p>
          </table:table-cell>
          <table:table-cell table:style-name="表格113.A2" office:value-type="string">
            <text:p text:style-name="P3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32">OSI 分層</text:p>
          </table:table-cell>
          <table:table-cell table:style-name="表格113.A3" office:value-type="string">
            <text:p text:style-name="P32">L3 / L4</text:p>
          </table:table-cell>
          <table:table-cell table:style-name="表格113.A3" office:value-type="string">
            <text:p text:style-name="P32">L7（應用層）</text:p>
          </table:table-cell>
        </table:table-row>
        <table:table-row table:style-name="表格113.1">
          <table:table-cell table:style-name="表格113.A2" office:value-type="string">
            <text:p text:style-name="P32">防禦 SQL Injection</text:p>
          </table:table-cell>
          <table:table-cell table:style-name="表格113.A2" office:value-type="string">
            <text:p text:style-name="P32">✗ 無法</text:p>
          </table:table-cell>
          <table:table-cell table:style-name="表格113.A2" office:value-type="string">
            <text:p text:style-name="P32">○ 可以</text:p>
          </table:table-cell>
        </table:table-row>
        <table:table-row table:style-name="表格113.1">
          <table:table-cell table:style-name="表格113.A3" office:value-type="string">
            <text:p text:style-name="P32">防禦 XSS</text:p>
          </table:table-cell>
          <table:table-cell table:style-name="表格113.A3" office:value-type="string">
            <text:p text:style-name="P32">✗ 無法</text:p>
          </table:table-cell>
          <table:table-cell table:style-name="表格113.A3" office:value-type="string">
            <text:p text:style-name="P32">○ 可以</text:p>
          </table:table-cell>
        </table:table-row>
      </table:table>
      <text:h text:style-name="P58" text:outline-level="3"><text:span text:style-name="T28">▍</text:span><text:span text:style-name="T29"> 次世代防火牆 NGFW</text:span></text:h>
      <text:p text:style-name="P41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23">能力</text:p>
            </table:table-cell>
            <table:table-cell table:style-name="表格114.A1" office:value-type="string">
              <text:p text:style-name="P23">FW</text:p>
            </table:table-cell>
            <table:table-cell table:style-name="表格114.A1" office:value-type="string">
              <text:p text:style-name="P23">WAF</text:p>
            </table:table-cell>
            <table:table-cell table:style-name="表格114.A1" office:value-type="string">
              <text:p text:style-name="P23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32">IP/Port 過濾</text:p>
          </table:table-cell>
          <table:table-cell table:style-name="表格114.A2" office:value-type="string">
            <text:p text:style-name="P67">○</text:p>
          </table:table-cell>
          <table:table-cell table:style-name="表格114.A2" office:value-type="string">
            <text:p text:style-name="P67">○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3" office:value-type="string">
            <text:p text:style-name="P32">HTTP 內容檢查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7">○</text:p>
          </table:table-cell>
          <table:table-cell table:style-name="表格114.A3" office:value-type="string">
            <text:p text:style-name="P67">○</text:p>
          </table:table-cell>
        </table:table-row>
        <table:table-row table:style-name="表格114.1">
          <table:table-cell table:style-name="表格114.A2" office:value-type="string">
            <text:p text:style-name="P32">DPI 深度檢查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3" office:value-type="string">
            <text:p text:style-name="P32">App 識別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7">○</text:p>
          </table:table-cell>
        </table:table-row>
        <table:table-row table:style-name="表格114.1">
          <table:table-cell table:style-name="表格114.A2" office:value-type="string">
            <text:p text:style-name="P32">IPS 入侵防禦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51"><text:span text:style-name="T4">💡 <text:s/></text:span><text:span text:style-name="T29">實務說明</text:span></text:p>
            <text:p text:style-name="P40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8">▍</text:span><text:span text:style-name="T29"> DMZ（非軍事區 / 隔離區）</text:span></text:h>
      <text:p text:style-name="P41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1"><text:span text:style-name="T4">⚠️ <text:s/></text:span><text:span text:style-name="T38">考試陷阱</text:span></text:p>
            <text:p text:style-name="P40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58" text:outline-level="3"><text:span text:style-name="T28">▍</text:span><text:span text:style-name="T29"> IOC（入侵指標）</text:span></text:h>
      <text:p text:style-name="P41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51"><text:span text:style-name="T4">🎯 <text:s/></text:span><text:span text:style-name="T140">核心觀念</text:span></text:p>
            <text:p text:style-name="P40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9">口訣</text:p>
          </table:table-cell>
          <table:table-cell table:style-name="表格116.A2" office:value-type="string">
            <text:p text:style-name="P29">IOC 類型</text:p>
          </table:table-cell>
          <table:table-cell table:style-name="表格116.A2" office:value-type="string">
            <text:p text:style-name="P29">白話說明</text:p>
          </table:table-cell>
          <table:table-cell table:style-name="表格116.A2" office:value-type="string">
            <text:p text:style-name="P29">對應防禦工具</text:p>
          </table:table-cell>
        </table:table-row>
        <table:table-row table:style-name="表格116.1">
          <table:table-cell table:style-name="表格116.A3" office:value-type="string">
            <text:p text:style-name="P69">網</text:p>
          </table:table-cell>
          <table:table-cell table:style-name="表格116.A3" office:value-type="string">
            <text:p text:style-name="P44">惡意 Domain（網域）</text:p>
          </table:table-cell>
          <table:table-cell table:style-name="表格116.A3" office:value-type="string">
            <text:p text:style-name="P44">釣魚網站網址，用來騙帳密、假冒正規網站</text:p>
          </table:table-cell>
          <table:table-cell table:style-name="表格116.A3" office:value-type="string">
            <text:p text:style-name="P44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69">檔</text:p>
          </table:table-cell>
          <table:table-cell table:style-name="表格116.A4" office:value-type="string">
            <text:p text:style-name="P44">惡意 Hash（雜湊值）</text:p>
          </table:table-cell>
          <table:table-cell table:style-name="表格116.A4" office:value-type="string">
            <text:p text:style-name="P44">惡意程式的唯一特徵碼，改檔名也能識別</text:p>
          </table:table-cell>
          <table:table-cell table:style-name="表格116.A4" office:value-type="string">
            <text:p text:style-name="P44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69">連</text:p>
          </table:table-cell>
          <table:table-cell table:style-name="表格116.A3" office:value-type="string">
            <text:p text:style-name="P44">惡意 IP 位址</text:p>
          </table:table-cell>
          <table:table-cell table:style-name="表格116.A3" office:value-type="string">
            <text:p text:style-name="P44">感染後電腦對外異常連線的目標</text:p>
          </table:table-cell>
          <table:table-cell table:style-name="表格116.A3" office:value-type="string">
            <text:p text:style-name="P44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69">控</text:p>
          </table:table-cell>
          <table:table-cell table:style-name="表格116.A4" office:value-type="string">
            <text:p text:style-name="P44">C2 Server（指揮控制）</text:p>
          </table:table-cell>
          <table:table-cell table:style-name="表格116.A4" office:value-type="string">
            <text:p text:style-name="P44">駭客遠端操控被感染主機的總部</text:p>
          </table:table-cell>
          <table:table-cell table:style-name="表格116.A4" office:value-type="string">
            <text:p text:style-name="P44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51"><text:span text:style-name="T4">▸ <text:s/></text:span><text:span text:style-name="T23">攻擊全流程（IOC 出現在哪裡？）</text:span></text:p>
            <text:p text:style-name="P40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51"><text:span text:style-name="T4">⚡ <text:s/></text:span><text:span text:style-name="T29">10 秒口訣速記</text:span></text:p>
            <text:p text:style-name="P40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58" text:outline-level="3"><text:soft-page-break/><text:span text:style-name="T28">▍</text:span><text:span text:style-name="T2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3">🧍 Proxy（正向代理）— 幫 Client</text:p>
            </table:table-cell>
            <table:table-cell table:style-name="表格117.A1" office:value-type="string">
              <text:p text:style-name="P23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3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3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58" text:outline-level="3"><text:span text:style-name="T28">▍</text:span><text:span text:style-name="T2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51"><text:span text:style-name="T4">🚧 <text:s/></text:span><text:span text:style-name="T23">封包闖關順序</text:span></text:p>
            <text:p text:style-name="P40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39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51"><text:span text:style-name="T4">🔑 <text:s/></text:span><text:span text:style-name="T140">萬用口訣</text:span></text:p>
            <text:p text:style-name="P40">FW 封外、WAF 看內、NGFW 最強、DMZ 隔離、IOC 壞人、Proxy 幫客、Reverse 幫服。</text:p>
          </table:table-cell>
        </table:table-row>
      </table:table>
      <text:h text:style-name="P9" text:outline-level="2">貳、SQL Injection × Zero-Day × 防禦機制</text:h>
      <text:h text:style-name="P58" text:outline-level="3"><text:span text:style-name="T28">▍</text:span><text:span text:style-name="T29"> SQL Injection（SQL 注入攻擊）</text:span></text:h>
      <text:p text:style-name="P41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51"><text:span text:style-name="T4">💉 <text:s/></text:span><text:span text:style-name="T38">什麼是 SQL Injection？</text:span></text:p>
            <text:p text:style-name="P52"><text:span text:style-name="T35">核心一句話：</text:span><text:span text:style-name="T9">把原本只是「資料」的輸入，惡意改造成可執行的「SQL 指令」。</text:span></text:p>
            <text:p text:style-name="P39">駭客在帳號欄位輸入：' OR 1=1 --，拼入後變成：…WHERE account='' OR 1=1 -- ' AND password='1234'。</text:p>
            <text:p text:style-name="P39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3">❌ 攻擊成功的原因</text:p>
          </table:table-cell>
          <table:covered-table-cell/>
          <table:table-cell table:style-name="表格119.A2" office:value-type="string">
            <text:p text:style-name="P23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3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3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51"><text:span text:style-name="T4">🛡️ <text:s/></text:span><text:span text:style-name="T167">防禦核心：Prepared Statement（預備語句）</text:span></text:p>
            <text:p text:style-name="P52"><text:span text:style-name="T168">概念：</text:span><text:span text:style-name="T9">先把 SQL 骨架「鎖死」，使用者只能填入資料，完全無法修改 SQL 結構。</text:span></text:p>
            <text:p text:style-name="P39">❌ 危險寫法（字串拼接）：sql = "SELECT * FROM users WHERE id='" + input + "'"；輸入 ' OR 1=1 -- → 結構被竄改。</text:p>
            <text:p text:style-name="P39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8">輔助防禦手段</text:p>
          </table:table-cell>
          <table:table-cell table:style-name="表格119.A2" table:number-columns-spanned="2" office:value-type="string">
            <text:p text:style-name="P2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4">Prepared Statement</text:p>
          </table:table-cell>
          <table:table-cell table:style-name="表格119.A3" table:number-columns-spanned="2" office:value-type="string">
            <text:p text:style-name="P44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4">輸入驗證 (Input Validation)</text:p>
          </table:table-cell>
          <table:table-cell table:style-name="表格119.A7" table:number-columns-spanned="2" office:value-type="string">
            <text:p text:style-name="P44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4">WAF（網站應用防火牆）</text:p>
          </table:table-cell>
          <table:table-cell table:style-name="表格119.A3" table:number-columns-spanned="2" office:value-type="string">
            <text:p text:style-name="P44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4">最小權限原則</text:p>
          </table:table-cell>
          <table:table-cell table:style-name="表格119.A7" table:number-columns-spanned="2" office:value-type="string">
            <text:p text:style-name="P44">資料庫帳號只給應用程式必要的權限，避免帳號被拿下後資料全失。</text:p>
          </table:table-cell>
          <table:covered-table-cell/>
        </table:table-row>
      </table:table>
      <text:h text:style-name="P58" text:outline-level="3"><text:soft-page-break/><text:span text:style-name="T28">▍</text:span><text:span text:style-name="T29"> Zero-Day Attack（零時差攻擊）</text:span></text:h>
      <text:p text:style-name="P41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23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23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3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3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28">防禦層</text:p>
          </table:table-cell>
          <table:table-cell table:style-name="表格120.A1" office:value-type="string">
            <text:p text:style-name="P28">手段</text:p>
          </table:table-cell>
          <table:table-cell table:style-name="表格120.A1" table:number-columns-spanned="2" office:value-type="string">
            <text:p text:style-name="P2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修補</text:p>
          </table:table-cell>
          <table:table-cell table:style-name="表格120.A2" office:value-type="string">
            <text:p text:style-name="P44">Patch 更新</text:p>
          </table:table-cell>
          <table:table-cell table:style-name="表格120.A2" table:number-columns-spanned="2" office:value-type="string">
            <text:p text:style-name="P44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4">偵測</text:p>
          </table:table-cell>
          <table:table-cell table:style-name="表格120.A5" office:value-type="string">
            <text:p text:style-name="P44">IDS / IPS</text:p>
          </table:table-cell>
          <table:table-cell table:style-name="表格120.A5" table:number-columns-spanned="2" office:value-type="string">
            <text:p text:style-name="P44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深度檢查</text:p>
          </table:table-cell>
          <table:table-cell table:style-name="表格120.A2" office:value-type="string">
            <text:p text:style-name="P44">DPI（深度封包檢查）</text:p>
          </table:table-cell>
          <table:table-cell table:style-name="表格120.A2" table:number-columns-spanned="2" office:value-type="string">
            <text:p text:style-name="P44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4">隔離</text:p>
          </table:table-cell>
          <table:table-cell table:style-name="表格120.A5" office:value-type="string">
            <text:p text:style-name="P44">網路分段</text:p>
          </table:table-cell>
          <table:table-cell table:style-name="表格120.A5" table:number-columns-spanned="2" office:value-type="string">
            <text:p text:style-name="P44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降低風險</text:p>
          </table:table-cell>
          <table:table-cell table:style-name="表格120.A2" office:value-type="string">
            <text:p text:style-name="P44">最小權限原則</text:p>
          </table:table-cell>
          <table:table-cell table:style-name="表格120.A2" table:number-columns-spanned="2" office:value-type="string">
            <text:p text:style-name="P44">每個帳號只給必要的最低權限，減少淪陷後的損害</text:p>
          </table:table-cell>
          <table:covered-table-cell/>
        </table:table-row>
      </table:table>
      <text:h text:style-name="P58" text:outline-level="3"><text:span text:style-name="T28">▍</text:span><text:span text:style-name="T2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8">機制</text:p>
            </table:table-cell>
            <table:table-cell table:style-name="表格121.A1" office:value-type="string">
              <text:p text:style-name="P28">白話比喻</text:p>
            </table:table-cell>
            <table:table-cell table:style-name="表格121.A1" office:value-type="string">
              <text:p text:style-name="P28">主要功能</text:p>
            </table:table-cell>
            <table:table-cell table:style-name="表格121.A1" office:value-type="string">
              <text:p text:style-name="P2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4">Firewall</text:p>
          </table:table-cell>
          <table:table-cell table:style-name="表格121.A2" office:value-type="string">
            <text:p text:style-name="P44">社區大門保全</text:p>
          </table:table-cell>
          <table:table-cell table:style-name="表格121.A2" office:value-type="string">
            <text:p text:style-name="P44">依 IP、Port、協定決定允許或拒絕流量</text:p>
          </table:table-cell>
          <table:table-cell table:style-name="表格121.A2" office:value-type="string">
            <text:p text:style-name="P44">基礎但必要</text:p>
          </table:table-cell>
        </table:table-row>
        <table:table-row table:style-name="表格121.1">
          <table:table-cell table:style-name="表格121.A3" office:value-type="string">
            <text:p text:style-name="P44">IDS</text:p>
          </table:table-cell>
          <table:table-cell table:style-name="表格121.A3" office:value-type="string">
            <text:p text:style-name="P44">監視器</text:p>
          </table:table-cell>
          <table:table-cell table:style-name="表格121.A3" office:value-type="string">
            <text:p text:style-name="P44">偵測到異常流量後產生警報，不主動攔截</text:p>
          </table:table-cell>
          <table:table-cell table:style-name="表格121.A3" office:value-type="string">
            <text:p text:style-name="P44">只警告</text:p>
          </table:table-cell>
        </table:table-row>
        <table:table-row table:style-name="表格121.1">
          <table:table-cell table:style-name="表格121.A2" office:value-type="string">
            <text:p text:style-name="P44">IPS</text:p>
          </table:table-cell>
          <table:table-cell table:style-name="表格121.A2" office:value-type="string">
            <text:p text:style-name="P44">警衛直接攔人</text:p>
          </table:table-cell>
          <table:table-cell table:style-name="表格121.A2" office:value-type="string">
            <text:p text:style-name="P44">自動阻斷偵測到的攻擊流量</text:p>
          </table:table-cell>
          <table:table-cell table:style-name="表格121.A2" office:value-type="string">
            <text:p text:style-name="P44">直接阻擋</text:p>
          </table:table-cell>
        </table:table-row>
        <table:table-row table:style-name="表格121.1">
          <table:table-cell table:style-name="表格121.A3" office:value-type="string">
            <text:p text:style-name="P44">DPI</text:p>
          </table:table-cell>
          <table:table-cell table:style-name="表格121.A3" office:value-type="string">
            <text:p text:style-name="P44">海關拆包裹</text:p>
          </table:table-cell>
          <table:table-cell table:style-name="表格121.A3" office:value-type="string">
            <text:p text:style-name="P44">不只看封包表頭，深入檢查封包內容</text:p>
          </table:table-cell>
          <table:table-cell table:style-name="表格121.A3" office:value-type="string">
            <text:p text:style-name="P44">最深層檢查</text:p>
          </table:table-cell>
        </table:table-row>
        <table:table-row table:style-name="表格121.1">
          <table:table-cell table:style-name="表格121.A2" office:value-type="string">
            <text:p text:style-name="P44">WAF</text:p>
          </table:table-cell>
          <table:table-cell table:style-name="表格121.A2" office:value-type="string">
            <text:p text:style-name="P44">網站門口掃描機</text:p>
          </table:table-cell>
          <table:table-cell table:style-name="表格121.A2" office:value-type="string">
            <text:p text:style-name="P44">專門針對 Web 攻擊（SQLi、XSS）過濾</text:p>
          </table:table-cell>
          <table:table-cell table:style-name="表格121.A2" office:value-type="string">
            <text:p text:style-name="P44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51"><text:span text:style-name="T4">⚠️ <text:s/></text:span><text:span text:style-name="T38">考試常考</text:span></text:p>
            <text:p text:style-name="P40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8">▍</text:span><text:span text:style-name="T2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9">Step</text:p>
            </table:table-cell>
            <table:table-cell table:style-name="表格122.A1" office:value-type="string">
              <text:p text:style-name="P29">階段</text:p>
            </table:table-cell>
            <table:table-cell table:style-name="表格122.A1" office:value-type="string">
              <text:p text:style-name="P2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4">1</text:p>
          </table:table-cell>
          <table:table-cell table:style-name="表格122.A2" office:value-type="string">
            <text:p text:style-name="P44">偵察 Reconnaissance</text:p>
          </table:table-cell>
          <table:table-cell table:style-name="表格122.A2" office:value-type="string">
            <text:p text:style-name="P44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4">2</text:p>
          </table:table-cell>
          <table:table-cell table:style-name="表格122.A3" office:value-type="string">
            <text:p text:style-name="P44">試探 Probing</text:p>
          </table:table-cell>
          <table:table-cell table:style-name="表格122.A3" office:value-type="string">
            <text:p text:style-name="P44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4">3</text:p>
          </table:table-cell>
          <table:table-cell table:style-name="表格122.A2" office:value-type="string">
            <text:p text:style-name="P44">取得初步權限</text:p>
          </table:table-cell>
          <table:table-cell table:style-name="表格122.A2" office:value-type="string">
            <text:p text:style-name="P44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4">4</text:p>
          </table:table-cell>
          <table:table-cell table:style-name="表格122.A3" office:value-type="string">
            <text:p text:style-name="P44">橫向移動 Lateral Movement</text:p>
          </table:table-cell>
          <table:table-cell table:style-name="表格122.A3" office:value-type="string">
            <text:p text:style-name="P44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4">5</text:p>
          </table:table-cell>
          <table:table-cell table:style-name="表格122.A2" office:value-type="string">
            <text:p text:style-name="P44">竊取資料 Exfiltration</text:p>
          </table:table-cell>
          <table:table-cell table:style-name="表格122.A2" office:value-type="string">
            <text:p text:style-name="P44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4">6</text:p>
          </table:table-cell>
          <table:table-cell table:style-name="表格122.A3" office:value-type="string">
            <text:p text:style-name="P44">植入後門 Backdoor</text:p>
          </table:table-cell>
          <table:table-cell table:style-name="表格122.A3" office:value-type="string">
            <text:p text:style-name="P44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4">7</text:p>
          </table:table-cell>
          <table:table-cell table:style-name="表格122.A2" office:value-type="string">
            <text:p text:style-name="P44">勒索或變現</text:p>
          </table:table-cell>
          <table:table-cell table:style-name="表格122.A2" office:value-type="string">
            <text:p text:style-name="P44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51"><text:span text:style-name="T4">⚠️ <text:s/></text:span><text:span text:style-name="T38">公職考試常見陷阱</text:span></text:p>
            <text:p text:style-name="P52"><text:span text:style-name="T16">「輸入驗證」就足夠防 SQLi？　</text:span><text:span text:style-name="T9">❌ 不夠，過濾特殊字元有被繞過風險。✅ 真正防禦是 Prepared Statement。</text:span></text:p>
            <text:p text:style-name="P53"><text:span text:style-name="T16">WAF 可以完全防止所有攻擊？　</text:span><text:span text:style-name="T9">❌ 不能，WAF 是輔助防禦，新型攻擊可能繞過。✅ WAF + Prepared </text:span><text:soft-page-break/><text:span text:style-name="T9">Statement 才是正道。</text:span></text:p>
            <text:p text:style-name="P53"><text:span text:style-name="T16">Zero-Day 最危險是它「很強大」？　</text:span><text:span text:style-name="T9">❌ 不是，最危險的是「還沒人知道」，防毒無法識別。</text:span></text:p>
            <text:p text:style-name="P53"><text:span text:style-name="T16">IDS 可以阻擋攻擊？　</text:span><text:span text:style-name="T9">❌ 不行，IDS 只能偵測警報，能阻擋的是 IPS。</text:span></text:p>
          </table:table-cell>
          <table:covered-table-cell/>
          <table:covered-table-cell/>
        </table:table-row>
      </table:table>
      <text:h text:style-name="P9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4">工具</text:p>
            </table:table-cell>
            <table:table-cell table:style-name="表格123.A1" office:value-type="string">
              <text:p text:style-name="P24">角色</text:p>
            </table:table-cell>
            <table:table-cell table:style-name="表格123.A1" office:value-type="string">
              <text:p text:style-name="P24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32">🚪 Firewall</text:p>
          </table:table-cell>
          <table:table-cell table:style-name="表格123.A2" office:value-type="string">
            <text:p text:style-name="P32">大門警衛</text:p>
          </table:table-cell>
          <table:table-cell table:style-name="表格123.A2" office:value-type="string">
            <text:p text:style-name="P3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32">👀 IDS</text:p>
          </table:table-cell>
          <table:table-cell table:style-name="表格123.A3" office:value-type="string">
            <text:p text:style-name="P32">監視器（只看）</text:p>
          </table:table-cell>
          <table:table-cell table:style-name="表格123.A3" office:value-type="string">
            <text:p text:style-name="P3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32">🚨 IPS</text:p>
          </table:table-cell>
          <table:table-cell table:style-name="表格123.A2" office:value-type="string">
            <text:p text:style-name="P32">監視器＋警衛</text:p>
          </table:table-cell>
          <table:table-cell table:style-name="表格123.A2" office:value-type="string">
            <text:p text:style-name="P3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32">📊 SNMP</text:p>
          </table:table-cell>
          <table:table-cell table:style-name="表格123.A3" office:value-type="string">
            <text:p text:style-name="P32">管理室</text:p>
          </table:table-cell>
          <table:table-cell table:style-name="表格123.A3" office:value-type="string">
            <text:p text:style-name="P3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32">📶 ICMP</text:p>
          </table:table-cell>
          <table:table-cell table:style-name="表格123.A2" office:value-type="string">
            <text:p text:style-name="P32">網路測試員</text:p>
          </table:table-cell>
          <table:table-cell table:style-name="表格123.A2" office:value-type="string">
            <text:p text:style-name="P3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51"><text:span text:style-name="T4">⚡ <text:s/></text:span><text:span text:style-name="T29">核心記憶口訣</text:span></text:p>
            <text:p text:style-name="P40">Firewall 擋入口 · IDS 只看 · IPS 看＋擋。</text:p>
          </table:table-cell>
          <table:covered-table-cell/>
          <table:covered-table-cell/>
        </table:table-row>
      </table:table>
      <text:h text:style-name="P58" text:outline-level="3"><text:span text:style-name="T28">▍</text:span><text:span text:style-name="T2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103"/>
            </table:table-cell>
            <table:table-cell table:style-name="表格124.A1" office:value-type="string">
              <text:p text:style-name="P24">HIDS</text:p>
            </table:table-cell>
            <table:table-cell table:style-name="表格124.A1" office:value-type="string">
              <text:p text:style-name="P24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32">安裝位置</text:p>
          </table:table-cell>
          <table:table-cell table:style-name="表格124.A2" office:value-type="string">
            <text:p text:style-name="P32">裝在主機（電腦）內部</text:p>
          </table:table-cell>
          <table:table-cell table:style-name="表格124.A2" office:value-type="string">
            <text:p text:style-name="P3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32">監控內容</text:p>
          </table:table-cell>
          <table:table-cell table:style-name="表格124.A3" office:value-type="string">
            <text:p text:style-name="P32">系統 Log、使用者行為</text:p>
          </table:table-cell>
          <table:table-cell table:style-name="表格124.A3" office:value-type="string">
            <text:p text:style-name="P32">網路封包與流量</text:p>
          </table:table-cell>
        </table:table-row>
        <table:table-row table:style-name="表格124.1">
          <table:table-cell table:style-name="表格124.A2" office:value-type="string">
            <text:p text:style-name="P32">比喻</text:p>
          </table:table-cell>
          <table:table-cell table:style-name="表格124.A2" office:value-type="string">
            <text:p text:style-name="P32">電腦裡的監視器</text:p>
          </table:table-cell>
          <table:table-cell table:style-name="表格124.A2" office:value-type="string">
            <text:p text:style-name="P3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51"><text:span text:style-name="T4">⚡ <text:s/></text:span><text:span text:style-name="T29">一句話秒懂</text:span></text:p>
            <text:p text:style-name="P40">HIDS 看主機（Log）· NIDS 看網路（封包）。</text:p>
          </table:table-cell>
          <table:covered-table-cell/>
          <table:covered-table-cell/>
        </table:table-row>
      </table:table>
      <text:h text:style-name="P58" text:outline-level="3"><text:span text:style-name="T28">▍</text:span><text:span text:style-name="T2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103"/>
            </table:table-cell>
            <table:table-cell table:style-name="表格125.A1" office:value-type="string">
              <text:p text:style-name="P24">SNMP</text:p>
            </table:table-cell>
            <table:table-cell table:style-name="表格125.A1" office:value-type="string">
              <text:p text:style-name="P24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32">用途</text:p>
          </table:table-cell>
          <table:table-cell table:style-name="表格125.A2" office:value-type="string">
            <text:p text:style-name="P32">管理與監控網路設備</text:p>
          </table:table-cell>
          <table:table-cell table:style-name="表格125.A2" office:value-type="string">
            <text:p text:style-name="P32">測試網路是否連通</text:p>
          </table:table-cell>
        </table:table-row>
        <table:table-row table:style-name="表格125.1">
          <table:table-cell table:style-name="表格125.A3" office:value-type="string">
            <text:p text:style-name="P32">OSI 層</text:p>
          </table:table-cell>
          <table:table-cell table:style-name="表格125.A3" office:value-type="string">
            <text:p text:style-name="P32">Application Layer（應用層）</text:p>
          </table:table-cell>
          <table:table-cell table:style-name="表格125.A3" office:value-type="string">
            <text:p text:style-name="P3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32">傳輸協定</text:p>
          </table:table-cell>
          <table:table-cell table:style-name="表格125.A2" office:value-type="string">
            <text:p text:style-name="P32">UDP</text:p>
          </table:table-cell>
          <table:table-cell table:style-name="表格125.A2" office:value-type="string">
            <text:p text:style-name="P32">IP 的附屬協定</text:p>
          </table:table-cell>
        </table:table-row>
        <table:table-row table:style-name="表格125.1">
          <table:table-cell table:style-name="表格125.A3" office:value-type="string">
            <text:p text:style-name="P32">常見功能</text:p>
          </table:table-cell>
          <table:table-cell table:style-name="表格125.A3" office:value-type="string">
            <text:p text:style-name="P32">看 CPU 使用率、設備狀態、Trap 警報</text:p>
          </table:table-cell>
          <table:table-cell table:style-name="表格125.A3" office:value-type="string">
            <text:p text:style-name="P32">Ping、Traceroute</text:p>
          </table:table-cell>
        </table:table-row>
        <table:table-row table:style-name="表格125.1">
          <table:table-cell table:style-name="表格125.A2" office:value-type="string">
            <text:p text:style-name="P32">比喻</text:p>
          </table:table-cell>
          <table:table-cell table:style-name="表格125.A2" office:value-type="string">
            <text:p text:style-name="P32">大樓管理室的監控系統</text:p>
          </table:table-cell>
          <table:table-cell table:style-name="表格125.A2" office:value-type="string">
            <text:p text:style-name="P3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51"><text:span text:style-name="T4">⚡ <text:s/></text:span><text:span text:style-name="T29">核心差異</text:span></text:p>
            <text:p text:style-name="P40">SNMP 管理設備（應用層 / UDP）· ICMP 診斷網路（網路層）。</text:p>
          </table:table-cell>
          <table:covered-table-cell/>
          <table:covered-table-cell/>
        </table:table-row>
      </table:table>
      <text:h text:style-name="P58" text:outline-level="3"><text:span text:style-name="T28">▍</text:span><text:span text:style-name="T2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51"><text:span text:style-name="T4">🗺 <text:s/></text:span><text:span text:style-name="T23">工具各自負責的位置</text:span></text:p>
            <text:p text:style-name="P40">🌐 外部攻擊者 → 🚪 Firewall（第一道防線，依 IP/Port 規則過濾）→ 📡 NIDS / IPS（網路中間監控：IDS 分析封包發現異常只發警報；IPS 分析封包發現異常直接阻擋）→ 🖥 主機 / Server → 👀 <text:soft-page-break/>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51"><text:span text:style-name="T4">⚠️ <text:s/></text:span><text:span text:style-name="T38">考試陷阱整理</text:span></text:p>
            <text:p text:style-name="P52"><text:span text:style-name="T165">① IDS 可以自動阻擋攻擊　→　</text:span><text:span text:style-name="T9">✓ IDS 只偵測＋發警報，IPS 才會阻擋。</text:span></text:p>
            <text:p text:style-name="P53"><text:span text:style-name="T165">② Firewall 可以偵測異常行為　→　</text:span><text:span text:style-name="T9">✓ Firewall 依規則（IP/Port）過濾，不做行為分析。</text:span></text:p>
            <text:p text:style-name="P53"><text:span text:style-name="T165">③ HIDS 用來監控網路封包　→　</text:span><text:span text:style-name="T9">✓ HIDS 監控主機 Log 與系統行為，封包是 NIDS 的工作。</text:span></text:p>
            <text:p text:style-name="P53"><text:span text:style-name="T165">④ ICMP 用來監控設備狀態　→　</text:span><text:span text:style-name="T9">✓ ICMP 只診斷網路（Ping），監控設備是 SNMP。</text:span></text:p>
            <text:p text:style-name="P53"><text:span text:style-name="T165">⑤ ICMP 屬於 Application Layer　→　</text:span><text:span text:style-name="T9">✓ ICMP 屬 Network Layer，SNMP 才是 Application Layer。</text:span></text:p>
            <text:p text:style-name="P53"><text:span text:style-name="T165">⑥ IPS 就是防火牆　→　</text:span><text:span text:style-name="T9">✓ Firewall 靜態過濾（規則），IPS 動態偵測行為後阻擋，兩者不同。</text:span></text:p>
          </table:table-cell>
        </table:table-row>
      </table:table>
      <text:h text:style-name="P58" text:outline-level="3"><text:span text:style-name="T28">▍</text:span><text:span text:style-name="T2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30">題目</text:p>
            </table:table-cell>
            <table:table-cell table:style-name="表格127.A1" office:value-type="string">
              <text:p text:style-name="P30">答案</text:p>
            </table:table-cell>
            <table:table-cell table:style-name="表格127.A1" office:value-type="string">
              <text:p text:style-name="P3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49">Q1 何者負責「過濾進出網路流量」？</text:p>
          </table:table-cell>
          <table:table-cell table:style-name="表格127.A2" office:value-type="string">
            <text:p text:style-name="P49">Firewall</text:p>
          </table:table-cell>
          <table:table-cell table:style-name="表格127.A2" office:value-type="string">
            <text:p text:style-name="P49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49">Q2 IDS 的主要功能為何？</text:p>
          </table:table-cell>
          <table:table-cell table:style-name="表格127.A3" office:value-type="string">
            <text:p text:style-name="P49">偵測並發出警報</text:p>
          </table:table-cell>
          <table:table-cell table:style-name="表格127.A3" office:value-type="string">
            <text:p text:style-name="P49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49">Q3 IPS 與 IDS 最大差別？</text:p>
          </table:table-cell>
          <table:table-cell table:style-name="表格127.A2" office:value-type="string">
            <text:p text:style-name="P49">IPS 會阻擋，IDS 不會</text:p>
          </table:table-cell>
          <table:table-cell table:style-name="表格127.A2" office:value-type="string">
            <text:p text:style-name="P49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49">Q4 何者屬「主機型入侵偵測」？</text:p>
          </table:table-cell>
          <table:table-cell table:style-name="表格127.A3" office:value-type="string">
            <text:p text:style-name="P49">HIDS</text:p>
          </table:table-cell>
          <table:table-cell table:style-name="表格127.A3" office:value-type="string">
            <text:p text:style-name="P49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49">Q5 NIDS 主要監控什麼？</text:p>
          </table:table-cell>
          <table:table-cell table:style-name="表格127.A2" office:value-type="string">
            <text:p text:style-name="P49">網路封包</text:p>
          </table:table-cell>
          <table:table-cell table:style-name="表格127.A2" office:value-type="string">
            <text:p text:style-name="P49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49">Q6 SNMP 的主要用途？</text:p>
          </table:table-cell>
          <table:table-cell table:style-name="表格127.A3" office:value-type="string">
            <text:p text:style-name="P49">管理網路設備</text:p>
          </table:table-cell>
          <table:table-cell table:style-name="表格127.A3" office:value-type="string">
            <text:p text:style-name="P49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49">Q7 ICMP 常用於哪種工具？</text:p>
          </table:table-cell>
          <table:table-cell table:style-name="表格127.A2" office:value-type="string">
            <text:p text:style-name="P49">Ping</text:p>
          </table:table-cell>
          <table:table-cell table:style-name="表格127.A2" office:value-type="string">
            <text:p text:style-name="P49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49">Q8 ICMP 屬 OSI 哪一層？</text:p>
          </table:table-cell>
          <table:table-cell table:style-name="表格127.A3" office:value-type="string">
            <text:p text:style-name="P49">Network Layer</text:p>
          </table:table-cell>
          <table:table-cell table:style-name="表格127.A3" office:value-type="string">
            <text:p text:style-name="P49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49">Q9 何者用 UDP 且屬應用層？</text:p>
          </table:table-cell>
          <table:table-cell table:style-name="表格127.A2" office:value-type="string">
            <text:p text:style-name="P49">SNMP</text:p>
          </table:table-cell>
          <table:table-cell table:style-name="表格127.A2" office:value-type="string">
            <text:p text:style-name="P49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49">Q10 下列何者正確？</text:p>
          </table:table-cell>
          <table:table-cell table:style-name="表格127.A3" office:value-type="string">
            <text:p text:style-name="P49">SNMP 用於設備管理</text:p>
          </table:table-cell>
          <table:table-cell table:style-name="表格127.A3" office:value-type="string">
            <text:p text:style-name="P49">IDS 不阻擋；Firewall 不做行為分析；ICMP 只做網路診斷。</text:p>
          </table:table-cell>
        </table:table-row>
      </table:table>
      <text:h text:style-name="P9" text:outline-level="2">肆、企業資訊安全：預防 → 偵測 → 復原</text:h>
      <text:p text:style-name="P41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8">三大核心</text:p>
            </table:table-cell>
            <table:table-cell table:style-name="表格128.A1" office:value-type="string">
              <text:p text:style-name="P28">目標</text:p>
            </table:table-cell>
            <table:table-cell table:style-name="表格128.A1" office:value-type="string">
              <text:p text:style-name="P2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4">① 事前預防</text:p>
          </table:table-cell>
          <table:table-cell table:style-name="表格128.A2" office:value-type="string">
            <text:p text:style-name="P44">讓壞事不要發生</text:p>
          </table:table-cell>
          <table:table-cell table:style-name="表格128.A2" office:value-type="string">
            <text:p text:style-name="P44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4">② 事中偵測</text:p>
          </table:table-cell>
          <table:table-cell table:style-name="表格128.A3" office:value-type="string">
            <text:p text:style-name="P44">出事時盡快發現</text:p>
          </table:table-cell>
          <table:table-cell table:style-name="表格128.A3" office:value-type="string">
            <text:p text:style-name="P44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4">③ 事後復原</text:p>
          </table:table-cell>
          <table:table-cell table:style-name="表格128.A2" office:value-type="string">
            <text:p text:style-name="P44">壞掉後快速救回來</text:p>
          </table:table-cell>
          <table:table-cell table:style-name="表格128.A2" office:value-type="string">
            <text:p text:style-name="P44">備份還原、啟動備援系統、災難復原（BCP、RTO/RPO）</text:p>
          </table:table-cell>
        </table:table-row>
      </table:table>
      <text:h text:style-name="P58" text:outline-level="3"><text:span text:style-name="T28">▍</text:span><text:span text:style-name="T29"> 事前預防：MFA（多因素驗證）</text:span></text:h>
      <text:p text:style-name="P41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58" text:outline-level="3"><text:soft-page-break/><text:span text:style-name="T28">▍</text:span><text:span text:style-name="T2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8">工具</text:p>
            </table:table-cell>
            <table:table-cell table:style-name="表格129.A1" office:value-type="string">
              <text:p text:style-name="P28">全名 / 說明</text:p>
            </table:table-cell>
            <table:table-cell table:style-name="表格129.A1" office:value-type="string">
              <text:p text:style-name="P2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4">Firewall</text:p>
          </table:table-cell>
          <table:table-cell table:style-name="表格129.A2" office:value-type="string">
            <text:p text:style-name="P44">控制誰能進出網路</text:p>
          </table:table-cell>
          <table:table-cell table:style-name="表格129.A2" office:value-type="string">
            <text:p text:style-name="P44">✔ 會</text:p>
          </table:table-cell>
        </table:table-row>
        <table:table-row table:style-name="表格129.1">
          <table:table-cell table:style-name="表格129.A3" office:value-type="string">
            <text:p text:style-name="P44">NGFW</text:p>
          </table:table-cell>
          <table:table-cell table:style-name="表格129.A3" office:value-type="string">
            <text:p text:style-name="P44">次世代防火牆，能辨識應用層威脅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2" office:value-type="string">
            <text:p text:style-name="P44">IDS</text:p>
          </table:table-cell>
          <table:table-cell table:style-name="表格129.A2" office:value-type="string">
            <text:p text:style-name="P44">入侵偵測系統，發現異常就發警報</text:p>
          </table:table-cell>
          <table:table-cell table:style-name="表格129.A2" office:value-type="string">
            <text:p text:style-name="P44">✘ 不會</text:p>
          </table:table-cell>
        </table:table-row>
        <table:table-row table:style-name="表格129.1">
          <table:table-cell table:style-name="表格129.A3" office:value-type="string">
            <text:p text:style-name="P44">IPS</text:p>
          </table:table-cell>
          <table:table-cell table:style-name="表格129.A3" office:value-type="string">
            <text:p text:style-name="P44">入侵防禦系統，發現異常直接阻擋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2" office:value-type="string">
            <text:p text:style-name="P44">EDR</text:p>
          </table:table-cell>
          <table:table-cell table:style-name="表格129.A2" office:value-type="string">
            <text:p text:style-name="P44">Endpoint Detection &amp; Response，監控每台電腦行為</text:p>
          </table:table-cell>
          <table:table-cell table:style-name="表格129.A2" office:value-type="string">
            <text:p text:style-name="P44">✔ 會</text:p>
          </table:table-cell>
        </table:table-row>
        <table:table-row table:style-name="表格129.1">
          <table:table-cell table:style-name="表格129.A3" office:value-type="string">
            <text:p text:style-name="P44">MDR</text:p>
          </table:table-cell>
          <table:table-cell table:style-name="表格129.A3" office:value-type="string">
            <text:p text:style-name="P44">Managed D&amp;R，委外資安監控服務（24 小時）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51"><text:span text:style-name="T4">🏠 <text:s/></text:span><text:span text:style-name="T23">比喻幫你秒懂（公司＝大樓）</text:span></text:p>
            <text:p text:style-name="P40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58" text:outline-level="3"><text:span text:style-name="T28">▍</text:span><text:span text:style-name="T29"> 事後復原：備份、RTO / RPO、BCP</text:span></text:h>
      <text:p text:style-name="P41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8">指標</text:p>
            </table:table-cell>
            <table:table-cell table:style-name="表格130.A1" office:value-type="string">
              <text:p text:style-name="P28">全名</text:p>
            </table:table-cell>
            <table:table-cell table:style-name="表格130.A1" office:value-type="string">
              <text:p text:style-name="P28">問什麼</text:p>
            </table:table-cell>
            <table:table-cell table:style-name="表格130.A1" office:value-type="string">
              <text:p text:style-name="P2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4">RTO</text:p>
          </table:table-cell>
          <table:table-cell table:style-name="表格130.A2" office:value-type="string">
            <text:p text:style-name="P44">Recovery Time Objective 復原時間目標</text:p>
          </table:table-cell>
          <table:table-cell table:style-name="表格130.A2" office:value-type="string">
            <text:p text:style-name="P44">系統出問題後，最多能停多久？</text:p>
          </table:table-cell>
          <table:table-cell table:style-name="表格130.A2" office:value-type="string">
            <text:p text:style-name="P44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4">RPO</text:p>
          </table:table-cell>
          <table:table-cell table:style-name="表格130.A3" office:value-type="string">
            <text:p text:style-name="P44">Recovery Point Objective 復原點目標</text:p>
          </table:table-cell>
          <table:table-cell table:style-name="表格130.A3" office:value-type="string">
            <text:p text:style-name="P44">最多能接受丟失幾小時的資料？</text:p>
          </table:table-cell>
          <table:table-cell table:style-name="表格130.A3" office:value-type="string">
            <text:p text:style-name="P44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51"><text:span text:style-name="T4">⏱ <text:s/></text:span><text:span text:style-name="T140">一句話記憶法</text:span></text:p>
            <text:p text:style-name="P52"><text:span text:style-name="T141">RTO = 停機時間</text:span><text:span text:style-name="T9">（能停多久？）　</text:span><text:span text:style-name="T141">RPO = 資料損失量</text:span><text:span text:style-name="T9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51"><text:span text:style-name="T4">🏢 <text:s/></text:span><text:span text:style-name="T23">BCP：公司炸掉了還能繼續運作嗎？</text:span></text:p>
            <text:p text:style-name="P40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8">▍</text:span><text:span text:style-name="T29"> SSDLC：軟體開發的每個階段都加入資安</text:span></text:h>
      <text:p text:style-name="P41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8">階段</text:p>
            </table:table-cell>
            <table:table-cell table:style-name="表格131.A1" office:value-type="string">
              <text:p text:style-name="P28">英文</text:p>
            </table:table-cell>
            <table:table-cell table:style-name="表格131.A1" office:value-type="string">
              <text:p text:style-name="P28">做什麼</text:p>
            </table:table-cell>
            <table:table-cell table:style-name="表格131.A1" office:value-type="string">
              <text:p text:style-name="P2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4">① 定義</text:p>
          </table:table-cell>
          <table:table-cell table:style-name="表格131.A2" office:value-type="string">
            <text:p text:style-name="P44">Define</text:p>
          </table:table-cell>
          <table:table-cell table:style-name="表格131.A2" office:value-type="string">
            <text:p text:style-name="P44">確認需求與範圍</text:p>
          </table:table-cell>
          <table:table-cell table:style-name="表格131.A2" office:value-type="string">
            <text:p text:style-name="P44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4">② 設計</text:p>
          </table:table-cell>
          <table:table-cell table:style-name="表格131.A3" office:value-type="string">
            <text:p text:style-name="P44">Design</text:p>
          </table:table-cell>
          <table:table-cell table:style-name="表格131.A3" office:value-type="string">
            <text:p text:style-name="P44">設計系統架構</text:p>
          </table:table-cell>
          <table:table-cell table:style-name="表格131.A3" office:value-type="string">
            <text:p text:style-name="P44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4">③ 開發</text:p>
          </table:table-cell>
          <table:table-cell table:style-name="表格131.A2" office:value-type="string">
            <text:p text:style-name="P44">Develop</text:p>
          </table:table-cell>
          <table:table-cell table:style-name="表格131.A2" office:value-type="string">
            <text:p text:style-name="P44">工程師寫程式</text:p>
          </table:table-cell>
          <table:table-cell table:style-name="表格131.A2" office:value-type="string">
            <text:p text:style-name="P44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4">④ 測試</text:p>
          </table:table-cell>
          <table:table-cell table:style-name="表格131.A3" office:value-type="string">
            <text:p text:style-name="P44">Test</text:p>
          </table:table-cell>
          <table:table-cell table:style-name="表格131.A3" office:value-type="string">
            <text:p text:style-name="P44">測試功能與安全</text:p>
          </table:table-cell>
          <table:table-cell table:style-name="表格131.A3" office:value-type="string">
            <text:p text:style-name="P44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4">⑤ 上線</text:p>
          </table:table-cell>
          <table:table-cell table:style-name="表格131.A2" office:value-type="string">
            <text:p text:style-name="P44">Deploy</text:p>
          </table:table-cell>
          <table:table-cell table:style-name="表格131.A2" office:value-type="string">
            <text:p text:style-name="P44">正式發布系統</text:p>
          </table:table-cell>
          <table:table-cell table:style-name="表格131.A2" office:value-type="string">
            <text:p text:style-name="P44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4">⑥ 維護</text:p>
          </table:table-cell>
          <table:table-cell table:style-name="表格131.A3" office:value-type="string">
            <text:p text:style-name="P44">Maintain</text:p>
          </table:table-cell>
          <table:table-cell table:style-name="表格131.A3" office:value-type="string">
            <text:p text:style-name="P44">持續監控與更新</text:p>
          </table:table-cell>
          <table:table-cell table:style-name="表格131.A3" office:value-type="string">
            <text:p text:style-name="P44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51"><text:span text:style-name="T4">🔑 <text:s/></text:span><text:span text:style-name="T29">SSDLC 核心</text:span></text:p>
            <text:p text:style-name="P40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8">▍</text:span><text:span text:style-name="T29"> ISO 27001：用制度管理資安</text:span></text:h>
      <text:p text:style-name="P41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8">四個面向</text:p>
            </table:table-cell>
            <table:table-cell table:style-name="表格132.A1" office:value-type="string">
              <text:p text:style-name="P28">管什麼</text:p>
            </table:table-cell>
            <table:table-cell table:style-name="表格132.A1" office:value-type="string">
              <text:p text:style-name="P2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4">人（People）</text:p>
          </table:table-cell>
          <table:table-cell table:style-name="表格132.A2" office:value-type="string">
            <text:p text:style-name="P44">管理人員的行為與責任</text:p>
          </table:table-cell>
          <table:table-cell table:style-name="表格132.A2" office:value-type="string">
            <text:p text:style-name="P44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4">技術（Technology）</text:p>
          </table:table-cell>
          <table:table-cell table:style-name="表格132.A3" office:value-type="string">
            <text:p text:style-name="P44">使用適當的安全技術</text:p>
          </table:table-cell>
          <table:table-cell table:style-name="表格132.A3" office:value-type="string">
            <text:p text:style-name="P44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4">組織（Organization）</text:p>
          </table:table-cell>
          <table:table-cell table:style-name="表格132.A2" office:value-type="string">
            <text:p text:style-name="P44">建立流程與管理制度</text:p>
          </table:table-cell>
          <table:table-cell table:style-name="表格132.A2" office:value-type="string">
            <text:p text:style-name="P44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4">實體（Physical）</text:p>
          </table:table-cell>
          <table:table-cell table:style-name="表格132.A3" office:value-type="string">
            <text:p text:style-name="P44">保護實體環境</text:p>
          </table:table-cell>
          <table:table-cell table:style-name="表格132.A3" office:value-type="string">
            <text:p text:style-name="P44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51"><text:span text:style-name="T4">🌟 <text:s/></text:span><text:span text:style-name="T140">考試必背三句話</text:span></text:p>
            <text:p text:style-name="P40">1. 資安三階段：事前預防 → 事中偵測 → 事後復原。</text:p>
            <text:p text:style-name="P39">2. SSDLC：六階段（Define→Design→Develop→Test→Deploy→Maintain）都加入資安。</text:p>
            <text:p text:style-name="P39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9" text:outline-level="2">伍、進階防禦：EDR · MDR · MITRE ATT&amp;CK · 數位韌性</text:h>
      <text:p text:style-name="P41">現代駭客不一定放病毒，而是偷登入帳號偽裝成正常使用者、長期潛伏、利用合法工具發動攻擊。因此資安核心已從「防毒」轉向「持續監控電腦行為，即時偵測並快速應變」。</text:p>
      <text:h text:style-name="P58" text:outline-level="3"><text:span text:style-name="T28">▍</text:span><text:span text:style-name="T29"> EDR — 自己監控的資安工具</text:span></text:h>
      <text:p text:style-name="P41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3">三大偵測範圍</text:p>
            </table:table-cell>
            <table:table-cell table:style-name="表格133.A1" office:value-type="string">
              <text:p text:style-name="P23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3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3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51"><text:span text:style-name="T4">💡 <text:s/></text:span><text:span text:style-name="T29">核心觀念</text:span></text:p>
            <text:p text:style-name="P40">EDR 是「買工具、自己守」。企業需要有內部資安人員負責查看警報並處理事件。</text:p>
          </table:table-cell>
          <table:covered-table-cell/>
        </table:table-row>
      </table:table>
      <text:h text:style-name="P58" text:outline-level="3"><text:span text:style-name="T28">▍</text:span><text:span text:style-name="T29"> MDR — 委外的資安託管服務</text:span></text:h>
      <text:p text:style-name="P41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4">比較項目</text:p>
            </table:table-cell>
            <table:table-cell table:style-name="表格134.A1" office:value-type="string">
              <text:p text:style-name="P24">EDR</text:p>
            </table:table-cell>
            <table:table-cell table:style-name="表格134.A1" office:value-type="string">
              <text:p text:style-name="P24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32">管理方式</text:p>
          </table:table-cell>
          <table:table-cell table:style-name="表格134.A2" office:value-type="string">
            <text:p text:style-name="P32">自行管理</text:p>
          </table:table-cell>
          <table:table-cell table:style-name="表格134.A2" office:value-type="string">
            <text:p text:style-name="P32">委外管理</text:p>
          </table:table-cell>
        </table:table-row>
        <table:table-row table:style-name="表格134.1">
          <table:table-cell table:style-name="表格134.A3" office:value-type="string">
            <text:p text:style-name="P32">監控時間</text:p>
          </table:table-cell>
          <table:table-cell table:style-name="表格134.A3" office:value-type="string">
            <text:p text:style-name="P32">視團隊而定</text:p>
          </table:table-cell>
          <table:table-cell table:style-name="表格134.A3" office:value-type="string">
            <text:p text:style-name="P32">24 / 7 全天</text:p>
          </table:table-cell>
        </table:table-row>
        <table:table-row table:style-name="表格134.1">
          <table:table-cell table:style-name="表格134.A2" office:value-type="string">
            <text:p text:style-name="P32">所需能力<text:soft-page-break/></text:p>
          </table:table-cell>
          <table:table-cell table:style-name="表格134.A2" office:value-type="string">
            <text:p text:style-name="P32">需內部資安人員<text:soft-page-break/></text:p>
          </table:table-cell>
          <table:table-cell table:style-name="表格134.A2" office:value-type="string">
            <text:p text:style-name="P32">無須自建團隊<text:soft-page-break/></text:p>
          </table:table-cell>
        </table:table-row>
        <table:table-row table:style-name="表格134.1">
          <table:table-cell table:style-name="表格134.A3" office:value-type="string">
            <text:p text:style-name="P32">適合對象</text:p>
          </table:table-cell>
          <table:table-cell table:style-name="表格134.A3" office:value-type="string">
            <text:p text:style-name="P32">大型企業</text:p>
          </table:table-cell>
          <table:table-cell table:style-name="表格134.A3" office:value-type="string">
            <text:p text:style-name="P32">中小企業</text:p>
          </table:table-cell>
        </table:table-row>
        <table:table-row table:style-name="表格134.1">
          <table:table-cell table:style-name="表格134.A2" office:value-type="string">
            <text:p text:style-name="P32">成本模式</text:p>
          </table:table-cell>
          <table:table-cell table:style-name="表格134.A2" office:value-type="string">
            <text:p text:style-name="P32">工具費 + 人力</text:p>
          </table:table-cell>
          <table:table-cell table:style-name="表格134.A2" office:value-type="string">
            <text:p text:style-name="P32">月費 / 年費訂閱</text:p>
          </table:table-cell>
        </table:table-row>
      </table:table>
      <text:h text:style-name="P58" text:outline-level="3"><text:span text:style-name="T28">▍</text:span><text:span text:style-name="T29"> MITRE ATT&amp;CK — 駭客招式大全</text:span></text:h>
      <text:p text:style-name="P41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8">TTP</text:p>
            </table:table-cell>
            <table:table-cell table:style-name="表格135.A1" office:value-type="string">
              <text:p text:style-name="P28">意義</text:p>
            </table:table-cell>
            <table:table-cell table:style-name="表格135.A1" office:value-type="string">
              <text:p text:style-name="P2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4">T - Tactics</text:p>
          </table:table-cell>
          <table:table-cell table:style-name="表格135.A2" office:value-type="string">
            <text:p text:style-name="P44">戰術（攻擊目的）</text:p>
          </table:table-cell>
          <table:table-cell table:style-name="表格135.A2" office:value-type="string">
            <text:p text:style-name="P44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4">T - Techniques</text:p>
          </table:table-cell>
          <table:table-cell table:style-name="表格135.A3" office:value-type="string">
            <text:p text:style-name="P44">技術（使用方法）</text:p>
          </table:table-cell>
          <table:table-cell table:style-name="表格135.A3" office:value-type="string">
            <text:p text:style-name="P44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4">P - Procedures</text:p>
          </table:table-cell>
          <table:table-cell table:style-name="表格135.A2" office:value-type="string">
            <text:p text:style-name="P44">流程（實際操作步驟）</text:p>
          </table:table-cell>
          <table:table-cell table:style-name="表格135.A2" office:value-type="string">
            <text:p text:style-name="P44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51"><text:span text:style-name="T4">💡 <text:s/></text:span><text:span text:style-name="T29">核心觀念</text:span></text:p>
            <text:p text:style-name="P40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58" text:outline-level="3"><text:span text:style-name="T28">▍</text:span><text:span text:style-name="T2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3">❌ 以前的想法</text:p>
            </table:table-cell>
            <table:table-cell table:style-name="表格136.A1" office:value-type="string">
              <text:p text:style-name="P23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32">「不能被攻擊」——重點：阻止所有入侵。</text:p>
          </table:table-cell>
          <table:table-cell table:style-name="表格136.A2" office:value-type="string">
            <text:p text:style-name="P32">「被打了還能撐住並快速恢復」——重點：強化復原能力。</text:p>
          </table:table-cell>
        </table:table-row>
      </table:table>
      <text:p text:style-name="P5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51"><text:span text:style-name="T4">📝 <text:s/></text:span><text:span text:style-name="T140">一行記憶法</text:span></text:p>
            <text:p text:style-name="P52"><text:span text:style-name="T141">🛡 EDR → </text:span><text:span text:style-name="T9">自己買工具守　</text:span><text:span text:style-name="T141">👥 MDR → </text:span><text:span text:style-name="T9">請公司幫你守</text:span></text:p>
            <text:p text:style-name="P53"><text:span text:style-name="T141">📖 ATT&amp;CK → </text:span><text:span text:style-name="T9">駭客招式教材　</text:span><text:span text:style-name="T141">💪 韌性 → </text:span><text:span text:style-name="T9">撐住、快速復原</text:span></text:p>
          </table:table-cell>
        </table:table-row>
      </table:table>
      <text:h text:style-name="P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51"><text:span text:style-name="T4">📋 <text:s/></text:span><text:span text:style-name="T38">內容審查說明</text:span></text:p>
            <text:p text:style-name="P40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1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103"/>
            </table:table-cell>
            <table:table-cell table:style-name="表格139.A1" office:value-type="string">
              <text:p text:style-name="P24">傳統（城堡思維）</text:p>
            </table:table-cell>
            <table:table-cell table:style-name="表格139.A1" office:value-type="string">
              <text:p text:style-name="P24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32">核心假設</text:p>
          </table:table-cell>
          <table:table-cell table:style-name="表格139.A2" office:value-type="string">
            <text:p text:style-name="P32">內網 = 可信任</text:p>
          </table:table-cell>
          <table:table-cell table:style-name="表格139.A2" office:value-type="string">
            <text:p text:style-name="P3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32">防護重點</text:p>
          </table:table-cell>
          <table:table-cell table:style-name="表格139.A3" office:value-type="string">
            <text:p text:style-name="P32">網路邊界 / 防火牆</text:p>
          </table:table-cell>
          <table:table-cell table:style-name="表格139.A3" office:value-type="string">
            <text:p text:style-name="P32">身份 × 設備 × 情境</text:p>
          </table:table-cell>
        </table:table-row>
        <table:table-row table:style-name="表格139.1">
          <table:table-cell table:style-name="表格139.A2" office:value-type="string">
            <text:p text:style-name="P32">登入之後</text:p>
          </table:table-cell>
          <table:table-cell table:style-name="表格139.A2" office:value-type="string">
            <text:p text:style-name="P32">幾乎不再驗證</text:p>
          </table:table-cell>
          <table:table-cell table:style-name="表格139.A2" office:value-type="string">
            <text:p text:style-name="P32">每個操作持續驗證</text:p>
          </table:table-cell>
        </table:table-row>
        <table:table-row table:style-name="表格139.1">
          <table:table-cell table:style-name="表格139.A3" office:value-type="string">
            <text:p text:style-name="P32">駭客入侵後</text:p>
          </table:table-cell>
          <table:table-cell table:style-name="表格139.A3" office:value-type="string">
            <text:p text:style-name="P32">可橫向移動整個內網</text:p>
          </table:table-cell>
          <table:table-cell table:style-name="表格139.A3" office:value-type="string">
            <text:p text:style-name="P3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32">適合時代</text:p>
          </table:table-cell>
          <table:table-cell table:style-name="表格139.A2" office:value-type="string">
            <text:p text:style-name="P32">固定辦公室 / 單一內網</text:p>
          </table:table-cell>
          <table:table-cell table:style-name="表格139.A2" office:value-type="string">
            <text:p text:style-name="P3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51"><text:span text:style-name="T4">🔑 <text:s/></text:span><text:span text:style-name="T140">核心一句話</text:span></text:p>
            <text:p text:style-name="P71">❝ 永不信任，始終驗證 ❞（Never Trust, Always Verify）</text:p>
            <text:p text:style-name="P39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58" text:outline-level="3"><text:span text:style-name="T28">▍</text:span><text:span text:style-name="T2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8">支柱</text:p>
            </table:table-cell>
            <table:table-cell table:style-name="表格140.A1" office:value-type="string">
              <text:p text:style-name="P28">口訣</text:p>
            </table:table-cell>
            <table:table-cell table:style-name="表格140.A1" office:value-type="string">
              <text:p text:style-name="P2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4">🔑 Identity（身份驗證）</text:p>
          </table:table-cell>
          <table:table-cell table:style-name="表格140.A2" office:value-type="string">
            <text:p text:style-name="P44">人</text:p>
          </table:table-cell>
          <table:table-cell table:style-name="表格140.A2" office:value-type="string">
            <text:p text:style-name="P44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4">💻 Device（設備健康）</text:p>
          </table:table-cell>
          <table:table-cell table:style-name="表格140.A3" office:value-type="string">
            <text:p text:style-name="P44">機</text:p>
          </table:table-cell>
          <table:table-cell table:style-name="表格140.A3" office:value-type="string">
            <text:p text:style-name="P44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4">🌐 Context（存取情境）</text:p>
          </table:table-cell>
          <table:table-cell table:style-name="表格140.A2" office:value-type="string">
            <text:p text:style-name="P44">境</text:p>
          </table:table-cell>
          <table:table-cell table:style-name="表格140.A2" office:value-type="string">
            <text:p text:style-name="P44">評估環境是否異常：登入時間、地點、行為模式；凌晨從境外登入會觸發額外驗證</text:p>
          </table:table-cell>
        </table:table-row>
      </table:table>
      <text:h text:style-name="P58" text:outline-level="3"><text:span text:style-name="T28">▍</text:span><text:span text:style-name="T2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8">機制</text:p>
            </table:table-cell>
            <table:table-cell table:style-name="表格141.A1" office:value-type="string">
              <text:p text:style-name="P2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4">① MFA 多因素驗證</text:p>
          </table:table-cell>
          <table:table-cell table:style-name="表格141.A2" office:value-type="string">
            <text:p text:style-name="P44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4">② Least Privilege 最小權限</text:p>
          </table:table-cell>
          <table:table-cell table:style-name="表格141.A3" office:value-type="string">
            <text:p text:style-name="P44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4">③ Micro-Segmentation 微分段</text:p>
          </table:table-cell>
          <table:table-cell table:style-name="表格141.A2" office:value-type="string">
            <text:p text:style-name="P44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4">④ Continuous Monitoring 持續監控</text:p>
          </table:table-cell>
          <table:table-cell table:style-name="表格141.A3" office:value-type="string">
            <text:p text:style-name="P44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51"><text:span text:style-name="T4">🔥 <text:s/></text:span><text:span text:style-name="T29">考前 10 秒超濃縮</text:span></text:p>
            <text:p text:style-name="P40">ZT 核心：不信任任何人（含內網）；檢查三件事——人（Identity）、機（Device）、境（Context）；搭配四招——MFA ＋ 最小權限 ＋ 微分段 ＋ 持續監控。</text:p>
            <text:p text:style-name="P39">口訣：人機境，多驗、少給、切塊、一直看。</text:p>
          </table:table-cell>
          <table:covered-table-cell/>
        </table:table-row>
      </table:table>
      <text:h text:style-name="P58" text:outline-level="3"><text:span text:style-name="T28">▍</text:span><text:span text:style-name="T2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8">Step</text:p>
            </table:table-cell>
            <table:table-cell table:style-name="表格142.A1" office:value-type="string">
              <text:p text:style-name="P2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4">1 發出存取請求</text:p>
          </table:table-cell>
          <table:table-cell table:style-name="表格142.A2" office:value-type="string">
            <text:p text:style-name="P44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4">2 身份驗證 Identity</text:p>
          </table:table-cell>
          <table:table-cell table:style-name="表格142.A3" office:value-type="string">
            <text:p text:style-name="P44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4">3 設備驗證 Device</text:p>
          </table:table-cell>
          <table:table-cell table:style-name="表格142.A2" office:value-type="string">
            <text:p text:style-name="P44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4">4 情境評估 Context</text:p>
          </table:table-cell>
          <table:table-cell table:style-name="表格142.A3" office:value-type="string">
            <text:p text:style-name="P44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4">5 權限比對</text:p>
          </table:table-cell>
          <table:table-cell table:style-name="表格142.A2" office:value-type="string">
            <text:p text:style-name="P44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4">6 授權或拒絕</text:p>
          </table:table-cell>
          <table:table-cell table:style-name="表格142.A3" office:value-type="string">
            <text:p text:style-name="P44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4">7 持續監控</text:p>
          </table:table-cell>
          <table:table-cell table:style-name="表格142.A2" office:value-type="string">
            <text:p text:style-name="P44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51"><text:span text:style-name="T4">⚠️ <text:s/></text:span><text:span text:style-name="T38">公職考試陷阱整理</text:span></text:p>
            <text:p text:style-name="P52"><text:span text:style-name="T16">ZT = 完全不相信員工？　</text:span><text:span text:style-name="T9">✗ 重點是「每次都驗證」，驗證通過員工仍可正常使用，只是不再預設信任。</text:span></text:p>
            <text:p text:style-name="P53"><text:span text:style-name="T16">只有外網才危險？　</text:span><text:span text:style-name="T9">✗ 內網也可能：帳號被盜、設備中毒、內部人員惡意操作，故內網也須驗證。</text:span></text:p>
            <text:p text:style-name="P53"><text:span text:style-name="T16">登入一次後就永久可信？　</text:span><text:span text:style-name="T9">✗ 持續驗證，單次登入不代表長期信任，高風險行為會觸發重新驗證。</text:span></text:p>
            <text:p text:style-name="P53"><text:span text:style-name="T16">Zero Trust 重視網路位置？（超常考）　</text:span><text:span text:style-name="T9">✗ 完全相反！重點從「位置」轉移到「身份 / 設備 / 情境」。</text:span></text:p>
          </table:table-cell>
          <table:covered-table-cell/>
        </table:table-row>
      </table:table>
      <text:h text:style-name="P25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51"><text:span text:style-name="T4">✅ <text:s/></text:span><text:span text:style-name="T29">你已經完成一輪</text:span></text:p>
            <text:p text:style-name="P40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51"><text:span text:style-name="T4">🎯 <text:s/></text:span><text:span text:style-name="T140">五個高頻拿分重點</text:span></text:p>
            <text:p text:style-name="P40">① 分層先記責任：應用給人用、傳輸怎麼送、網路走哪條、連結同區網。</text:p>
            <text:p text:style-name="P39">② 計算題動手練：VLSM「需求+2→最小 2ⁿ→/(32−n)」、可用主機「2^主機bit −2」。</text:p>
            <text:p text:style-name="P39">③ 流程要會串：上網＝DNS→ARP→NAT；TCP＝握手→Slow Start→CA→丟包降速。</text:p>
            <text:p text:style-name="P39">④ 易混成對背：FW/WAF/NGFW、IDS/IPS、HIDS/NIDS、SNMP/ICMP、EDR/MDR、RTO/RPO、Recursive/Iterative。</text:p>
            <text:p text:style-name="P39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2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255</meta:editing-cycles>
    <meta:creation-date>2026-06-12T00:41:46.189000000</meta:creation-date>
    <dc:date>2026-06-15T09:29:04.807000000</dc:date>
    <meta:generator>MODA_ODF_Application_Tools/3.8.4.2$Windows_X86_64 LibreOffice_project/4fb77107d5af14329e08085efe4fa19b5633383a</meta:generator>
    <meta:editing-duration>P1DT18H37M50S</meta:editing-duration>
    <meta:document-statistic meta:table-count="143" meta:image-count="0" meta:object-count="0" meta:page-count="51" meta:paragraph-count="2293" meta:word-count="29740" meta:character-count="46869" meta:non-whitespace-character-count="42316"/>
  </office:meta>
</office:document-meta>
</file>