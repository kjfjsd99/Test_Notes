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ff91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d47a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5ff" loext:opacity="100%" style:font-name="Microsoft JhengHei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48fb1" loext:opacity="100%" style:font-name="Microsoft JhengHei" fo:font-size="9.5pt" fo:font-style="normal" fo:font-weight="bold" fo:background-color="#880e4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93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94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9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9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97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5" style:family="text">
      <style:text-properties fo:color="#76ff03" loext:opacity="100%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d740" loext:opacity="100%" fo:background-color="#3d5afe" loext:char-shading-value="0"/>
    </style:style>
    <style:style style:name="T78" style:family="text">
      <style:text-properties fo:color="#18ffff" loext:opacity="100%" fo:background-color="#d500f9" loext:char-shading-value="0"/>
    </style:style>
    <style:style style:name="T7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1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8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9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96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font-weight="bold" fo:background-color="#ffff00" loext:char-shading-value="0" style:font-weight-asian="bold" style:font-weight-complex="bold"/>
    </style:style>
    <style:style style:name="T10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0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7" style:family="text">
      <style:text-properties fo:font-weight="bold" fo:background-color="#ffd740" loext:char-shading-value="0" style:font-weight-asian="bold" style:font-weight-complex="bold"/>
    </style:style>
    <style:style style:name="T108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9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10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11" style:family="text">
      <style:text-properties fo:font-weight="bold" fo:background-color="#18ffff" loext:char-shading-value="0" style:font-weight-asian="bold" style:font-weight-complex="bold"/>
    </style:style>
    <style:style style:name="T11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13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4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8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21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22" style:family="text">
      <style:text-properties fo:font-weight="bold" fo:background-color="#ffea00" loext:char-shading-value="0" style:font-weight-asian="bold" style:font-weight-complex="bold"/>
    </style:style>
    <style:style style:name="T123" style:family="text">
      <style:text-properties fo:font-weight="bold" fo:background-color="#76ff03" loext:char-shading-value="0" style:font-weight-asian="bold" style:font-weight-complex="bold"/>
    </style:style>
    <style:style style:name="T124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25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6" style:family="text">
      <style:text-properties fo:background-color="#ffd740" loext:char-shading-value="0"/>
    </style:style>
    <style:style style:name="T127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128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2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134" style:family="text">
      <style:text-properties fo:background-color="#ffff00" loext:char-shading-value="0"/>
    </style:style>
    <style:style style:name="T135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9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0" style:family="text">
      <style:text-properties fo:color="#ffea00" loext:opacity="100%" fo:font-weight="bold" fo:background-color="#1b5e20" loext:char-shading-value="0" style:font-weight-asian="bold" style:font-weight-complex="bold"/>
    </style:style>
    <style:style style:name="T141" style:family="text">
      <style:text-properties fo:color="#64ffda" loext:opacity="100%" fo:font-weight="bold" fo:background-color="#004d40" loext:char-shading-value="0" style:font-weight-asian="bold" style:font-weight-complex="bold"/>
    </style:style>
    <style:style style:name="T14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143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23"> 將需求由大到小排序</text:span></text:p>
            <text:p text:style-name="P22"><text:span text:style-name="T10">② </text:span><text:span text:style-name="T69">計算每個需求所需前綴</text:span><text:span text:style-name="T10">：</text:span><text:span text:style-name="T36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65">子網路的起始位址必須是其大小的整數倍</text:span><text:span text:style-name="T4">。</text:span><text:span text:style-name="T70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1">再切大的 A（/25，128 個），最近可用對齊位址是 128</text:span><text:span text:style-name="T4"> → </text:span><text:span text:style-name="T72">中間 16～127 共 112 個 IP 全浪費！</text:span><text:span text:style-name="T4">正解：</text:span><text:span text:style-name="T31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3">前綴計算公式詳解</text:span><text:span text:style-name="T9">（以</text:span><text:span text:style-name="T74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12">加 2（預留網路 + 廣播）</text:span>：<text:span text:style-name="T20">100 + 2 = 102</text:span></text:p>
            <text:p text:style-name="P12">② <text:span text:style-name="T23">找「大於等於 102」的最小 2ⁿ</text:span>：2⁶ = 64（太小）、<text:span text:style-name="T28">2⁷ = 128（夠）→ n = 7</text:span></text:p>
            <text:p text:style-name="P12">③ <text:span text:style-name="T29">前綴 = 32 − n = 32 − 7 = 25</text:span> →<text:span text:style-name="T75"> </text:span><text:span text:style-name="T76">使用 /25（驗證：2⁷ = 128，可用 126 ≥ 100 ✔）</text:span></text:p>
            <text:p text:style-name="P70"><text:span text:style-name="T20">公式一句話</text:span>：<text:span text:style-name="T77">需求 +2 → 找最小 2ⁿ</text:span> → <text:span text:style-name="T78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16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12">/25</text:span>（0～<text:span text:style-name="T26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16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12">/26</text:span>（128～<text:span text:style-name="T26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16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12">/28</text:span>（192～<text:span text:style-name="T26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79">快速判斷一個 IP 屬於哪個 /26 子網</text:span>（<text:span text:style-name="T28">每段 64 個，起點 0、64、128、192</text:span>）：<text:span text:style-name="T16">看最後一個 Octet 落在哪個區間 </text:span>→</text:p>
            <text:p text:style-name="P12"><text:span text:style-name="T12">0～63</text:span> → x.0/26　｜　<text:span text:style-name="T12">64～127</text:span> → x.64/26　｜　<text:span text:style-name="T12">128～191</text:span> → x.128/26　｜　<text:span text:style-name="T12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25">VLSM 把大網路切小</text:span>；<text:span text:style-name="T80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81"><text:s/></text:span><text:span text:style-name="T82">合併三條件（缺一不可）</text:span></text:p>
            <text:p text:style-name="P11"><text:span text:style-name="T10">① </text:span><text:span text:style-name="T69">連續（Contiguous）</text:span><text:span text:style-name="T10">：</text:span><text:span text:style-name="T65">IP 範圍必須緊鄰</text:span><text:span text:style-name="T4">，</text:span><text:span text:style-name="T31">中間不能有空缺</text:span><text:span text:style-name="T4">。</text:span></text:p>
            <text:p text:style-name="P22"><text:span text:style-name="T10">② </text:span><text:span text:style-name="T69">數量是 2ⁿ</text:span><text:span text:style-name="T10">：</text:span><text:span text:style-name="T4">2、4、8…。</text:span></text:p>
            <text:p text:style-name="P22"><text:span text:style-name="T10">③ </text:span><text:span text:style-name="T69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83">2 個 /25 → 1 個 /24</text:span><text:span text:style-name="T15">　</text:span><text:span text:style-name="T4">192.168.1</text:span><text:span text:style-name="T35">.0</text:span><text:span text:style-name="T4">/25 ＋ 192.168.1</text:span><text:span text:style-name="T35">.128</text:span><text:span text:style-name="T4">/25 → ① 緊鄰✔ ② 2 個（2¹）✔ ③ 起點 .0，0÷256=0✔ → 合併為 192.168.1</text:span><text:span text:style-name="T35">.0</text:span><text:span text:style-name="T4">/24。</text:span></text:p>
            <text:p text:style-name="P22"><text:span text:style-name="T15">範例：</text:span><text:span text:style-name="T83">4 個 /24 → 1 個 /22</text:span><text:span text:style-name="T15">　</text:span><text:span text:style-name="T4">192.168</text:span><text:span text:style-name="T59">.0/1/2/3</text:span><text:span text:style-name="T4">.0/</text:span><text:span text:style-name="T55">24</text:span><text:span text:style-name="T4"> → 連續✔、4 個（2²）✔、對齊✔ → 合併為 192.168</text:span><text:span text:style-name="T84">.0</text:span><text:span text:style-name="T4">.0/</text:span><text:span text:style-name="T55">22</text:span><text:span text:style-name="T4">。</text:span></text:p>
            <text:p text:style-name="P22"><text:span text:style-name="T85">反例（無法合併）：</text:span><text:span text:style-name="T86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31">每合併一倍，/ 的數字減 1</text:span><text:span text:style-name="T4">）。</text:span></text:p>
            <text:p text:style-name="P12"><text:span text:style-name="T87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39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12">由大到小</text:span>；<text:span text:style-name="T28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29">連續</text:span> + 數量 2ⁿ + 對齊；<text:span text:style-name="T16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88">考試標準解題流程</text:span></text:p>
            <text:p text:style-name="P11"><text:span text:style-name="T89">遇到 VLSM 題：</text:span><text:span text:style-name="T90">確認起始網路</text:span><text:span text:style-name="T4"> → </text:span><text:span text:style-name="T91">需求由大到小</text:span><text:span text:style-name="T4"> → </text:span><text:span text:style-name="T92">各需求 +2 找 2ⁿ 算前綴</text:span><text:span text:style-name="T4"> → </text:span><text:span text:style-name="T93">大的先切</text:span><text:span text:style-name="T4">依序往後 → </text:span><text:span text:style-name="T94">驗證網路位址/廣播位址/可用範圍</text:span><text:span text:style-name="T4">。</text:span></text:p>
            <text:p text:style-name="P22"><text:span text:style-name="T89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95">一條網路，一次最多</text:span><text:span text:style-name="T19">)</text:span></text:h>
      <text:p text:style-name="P36"><text:span text:style-name="T16">MTU</text:span> ＝ <text:span text:style-name="T27">Maximum Transmission Unit，</text:span><text:span text:style-name="T96">一條網路</text:span><text:span text:style-name="T27">「</text:span><text:span text:style-name="T97">一次最多</text:span><text:span text:style-name="T27">能傳送的</text:span><text:span text:style-name="T98">封包大小</text:span><text:span text:style-name="T27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29">若封包大小 &gt; MTU，就必須「切開」才能傳送</text:span>，這個動作就叫 <text:span text:style-name="T61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12">MTU = 1500</text:span>（<text:span text:style-name="T28">每段扣掉 20 bytes IP Header</text:span>，<text:span text:style-name="T16">剩 1480 可放資料</text:span>）</text:p>
            <text:p text:style-name="P7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4">✅ 可以</text:p>
          </table:table-cell>
          <table:table-cell table:style-name="表格49.A3" office:value-type="string">
            <text:p text:style-name="P75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6">❌ 不行</text:p>
          </table:table-cell>
          <table:table-cell table:style-name="表格49.A4" office:value-type="string">
            <text:p text:style-name="P23"><text:span text:style-name="T53">Router 不分段</text:span>，<text:span text:style-name="T25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50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50">Identification</text:span><text:span text:style-name="T34">：</text:span><text:span text:style-name="T65">同一原始封包的所有分段共用同一 ID</text:span><text:span text:style-name="T4">；</text:span><text:span text:style-name="T99">接收端靠此 ID 判斷哪些 fragment 要拼在一起</text:span><text:span text:style-name="T4">。</text:span></text:p>
            <text:p text:style-name="P22"><text:span text:style-name="T34">(3) </text:span><text:span text:style-name="T50">Fragment Offset</text:span><text:span text:style-name="T34">：</text:span><text:span text:style-name="T31">這段資料在原始封包中的「起始位置」</text:span><text:span text:style-name="T4">。⚠️ 單位是 8 bytes（欄位僅 13 bits）→ </text:span><text:span text:style-name="T31">Offset = 起始位置 ÷ 8</text:span><text:span text:style-name="T4">。</text:span></text:p>
            <text:p text:style-name="P22"><text:span text:style-name="T34">(4) </text:span><text:span text:style-name="T50">TTL</text:span><text:span text:style-name="T34">：</text:span><text:span text:style-name="T100">最多可經過幾個 Router；每經過一個 −1</text:span><text:span text:style-name="T4">，</text:span><text:span text:style-name="T94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50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2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2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7">ICMP</text:p>
          </table:table-cell>
          <table:table-cell table:style-name="表格50.A3" table:number-columns-spanned="2" office:value-type="string">
            <text:p text:style-name="P78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39">DF</text:p>
          </table:table-cell>
          <table:table-cell table:style-name="表格51.A2" office:value-type="string">
            <text:p text:style-name="P39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38">MF</text:p>
          </table:table-cell>
          <table:table-cell table:style-name="表格51.A3" office:value-type="string">
            <text:p text:style-name="P38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<text:span text:style-name="T101">DF=1，不准切</text:span>）→ ② 到某 Router，發現<text:span text:style-name="T102">封包 &gt; 該路段 MTU</text:span> → ③ <text:span text:style-name="T103">Router 不能切，直接丟棄 </text:span>→ ④ <text:span text:style-name="T104">Router 回傳 ICMP「Fragmentation Needed」（含可用 MTU 大小）</text:span>→ ⑤ <text:span text:style-name="T105">送端調整封包大小後</text:span><text:span text:style-name="T106">重送</text:span>。這就是 <text:span text:style-name="T107">PMTUD 的核心機制</text:span>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<text:span text:style-name="T101">PMTUD </text:span>＝<text:span text:style-name="T108"> Path MTU Discovery，自動找出</text:span><text:span text:style-name="T109">來源到目的地</text:span><text:span text:style-name="T108">整條路徑中</text:span><text:span text:style-name="T110">最小的 MTU 值</text:span>。<text:span text:style-name="T111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79">IPv4</text:p>
          </table:table-cell>
          <table:table-cell table:style-name="表格52.A2" office:value-type="string">
            <text:p text:style-name="P80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79">IPv6</text:p>
          </table:table-cell>
          <table:table-cell table:style-name="表格52.A3" office:value-type="string">
            <text:p text:style-name="P80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<text:span text:style-name="T112">TCP 不依賴 IP 層切封包，而是「自己先控制好大小」</text:span>，<text:span text:style-name="T101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113">MSS = MTU − IP Header − TCP Header </text:span><text:span text:style-name="T4">= </text:span><text:span text:style-name="T114">1500 − 20 − 20 = 1460 bytes</text:span><text:span text:style-name="T4">。</text:span><text:span text:style-name="T115">三向交握時雙方各自宣告 MSS，之後每段 ≤ MSS</text:span><text:span text:style-name="T4">，</text:span><text:span text:style-name="T114">讓 IP 層不需分段</text:span><text:span text:style-name="T4">。</text:span></text:p>
            <text:p text:style-name="P22"><text:span text:style-name="T34">搭配 DF=1 + PMTUD：</text:span><text:span text:style-name="T4">TCP 連線設 DF=1 禁止 Router 分段；</text:span><text:span text:style-name="T116">若收到 ICMP「Fragmentation Needed」，自動調低 MSS 重試</text:span><text:span text:style-name="T4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88">結論</text:span></text:p>
            <text:p text:style-name="P18"><text:span text:style-name="T117">TCP = 主動控制大小（MSS）＋ DF=1 ＋ PMTUD</text:span>，<text:span text:style-name="T118">從源頭就避免 Fragmentation 發生</text:span>。<text:span text:style-name="T119">TCP 做 Segmentation 的主要目的之一，就是讓每個封包符合 MTU</text:span>，從而避免 IP 再做 Fragmentation。</text:p>
          </table:table-cell>
        </table:table-row>
      </table:table>
      <text:h text:style-name="P19" text:outline-level="2">拾肆、Fragmentation DoS 攻擊</text:h>
      <text:p text:style-name="P36"><text:span text:style-name="T105">攻擊者利用「接收端重組封包很耗資源」這個特性</text:span>，<text:span text:style-name="T112">刻意製造大量異常 Fragment</text:span>。正常重組流程：收到 Fragment <text:span text:style-name="T120">放入緩衝區 </text:span>→ <text:span text:style-name="T104">等同一 ID 的所有 Fragment 到齊 → 依</text:span><text:span text:style-name="T121"> Offset </text:span><text:span text:style-name="T104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81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81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<text:span text:style-name="T107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81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88">防禦方式</text:span></text:p>
            <text:p text:style-name="P18">防禦：<text:span text:style-name="T122">設定重組 buffer 上限</text:span>避免無限占用記憶體；<text:span text:style-name="T123">丟棄等待過久或異常的 Fragment</text:span>；<text:span text:style-name="T111">部署 IDS / Firewall 偵測異常分段</text:span>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80">Identification</text:p>
          </table:table-cell>
          <table:table-cell table:style-name="表格55.A2" office:value-type="string">
            <text:p text:style-name="P79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80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2">PMTUD</text:p>
          </table:table-cell>
          <table:table-cell table:style-name="表格55.A2" office:value-type="string">
            <text:p text:style-name="P8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84">TTL</text:p>
          </table:table-cell>
          <table:table-cell table:style-name="表格55.A3" office:value-type="string">
            <text:p text:style-name="P85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80">MSS</text:p>
          </table:table-cell>
          <table:table-cell table:style-name="表格55.A2" office:value-type="string">
            <text:p text:style-name="P79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<text:span text:style-name="T105">32 bit</text:span>，約 43 億個 IP，已嚴重不足</text:p>
          </table:table-cell>
          <table:table-cell table:style-name="表格57.A2" office:value-type="string">
            <text:p text:style-name="P23"><text:span text:style-name="T119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<text:span text:style-name="T101">需 NAT 共用 IP</text:span>，破壞 End-to-End</text:p>
          </table:table-cell>
          <table:table-cell table:style-name="表格57.A3" office:value-type="string">
            <text:p text:style-name="P23"><text:span text:style-name="T107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<text:span text:style-name="T101">須另裝 VPN</text:span></text:p>
          </table:table-cell>
          <table:table-cell table:style-name="表格57.A2" office:value-type="string">
            <text:p text:style-name="P23"><text:span text:style-name="T124">支援 IPsec</text:span><text:span text:style-name="T107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<text:span text:style-name="T101">可變長度</text:span>含 Options，Router 效率低</text:p>
          </table:table-cell>
          <table:table-cell table:style-name="表格57.A3" office:value-type="string">
            <text:p text:style-name="P23"><text:span text:style-name="T107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79">無法有效標記流量優先權</text:p>
          </table:table-cell>
          <table:table-cell table:style-name="表格57.A2" office:value-type="string">
            <text:p text:style-name="P23"><text:span text:style-name="T107">Flow Label 欄位</text:span>，<text:span text:style-name="T125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<text:span text:style-name="T101">Broadcast</text:span>：一次發給所有人，浪費頻寬</text:p>
          </table:table-cell>
          <table:table-cell table:style-name="表格57.A3" office:value-type="string">
            <text:p text:style-name="P23">改用<text:span text:style-name="T107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<text:span text:style-name="T111">需手動設定或 DHCP</text:span>，管理繁瑣</text:p>
          </table:table-cell>
          <table:table-cell table:style-name="表格57.A2" office:value-type="string">
            <text:p text:style-name="P23">SLAAC 無狀態自動配置，<text:span text:style-name="T112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<text:span text:style-name="T126">Dual Stack（雙協定堆疊）</text:span>— 最常用、最推薦</text:p>
            <text:p text:style-name="P12"><text:span text:style-name="T127">裝置同時具備 IPv4 與 IPv6 兩套協定堆疊</text:span>。<text:span text:style-name="T101">DNS A record → 回傳 IPv4；DNS AAAA record → 回傳 IPv6</text:span>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6">②<text:span text:style-name="T126"> Tunneling（隧道技術）</text:span>— 過渡期橋接方案</text:p>
            <text:p text:style-name="P12">中間網路只支援 IPv4，無法直接傳送 IPv6 封包。解法：<text:span text:style-name="T127">將 IPv6 封包完整封裝進 IPv4 外殼，抵達目的地後拆除外層 IPv4、還原 IPv6 封包</text:span>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7">③ <text:span text:style-name="T126">Translation（NAT64）</text:span>— 協定轉換、互通最後手段</text:p>
            <text:p text:style-name="P12">適用場景：IPv6-only 裝置需與 IPv4-only 裝置直接通訊。<text:span text:style-name="T118">透過轉換閘道器即時將封包表頭轉換為對方格式</text:span>。代表技術：NAT64 + DNS64。<text:span text:style-name="T102">複雜度最高，有額外效能損耗</text:span>。</text:p>
            <text:p text:style-name="P12">示意：IPv6 裝置 → [ NAT64 <text:span text:style-name="T120">轉換閘道</text:span>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<text:span text:style-name="T101">同時會中文 + 英文</text:span>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<text:span text:style-name="T112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<text:span text:style-name="T104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128">IPv4 的困境：整棟公寓共用一個門牌</text:span><text:span text:style-name="T129">（NAT）</text:span><text:span text:style-name="T4">，郵差只送到大門，裡面誰是誰要另外猜；地址快用光還在借號碼。</text:span></text:p>
            <text:p text:style-name="P22"><text:span text:style-name="T116">IPv6 的世界：每個人都有獨立門牌（公開 IP）</text:span><text:span text:style-name="T4">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</text:span><text:span text:style-name="T130">安全（IPsec）</text:span><text:span text:style-name="T4">＋ </text:span><text:span text:style-name="T131">快（固定 Header）</text:span><text:span text:style-name="T4">＋ 自動（SLAAC）＋ 乾淨（無 Broadcast）。</text:span></text:p>
            <text:p text:style-name="P22"><text:span text:style-name="T132">過渡技術</text:span><text:span text:style-name="T48">：</text:span><text:span text:style-name="T4">雙語（</text:span><text:span text:style-name="T114">Dual Stack</text:span><text:span text:style-name="T4">）＋ 偽裝（</text:span><text:span text:style-name="T114">Tunneling</text:span><text:span text:style-name="T4">）＋ 翻譯（</text:span><text:span text:style-name="T114">Translation</text:span><text:span text:style-name="T4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<text:span text:style-name="T133">Header 可變效率低</text:span>／缺 QoS／用 Broadcast 浪費／IP 需手動設定</text:p>
          </table:table-cell>
          <table:table-cell table:style-name="表格60.A3" office:value-type="string">
            <text:p text:style-name="P23">128 bit 近乎無限／不需 NAT 恢復 E2E／<text:span text:style-name="T124">支援 IPsec</text:span>／<text:span text:style-name="T124">固定 40 bytes 轉送快</text:span>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4">IP 位址決定「最終送到哪台電腦」；MAC 位址決定「目前這一跳要交給哪個網路設備」。</text:span></text:p>
            <text:p text:style-name="P12"><text:span text:style-name="T110">資料在網路中「實際傳送」靠 MAC</text:span>，<text:span text:style-name="T119">但我們只知道對方的 IP</text:span>——所以<text:span text:style-name="T125">需要一個轉換機制</text:span>，這就是 ARP 的工作。</text:p>
          </table:table-cell>
        </table:table-row>
      </table:table>
      <text:h text:style-name="P19" text:outline-level="2">一、ARP（Address Resolution Protocol）：<text:span text:style-name="T134">IP → MAC</text:span></text:h>
      <text:p text:style-name="P36">一句話定義：<text:span text:style-name="T107">ARP</text:span> ＝ <text:span text:style-name="T112">用 IP 找 MAC</text:span>，<text:span text:style-name="T105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</text:span><text:span text:style-name="T135">查 ARP Cache（筆記本）</text:span><text:span text:style-name="T34">：</text:span><text:span text:style-name="T4">先查自己的記錄「</text:span><text:span text:style-name="T136">我之前有沒有問過這個 IP？</text:span><text:span text:style-name="T4">」有 → 直接用。</text:span></text:p>
            <text:p text:style-name="P22"><text:span text:style-name="T34">② </text:span><text:span text:style-name="T135">發出 ARP Request（廣播）</text:span><text:span text:style-name="T34">：</text:span><text:span text:style-name="T4">沒記錄 →</text:span><text:span text:style-name="T137"> 對整個區網廣播</text:span><text:span text:style-name="T4">「誰是 192.168.1.5？</text:span><text:span text:style-name="T137">請告訴我你的 MAC！</text:span><text:span text:style-name="T4">」所有機器都收到。</text:span></text:p>
            <text:p text:style-name="P22"><text:span text:style-name="T34">③ </text:span><text:span text:style-name="T135">收到 ARP Reply（單播回應）</text:span><text:span text:style-name="T34">：</text:span><text:span text:style-name="T138">IP 是 192.168.1.5 的機器回應「我是！MAC 是 AA:BB:CC」</text:span><text:span text:style-name="T4">，其餘機器靜默忽略。</text:span></text:p>
            <text:p text:style-name="P22"><text:span text:style-name="T34">④ </text:span><text:span text:style-name="T135">存進 ARP Cache</text:span><text:span text:style-name="T34">：</text:span><text:span text:style-name="T139">把「IP ↔ MAC」對應記下</text:span><text:span text:style-name="T4">，</text:span><text:span text:style-name="T116">下次直接用</text:span><text:span text:style-name="T4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88">ARP Spoofing（ARP 欺騙）</text:p>
          </table:table-cell>
          <table:table-cell table:style-name="表格62.A3" office:value-type="string">
            <text:p text:style-name="P23"><text:span text:style-name="T119">攻擊者</text:span><text:span text:style-name="T140">假冒他人</text:span><text:span text:style-name="T119">的 MAC，讓封包被送到錯的地方</text:span> → 中間人攻擊（MITM）</text:p>
          </table:table-cell>
        </table:table-row>
        <table:table-row table:style-name="表格62.1">
          <table:table-cell table:style-name="表格62.A4" office:value-type="string">
            <text:p text:style-name="P79">arp -a</text:p>
          </table:table-cell>
          <table:table-cell table:style-name="表格62.A4" office:value-type="string">
            <text:p text:style-name="P23"><text:span text:style-name="T110">查看本機的 ARP 對應表</text:span>（<text:span text:style-name="T122">IP ↔ MAC 清單</text:span>）</text:p>
          </table:table-cell>
        </table:table-row>
        <table:table-row table:style-name="表格62.1">
          <table:table-cell table:style-name="表格62.A3" office:value-type="string">
            <text:p text:style-name="P89">ping [IP]</text:p>
          </table:table-cell>
          <table:table-cell table:style-name="表格62.A3" office:value-type="string">
            <text:p text:style-name="P23"><text:span text:style-name="T112">觸發 ARP 運作</text:span>，<text:span text:style-name="T105">讓電腦主動查詢對應 MAC</text:span></text:p>
          </table:table-cell>
        </table:table-row>
      </table:table>
      <text:h text:style-name="P19" text:outline-level="2">二、NAT（Network Address Translation）：私網 → 公網</text:h>
      <text:p text:style-name="P36">一句話定義：<text:span text:style-name="T101">NAT</text:span> ＝ <text:span text:style-name="T141">路由器幫你把「私有 IP」改成「公網 IP」</text:span>，讓內部機器能夠上網。<text:span text:style-name="T142">私有 IP（如 192.168.1.2）外網看不到，只在家裡用</text:span>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<text:span text:style-name="T125">封包抵達路由器</text:span>，<text:span text:style-name="T105">NAT 把來源 IP 改成公網 IP（220.x.x.x）</text:span><text:span text:style-name="T133">對外偽裝身份</text:span>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80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90">一個私有 IP ↔ 一個公網 IP</text:p>
          </table:table-cell>
          <table:table-cell table:style-name="表格63.A3" office:value-type="string">
            <text:p text:style-name="P90">固定對應</text:p>
          </table:table-cell>
        </table:table-row>
        <table:table-row table:style-name="表格63.1">
          <table:table-cell table:style-name="表格63.A4" office:value-type="string">
            <text:p text:style-name="P80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91">多個私有 IP 對應 IP 池（pool）</text:p>
          </table:table-cell>
          <table:table-cell table:style-name="表格63.A4" office:value-type="string">
            <text:p text:style-name="P91">動態分配</text:p>
          </table:table-cell>
        </table:table-row>
        <table:table-row table:style-name="表格63.1">
          <table:table-cell table:style-name="表格63.A3" office:value-type="string">
            <text:p text:style-name="P88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92">多台共用一個公網 IP</text:p>
          </table:table-cell>
          <table:table-cell table:style-name="表格63.A3" office:value-type="string">
            <text:p text:style-name="P92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85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7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85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85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85">✗ 以為 ARP 是找 Google 的 MAC　→　</text:span><text:span text:style-name="T4">✓ ARP 找的是「路由器」的 MAC！因為 ARP 只能在同一個 LAN 內使用。</text:span></text:p>
            <text:p text:style-name="P22"><text:span text:style-name="T85">✗ 以為封包直接送到 Google　→　</text:span><text:span text:style-name="T4">✓ 封包先送給路由器，路由器再轉到 Internet。</text:span></text:p>
            <text:p text:style-name="P22"><text:span text:style-name="T85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88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93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85">✗ 常見錯誤：</text:span><text:span text:style-name="T4">視窗 = cwnd（擁塞視窗）。</text:span><text:span text:style-name="T89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93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94">步驟</text:p>
          </table:table-cell>
          <table:table-cell table:style-name="表格84.A2" office:value-type="string">
            <text:p text:style-name="P94">層級</text:p>
          </table:table-cell>
          <table:table-cell table:style-name="表格84.A2" office:value-type="string">
            <text:p text:style-name="P94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7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88">申論題標準答案</text:span></text:p>
            <text:p text:style-name="P11"><text:span text:style-name="T89">一、DNS 功能：</text:span><text:span text:style-name="T4">DNS 為網際網路中負責將網域名稱轉換為 IP 位址的分散式系統。</text:span></text:p>
            <text:p text:style-name="P22"><text:soft-page-break/><text:span text:style-name="T89">二、查詢流程：</text:span><text:span text:style-name="T4">由快取開始，依序向 Local DNS、Root DNS、TLD DNS、Authoritative DNS 查詢，最終取得 IP 位址。</text:span></text:p>
            <text:p text:style-name="P22"><text:span text:style-name="T89">三、Recursive：</text:span><text:span text:style-name="T4">由 DNS 伺服器代替用戶端完整查詢並直接回傳最終 IP，用戶端只需等待結果。</text:span></text:p>
            <text:p text:style-name="P22"><text:span text:style-name="T89">四、Iterative：</text:span><text:span text:style-name="T4">DNS 伺服器僅回應下一步查詢位置，由用戶端自行逐層向各 DNS 查詢，直到取得 IP。</text:span></text:p>
            <text:p text:style-name="P22"><text:span text:style-name="T89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85">✗ ABR 負責連接外部網路　→　</text:span><text:span text:style-name="T4">✓ ABR 只負責 Area 之間的橋樑，對外是 ASBR 的工作。</text:span></text:p>
            <text:p text:style-name="P22"><text:span text:style-name="T85">✗ ASBR 是用來跨越不同 Area　→　</text:span><text:span text:style-name="T4">✓ ASBR 是跨越不同 AS（整個系統），不是跨 Area。</text:span></text:p>
            <text:p text:style-name="P22"><text:span text:style-name="T85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94">步驟</text:p>
            </table:table-cell>
            <table:table-cell table:style-name="表格94.A1" office:value-type="string">
              <text:p text:style-name="P94">屬性</text:p>
            </table:table-cell>
            <table:table-cell table:style-name="表格94.A1" office:value-type="string">
              <text:p text:style-name="P94">說明</text:p>
            </table:table-cell>
            <table:table-cell table:style-name="表格94.A1" office:value-type="string">
              <text:p text:style-name="P94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85">✗ AS-PATH 是 BGP 選路最重要的屬性　→　</text:span><text:span text:style-name="T4">✓ Local Preference 才是最重要的通用屬性（Weight 是 Cisco 私有）。</text:span></text:p>
            <text:p text:style-name="P22"><text:span text:style-name="T85">✗ AS-PATH 越短就一定會選那條　→　</text:span><text:span text:style-name="T4">✓ 只有前面的屬性（Local Pref 等）完全相同時，才會比較 AS-PATH。</text:span></text:p>
            <text:p text:style-name="P22"><text:span text:style-name="T85">✗ BGP 會自己計算最短路徑　→　</text:span><text:span text:style-name="T4">✓ BGP 不算距離，OSPF 才做最短路徑計算。</text:span></text:p>
            <text:p text:style-name="P22"><text:span text:style-name="T85">✗ iBGP 比 eBGP 優先　→　</text:span><text:span text:style-name="T4">✓ eBGP 優先於 iBGP（外部路由更可信）。</text:span></text:p>
            <text:p text:style-name="P22"><text:span text:style-name="T85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85">✗ 封包送不出去 → 一定是 BGP 問題　→　</text:span><text:span text:style-name="T4">✓ 應依序排查：防火牆有沒有擋？NAT 有沒有設？BGP 有沒有路？</text:span></text:p>
            <text:p text:style-name="P22"><text:span text:style-name="T85">✗ 有路但連不到 → 是 BGP 路由問題　→　</text:span><text:span text:style-name="T4">✓ 通常是防火牆或 NAT 問題，不是 BGP。</text:span></text:p>
            <text:p text:style-name="P22"><text:span text:style-name="T85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43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43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43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94">口訣</text:p>
          </table:table-cell>
          <table:table-cell table:style-name="表格116.A2" office:value-type="string">
            <text:p text:style-name="P94">IOC 類型</text:p>
          </table:table-cell>
          <table:table-cell table:style-name="表格116.A2" office:value-type="string">
            <text:p text:style-name="P94">白話說明</text:p>
          </table:table-cell>
          <table:table-cell table:style-name="表格116.A2" office:value-type="string">
            <text:p text:style-name="P94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88">防禦核心：Prepared Statement（預備語句）</text:span></text:p>
            <text:p text:style-name="P11"><text:span text:style-name="T89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94">Step</text:p>
            </table:table-cell>
            <table:table-cell table:style-name="表格122.A1" office:value-type="string">
              <text:p text:style-name="P94">階段</text:p>
            </table:table-cell>
            <table:table-cell table:style-name="表格122.A1" office:value-type="string">
              <text:p text:style-name="P94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93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93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85">① IDS 可以自動阻擋攻擊　→　</text:span><text:span text:style-name="T4">✓ IDS 只偵測＋發警報，IPS 才會阻擋。</text:span></text:p>
            <text:p text:style-name="P22"><text:span text:style-name="T85">② Firewall 可以偵測異常行為　→　</text:span><text:span text:style-name="T4">✓ Firewall 依規則（IP/Port）過濾，不做行為分析。</text:span></text:p>
            <text:p text:style-name="P22"><text:soft-page-break/><text:span text:style-name="T85">③ HIDS 用來監控網路封包　→　</text:span><text:span text:style-name="T4">✓ HIDS 監控主機 Log 與系統行為，封包是 NIDS 的工作。</text:span></text:p>
            <text:p text:style-name="P22"><text:span text:style-name="T85">④ ICMP 用來監控設備狀態　→　</text:span><text:span text:style-name="T4">✓ ICMP 只診斷網路（Ping），監控設備是 SNMP。</text:span></text:p>
            <text:p text:style-name="P22"><text:span text:style-name="T85">⑤ ICMP 屬於 Application Layer　→　</text:span><text:span text:style-name="T4">✓ ICMP 屬 Network Layer，SNMP 才是 Application Layer。</text:span></text:p>
            <text:p text:style-name="P22"><text:span text:style-name="T85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95">題目</text:p>
            </table:table-cell>
            <table:table-cell table:style-name="表格127.A1" office:value-type="string">
              <text:p text:style-name="P95">答案</text:p>
            </table:table-cell>
            <table:table-cell table:style-name="表格127.A1" office:value-type="string">
              <text:p text:style-name="P95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96">Q1 何者負責「過濾進出網路流量」？</text:p>
          </table:table-cell>
          <table:table-cell table:style-name="表格127.A2" office:value-type="string">
            <text:p text:style-name="P96">Firewall</text:p>
          </table:table-cell>
          <table:table-cell table:style-name="表格127.A2" office:value-type="string">
            <text:p text:style-name="P96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96">Q2 IDS 的主要功能為何？</text:p>
          </table:table-cell>
          <table:table-cell table:style-name="表格127.A3" office:value-type="string">
            <text:p text:style-name="P96">偵測並發出警報</text:p>
          </table:table-cell>
          <table:table-cell table:style-name="表格127.A3" office:value-type="string">
            <text:p text:style-name="P96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96">Q3 IPS 與 IDS 最大差別？</text:p>
          </table:table-cell>
          <table:table-cell table:style-name="表格127.A2" office:value-type="string">
            <text:p text:style-name="P96">IPS 會阻擋，IDS 不會</text:p>
          </table:table-cell>
          <table:table-cell table:style-name="表格127.A2" office:value-type="string">
            <text:p text:style-name="P96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96">Q4 何者屬「主機型入侵偵測」？</text:p>
          </table:table-cell>
          <table:table-cell table:style-name="表格127.A3" office:value-type="string">
            <text:p text:style-name="P96">HIDS</text:p>
          </table:table-cell>
          <table:table-cell table:style-name="表格127.A3" office:value-type="string">
            <text:p text:style-name="P96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96">Q5 NIDS 主要監控什麼？</text:p>
          </table:table-cell>
          <table:table-cell table:style-name="表格127.A2" office:value-type="string">
            <text:p text:style-name="P96">網路封包</text:p>
          </table:table-cell>
          <table:table-cell table:style-name="表格127.A2" office:value-type="string">
            <text:p text:style-name="P96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96">Q6 SNMP 的主要用途？</text:p>
          </table:table-cell>
          <table:table-cell table:style-name="表格127.A3" office:value-type="string">
            <text:p text:style-name="P96">管理網路設備</text:p>
          </table:table-cell>
          <table:table-cell table:style-name="表格127.A3" office:value-type="string">
            <text:p text:style-name="P96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96">Q7 ICMP 常用於哪種工具？</text:p>
          </table:table-cell>
          <table:table-cell table:style-name="表格127.A2" office:value-type="string">
            <text:p text:style-name="P96">Ping</text:p>
          </table:table-cell>
          <table:table-cell table:style-name="表格127.A2" office:value-type="string">
            <text:p text:style-name="P96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96">Q8 ICMP 屬 OSI 哪一層？</text:p>
          </table:table-cell>
          <table:table-cell table:style-name="表格127.A3" office:value-type="string">
            <text:p text:style-name="P96">Network Layer</text:p>
          </table:table-cell>
          <table:table-cell table:style-name="表格127.A3" office:value-type="string">
            <text:p text:style-name="P96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96">Q9 何者用 UDP 且屬應用層？</text:p>
          </table:table-cell>
          <table:table-cell table:style-name="表格127.A2" office:value-type="string">
            <text:p text:style-name="P96">SNMP</text:p>
          </table:table-cell>
          <table:table-cell table:style-name="表格127.A2" office:value-type="string">
            <text:p text:style-name="P96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96">Q10 下列何者正確？</text:p>
          </table:table-cell>
          <table:table-cell table:style-name="表格127.A3" office:value-type="string">
            <text:p text:style-name="P96">SNMP 用於設備管理</text:p>
          </table:table-cell>
          <table:table-cell table:style-name="表格127.A3" office:value-type="string">
            <text:p text:style-name="P96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93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7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97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186</meta:editing-cycles>
    <meta:creation-date>2026-06-12T00:41:46.189000000</meta:creation-date>
    <dc:date>2026-06-14T10:24:17.311980500</dc:date>
    <meta:generator>LibreOffice/26.2.3.2$Windows_X86_64 LibreOffice_project/70e089b17412e4cb7773e41413306b17a2328c34</meta:generator>
    <meta:editing-duration>P1DT13H36M39S</meta:editing-duration>
    <meta:document-statistic meta:table-count="143" meta:image-count="0" meta:object-count="0" meta:page-count="51" meta:paragraph-count="2292" meta:word-count="29599" meta:character-count="46663" meta:non-whitespace-character-count="42120"/>
  </office:meta>
</office:document-meta>
</file>