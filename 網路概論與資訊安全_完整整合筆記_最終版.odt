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top="0.318cm" fo:margin-bottom="0.123cm" style:contextual-spacing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388cm" style:contextual-spacing="false"/>
    </style:style>
    <style:style style:name="P6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7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8" style:family="paragraph" style:parent-style-name="Standard">
      <style:paragraph-properties fo:margin-top="0cm" fo:margin-bottom="0.353cm" style:contextual-spacing="false"/>
    </style:style>
    <style:style style:name="P9" style:family="paragraph" style:parent-style-name="Standard">
      <style:paragraph-properties fo:margin-top="0.035cm" fo:margin-bottom="0.106cm" style:contextual-spacing="false" fo:line-height="0.459cm"/>
    </style:style>
    <style:style style:name="P10" style:family="paragraph" style:parent-style-name="Standard">
      <style:paragraph-properties fo:margin-top="0cm" fo:margin-bottom="0.042cm" style:contextual-spacing="false" fo:line-height="0.455cm"/>
    </style:style>
    <style:style style:name="P11" style:family="paragraph" style:parent-style-name="Standard">
      <style:paragraph-properties fo:margin-top="0.042cm" fo:margin-bottom="0.042cm" style:contextual-spacing="false" fo:line-height="0.455cm"/>
    </style:style>
    <style:style style:name="P12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5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6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1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18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9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20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2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5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6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27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28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1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2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33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4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6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7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9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3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48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1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7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8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9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10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1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1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3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background-color="#ffff00" loext:char-shading-value="0"/>
    </style:style>
    <style:style style:name="T27" style:family="text">
      <style:text-properties fo:background-color="#ffff00" loext:char-shading-value="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#ffff00" loext:char-shading-value="0" style:font-weight-asian="bold" style:font-weight-complex="bold"/>
    </style:style>
    <style:style style:name="T30" style:family="text">
      <style:text-properties fo:font-weight="bold" fo:background-color="#ffd740" loext:char-shading-value="0" style:font-weight-asian="bold" style:font-weight-complex="bold"/>
    </style:style>
    <style:style style:name="T31" style:family="text">
      <style:text-properties fo:font-weight="bold" fo:background-color="#ffd740" loext:char-shading-value="0" style:font-weight-asian="bold" style:font-weight-complex="bold"/>
    </style:style>
    <style:style style:name="T32" style:family="text">
      <style:text-properties fo:font-weight="bold" fo:background-color="#18ffff" loext:char-shading-value="0" style:font-weight-asian="bold" style:font-weight-complex="bold"/>
    </style:style>
    <style:style style:name="T33" style:family="text">
      <style:text-properties fo:background-color="#ffd740" loext:char-shading-value="0"/>
    </style:style>
    <style:style style:name="T34" style:family="text">
      <style:text-properties fo:background-color="#ffd740" loext:char-shading-value="0"/>
    </style:style>
    <style:style style:name="T35" style:family="text">
      <style:text-properties fo:color="#18ffff" loext:opacity="100%"/>
    </style:style>
    <style:style style:name="T3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7" style:family="text">
      <style:text-properties fo:color="#18ffff" loext:opacity="100%" fo:background-color="#18ffff" loext:char-shading-value="0"/>
    </style:style>
    <style:style style:name="T38" style:family="text">
      <style:text-properties fo:color="#18ffff" loext:opacity="100%" fo:background-color="#18ffff" loext:char-shading-value="0"/>
    </style:style>
    <style:style style:name="T39" style:family="text">
      <style:text-properties fo:color="#18ffff" loext:opacity="100%" fo:background-color="#d500f9" loext:char-shading-value="0"/>
    </style:style>
    <style:style style:name="T40" style:family="text">
      <style:text-properties fo:color="#18ffff" loext:opacity="100%" fo:background-color="#d500f9" loext:char-shading-value="0"/>
    </style:style>
    <style:style style:name="T41" style:family="text">
      <style:text-properties fo:background-color="#18ffff" loext:char-shading-value="0"/>
    </style:style>
    <style:style style:name="T42" style:family="text">
      <style:text-properties fo:background-color="#18ffff" loext:char-shading-value="0"/>
    </style:style>
    <style:style style:name="T43" style:family="text">
      <style:text-properties fo:color="#000000" loext:opacity="100%" fo:background-color="#18ffff" loext:char-shading-value="0"/>
    </style:style>
    <style:style style:name="T44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45" style:family="text">
      <style:text-properties fo:color="#ff4081" loext:opacity="100%"/>
    </style:style>
    <style:style style:name="T46" style:family="text">
      <style:text-properties fo:color="#ff4081" loext:opacity="100%" fo:background-color="#000000" loext:char-shading-value="0"/>
    </style:style>
    <style:style style:name="T47" style:family="text">
      <style:text-properties fo:color="#ff4081" loext:opacity="100%" fo:background-color="#000000" loext:char-shading-value="0"/>
    </style:style>
    <style:style style:name="T48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fd740" loext:opacity="100%"/>
    </style:style>
    <style:style style:name="T50" style:family="text">
      <style:text-properties fo:color="#ffd740" loext:opacity="100%" fo:background-color="#3d5afe" loext:char-shading-value="0"/>
    </style:style>
    <style:style style:name="T51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52" style:family="text">
      <style:text-properties fo:color="#ff3d00" loext:opacity="100%"/>
    </style:style>
    <style:style style:name="T53" style:family="text">
      <style:text-properties fo:color="#ff3d00" loext:opacity="100%" fo:background-color="#5d4037" loext:char-shading-value="0"/>
    </style:style>
    <style:style style:name="T54" style:family="text">
      <style:text-properties fo:color="#ff3d00" loext:opacity="100%" fo:background-color="#5d4037" loext:char-shading-value="0"/>
    </style:style>
    <style:style style:name="T55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5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7" style:family="text">
      <style:text-properties fo:color="#ff3d00" loext:opacity="100%" fo:background-color="#64ffda" loext:char-shading-value="0"/>
    </style:style>
    <style:style style:name="T58" style:family="text">
      <style:text-properties fo:background-color="#3d5afe" loext:char-shading-value="0"/>
    </style:style>
    <style:style style:name="T59" style:family="text">
      <style:text-properties fo:background-color="#3d5afe" loext:char-shading-value="0"/>
    </style:style>
    <style:style style:name="T60" style:family="text">
      <style:text-properties fo:color="#ff9100" loext:opacity="100%" fo:font-weight="bold" fo:background-color="#3d5afe" loext:char-shading-value="0" style:font-weight-asian="bold" style:font-weight-complex="bold"/>
    </style:style>
    <style:style style:name="T61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62" style:family="text">
      <style:text-properties fo:color="#ffc400" loext:opacity="100%" fo:background-color="#3d5afe" loext:char-shading-value="0"/>
    </style:style>
    <style:style style:name="T63" style:family="text">
      <style:text-properties fo:background-color="#64ffda" loext:char-shading-value="0"/>
    </style:style>
    <style:style style:name="T64" style:family="text">
      <style:text-properties fo:background-color="#64ffd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1">公職考試 · 資訊類</text:p>
      <text:p text:style-name="P26">網路概論 與 資訊安全</text:p>
      <text:p text:style-name="P27">完整整合筆記 · 最終版</text:p>
      <text:p text:style-name="P17">OSI / TCP/IP ‧ IP 子網 ‧ IPv6 ‧ ARP/NAT ‧ TCP ‧ DNS ‧ 路由 ‧ SDN/CDN/5G ‧ 無線 ‧ 資安全攻防</text:p>
      <text:p text:style-name="P5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33">涵蓋十大主題</text:p>
            </table:table-cell>
            <table:table-cell table:style-name="表格1.A1" office:value-type="string">
              <text:p text:style-name="P33">前置速記</text:p>
            </table:table-cell>
            <table:table-cell table:style-name="表格1.A1" office:value-type="string">
              <text:p text:style-name="P33">全程對照</text:p>
            </table:table-cell>
            <table:table-cell table:style-name="表格1.A1" office:value-type="string">
              <text:p text:style-name="P33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40">十篇章節</text:p>
          </table:table-cell>
          <table:table-cell table:style-name="表格1.A2" office:value-type="string">
            <text:p text:style-name="P40">口訣 + 表格</text:p>
          </table:table-cell>
          <table:table-cell table:style-name="表格1.A2" office:value-type="string">
            <text:p text:style-name="P40">陷阱 + 正解</text:p>
          </table:table-cell>
          <table:table-cell table:style-name="表格1.A2" office:value-type="string">
            <text:p text:style-name="P40">申論 + 選擇</text:p>
          </table:table-cell>
        </table:table-row>
      </table:table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15">📖 <text:s/></text:span><text:span text:style-name="T4">讀這份筆記的方法</text:span></text:p>
            <text:p text:style-name="P10"><text:span text:style-name="T5">使用方式：</text:span><text:span text:style-name="T11">第〇篇「考前速記總表」收錄全書所有口訣與必背表格，考前衝刺只看這篇即可；</text:span></text:p>
            <text:p text:style-name="P42">第一～十篇為完整詳解，建立觀念與申論寫法時閱讀。每篇皆附「常見陷阱」與「考試標準答案」。</text:p>
          </table:table-cell>
        </table:table-row>
      </table:table>
      <text:p text:style-name="P28">目　錄</text:p>
      <text:p text:style-name="P18">Table of Contents</text:p>
      <text:p text:style-name="P12"><text:span text:style-name="T4">第 〇 篇　考前速記總表 — 口訣 × 必背表格</text:span><text:span text:style-name="T2"><text:tab/>3</text:span></text:p>
      <text:p text:style-name="P12"><text:span text:style-name="T3">　　Part A　口訣大全（依主題分類）</text:span><text:span text:style-name="T2"><text:tab/>3</text:span></text:p>
      <text:p text:style-name="P12"><text:span text:style-name="T3">　　Part B　必背表格精選</text:span><text:span text:style-name="T2"><text:tab/>5</text:span></text:p>
      <text:p text:style-name="P13"><text:span text:style-name="T7">第 一 篇　網路基礎架構：OSI / TCP-IP · 協定 · ARP · Traceroute</text:span><text:span text:style-name="T2"><text:tab/>9</text:span></text:p>
      <text:p text:style-name="P12"><text:span text:style-name="T7">第 二 篇　IP 位址與封包處理：分類 · CIDR · VLSM · Fragmentation</text:span><text:span text:style-name="T2"><text:tab/>13</text:span></text:p>
      <text:p text:style-name="P12"><text:span text:style-name="T7">第 三 篇　IPv4 → IPv6 過渡技術</text:span><text:span text:style-name="T2"><text:tab/>19</text:span></text:p>
      <text:p text:style-name="P12"><text:span text:style-name="T7">第 四 篇　ARP、NAT 與完整上網流程</text:span><text:span text:style-name="T2"><text:tab/>21</text:span></text:p>
      <text:p text:style-name="P12"><text:span text:style-name="T7">第 五 篇　TCP 傳輸控制深入</text:span><text:span text:style-name="T2"><text:tab/>24</text:span></text:p>
      <text:p text:style-name="P12"><text:span text:style-name="T7">第 六 篇　DNS 與 DNSSEC</text:span><text:span text:style-name="T2"><text:tab/>28</text:span></text:p>
      <text:p text:style-name="P12"><text:span text:style-name="T7">第 七 篇　路由協定：OSPF 與 BGP</text:span><text:span text:style-name="T2"><text:tab/>31</text:span></text:p>
      <text:p text:style-name="P12"><text:span text:style-name="T7">第 八 篇　網路系統進階：SDN · LB · CDN · 5G</text:span><text:span text:style-name="T2"><text:tab/>34</text:span></text:p>
      <text:p text:style-name="P12"><text:span text:style-name="T7">第 九 篇　無線通訊：WiFi vs Bluetooth</text:span><text:span text:style-name="T2"><text:tab/>37</text:span></text:p>
      <text:p text:style-name="P12"><text:span text:style-name="T7">第 十 篇　資訊安全：設備 · 攻防 · 企業資安 · Zero Trust</text:span><text:span text:style-name="T2"><text:tab/>40</text:span></text:p>
      <text:p text:style-name="P13"><text:span text:style-name="T4">結　語　考前最後叮嚀</text:span><text:span text:style-name="T2"><text:tab/>51</text:span></text:p>
      <text:h text:style-name="P14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><text:span text:style-name="T15">⚡ <text:s/></text:span><text:span text:style-name="T7">本篇用途</text:span></text:p>
            <text:p text:style-name="P43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5" text:outline-level="2">Part A　口訣大全（依主題分類）</text:h>
      <text:h text:style-name="P3" text:outline-level="3"><text:span text:style-name="T16">▍</text:span><text:span text:style-name="T17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8">🔑 口訣</text:p>
            <text:p text:style-name="P10"><text:span text:style-name="T18">TCP/IP 四層心法：</text:span><text:span text:style-name="T11">應用層→給人用（HTTP/DNS/DHCP/SSH/MQTT）｜傳輸層→怎麼送（TCP 穩、UDP 快）｜網路層→走哪條路（IP/ICMP）｜連結層→同一區網怎麼接（Ethernet/ARP）</text:span></text:p>
            <text:p text:style-name="P11"><text:span text:style-name="T18">OSI vs TCP/IP：</text:span><text:span text:style-name="T11">OSI 7 層（理論）、TCP/IP 4 層（實際）；差別在 TCP/IP 把 Session＋Presentation 併入 Application。</text:span></text:p>
            <text:p text:style-name="P11"><text:span text:style-name="T18">TCP vs UDP：</text:span><text:span text:style-name="T11">TCP「穩定優先」（保證送達、會重傳）；UDP「速度優先」（不保證、不重傳）。</text:span></text:p>
            <text:p text:style-name="P11"><text:span text:style-name="T18">三件事：</text:span><text:span text:style-name="T11">IP→定位（目的地是誰）｜Routing→選路（怎麼走最快）｜ICMP→回報（出錯通知你）。</text:span></text:p>
            <text:p text:style-name="P11"><text:span text:style-name="T18">Traceroute＝</text:span><text:span text:style-name="T11">TTL 遞增 ＋ ICMP 回報，逐步「炸出」完整路徑。</text:span></text:p>
            <text:p text:style-name="P11"><text:span text:style-name="T18">ARP＝</text:span><text:span text:style-name="T11">用 IP 找 MAC，只在同一個 LAN 內使用。</text:span></text:p>
          </table:table-cell>
        </table:table-row>
      </table:table>
      <text:h text:style-name="P3" text:outline-level="3"><text:span text:style-name="T16">▍</text:span><text:span text:style-name="T17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48">🔑 口訣</text:p>
            <text:p text:style-name="P10"><text:span text:style-name="T18">VLSM 黃金公式：</text:span><text:span text:style-name="T11">需求 ＋2 → 找最小 2ⁿ → 前綴 /(32−n)。</text:span></text:p>
            <text:p text:style-name="P11"><text:span text:style-name="T18">可用主機數：</text:span><text:span text:style-name="T11">2^(主機 bit) − 2（扣掉網路位址與廣播位址）。</text:span></text:p>
            <text:p text:style-name="P11"><text:span text:style-name="T18">CIDR 合併：</text:span><text:span text:style-name="T11">連續 ＋ 數量 2ⁿ ＋ 起點對齊 → 合併 2ⁿ 個子網則「前綴減 n」。</text:span></text:p>
            <text:p text:style-name="P11"><text:span text:style-name="T18">前綴速背：</text:span><text:span text:style-name="T11">/25=126、/26=62、/27=30、/28=14、/29=6、/30=2。</text:span></text:p>
            <text:p text:style-name="P11"><text:span text:style-name="T18">封包切割：</text:span><text:span text:style-name="T11">封包 &gt; MTU 就切（Fragmentation）；Fragment Offset ＝ 起始位置 ÷ 8。</text:span></text:p>
            <text:p text:style-name="P11"><text:span text:style-name="T18">誰能切：</text:span><text:span text:style-name="T11">IPv4＝Router 或 Source 可切；IPv6＝只有 Source 切，必搭 PMTUD。</text:span></text:p>
            <text:p text:style-name="P11"><text:span text:style-name="T18">Protocol 值：</text:span><text:span text:style-name="T11">ICMP=1、TCP=6、UDP=17｜DF=1 禁止切、MF=1 後面還有分段｜MSS＝MTU−20−20＝1460。</text:span></text:p>
          </table:table-cell>
        </table:table-row>
      </table:table>
      <text:h text:style-name="P3" text:outline-level="3"><text:span text:style-name="T16">▍</text:span><text:span text:style-name="T17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48">🔑 口訣</text:p>
            <text:p text:style-name="P10"><text:span text:style-name="T18">IPv6 特點：</text:span><text:span text:style-name="T11">大（128 bit）＋ 安全（IPsec）＋ 快（固定 Header）＋ 自動（SLAAC）＋ 乾淨（無 Broadcast）。</text:span></text:p>
            <text:p text:style-name="P11"><text:span text:style-name="T18">三種過渡技術：</text:span><text:span text:style-name="T11">雙語（Dual Stack）＋ 偽裝（Tunneling）＋ 翻譯（Translation）。</text:span></text:p>
            <text:p text:style-name="P11"><text:span text:style-name="T18">生活比喻：</text:span><text:span text:style-name="T11">Dual Stack＝同時會中英文；Tunneling＝英文信裝進中文信封偷渡；Translation＝現場請翻譯口譯。</text:span></text:p>
          </table:table-cell>
        </table:table-row>
      </table:table>
      <text:h text:style-name="P3" text:outline-level="3"><text:span text:style-name="T16">▍</text:span><text:span text:style-name="T17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48">🔑 口訣</text:p>
            <text:p text:style-name="P10"><text:span text:style-name="T18">上網流程：</text:span><text:span text:style-name="T11">DNS → ARP → L2 封包 → NAT（去程）→ Internet → NAT（回程）→ 你。</text:span></text:p>
            <text:p text:style-name="P11"><text:span text:style-name="T18">核心觀念：</text:span><text:span text:style-name="T11">IP＝最終目的地（全程不變）；MAC＝下一站（每跳更換）。</text:span></text:p>
            <text:p text:style-name="P11"><text:span text:style-name="T18">最大地雷：</text:span><text:span text:style-name="T11">ARP 找的是「路由器（預設閘道）」的 MAC，不是 Google 的 MAC。</text:span></text:p>
            <text:p text:style-name="P11"><text:soft-page-break/><text:span text:style-name="T18">PAT：</text:span><text:span text:style-name="T11">多台共用一個公網 IP，靠 Port 號碼區分（最重要）。</text:span></text:p>
          </table:table-cell>
        </table:table-row>
      </table:table>
      <text:h text:style-name="P3" text:outline-level="3"><text:span text:style-name="T16">▍</text:span><text:span text:style-name="T17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48">🔑 口訣</text:p>
            <text:p text:style-name="P10"><text:span text:style-name="T18">三次握手：</text:span><text:span text:style-name="T11">SYN → SYN＋ACK → ACK，確認雙向都能通訊。</text:span></text:p>
            <text:p text:style-name="P11"><text:span text:style-name="T18">傳送量公式：</text:span><text:span text:style-name="T11">實際傳送量 ＝ min(rwnd, cwnd)。rwnd＝接收端限制、cwnd＝網路限制。</text:span></text:p>
            <text:p text:style-name="P11"><text:span text:style-name="T18">擁塞控制節奏：</text:span><text:span text:style-name="T11">Slow Start（指數成長）→ Congestion Avoidance（線性成長）→ 丟包（減速）。</text:span></text:p>
            <text:p text:style-name="P11"><text:span text:style-name="T18">丟包處理：</text:span><text:span text:style-name="T11">Timeout → cwnd 重設為 1 回 Slow Start；3 個重複 ACK → cwnd 減半續 CA。</text:span></text:p>
            <text:p text:style-name="P11"><text:span text:style-name="T18">AIMD：</text:span><text:span text:style-name="T11">沒丟包 每 RTT＋1（加法增長）；丟包 ×0.5（乘法減少）。</text:span></text:p>
            <text:p text:style-name="P11"><text:span text:style-name="T18">SYN Flood：</text:span><text:span text:style-name="T11">大量半連線（Half-open）耗盡 Server 資源 → DoS。</text:span></text:p>
          </table:table-cell>
        </table:table-row>
      </table:table>
      <text:h text:style-name="P3" text:outline-level="3"><text:span text:style-name="T16">▍</text:span><text:span text:style-name="T17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8">🔑 口訣</text:p>
            <text:p text:style-name="P10"><text:span text:style-name="T18">查詢流程：</text:span><text:span text:style-name="T11">Cache → Local → Root → TLD → Authoritative → 取得 IP。</text:span></text:p>
            <text:p text:style-name="P11"><text:span text:style-name="T18">Recursive：</text:span><text:span text:style-name="T11">「代查到底」（DNS 幫你問完，你只問一次）。</text:span></text:p>
            <text:p text:style-name="P11"><text:span text:style-name="T18">Iterative：</text:span><text:span text:style-name="T11">「逐層詢問」（你自己一層一層問）。</text:span></text:p>
            <text:p text:style-name="P11"><text:span text:style-name="T18">DNSSEC：</text:span><text:span text:style-name="T11">驗證真偽，不是加密、不防 DDoS。</text:span></text:p>
          </table:table-cell>
        </table:table-row>
      </table:table>
      <text:h text:style-name="P3" text:outline-level="3"><text:span text:style-name="T16">▍</text:span><text:span text:style-name="T17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8">🔑 口訣</text:p>
            <text:p text:style-name="P10"><text:span text:style-name="T18">範圍分類：</text:span><text:span text:style-name="T11">公司／校園內 → IGP（OSPF、RIP）；公司與公司間 → EGP（BGP）。</text:span></text:p>
            <text:p text:style-name="P11"><text:span text:style-name="T18">OSPF 規定：</text:span><text:span text:style-name="T11">所有 Area 一定要連到 Area 0（骨幹）才能互通。</text:span></text:p>
            <text:p text:style-name="P11"><text:span text:style-name="T18">OSPF 四種 Router：</text:span><text:span text:style-name="T11">Internal（不出 Area）／Backbone（在 Area 0）／ABR（跨 Area 橋樑）／ASBR（跨 AS 入口）。</text:span></text:p>
            <text:p text:style-name="P11"><text:span text:style-name="T18">BGP 選路順序：</text:span><text:span text:style-name="T11">Weight &gt; Local Pref &gt; 自己產生 &gt; AS-PATH &gt; Origin &gt; MED &gt; eBGP &gt; IGP cost &gt; Router ID。</text:span></text:p>
            <text:p text:style-name="P11"><text:span text:style-name="T18">BGP 本質：</text:span><text:span text:style-name="T11">政策導向（不是距離導向）；Local Preference 才是最重要的「通用」屬性（Weight 為 Cisco 私有）。</text:span></text:p>
            <text:p text:style-name="P11"><text:span text:style-name="T18">三層分工：</text:span><text:span text:style-name="T11">防火牆→「能不能走」｜NAT→「你是誰」｜BGP→「怎麼走」。</text:span></text:p>
          </table:table-cell>
        </table:table-row>
      </table:table>
      <text:h text:style-name="P3" text:outline-level="3"><text:span text:style-name="T16">▍</text:span><text:span text:style-name="T17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8">🔑 口訣</text:p>
            <text:p text:style-name="P10"><text:span text:style-name="T18">SDN：</text:span><text:span text:style-name="T11">「分平面、三層 App-控-基」＝控制／資料分離；Application → Control → Infrastructure。</text:span></text:p>
            <text:p text:style-name="P11"><text:span text:style-name="T18">Load Balancing：</text:span><text:span text:style-name="T11">「LB 輪、重、黏」＝Round Robin（輪流）／Weighted RR（加權）／Stickiness（同人同台）。</text:span></text:p>
            <text:p text:style-name="P11"><text:span text:style-name="T18">CDN：</text:span><text:span text:style-name="T11">「網址轉轉轉（CNAME），資料找最近（Edge）」；CNAME＝網址→網址（非 IP）。</text:span></text:p>
            <text:p text:style-name="P11"><text:span text:style-name="T18">5G：</text:span><text:span text:style-name="T11">「快、低、多、切」＝eMBB（高速）／URLLC（超低延遲）／mMTC（大量連線）／Network Slicing（切片）。</text:span></text:p>
            <text:p text:style-name="P11"><text:span text:style-name="T18">10 秒總背：</text:span><text:span text:style-name="T11">SDN 分離三層、LB 輪重黏、CDN CNAME→最近、5G 快低多切、WiFi 聽、BT 跳。</text:span></text:p>
          </table:table-cell>
        </table:table-row>
      </table:table>
      <text:h text:style-name="P3" text:outline-level="3"><text:span text:style-name="T16">▍</text:span><text:span text:style-name="T17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8">🔑 口訣</text:p>
            <text:p text:style-name="P10"><text:span text:style-name="T18">一句總綱：</text:span><text:span text:style-name="T11">「WiFi 先聽再說（CSMA/CA），Bluetooth 一直換頻道（FHSS）」。</text:span></text:p>
            <text:p text:style-name="P11"><text:span text:style-name="T18">本質對比：</text:span><text:span text:style-name="T11">WiFi＝搶頻道（菜市場）；BT＝排班（會議室預約）；時槽＝時間格子；SCO＝語音；L2CAP＝三通道。</text:span></text:p>
            <text:p text:style-name="P11"><text:soft-page-break/><text:span text:style-name="T18">最大陷阱：</text:span><text:span text:style-name="T11">有線 Ethernet＝CD（Detect 偵測）；無線 WiFi＝CA（Avoid 避免）。</text:span></text:p>
            <text:p text:style-name="P11"><text:span text:style-name="T18">QoS／語音：</text:span><text:span text:style-name="T11">WiFi QoS＝EDCA（急診室分級）；藍牙即時語音＝SCO／eSCO；L2CAP 位於 Data Link 層。</text:span></text:p>
          </table:table-cell>
        </table:table-row>
      </table:table>
      <text:h text:style-name="P3" text:outline-level="3"><text:span text:style-name="T16">▍</text:span><text:span text:style-name="T17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8">🔑 口訣</text:p>
            <text:p text:style-name="P10"><text:span text:style-name="T18">設備萬用口訣：</text:span><text:span text:style-name="T11">FW 封外、WAF 看內、NGFW 最強、DMZ 隔離、IOC 壞人、Proxy 幫客、Reverse 幫服。</text:span></text:p>
            <text:p text:style-name="P11"><text:span text:style-name="T18">IOC 四線索：</text:span><text:span text:style-name="T11">網（Domain）→ 檔（Hash）→ 連（IP）→ 控（C2）。</text:span></text:p>
            <text:p text:style-name="P11"><text:span text:style-name="T18">封包闖關順序：</text:span><text:span text:style-name="T11">Client → Proxy → Internet → FW/NGFW → DMZ → WAF → Reverse Proxy → 內部 Server。</text:span></text:p>
            <text:p text:style-name="P11"><text:span text:style-name="T18">三防分工：</text:span><text:span text:style-name="T11">Firewall 擋入口、IDS 只看、IPS 看＋擋；HIDS 看主機（Log）、NIDS 看網路（封包）。</text:span></text:p>
            <text:p text:style-name="P11"><text:span text:style-name="T18">易混兩協定：</text:span><text:span text:style-name="T11">SNMP 管理設備（應用層／UDP）、ICMP 診斷網路（網路層）。</text:span></text:p>
            <text:p text:style-name="P11"><text:span text:style-name="T18">SQL Injection：</text:span><text:span text:style-name="T11">攻擊＝' OR 1=1 --；防禦核心＝Prepared Statement（預備語句）。</text:span></text:p>
            <text:p text:style-name="P11"><text:span text:style-name="T18">Zero-Day：</text:span><text:span text:style-name="T11">最怕「沒有 Signature」；防禦＝Patch 更新 ＋ IDS/IPS ＋ 網路分段。</text:span></text:p>
            <text:p text:style-name="P11"><text:span text:style-name="T18">企業資安三階段：</text:span><text:span text:style-name="T11">事前預防 → 事中偵測 → 事後復原。RTO＝停機時間、RPO＝資料損失量。</text:span></text:p>
            <text:p text:style-name="P11"><text:span text:style-name="T18">EDR/MDR：</text:span><text:span text:style-name="T11">EDR＝自己買工具守、MDR＝請公司幫你守、ATT&amp;CK＝駭客招式教材、數位韌性＝撐住快速復原。</text:span></text:p>
            <text:p text:style-name="P11"><text:span text:style-name="T18">SSDLC：</text:span><text:span text:style-name="T11">Define→Design→Develop→Test→Deploy→Maintain，精神是「左移（Shift Left）」。</text:span></text:p>
            <text:p text:style-name="P11"><text:span text:style-name="T18">Zero Trust：</text:span><text:span text:style-name="T11">永不信任，始終驗證；查「人（Identity）機（Device）境（Context）」；配 MFA＋最小權限＋微分段＋持續監控。</text:span></text:p>
          </table:table-cell>
        </table:table-row>
      </table:table>
      <text:h text:style-name="P15" text:outline-level="2">Part B　必背表格精選（考前掃一遍）</text:h>
      <text:h text:style-name="P3" text:outline-level="3"><text:span text:style-name="T16">▍</text:span><text:span text:style-name="T17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33">前綴</text:p>
            </table:table-cell>
            <table:table-cell table:style-name="表格14.A1" office:value-type="string">
              <text:p text:style-name="P33">主機 bit</text:p>
            </table:table-cell>
            <table:table-cell table:style-name="表格14.A1" office:value-type="string">
              <text:p text:style-name="P33">IP 總數</text:p>
            </table:table-cell>
            <table:table-cell table:style-name="表格14.A1" office:value-type="string">
              <text:p text:style-name="P33">可用主機</text:p>
            </table:table-cell>
            <table:table-cell table:style-name="表格14.A1" office:value-type="string">
              <text:p text:style-name="P33">區塊步長</text:p>
            </table:table-cell>
            <table:table-cell table:style-name="表格14.A1" office:value-type="string">
              <text:p text:style-name="P33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41">/24</text:p>
          </table:table-cell>
          <table:table-cell table:style-name="表格14.A2" office:value-type="string">
            <text:p text:style-name="P40">8</text:p>
          </table:table-cell>
          <table:table-cell table:style-name="表格14.A2" office:value-type="string">
            <text:p text:style-name="P41">256</text:p>
          </table:table-cell>
          <table:table-cell table:style-name="表格14.A2" office:value-type="string">
            <text:p text:style-name="P22">254</text:p>
          </table:table-cell>
          <table:table-cell table:style-name="表格14.A2" office:value-type="string">
            <text:p text:style-name="P41">+256</text:p>
          </table:table-cell>
          <table:table-cell table:style-name="表格14.A2" office:value-type="string">
            <text:p text:style-name="P41">255</text:p>
          </table:table-cell>
        </table:table-row>
        <table:table-row table:style-name="表格14.1">
          <table:table-cell table:style-name="表格14.A3" office:value-type="string">
            <text:p text:style-name="P41">/25</text:p>
          </table:table-cell>
          <table:table-cell table:style-name="表格14.A3" office:value-type="string">
            <text:p text:style-name="P40">7</text:p>
          </table:table-cell>
          <table:table-cell table:style-name="表格14.A3" office:value-type="string">
            <text:p text:style-name="P41">128</text:p>
          </table:table-cell>
          <table:table-cell table:style-name="表格14.A3" office:value-type="string">
            <text:p text:style-name="P22">126</text:p>
          </table:table-cell>
          <table:table-cell table:style-name="表格14.A3" office:value-type="string">
            <text:p text:style-name="P41">+128</text:p>
          </table:table-cell>
          <table:table-cell table:style-name="表格14.A3" office:value-type="string">
            <text:p text:style-name="P41">127, 255</text:p>
          </table:table-cell>
        </table:table-row>
        <table:table-row table:style-name="表格14.1">
          <table:table-cell table:style-name="表格14.A2" office:value-type="string">
            <text:p text:style-name="P41">/26</text:p>
          </table:table-cell>
          <table:table-cell table:style-name="表格14.A2" office:value-type="string">
            <text:p text:style-name="P40">6</text:p>
          </table:table-cell>
          <table:table-cell table:style-name="表格14.A2" office:value-type="string">
            <text:p text:style-name="P41">64</text:p>
          </table:table-cell>
          <table:table-cell table:style-name="表格14.A2" office:value-type="string">
            <text:p text:style-name="P22">62</text:p>
          </table:table-cell>
          <table:table-cell table:style-name="表格14.A2" office:value-type="string">
            <text:p text:style-name="P41">+64</text:p>
          </table:table-cell>
          <table:table-cell table:style-name="表格14.A2" office:value-type="string">
            <text:p text:style-name="P41">63, 127, 191, 255</text:p>
          </table:table-cell>
        </table:table-row>
        <table:table-row table:style-name="表格14.1">
          <table:table-cell table:style-name="表格14.A3" office:value-type="string">
            <text:p text:style-name="P41">/27</text:p>
          </table:table-cell>
          <table:table-cell table:style-name="表格14.A3" office:value-type="string">
            <text:p text:style-name="P40">5</text:p>
          </table:table-cell>
          <table:table-cell table:style-name="表格14.A3" office:value-type="string">
            <text:p text:style-name="P41">32</text:p>
          </table:table-cell>
          <table:table-cell table:style-name="表格14.A3" office:value-type="string">
            <text:p text:style-name="P22">30</text:p>
          </table:table-cell>
          <table:table-cell table:style-name="表格14.A3" office:value-type="string">
            <text:p text:style-name="P41">+32</text:p>
          </table:table-cell>
          <table:table-cell table:style-name="表格14.A3" office:value-type="string">
            <text:p text:style-name="P41">31, 63, 95 …</text:p>
          </table:table-cell>
        </table:table-row>
        <table:table-row table:style-name="表格14.1">
          <table:table-cell table:style-name="表格14.A2" office:value-type="string">
            <text:p text:style-name="P41">/28</text:p>
          </table:table-cell>
          <table:table-cell table:style-name="表格14.A2" office:value-type="string">
            <text:p text:style-name="P40">4</text:p>
          </table:table-cell>
          <table:table-cell table:style-name="表格14.A2" office:value-type="string">
            <text:p text:style-name="P41">16</text:p>
          </table:table-cell>
          <table:table-cell table:style-name="表格14.A2" office:value-type="string">
            <text:p text:style-name="P22">14</text:p>
          </table:table-cell>
          <table:table-cell table:style-name="表格14.A2" office:value-type="string">
            <text:p text:style-name="P41">+16</text:p>
          </table:table-cell>
          <table:table-cell table:style-name="表格14.A2" office:value-type="string">
            <text:p text:style-name="P41">15, 31, 47 …</text:p>
          </table:table-cell>
        </table:table-row>
        <table:table-row table:style-name="表格14.1">
          <table:table-cell table:style-name="表格14.A3" office:value-type="string">
            <text:p text:style-name="P41">/29</text:p>
          </table:table-cell>
          <table:table-cell table:style-name="表格14.A3" office:value-type="string">
            <text:p text:style-name="P40">3</text:p>
          </table:table-cell>
          <table:table-cell table:style-name="表格14.A3" office:value-type="string">
            <text:p text:style-name="P41">8</text:p>
          </table:table-cell>
          <table:table-cell table:style-name="表格14.A3" office:value-type="string">
            <text:p text:style-name="P22">6</text:p>
          </table:table-cell>
          <table:table-cell table:style-name="表格14.A3" office:value-type="string">
            <text:p text:style-name="P41">+8</text:p>
          </table:table-cell>
          <table:table-cell table:style-name="表格14.A3" office:value-type="string">
            <text:p text:style-name="P41">7, 15, 23 …</text:p>
          </table:table-cell>
        </table:table-row>
        <table:table-row table:style-name="表格14.1">
          <table:table-cell table:style-name="表格14.A2" office:value-type="string">
            <text:p text:style-name="P41">/30</text:p>
          </table:table-cell>
          <table:table-cell table:style-name="表格14.A2" office:value-type="string">
            <text:p text:style-name="P40">2</text:p>
          </table:table-cell>
          <table:table-cell table:style-name="表格14.A2" office:value-type="string">
            <text:p text:style-name="P41">4</text:p>
          </table:table-cell>
          <table:table-cell table:style-name="表格14.A2" office:value-type="string">
            <text:p text:style-name="P22">2</text:p>
          </table:table-cell>
          <table:table-cell table:style-name="表格14.A2" office:value-type="string">
            <text:p text:style-name="P41">+4</text:p>
          </table:table-cell>
          <table:table-cell table:style-name="表格14.A2" office:value-type="string">
            <text:p text:style-name="P41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0"><text:span text:style-name="T19">例外 /31：</text:span><text:span text:style-name="T11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35">比較項目</text:p>
            </table:table-cell>
            <table:table-cell table:style-name="表格15.A1" office:value-type="string">
              <text:p text:style-name="P35">TCP（穩定）</text:p>
            </table:table-cell>
            <table:table-cell table:style-name="表格15.A1" office:value-type="string">
              <text:p text:style-name="P3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5">連線方式</text:p>
          </table:table-cell>
          <table:table-cell table:style-name="表格15.A2" office:value-type="string">
            <text:p text:style-name="P45">三次握手才開始</text:p>
          </table:table-cell>
          <table:table-cell table:style-name="表格15.A2" office:value-type="string">
            <text:p text:style-name="P45">無連線，直接送</text:p>
          </table:table-cell>
        </table:table-row>
        <table:table-row table:style-name="表格15.1">
          <table:table-cell table:style-name="表格15.A3" office:value-type="string">
            <text:p text:style-name="P45">可靠性</text:p>
          </table:table-cell>
          <table:table-cell table:style-name="表格15.A3" office:value-type="string">
            <text:p text:style-name="P45">保證送達、會重傳</text:p>
          </table:table-cell>
          <table:table-cell table:style-name="表格15.A3" office:value-type="string">
            <text:p text:style-name="P45">不保證、不重傳</text:p>
          </table:table-cell>
        </table:table-row>
        <table:table-row table:style-name="表格15.1">
          <table:table-cell table:style-name="表格15.A2" office:value-type="string">
            <text:p text:style-name="P45">順序</text:p>
          </table:table-cell>
          <table:table-cell table:style-name="表格15.A2" office:value-type="string">
            <text:p text:style-name="P45">保證順序</text:p>
          </table:table-cell>
          <table:table-cell table:style-name="表格15.A2" office:value-type="string">
            <text:p text:style-name="P7"><text:span text:style-name="T13">不保證順序</text:span><text:soft-page-break/></text:p>
          </table:table-cell>
        </table:table-row>
        <table:table-row table:style-name="表格15.1">
          <table:table-cell table:style-name="表格15.A3" office:value-type="string">
            <text:p text:style-name="P45">速度</text:p>
          </table:table-cell>
          <table:table-cell table:style-name="表格15.A3" office:value-type="string">
            <text:p text:style-name="P45">較慢（有控制機制）</text:p>
          </table:table-cell>
          <table:table-cell table:style-name="表格15.A3" office:value-type="string">
            <text:p text:style-name="P45">較快（無額外開銷）</text:p>
          </table:table-cell>
        </table:table-row>
        <table:table-row table:style-name="表格15.1">
          <table:table-cell table:style-name="表格15.A2" office:value-type="string">
            <text:p text:style-name="P45">適用</text:p>
          </table:table-cell>
          <table:table-cell table:style-name="表格15.A2" office:value-type="string">
            <text:p text:style-name="P45">網頁、Email、FTP、檔案</text:p>
          </table:table-cell>
          <table:table-cell table:style-name="表格15.A2" office:value-type="string">
            <text:p text:style-name="P45">串流、遊戲、VoIP、DNS</text:p>
          </table:table-cell>
        </table:table-row>
        <table:table-row table:style-name="表格15.1">
          <table:table-cell table:style-name="表格15.A3" office:value-type="string">
            <text:p text:style-name="P45">一句話</text:p>
          </table:table-cell>
          <table:table-cell table:style-name="表格15.A3" office:value-type="string">
            <text:p text:style-name="P49">「穩定優先」</text:p>
          </table:table-cell>
          <table:table-cell table:style-name="表格15.A3" office:value-type="string">
            <text:p text:style-name="P24">「速度優先」</text:p>
          </table:table-cell>
        </table:table-row>
      </table:table>
      <text:h text:style-name="P3" text:outline-level="3"><text:span text:style-name="T16">▍</text:span><text:span text:style-name="T17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34">比較項目</text:p>
            </table:table-cell>
            <table:table-cell table:style-name="表格16.A1" office:value-type="string">
              <text:p text:style-name="P34">✗ IPv4 問題</text:p>
            </table:table-cell>
            <table:table-cell table:style-name="表格16.A1" office:value-type="string">
              <text:p text:style-name="P34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41">位址長度</text:p>
          </table:table-cell>
          <table:table-cell table:style-name="表格16.A2" office:value-type="string">
            <text:p text:style-name="P41">32 bit，約 43 億個，已不足</text:p>
          </table:table-cell>
          <table:table-cell table:style-name="表格16.A2" office:value-type="string">
            <text:p text:style-name="P41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41">NAT</text:p>
          </table:table-cell>
          <table:table-cell table:style-name="表格16.A3" office:value-type="string">
            <text:p text:style-name="P41">需 NAT 共用 IP，破壞 E2E</text:p>
          </table:table-cell>
          <table:table-cell table:style-name="表格16.A3" office:value-type="string">
            <text:p text:style-name="P41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41">安全性</text:p>
          </table:table-cell>
          <table:table-cell table:style-name="表格16.A2" office:value-type="string">
            <text:p text:style-name="P41">無內建加密／驗證</text:p>
          </table:table-cell>
          <table:table-cell table:style-name="表格16.A2" office:value-type="string">
            <text:p text:style-name="P41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41">Header</text:p>
          </table:table-cell>
          <table:table-cell table:style-name="表格16.A3" office:value-type="string">
            <text:p text:style-name="P41">可變長度含 Options，效率低</text:p>
          </table:table-cell>
          <table:table-cell table:style-name="表格16.A3" office:value-type="string">
            <text:p text:style-name="P41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41">QoS</text:p>
          </table:table-cell>
          <table:table-cell table:style-name="表格16.A2" office:value-type="string">
            <text:p text:style-name="P41">無法標記優先權</text:p>
          </table:table-cell>
          <table:table-cell table:style-name="表格16.A2" office:value-type="string">
            <text:p text:style-name="P41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41">廣播</text:p>
          </table:table-cell>
          <table:table-cell table:style-name="表格16.A3" office:value-type="string">
            <text:p text:style-name="P41">Broadcast 發給所有人</text:p>
          </table:table-cell>
          <table:table-cell table:style-name="表格16.A3" office:value-type="string">
            <text:p text:style-name="P41">改用 Multicast／Anycast</text:p>
          </table:table-cell>
        </table:table-row>
        <table:table-row table:style-name="表格16.1">
          <table:table-cell table:style-name="表格16.A2" office:value-type="string">
            <text:p text:style-name="P41">IP 配置</text:p>
          </table:table-cell>
          <table:table-cell table:style-name="表格16.A2" office:value-type="string">
            <text:p text:style-name="P41">手動或 DHCP，繁瑣</text:p>
          </table:table-cell>
          <table:table-cell table:style-name="表格16.A2" office:value-type="string">
            <text:p text:style-name="P41">SLAAC 無狀態自動配置</text:p>
          </table:table-cell>
        </table:table-row>
      </table:table>
      <text:h text:style-name="P3" text:outline-level="3"><text:span text:style-name="T16">▍</text:span><text:span text:style-name="T17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34">丟包偵測</text:p>
            </table:table-cell>
            <table:table-cell table:style-name="表格17.A1" office:value-type="string">
              <text:p text:style-name="P34">代表意義</text:p>
            </table:table-cell>
            <table:table-cell table:style-name="表格17.A1" office:value-type="string">
              <text:p text:style-name="P34">ssthresh</text:p>
            </table:table-cell>
            <table:table-cell table:style-name="表格17.A1" office:value-type="string">
              <text:p text:style-name="P34">cwnd</text:p>
            </table:table-cell>
            <table:table-cell table:style-name="表格17.A1" office:value-type="string">
              <text:p text:style-name="P34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41">Timeout（逾時）</text:p>
          </table:table-cell>
          <table:table-cell table:style-name="表格17.A2" office:value-type="string">
            <text:p text:style-name="P41">網路嚴重擁塞</text:p>
          </table:table-cell>
          <table:table-cell table:style-name="表格17.A2" office:value-type="string">
            <text:p text:style-name="P41">= cwnd / 2</text:p>
          </table:table-cell>
          <table:table-cell table:style-name="表格17.A2" office:value-type="string">
            <text:p text:style-name="P52">重設為 1</text:p>
          </table:table-cell>
          <table:table-cell table:style-name="表格17.A2" office:value-type="string">
            <text:p text:style-name="P41">重回 Slow Start</text:p>
          </table:table-cell>
        </table:table-row>
        <table:table-row table:style-name="表格17.1">
          <table:table-cell table:style-name="表格17.A3" office:value-type="string">
            <text:p text:style-name="P41">3 個重複 ACK</text:p>
          </table:table-cell>
          <table:table-cell table:style-name="表格17.A3" office:value-type="string">
            <text:p text:style-name="P41">單一封包遺失</text:p>
          </table:table-cell>
          <table:table-cell table:style-name="表格17.A3" office:value-type="string">
            <text:p text:style-name="P41">= cwnd / 2</text:p>
          </table:table-cell>
          <table:table-cell table:style-name="表格17.A3" office:value-type="string">
            <text:p text:style-name="P23">= ssthresh（減半）</text:p>
          </table:table-cell>
          <table:table-cell table:style-name="表格17.A3" office:value-type="string">
            <text:p text:style-name="P41">續 Congestion Avoidance</text:p>
          </table:table-cell>
        </table:table-row>
      </table:table>
      <text:h text:style-name="P3" text:outline-level="3"><text:span text:style-name="T16">▍</text:span><text:span text:style-name="T17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33">順序</text:p>
            </table:table-cell>
            <table:table-cell table:style-name="表格18.A1" office:value-type="string">
              <text:p text:style-name="P33">屬性</text:p>
            </table:table-cell>
            <table:table-cell table:style-name="表格18.A1" office:value-type="string">
              <text:p text:style-name="P33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40">①</text:p>
          </table:table-cell>
          <table:table-cell table:style-name="表格18.A2" office:value-type="string">
            <text:p text:style-name="P41">Weight</text:p>
          </table:table-cell>
          <table:table-cell table:style-name="表格18.A2" office:value-type="string">
            <text:p text:style-name="P41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40">②</text:p>
          </table:table-cell>
          <table:table-cell table:style-name="表格18.A3" office:value-type="string">
            <text:p text:style-name="P23">Local Preference</text:p>
          </table:table-cell>
          <table:table-cell table:style-name="表格18.A3" office:value-type="string">
            <text:p text:style-name="P23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40">③</text:p>
          </table:table-cell>
          <table:table-cell table:style-name="表格18.A2" office:value-type="string">
            <text:p text:style-name="P41">本地產生</text:p>
          </table:table-cell>
          <table:table-cell table:style-name="表格18.A2" office:value-type="string">
            <text:p text:style-name="P41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40">④</text:p>
          </table:table-cell>
          <table:table-cell table:style-name="表格18.A3" office:value-type="string">
            <text:p text:style-name="P41">AS-PATH</text:p>
          </table:table-cell>
          <table:table-cell table:style-name="表格18.A3" office:value-type="string">
            <text:p text:style-name="P41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40">⑤</text:p>
          </table:table-cell>
          <table:table-cell table:style-name="表格18.A2" office:value-type="string">
            <text:p text:style-name="P41">Origin</text:p>
          </table:table-cell>
          <table:table-cell table:style-name="表格18.A2" office:value-type="string">
            <text:p text:style-name="P41">IGP &gt; EGP &gt; Incomplete</text:p>
          </table:table-cell>
        </table:table-row>
        <table:table-row table:style-name="表格18.1">
          <table:table-cell table:style-name="表格18.A3" office:value-type="string">
            <text:p text:style-name="P40">⑥</text:p>
          </table:table-cell>
          <table:table-cell table:style-name="表格18.A3" office:value-type="string">
            <text:p text:style-name="P41">MED</text:p>
          </table:table-cell>
          <table:table-cell table:style-name="表格18.A3" office:value-type="string">
            <text:p text:style-name="P41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40">⑦</text:p>
          </table:table-cell>
          <table:table-cell table:style-name="表格18.A2" office:value-type="string">
            <text:p text:style-name="P41">eBGP vs iBGP</text:p>
          </table:table-cell>
          <table:table-cell table:style-name="表格18.A2" office:value-type="string">
            <text:p text:style-name="P41">eBGP 優先於 iBGP</text:p>
          </table:table-cell>
        </table:table-row>
        <table:table-row table:style-name="表格18.1">
          <table:table-cell table:style-name="表格18.A3" office:value-type="string">
            <text:p text:style-name="P40">⑧</text:p>
          </table:table-cell>
          <table:table-cell table:style-name="表格18.A3" office:value-type="string">
            <text:p text:style-name="P41">IGP cost</text:p>
          </table:table-cell>
          <table:table-cell table:style-name="表格18.A3" office:value-type="string">
            <text:p text:style-name="P41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40">⑨</text:p>
          </table:table-cell>
          <table:table-cell table:style-name="表格18.A2" office:value-type="string">
            <text:p text:style-name="P41">Router ID</text:p>
          </table:table-cell>
          <table:table-cell table:style-name="表格18.A2" office:value-type="string">
            <text:p text:style-name="P41">Router ID 最小者優先（最後決勝點）</text:p>
          </table:table-cell>
        </table:table-row>
      </table:table>
      <text:h text:style-name="P3" text:outline-level="3"><text:span text:style-name="T16">▍</text:span><text:span text:style-name="T17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34">類型</text:p>
            </table:table-cell>
            <table:table-cell table:style-name="表格19.A1" office:value-type="string">
              <text:p text:style-name="P34">本質</text:p>
            </table:table-cell>
            <table:table-cell table:style-name="表格19.A1" office:value-type="string">
              <text:p text:style-name="P34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41">Internal</text:p>
          </table:table-cell>
          <table:table-cell table:style-name="表格19.A2" office:value-type="string">
            <text:p text:style-name="P41">不出 Area</text:p>
          </table:table-cell>
          <table:table-cell table:style-name="表格19.A2" office:value-type="string">
            <text:p text:style-name="P41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41">Backbone</text:p>
          </table:table-cell>
          <table:table-cell table:style-name="表格19.A3" office:value-type="string">
            <text:p text:style-name="P41">在 Area 0</text:p>
          </table:table-cell>
          <table:table-cell table:style-name="表格19.A3" office:value-type="string">
            <text:p text:style-name="P41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41">ABR</text:p>
          </table:table-cell>
          <table:table-cell table:style-name="表格19.A2" office:value-type="string">
            <text:p text:style-name="P41">跨 Area 橋樑</text:p>
          </table:table-cell>
          <table:table-cell table:style-name="表格19.A2" office:value-type="string">
            <text:p text:style-name="P41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41">ASBR</text:p>
          </table:table-cell>
          <table:table-cell table:style-name="表格19.A3" office:value-type="string">
            <text:p text:style-name="P41">跨 AS 入口</text:p>
          </table:table-cell>
          <table:table-cell table:style-name="表格19.A3" office:value-type="string">
            <text:p text:style-name="P41">把外部路由（BGP 等）帶進 OSPF，是對外的大門</text:p>
          </table:table-cell>
        </table:table-row>
      </table:table>
      <text:h text:style-name="P3" text:outline-level="3"><text:span text:style-name="T16">▍</text:span><text:span text:style-name="T17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33">能力</text:p>
            </table:table-cell>
            <table:table-cell table:style-name="表格20.A1" office:value-type="string">
              <text:p text:style-name="P33">FW</text:p>
            </table:table-cell>
            <table:table-cell table:style-name="表格20.A1" office:value-type="string">
              <text:p text:style-name="P33">WAF</text:p>
            </table:table-cell>
            <table:table-cell table:style-name="表格20.A1" office:value-type="string">
              <text:p text:style-name="P33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41">IP / Port 過濾</text:p>
          </table:table-cell>
          <table:table-cell table:style-name="表格20.A2" office:value-type="string">
            <text:p text:style-name="P55">○</text:p>
          </table:table-cell>
          <table:table-cell table:style-name="表格20.A2" office:value-type="string">
            <text:p text:style-name="P55">○</text:p>
          </table:table-cell>
          <table:table-cell table:style-name="表格20.A2" office:value-type="string">
            <text:p text:style-name="P55">○</text:p>
          </table:table-cell>
        </table:table-row>
        <table:table-row table:style-name="表格20.1">
          <table:table-cell table:style-name="表格20.A3" office:value-type="string">
            <text:p text:style-name="P41">HTTP 內容檢查</text:p>
          </table:table-cell>
          <table:table-cell table:style-name="表格20.A3" office:value-type="string">
            <text:p text:style-name="P54">✗</text:p>
          </table:table-cell>
          <table:table-cell table:style-name="表格20.A3" office:value-type="string">
            <text:p text:style-name="P55">○</text:p>
          </table:table-cell>
          <table:table-cell table:style-name="表格20.A3" office:value-type="string">
            <text:p text:style-name="P55">○</text:p>
          </table:table-cell>
        </table:table-row>
        <table:table-row table:style-name="表格20.1">
          <table:table-cell table:style-name="表格20.A2" office:value-type="string">
            <text:p text:style-name="P41">DPI 深度檢查</text:p>
          </table:table-cell>
          <table:table-cell table:style-name="表格20.A2" office:value-type="string">
            <text:p text:style-name="P54">✗</text:p>
          </table:table-cell>
          <table:table-cell table:style-name="表格20.A2" office:value-type="string">
            <text:p text:style-name="P54">✗</text:p>
          </table:table-cell>
          <table:table-cell table:style-name="表格20.A2" office:value-type="string">
            <text:p text:style-name="P55">○</text:p>
          </table:table-cell>
        </table:table-row>
        <table:table-row table:style-name="表格20.1">
          <table:table-cell table:style-name="表格20.A3" office:value-type="string">
            <text:p text:style-name="P41">App 識別 / IPS</text:p>
          </table:table-cell>
          <table:table-cell table:style-name="表格20.A3" office:value-type="string">
            <text:p text:style-name="P54">✗</text:p>
          </table:table-cell>
          <table:table-cell table:style-name="表格20.A3" office:value-type="string">
            <text:p text:style-name="P54">✗</text:p>
          </table:table-cell>
          <table:table-cell table:style-name="表格20.A3" office:value-type="string">
            <text:p text:style-name="P55">○</text:p>
          </table:table-cell>
        </table:table-row>
        <table:table-row table:style-name="表格20.1">
          <table:table-cell table:style-name="表格20.A2" office:value-type="string">
            <text:p text:style-name="P41">OSI 層</text:p>
          </table:table-cell>
          <table:table-cell table:style-name="表格20.A2" office:value-type="string">
            <text:p text:style-name="P40">L3 / L4</text:p>
          </table:table-cell>
          <table:table-cell table:style-name="表格20.A2" office:value-type="string">
            <text:p text:style-name="P22">L7</text:p>
          </table:table-cell>
          <table:table-cell table:style-name="表格20.A2" office:value-type="string">
            <text:p text:style-name="P40">L3–L7</text:p>
          </table:table-cell>
        </table:table-row>
      </table:table>
      <text:h text:style-name="P3" text:outline-level="3"><text:span text:style-name="T16">▍</text:span><text:span text:style-name="T17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34">工具</text:p>
            </table:table-cell>
            <table:table-cell table:style-name="表格21.A1" office:value-type="string">
              <text:p text:style-name="P34">角色</text:p>
            </table:table-cell>
            <table:table-cell table:style-name="表格21.A1" office:value-type="string">
              <text:p text:style-name="P34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41">Firewall</text:p>
          </table:table-cell>
          <table:table-cell table:style-name="表格21.A2" office:value-type="string">
            <text:p text:style-name="P41">大門警衛</text:p>
          </table:table-cell>
          <table:table-cell table:style-name="表格21.A2" office:value-type="string">
            <text:p text:style-name="P41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41">IDS</text:p>
          </table:table-cell>
          <table:table-cell table:style-name="表格21.A3" office:value-type="string">
            <text:p text:style-name="P41">監視器（只看）</text:p>
          </table:table-cell>
          <table:table-cell table:style-name="表格21.A3" office:value-type="string">
            <text:p text:style-name="P41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41">IPS</text:p>
          </table:table-cell>
          <table:table-cell table:style-name="表格21.A2" office:value-type="string">
            <text:p text:style-name="P41">監視器＋警衛</text:p>
          </table:table-cell>
          <table:table-cell table:style-name="表格21.A2" office:value-type="string">
            <text:p text:style-name="P41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41">HIDS</text:p>
          </table:table-cell>
          <table:table-cell table:style-name="表格21.A3" office:value-type="string">
            <text:p text:style-name="P41">主機型</text:p>
          </table:table-cell>
          <table:table-cell table:style-name="表格21.A3" office:value-type="string">
            <text:p text:style-name="P41">看主機 Log／系統行為</text:p>
          </table:table-cell>
        </table:table-row>
        <table:table-row table:style-name="表格21.1">
          <table:table-cell table:style-name="表格21.A2" office:value-type="string">
            <text:p text:style-name="P41">NIDS</text:p>
          </table:table-cell>
          <table:table-cell table:style-name="表格21.A2" office:value-type="string">
            <text:p text:style-name="P41">網路型</text:p>
          </table:table-cell>
          <table:table-cell table:style-name="表格21.A2" office:value-type="string">
            <text:p text:style-name="P41">看網路封包／流量</text:p>
          </table:table-cell>
        </table:table-row>
        <table:table-row table:style-name="表格21.1">
          <table:table-cell table:style-name="表格21.A3" office:value-type="string">
            <text:p text:style-name="P41">SNMP</text:p>
          </table:table-cell>
          <table:table-cell table:style-name="表格21.A3" office:value-type="string">
            <text:p text:style-name="P41">管理室</text:p>
          </table:table-cell>
          <table:table-cell table:style-name="表格21.A3" office:value-type="string">
            <text:p text:style-name="P41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41">ICMP</text:p>
          </table:table-cell>
          <table:table-cell table:style-name="表格21.A2" office:value-type="string">
            <text:p text:style-name="P41">網路測試員</text:p>
          </table:table-cell>
          <table:table-cell table:style-name="表格21.A2" office:value-type="string">
            <text:p text:style-name="P41">診斷網路連線（網路層／Ping）</text:p>
          </table:table-cell>
        </table:table-row>
      </table:table>
      <text:h text:style-name="P3" text:outline-level="3"><text:span text:style-name="T16">▍</text:span><text:span text:style-name="T17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33">口訣</text:p>
            </table:table-cell>
            <table:table-cell table:style-name="表格22.A1" office:value-type="string">
              <text:p text:style-name="P33">IOC 類型</text:p>
            </table:table-cell>
            <table:table-cell table:style-name="表格22.A1" office:value-type="string">
              <text:p text:style-name="P33">白話</text:p>
            </table:table-cell>
            <table:table-cell table:style-name="表格22.A1" office:value-type="string">
              <text:p text:style-name="P33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57">網</text:p>
          </table:table-cell>
          <table:table-cell table:style-name="表格22.A2" office:value-type="string">
            <text:p text:style-name="P41">惡意 Domain</text:p>
          </table:table-cell>
          <table:table-cell table:style-name="表格22.A2" office:value-type="string">
            <text:p text:style-name="P41">釣魚網站網址</text:p>
          </table:table-cell>
          <table:table-cell table:style-name="表格22.A2" office:value-type="string">
            <text:p text:style-name="P41">DNS 封鎖網域</text:p>
          </table:table-cell>
        </table:table-row>
        <table:table-row table:style-name="表格22.1">
          <table:table-cell table:style-name="表格22.A3" office:value-type="string">
            <text:p text:style-name="P57">檔</text:p>
          </table:table-cell>
          <table:table-cell table:style-name="表格22.A3" office:value-type="string">
            <text:p text:style-name="P41">惡意 Hash</text:p>
          </table:table-cell>
          <table:table-cell table:style-name="表格22.A3" office:value-type="string">
            <text:p text:style-name="P41">惡意程式特徵碼（改名也認得）</text:p>
          </table:table-cell>
          <table:table-cell table:style-name="表格22.A3" office:value-type="string">
            <text:p text:style-name="P41">防毒比對特徵</text:p>
          </table:table-cell>
        </table:table-row>
        <table:table-row table:style-name="表格22.1">
          <table:table-cell table:style-name="表格22.A2" office:value-type="string">
            <text:p text:style-name="P57">連</text:p>
          </table:table-cell>
          <table:table-cell table:style-name="表格22.A2" office:value-type="string">
            <text:p text:style-name="P41">惡意 IP</text:p>
          </table:table-cell>
          <table:table-cell table:style-name="表格22.A2" office:value-type="string">
            <text:p text:style-name="P41">感染後對外異常連線目標</text:p>
          </table:table-cell>
          <table:table-cell table:style-name="表格22.A2" office:value-type="string">
            <text:p text:style-name="P41">FW / NGFW 封鎖</text:p>
          </table:table-cell>
        </table:table-row>
        <table:table-row table:style-name="表格22.1">
          <table:table-cell table:style-name="表格22.A3" office:value-type="string">
            <text:p text:style-name="P57">控</text:p>
          </table:table-cell>
          <table:table-cell table:style-name="表格22.A3" office:value-type="string">
            <text:p text:style-name="P41">C2 Server</text:p>
          </table:table-cell>
          <table:table-cell table:style-name="表格22.A3" office:value-type="string">
            <text:p text:style-name="P41">駭客遠端操控總部</text:p>
          </table:table-cell>
          <table:table-cell table:style-name="表格22.A3" office:value-type="string">
            <text:p text:style-name="P41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0"><text:span text:style-name="T19">必記：</text:span><text:span text:style-name="T11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35">項目</text:p>
            </table:table-cell>
            <table:table-cell table:style-name="表格23.A1" office:value-type="string">
              <text:p text:style-name="P35">Recursive 遞迴</text:p>
            </table:table-cell>
            <table:table-cell table:style-name="表格23.A1" office:value-type="string">
              <text:p text:style-name="P3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5">口訣</text:p>
          </table:table-cell>
          <table:table-cell table:style-name="表格23.A2" office:value-type="string">
            <text:p text:style-name="P49">代查到底</text:p>
          </table:table-cell>
          <table:table-cell table:style-name="表格23.A2" office:value-type="string">
            <text:p text:style-name="P24">逐層詢問</text:p>
          </table:table-cell>
        </table:table-row>
        <table:table-row table:style-name="表格23.1">
          <table:table-cell table:style-name="表格23.A3" office:value-type="string">
            <text:p text:style-name="P45">誰去問</text:p>
          </table:table-cell>
          <table:table-cell table:style-name="表格23.A3" office:value-type="string">
            <text:p text:style-name="P45">DNS 伺服器代你問完</text:p>
          </table:table-cell>
          <table:table-cell table:style-name="表格23.A3" office:value-type="string">
            <text:p text:style-name="P45">你自己逐層查詢</text:p>
          </table:table-cell>
        </table:table-row>
        <table:table-row table:style-name="表格23.1">
          <table:table-cell table:style-name="表格23.A2" office:value-type="string">
            <text:p text:style-name="P45">問幾次</text:p>
          </table:table-cell>
          <table:table-cell table:style-name="表格23.A2" office:value-type="string">
            <text:p text:style-name="P45">只問 1 次</text:p>
          </table:table-cell>
          <table:table-cell table:style-name="表格23.A2" office:value-type="string">
            <text:p text:style-name="P45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5">常見場合</text:p>
          </table:table-cell>
          <table:table-cell table:style-name="表格23.A3" office:value-type="string">
            <text:p text:style-name="P45">一般使用者 → Local DNS</text:p>
          </table:table-cell>
          <table:table-cell table:style-name="表格23.A3" office:value-type="string">
            <text:p text:style-name="P45">DNS 伺服器之間互查</text:p>
          </table:table-cell>
        </table:table-row>
      </table:table>
      <text:h text:style-name="P3" text:outline-level="3"><text:span text:style-name="T16">▍</text:span><text:span text:style-name="T17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34">指標 / 名詞</text:p>
            </table:table-cell>
            <table:table-cell table:style-name="表格24.A1" office:value-type="string">
              <text:p text:style-name="P34">意義</text:p>
            </table:table-cell>
            <table:table-cell table:style-name="表格24.A1" office:value-type="string">
              <text:p text:style-name="P34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41">RTO</text:p>
          </table:table-cell>
          <table:table-cell table:style-name="表格24.A2" office:value-type="string">
            <text:p text:style-name="P41">Recovery Time Objective 復原時間目標</text:p>
          </table:table-cell>
          <table:table-cell table:style-name="表格24.A2" office:value-type="string">
            <text:p text:style-name="P29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41">RPO</text:p>
          </table:table-cell>
          <table:table-cell table:style-name="表格24.A3" office:value-type="string">
            <text:p text:style-name="P41">Recovery Point Objective 復原點目標</text:p>
          </table:table-cell>
          <table:table-cell table:style-name="表格24.A3" office:value-type="string">
            <text:p text:style-name="P29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41">EDR</text:p>
          </table:table-cell>
          <table:table-cell table:style-name="表格24.A2" office:value-type="string">
            <text:p text:style-name="P41">Endpoint Detection &amp; Response</text:p>
          </table:table-cell>
          <table:table-cell table:style-name="表格24.A2" office:value-type="string">
            <text:p text:style-name="P41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41">MDR</text:p>
          </table:table-cell>
          <table:table-cell table:style-name="表格24.A3" office:value-type="string">
            <text:p text:style-name="P41">Managed Detection &amp; Response</text:p>
          </table:table-cell>
          <table:table-cell table:style-name="表格24.A3" office:value-type="string">
            <text:p text:style-name="P41">請資安公司委外守（24／7，適合中小企業）</text:p>
          </table:table-cell>
        </table:table-row>
      </table:table>
      <text:h text:style-name="P3" text:outline-level="3"><text:span text:style-name="T16">▍</text:span><text:span text:style-name="T17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33">Protocol 值</text:p>
            </table:table-cell>
            <table:table-cell table:style-name="表格25.A1" office:value-type="string">
              <text:p text:style-name="P33">DF Flag</text:p>
            </table:table-cell>
            <table:table-cell table:style-name="表格25.A1" office:value-type="string">
              <text:p text:style-name="P33">MF Flag</text:p>
            </table:table-cell>
            <table:table-cell table:style-name="表格25.A1" office:value-type="string">
              <text:p text:style-name="P33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41">ICMP=1 / TCP=6 / UDP=17</text:p>
          </table:table-cell>
          <table:table-cell table:style-name="表格25.A2" office:value-type="string">
            <text:p text:style-name="P41">DF=1：禁止切，太大就丟＋ICMP</text:p>
          </table:table-cell>
          <table:table-cell table:style-name="表格25.A2" office:value-type="string">
            <text:p text:style-name="P41">MF=1：後面還有分段（最後段=0）</text:p>
          </table:table-cell>
          <table:table-cell table:style-name="表格25.A2" office:value-type="string">
            <text:p text:style-name="P23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9"><text:span text:style-name="T15">✅ <text:s/></text:span><text:span text:style-name="T7">提醒</text:span></text:p>
            <text:p text:style-name="P43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4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<text:span text:style-name="T15">🌐 <text:s/></text:span><text:span text:style-name="T7">本篇重點</text:span></text:p>
            <text:p text:style-name="P43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5" text:outline-level="2">一、用「寄信」理解分層（修正版）</text:h>
      <text:p text:style-name="P44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34">TCP/IP 層</text:p>
            </table:table-cell>
            <table:table-cell table:style-name="表格27.A1" office:value-type="string">
              <text:p text:style-name="P34">郵寄比喻</text:p>
            </table:table-cell>
            <table:table-cell table:style-name="表格27.A1" office:value-type="string">
              <text:p text:style-name="P34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41">🟢 應用層 Application</text:p>
          </table:table-cell>
          <table:table-cell table:style-name="表格27.A2" office:value-type="string">
            <text:p text:style-name="P41">決定「<text:span text:style-name="T31">寄什麼內容</text:span>」（信的內容與格式）</text:p>
          </table:table-cell>
          <table:table-cell table:style-name="表格27.A2" office:value-type="string">
            <text:p text:style-name="P41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41">🟡 傳輸層 Transport</text:p>
          </table:table-cell>
          <table:table-cell table:style-name="表格27.A3" office:value-type="string">
            <text:p text:style-name="P65">切分、編頁碼、確認收件</text:p>
          </table:table-cell>
          <table:table-cell table:style-name="表格27.A3" office:value-type="string">
            <text:p text:style-name="P41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41">🔵 網路層 Network</text:p>
          </table:table-cell>
          <table:table-cell table:style-name="表格27.A2" office:value-type="string">
            <text:p text:style-name="P41"><text:span text:style-name="T61">寫地址＋規劃路線</text:span>（郵遞區號＋郵局選路）</text:p>
          </table:table-cell>
          <table:table-cell table:style-name="表格27.A2" office:value-type="string">
            <text:p text:style-name="P63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41">🟠 連結層 Link</text:p>
          </table:table-cell>
          <table:table-cell table:style-name="表格27.A3" office:value-type="string">
            <text:p text:style-name="P41">當前路段的區域配送</text:p>
          </table:table-cell>
          <table:table-cell table:style-name="表格27.A3" office:value-type="string">
            <text:p text:style-name="P64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9"><text:span text:style-name="T15">⚠️ <text:s/></text:span><text:span text:style-name="T20">舊版三大比喻的錯誤</text:span></text:p>
            <text:p text:style-name="P10"><text:span text:style-name="T12">❌ 舊：「寫地址 → 應用層」　</text:span><text:span text:style-name="T11">IP 位址屬於網路層；應用層負責的是「內容與格式」，不是地址。</text:span></text:p>
            <text:p text:style-name="P11"><text:span text:style-name="T12">❌ 舊：「打包 → 傳輸層」　</text:span><text:span text:style-name="T11">傳輸層還負責切割、編號、重傳、流量控制，遠不只「打包」。</text:span></text:p>
            <text:p text:style-name="P11"><text:span text:style-name="T12">❌ 舊：「實際搬運 → 連結層」　</text:span><text:span text:style-name="T11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5" text:outline-level="2">二、OSI 7 層 vs TCP/IP 4 層（完整對照）</text:h>
      <text:p text:style-name="P44"><text:span text:style-name="T29">OSI 是理論模型（7 層）</text:span>；<text:span text:style-name="T31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33">層號</text:p>
            </table:table-cell>
            <table:table-cell table:style-name="表格28.A1" office:value-type="string">
              <text:p text:style-name="P33">OSI 層名</text:p>
            </table:table-cell>
            <table:table-cell table:style-name="表格28.A1" office:value-type="string">
              <text:p text:style-name="P33">主要功能</text:p>
            </table:table-cell>
            <table:table-cell table:style-name="表格28.A1" office:value-type="string">
              <text:p text:style-name="P33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40">7</text:p>
          </table:table-cell>
          <table:table-cell table:style-name="表格28.A2" office:value-type="string">
            <text:p text:style-name="P41">Application <text:span text:style-name="T32">應</text:span>用層</text:p>
          </table:table-cell>
          <table:table-cell table:style-name="表格28.A2" office:value-type="string">
            <text:p text:style-name="P41">使用者直接操作：HTTP、DNS、DHCP</text:p>
          </table:table-cell>
          <table:table-cell table:style-name="表格28.A2" office:value-type="string">
            <text:p text:style-name="P41">Application</text:p>
          </table:table-cell>
        </table:table-row>
        <table:table-row table:style-name="表格28.1">
          <table:table-cell table:style-name="表格28.A3" office:value-type="string">
            <text:p text:style-name="P40">6</text:p>
          </table:table-cell>
          <table:table-cell table:style-name="表格28.A3" office:value-type="string">
            <text:p text:style-name="P41">Presentation <text:span text:style-name="T32">表</text:span>示層</text:p>
          </table:table-cell>
          <table:table-cell table:style-name="表格28.A3" office:value-type="string">
            <text:p text:style-name="P60">資料格式轉換、加解密、壓縮</text:p>
          </table:table-cell>
          <table:table-cell table:style-name="表格28.A3" office:value-type="string">
            <text:p text:style-name="P41">↑ 併入 Application</text:p>
          </table:table-cell>
        </table:table-row>
        <table:table-row table:style-name="表格28.1">
          <table:table-cell table:style-name="表格28.A2" office:value-type="string">
            <text:p text:style-name="P40">5</text:p>
          </table:table-cell>
          <table:table-cell table:style-name="表格28.A2" office:value-type="string">
            <text:p text:style-name="P41">Session <text:span text:style-name="T32">會</text:span>話層</text:p>
          </table:table-cell>
          <table:table-cell table:style-name="表格28.A2" office:value-type="string">
            <text:p text:style-name="P61">連線的建立、維持與終止</text:p>
          </table:table-cell>
          <table:table-cell table:style-name="表格28.A2" office:value-type="string">
            <text:p text:style-name="P41">↑ 併入 Application</text:p>
          </table:table-cell>
        </table:table-row>
        <table:table-row table:style-name="表格28.1">
          <table:table-cell table:style-name="表格28.A3" office:value-type="string">
            <text:p text:style-name="P40">4</text:p>
          </table:table-cell>
          <table:table-cell table:style-name="表格28.A3" office:value-type="string">
            <text:p text:style-name="P41">Transport <text:span text:style-name="T32">傳</text:span>輸層</text:p>
          </table:table-cell>
          <table:table-cell table:style-name="表格28.A3" office:value-type="string">
            <text:p text:style-name="P41">端對端傳輸控制（TCP / UDP）</text:p>
          </table:table-cell>
          <table:table-cell table:style-name="表格28.A3" office:value-type="string">
            <text:p text:style-name="P41">Transport</text:p>
          </table:table-cell>
        </table:table-row>
        <table:table-row table:style-name="表格28.1">
          <table:table-cell table:style-name="表格28.A2" office:value-type="string">
            <text:p text:style-name="P40">3</text:p>
          </table:table-cell>
          <table:table-cell table:style-name="表格28.A2" office:value-type="string">
            <text:p text:style-name="P41">Network <text:span text:style-name="T32">網</text:span>路層</text:p>
          </table:table-cell>
          <table:table-cell table:style-name="表格28.A2" office:value-type="string">
            <text:p text:style-name="P64">IP 路由、ICMP 錯誤回報</text:p>
          </table:table-cell>
          <table:table-cell table:style-name="表格28.A2" office:value-type="string">
            <text:p text:style-name="P41">Internet</text:p>
          </table:table-cell>
        </table:table-row>
        <table:table-row table:style-name="表格28.1">
          <table:table-cell table:style-name="表格28.A3" office:value-type="string">
            <text:p text:style-name="P40">2</text:p>
          </table:table-cell>
          <table:table-cell table:style-name="表格28.A3" office:value-type="string">
            <text:p text:style-name="P41">Data Link <text:span text:style-name="T44">資</text:span>料鏈結層</text:p>
          </table:table-cell>
          <table:table-cell table:style-name="表格28.A3" office:value-type="string">
            <text:p text:style-name="P62">MAC 位址、區域網路傳輸（ARP）</text:p>
          </table:table-cell>
          <table:table-cell table:style-name="表格28.A3" office:value-type="string">
            <text:p text:style-name="P41">Link</text:p>
          </table:table-cell>
        </table:table-row>
        <table:table-row table:style-name="表格28.1">
          <table:table-cell table:style-name="表格28.A2" office:value-type="string">
            <text:p text:style-name="P40">1</text:p>
          </table:table-cell>
          <table:table-cell table:style-name="表格28.A2" office:value-type="string">
            <text:p text:style-name="P41">Physical <text:span text:style-name="T32">實</text:span>體層</text:p>
          </table:table-cell>
          <table:table-cell table:style-name="表格28.A2" office:value-type="string">
            <text:p text:style-name="P41">電訊號、光訊號、無線電波</text:p>
          </table:table-cell>
          <table:table-cell table:style-name="表格28.A2" office:value-type="string">
            <text:p text:style-name="P41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9"><text:span text:style-name="T15">⚡ <text:s/></text:span><text:span text:style-name="T17">速記</text:span></text:p>
            <text:p text:style-name="P43"><text:span text:style-name="T29">OSI → 7 層（理論）</text:span>，<text:span text:style-name="T31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33">🟢 Application 應用層</text:p>
            </table:table-cell>
            <table:table-cell table:style-name="表格29.A1" office:value-type="string">
              <text:p text:style-name="P33">🟡 Transport 傳輸層</text:p>
            </table:table-cell>
            <table:table-cell table:style-name="表格29.A1" office:value-type="string">
              <text:p text:style-name="P33">🔵 Network 網路層</text:p>
            </table:table-cell>
            <table:table-cell table:style-name="表格29.A1" office:value-type="string">
              <text:p text:style-name="P33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41">HTTP / HTTPS、DNS、DHCP、SSH、MQTT、<text:span text:style-name="T27">OSPF*</text:span></text:p>
          </table:table-cell>
          <table:table-cell table:style-name="表格29.A2" office:value-type="string">
            <text:p text:style-name="P66">TCP（可靠傳輸）、UDP（高速傳輸）</text:p>
          </table:table-cell>
          <table:table-cell table:style-name="表格29.A2" office:value-type="string">
            <text:p text:style-name="P41">IP（路由定址）、<text:span text:style-name="T48">ICMP（錯誤回報 / ping）</text:span></text:p>
          </table:table-cell>
          <table:table-cell table:style-name="表格29.A2" office:value-type="string">
            <text:p text:style-name="P41">Ethernet（有線網路）、<text:span text:style-name="T55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0"><text:span text:style-name="T19">OSPF 分層備註：</text:span><text:span text:style-name="T11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5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37">協定</text:p>
            </table:table-cell>
            <table:table-cell table:style-name="表格30.A1" office:value-type="string">
              <text:p text:style-name="P37">層級</text:p>
            </table:table-cell>
            <table:table-cell table:style-name="表格30.A1" office:value-type="string">
              <text:p text:style-name="P37">做什麼（白話）</text:p>
            </table:table-cell>
            <table:table-cell table:style-name="表格30.A1" office:value-type="string">
              <text:p text:style-name="P37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34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連上 WiFi 時不必手動設定 IP，DHCP 伺服器自動分配一個 IP 給你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34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透過加密通道遠端操控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34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IoT 裝置常用的輕量傳訊協定，採「發布／訂閱」模式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34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36">路由器之間使用</text:span>，<text:span text:style-name="T56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9"><text:span text:style-name="T15">💡 <text:s/></text:span><text:span text:style-name="T17">快速判斷層級的技巧</text:span></text:p>
            <text:p text:style-name="P10"><text:span text:style-name="T18">使用者／應用服務</text:span><text:span text:style-name="T11">（SSH、DHCP、MQTT、HTTP）→ 幾乎都是應用層。</text:span></text:p>
            <text:p text:style-name="P11"><text:span text:style-name="T18">幫路由器決定走哪條路</text:span><text:span text:style-name="T11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5" text:outline-level="2">五、網路層深度解析：IP · Routing · ICMP</text:h>
      <text:p text:style-name="P44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33">📍 IP（位址）</text:p>
            </table:table-cell>
            <table:table-cell table:style-name="表格31.A1" office:value-type="string">
              <text:p text:style-name="P33">🗺️ Routing（路由）</text:p>
            </table:table-cell>
            <table:table-cell table:style-name="表格31.A1" office:value-type="string">
              <text:p text:style-name="P33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41">決定「目的地在哪」。每台設備都有 IP，就像門牌；IP 負責標記「我要送去哪裡」。</text:p>
          </table:table-cell>
          <table:table-cell table:style-name="表格31.A2" office:value-type="string">
            <text:p text:style-name="P41">決定「怎麼走最快」。封包經過很多路由器，每台都問「下一站往哪送？」OSPF 等協定算出最短路徑。</text:p>
          </table:table-cell>
          <table:table-cell table:style-name="表格31.A2" office:value-type="string">
            <text:p text:style-name="P41">回報「出了什麼問題」。找不到主機、路不通、TTL 歸零 → 各自回傳對應 ICMP 訊息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9"><text:span text:style-name="T15">🔍 <text:s/></text:span><text:span text:style-name="T7">ping 是什麼？為什麼跟 ICMP 有關？</text:span></text:p>
            <text:p text:style-name="P30">ping google.com 的運作：</text:p>
            <text:p text:style-name="P42">① 你的電腦發出 ICMP Echo Request（「你在嗎？」）</text:p>
            <text:p text:style-name="P42">② 目標主機回傳 ICMP Echo Reply（「我在！」）</text:p>
            <text:p text:style-name="P42">③ 顯示來回時間（ms），數字越小代表網路越暢通</text:p>
            <text:p text:style-name="P11"><text:span text:style-name="T19">⚠️ 重點：</text:span><text:span text:style-name="T11">ping 完全使用 ICMP，不走 TCP 也不走 UDP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9"><text:span text:style-name="T15">⚡ <text:s/></text:span><text:span text:style-name="T17">三個概念一次記清楚</text:span></text:p>
            <text:p text:style-name="P10"><text:span text:style-name="T18">📍 IP → </text:span><text:span text:style-name="T11">定位（目的地是誰）　</text:span><text:span text:style-name="T18">🗺️ Routing → </text:span><text:span text:style-name="T11">選路（怎麼走最快）　</text:span><text:span text:style-name="T18">🚨 ICMP → </text:span><text:span text:style-name="T11">回報（出錯了通知你）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6">六、TCP vs UDP 差異比較</text:span></text:h>
      <text:p text:style-name="P44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35">比較項目</text:p>
            </table:table-cell>
            <table:table-cell table:style-name="表格32.A1" office:value-type="string">
              <text:p text:style-name="P35">TCP</text:p>
            </table:table-cell>
            <table:table-cell table:style-name="表格32.A1" office:value-type="string">
              <text:p text:style-name="P3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5">連線方式</text:p>
          </table:table-cell>
          <table:table-cell table:style-name="表格32.A2" office:value-type="string">
            <text:p text:style-name="P45">需要握手（三向交握）</text:p>
          </table:table-cell>
          <table:table-cell table:style-name="表格32.A2" office:value-type="string">
            <text:p text:style-name="P45">無連線，直接送出</text:p>
          </table:table-cell>
        </table:table-row>
        <table:table-row table:style-name="表格32.1">
          <table:table-cell table:style-name="表格32.A3" office:value-type="string">
            <text:p text:style-name="P45">可靠性</text:p>
          </table:table-cell>
          <table:table-cell table:style-name="表格32.A3" office:value-type="string">
            <text:p text:style-name="P45">保證送達，遺失會重傳</text:p>
          </table:table-cell>
          <table:table-cell table:style-name="表格32.A3" office:value-type="string">
            <text:p text:style-name="P45">不保證，遺失不補</text:p>
          </table:table-cell>
        </table:table-row>
        <table:table-row table:style-name="表格32.1">
          <table:table-cell table:style-name="表格32.A2" office:value-type="string">
            <text:p text:style-name="P45">速度</text:p>
          </table:table-cell>
          <table:table-cell table:style-name="表格32.A2" office:value-type="string">
            <text:p text:style-name="P45">較慢（有確認機制）</text:p>
          </table:table-cell>
          <table:table-cell table:style-name="表格32.A2" office:value-type="string">
            <text:p text:style-name="P45">較快（無確認機制）</text:p>
          </table:table-cell>
        </table:table-row>
        <table:table-row table:style-name="表格32.1">
          <table:table-cell table:style-name="表格32.A3" office:value-type="string">
            <text:p text:style-name="P45">使用情境</text:p>
          </table:table-cell>
          <table:table-cell table:style-name="表格32.A3" office:value-type="string">
            <text:p text:style-name="P45">HTTP、Email、FTP</text:p>
          </table:table-cell>
          <table:table-cell table:style-name="表格32.A3" office:value-type="string">
            <text:p text:style-name="P45">串流影音、VoIP、DNS</text:p>
          </table:table-cell>
        </table:table-row>
        <table:table-row table:style-name="表格32.1">
          <table:table-cell table:style-name="表格32.A2" office:value-type="string">
            <text:p text:style-name="P45">一句話</text:p>
          </table:table-cell>
          <table:table-cell table:style-name="表格32.A2" office:value-type="string">
            <text:p text:style-name="P49">「穩定優先」</text:p>
          </table:table-cell>
          <table:table-cell table:style-name="表格32.A2" office:value-type="string">
            <text:p text:style-name="P24">「速度優先」</text:p>
          </table:table-cell>
        </table:table-row>
      </table:table>
      <text:h text:style-name="P15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><text:span text:style-name="T15">🔗 <text:s/></text:span><text:span text:style-name="T7">ARP 重點</text:span></text:p>
            <text:p text:style-name="P10"><text:span text:style-name="T8">ARP 做什麼？　</text:span><text:span text:style-name="T11">在同一個區域網路（LAN）中，將「IP 位址（邏輯位址）」轉換成「MAC 位址（實體位址）」。</text:span></text:p>
            <text:p text:style-name="P11"><text:span text:style-name="T8">為何屬於 Link 層？　</text:span><text:span text:style-name="T11">ARP 的作用範圍僅限於同一區域網路內，無法跨越路由器，因此歸屬 Link（連結）層。</text:span></text:p>
            <text:p text:style-name="P31">運作流程：</text:p>
            <text:p text:style-name="P42">① 裝置 A 廣播詢問：「誰的 IP 是 192.168.1.5？」</text:p>
            <text:p text:style-name="P42">② 裝置 B 回應：「是我！MAC 是 AA:BB:CC:DD:EE:FF」</text:p>
            <text:p text:style-name="P42">③ 裝置 A 記錄此對應至 ARP 快取，下次直接使用</text:p>
          </table:table-cell>
        </table:table-row>
      </table:table>
      <text:p text:style-name="P19">（ARP 完整流程、ARP Spoofing 與完整上網流程，詳見第四篇。）</text:p>
      <text:h text:style-name="P15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0"><text:span text:style-name="T5">目的：</text:span><text:span text:style-name="T11">找出封包從來源到目的地，中間經過哪些路由器（完整路徑偵測）。</text:span></text:p>
            <text:p text:style-name="P11"><text:span text:style-name="T5">TTL（Time To Live）：</text:span><text:span text:style-name="T11">封包的「存活計數器」。每經過一個路由器就減 1；歸零時路由器丟棄封包，並回傳 ICMP Time Exceeded 給發送方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37">封包次數</text:p>
          </table:table-cell>
          <table:table-cell table:style-name="表格34.A2" office:value-type="string">
            <text:p text:style-name="P37">TTL 值</text:p>
          </table:table-cell>
          <table:table-cell table:style-name="表格34.A2" office:value-type="string">
            <text:p text:style-name="P37">發生什麼事</text:p>
          </table:table-cell>
          <table:table-cell table:style-name="表格34.A2" office:value-type="string">
            <text:p text:style-name="P37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抵達第 1 個 Router → TTL 歸零 → 回傳 ICMP Time Exceeded</text:p>
          </table:table-cell>
          <table:table-cell table:style-name="表格34.A3" office:value-type="string">
            <text:p text:style-name="P46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通過第 1 站 → 抵達第 2 個 Router → TTL 歸零 → 回傳 ICMP</text:p>
          </table:table-cell>
          <table:table-cell table:style-name="表格34.A4" office:value-type="string">
            <text:p text:style-name="P46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9"><text:span text:style-name="T15">⚡ <text:s/></text:span><text:span text:style-name="T17">一句話記憶</text:span></text:p>
            <text:p text:style-name="P43">Traceroute = TTL 遞增 ＋ ICMP 回報，逐步「炸出」完整網路路徑。</text:p>
          </table:table-cell>
          <table:covered-table-cell/>
          <table:covered-table-cell/>
          <table:covered-table-cell/>
        </table:table-row>
      </table:table>
      <text:h text:style-name="P15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><text:span text:style-name="T15">🔥 <text:s/></text:span><text:span text:style-name="T24">TCP/IP 四層心法（背這個就夠）</text:span></text:p>
            <text:p text:style-name="P10"><text:span text:style-name="T25">🟢 Application（應用層） → </text:span><text:span text:style-name="T11">給人用（HTTP、DNS、DHCP、SSH、MQTT）</text:span></text:p>
            <text:p text:style-name="P11"><text:soft-page-break/><text:span text:style-name="T25">🟡 Transport（傳輸層） → </text:span><text:span text:style-name="T11">怎麼送（TCP＝穩定 / UDP＝快速）</text:span></text:p>
            <text:p text:style-name="P11"><text:span text:style-name="T25">🔵 Network（網路層） → </text:span><text:span text:style-name="T11">走哪條路（IP、ICMP）</text:span></text:p>
            <text:p text:style-name="P11"><text:span text:style-name="T25">🟠 Link（連結層） → </text:span><text:span text:style-name="T11">同一區網怎麼接（Ethernet、ARP）</text:span></text:p>
          </table:table-cell>
        </table:table-row>
      </table:table>
      <text:h text:style-name="P14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><text:span text:style-name="T15">📐 <text:s/></text:span><text:span text:style-name="T7">本篇重點</text:span></text:p>
            <text:p text:style-name="P43">本篇分兩大主軸：前半談「IP 位址如何劃分」（分類、CIDR、子網計算、VLSM、CIDR 合併）；後半談「封包如何被切割傳送」（MTU、Fragmentation、IP Header、DF/MF、PMTUD、MSS、Frag DoS）。子網計算是計算題必考，務必動手練。</text:p>
          </table:table-cell>
        </table:table-row>
      </table:table>
      <text:h text:style-name="P15" text:outline-level="2">壹、IP 位址基礎</text:h>
      <text:p text:style-name="P44">IP 位址（IPv4）是一組 32 個 bit，用來識別網路上每一台設備的「地址」。為了人類方便閱讀，這 32 個 bit 被分成 4 組、每組 8 個 bit（一個 Octet），再轉成十進位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36">Octet 1</text:p>
            </table:table-cell>
            <table:table-cell table:style-name="表格37.A1" office:value-type="string">
              <text:p text:style-name="P36">Octet 2</text:p>
            </table:table-cell>
            <table:table-cell table:style-name="表格37.A1" office:value-type="string">
              <text:p text:style-name="P36">Octet 3</text:p>
            </table:table-cell>
            <table:table-cell table:style-name="表格37.A1" office:value-type="string">
              <text:p text:style-name="P36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5">192</text:p>
          </table:table-cell>
          <table:table-cell table:style-name="表格37.A2" office:value-type="string">
            <text:p text:style-name="P45">168</text:p>
          </table:table-cell>
          <table:table-cell table:style-name="表格37.A2" office:value-type="string">
            <text:p text:style-name="P45">1</text:p>
          </table:table-cell>
          <table:table-cell table:style-name="表格37.A2" office:value-type="string">
            <text:p text:style-name="P45">0</text:p>
          </table:table-cell>
        </table:table-row>
      </table:table>
      <text:p text:style-name="P20">→ 總共 4 × 8 = 32 個 bit，每組數字範圍 0～255（因為 2⁸ = 256 種組合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><text:span text:style-name="T15">💡 <text:s/></text:span><text:span text:style-name="T20">為什麼 IP 數量一定是 2 的次方？</text:span></text:p>
            <text:p text:style-name="P43">每一個 bit 只有 0 或 1 兩種狀態。若有 n 個 bit 可自由變化，可能的組合數 ＝ 2ⁿ。</text:p>
            <text:p text:style-name="P42">因此子網路的 IP 總數一定是 2、4、8、16、32、64、128、256… 等 2 的次方，不可能是 100 或 50。這就是計算子網時必須「找最接近的 2ⁿ」的根本原因。</text:p>
          </table:table-cell>
        </table:table-row>
      </table:table>
      <text:h text:style-name="P15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34">類別</text:p>
            </table:table-cell>
            <table:table-cell table:style-name="表格39.A1" office:value-type="string">
              <text:p text:style-name="P34">第一組數字範圍</text:p>
            </table:table-cell>
            <table:table-cell table:style-name="表格39.A1" office:value-type="string">
              <text:p text:style-name="P34">預設遮罩</text:p>
            </table:table-cell>
            <table:table-cell table:style-name="表格39.A1" office:value-type="string">
              <text:p text:style-name="P34">用途</text:p>
            </table:table-cell>
            <table:table-cell table:style-name="表格39.A1" office:value-type="string">
              <text:p text:style-name="P34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41">A 類</text:p>
          </table:table-cell>
          <table:table-cell table:style-name="表格39.A2" office:value-type="string">
            <text:p text:style-name="P41">1 ～ 126</text:p>
          </table:table-cell>
          <table:table-cell table:style-name="表格39.A2" office:value-type="string">
            <text:p text:style-name="P41">/8</text:p>
          </table:table-cell>
          <table:table-cell table:style-name="表格39.A2" office:value-type="string">
            <text:p text:style-name="P41">超大型網路</text:p>
          </table:table-cell>
          <table:table-cell table:style-name="表格39.A2" office:value-type="string">
            <text:p text:style-name="P41">約 1,677 萬</text:p>
          </table:table-cell>
        </table:table-row>
        <table:table-row table:style-name="表格39.1">
          <table:table-cell table:style-name="表格39.A3" office:value-type="string">
            <text:p text:style-name="P41">B 類</text:p>
          </table:table-cell>
          <table:table-cell table:style-name="表格39.A3" office:value-type="string">
            <text:p text:style-name="P41">128 ～ 191</text:p>
          </table:table-cell>
          <table:table-cell table:style-name="表格39.A3" office:value-type="string">
            <text:p text:style-name="P41">/16</text:p>
          </table:table-cell>
          <table:table-cell table:style-name="表格39.A3" office:value-type="string">
            <text:p text:style-name="P41">中型網路</text:p>
          </table:table-cell>
          <table:table-cell table:style-name="表格39.A3" office:value-type="string">
            <text:p text:style-name="P41">約 6.5 萬</text:p>
          </table:table-cell>
        </table:table-row>
        <table:table-row table:style-name="表格39.1">
          <table:table-cell table:style-name="表格39.A2" office:value-type="string">
            <text:p text:style-name="P41">C 類</text:p>
          </table:table-cell>
          <table:table-cell table:style-name="表格39.A2" office:value-type="string">
            <text:p text:style-name="P41">192 ～ 223</text:p>
          </table:table-cell>
          <table:table-cell table:style-name="表格39.A2" office:value-type="string">
            <text:p text:style-name="P41">/24</text:p>
          </table:table-cell>
          <table:table-cell table:style-name="表格39.A2" office:value-type="string">
            <text:p text:style-name="P41">小型網路</text:p>
          </table:table-cell>
          <table:table-cell table:style-name="表格39.A2" office:value-type="string">
            <text:p text:style-name="P41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0"><text:span text:style-name="T19">127.x.x.x 為何不在 A 類？　</text:span><text:span text:style-name="T11">127.0.0.1 是回送位址（Loopback），保留給本機自我測試；ping 127.0.0.1 可測本機協定是否正常，故 A 類跳過 127，只到 126。</text:span></text:p>
            <text:p text:style-name="P11"><text:span text:style-name="T19">其他保留位址：</text:span><text:span text:style-name="T11">0.x.x.x＝代表「這個網路本身」；224～239＝D 類（群播 Multicast）；240～255＝E 類（實驗用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參、CIDR 表示法（斜線 /幾）</text:h>
      <text:p text:style-name="P44">CIDR（無類別網域間路由）以「IP + / + 數字」精確表示網路大小，例如 192.168.1.0/24。/ 後面的數字 ＝ 前幾個 bit 是「網路部分」（固定不變），剩下的才是「主機部分」（可變）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34">表示法</text:p>
            </table:table-cell>
            <table:table-cell table:style-name="表格40.A1" office:value-type="string">
              <text:p text:style-name="P34">網路 bit</text:p>
            </table:table-cell>
            <table:table-cell table:style-name="表格40.A1" office:value-type="string">
              <text:p text:style-name="P34">主機 bit</text:p>
            </table:table-cell>
            <table:table-cell table:style-name="表格40.A1" office:value-type="string">
              <text:p text:style-name="P34">IP 總數</text:p>
            </table:table-cell>
            <table:table-cell table:style-name="表格40.A1" office:value-type="string">
              <text:p text:style-name="P34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41">/8</text:p>
          </table:table-cell>
          <table:table-cell table:style-name="表格40.A2" office:value-type="string">
            <text:p text:style-name="P41">8</text:p>
          </table:table-cell>
          <table:table-cell table:style-name="表格40.A2" office:value-type="string">
            <text:p text:style-name="P41">24</text:p>
          </table:table-cell>
          <table:table-cell table:style-name="表格40.A2" office:value-type="string">
            <text:p text:style-name="P41">16,777,216</text:p>
          </table:table-cell>
          <table:table-cell table:style-name="表格40.A2" office:value-type="string">
            <text:p text:style-name="P41">第 1 組（A 類）</text:p>
          </table:table-cell>
        </table:table-row>
        <table:table-row table:style-name="表格40.1">
          <table:table-cell table:style-name="表格40.A3" office:value-type="string">
            <text:p text:style-name="P41">/16</text:p>
          </table:table-cell>
          <table:table-cell table:style-name="表格40.A3" office:value-type="string">
            <text:p text:style-name="P41">16</text:p>
          </table:table-cell>
          <table:table-cell table:style-name="表格40.A3" office:value-type="string">
            <text:p text:style-name="P41">16</text:p>
          </table:table-cell>
          <table:table-cell table:style-name="表格40.A3" office:value-type="string">
            <text:p text:style-name="P41">65,536</text:p>
          </table:table-cell>
          <table:table-cell table:style-name="表格40.A3" office:value-type="string">
            <text:p text:style-name="P41">第 1-2 組（B 類）</text:p>
          </table:table-cell>
        </table:table-row>
        <table:table-row table:style-name="表格40.1">
          <table:table-cell table:style-name="表格40.A2" office:value-type="string">
            <text:p text:style-name="P41">/24</text:p>
          </table:table-cell>
          <table:table-cell table:style-name="表格40.A2" office:value-type="string">
            <text:p text:style-name="P41">24</text:p>
          </table:table-cell>
          <table:table-cell table:style-name="表格40.A2" office:value-type="string">
            <text:p text:style-name="P41">8</text:p>
          </table:table-cell>
          <table:table-cell table:style-name="表格40.A2" office:value-type="string">
            <text:p text:style-name="P41">256</text:p>
          </table:table-cell>
          <table:table-cell table:style-name="表格40.A2" office:value-type="string">
            <text:p text:style-name="P41">第 1-3 組（C 類）</text:p>
          </table:table-cell>
        </table:table-row>
        <table:table-row table:style-name="表格40.1">
          <table:table-cell table:style-name="表格40.A3" office:value-type="string">
            <text:p text:style-name="P41">/25</text:p>
          </table:table-cell>
          <table:table-cell table:style-name="表格40.A3" office:value-type="string">
            <text:p text:style-name="P41">25</text:p>
          </table:table-cell>
          <table:table-cell table:style-name="表格40.A3" office:value-type="string">
            <text:p text:style-name="P41">7</text:p>
          </table:table-cell>
          <table:table-cell table:style-name="表格40.A3" office:value-type="string">
            <text:p text:style-name="P41">128</text:p>
          </table:table-cell>
          <table:table-cell table:style-name="表格40.A3" office:value-type="string">
            <text:p text:style-name="P41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41">/26</text:p>
          </table:table-cell>
          <table:table-cell table:style-name="表格40.A2" office:value-type="string">
            <text:p text:style-name="P41">26</text:p>
          </table:table-cell>
          <table:table-cell table:style-name="表格40.A2" office:value-type="string">
            <text:p text:style-name="P41">6</text:p>
          </table:table-cell>
          <table:table-cell table:style-name="表格40.A2" office:value-type="string">
            <text:p text:style-name="P41">64</text:p>
          </table:table-cell>
          <table:table-cell table:style-name="表格40.A2" office:value-type="string">
            <text:p text:style-name="P41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41">/27</text:p>
          </table:table-cell>
          <table:table-cell table:style-name="表格40.A3" office:value-type="string">
            <text:p text:style-name="P41">27</text:p>
          </table:table-cell>
          <table:table-cell table:style-name="表格40.A3" office:value-type="string">
            <text:p text:style-name="P41">5</text:p>
          </table:table-cell>
          <table:table-cell table:style-name="表格40.A3" office:value-type="string">
            <text:p text:style-name="P41">32</text:p>
          </table:table-cell>
          <table:table-cell table:style-name="表格40.A3" office:value-type="string">
            <text:p text:style-name="P41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41">/28</text:p>
          </table:table-cell>
          <table:table-cell table:style-name="表格40.A2" office:value-type="string">
            <text:p text:style-name="P41">28</text:p>
          </table:table-cell>
          <table:table-cell table:style-name="表格40.A2" office:value-type="string">
            <text:p text:style-name="P41">4</text:p>
          </table:table-cell>
          <table:table-cell table:style-name="表格40.A2" office:value-type="string">
            <text:p text:style-name="P41">16</text:p>
          </table:table-cell>
          <table:table-cell table:style-name="表格40.A2" office:value-type="string">
            <text:p text:style-name="P41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9"><text:span text:style-name="T15">▸ <text:s/></text:span><text:span text:style-name="T7">用 bit 切割理解 /26</text:span></text:p>
            <text:p text:style-name="P43">以 192.168.1.0/26 為例：</text:p>
            <text:p text:style-name="P11"><text:span text:style-name="T8">11000000 . 10101000 . 00000001 . 00</text:span><text:span text:style-name="T5">|000000</text:span></text:p>
            <text:p text:style-name="P42">└── 前 26 bit（固定＝網路）──┘ └ 後 6 bit（可變＝主機）┘</text:p>
            <text:p text:style-name="P42">→ 主機 bit 有 6 個 → 2⁶ = 64 個 IP。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34">名稱</text:p>
            </table:table-cell>
            <table:table-cell table:style-name="表格41.A1" office:value-type="string">
              <text:p text:style-name="P34">位置</text:p>
            </table:table-cell>
            <table:table-cell table:style-name="表格41.A1" office:value-type="string">
              <text:p text:style-name="P34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41">網路位址 Network Address</text:p>
          </table:table-cell>
          <table:table-cell table:style-name="表格41.A2" office:value-type="string">
            <text:p text:style-name="P41">第一個 IP（最小）</text:p>
          </table:table-cell>
          <table:table-cell table:style-name="表格41.A2" office:value-type="string">
            <text:p text:style-name="P41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41">廣播位址 Broadcast Address</text:p>
          </table:table-cell>
          <table:table-cell table:style-name="表格41.A3" office:value-type="string">
            <text:p text:style-name="P41">最後一個 IP（最大）</text:p>
          </table:table-cell>
          <table:table-cell table:style-name="表格41.A3" office:value-type="string">
            <text:p text:style-name="P41">送到此位址＝網路內所有設備都收到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58">可用主機數 ＝ IP 總數 − 2</text:p>
            <text:p text:style-name="P42">【/24 示範】192.168.1.0＝網路位址（不能用）… 192.168.1.255＝廣播位址（不能用）→ 共 256 個，可用 254 個。</text:p>
            <text:p text:style-name="P42">【/26 示範·最常考】192.168.1.0＝網路位址 … 192.168.1.63＝廣播位址 → 共 64 個（2⁶），可用 62 個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0"><text:span text:style-name="T19">唯一例外 /31（點對點，RFC 3021）：</text:span><text:span text:style-name="T11">只有 2 個 IP，兩個都可用作主機，沒有網路位址和廣播位址。考試若未特別提到，預設仍要 −2。</text:span></text:p>
          </table:table-cell>
          <table:covered-table-cell/>
          <table:covered-table-cell/>
        </table:table-row>
      </table:table>
      <text:h text:style-name="P15" text:outline-level="2">伍、VLSM（可變長度子網路遮罩）</text:h>
      <text:p text:style-name="P44">VLSM 的做法：依各部門「實際需求」分配剛剛好大小的子網路，不多給、不浪費。例如 A 部門 100 台、B 部門 50 台、C 部門 10 台，若全用 /24 會浪費大量 IP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9"><text:span text:style-name="T15">📋 <text:s/></text:span><text:span text:style-name="T17">VLSM 標準流程（三步驟）</text:span></text:p>
            <text:p text:style-name="P50">① 將需求由大到小排序</text:p>
            <text:p text:style-name="P11"><text:span text:style-name="T18">② 計算每個需求所需前綴：</text:span><text:span text:style-name="T11">需求 + 2 → 找最小 2ⁿ → 前綴 = 32 − n</text:span></text:p>
            <text:p text:style-name="P51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0"><text:span text:style-name="T19">為什麼要「由大到小」？　</text:span><text:span text:style-name="T11">因為「對齊（Alignment）」：子網路的起始位址必須是其大小的整數倍。大小 128 的子網只能從 0、128… 開始；大小 64 的只能從 0、64、128… 開始。</text:span></text:p>
            <text:p text:style-name="P11"><text:span text:style-name="T19">反面示範：</text:span><text:span text:style-name="T11">若先切小的 C（/28，0～15），再切大的 A（/25，128 個），最近可用對齊位址是 128 → 中間 16～127 共 112 個 IP 全浪費！正解：先切大的，大的天然對齊，小的再從後面切。</text:span></text:p>
          </table:table-cell>
        </table:table-row>
      </table:table>
      <text:h text:style-name="P3" text:outline-level="3"><text:span text:style-name="T16">▍</text:span><text:span text:style-name="T17"> 前綴計算公式詳解（以需要 100 台主機為例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3">① 加 2（預留網路 + 廣播）：100 + 2 = 102</text:p>
            <text:p text:style-name="P42">② 找「大於等於 102」的最小 2ⁿ：2⁶ = 64（太小）、2⁷ = 128（夠）→ n = 7</text:p>
            <text:p text:style-name="P42">③ 前綴 = 32 − n = 32 − 7 = 25 → 使用 /25（驗證：2⁷ = 128，可用 126 ≥ 100 ✔）</text:p>
            <text:p text:style-name="P25">公式一句話：需求 +2 → 找最小 2ⁿ → /(32−n)</text:p>
          </table:table-cell>
        </table:table-row>
      </table:table>
      <text:h text:style-name="P3" text:outline-level="3"><text:soft-page-break/><text:span text:style-name="T16">▍</text:span><text:span text:style-name="T17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37">部門</text:p>
            </table:table-cell>
            <table:table-cell table:style-name="表格44.A1" office:value-type="string">
              <text:p text:style-name="P37">需求</text:p>
            </table:table-cell>
            <table:table-cell table:style-name="表格44.A1" office:value-type="string">
              <text:p text:style-name="P37">+2</text:p>
            </table:table-cell>
            <table:table-cell table:style-name="表格44.A1" office:value-type="string">
              <text:p text:style-name="P37">2ⁿ</text:p>
            </table:table-cell>
            <table:table-cell table:style-name="表格44.A1" office:value-type="string">
              <text:p text:style-name="P37">前綴</text:p>
            </table:table-cell>
            <table:table-cell table:style-name="表格44.A1" office:value-type="string">
              <text:p text:style-name="P37">切割結果（範圍）</text:p>
            </table:table-cell>
            <table:table-cell table:style-name="表格44.A1" office:value-type="string">
              <text:p text:style-name="P37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⁷）</text:p>
          </table:table-cell>
          <table:table-cell table:style-name="表格44.A2" office:value-type="string">
            <text:p text:style-name="P46">/25</text:p>
          </table:table-cell>
          <table:table-cell table:style-name="表格44.A2" office:value-type="string">
            <text:p text:style-name="P46">192.168.1.0/25（0～127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⁶）</text:p>
          </table:table-cell>
          <table:table-cell table:style-name="表格44.A3" office:value-type="string">
            <text:p text:style-name="P46">/26</text:p>
          </table:table-cell>
          <table:table-cell table:style-name="表格44.A3" office:value-type="string">
            <text:p text:style-name="P46">192.168.1.128/26（128～191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⁴）</text:p>
          </table:table-cell>
          <table:table-cell table:style-name="表格44.A2" office:value-type="string">
            <text:p text:style-name="P46">/28</text:p>
          </table:table-cell>
          <table:table-cell table:style-name="表格44.A2" office:value-type="string">
            <text:p text:style-name="P46">192.168.1.192/28（192～207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20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"><text:span text:style-name="T15">💡 <text:s/></text:span><text:span text:style-name="T24">考試技巧</text:span></text:p>
            <text:p text:style-name="P43">快速判斷一個 IP 屬於哪個 /26 子網（每段 64 個，起點 0、64、128、192）：看最後一個 Octet 落在哪個區間 →</text:p>
            <text:p text:style-name="P42">0～63 → x.0/26　｜　64～127 → x.64/26　｜　128～191 → x.128/26　｜　192～255 → x.192/26</text:p>
          </table:table-cell>
        </table:table-row>
      </table:table>
      <text:h text:style-name="P15" text:outline-level="2">陸、CIDR（路由聚合 / 超網合併）</text:h>
      <text:p text:style-name="P44">CIDR 的合併功能是 VLSM 的「反向操作」：VLSM 把大網路切小；CIDR 合併把小網路合成一個大網路表示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"><text:span text:style-name="T15">🔑 <text:s/></text:span><text:span text:style-name="T17">合併三條件（缺一不可）</text:span></text:p>
            <text:p text:style-name="P10"><text:span text:style-name="T18">① 連續（Contiguous）：</text:span><text:span text:style-name="T11">IP 範圍必須緊鄰，中間不能有空缺。</text:span></text:p>
            <text:p text:style-name="P11"><text:span text:style-name="T18">② 數量是 2ⁿ：</text:span><text:span text:style-name="T11">2、4、8…。</text:span></text:p>
            <text:p text:style-name="P11"><text:span text:style-name="T18">③ 起始位址對齊：</text:span><text:span text:style-name="T11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9"><text:span text:style-name="T15">▸ <text:s/></text:span><text:span text:style-name="T7">合併範例與反例</text:span></text:p>
            <text:p text:style-name="P10"><text:span text:style-name="T12">範例：2 個 /25 → 1 個 /24　</text:span><text:span text:style-name="T11">192.168.1.0/25 ＋ 192.168.1.128/25 → ① 緊鄰✔ ② 2 個（2¹）✔ ③ 起點 .0，0÷256=0✔ → 合併為 192.168.1.0/24。</text:span></text:p>
            <text:p text:style-name="P11"><text:span text:style-name="T12">範例：4 個 /24 → 1 個 /22　</text:span><text:span text:style-name="T11">192.168.0/1/2/3.0/24 → 連續✔、4 個（2²）✔、對齊✔ → 合併為 192.168.0.0/22。</text:span></text:p>
            <text:p text:style-name="P11"><text:span text:style-name="T21">反例（無法合併）：</text:span><text:span text:style-name="T11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0"><text:span text:style-name="T25">合併後前綴公式：</text:span><text:span text:style-name="T11">合併 2ⁿ 個子網 → 前綴減 n（每合併一倍，/ 的數字減 1）。</text:span></text:p>
            <text:p text:style-name="P42">2 個 /26 → /25；4 個 /26 → /24；2 個 /24 → /23。</text:p>
          </table:table-cell>
        </table:table-row>
      </table:table>
      <text:h text:style-name="P15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34">概念</text:p>
            </table:table-cell>
            <table:table-cell table:style-name="表格47.A1" office:value-type="string">
              <text:p text:style-name="P34">關鍵字</text:p>
            </table:table-cell>
            <table:table-cell table:style-name="表格47.A1" office:value-type="string">
              <text:p text:style-name="P34">核心規則</text:p>
            </table:table-cell>
            <table:table-cell table:style-name="表格47.A1" office:value-type="string">
              <text:p text:style-name="P34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41">IP 分類</text:p>
          </table:table-cell>
          <table:table-cell table:style-name="表格47.A2" office:value-type="string">
            <text:p text:style-name="P41">A/B/C 類</text:p>
          </table:table-cell>
          <table:table-cell table:style-name="表格47.A2" office:value-type="string">
            <text:p text:style-name="P41">看第一組數字判斷類別</text:p>
          </table:table-cell>
          <table:table-cell table:style-name="表格47.A2" office:value-type="string">
            <text:p text:style-name="P41">土地大小分類</text:p>
          </table:table-cell>
        </table:table-row>
        <table:table-row table:style-name="表格47.1">
          <table:table-cell table:style-name="表格47.A3" office:value-type="string">
            <text:p text:style-name="P41">VLSM</text:p>
          </table:table-cell>
          <table:table-cell table:style-name="表格47.A3" office:value-type="string">
            <text:p text:style-name="P41">切子網路</text:p>
          </table:table-cell>
          <table:table-cell table:style-name="表格47.A3" office:value-type="string">
            <text:p text:style-name="P41">由大到小；需求+2→2ⁿ→/(32−n)</text:p>
          </table:table-cell>
          <table:table-cell table:style-name="表格47.A3" office:value-type="string">
            <text:p text:style-name="P41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41">CIDR 合併</text:p>
          </table:table-cell>
          <table:table-cell table:style-name="表格47.A2" office:value-type="string">
            <text:p text:style-name="P41">聚合路由</text:p>
          </table:table-cell>
          <table:table-cell table:style-name="表格47.A2" office:value-type="string">
            <text:p text:style-name="P41">連續 + 數量 2ⁿ + 對齊；前綴減 n</text:p>
          </table:table-cell>
          <table:table-cell table:style-name="表格47.A2" office:value-type="string">
            <text:p text:style-name="P41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9"><text:span text:style-name="T15">🎯 <text:s/></text:span><text:span text:style-name="T22">考試標準解題流程</text:span></text:p>
            <text:p text:style-name="P10"><text:span text:style-name="T23">遇到 VLSM 題：</text:span><text:span text:style-name="T11">確認起始網路 → 需求由大到小 → 各需求 +2 找 2ⁿ 算前綴 → 大的先切依序往後 → 驗證網路位址/廣播位址/可用範圍。</text:span></text:p>
            <text:p text:style-name="P11"><text:span text:style-name="T23">遇到 CIDR 合併題：</text:span><text:span text:style-name="T11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捌、MTU（最大傳輸單位）</text:span></text:h>
      <text:p text:style-name="P44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34">網路類型</text:p>
            </table:table-cell>
            <table:table-cell table:style-name="表格48.A1" office:value-type="string">
              <text:p text:style-name="P34">MTU 值</text:p>
            </table:table-cell>
            <table:table-cell table:style-name="表格48.A1" office:value-type="string">
              <text:p text:style-name="P34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41">Ethernet（乙太網）</text:p>
          </table:table-cell>
          <table:table-cell table:style-name="表格48.A2" office:value-type="string">
            <text:p text:style-name="P41">1500 bytes</text:p>
          </table:table-cell>
          <table:table-cell table:style-name="表格48.A2" office:value-type="string">
            <text:p text:style-name="P41">最常見，99% 環境</text:p>
          </table:table-cell>
        </table:table-row>
        <table:table-row table:style-name="表格48.1">
          <table:table-cell table:style-name="表格48.A3" office:value-type="string">
            <text:p text:style-name="P41">Wi-Fi (802.11)</text:p>
          </table:table-cell>
          <table:table-cell table:style-name="表格48.A3" office:value-type="string">
            <text:p text:style-name="P41">2304 bytes</text:p>
          </table:table-cell>
          <table:table-cell table:style-name="表格48.A3" office:value-type="string">
            <text:p text:style-name="P41">無線區域網路</text:p>
          </table:table-cell>
        </table:table-row>
        <table:table-row table:style-name="表格48.1">
          <table:table-cell table:style-name="表格48.A2" office:value-type="string">
            <text:p text:style-name="P41">PPPoE（ADSL）</text:p>
          </table:table-cell>
          <table:table-cell table:style-name="表格48.A2" office:value-type="string">
            <text:p text:style-name="P41">1492 bytes</text:p>
          </table:table-cell>
          <table:table-cell table:style-name="表格48.A2" office:value-type="string">
            <text:p text:style-name="P41">需扣掉 PPPoE header</text:p>
          </table:table-cell>
        </table:table-row>
        <table:table-row table:style-name="表格48.1">
          <table:table-cell table:style-name="表格48.A3" office:value-type="string">
            <text:p text:style-name="P41">Loopback（本機）</text:p>
          </table:table-cell>
          <table:table-cell table:style-name="表格48.A3" office:value-type="string">
            <text:p text:style-name="P41">65536 bytes</text:p>
          </table:table-cell>
          <table:table-cell table:style-name="表格48.A3" office:value-type="string">
            <text:p text:style-name="P41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9"><text:span text:style-name="T15">❗ <text:s/></text:span><text:span text:style-name="T20">重點</text:span></text:p>
            <text:p text:style-name="P43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5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9"><text:span text:style-name="T15">📦 <text:s/></text:span><text:span text:style-name="T7">怎麼切？</text:span></text:p>
            <text:p text:style-name="P43">範例：送出 4000 bytes、MTU = 1500（每段扣掉 20 bytes IP Header，剩 1480 可放資料）</text:p>
            <text:p text:style-name="P4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34">版本</text:p>
          </table:table-cell>
          <table:table-cell table:style-name="表格49.A2" office:value-type="string">
            <text:p text:style-name="P34">誰負責分段</text:p>
          </table:table-cell>
          <table:table-cell table:style-name="表格49.A2" office:value-type="string">
            <text:p text:style-name="P34">Router 可切？</text:p>
          </table:table-cell>
          <table:table-cell table:style-name="表格49.A2" office:value-type="string">
            <text:p text:style-name="P34">說明</text:p>
          </table:table-cell>
        </table:table-row>
        <table:table-row table:style-name="表格49.1">
          <table:table-cell table:style-name="表格49.A3" office:value-type="string">
            <text:p text:style-name="P41">IPv4</text:p>
          </table:table-cell>
          <table:table-cell table:style-name="表格49.A3" office:value-type="string">
            <text:p text:style-name="P41">Router 或 Source</text:p>
          </table:table-cell>
          <table:table-cell table:style-name="表格49.A3" office:value-type="string">
            <text:p text:style-name="P56">✅ 可以</text:p>
          </table:table-cell>
          <table:table-cell table:style-name="表格49.A3" office:value-type="string">
            <text:p text:style-name="P41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41">IPv6</text:p>
          </table:table-cell>
          <table:table-cell table:style-name="表格49.A4" office:value-type="string">
            <text:p text:style-name="P41">僅 Source（送端）</text:p>
          </table:table-cell>
          <table:table-cell table:style-name="表格49.A4" office:value-type="string">
            <text:p text:style-name="P53">❌ 不行</text:p>
          </table:table-cell>
          <table:table-cell table:style-name="表格49.A4" office:value-type="string">
            <text:p text:style-name="P41">Router 不分段，由送端自行處理，搭配 PMTUD</text:p>
          </table:table-cell>
        </table:table-row>
      </table:table>
      <text:h text:style-name="P15" text:outline-level="2">拾、IP Header 關鍵欄位</text:h>
      <text:p text:style-name="P44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0"><text:span text:style-name="T8">(1) Total Length：</text:span><text:span text:style-name="T11">封包總大小（Header + Data），最大 65535 bytes（16 bits）。</text:span></text:p>
            <text:p text:style-name="P11"><text:span text:style-name="T8">(2) Identification：</text:span><text:span text:style-name="T11">同一原始封包的所有分段共用同一 ID；接收端靠此 ID 判斷哪些 fragment 要拼在一起。</text:span></text:p>
            <text:p text:style-name="P11"><text:span text:style-name="T8">(3) Fragment Offset：</text:span><text:span text:style-name="T11">這段資料在原始封包中的「起始位置」。⚠️ 單位是 8 bytes（欄位僅 13 bits）→ Offset = 起始位置 ÷ 8。</text:span></text:p>
            <text:p text:style-name="P11"><text:span text:style-name="T8">(4) TTL：</text:span><text:span text:style-name="T11">最多可經過幾個 Router；每經過一個 −1，歸零時 Router 丟棄並回 ICMP「Time Exceeded」。常見初始值 Linux=64、Windows=128。traceroute 即利用 TTL。</text:span></text:p>
            <text:p text:style-name="P11"><text:span text:style-name="T8">(5) Protocol：</text:span><text:span text:style-name="T11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34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34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1">第 1 段：資料 1480 bytes</text:p>
          </table:table-cell>
          <table:covered-table-cell/>
          <table:covered-table-cell/>
          <table:table-cell table:style-name="表格50.A3" office:value-type="string">
            <text:p text:style-name="P41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41">第 2 段：資料 1480 bytes</text:p>
          </table:table-cell>
          <table:covered-table-cell/>
          <table:covered-table-cell/>
          <table:table-cell table:style-name="表格50.A4" office:value-type="string">
            <text:p text:style-name="P41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1">第 3 段：資料 1040 bytes</text:p>
          </table:table-cell>
          <table:covered-table-cell/>
          <table:covered-table-cell/>
          <table:table-cell table:style-name="表格50.A3" office:value-type="string">
            <text:p text:style-name="P41">2960 ÷ 8 = 370</text:p>
          </table:table-cell>
        </table:table-row>
        <table:table-row table:style-name="表格50.1">
          <table:table-cell table:style-name="表格50.A2" office:value-type="string">
            <text:p text:style-name="P33">Protocol 值</text:p>
          </table:table-cell>
          <table:table-cell table:style-name="表格50.A2" office:value-type="string">
            <text:p text:style-name="P33">對應協定</text:p>
          </table:table-cell>
          <table:table-cell table:style-name="表格50.A2" table:number-columns-spanned="2" office:value-type="string">
            <text:p text:style-name="P33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1">1</text:p>
          </table:table-cell>
          <table:table-cell table:style-name="表格50.A3" office:value-type="string">
            <text:p text:style-name="P41">ICMP</text:p>
          </table:table-cell>
          <table:table-cell table:style-name="表格50.A3" table:number-columns-spanned="2" office:value-type="string">
            <text:p text:style-name="P41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41">6</text:p>
          </table:table-cell>
          <table:table-cell table:style-name="表格50.A4" office:value-type="string">
            <text:p text:style-name="P41">TCP</text:p>
          </table:table-cell>
          <table:table-cell table:style-name="表格50.A4" table:number-columns-spanned="2" office:value-type="string">
            <text:p text:style-name="P41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1">17</text:p>
          </table:table-cell>
          <table:table-cell table:style-name="表格50.A3" office:value-type="string">
            <text:p text:style-name="P41">UDP</text:p>
          </table:table-cell>
          <table:table-cell table:style-name="表格50.A3" table:number-columns-spanned="2" office:value-type="string">
            <text:p text:style-name="P41">DNS、DHCP、影音串流等速度優先</text:p>
          </table:table-cell>
          <table:covered-table-cell/>
        </table:table-row>
      </table:table>
      <text:h text:style-name="P2" text:outline-level="2"><text:soft-page-break/><text:span text:style-name="T6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34">Flag</text:p>
            </table:table-cell>
            <table:table-cell table:style-name="表格51.A1" office:value-type="string">
              <text:p text:style-name="P34">全名</text:p>
            </table:table-cell>
            <table:table-cell table:style-name="表格51.A1" office:value-type="string">
              <text:p text:style-name="P34">值 = 1 代表</text:p>
            </table:table-cell>
            <table:table-cell table:style-name="表格51.A1" office:value-type="string">
              <text:p text:style-name="P34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41">DF</text:p>
          </table:table-cell>
          <table:table-cell table:style-name="表格51.A2" office:value-type="string">
            <text:p text:style-name="P41">Don't Fragment</text:p>
          </table:table-cell>
          <table:table-cell table:style-name="表格51.A2" office:value-type="string">
            <text:p text:style-name="P41">❌ 不准切！超大就丟並回 ICMP</text:p>
          </table:table-cell>
          <table:table-cell table:style-name="表格51.A2" office:value-type="string">
            <text:p text:style-name="P41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41">MF</text:p>
          </table:table-cell>
          <table:table-cell table:style-name="表格51.A3" office:value-type="string">
            <text:p text:style-name="P41">More Fragments</text:p>
          </table:table-cell>
          <table:table-cell table:style-name="表格51.A3" office:value-type="string">
            <text:p text:style-name="P41">後面還有更多分段</text:p>
          </table:table-cell>
          <table:table-cell table:style-name="表格51.A3" office:value-type="string">
            <text:p text:style-name="P41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9"><text:span text:style-name="T15">▸ <text:s/></text:span><text:span text:style-name="T7">DF = 1 的完整流程</text:span></text:p>
            <text:p text:style-name="P43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5" text:outline-level="2">拾貳、PMTUD（路徑 MTU 探測）</text:h>
      <text:p text:style-name="P44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34">版本</text:p>
            </table:table-cell>
            <table:table-cell table:style-name="表格52.A1" office:value-type="string">
              <text:p text:style-name="P34">Router 可分段？</text:p>
            </table:table-cell>
            <table:table-cell table:style-name="表格52.A1" office:value-type="string">
              <text:p text:style-name="P34">PMTUD 必要性</text:p>
            </table:table-cell>
            <table:table-cell table:style-name="表格52.A1" office:value-type="string">
              <text:p text:style-name="P34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41">IPv4</text:p>
          </table:table-cell>
          <table:table-cell table:style-name="表格52.A2" office:value-type="string">
            <text:p text:style-name="P41">✅ 可以（但不推薦）</text:p>
          </table:table-cell>
          <table:table-cell table:style-name="表格52.A2" office:value-type="string">
            <text:p text:style-name="P41">可選，但建議使用</text:p>
          </table:table-cell>
          <table:table-cell table:style-name="表格52.A2" office:value-type="string">
            <text:p text:style-name="P41">ICMP Fragmentation Needed</text:p>
          </table:table-cell>
        </table:table-row>
        <table:table-row table:style-name="表格52.1">
          <table:table-cell table:style-name="表格52.A3" office:value-type="string">
            <text:p text:style-name="P41">IPv6</text:p>
          </table:table-cell>
          <table:table-cell table:style-name="表格52.A3" office:value-type="string">
            <text:p text:style-name="P41">❌ 不行</text:p>
          </table:table-cell>
          <table:table-cell table:style-name="表格52.A3" office:value-type="string">
            <text:p text:style-name="P41">⚠️ 必須使用</text:p>
          </table:table-cell>
          <table:table-cell table:style-name="表格52.A3" office:value-type="string">
            <text:p text:style-name="P41">ICMPv6 Packet Too Big</text:p>
          </table:table-cell>
        </table:table-row>
      </table:table>
      <text:h text:style-name="P15" text:outline-level="2">拾參、TCP 如何避免 Fragmentation？</text:h>
      <text:p text:style-name="P44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0"><text:span text:style-name="T8">MSS（Maximum Segment Size）：</text:span><text:span text:style-name="T11">MSS = MTU − IP Header − TCP Header = 1500 − 20 − 20 = 1460 bytes。三向交握時雙方各自宣告 MSS，之後每段 ≤ MSS，讓 IP 層不需分段。</text:span></text:p>
            <text:p text:style-name="P11"><text:span text:style-name="T8">搭配 DF=1 + PMTUD：</text:span><text:span text:style-name="T11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9"><text:span text:style-name="T15">✅ <text:s/></text:span><text:span text:style-name="T22">結論</text:span></text:p>
            <text:p text:style-name="P43">TCP = 主動控制大小（MSS）＋ DF=1 ＋ PMTUD，從源頭就避免 Fragmentation 發生。</text:p>
          </table:table-cell>
        </table:table-row>
      </table:table>
      <text:h text:style-name="P15" text:outline-level="2">拾肆、Fragmentation DoS 攻擊</text:h>
      <text:p text:style-name="P44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7">攻擊手法</text:p>
            </table:table-cell>
            <table:table-cell table:style-name="表格54.A1" office:value-type="string">
              <text:p text:style-name="P37">做法</text:p>
            </table:table-cell>
            <table:table-cell table:style-name="表格54.A1" office:value-type="string">
              <text:p text:style-name="P37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6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6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6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9"><text:span text:style-name="T15">🛡️ <text:s/></text:span><text:span text:style-name="T22">防禦方式</text:span></text:p>
            <text:p text:style-name="P43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34">技術概念</text:p>
            </table:table-cell>
            <table:table-cell table:style-name="表格55.A1" office:value-type="string">
              <text:p text:style-name="P34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41">MTU</text:p>
          </table:table-cell>
          <table:table-cell table:style-name="表格55.A2" office:value-type="string">
            <text:p text:style-name="P41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41">Fragmentation</text:p>
          </table:table-cell>
          <table:table-cell table:style-name="表格55.A3" office:value-type="string">
            <text:p text:style-name="P41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41">Identification</text:p>
          </table:table-cell>
          <table:table-cell table:style-name="表格55.A2" office:value-type="string">
            <text:p text:style-name="P41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41">Fragment Offset</text:p>
          </table:table-cell>
          <table:table-cell table:style-name="表格55.A3" office:value-type="string">
            <text:p text:style-name="P41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41">IPv4 / IPv6</text:p>
          </table:table-cell>
          <table:table-cell table:style-name="表格55.A2" office:value-type="string">
            <text:p text:style-name="P41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41">DF = 1</text:p>
          </table:table-cell>
          <table:table-cell table:style-name="表格55.A3" office:value-type="string">
            <text:p text:style-name="P41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41">PMTUD</text:p>
          </table:table-cell>
          <table:table-cell table:style-name="表格55.A2" office:value-type="string">
            <text:p text:style-name="P41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41">TTL</text:p>
          </table:table-cell>
          <table:table-cell table:style-name="表格55.A3" office:value-type="string">
            <text:p text:style-name="P41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41">MSS</text:p>
          </table:table-cell>
          <table:table-cell table:style-name="表格55.A2" office:value-type="string">
            <text:p text:style-name="P41">你自己量好每箱重量，確保不超重</text:p>
          </table:table-cell>
        </table:table-row>
      </table:table>
      <text:h text:style-name="P14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><text:span text:style-name="T15">💡 <text:s/></text:span><text:span text:style-name="T7">為什麼要從 IPv4 換到 IPv6？</text:span></text:p>
            <text:p text:style-name="P43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5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34">比較項目</text:p>
            </table:table-cell>
            <table:table-cell table:style-name="表格57.A1" office:value-type="string">
              <text:p text:style-name="P34">✗ IPv4 問題</text:p>
            </table:table-cell>
            <table:table-cell table:style-name="表格57.A1" office:value-type="string">
              <text:p text:style-name="P34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41">位址長度</text:p>
          </table:table-cell>
          <table:table-cell table:style-name="表格57.A2" office:value-type="string">
            <text:p text:style-name="P41">32 bit，約 43 億個 IP，已嚴重不足</text:p>
          </table:table-cell>
          <table:table-cell table:style-name="表格57.A2" office:value-type="string">
            <text:p text:style-name="P41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41">NAT 位址轉換</text:p>
          </table:table-cell>
          <table:table-cell table:style-name="表格57.A3" office:value-type="string">
            <text:p text:style-name="P41">需 NAT 共用 IP，破壞 End-to-End</text:p>
          </table:table-cell>
          <table:table-cell table:style-name="表格57.A3" office:value-type="string">
            <text:p text:style-name="P41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41">安全性</text:p>
          </table:table-cell>
          <table:table-cell table:style-name="表格57.A2" office:value-type="string">
            <text:p text:style-name="P41">無內建加密／驗證，須另裝 VPN</text:p>
          </table:table-cell>
          <table:table-cell table:style-name="表格57.A2" office:value-type="string">
            <text:p text:style-name="P41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41">Header 結構</text:p>
          </table:table-cell>
          <table:table-cell table:style-name="表格57.A3" office:value-type="string">
            <text:p text:style-name="P41">可變長度含 Options，Router 效率低</text:p>
          </table:table-cell>
          <table:table-cell table:style-name="表格57.A3" office:value-type="string">
            <text:p text:style-name="P41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41">服務品質 QoS</text:p>
          </table:table-cell>
          <table:table-cell table:style-name="表格57.A2" office:value-type="string">
            <text:p text:style-name="P41">無法有效標記流量優先權</text:p>
          </table:table-cell>
          <table:table-cell table:style-name="表格57.A2" office:value-type="string">
            <text:p text:style-name="P41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41">廣播方式</text:p>
          </table:table-cell>
          <table:table-cell table:style-name="表格57.A3" office:value-type="string">
            <text:p text:style-name="P41">Broadcast：一次發給所有人，浪費頻寬</text:p>
          </table:table-cell>
          <table:table-cell table:style-name="表格57.A3" office:value-type="string">
            <text:p text:style-name="P41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41">IP 配置方式</text:p>
          </table:table-cell>
          <table:table-cell table:style-name="表格57.A2" office:value-type="string">
            <text:p text:style-name="P41">需手動設定或 DHCP，管理繁瑣</text:p>
          </table:table-cell>
          <table:table-cell table:style-name="表格57.A2" office:value-type="string">
            <text:p text:style-name="P41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9"><text:span text:style-name="T15">📌 <text:s/></text:span><text:span text:style-name="T20">補充：IPsec 強制 vs 建議</text:span></text:p>
            <text:p text:style-name="P43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5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0">① Dual Stack（雙協定堆疊）— 最常用、最推薦</text:p>
            <text:p text:style-name="P42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4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59">② Tunneling（隧道技術）— 過渡期橋接方案</text:p>
            <text:p text:style-name="P42">中間網路只支援 IPv4，無法直接傳送 IPv6 封包。解法：將 IPv6 封包完整封裝進 IPv4 外殼，抵達目的地後拆除外層 IPv4、還原 IPv6 封包。常見技術：6in4、6to4、Teredo、ISATAP。</text:p>
            <text:p text:style-name="P4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58">③ Translation（NAT64）— 協定轉換、互通最後手段</text:p>
            <text:p text:style-name="P42">適用場景：IPv6-only 裝置需與 IPv4-only 裝置直接通訊。透過轉換閘道器即時將封包表頭轉換為對方格式。代表技術：NAT64 + DNS64。複雜度最高，有額外效能損耗。</text:p>
            <text:p text:style-name="P42">示意：IPv6 裝置 → [ NAT64 轉換閘道 ] → IPv4 裝置（雙向互轉）。</text:p>
          </table:table-cell>
        </table:table-row>
      </table:table>
      <text:h text:style-name="P2" text:outline-level="2"><text:soft-page-break/><text:span text:style-name="T6">三、生活比喻（一次記住）</text:span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35">技術</text:p>
            </table:table-cell>
            <table:table-cell table:style-name="表格59.A1" office:value-type="string">
              <text:p text:style-name="P3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5">Dual Stack</text:p>
          </table:table-cell>
          <table:table-cell table:style-name="表格59.A2" office:value-type="string">
            <text:p text:style-name="P45">你同時會中文 + 英文，遇到誰說哪個</text:p>
          </table:table-cell>
        </table:table-row>
        <table:table-row table:style-name="表格59.1">
          <table:table-cell table:style-name="表格59.A3" office:value-type="string">
            <text:p text:style-name="P45">Tunneling</text:p>
          </table:table-cell>
          <table:table-cell table:style-name="表格59.A3" office:value-type="string">
            <text:p text:style-name="P45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45">Translation</text:p>
          </table:table-cell>
          <table:table-cell table:style-name="表格59.A2" office:value-type="string">
            <text:p text:style-name="P45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9"><text:span text:style-name="T15">🏠 <text:s/></text:span><text:span text:style-name="T7">用「寄信/門牌」理解</text:span></text:p>
            <text:p text:style-name="P10"><text:span text:style-name="T8">IPv4 的困境：</text:span><text:span text:style-name="T11">整棟公寓共用一個門牌（NAT），郵差只送到大門，裡面誰是誰要另外猜；地址快用光還在借號碼。</text:span></text:p>
            <text:p text:style-name="P11"><text:span text:style-name="T8">IPv6 的世界：</text:span><text:span text:style-name="T11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5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9"><text:span text:style-name="T15">🧠 <text:s/></text:span><text:span text:style-name="T24">一句話記憶法</text:span></text:p>
            <text:p text:style-name="P10"><text:span text:style-name="T25">IPv6 特點：</text:span><text:span text:style-name="T11">大（128 bit）＋ 安全（IPsec）＋ 快（固定 Header）＋ 自動（SLAAC）＋ 乾淨（無 Broadcast）。</text:span></text:p>
            <text:p text:style-name="P11"><text:span text:style-name="T25">過渡技術：</text:span><text:span text:style-name="T11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33">IPv4 七大問題</text:p>
          </table:table-cell>
          <table:table-cell table:style-name="表格60.A2" office:value-type="string">
            <text:p text:style-name="P33">IPv6 七大改進</text:p>
          </table:table-cell>
        </table:table-row>
        <table:table-row table:style-name="表格60.1">
          <table:table-cell table:style-name="表格60.A3" office:value-type="string">
            <text:p text:style-name="P41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41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4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9"><text:span text:style-name="T15">🔑 <text:s/></text:span><text:span text:style-name="T7">最基礎的比喻，先懂這個</text:span></text:p>
            <text:p text:style-name="P10"><text:span text:style-name="T12">IP 位址＝家庭住址</text:span><text:span text:style-name="T11">（192.168.1.5），找最終目的地；</text:span><text:span text:style-name="T12">MAC 位址＝身分證號碼</text:span><text:span text:style-name="T11">（AA:BB:CC:DD:EE），決定下一站交給哪台機器。</text:span></text:p>
            <text:p text:style-name="P42">資料在網路中「實際傳送」靠 MAC，但我們只知道對方的 IP——所以需要一個轉換機制，這就是 ARP 的工作。</text:p>
          </table:table-cell>
        </table:table-row>
      </table:table>
      <text:h text:style-name="P15" text:outline-level="2">一、ARP（Address Resolution Protocol）：IP → MAC</text:h>
      <text:p text:style-name="P44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9"><text:span text:style-name="T15">📋 <text:s/></text:span><text:span text:style-name="T7">ARP 運作流程（考試必考）</text:span></text:p>
            <text:p text:style-name="P10"><text:span text:style-name="T8">① 查 ARP Cache（筆記本）：</text:span><text:span text:style-name="T11">先查自己的記錄「我之前有沒有問過這個 IP？」有 → 直接用。</text:span></text:p>
            <text:p text:style-name="P11"><text:span text:style-name="T8">② 發出 ARP Request（廣播）：</text:span><text:span text:style-name="T11">沒記錄 → 對整個區網廣播「誰是 192.168.1.5？請告訴我你的 MAC！」所有機器都收到。</text:span></text:p>
            <text:p text:style-name="P11"><text:span text:style-name="T8">③ 收到 ARP Reply（單播回應）：</text:span><text:span text:style-name="T11">IP 是 192.168.1.5 的機器回應「我是！MAC 是 AA:BB:CC」，其餘機器靜默忽略。</text:span></text:p>
            <text:p text:style-name="P11"><text:span text:style-name="T8">④ 存進 ARP Cache：</text:span><text:span text:style-name="T11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34">項目</text:p>
          </table:table-cell>
          <table:table-cell table:style-name="表格62.A2" office:value-type="string">
            <text:p text:style-name="P34">內容</text:p>
          </table:table-cell>
        </table:table-row>
        <table:table-row table:style-name="表格62.1">
          <table:table-cell table:style-name="表格62.A3" office:value-type="string">
            <text:p text:style-name="P41">ARP Spoofing（ARP 欺騙）</text:p>
          </table:table-cell>
          <table:table-cell table:style-name="表格62.A3" office:value-type="string">
            <text:p text:style-name="P41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41">arp -a</text:p>
          </table:table-cell>
          <table:table-cell table:style-name="表格62.A4" office:value-type="string">
            <text:p text:style-name="P41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41">ping [IP]</text:p>
          </table:table-cell>
          <table:table-cell table:style-name="表格62.A3" office:value-type="string">
            <text:p text:style-name="P41">觸發 ARP 運作，讓電腦主動查詢對應 MAC</text:p>
          </table:table-cell>
        </table:table-row>
      </table:table>
      <text:h text:style-name="P15" text:outline-level="2">二、NAT（Network Address Translation）：私網 → 公網</text:h>
      <text:p text:style-name="P44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9"><text:span text:style-name="T15">▸ <text:s/></text:span><text:span text:style-name="T7">NAT 運作流程</text:span></text:p>
            <text:p text:style-name="P43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34">類型</text:p>
          </table:table-cell>
          <table:table-cell table:style-name="表格63.A2" office:value-type="string">
            <text:p text:style-name="P34">中文</text:p>
          </table:table-cell>
          <table:table-cell table:style-name="表格63.A2" office:value-type="string">
            <text:p text:style-name="P34">說明</text:p>
          </table:table-cell>
          <table:table-cell table:style-name="表格63.A2" office:value-type="string">
            <text:p text:style-name="P34">特點</text:p>
          </table:table-cell>
        </table:table-row>
        <table:table-row table:style-name="表格63.1">
          <table:table-cell table:style-name="表格63.A3" office:value-type="string">
            <text:p text:style-name="P41">Static NAT</text:p>
          </table:table-cell>
          <table:table-cell table:style-name="表格63.A3" office:value-type="string">
            <text:p text:style-name="P41">靜態 NAT</text:p>
          </table:table-cell>
          <table:table-cell table:style-name="表格63.A3" office:value-type="string">
            <text:p text:style-name="P41">一個私有 IP ↔ 一個公網 IP</text:p>
          </table:table-cell>
          <table:table-cell table:style-name="表格63.A3" office:value-type="string">
            <text:p text:style-name="P41">固定對應</text:p>
          </table:table-cell>
        </table:table-row>
        <table:table-row table:style-name="表格63.1">
          <table:table-cell table:style-name="表格63.A4" office:value-type="string">
            <text:p text:style-name="P41">Dynamic NAT</text:p>
          </table:table-cell>
          <table:table-cell table:style-name="表格63.A4" office:value-type="string">
            <text:p text:style-name="P41">動態 NAT</text:p>
          </table:table-cell>
          <table:table-cell table:style-name="表格63.A4" office:value-type="string">
            <text:p text:style-name="P41">多個私有 IP 對應 IP 池（pool）</text:p>
          </table:table-cell>
          <table:table-cell table:style-name="表格63.A4" office:value-type="string">
            <text:p text:style-name="P41">動態分配</text:p>
          </table:table-cell>
        </table:table-row>
        <table:table-row table:style-name="表格63.1">
          <table:table-cell table:style-name="表格63.A3" office:value-type="string">
            <text:p text:style-name="P41">PAT</text:p>
          </table:table-cell>
          <table:table-cell table:style-name="表格63.A3" office:value-type="string">
            <text:p text:style-name="P41">連接埠位址轉換</text:p>
          </table:table-cell>
          <table:table-cell table:style-name="表格63.A3" office:value-type="string">
            <text:p text:style-name="P41">多台共用一個公網 IP</text:p>
          </table:table-cell>
          <table:table-cell table:style-name="表格63.A3" office:value-type="string">
            <text:p text:style-name="P41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9"><text:span text:style-name="T15">⚠️ <text:s/></text:span><text:span text:style-name="T20">NAT 的缺點（考試超愛）</text:span></text:p>
            <text:p text:style-name="P10"><text:span text:style-name="T19">破壞 End-to-End 連線（最重要）：</text:span><text:span text:style-name="T11">原本你↔對方是真正點對點；有 NAT 後變成你→NAT→對方，多一層轉換，不再是端對端。</text:span></text:p>
            <text:p text:style-name="P11"><text:span text:style-name="T19">P2P / VoIP 難以運作：</text:span><text:span text:style-name="T11">外部機器找不到你（被藏在 NAT 後），P2P 下載、VoIP 通話等直連功能受限。</text:span></text:p>
            <text:p text:style-name="P11"><text:soft-page-break/><text:span text:style-name="T19">增加延遲：</text:span><text:span text:style-name="T11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5" text:outline-level="2">三、解決 NAT 限制的三種方法</text:h>
      <text:p text:style-name="P44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30">方法一：Port Forwarding（手動指定轉發）</text:p>
            <text:p text:style-name="P4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11"><text:span text:style-name="T12">優點：</text:span><text:span text:style-name="T11">設定直接、穩定，可精確控制。</text:span><text:span text:style-name="T12">缺點：</text:span><text:span text:style-name="T11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50">方法二：UPnP（自動版 Port Forwarding）</text:p>
            <text:p text:style-name="P42">讓裝置自動跟路由器要求「幫我開一個 Port」，不需人工設定。① 應用程式發 UPnP 請求 → ② 路由器自動新增 Port Forwarding 規則 → ③ 服務結束後自動清除（理想情況）。</text:p>
            <text:p text:style-name="P11"><text:span text:style-name="T12">優點：</text:span><text:span text:style-name="T11">全自動、對一般用戶友善。</text:span><text:span text:style-name="T21">安全風險（重要）：</text:span><text:span text:style-name="T11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58">方法三：STUN（打洞技術）</text:p>
            <text:p text:style-name="P42">使用情境：兩端都在各自 NAT 後面，彼此都是私有 IP、互相找不到。STUN 先幫每端「查清楚自己對外的公網 IP + Port」，再交換資訊嘗試直接打通。</text:p>
            <text:p text:style-name="P4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11"><text:span text:style-name="T21">重要限制：</text:span><text:span text:style-name="T11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34">方法</text:p>
          </table:table-cell>
          <table:table-cell table:style-name="表格64.A4" office:value-type="string">
            <text:p text:style-name="P34">設定方式</text:p>
          </table:table-cell>
          <table:table-cell table:style-name="表格64.A4" office:value-type="string">
            <text:p text:style-name="P34">典型場景</text:p>
          </table:table-cell>
          <table:table-cell table:style-name="表格64.A4" office:value-type="string">
            <text:p text:style-name="P34">主要限制</text:p>
          </table:table-cell>
        </table:table-row>
        <table:table-row table:style-name="表格64.1">
          <table:table-cell table:style-name="表格64.A5" office:value-type="string">
            <text:p text:style-name="P41">Port Forwarding</text:p>
          </table:table-cell>
          <table:table-cell table:style-name="表格64.A5" office:value-type="string">
            <text:p text:style-name="P41">手動設定路由器</text:p>
          </table:table-cell>
          <table:table-cell table:style-name="表格64.A5" office:value-type="string">
            <text:p text:style-name="P41">架設網頁／遊戲伺服器</text:p>
          </table:table-cell>
          <table:table-cell table:style-name="表格64.A5" office:value-type="string">
            <text:p text:style-name="P41">需要手動維護</text:p>
          </table:table-cell>
        </table:table-row>
        <table:table-row table:style-name="表格64.1">
          <table:table-cell table:style-name="表格64.A6" office:value-type="string">
            <text:p text:style-name="P41">UPnP</text:p>
          </table:table-cell>
          <table:table-cell table:style-name="表格64.A6" office:value-type="string">
            <text:p text:style-name="P41">應用程式自動設定</text:p>
          </table:table-cell>
          <table:table-cell table:style-name="表格64.A6" office:value-type="string">
            <text:p text:style-name="P41">一般遊戲、視訊軟體</text:p>
          </table:table-cell>
          <table:table-cell table:style-name="表格64.A6" office:value-type="string">
            <text:p text:style-name="P41">惡意程式可濫用</text:p>
          </table:table-cell>
        </table:table-row>
        <table:table-row table:style-name="表格64.1">
          <table:table-cell table:style-name="表格64.A5" office:value-type="string">
            <text:p text:style-name="P41">STUN</text:p>
          </table:table-cell>
          <table:table-cell table:style-name="表格64.A5" office:value-type="string">
            <text:p text:style-name="P41">無需路由器設定</text:p>
          </table:table-cell>
          <table:table-cell table:style-name="表格64.A5" office:value-type="string">
            <text:p text:style-name="P41">WebRTC、P2P 通話</text:p>
          </table:table-cell>
          <table:table-cell table:style-name="表格64.A5" office:value-type="string">
            <text:p text:style-name="P41">Symmetric NAT 會失敗</text:p>
          </table:table-cell>
        </table:table-row>
      </table:table>
      <text:h text:style-name="P15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9"><text:span text:style-name="T15">🎯 <text:s/></text:span><text:span text:style-name="T24">最重要的核心觀念（先記住）</text:span></text:p>
            <text:p text:style-name="P10"><text:span text:style-name="T25">IP 位址＝</text:span><text:span text:style-name="T11">決定封包的最終目的地（整條路的終點），像信封上的收件地址。</text:span></text:p>
            <text:p text:style-name="P11"><text:span text:style-name="T25">MAC 位址＝</text:span><text:span text:style-name="T11">決定「下一站」要交給哪台機器，像快遞員每次只看下一站。</text:span></text:p>
            <text:p text:style-name="P11"><text:span text:style-name="T21">關鍵理解：</text:span><text:span text:style-name="T11">封包在傳送途中，IP 不變（始終是 Google 的 IP），但 MAC 每一跳都會更換。</text:span></text:p>
          </table:table-cell>
        </table:table-row>
      </table:table>
      <text:p text:style-name="P20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37">步驟</text:p>
            </table:table-cell>
            <table:table-cell table:style-name="表格66.A1" office:value-type="string">
              <text:p text:style-name="P37">動作</text:p>
            </table:table-cell>
            <table:table-cell table:style-name="表格66.A1" office:value-type="string">
              <text:p text:style-name="P37">使用技術</text:p>
            </table:table-cell>
            <table:table-cell table:style-name="表格66.A1" office:value-type="string">
              <text:p text:style-name="P37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7"><text:span text:style-name="T14">⑤ 傳到 </text:span><text:soft-page-break/><text:span text:style-name="T14">Google</text:span>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9"><text:span text:style-name="T15">💣 <text:s/></text:span><text:span text:style-name="T20">三個最容易搞錯的地方（考試地雷）</text:span></text:p>
            <text:p text:style-name="P10"><text:span text:style-name="T21">✗ 以為 ARP 是找 Google 的 MAC　→　</text:span><text:span text:style-name="T11">✓ ARP 找的是「路由器」的 MAC！因為 ARP 只能在同一個 LAN 內使用。</text:span></text:p>
            <text:p text:style-name="P11"><text:span text:style-name="T21">✗ 以為封包直接送到 Google　→　</text:span><text:span text:style-name="T11">✓ 封包先送給路由器，路由器再轉到 Internet。</text:span></text:p>
            <text:p text:style-name="P11"><text:span text:style-name="T21">✗ 以為 IP 在傳輸過程中一直不變　→　</text:span><text:span text:style-name="T11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9"><text:span text:style-name="T15">📝 <text:s/></text:span><text:span text:style-name="T22">考試標準答案（直接背）</text:span></text:p>
            <text:p text:style-name="P43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5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6"/>
            </table:table-cell>
            <table:table-cell table:style-name="表格67.A1" office:value-type="string">
              <text:p text:style-name="P34">ARP</text:p>
            </table:table-cell>
            <table:table-cell table:style-name="表格67.A1" office:value-type="string">
              <text:p text:style-name="P34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41">目的</text:p>
          </table:table-cell>
          <table:table-cell table:style-name="表格67.A2" office:value-type="string">
            <text:p text:style-name="P41">用 IP 找 MAC</text:p>
          </table:table-cell>
          <table:table-cell table:style-name="表格67.A2" office:value-type="string">
            <text:p text:style-name="P41">私有 IP 轉成公網 IP</text:p>
          </table:table-cell>
        </table:table-row>
        <table:table-row table:style-name="表格67.1">
          <table:table-cell table:style-name="表格67.A3" office:value-type="string">
            <text:p text:style-name="P41">使用範圍</text:p>
          </table:table-cell>
          <table:table-cell table:style-name="表格67.A3" office:value-type="string">
            <text:p text:style-name="P41">區域網路（LAN）內</text:p>
          </table:table-cell>
          <table:table-cell table:style-name="表格67.A3" office:value-type="string">
            <text:p text:style-name="P41">內網與 Internet 之間</text:p>
          </table:table-cell>
        </table:table-row>
        <table:table-row table:style-name="表格67.1">
          <table:table-cell table:style-name="表格67.A2" office:value-type="string">
            <text:p text:style-name="P41">運作層級</text:p>
          </table:table-cell>
          <table:table-cell table:style-name="表格67.A2" office:value-type="string">
            <text:p text:style-name="P41">L2 / L3 交界</text:p>
          </table:table-cell>
          <table:table-cell table:style-name="表格67.A2" office:value-type="string">
            <text:p text:style-name="P41">L3（網路層）</text:p>
          </table:table-cell>
        </table:table-row>
        <table:table-row table:style-name="表格67.1">
          <table:table-cell table:style-name="表格67.A3" office:value-type="string">
            <text:p text:style-name="P41">誰執行</text:p>
          </table:table-cell>
          <table:table-cell table:style-name="表格67.A3" office:value-type="string">
            <text:p text:style-name="P41">端點裝置（電腦）</text:p>
          </table:table-cell>
          <table:table-cell table:style-name="表格67.A3" office:value-type="string">
            <text:p text:style-name="P41">路由器</text:p>
          </table:table-cell>
        </table:table-row>
        <table:table-row table:style-name="表格67.1">
          <table:table-cell table:style-name="表格67.A2" office:value-type="string">
            <text:p text:style-name="P41">主要用途</text:p>
          </table:table-cell>
          <table:table-cell table:style-name="表格67.A2" office:value-type="string">
            <text:p text:style-name="P41">在區網內傳送封包</text:p>
          </table:table-cell>
          <table:table-cell table:style-name="表格67.A2" office:value-type="string">
            <text:p text:style-name="P41">讓內部主機能夠上網</text:p>
          </table:table-cell>
        </table:table-row>
      </table:table>
      <text:h text:style-name="P14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"><text:span text:style-name="T15">🚦 <text:s/></text:span><text:span text:style-name="T7">本篇重點</text:span></text:p>
            <text:p text:style-name="P43">網路的本質是把資料從 A 電腦送到 B 電腦，但中間有四個麻煩，TCP 各自有對策。</text:p>
          </table:table-cell>
        </table:table-row>
      </table:table>
      <text:h text:style-name="P15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34">問題</text:p>
            </table:table-cell>
            <table:table-cell table:style-name="表格69.A1" office:value-type="string">
              <text:p text:style-name="P34">說明</text:p>
            </table:table-cell>
            <table:table-cell table:style-name="表格69.A1" office:value-type="string">
              <text:p text:style-name="P34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41">資料可能丟失</text:p>
          </table:table-cell>
          <table:table-cell table:style-name="表格69.A2" office:value-type="string">
            <text:p text:style-name="P41">封包在網路中消失</text:p>
          </table:table-cell>
          <table:table-cell table:style-name="表格69.A2" office:value-type="string">
            <text:p text:style-name="P41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41">順序可能亂掉</text:p>
          </table:table-cell>
          <table:table-cell table:style-name="表格69.A3" office:value-type="string">
            <text:p text:style-name="P41">封包走不同路徑先後到達</text:p>
          </table:table-cell>
          <table:table-cell table:style-name="表格69.A3" office:value-type="string">
            <text:p text:style-name="P41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41">對方來不及收</text:p>
          </table:table-cell>
          <table:table-cell table:style-name="表格69.A2" office:value-type="string">
            <text:p text:style-name="P41">接收端 buffer 可能爆掉</text:p>
          </table:table-cell>
          <table:table-cell table:style-name="表格69.A2" office:value-type="string">
            <text:p text:style-name="P41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41">網路可能塞車</text:p>
          </table:table-cell>
          <table:table-cell table:style-name="表格69.A3" office:value-type="string">
            <text:p text:style-name="P41">路由器排隊太長</text:p>
          </table:table-cell>
          <table:table-cell table:style-name="表格69.A3" office:value-type="string">
            <text:p text:style-name="P41">擁塞控制（Congestion Control / cwnd）</text:p>
          </table:table-cell>
        </table:table-row>
      </table:table>
      <text:h text:style-name="P15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34">特性</text:p>
            </table:table-cell>
            <table:table-cell table:style-name="表格70.A1" office:value-type="string">
              <text:p text:style-name="P34">TCP（可靠模式）</text:p>
            </table:table-cell>
            <table:table-cell table:style-name="表格70.A1" office:value-type="string">
              <text:p text:style-name="P34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41">連線方式</text:p>
          </table:table-cell>
          <table:table-cell table:style-name="表格70.A2" office:value-type="string">
            <text:p text:style-name="P41">需要先建立連線</text:p>
          </table:table-cell>
          <table:table-cell table:style-name="表格70.A2" office:value-type="string">
            <text:p text:style-name="P41">無連線，直接送</text:p>
          </table:table-cell>
        </table:table-row>
        <table:table-row table:style-name="表格70.1">
          <table:table-cell table:style-name="表格70.A3" office:value-type="string">
            <text:p text:style-name="P41">可靠性</text:p>
          </table:table-cell>
          <table:table-cell table:style-name="表格70.A3" office:value-type="string">
            <text:p text:style-name="P41">保證送達（會重傳）</text:p>
          </table:table-cell>
          <table:table-cell table:style-name="表格70.A3" office:value-type="string">
            <text:p text:style-name="P41">不保證送達</text:p>
          </table:table-cell>
        </table:table-row>
        <table:table-row table:style-name="表格70.1">
          <table:table-cell table:style-name="表格70.A2" office:value-type="string">
            <text:p text:style-name="P41">順序</text:p>
          </table:table-cell>
          <table:table-cell table:style-name="表格70.A2" office:value-type="string">
            <text:p text:style-name="P41">保證順序正確</text:p>
          </table:table-cell>
          <table:table-cell table:style-name="表格70.A2" office:value-type="string">
            <text:p text:style-name="P41">不保證順序</text:p>
          </table:table-cell>
        </table:table-row>
        <table:table-row table:style-name="表格70.1">
          <table:table-cell table:style-name="表格70.A3" office:value-type="string">
            <text:p text:style-name="P41">速度</text:p>
          </table:table-cell>
          <table:table-cell table:style-name="表格70.A3" office:value-type="string">
            <text:p text:style-name="P41">較慢（有控制機制）</text:p>
          </table:table-cell>
          <table:table-cell table:style-name="表格70.A3" office:value-type="string">
            <text:p text:style-name="P41">較快（無額外開銷）</text:p>
          </table:table-cell>
        </table:table-row>
        <table:table-row table:style-name="表格70.1">
          <table:table-cell table:style-name="表格70.A2" office:value-type="string">
            <text:p text:style-name="P41">適合場景</text:p>
          </table:table-cell>
          <table:table-cell table:style-name="表格70.A2" office:value-type="string">
            <text:p text:style-name="P41">網頁、檔案傳輸、Email</text:p>
          </table:table-cell>
          <table:table-cell table:style-name="表格70.A2" office:value-type="string">
            <text:p text:style-name="P41">直播、遊戲、DNS 查詢</text:p>
          </table:table-cell>
        </table:table-row>
        <table:table-row table:style-name="表格70.1">
          <table:table-cell table:style-name="表格70.A3" office:value-type="string">
            <text:p text:style-name="P41">比喻</text:p>
          </table:table-cell>
          <table:table-cell table:style-name="表格70.A3" office:value-type="string">
            <text:p text:style-name="P41">專業物流（簽收確認）</text:p>
          </table:table-cell>
          <table:table-cell table:style-name="表格70.A3" office:value-type="string">
            <text:p text:style-name="P41">亂丟紙飛機</text:p>
          </table:table-cell>
        </table:table-row>
      </table:table>
      <text:h text:style-name="P15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9"><text:span text:style-name="T15">🤝 <text:s/></text:span><text:span text:style-name="T7">握手流程</text:span></text:p>
            <text:p text:style-name="P10"><text:span text:style-name="T8">① Client → Server：SYN　</text:span><text:span text:style-name="T11">「我可以傳資料給你嗎？我準備好了。」（Synchronize 同步請求）</text:span></text:p>
            <text:p text:style-name="P11"><text:span text:style-name="T8">② Server → Client：SYN + ACK　</text:span><text:span text:style-name="T11">「可以！我收到你的請求了，我也準備好了。」（確認＋同步）</text:span></text:p>
            <text:p text:style-name="P11"><text:span text:style-name="T8">③ Client → Server：ACK　</text:span><text:span text:style-name="T11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9"><text:span text:style-name="T15">🎯 <text:s/></text:span><text:span text:style-name="T24">三次握手真正目的（考試必考）</text:span></text:p>
            <text:p text:style-name="P43">確認雙向都能傳資料（Client → Server 和 Server → Client 各自驗證）。</text:p>
            <text:p text:style-name="P42">避免「舊封包誤觸發新連線」：若少一次確認，延遲的舊 SYN 封包可能讓 Server 誤以為要建立新連線。</text:p>
          </table:table-cell>
        </table:table-row>
      </table:table>
      <text:h text:style-name="P15" text:outline-level="2">四、攻擊：SYN Flood</text:h>
      <text:p text:style-name="P44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33">步驟</text:p>
            </table:table-cell>
            <table:table-cell table:style-name="表格72.A1" office:value-type="string">
              <text:p text:style-name="P33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41">1</text:p>
          </table:table-cell>
          <table:table-cell table:style-name="表格72.A2" office:value-type="string">
            <text:p text:style-name="P41">攻擊者送出大量 SYN，每個都假冒不同來源 IP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41">2</text:p>
          </table:table-cell>
          <table:table-cell table:style-name="表格72.A3" office:value-type="string">
            <text:p text:style-name="P41">Server 建立「半連線（Half-open Connection）」，每個都佔記憶體等待 ACK</text:p>
          </table:table-cell>
        </table:table-row>
        <table:table-row table:style-name="表格72.1">
          <table:table-cell table:style-name="表格72.A2" office:value-type="string">
            <text:p text:style-name="P41">3</text:p>
          </table:table-cell>
          <table:table-cell table:style-name="表格72.A2" office:value-type="string">
            <text:p text:style-name="P41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41">4</text:p>
          </table:table-cell>
          <table:table-cell table:style-name="表格72.A3" office:value-type="string">
            <text:p text:style-name="P41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9"><text:span text:style-name="T15">⚠️ <text:s/></text:span><text:span text:style-name="T20">本質</text:span></text:p>
            <text:p text:style-name="P43">這是一種 DoS（拒絕服務）攻擊，利用 TCP 三次握手機制的不對稱性。</text:p>
          </table:table-cell>
          <table:covered-table-cell/>
        </table:table-row>
      </table:table>
      <text:h text:style-name="P15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33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33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41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41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0"><text:span text:style-name="T25">實際傳送量 ＝ min(rwnd, cwnd)　</text:span><text:span text:style-name="T11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33">情境</text:p>
          </table:table-cell>
          <table:table-cell table:style-name="表格73.A1" office:value-type="string">
            <text:p text:style-name="P33">cwnd</text:p>
          </table:table-cell>
          <table:table-cell table:style-name="表格73.A1" table:number-columns-spanned="2" office:value-type="string">
            <text:p text:style-name="P33">rwnd</text:p>
          </table:table-cell>
          <table:covered-table-cell/>
          <table:table-cell table:style-name="表格73.A1" office:value-type="string">
            <text:p text:style-name="P33">實際傳送量</text:p>
          </table:table-cell>
          <table:table-cell table:style-name="表格73.A1" office:value-type="string">
            <text:p text:style-name="P33">瓶頸原因</text:p>
          </table:table-cell>
        </table:table-row>
        <table:table-row table:style-name="表格73.1">
          <table:table-cell table:style-name="表格73.A2" office:value-type="string">
            <text:p text:style-name="P41">對方 buffer 快滿了</text:p>
          </table:table-cell>
          <table:table-cell table:style-name="表格73.A2" office:value-type="string">
            <text:p text:style-name="P41">10</text:p>
          </table:table-cell>
          <table:table-cell table:style-name="表格73.A2" table:number-columns-spanned="2" office:value-type="string">
            <text:p text:style-name="P41">3</text:p>
          </table:table-cell>
          <table:covered-table-cell/>
          <table:table-cell table:style-name="表格73.A2" office:value-type="string">
            <text:p text:style-name="P41">3</text:p>
          </table:table-cell>
          <table:table-cell table:style-name="表格73.A2" office:value-type="string">
            <text:p text:style-name="P41">接收端限制（rwnd）</text:p>
          </table:table-cell>
        </table:table-row>
        <table:table-row table:style-name="表格73.1">
          <table:table-cell table:style-name="表格73.A6" office:value-type="string">
            <text:p text:style-name="P41">網路很塞</text:p>
          </table:table-cell>
          <table:table-cell table:style-name="表格73.A6" office:value-type="string">
            <text:p text:style-name="P41">2</text:p>
          </table:table-cell>
          <table:table-cell table:style-name="表格73.A6" table:number-columns-spanned="2" office:value-type="string">
            <text:p text:style-name="P41">10</text:p>
          </table:table-cell>
          <table:covered-table-cell/>
          <table:table-cell table:style-name="表格73.A6" office:value-type="string">
            <text:p text:style-name="P41">2</text:p>
          </table:table-cell>
          <table:table-cell table:style-name="表格73.A6" office:value-type="string">
            <text:p text:style-name="P41">網路限制（cwnd）</text:p>
          </table:table-cell>
        </table:table-row>
        <table:table-row table:style-name="表格73.1">
          <table:table-cell table:style-name="表格73.A2" office:value-type="string">
            <text:p text:style-name="P41">兩者相近</text:p>
          </table:table-cell>
          <table:table-cell table:style-name="表格73.A2" office:value-type="string">
            <text:p text:style-name="P41">5</text:p>
          </table:table-cell>
          <table:table-cell table:style-name="表格73.A2" table:number-columns-spanned="2" office:value-type="string">
            <text:p text:style-name="P41">6</text:p>
          </table:table-cell>
          <table:covered-table-cell/>
          <table:table-cell table:style-name="表格73.A2" office:value-type="string">
            <text:p text:style-name="P41">5</text:p>
          </table:table-cell>
          <table:table-cell table:style-name="表格73.A2" office:value-type="string">
            <text:p text:style-name="P41">網路限制（cwnd）</text:p>
          </table:table-cell>
        </table:table-row>
      </table:table>
      <text:h text:style-name="P15" text:outline-level="2">六、滑動視窗（Sliding Window）</text:h>
      <text:p text:style-name="P44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0"><text:span text:style-name="T21">✗ 常見錯誤：</text:span><text:span text:style-name="T11">視窗 = cwnd（擁塞視窗）。</text:span><text:span text:style-name="T23">✓ 正確：</text:span><text:span text:style-name="T11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34">時間點</text:p>
          </table:table-cell>
          <table:table-cell table:style-name="表格74.A2" office:value-type="string">
            <text:p text:style-name="P34">已確認</text:p>
          </table:table-cell>
          <table:table-cell table:style-name="表格74.A2" office:value-type="string">
            <text:p text:style-name="P34">視窗範圍（可送）</text:p>
          </table:table-cell>
          <table:table-cell table:style-name="表格74.A2" office:value-type="string">
            <text:p text:style-name="P34">等待中</text:p>
          </table:table-cell>
        </table:table-row>
        <table:table-row table:style-name="表格74.1">
          <table:table-cell table:style-name="表格74.A3" office:value-type="string">
            <text:p text:style-name="P41">初始狀態</text:p>
          </table:table-cell>
          <table:table-cell table:style-name="表格74.A3" office:value-type="string">
            <text:p text:style-name="P41">無</text:p>
          </table:table-cell>
          <table:table-cell table:style-name="表格74.A3" office:value-type="string">
            <text:p text:style-name="P41">封包 1, 2, 3</text:p>
          </table:table-cell>
          <table:table-cell table:style-name="表格74.A3" office:value-type="string">
            <text:p text:style-name="P41">4, 5, 6 …</text:p>
          </table:table-cell>
        </table:table-row>
        <table:table-row table:style-name="表格74.1">
          <table:table-cell table:style-name="表格74.A4" office:value-type="string">
            <text:p text:style-name="P41">收到 ACK 1</text:p>
          </table:table-cell>
          <table:table-cell table:style-name="表格74.A4" office:value-type="string">
            <text:p text:style-name="P41">封包 1</text:p>
          </table:table-cell>
          <table:table-cell table:style-name="表格74.A4" office:value-type="string">
            <text:p text:style-name="P41">封包 2, 3, 4</text:p>
          </table:table-cell>
          <table:table-cell table:style-name="表格74.A4" office:value-type="string">
            <text:p text:style-name="P41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41">收到 ACK 2</text:p>
          </table:table-cell>
          <table:table-cell table:style-name="表格74.A3" office:value-type="string">
            <text:p text:style-name="P41">封包 1, 2</text:p>
          </table:table-cell>
          <table:table-cell table:style-name="表格74.A3" office:value-type="string">
            <text:p text:style-name="P41">封包 3, 4, 5</text:p>
          </table:table-cell>
          <table:table-cell table:style-name="表格74.A3" office:value-type="string">
            <text:p text:style-name="P41">6, 7 …（繼續往右滑）</text:p>
          </table:table-cell>
        </table:table-row>
      </table:table>
      <text:p text:style-name="P20">關鍵理解：視窗大小決定效率（越大越快），ACK 的回傳決定視窗位置（往前滑），兩者合作讓傳輸保持流暢。</text:p>
      <text:h text:style-name="P15" text:outline-level="2">七、擁塞控制：怎麼調整速度</text:h>
      <text:h text:style-name="P3" text:outline-level="3"><text:span text:style-name="T16">▍</text:span><text:span text:style-name="T17"> 階段一：Slow Start（慢啟動）— 指數成長</text:span></text:h>
      <text:p text:style-name="P44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33">輪次（RTT）</text:p>
            </table:table-cell>
            <table:table-cell table:style-name="表格75.A1" office:value-type="string">
              <text:p text:style-name="P33">cwnd</text:p>
            </table:table-cell>
            <table:table-cell table:style-name="表格75.A1" office:value-type="string">
              <text:p text:style-name="P33">送出封包數</text:p>
            </table:table-cell>
            <table:table-cell table:style-name="表格75.A1" office:value-type="string">
              <text:p text:style-name="P33">收回 ACK 數</text:p>
            </table:table-cell>
            <table:table-cell table:style-name="表格75.A1" office:value-type="string">
              <text:p text:style-name="P33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1">第 1 輪</text:p>
          </table:table-cell>
          <table:table-cell table:style-name="表格75.A2" office:value-type="string">
            <text:p text:style-name="P41">1</text:p>
          </table:table-cell>
          <table:table-cell table:style-name="表格75.A2" office:value-type="string">
            <text:p text:style-name="P41">1</text:p>
          </table:table-cell>
          <table:table-cell table:style-name="表格75.A2" office:value-type="string">
            <text:p text:style-name="P41">1</text:p>
          </table:table-cell>
          <table:table-cell table:style-name="表格75.A2" office:value-type="string">
            <text:p text:style-name="P41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41">第 2 輪</text:p>
          </table:table-cell>
          <table:table-cell table:style-name="表格75.A3" office:value-type="string">
            <text:p text:style-name="P41">2</text:p>
          </table:table-cell>
          <table:table-cell table:style-name="表格75.A3" office:value-type="string">
            <text:p text:style-name="P41">2</text:p>
          </table:table-cell>
          <table:table-cell table:style-name="表格75.A3" office:value-type="string">
            <text:p text:style-name="P41">2</text:p>
          </table:table-cell>
          <table:table-cell table:style-name="表格75.A3" office:value-type="string">
            <text:p text:style-name="P41">4</text:p>
          </table:table-cell>
        </table:table-row>
        <table:table-row table:style-name="表格75.1">
          <table:table-cell table:style-name="表格75.A2" office:value-type="string">
            <text:p text:style-name="P41">第 3 輪</text:p>
          </table:table-cell>
          <table:table-cell table:style-name="表格75.A2" office:value-type="string">
            <text:p text:style-name="P41">4</text:p>
          </table:table-cell>
          <table:table-cell table:style-name="表格75.A2" office:value-type="string">
            <text:p text:style-name="P41">4</text:p>
          </table:table-cell>
          <table:table-cell table:style-name="表格75.A2" office:value-type="string">
            <text:p text:style-name="P41">4</text:p>
          </table:table-cell>
          <table:table-cell table:style-name="表格75.A2" office:value-type="string">
            <text:p text:style-name="P41">8</text:p>
          </table:table-cell>
        </table:table-row>
        <table:table-row table:style-name="表格75.1">
          <table:table-cell table:style-name="表格75.A3" office:value-type="string">
            <text:p text:style-name="P41">第 4 輪</text:p>
          </table:table-cell>
          <table:table-cell table:style-name="表格75.A3" office:value-type="string">
            <text:p text:style-name="P41">8</text:p>
          </table:table-cell>
          <table:table-cell table:style-name="表格75.A3" office:value-type="string">
            <text:p text:style-name="P41">8</text:p>
          </table:table-cell>
          <table:table-cell table:style-name="表格75.A3" office:value-type="string">
            <text:p text:style-name="P41">8</text:p>
          </table:table-cell>
          <table:table-cell table:style-name="表格75.A3" office:value-type="string">
            <text:p text:style-name="P41">16</text:p>
          </table:table-cell>
        </table:table-row>
      </table:table>
      <text:h text:style-name="P3" text:outline-level="3"><text:span text:style-name="T16">▍</text:span><text:span text:style-name="T17"> 階段二：Congestion Avoidance（擁塞避免）— 線性成長</text:span></text:h>
      <text:p text:style-name="P44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6"/>
            </table:table-cell>
            <table:table-cell table:style-name="表格76.A1" office:value-type="string">
              <text:p text:style-name="P34">Slow Start</text:p>
            </table:table-cell>
            <table:table-cell table:style-name="表格76.A1" office:value-type="string">
              <text:p text:style-name="P34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41">觸發條件</text:p>
          </table:table-cell>
          <table:table-cell table:style-name="表格76.A2" office:value-type="string">
            <text:p text:style-name="P41">cwnd &lt; ssthresh</text:p>
          </table:table-cell>
          <table:table-cell table:style-name="表格76.A2" office:value-type="string">
            <text:p text:style-name="P41">cwnd ≥ ssthresh</text:p>
          </table:table-cell>
        </table:table-row>
        <table:table-row table:style-name="表格76.1">
          <table:table-cell table:style-name="表格76.A3" office:value-type="string">
            <text:p text:style-name="P41">成長方式</text:p>
          </table:table-cell>
          <table:table-cell table:style-name="表格76.A3" office:value-type="string">
            <text:p text:style-name="P41">指數成長（每個 ACK +1）</text:p>
          </table:table-cell>
          <table:table-cell table:style-name="表格76.A3" office:value-type="string">
            <text:p text:style-name="P41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41">特性</text:p>
          </table:table-cell>
          <table:table-cell table:style-name="表格76.A2" office:value-type="string">
            <text:p text:style-name="P41">快速試探網路上限</text:p>
          </table:table-cell>
          <table:table-cell table:style-name="表格76.A2" office:value-type="string">
            <text:p text:style-name="P41">保守維持穩定傳輸</text:p>
          </table:table-cell>
        </table:table-row>
      </table:table>
      <text:h text:style-name="P3" text:outline-level="3"><text:span text:style-name="T16">▍</text:span><text:span text:style-name="T17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37">丟包偵測方式</text:p>
            </table:table-cell>
            <table:table-cell table:style-name="表格77.A1" office:value-type="string">
              <text:p text:style-name="P37">說明</text:p>
            </table:table-cell>
            <table:table-cell table:style-name="表格77.A1" office:value-type="string">
              <text:p text:style-name="P37">ssthresh</text:p>
            </table:table-cell>
            <table:table-cell table:style-name="表格77.A1" office:value-type="string">
              <text:p text:style-name="P37">cwnd</text:p>
            </table:table-cell>
            <table:table-cell table:style-name="表格77.A1" office:value-type="string">
              <text:p text:style-name="P37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52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23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9"><text:span text:style-name="T15">⚠️ <text:s/></text:span><text:span text:style-name="T20">重要區別</text:span></text:p>
            <text:p text:style-name="P43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33">AI：加法增長 Additive Increase</text:p>
            </table:table-cell>
            <table:table-cell table:style-name="表格78.A1" office:value-type="string">
              <text:p text:style-name="P33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41">沒丟包 → 網路 OK → CA 階段線性增加（每 RTT +1），慢慢加速。</text:p>
          </table:table-cell>
          <table:table-cell table:style-name="表格78.A2" office:value-type="string">
            <text:p text:style-name="P41">偵測到丟包 → 網路塞了 → cwnd ×0.5（減半），快速降速避免繼續惡化。</text:p>
          </table:table-cell>
        </table:table-row>
      </table:table>
      <text:p text:style-name="P20">AIMD 本質：用 ACK 當回饋，不斷探測網路的「最高速度」——慢慢加速找上限，遇到問題快速減速再重新找，這個循環就是 TCP 傳輸的節奏。</text:p>
      <text:h text:style-name="P15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"><text:span text:style-name="T15">🔄 <text:s/></text:span><text:span text:style-name="T7">完整流程</text:span></text:p>
            <text:p text:style-name="P43">① 建立連線：三次握手（SYN → SYN+ACK → ACK）確認雙向通訊正常。</text:p>
            <text:p text:style-name="P42">② 開始傳資料 Slow Start：cwnd 從 1 開始，每個 ACK +1，指數成長快速試探上限。</text:p>
            <text:p text:style-name="P42">③ 達到門檻切換 CA：cwnd 到 ssthresh 後改每 RTT +1，線性保守維持穩定。（RTT＝來回時間：送出一個封包到收到 ACK 所花的時間）</text:p>
            <text:p text:style-name="P42">④ 每輪都考慮兩個限制：實際傳送量 = min(rwnd, cwnd)。</text:p>
            <text:p text:style-name="P42">⑤ 視窗持續滑動：每收到一個 ACK 視窗往前移，保持 pipeline 流暢。</text:p>
            <text:p text:style-name="P42">⑥ 偵測到丟包快速反應：Timeout → cwnd=1 重回 Slow Start；3 重複 ACK → cwnd 減半續 CA。</text:p>
            <text:p text:style-name="P42">⑦ 持續循環調整：送 → 收 ACK → 調整 cwnd → 再送，用 ACK 當回饋不斷自我調節。</text:p>
          </table:table-cell>
        </table:table-row>
      </table:table>
      <text:h text:style-name="P2" text:outline-level="2"><text:soft-page-break/><text:span text:style-name="T6">九、ARP / NAT / TCP 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34">步驟</text:p>
            </table:table-cell>
            <table:table-cell table:style-name="表格80.A1" office:value-type="string">
              <text:p text:style-name="P34">發生什麼</text:p>
            </table:table-cell>
            <table:table-cell table:style-name="表格80.A1" office:value-type="string">
              <text:p text:style-name="P34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41">DNS 解析</text:p>
          </table:table-cell>
          <table:table-cell table:style-name="表格80.A2" office:value-type="string">
            <text:p text:style-name="P41">google.com → 142.250.x.x</text:p>
          </table:table-cell>
          <table:table-cell table:style-name="表格80.A2" office:value-type="string">
            <text:p text:style-name="P41">DNS</text:p>
          </table:table-cell>
        </table:table-row>
        <table:table-row table:style-name="表格80.1">
          <table:table-cell table:style-name="表格80.A3" office:value-type="string">
            <text:p text:style-name="P41">ARP 找路由器</text:p>
          </table:table-cell>
          <table:table-cell table:style-name="表格80.A3" office:value-type="string">
            <text:p text:style-name="P41">找路由器的 MAC 位址</text:p>
          </table:table-cell>
          <table:table-cell table:style-name="表格80.A3" office:value-type="string">
            <text:p text:style-name="P41">ARP</text:p>
          </table:table-cell>
        </table:table-row>
        <table:table-row table:style-name="表格80.1">
          <table:table-cell table:style-name="表格80.A2" office:value-type="string">
            <text:p text:style-name="P41">NAT</text:p>
          </table:table-cell>
          <table:table-cell table:style-name="表格80.A2" office:value-type="string">
            <text:p text:style-name="P41">私有 IP 換成公網 IP</text:p>
          </table:table-cell>
          <table:table-cell table:style-name="表格80.A2" office:value-type="string">
            <text:p text:style-name="P41">NAT</text:p>
          </table:table-cell>
        </table:table-row>
        <table:table-row table:style-name="表格80.1">
          <table:table-cell table:style-name="表格80.A3" office:value-type="string">
            <text:p text:style-name="P41">TCP 三次握手</text:p>
          </table:table-cell>
          <table:table-cell table:style-name="表格80.A3" office:value-type="string">
            <text:p text:style-name="P41">與 Google 建立可靠連線</text:p>
          </table:table-cell>
          <table:table-cell table:style-name="表格80.A3" office:value-type="string">
            <text:p text:style-name="P41">TCP</text:p>
          </table:table-cell>
        </table:table-row>
        <table:table-row table:style-name="表格80.1">
          <table:table-cell table:style-name="表格80.A2" office:value-type="string">
            <text:p text:style-name="P41">傳資料（Slow Start → CA）</text:p>
          </table:table-cell>
          <table:table-cell table:style-name="表格80.A2" office:value-type="string">
            <text:p text:style-name="P41">cwnd 慢慢加速，滑動視窗持續傳送</text:p>
          </table:table-cell>
          <table:table-cell table:style-name="表格80.A2" office:value-type="string">
            <text:p text:style-name="P41">TCP 擁塞控制</text:p>
          </table:table-cell>
        </table:table-row>
        <table:table-row table:style-name="表格80.1">
          <table:table-cell table:style-name="表格80.A3" office:value-type="string">
            <text:p text:style-name="P41">Google 回應</text:p>
          </table:table-cell>
          <table:table-cell table:style-name="表格80.A3" office:value-type="string">
            <text:p text:style-name="P41">資料送回你的電腦</text:p>
          </table:table-cell>
          <table:table-cell table:style-name="表格80.A3" office:value-type="string">
            <text:p text:style-name="P41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9"><text:span text:style-name="T15">⚡ <text:s/></text:span><text:span text:style-name="T17">層次關係</text:span></text:p>
            <text:p text:style-name="P43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5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9"><text:span text:style-name="T15">🧠 <text:s/></text:span><text:span text:style-name="T24">考試直接用</text:span></text:p>
            <text:p text:style-name="P43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4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"><text:span text:style-name="T15">💡 <text:s/></text:span><text:span text:style-name="T7">DNS 是什麼？</text:span></text:p>
            <text:p text:style-name="P43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5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34">類型</text:p>
            </table:table-cell>
            <table:table-cell table:style-name="表格83.A1" office:value-type="string">
              <text:p text:style-name="P34">全名</text:p>
            </table:table-cell>
            <table:table-cell table:style-name="表格83.A1" office:value-type="string">
              <text:p text:style-name="P34">用途</text:p>
            </table:table-cell>
            <table:table-cell table:style-name="表格83.A1" office:value-type="string">
              <text:p text:style-name="P34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41">A</text:p>
          </table:table-cell>
          <table:table-cell table:style-name="表格83.A2" office:value-type="string">
            <text:p text:style-name="P41">Address Record</text:p>
          </table:table-cell>
          <table:table-cell table:style-name="表格83.A2" office:value-type="string">
            <text:p text:style-name="P41">網域名稱 → IPv4 位址</text:p>
          </table:table-cell>
          <table:table-cell table:style-name="表格83.A2" office:value-type="string">
            <text:p text:style-name="P41">google.com → 142.250.x.x</text:p>
          </table:table-cell>
        </table:table-row>
        <table:table-row table:style-name="表格83.1">
          <table:table-cell table:style-name="表格83.A3" office:value-type="string">
            <text:p text:style-name="P41">NS</text:p>
          </table:table-cell>
          <table:table-cell table:style-name="表格83.A3" office:value-type="string">
            <text:p text:style-name="P41">Name Server</text:p>
          </table:table-cell>
          <table:table-cell table:style-name="表格83.A3" office:value-type="string">
            <text:p text:style-name="P41">指定管理該網域的 DNS 伺服器</text:p>
          </table:table-cell>
          <table:table-cell table:style-name="表格83.A3" office:value-type="string">
            <text:p text:style-name="P41">google.com → ns1.google.com</text:p>
          </table:table-cell>
        </table:table-row>
        <table:table-row table:style-name="表格83.1">
          <table:table-cell table:style-name="表格83.A2" office:value-type="string">
            <text:p text:style-name="P41">MX</text:p>
          </table:table-cell>
          <table:table-cell table:style-name="表格83.A2" office:value-type="string">
            <text:p text:style-name="P41">Mail Exchange</text:p>
          </table:table-cell>
          <table:table-cell table:style-name="表格83.A2" office:value-type="string">
            <text:p text:style-name="P41">指定負責收發郵件的伺服器</text:p>
          </table:table-cell>
          <table:table-cell table:style-name="表格83.A2" office:value-type="string">
            <text:p text:style-name="P41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41">CNAME</text:p>
          </table:table-cell>
          <table:table-cell table:style-name="表格83.A3" office:value-type="string">
            <text:p text:style-name="P41">Canonical Name</text:p>
          </table:table-cell>
          <table:table-cell table:style-name="表格83.A3" office:value-type="string">
            <text:p text:style-name="P41">設定網域別名，指向另一個網域</text:p>
          </table:table-cell>
          <table:table-cell table:style-name="表格83.A3" office:value-type="string">
            <text:p text:style-name="P41">www → google.com</text:p>
          </table:table-cell>
        </table:table-row>
      </table:table>
      <text:p text:style-name="P19">（補充：AAAA record → 回傳 IPv6 位址，見第三篇 Dual Stack。）</text:p>
      <text:h text:style-name="P15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9"><text:span text:style-name="T15">📚 <text:s/></text:span><text:span text:style-name="T7">圖書館找書比喻</text:span></text:p>
            <text:p text:style-name="P43">你要找一本書，書名叫「google.com」：</text:p>
            <text:p text:style-name="P42">① 先翻自己的筆記本（Cache）→ 記得放哪就直接去</text:p>
            <text:p text:style-name="P42">② 問圖書館員（Local DNS）→「你知道這本書嗎？」</text:p>
            <text:p text:style-name="P42">③ 館員問館長（Root DNS）→「這本是哪個分類？」→「外文區」</text:p>
            <text:p text:style-name="P42">④ 去外文區管理員（TLD：.com）→「google 在哪個書架？」</text:p>
            <text:p text:style-name="P4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38">步驟</text:p>
          </table:table-cell>
          <table:table-cell table:style-name="表格84.A2" office:value-type="string">
            <text:p text:style-name="P38">層級</text:p>
          </table:table-cell>
          <table:table-cell table:style-name="表格84.A2" office:value-type="string">
            <text:p text:style-name="P38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9"><text:span text:style-name="T15">📌 <text:s/></text:span><text:span text:style-name="T24">一句話總結</text:span></text:p>
            <text:p text:style-name="P43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三、Recursive vs. Iterative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9"><text:span text:style-name="T15">⚠️ <text:s/></text:span><text:span text:style-name="T20">最關鍵的差別</text:span></text:p>
            <text:p text:style-name="P43">兩種方式的路徑相同（Cache → Local → Root → TLD → Auth），唯一差別只有一件事：「誰去問」。</text:p>
            <text:p text:style-name="P4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34">比較項目</text:p>
          </table:table-cell>
          <table:table-cell table:style-name="表格85.A2" office:value-type="string">
            <text:p text:style-name="P34">Recursive（遞迴）</text:p>
          </table:table-cell>
          <table:table-cell table:style-name="表格85.A2" office:value-type="string">
            <text:p text:style-name="P34">Iterative（反覆）</text:p>
          </table:table-cell>
        </table:table-row>
        <table:table-row table:style-name="表格85.1">
          <table:table-cell table:style-name="表格85.A3" office:value-type="string">
            <text:p text:style-name="P41">誰去問</text:p>
          </table:table-cell>
          <table:table-cell table:style-name="表格85.A3" office:value-type="string">
            <text:p text:style-name="P41">DNS 伺服器代替你問完</text:p>
          </table:table-cell>
          <table:table-cell table:style-name="表格85.A3" office:value-type="string">
            <text:p text:style-name="P41">你自己逐層查詢</text:p>
          </table:table-cell>
        </table:table-row>
        <table:table-row table:style-name="表格85.1">
          <table:table-cell table:style-name="表格85.A4" office:value-type="string">
            <text:p text:style-name="P41">問幾次</text:p>
          </table:table-cell>
          <table:table-cell table:style-name="表格85.A4" office:value-type="string">
            <text:p text:style-name="P41">你只問 1 次</text:p>
          </table:table-cell>
          <table:table-cell table:style-name="表格85.A4" office:value-type="string">
            <text:p text:style-name="P41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41">常見場合</text:p>
          </table:table-cell>
          <table:table-cell table:style-name="表格85.A3" office:value-type="string">
            <text:p text:style-name="P41">一般使用者 → Local DNS</text:p>
          </table:table-cell>
          <table:table-cell table:style-name="表格85.A3" office:value-type="string">
            <text:p text:style-name="P41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41">記憶口訣</text:p>
          </table:table-cell>
          <table:table-cell table:style-name="表格85.A4" office:value-type="string">
            <text:p text:style-name="P49">代查到底</text:p>
          </table:table-cell>
          <table:table-cell table:style-name="表格85.A4" office:value-type="string">
            <text:p text:style-name="P24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9"><text:span text:style-name="T15">🗣️ <text:s/></text:span><text:span text:style-name="T7">問路比喻</text:span></text:p>
            <text:p text:style-name="P10"><text:span text:style-name="T8">Recursive（朋友幫你問完）：</text:span><text:span text:style-name="T11">你只問朋友（Local DNS）一次「台北101在哪？」朋友自己跑完 Root→TLD→Auth，回你 IP，你沒動過。</text:span></text:p>
            <text:p text:style-name="P11"><text:span text:style-name="T8">Iterative（你自己跑全程）：</text:span><text:span text:style-name="T11">你問 Root「我不知道，去問 TLD」→ 你問 TLD「去問 Auth」→ 你問 Auth 拿到 IP，全程你自己跑。</text:span></text:p>
            <text:p text:style-name="P11"><text:span text:style-name="T5">為什麼有兩種？</text:span><text:span text:style-name="T11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5" text:outline-level="2">四、Open Resolver 風險</text:h>
      <text:p text:style-name="P44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33">⚠️ Cache Poisoning（快取污染）</text:p>
            </table:table-cell>
            <table:table-cell table:style-name="表格86.A1" office:value-type="string">
              <text:p text:style-name="P33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41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41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5" text:outline-level="2">五、DNSSEC — DNS 安全機制</text:h>
      <text:p text:style-name="P44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33">✅ DNSSEC 可以防禦</text:p>
            </table:table-cell>
            <table:table-cell table:style-name="表格87.A1" office:value-type="string">
              <text:p text:style-name="P33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41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41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9"><text:span text:style-name="T15">⚠️ <text:s/></text:span><text:span text:style-name="T24">最重要的一句話</text:span></text:p>
            <text:p text:style-name="P58">DNSSEC = 驗證真偽，不是加密，不防 DDoS</text:p>
          </table:table-cell>
          <table:covered-table-cell/>
        </table:table-row>
      </table:table>
      <text:h text:style-name="P15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9"><text:span text:style-name="T15">🔍 <text:s/></text:span><text:span text:style-name="T7">診斷結論</text:span></text:p>
            <text:p text:style-name="P43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9"><text:span text:style-name="T15">📝 <text:s/></text:span><text:span text:style-name="T22">申論題標準答案</text:span></text:p>
            <text:p text:style-name="P10"><text:span text:style-name="T23">一、DNS 功能：</text:span><text:span text:style-name="T11">DNS 為網際網路中負責將網域名稱轉換為 IP 位址的分散式系統。</text:span></text:p>
            <text:p text:style-name="P11"><text:span text:style-name="T23">二、查詢流程：</text:span><text:span text:style-name="T11">由快取開始，依序向 Local DNS、Root DNS、TLD DNS、Authoritative DNS 查詢，最終取得 IP 位址。</text:span></text:p>
            <text:p text:style-name="P11"><text:span text:style-name="T23">三、Recursive：</text:span><text:span text:style-name="T11">由 DNS 伺服器代替用戶端完整查詢並直接回傳最終 IP，用戶端只需等待結果。</text:span></text:p>
            <text:p text:style-name="P11"><text:span text:style-name="T23">四、Iterative：</text:span><text:span text:style-name="T11">DNS 伺服器僅回應下一步查詢位置，由用戶端自行逐層向各 DNS 查詢，直到取得 IP。</text:span></text:p>
            <text:p text:style-name="P11"><text:span text:style-name="T23">五、DNSSEC：</text:span><text:span text:style-name="T11">透過數位簽章驗證 DNS 回應真實性，可防 DNS Spoofing 及 Cache Poisoning，但不提供加密，也無法防禦 DDoS。</text:span></text:p>
          </table:table-cell>
        </table:table-row>
      </table:table>
      <text:h text:style-name="P14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9"><text:span text:style-name="T15">🗺️ <text:s/></text:span><text:span text:style-name="T7">在解決什麼問題？</text:span></text:p>
            <text:p text:style-name="P43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5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33">🏢 IGP — 內部用</text:p>
            </table:table-cell>
            <table:table-cell table:style-name="表格90.A1" office:value-type="string">
              <text:p text:style-name="P33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41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41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9"><text:span text:style-name="T15">⚡ <text:s/></text:span><text:span text:style-name="T17">一句話記憶法</text:span></text:p>
            <text:p text:style-name="P43">公司／校園內 → 用 IGP（OSPF 或 RIP）；公司與公司間 → 用 EGP（BGP）。</text:p>
          </table:table-cell>
          <table:covered-table-cell/>
        </table:table-row>
      </table:table>
      <text:h text:style-name="P15" text:outline-level="2">二、OSPF 的核心概念</text:h>
      <text:p text:style-name="P44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9"><text:span text:style-name="T15">📌 <text:s/></text:span><text:span text:style-name="T24">最重要的規定</text:span></text:p>
            <text:p text:style-name="P43">所有 Area 都必須連到 Area 0（骨幹區域）。Area 0 就像高速公路主幹道，其他 Area 是交流道。</text:p>
          </table:table-cell>
        </table:table-row>
      </table:table>
      <text:h text:style-name="P15" text:outline-level="2">三、OSPF 的 4 種 Router（重點！）</text:h>
      <text:p text:style-name="P44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37">類型</text:p>
            </table:table-cell>
            <table:table-cell table:style-name="表格92.A1" office:value-type="string">
              <text:p text:style-name="P37">本質</text:p>
            </table:table-cell>
            <table:table-cell table:style-name="表格92.A1" office:value-type="string">
              <text:p text:style-name="P37">核心記憶點</text:p>
            </table:table-cell>
            <table:table-cell table:style-name="表格92.A1" office:value-type="string">
              <text:p text:style-name="P37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9"><text:span text:style-name="T15">⚠️ <text:s/></text:span><text:span text:style-name="T20">考試最愛考的三個陷阱</text:span></text:p>
            <text:p text:style-name="P10"><text:span text:style-name="T21">✗ ABR 負責連接外部網路　→　</text:span><text:span text:style-name="T11">✓ ABR 只負責 Area 之間的橋樑，對外是 ASBR 的工作。</text:span></text:p>
            <text:p text:style-name="P11"><text:span text:style-name="T21">✗ ASBR 是用來跨越不同 Area　→　</text:span><text:span text:style-name="T11">✓ ASBR 是跨越不同 AS（整個系統），不是跨 Area。</text:span></text:p>
            <text:p text:style-name="P11"><text:span text:style-name="T21">✗ 任意兩個 Area 可直接相連　→　</text:span><text:span text:style-name="T11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四、AS-PATH 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33">📦 路由（Route）</text:p>
            </table:table-cell>
            <table:table-cell table:style-name="表格93.A1" office:value-type="string">
              <text:p text:style-name="P33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41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41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9"><text:span text:style-name="T15">📦 <text:s/></text:span><text:span text:style-name="T7">生活比喻：包裹寄送</text:span></text:p>
            <text:p text:style-name="P10"><text:span text:style-name="T12">路由（Route）→ </text:span><text:span text:style-name="T11">包裹實際走的路：台北 → 東京 → 美國。</text:span></text:p>
            <text:p text:style-name="P11"><text:span text:style-name="T12">AS-PATH → </text:span><text:span text:style-name="T11">貼在包裹上的紀錄：黑貓 → 日本郵政 → USPS。</text:span></text:p>
            <text:p text:style-name="P42">路由是「實際行動」，AS-PATH 是「行動的紀錄」。</text:p>
          </table:table-cell>
          <table:covered-table-cell/>
        </table:table-row>
      </table:table>
      <text:h text:style-name="P15" text:outline-level="2">五、BGP 怎麼選最佳路徑？（九步選路）</text:h>
      <text:p text:style-name="P44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38">步驟</text:p>
            </table:table-cell>
            <table:table-cell table:style-name="表格94.A1" office:value-type="string">
              <text:p text:style-name="P38">屬性</text:p>
            </table:table-cell>
            <table:table-cell table:style-name="表格94.A1" office:value-type="string">
              <text:p text:style-name="P38">說明</text:p>
            </table:table-cell>
            <table:table-cell table:style-name="表格94.A1" office:value-type="string">
              <text:p text:style-name="P38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40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40">②</text:p>
          </table:table-cell>
          <table:table-cell table:style-name="表格94.A3" office:value-type="string">
            <text:p text:style-name="P23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23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40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40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40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40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40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40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40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9"><text:span text:style-name="T15">🧠 <text:s/></text:span><text:span text:style-name="T24">白話理解（這句最重要）</text:span></text:p>
            <text:p text:style-name="P43">BGP 心裡在想：「哪條路比較值得信任？比較符合政策？」不是「哪條最短」（那是 OSPF 在做的事）。</text:p>
            <text:p text:style-name="P11"><text:span text:style-name="T25">一句話總結 → </text:span><text:span text:style-name="T11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9"><text:span text:style-name="T15">⚡ <text:s/></text:span><text:span text:style-name="T17">考試口訣（10 秒背）</text:span></text:p>
            <text:p text:style-name="P43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5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0"><text:span text:style-name="T21">✗ AS-PATH 是 BGP 選路最重要的屬性　→　</text:span><text:span text:style-name="T11">✓ Local Preference 才是最重要的通用屬性（Weight 是 Cisco 私有）。</text:span></text:p>
            <text:p text:style-name="P11"><text:span text:style-name="T21">✗ AS-PATH 越短就一定會選那條　→　</text:span><text:span text:style-name="T11">✓ 只有前面的屬性（Local Pref 等）完全相同時，才會比較 AS-PATH。</text:span></text:p>
            <text:p text:style-name="P11"><text:span text:style-name="T21">✗ BGP 會自己計算最短路徑　→　</text:span><text:span text:style-name="T11">✓ BGP 不算距離，OSPF 才做最短路徑計算。</text:span></text:p>
            <text:p text:style-name="P11"><text:span text:style-name="T21">✗ iBGP 比 eBGP 優先　→　</text:span><text:span text:style-name="T11">✓ eBGP 優先於 iBGP（外部路由更可信）。</text:span></text:p>
            <text:p text:style-name="P11"><text:span text:style-name="T21">✗ MED 可以跨不同 AS 互相比較　→　</text:span><text:span text:style-name="T11">✓ MED 只能比較來自同一個 AS 的路由。</text:span></text:p>
          </table:table-cell>
        </table:table-row>
      </table:table>
      <text:h text:style-name="P2" text:outline-level="2"><text:soft-page-break/><text:span text:style-name="T6">七、BGP + NAT + 防火牆 整合流程</text:span></text:h>
      <text:p text:style-name="P44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37">步驟</text:p>
            </table:table-cell>
            <table:table-cell table:style-name="表格96.A1" office:value-type="string">
              <text:p text:style-name="P37">動作</text:p>
            </table:table-cell>
            <table:table-cell table:style-name="表格96.A1" office:value-type="string">
              <text:p text:style-name="P37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9"><text:span text:style-name="T15">🎯 <text:s/></text:span><text:span text:style-name="T24">三層分工，一句話各自記</text:span></text:p>
            <text:p text:style-name="P10"><text:span text:style-name="T25">防火牆 → </text:span><text:span text:style-name="T11">決定「能不能走」｜</text:span><text:span text:style-name="T25">NAT → </text:span><text:span text:style-name="T11">解決「你是誰」｜</text:span><text:span text:style-name="T25">BGP → </text:span><text:span text:style-name="T11">決定「要怎麼走」</text:span></text:p>
            <text:p text:style-name="P4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9"><text:span text:style-name="T15">⚠️ <text:s/></text:span><text:span text:style-name="T20">整合情境的考試陷阱</text:span></text:p>
            <text:p text:style-name="P10"><text:span text:style-name="T21">✗ 封包送不出去 → 一定是 BGP 問題　→　</text:span><text:span text:style-name="T11">✓ 應依序排查：防火牆有沒有擋？NAT 有沒有設？BGP 有沒有路？</text:span></text:p>
            <text:p text:style-name="P11"><text:span text:style-name="T21">✗ 有路但連不到 → 是 BGP 路由問題　→　</text:span><text:span text:style-name="T11">✓ 通常是防火牆或 NAT 問題，不是 BGP。</text:span></text:p>
            <text:p text:style-name="P11"><text:span text:style-name="T21">✗ 走到錯誤的 ISP → 是 NAT 設定問題　→　</text:span><text:span text:style-name="T11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4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"><text:span text:style-name="T15">🌐 <text:s/></text:span><text:span text:style-name="T7">本篇重點</text:span></text:p>
            <text:p text:style-name="P43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5" text:outline-level="2">一、SDN（軟體定義網路）</text:h>
      <text:p text:style-name="P44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9"><text:span text:style-name="T15">🟦 <text:s/></text:span><text:span text:style-name="T24">核心概念（考試最常考）</text:span></text:p>
            <text:p text:style-name="P10"><text:span text:style-name="T25">控制平面（Control Plane）：</text:span><text:span text:style-name="T11">決定資料「怎麼走」——負責路由決策的大腦。</text:span></text:p>
            <text:p text:style-name="P11"><text:span text:style-name="T25">資料平面（Data Plane）：</text:span><text:span text:style-name="T11">負責資料「實際傳送」——執行指令的手腳。</text:span></text:p>
            <text:p text:style-name="P11"><text:span text:style-name="T25">🔑 關鍵：</text:span><text:span text:style-name="T11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37">三層架構</text:p>
          </table:table-cell>
          <table:table-cell table:style-name="表格98.A2" office:value-type="string">
            <text:p text:style-name="P37">說明</text:p>
          </table:table-cell>
          <table:table-cell table:style-name="表格98.A2" office:value-type="string">
            <text:p text:style-name="P37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9"><text:span text:style-name="T15">⚡ <text:s/></text:span><text:span text:style-name="T17">記憶口訣</text:span></text:p>
            <text:p text:style-name="P43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5" text:outline-level="2">二、Load Balancing（負載平衡）</text:h>
      <text:p text:style-name="P44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37">策略</text:p>
            </table:table-cell>
            <table:table-cell table:style-name="表格99.A1" office:value-type="string">
              <text:p text:style-name="P37">說明</text:p>
            </table:table-cell>
            <table:table-cell table:style-name="表格99.A1" office:value-type="string">
              <text:p text:style-name="P37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9"><text:span text:style-name="T15">⚡ <text:s/></text:span><text:span text:style-name="T17">記憶口訣</text:span></text:p>
            <text:p text:style-name="P43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三、CDN（內容傳遞網路）</text:span></text:h>
      <text:p text:style-name="P44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9"><text:span text:style-name="T15">🌍 <text:s/></text:span><text:span text:style-name="T7">CDN 完整流程（一定要記）</text:span></text:p>
            <text:p text:style-name="P43">Step 1 使用者輸入網址（www.example.com）</text:p>
            <text:p text:style-name="P42">Step 2 DNS 解析網址，找到對應 CDN 的 CNAME 記錄</text:p>
            <text:p text:style-name="P42">Step 3 CNAME 將請求轉向 CDN 服務商（如 cdn.example.net）</text:p>
            <text:p text:style-name="P42">Step 4 CDN 根據使用者地理位置，選擇最近的 Edge 伺服器</text:p>
            <text:p text:style-name="P4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34">關鍵名詞</text:p>
          </table:table-cell>
          <table:table-cell table:style-name="表格100.A2" office:value-type="string">
            <text:p text:style-name="P34">說明</text:p>
          </table:table-cell>
        </table:table-row>
        <table:table-row table:style-name="表格100.1">
          <table:table-cell table:style-name="表格100.A3" office:value-type="string">
            <text:p text:style-name="P41">CNAME（別名記錄）</text:p>
          </table:table-cell>
          <table:table-cell table:style-name="表格100.A3" office:value-type="string">
            <text:p text:style-name="P41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41">Edge Server（邊緣伺服器）</text:p>
          </table:table-cell>
          <table:table-cell table:style-name="表格100.A4" office:value-type="string">
            <text:p text:style-name="P41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9"><text:span text:style-name="T15">⚡ <text:s/></text:span><text:span text:style-name="T17">記憶口訣</text:span></text:p>
            <text:p text:style-name="P43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5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37">四大核心特性</text:p>
            </table:table-cell>
            <table:table-cell table:style-name="表格101.A1" office:value-type="string">
              <text:p text:style-name="P37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9"><text:span text:style-name="T15">⚡ <text:s/></text:span><text:span text:style-name="T17">記憶口訣</text:span></text:p>
            <text:p text:style-name="P43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5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37">常見錯誤</text:p>
            </table:table-cell>
            <table:table-cell table:style-name="表格102.A1" office:value-type="string">
              <text:p text:style-name="P37">正確觀念</text:p>
            </table:table-cell>
            <table:table-cell table:style-name="表格102.A1" office:value-type="string">
              <text:p text:style-name="P37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9"><text:span text:style-name="T15">🔗 <text:s/></text:span><text:span text:style-name="T7">使用情境串連（理解記憶）</text:span></text:p>
            <text:p text:style-name="P43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4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"><text:span text:style-name="T15">💡 <text:s/></text:span><text:span text:style-name="T7">核心問題：大家同時說話會怎樣？</text:span></text:p>
            <text:p text:style-name="P43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5" text:outline-level="2">一、WiFi：先聽再講（CSMA/CA）</text:h>
      <text:p text:style-name="P44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34">CSMA/CA 拆解</text:p>
            </table:table-cell>
            <table:table-cell table:style-name="表格104.A1" office:value-type="string">
              <text:p text:style-name="P34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41">Carrier Sense 載波感測</text:p>
          </table:table-cell>
          <table:table-cell table:style-name="表格104.A2" office:value-type="string">
            <text:p text:style-name="P41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41">Multiple Access 多重存取</text:p>
          </table:table-cell>
          <table:table-cell table:style-name="表格104.A3" office:value-type="string">
            <text:p text:style-name="P41">大家共用同一個頻道</text:p>
          </table:table-cell>
        </table:table-row>
        <table:table-row table:style-name="表格104.1">
          <table:table-cell table:style-name="表格104.A2" office:value-type="string">
            <text:p text:style-name="P41">Collision Avoidance 碰撞避免</text:p>
          </table:table-cell>
          <table:table-cell table:style-name="表格104.A2" office:value-type="string">
            <text:p text:style-name="P41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9"><text:span text:style-name="T15">📶 <text:s/></text:span><text:span text:style-name="T9">WiFi 高速基礎</text:span></text:p>
            <text:p text:style-name="P43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9"><text:span text:style-name="T15">🚑 <text:s/></text:span><text:span text:style-name="T17">WiFi 的 QoS：EDCA</text:span></text:p>
            <text:p text:style-name="P43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42">記憶口訣：WiFi = 急診室排隊制度（心臟病/語音視訊優先，小感冒/網頁下載等一下）。</text:p>
          </table:table-cell>
          <table:covered-table-cell/>
        </table:table-row>
      </table:table>
      <text:h text:style-name="P15" text:outline-level="2">二、Bluetooth：老大排班（Master-Slave）</text:h>
      <text:p text:style-name="P44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9"><text:span text:style-name="T15">🔵 <text:s/></text:span><text:span text:style-name="T9">為什麼要排班？</text:span></text:p>
            <text:p text:style-name="P43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4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34">即時語音</text:p>
          </table:table-cell>
          <table:table-cell table:style-name="表格105.A2" office:value-type="string">
            <text:p text:style-name="P34">全名</text:p>
          </table:table-cell>
          <table:table-cell table:style-name="表格105.A2" office:value-type="string">
            <text:p text:style-name="P34">說明</text:p>
          </table:table-cell>
          <table:table-cell table:style-name="表格105.A2" office:value-type="string">
            <text:p text:style-name="P34">用途</text:p>
          </table:table-cell>
        </table:table-row>
        <table:table-row table:style-name="表格105.1">
          <table:table-cell table:style-name="表格105.A3" office:value-type="string">
            <text:p text:style-name="P41">SCO</text:p>
          </table:table-cell>
          <table:table-cell table:style-name="表格105.A3" office:value-type="string">
            <text:p text:style-name="P41">Synchronous Connection-Oriented</text:p>
          </table:table-cell>
          <table:table-cell table:style-name="表格105.A3" office:value-type="string">
            <text:p text:style-name="P41">固定時槽、同步傳輸</text:p>
          </table:table-cell>
          <table:table-cell table:style-name="表格105.A3" office:value-type="string">
            <text:p text:style-name="P41">藍牙耳機通話</text:p>
          </table:table-cell>
        </table:table-row>
        <table:table-row table:style-name="表格105.1">
          <table:table-cell table:style-name="表格105.A4" office:value-type="string">
            <text:p text:style-name="P41">eSCO</text:p>
          </table:table-cell>
          <table:table-cell table:style-name="表格105.A4" office:value-type="string">
            <text:p text:style-name="P41">Enhanced SCO</text:p>
          </table:table-cell>
          <table:table-cell table:style-name="表格105.A4" office:value-type="string">
            <text:p text:style-name="P41">SCO 加強版、可重傳、品質更好</text:p>
          </table:table-cell>
          <table:table-cell table:style-name="表格105.A4" office:value-type="string">
            <text:p text:style-name="P41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9"><text:span text:style-name="T15">🔀 <text:s/></text:span><text:span text:style-name="T9">Bluetooth 抗干擾</text:span></text:p>
            <text:p text:style-name="P43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三、深入理解：時槽（Time Slot）</text:span></text:h>
      <text:p text:style-name="P44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37">三大好處</text:p>
            </table:table-cell>
            <table:table-cell table:style-name="表格106.A1" table:number-columns-spanned="2" office:value-type="string">
              <text:p text:style-name="P37">說明</text:p>
            </table:table-cell>
            <table:covered-table-cell/>
            <table:table-cell table:style-name="表格106.A1" office:value-type="string">
              <text:p text:style-name="P37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33">WiFi 競爭制</text:p>
          </table:table-cell>
          <table:covered-table-cell/>
          <table:table-cell table:style-name="表格106.A1" table:number-columns-spanned="2" office:value-type="string">
            <text:p text:style-name="P33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41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41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9"><text:span text:style-name="T15">🕐 <text:s/></text:span><text:span text:style-name="T24">考試定義（背起來）</text:span></text:p>
            <text:p text:style-name="P43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5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34">項目</text:p>
            </table:table-cell>
            <table:table-cell table:style-name="表格107.A1" office:value-type="string">
              <text:p text:style-name="P34">WiFi</text:p>
            </table:table-cell>
            <table:table-cell table:style-name="表格107.A1" office:value-type="string">
              <text:p text:style-name="P34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1">核心機制</text:p>
          </table:table-cell>
          <table:table-cell table:style-name="表格107.A2" office:value-type="string">
            <text:p text:style-name="P41">CSMA/CA（先偵聽再傳）</text:p>
          </table:table-cell>
          <table:table-cell table:style-name="表格107.A2" office:value-type="string">
            <text:p text:style-name="P41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41">即時語音 / QoS</text:p>
          </table:table-cell>
          <table:table-cell table:style-name="表格107.A3" office:value-type="string">
            <text:p text:style-name="P41">EDCA（QoS 優先）</text:p>
          </table:table-cell>
          <table:table-cell table:style-name="表格107.A3" office:value-type="string">
            <text:p text:style-name="P41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41">速度</text:p>
          </table:table-cell>
          <table:table-cell table:style-name="表格107.A2" office:value-type="string">
            <text:p text:style-name="P41">高速（快）</text:p>
          </table:table-cell>
          <table:table-cell table:style-name="表格107.A2" office:value-type="string">
            <text:p text:style-name="P41">較慢</text:p>
          </table:table-cell>
        </table:table-row>
        <table:table-row table:style-name="表格107.1">
          <table:table-cell table:style-name="表格107.A3" office:value-type="string">
            <text:p text:style-name="P41">耗電量</text:p>
          </table:table-cell>
          <table:table-cell table:style-name="表格107.A3" office:value-type="string">
            <text:p text:style-name="P41">較高</text:p>
          </table:table-cell>
          <table:table-cell table:style-name="表格107.A3" office:value-type="string">
            <text:p text:style-name="P41">低功耗</text:p>
          </table:table-cell>
        </table:table-row>
        <table:table-row table:style-name="表格107.1">
          <table:table-cell table:style-name="表格107.A2" office:value-type="string">
            <text:p text:style-name="P41">傳輸距離</text:p>
          </table:table-cell>
          <table:table-cell table:style-name="表格107.A2" office:value-type="string">
            <text:p text:style-name="P41">較遠（數十~百公尺）</text:p>
          </table:table-cell>
          <table:table-cell table:style-name="表格107.A2" office:value-type="string">
            <text:p text:style-name="P41">較短（約 10 公尺）</text:p>
          </table:table-cell>
        </table:table-row>
        <table:table-row table:style-name="表格107.1">
          <table:table-cell table:style-name="表格107.A3" office:value-type="string">
            <text:p text:style-name="P41">穩定性</text:p>
          </table:table-cell>
          <table:table-cell table:style-name="表格107.A3" office:value-type="string">
            <text:p text:style-name="P41">受干擾影響較大</text:p>
          </table:table-cell>
          <table:table-cell table:style-name="表格107.A3" office:value-type="string">
            <text:p text:style-name="P41">固定時槽非常穩定</text:p>
          </table:table-cell>
        </table:table-row>
        <table:table-row table:style-name="表格107.1">
          <table:table-cell table:style-name="表格107.A2" office:value-type="string">
            <text:p text:style-name="P41">適用場景</text:p>
          </table:table-cell>
          <table:table-cell table:style-name="表格107.A2" office:value-type="string">
            <text:p text:style-name="P41">上網、看影片、大檔下載</text:p>
          </table:table-cell>
          <table:table-cell table:style-name="表格107.A2" office:value-type="string">
            <text:p text:style-name="P41">耳機、滑鼠、鍵盤、通話</text:p>
          </table:table-cell>
        </table:table-row>
      </table:table>
      <text:h text:style-name="P15" text:outline-level="2">五、L2CAP：藍牙的資料管理員</text:h>
      <text:p text:style-name="P44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37">三種邏輯通道</text:p>
            </table:table-cell>
            <table:table-cell table:style-name="表格108.A1" table:number-columns-spanned="2" office:value-type="string">
              <text:p text:style-name="P37">特性</text:p>
            </table:table-cell>
            <table:covered-table-cell/>
            <table:table-cell table:style-name="表格108.A1" office:value-type="string">
              <text:p text:style-name="P37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34">OSI 層</text:p>
          </table:table-cell>
          <table:covered-table-cell/>
          <table:table-cell table:style-name="表格108.A1" table:number-columns-spanned="2" office:value-type="string">
            <text:p text:style-name="P34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1">應用層 Application</text:p>
          </table:table-cell>
          <table:covered-table-cell/>
          <table:table-cell table:style-name="表格108.A2" table:number-columns-spanned="2" office:value-type="string">
            <text:p text:style-name="P41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1">傳輸層 Transport</text:p>
          </table:table-cell>
          <table:covered-table-cell/>
          <table:table-cell table:style-name="表格108.A3" table:number-columns-spanned="2" office:value-type="string">
            <text:p text:style-name="P41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41">網路層 Network</text:p>
          </table:table-cell>
          <table:covered-table-cell/>
          <table:table-cell table:style-name="表格108.A2" table:number-columns-spanned="2" office:value-type="string">
            <text:p text:style-name="P41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1">資料鏈結層 Data Link</text:p>
          </table:table-cell>
          <table:covered-table-cell/>
          <table:table-cell table:style-name="表格108.A3" table:number-columns-spanned="2" office:value-type="string">
            <text:p text:style-name="P41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1">實體層 Physical</text:p>
          </table:table-cell>
          <table:covered-table-cell/>
          <table:table-cell table:style-name="表格108.A2" table:number-columns-spanned="2" office:value-type="string">
            <text:p text:style-name="P41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9"><text:span text:style-name="T15">📐 <text:s/></text:span><text:span text:style-name="T20">重要</text:span></text:p>
            <text:p text:style-name="P43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5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0"><text:span text:style-name="T12">WiFi 用什麼避免碰撞？　</text:span><text:span text:style-name="T11">✗ CSMA/CD（有線乙太網路機制）→ ✓ CSMA/CA（WiFi 用「避免」碰撞，不是「偵測」）。口訣：有線 Ethernet = CD（Detect），無線 WiFi = CA（Avoid）。</text:span></text:p>
            <text:p text:style-name="P11"><text:span text:style-name="T12">Bluetooth 是競爭制還是排程制？　</text:span><text:span text:style-name="T11">✓ 排程制（Master-Slave，老大安排時槽），不是競爭制。</text:span></text:p>
            <text:p text:style-name="P11"><text:span text:style-name="T12">藍牙即時語音用什麼？　</text:span><text:span text:style-name="T11">✓ SCO（同步連線）或 eSCO（加強版，可重傳）。</text:span></text:p>
            <text:p text:style-name="P11"><text:span text:style-name="T12">L2CAP 控制管理用哪個通道？　</text:span><text:span text:style-name="T11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9"><text:span text:style-name="T15">⏱ <text:s/></text:span><text:span text:style-name="T24">考前 30 秒濃縮</text:span></text:p>
            <text:p text:style-name="P43">WiFi＝搶頻道 · BT＝排班 · 時槽＝時間格子 · SCO＝語音 · L2CAP＝三通道（位於 Data Link 層）。</text:p>
          </table:table-cell>
        </table:table-row>
      </table:table>
      <text:h text:style-name="P14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9"><text:span text:style-name="T15">🛡️ <text:s/></text:span><text:span text:style-name="T7">本篇地圖</text:span></text:p>
            <text:p text:style-name="P43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5" text:outline-level="2">壹、資安與網路設備：FW · WAF · NGFW · DMZ · IOC · Proxy</text:h>
      <text:p text:style-name="P44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34">名詞</text:p>
            </table:table-cell>
            <table:table-cell table:style-name="表格111.A1" office:value-type="string">
              <text:p text:style-name="P34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1">FW</text:p>
          </table:table-cell>
          <table:table-cell table:style-name="表格111.A2" office:value-type="string">
            <text:p text:style-name="P41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41">WAF</text:p>
          </table:table-cell>
          <table:table-cell table:style-name="表格111.A3" office:value-type="string">
            <text:p text:style-name="P41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41">NGFW</text:p>
          </table:table-cell>
          <table:table-cell table:style-name="表格111.A2" office:value-type="string">
            <text:p text:style-name="P41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41">DMZ</text:p>
          </table:table-cell>
          <table:table-cell table:style-name="表格111.A3" office:value-type="string">
            <text:p text:style-name="P41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41">IOC</text:p>
          </table:table-cell>
          <table:table-cell table:style-name="表格111.A2" office:value-type="string">
            <text:p text:style-name="P41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41">Proxy</text:p>
          </table:table-cell>
          <table:table-cell table:style-name="表格111.A3" office:value-type="string">
            <text:p text:style-name="P41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41">Reverse Proxy</text:p>
          </table:table-cell>
          <table:table-cell table:style-name="表格111.A2" office:value-type="string">
            <text:p text:style-name="P41">反向代理，幫「伺服器（Server）」負載平衡、隱藏主機</text:p>
          </table:table-cell>
        </table:table-row>
      </table:table>
      <text:h text:style-name="P3" text:outline-level="3"><text:span text:style-name="T16">▍</text:span><text:span text:style-name="T17"> 防火牆 Firewall（FW）</text:span></text:h>
      <text:p text:style-name="P44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"><text:span text:style-name="T15">⚠️ <text:s/></text:span><text:span text:style-name="T20">缺點</text:span></text:p>
            <text:p text:style-name="P43">FW 只看外面，不看封包裡面的內容，無法防止應用層攻擊（如 SQL Injection）。</text:p>
          </table:table-cell>
        </table:table-row>
      </table:table>
      <text:h text:style-name="P3" text:outline-level="3"><text:span text:style-name="T16">▍</text:span><text:span text:style-name="T17"> 網站應用防火牆 WAF</text:span></text:h>
      <text:p text:style-name="P44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34">比較項目</text:p>
            </table:table-cell>
            <table:table-cell table:style-name="表格113.A1" office:value-type="string">
              <text:p text:style-name="P34">FW</text:p>
            </table:table-cell>
            <table:table-cell table:style-name="表格113.A1" office:value-type="string">
              <text:p text:style-name="P34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41">檢查範圍</text:p>
          </table:table-cell>
          <table:table-cell table:style-name="表格113.A2" office:value-type="string">
            <text:p text:style-name="P41">封包外面（IP/Port）</text:p>
          </table:table-cell>
          <table:table-cell table:style-name="表格113.A2" office:value-type="string">
            <text:p text:style-name="P41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41">OSI 分層</text:p>
          </table:table-cell>
          <table:table-cell table:style-name="表格113.A3" office:value-type="string">
            <text:p text:style-name="P41">L3 / L4</text:p>
          </table:table-cell>
          <table:table-cell table:style-name="表格113.A3" office:value-type="string">
            <text:p text:style-name="P41">L7（應用層）</text:p>
          </table:table-cell>
        </table:table-row>
        <table:table-row table:style-name="表格113.1">
          <table:table-cell table:style-name="表格113.A2" office:value-type="string">
            <text:p text:style-name="P41">防禦 SQL Injection</text:p>
          </table:table-cell>
          <table:table-cell table:style-name="表格113.A2" office:value-type="string">
            <text:p text:style-name="P41">✗ 無法</text:p>
          </table:table-cell>
          <table:table-cell table:style-name="表格113.A2" office:value-type="string">
            <text:p text:style-name="P41">○ 可以</text:p>
          </table:table-cell>
        </table:table-row>
        <table:table-row table:style-name="表格113.1">
          <table:table-cell table:style-name="表格113.A3" office:value-type="string">
            <text:p text:style-name="P41">防禦 XSS</text:p>
          </table:table-cell>
          <table:table-cell table:style-name="表格113.A3" office:value-type="string">
            <text:p text:style-name="P41">✗ 無法</text:p>
          </table:table-cell>
          <table:table-cell table:style-name="表格113.A3" office:value-type="string">
            <text:p text:style-name="P41">○ 可以</text:p>
          </table:table-cell>
        </table:table-row>
      </table:table>
      <text:h text:style-name="P3" text:outline-level="3"><text:span text:style-name="T16">▍</text:span><text:span text:style-name="T17"> 次世代防火牆 NGFW</text:span></text:h>
      <text:p text:style-name="P44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33">能力</text:p>
            </table:table-cell>
            <table:table-cell table:style-name="表格114.A1" office:value-type="string">
              <text:p text:style-name="P33">FW</text:p>
            </table:table-cell>
            <table:table-cell table:style-name="表格114.A1" office:value-type="string">
              <text:p text:style-name="P33">WAF</text:p>
            </table:table-cell>
            <table:table-cell table:style-name="表格114.A1" office:value-type="string">
              <text:p text:style-name="P33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41">IP/Port 過濾</text:p>
          </table:table-cell>
          <table:table-cell table:style-name="表格114.A2" office:value-type="string">
            <text:p text:style-name="P55">○</text:p>
          </table:table-cell>
          <table:table-cell table:style-name="表格114.A2" office:value-type="string">
            <text:p text:style-name="P55">○</text:p>
          </table:table-cell>
          <table:table-cell table:style-name="表格114.A2" office:value-type="string">
            <text:p text:style-name="P55">○</text:p>
          </table:table-cell>
        </table:table-row>
        <table:table-row table:style-name="表格114.1">
          <table:table-cell table:style-name="表格114.A3" office:value-type="string">
            <text:p text:style-name="P41">HTTP 內容檢查</text:p>
          </table:table-cell>
          <table:table-cell table:style-name="表格114.A3" office:value-type="string">
            <text:p text:style-name="P54">✗</text:p>
          </table:table-cell>
          <table:table-cell table:style-name="表格114.A3" office:value-type="string">
            <text:p text:style-name="P55">○</text:p>
          </table:table-cell>
          <table:table-cell table:style-name="表格114.A3" office:value-type="string">
            <text:p text:style-name="P55">○</text:p>
          </table:table-cell>
        </table:table-row>
        <table:table-row table:style-name="表格114.1">
          <table:table-cell table:style-name="表格114.A2" office:value-type="string">
            <text:p text:style-name="P41">DPI 深度檢查</text:p>
          </table:table-cell>
          <table:table-cell table:style-name="表格114.A2" office:value-type="string">
            <text:p text:style-name="P54">✗</text:p>
          </table:table-cell>
          <table:table-cell table:style-name="表格114.A2" office:value-type="string">
            <text:p text:style-name="P54">✗</text:p>
          </table:table-cell>
          <table:table-cell table:style-name="表格114.A2" office:value-type="string">
            <text:p text:style-name="P55">○</text:p>
          </table:table-cell>
        </table:table-row>
        <table:table-row table:style-name="表格114.1">
          <table:table-cell table:style-name="表格114.A3" office:value-type="string">
            <text:p text:style-name="P41">App 識別</text:p>
          </table:table-cell>
          <table:table-cell table:style-name="表格114.A3" office:value-type="string">
            <text:p text:style-name="P54">✗</text:p>
          </table:table-cell>
          <table:table-cell table:style-name="表格114.A3" office:value-type="string">
            <text:p text:style-name="P54">✗</text:p>
          </table:table-cell>
          <table:table-cell table:style-name="表格114.A3" office:value-type="string">
            <text:p text:style-name="P55">○</text:p>
          </table:table-cell>
        </table:table-row>
        <table:table-row table:style-name="表格114.1">
          <table:table-cell table:style-name="表格114.A2" office:value-type="string">
            <text:p text:style-name="P41">IPS 入侵防禦</text:p>
          </table:table-cell>
          <table:table-cell table:style-name="表格114.A2" office:value-type="string">
            <text:p text:style-name="P54">✗</text:p>
          </table:table-cell>
          <table:table-cell table:style-name="表格114.A2" office:value-type="string">
            <text:p text:style-name="P54">✗</text:p>
          </table:table-cell>
          <table:table-cell table:style-name="表格114.A2" office:value-type="string">
            <text:p text:style-name="P55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9"><text:span text:style-name="T15">💡 <text:s/></text:span><text:span text:style-name="T17">實務說明</text:span></text:p>
            <text:p text:style-name="P43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DMZ（非軍事區 / 隔離區）</text:span></text:h>
      <text:p text:style-name="P44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9"><text:span text:style-name="T15">⚠️ <text:s/></text:span><text:span text:style-name="T20">考試陷阱</text:span></text:p>
            <text:p text:style-name="P43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3" text:outline-level="3"><text:span text:style-name="T16">▍</text:span><text:span text:style-name="T17"> IOC（入侵指標）</text:span></text:h>
      <text:p text:style-name="P44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9"><text:span text:style-name="T15">🎯 <text:s/></text:span><text:span text:style-name="T24">核心觀念</text:span></text:p>
            <text:p text:style-name="P43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38">口訣</text:p>
          </table:table-cell>
          <table:table-cell table:style-name="表格116.A2" office:value-type="string">
            <text:p text:style-name="P38">IOC 類型</text:p>
          </table:table-cell>
          <table:table-cell table:style-name="表格116.A2" office:value-type="string">
            <text:p text:style-name="P38">白話說明</text:p>
          </table:table-cell>
          <table:table-cell table:style-name="表格116.A2" office:value-type="string">
            <text:p text:style-name="P38">對應防禦工具</text:p>
          </table:table-cell>
        </table:table-row>
        <table:table-row table:style-name="表格116.1">
          <table:table-cell table:style-name="表格116.A3" office:value-type="string">
            <text:p text:style-name="P57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57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57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57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9"><text:span text:style-name="T15">▸ <text:s/></text:span><text:span text:style-name="T7">攻擊全流程（IOC 出現在哪裡？）</text:span></text:p>
            <text:p text:style-name="P43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9"><text:span text:style-name="T15">⚡ <text:s/></text:span><text:span text:style-name="T17">10 秒口訣速記</text:span></text:p>
            <text:p text:style-name="P43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3" text:outline-level="3"><text:soft-page-break/><text:span text:style-name="T16">▍</text:span><text:span text:style-name="T17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33">🧍 Proxy（正向代理）— 幫 Client</text:p>
            </table:table-cell>
            <table:table-cell table:style-name="表格117.A1" office:value-type="string">
              <text:p text:style-name="P33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41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41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3" text:outline-level="3"><text:span text:style-name="T16">▍</text:span><text:span text:style-name="T17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9"><text:span text:style-name="T15">🚧 <text:s/></text:span><text:span text:style-name="T7">封包闖關順序</text:span></text:p>
            <text:p text:style-name="P43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4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9"><text:span text:style-name="T15">🔑 <text:s/></text:span><text:span text:style-name="T24">萬用口訣</text:span></text:p>
            <text:p text:style-name="P43">FW 封外、WAF 看內、NGFW 最強、DMZ 隔離、IOC 壞人、Proxy 幫客、Reverse 幫服。</text:p>
          </table:table-cell>
        </table:table-row>
      </table:table>
      <text:h text:style-name="P15" text:outline-level="2">貳、SQL Injection × Zero-Day × 防禦機制</text:h>
      <text:h text:style-name="P3" text:outline-level="3"><text:span text:style-name="T16">▍</text:span><text:span text:style-name="T17"> SQL Injection（SQL 注入攻擊）</text:span></text:h>
      <text:p text:style-name="P44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9"><text:span text:style-name="T15">💉 <text:s/></text:span><text:span text:style-name="T20">什麼是 SQL Injection？</text:span></text:p>
            <text:p text:style-name="P10"><text:span text:style-name="T19">核心一句話：</text:span><text:span text:style-name="T11">把原本只是「資料」的輸入，惡意改造成可執行的「SQL 指令」。</text:span></text:p>
            <text:p text:style-name="P42">駭客在帳號欄位輸入：' OR 1=1 --，拼入後變成：…WHERE account='' OR 1=1 -- ' AND password='1234'。</text:p>
            <text:p text:style-name="P4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33">❌ 攻擊成功的原因</text:p>
          </table:table-cell>
          <table:covered-table-cell/>
          <table:table-cell table:style-name="表格119.A2" office:value-type="string">
            <text:p text:style-name="P33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41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41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9"><text:span text:style-name="T15">🛡️ <text:s/></text:span><text:span text:style-name="T22">防禦核心：Prepared Statement（預備語句）</text:span></text:p>
            <text:p text:style-name="P10"><text:span text:style-name="T23">概念：</text:span><text:span text:style-name="T11">先把 SQL 骨架「鎖死」，使用者只能填入資料，完全無法修改 SQL 結構。</text:span></text:p>
            <text:p text:style-name="P42">❌ 危險寫法（字串拼接）：sql = "SELECT * FROM users WHERE id='" + input + "'"；輸入 ' OR 1=1 -- → 結構被竄改。</text:p>
            <text:p text:style-name="P4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37">輔助防禦手段</text:p>
          </table:table-cell>
          <table:table-cell table:style-name="表格119.A2" table:number-columns-spanned="2" office:value-type="string">
            <text:p text:style-name="P37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3" text:outline-level="3"><text:soft-page-break/><text:span text:style-name="T16">▍</text:span><text:span text:style-name="T17"> Zero-Day Attack（零時差攻擊）</text:span></text:h>
      <text:p text:style-name="P44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33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33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41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41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37">防禦層</text:p>
          </table:table-cell>
          <table:table-cell table:style-name="表格120.A1" office:value-type="string">
            <text:p text:style-name="P37">手段</text:p>
          </table:table-cell>
          <table:table-cell table:style-name="表格120.A1" table:number-columns-spanned="2" office:value-type="string">
            <text:p text:style-name="P37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3" text:outline-level="3"><text:span text:style-name="T16">▍</text:span><text:span text:style-name="T17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37">機制</text:p>
            </table:table-cell>
            <table:table-cell table:style-name="表格121.A1" office:value-type="string">
              <text:p text:style-name="P37">白話比喻</text:p>
            </table:table-cell>
            <table:table-cell table:style-name="表格121.A1" office:value-type="string">
              <text:p text:style-name="P37">主要功能</text:p>
            </table:table-cell>
            <table:table-cell table:style-name="表格121.A1" office:value-type="string">
              <text:p text:style-name="P37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9"><text:span text:style-name="T15">⚠️ <text:s/></text:span><text:span text:style-name="T20">考試常考</text:span></text:p>
            <text:p text:style-name="P43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38">Step</text:p>
            </table:table-cell>
            <table:table-cell table:style-name="表格122.A1" office:value-type="string">
              <text:p text:style-name="P38">階段</text:p>
            </table:table-cell>
            <table:table-cell table:style-name="表格122.A1" office:value-type="string">
              <text:p text:style-name="P38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9"><text:span text:style-name="T15">⚠️ <text:s/></text:span><text:span text:style-name="T20">公職考試常見陷阱</text:span></text:p>
            <text:p text:style-name="P10"><text:span text:style-name="T12">「輸入驗證」就足夠防 SQLi？　</text:span><text:span text:style-name="T11">❌ 不夠，過濾特殊字元有被繞過風險。✅ 真正防禦是 Prepared Statement。</text:span></text:p>
            <text:p text:style-name="P11"><text:span text:style-name="T12">WAF 可以完全防止所有攻擊？　</text:span><text:span text:style-name="T11">❌ 不能，WAF 是輔助防禦，新型攻擊可能繞過。✅ WAF + Prepared </text:span><text:soft-page-break/><text:span text:style-name="T11">Statement 才是正道。</text:span></text:p>
            <text:p text:style-name="P11"><text:span text:style-name="T12">Zero-Day 最危險是它「很強大」？　</text:span><text:span text:style-name="T11">❌ 不是，最危險的是「還沒人知道」，防毒無法識別。</text:span></text:p>
            <text:p text:style-name="P11"><text:span text:style-name="T12">IDS 可以阻擋攻擊？　</text:span><text:span text:style-name="T11">❌ 不行，IDS 只能偵測警報，能阻擋的是 IPS。</text:span></text:p>
          </table:table-cell>
          <table:covered-table-cell/>
          <table:covered-table-cell/>
        </table:table-row>
      </table:table>
      <text:h text:style-name="P15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34">工具</text:p>
            </table:table-cell>
            <table:table-cell table:style-name="表格123.A1" office:value-type="string">
              <text:p text:style-name="P34">角色</text:p>
            </table:table-cell>
            <table:table-cell table:style-name="表格123.A1" office:value-type="string">
              <text:p text:style-name="P34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41">🚪 Firewall</text:p>
          </table:table-cell>
          <table:table-cell table:style-name="表格123.A2" office:value-type="string">
            <text:p text:style-name="P41">大門警衛</text:p>
          </table:table-cell>
          <table:table-cell table:style-name="表格123.A2" office:value-type="string">
            <text:p text:style-name="P41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41">👀 IDS</text:p>
          </table:table-cell>
          <table:table-cell table:style-name="表格123.A3" office:value-type="string">
            <text:p text:style-name="P41">監視器（只看）</text:p>
          </table:table-cell>
          <table:table-cell table:style-name="表格123.A3" office:value-type="string">
            <text:p text:style-name="P41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41">🚨 IPS</text:p>
          </table:table-cell>
          <table:table-cell table:style-name="表格123.A2" office:value-type="string">
            <text:p text:style-name="P41">監視器＋警衛</text:p>
          </table:table-cell>
          <table:table-cell table:style-name="表格123.A2" office:value-type="string">
            <text:p text:style-name="P41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41">📊 SNMP</text:p>
          </table:table-cell>
          <table:table-cell table:style-name="表格123.A3" office:value-type="string">
            <text:p text:style-name="P41">管理室</text:p>
          </table:table-cell>
          <table:table-cell table:style-name="表格123.A3" office:value-type="string">
            <text:p text:style-name="P41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41">📶 ICMP</text:p>
          </table:table-cell>
          <table:table-cell table:style-name="表格123.A2" office:value-type="string">
            <text:p text:style-name="P41">網路測試員</text:p>
          </table:table-cell>
          <table:table-cell table:style-name="表格123.A2" office:value-type="string">
            <text:p text:style-name="P41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9"><text:span text:style-name="T15">⚡ <text:s/></text:span><text:span text:style-name="T17">核心記憶口訣</text:span></text:p>
            <text:p text:style-name="P43">Firewall 擋入口 · IDS 只看 · IPS 看＋擋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6"/>
            </table:table-cell>
            <table:table-cell table:style-name="表格124.A1" office:value-type="string">
              <text:p text:style-name="P34">HIDS</text:p>
            </table:table-cell>
            <table:table-cell table:style-name="表格124.A1" office:value-type="string">
              <text:p text:style-name="P34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41">安裝位置</text:p>
          </table:table-cell>
          <table:table-cell table:style-name="表格124.A2" office:value-type="string">
            <text:p text:style-name="P41">裝在主機（電腦）內部</text:p>
          </table:table-cell>
          <table:table-cell table:style-name="表格124.A2" office:value-type="string">
            <text:p text:style-name="P41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41">監控內容</text:p>
          </table:table-cell>
          <table:table-cell table:style-name="表格124.A3" office:value-type="string">
            <text:p text:style-name="P41">系統 Log、使用者行為</text:p>
          </table:table-cell>
          <table:table-cell table:style-name="表格124.A3" office:value-type="string">
            <text:p text:style-name="P41">網路封包與流量</text:p>
          </table:table-cell>
        </table:table-row>
        <table:table-row table:style-name="表格124.1">
          <table:table-cell table:style-name="表格124.A2" office:value-type="string">
            <text:p text:style-name="P41">比喻</text:p>
          </table:table-cell>
          <table:table-cell table:style-name="表格124.A2" office:value-type="string">
            <text:p text:style-name="P41">電腦裡的監視器</text:p>
          </table:table-cell>
          <table:table-cell table:style-name="表格124.A2" office:value-type="string">
            <text:p text:style-name="P41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9"><text:span text:style-name="T15">⚡ <text:s/></text:span><text:span text:style-name="T17">一句話秒懂</text:span></text:p>
            <text:p text:style-name="P43">HIDS 看主機（Log）· NIDS 看網路（封包）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6"/>
            </table:table-cell>
            <table:table-cell table:style-name="表格125.A1" office:value-type="string">
              <text:p text:style-name="P34">SNMP</text:p>
            </table:table-cell>
            <table:table-cell table:style-name="表格125.A1" office:value-type="string">
              <text:p text:style-name="P34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41">用途</text:p>
          </table:table-cell>
          <table:table-cell table:style-name="表格125.A2" office:value-type="string">
            <text:p text:style-name="P41">管理與監控網路設備</text:p>
          </table:table-cell>
          <table:table-cell table:style-name="表格125.A2" office:value-type="string">
            <text:p text:style-name="P41">測試網路是否連通</text:p>
          </table:table-cell>
        </table:table-row>
        <table:table-row table:style-name="表格125.1">
          <table:table-cell table:style-name="表格125.A3" office:value-type="string">
            <text:p text:style-name="P41">OSI 層</text:p>
          </table:table-cell>
          <table:table-cell table:style-name="表格125.A3" office:value-type="string">
            <text:p text:style-name="P41">Application Layer（應用層）</text:p>
          </table:table-cell>
          <table:table-cell table:style-name="表格125.A3" office:value-type="string">
            <text:p text:style-name="P41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41">傳輸協定</text:p>
          </table:table-cell>
          <table:table-cell table:style-name="表格125.A2" office:value-type="string">
            <text:p text:style-name="P41">UDP</text:p>
          </table:table-cell>
          <table:table-cell table:style-name="表格125.A2" office:value-type="string">
            <text:p text:style-name="P41">IP 的附屬協定</text:p>
          </table:table-cell>
        </table:table-row>
        <table:table-row table:style-name="表格125.1">
          <table:table-cell table:style-name="表格125.A3" office:value-type="string">
            <text:p text:style-name="P41">常見功能</text:p>
          </table:table-cell>
          <table:table-cell table:style-name="表格125.A3" office:value-type="string">
            <text:p text:style-name="P41">看 CPU 使用率、設備狀態、Trap 警報</text:p>
          </table:table-cell>
          <table:table-cell table:style-name="表格125.A3" office:value-type="string">
            <text:p text:style-name="P41">Ping、Traceroute</text:p>
          </table:table-cell>
        </table:table-row>
        <table:table-row table:style-name="表格125.1">
          <table:table-cell table:style-name="表格125.A2" office:value-type="string">
            <text:p text:style-name="P41">比喻</text:p>
          </table:table-cell>
          <table:table-cell table:style-name="表格125.A2" office:value-type="string">
            <text:p text:style-name="P41">大樓管理室的監控系統</text:p>
          </table:table-cell>
          <table:table-cell table:style-name="表格125.A2" office:value-type="string">
            <text:p text:style-name="P41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9"><text:span text:style-name="T15">⚡ <text:s/></text:span><text:span text:style-name="T17">核心差異</text:span></text:p>
            <text:p text:style-name="P43">SNMP 管理設備（應用層 / UDP）· ICMP 診斷網路（網路層）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9"><text:span text:style-name="T15">🗺 <text:s/></text:span><text:span text:style-name="T7">工具各自負責的位置</text:span></text:p>
            <text:p text:style-name="P10"><text:span text:style-name="T11">🌐 外部攻擊者 → 🚪 Firewall（第一道防線，依 IP/Port 規則過濾）→ 📡 NIDS / IPS（網路中間監控：IDS 分析封包發現異常只發警報；IPS 分析封包發現異常直接阻擋）→ 🖥 主機 / Server → 👀 </text:span><text:soft-page-break/><text:span text:style-name="T11">HIDS（主機內部最後防線，監控系統 Log 與使用者行為）。旁側：📊 SNMP 監控全域設備狀態；📶 ICMP（Ping/Traceroute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9"><text:span text:style-name="T15">⚠️ <text:s/></text:span><text:span text:style-name="T20">考試陷阱整理</text:span></text:p>
            <text:p text:style-name="P10"><text:span text:style-name="T21">① IDS 可以自動阻擋攻擊　→　</text:span><text:span text:style-name="T11">✓ IDS 只偵測＋發警報，IPS 才會阻擋。</text:span></text:p>
            <text:p text:style-name="P11"><text:span text:style-name="T21">② Firewall 可以偵測異常行為　→　</text:span><text:span text:style-name="T11">✓ Firewall 依規則（IP/Port）過濾，不做行為分析。</text:span></text:p>
            <text:p text:style-name="P11"><text:span text:style-name="T21">③ HIDS 用來監控網路封包　→　</text:span><text:span text:style-name="T11">✓ HIDS 監控主機 Log 與系統行為，封包是 NIDS 的工作。</text:span></text:p>
            <text:p text:style-name="P11"><text:span text:style-name="T21">④ ICMP 用來監控設備狀態　→　</text:span><text:span text:style-name="T11">✓ ICMP 只診斷網路（Ping），監控設備是 SNMP。</text:span></text:p>
            <text:p text:style-name="P11"><text:span text:style-name="T21">⑤ ICMP 屬於 Application Layer　→　</text:span><text:span text:style-name="T11">✓ ICMP 屬 Network Layer，SNMP 才是 Application Layer。</text:span></text:p>
            <text:p text:style-name="P11"><text:span text:style-name="T21">⑥ IPS 就是防火牆　→　</text:span><text:span text:style-name="T11">✓ Firewall 靜態過濾（規則），IPS 動態偵測行為後阻擋，兩者不同。</text:span></text:p>
          </table:table-cell>
        </table:table-row>
      </table:table>
      <text:h text:style-name="P3" text:outline-level="3"><text:span text:style-name="T16">▍</text:span><text:span text:style-name="T17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39">題目</text:p>
            </table:table-cell>
            <table:table-cell table:style-name="表格127.A1" office:value-type="string">
              <text:p text:style-name="P39">答案</text:p>
            </table:table-cell>
            <table:table-cell table:style-name="表格127.A1" office:value-type="string">
              <text:p text:style-name="P39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47">Q1 何者負責「過濾進出網路流量」？</text:p>
          </table:table-cell>
          <table:table-cell table:style-name="表格127.A2" office:value-type="string">
            <text:p text:style-name="P47">Firewall</text:p>
          </table:table-cell>
          <table:table-cell table:style-name="表格127.A2" office:value-type="string">
            <text:p text:style-name="P47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47">Q2 IDS 的主要功能為何？</text:p>
          </table:table-cell>
          <table:table-cell table:style-name="表格127.A3" office:value-type="string">
            <text:p text:style-name="P47">偵測並發出警報</text:p>
          </table:table-cell>
          <table:table-cell table:style-name="表格127.A3" office:value-type="string">
            <text:p text:style-name="P47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47">Q3 IPS 與 IDS 最大差別？</text:p>
          </table:table-cell>
          <table:table-cell table:style-name="表格127.A2" office:value-type="string">
            <text:p text:style-name="P47">IPS 會阻擋，IDS 不會</text:p>
          </table:table-cell>
          <table:table-cell table:style-name="表格127.A2" office:value-type="string">
            <text:p text:style-name="P47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47">Q4 何者屬「主機型入侵偵測」？</text:p>
          </table:table-cell>
          <table:table-cell table:style-name="表格127.A3" office:value-type="string">
            <text:p text:style-name="P47">HIDS</text:p>
          </table:table-cell>
          <table:table-cell table:style-name="表格127.A3" office:value-type="string">
            <text:p text:style-name="P47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47">Q5 NIDS 主要監控什麼？</text:p>
          </table:table-cell>
          <table:table-cell table:style-name="表格127.A2" office:value-type="string">
            <text:p text:style-name="P47">網路封包</text:p>
          </table:table-cell>
          <table:table-cell table:style-name="表格127.A2" office:value-type="string">
            <text:p text:style-name="P47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47">Q6 SNMP 的主要用途？</text:p>
          </table:table-cell>
          <table:table-cell table:style-name="表格127.A3" office:value-type="string">
            <text:p text:style-name="P47">管理網路設備</text:p>
          </table:table-cell>
          <table:table-cell table:style-name="表格127.A3" office:value-type="string">
            <text:p text:style-name="P47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47">Q7 ICMP 常用於哪種工具？</text:p>
          </table:table-cell>
          <table:table-cell table:style-name="表格127.A2" office:value-type="string">
            <text:p text:style-name="P47">Ping</text:p>
          </table:table-cell>
          <table:table-cell table:style-name="表格127.A2" office:value-type="string">
            <text:p text:style-name="P47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47">Q8 ICMP 屬 OSI 哪一層？</text:p>
          </table:table-cell>
          <table:table-cell table:style-name="表格127.A3" office:value-type="string">
            <text:p text:style-name="P47">Network Layer</text:p>
          </table:table-cell>
          <table:table-cell table:style-name="表格127.A3" office:value-type="string">
            <text:p text:style-name="P47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47">Q9 何者用 UDP 且屬應用層？</text:p>
          </table:table-cell>
          <table:table-cell table:style-name="表格127.A2" office:value-type="string">
            <text:p text:style-name="P47">SNMP</text:p>
          </table:table-cell>
          <table:table-cell table:style-name="表格127.A2" office:value-type="string">
            <text:p text:style-name="P47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47">Q10 下列何者正確？</text:p>
          </table:table-cell>
          <table:table-cell table:style-name="表格127.A3" office:value-type="string">
            <text:p text:style-name="P47">SNMP 用於設備管理</text:p>
          </table:table-cell>
          <table:table-cell table:style-name="表格127.A3" office:value-type="string">
            <text:p text:style-name="P47">IDS 不阻擋；Firewall 不做行為分析；ICMP 只做網路診斷。</text:p>
          </table:table-cell>
        </table:table-row>
      </table:table>
      <text:h text:style-name="P15" text:outline-level="2">肆、企業資訊安全：預防 → 偵測 → 復原</text:h>
      <text:p text:style-name="P44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37">三大核心</text:p>
            </table:table-cell>
            <table:table-cell table:style-name="表格128.A1" office:value-type="string">
              <text:p text:style-name="P37">目標</text:p>
            </table:table-cell>
            <table:table-cell table:style-name="表格128.A1" office:value-type="string">
              <text:p text:style-name="P37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3" text:outline-level="3"><text:span text:style-name="T16">▍</text:span><text:span text:style-name="T17"> 事前預防：MFA（多因素驗證）</text:span></text:h>
      <text:p text:style-name="P44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3" text:outline-level="3"><text:soft-page-break/><text:span text:style-name="T16">▍</text:span><text:span text:style-name="T17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37">工具</text:p>
            </table:table-cell>
            <table:table-cell table:style-name="表格129.A1" office:value-type="string">
              <text:p text:style-name="P37">全名 / 說明</text:p>
            </table:table-cell>
            <table:table-cell table:style-name="表格129.A1" office:value-type="string">
              <text:p text:style-name="P37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9"><text:span text:style-name="T15">🏠 <text:s/></text:span><text:span text:style-name="T7">比喻幫你秒懂（公司＝大樓）</text:span></text:p>
            <text:p text:style-name="P43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事後復原：備份、RTO / RPO、BCP</text:span></text:h>
      <text:p text:style-name="P44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37">指標</text:p>
            </table:table-cell>
            <table:table-cell table:style-name="表格130.A1" office:value-type="string">
              <text:p text:style-name="P37">全名</text:p>
            </table:table-cell>
            <table:table-cell table:style-name="表格130.A1" office:value-type="string">
              <text:p text:style-name="P37">問什麼</text:p>
            </table:table-cell>
            <table:table-cell table:style-name="表格130.A1" office:value-type="string">
              <text:p text:style-name="P37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9"><text:span text:style-name="T15">⏱ <text:s/></text:span><text:span text:style-name="T24">一句話記憶法</text:span></text:p>
            <text:p text:style-name="P10"><text:span text:style-name="T25">RTO = 停機時間</text:span><text:span text:style-name="T11">（能停多久？）　</text:span><text:span text:style-name="T25">RPO = 資料損失量</text:span><text:span text:style-name="T11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9"><text:span text:style-name="T15">🏢 <text:s/></text:span><text:span text:style-name="T7">BCP：公司炸掉了還能繼續運作嗎？</text:span></text:p>
            <text:p text:style-name="P43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SSDLC：軟體開發的每個階段都加入資安</text:span></text:h>
      <text:p text:style-name="P44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37">階段</text:p>
            </table:table-cell>
            <table:table-cell table:style-name="表格131.A1" office:value-type="string">
              <text:p text:style-name="P37">英文</text:p>
            </table:table-cell>
            <table:table-cell table:style-name="表格131.A1" office:value-type="string">
              <text:p text:style-name="P37">做什麼</text:p>
            </table:table-cell>
            <table:table-cell table:style-name="表格131.A1" office:value-type="string">
              <text:p text:style-name="P37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9"><text:span text:style-name="T15">🔑 <text:s/></text:span><text:span text:style-name="T17">SSDLC 核心</text:span></text:p>
            <text:p text:style-name="P43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ISO 27001：用制度管理資安</text:span></text:h>
      <text:p text:style-name="P44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37">四個面向</text:p>
            </table:table-cell>
            <table:table-cell table:style-name="表格132.A1" office:value-type="string">
              <text:p text:style-name="P37">管什麼</text:p>
            </table:table-cell>
            <table:table-cell table:style-name="表格132.A1" office:value-type="string">
              <text:p text:style-name="P37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9"><text:span text:style-name="T15">🌟 <text:s/></text:span><text:span text:style-name="T24">考試必背三句話</text:span></text:p>
            <text:p text:style-name="P43">1. 資安三階段：事前預防 → 事中偵測 → 事後復原。</text:p>
            <text:p text:style-name="P42">2. SSDLC：六階段（Define→Design→Develop→Test→Deploy→Maintain）都加入資安。</text:p>
            <text:p text:style-name="P4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5" text:outline-level="2">伍、進階防禦：EDR · MDR · MITRE ATT&amp;CK · 數位韌性</text:h>
      <text:p text:style-name="P44">現代駭客不一定放病毒，而是偷登入帳號偽裝成正常使用者、長期潛伏、利用合法工具發動攻擊。因此資安核心已從「防毒」轉向「持續監控電腦行為，即時偵測並快速應變」。</text:p>
      <text:h text:style-name="P3" text:outline-level="3"><text:span text:style-name="T16">▍</text:span><text:span text:style-name="T17"> EDR — 自己監控的資安工具</text:span></text:h>
      <text:p text:style-name="P44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33">三大偵測範圍</text:p>
            </table:table-cell>
            <table:table-cell table:style-name="表格133.A1" office:value-type="string">
              <text:p text:style-name="P33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41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41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9"><text:span text:style-name="T15">💡 <text:s/></text:span><text:span text:style-name="T17">核心觀念</text:span></text:p>
            <text:p text:style-name="P43">EDR 是「買工具、自己守」。企業需要有內部資安人員負責查看警報並處理事件。</text:p>
          </table:table-cell>
          <table:covered-table-cell/>
        </table:table-row>
      </table:table>
      <text:h text:style-name="P3" text:outline-level="3"><text:span text:style-name="T16">▍</text:span><text:span text:style-name="T17"> MDR — 委外的資安託管服務</text:span></text:h>
      <text:p text:style-name="P44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34">比較項目</text:p>
            </table:table-cell>
            <table:table-cell table:style-name="表格134.A1" office:value-type="string">
              <text:p text:style-name="P34">EDR</text:p>
            </table:table-cell>
            <table:table-cell table:style-name="表格134.A1" office:value-type="string">
              <text:p text:style-name="P34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41">管理方式</text:p>
          </table:table-cell>
          <table:table-cell table:style-name="表格134.A2" office:value-type="string">
            <text:p text:style-name="P41">自行管理</text:p>
          </table:table-cell>
          <table:table-cell table:style-name="表格134.A2" office:value-type="string">
            <text:p text:style-name="P41">委外管理</text:p>
          </table:table-cell>
        </table:table-row>
        <table:table-row table:style-name="表格134.1">
          <table:table-cell table:style-name="表格134.A3" office:value-type="string">
            <text:p text:style-name="P41">監控時間</text:p>
          </table:table-cell>
          <table:table-cell table:style-name="表格134.A3" office:value-type="string">
            <text:p text:style-name="P41">視團隊而定</text:p>
          </table:table-cell>
          <table:table-cell table:style-name="表格134.A3" office:value-type="string">
            <text:p text:style-name="P41">24 / 7 全天</text:p>
          </table:table-cell>
        </table:table-row>
        <table:table-row table:style-name="表格134.1">
          <table:table-cell table:style-name="表格134.A2" office:value-type="string">
            <text:p text:style-name="P41">所需能力</text:p>
          </table:table-cell>
          <table:table-cell table:style-name="表格134.A2" office:value-type="string">
            <text:p text:style-name="P41">需內部資安人員</text:p>
          </table:table-cell>
          <table:table-cell table:style-name="表格134.A2" office:value-type="string">
            <text:p text:style-name="P7"><text:span text:style-name="T10">無須自建團隊</text:span><text:soft-page-break/></text:p>
          </table:table-cell>
        </table:table-row>
        <table:table-row table:style-name="表格134.1">
          <table:table-cell table:style-name="表格134.A3" office:value-type="string">
            <text:p text:style-name="P41">適合對象</text:p>
          </table:table-cell>
          <table:table-cell table:style-name="表格134.A3" office:value-type="string">
            <text:p text:style-name="P41">大型企業</text:p>
          </table:table-cell>
          <table:table-cell table:style-name="表格134.A3" office:value-type="string">
            <text:p text:style-name="P41">中小企業</text:p>
          </table:table-cell>
        </table:table-row>
        <table:table-row table:style-name="表格134.1">
          <table:table-cell table:style-name="表格134.A2" office:value-type="string">
            <text:p text:style-name="P41">成本模式</text:p>
          </table:table-cell>
          <table:table-cell table:style-name="表格134.A2" office:value-type="string">
            <text:p text:style-name="P41">工具費 + 人力</text:p>
          </table:table-cell>
          <table:table-cell table:style-name="表格134.A2" office:value-type="string">
            <text:p text:style-name="P41">月費 / 年費訂閱</text:p>
          </table:table-cell>
        </table:table-row>
      </table:table>
      <text:h text:style-name="P3" text:outline-level="3"><text:span text:style-name="T16">▍</text:span><text:span text:style-name="T17"> MITRE ATT&amp;CK — 駭客招式大全</text:span></text:h>
      <text:p text:style-name="P44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37">TTP</text:p>
            </table:table-cell>
            <table:table-cell table:style-name="表格135.A1" office:value-type="string">
              <text:p text:style-name="P37">意義</text:p>
            </table:table-cell>
            <table:table-cell table:style-name="表格135.A1" office:value-type="string">
              <text:p text:style-name="P37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9"><text:span text:style-name="T15">💡 <text:s/></text:span><text:span text:style-name="T17">核心觀念</text:span></text:p>
            <text:p text:style-name="P43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33">❌ 以前的想法</text:p>
            </table:table-cell>
            <table:table-cell table:style-name="表格136.A1" office:value-type="string">
              <text:p text:style-name="P33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41">「不能被攻擊」——重點：阻止所有入侵。</text:p>
          </table:table-cell>
          <table:table-cell table:style-name="表格136.A2" office:value-type="string">
            <text:p text:style-name="P41">「被打了還能撐住並快速恢復」——重點：強化復原能力。</text:p>
          </table:table-cell>
        </table:table-row>
      </table:table>
      <text:p text:style-name="P2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9"><text:span text:style-name="T15">📝 <text:s/></text:span><text:span text:style-name="T24">一行記憶法</text:span></text:p>
            <text:p text:style-name="P10"><text:span text:style-name="T25">🛡 EDR → </text:span><text:span text:style-name="T11">自己買工具守　</text:span><text:span text:style-name="T25">👥 MDR → </text:span><text:span text:style-name="T11">請公司幫你守</text:span></text:p>
            <text:p text:style-name="P11"><text:span text:style-name="T25">📖 ATT&amp;CK → </text:span><text:span text:style-name="T11">駭客招式教材　</text:span><text:span text:style-name="T25">💪 韌性 → </text:span><text:span text:style-name="T11">撐住、快速復原</text:span></text:p>
          </table:table-cell>
        </table:table-row>
      </table:table>
      <text:h text:style-name="P15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9"><text:span text:style-name="T15">📋 <text:s/></text:span><text:span text:style-name="T20">內容審查說明</text:span></text:p>
            <text:p text:style-name="P43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4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6"/>
            </table:table-cell>
            <table:table-cell table:style-name="表格139.A1" office:value-type="string">
              <text:p text:style-name="P34">傳統（城堡思維）</text:p>
            </table:table-cell>
            <table:table-cell table:style-name="表格139.A1" office:value-type="string">
              <text:p text:style-name="P34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41">核心假設</text:p>
          </table:table-cell>
          <table:table-cell table:style-name="表格139.A2" office:value-type="string">
            <text:p text:style-name="P41">內網 = 可信任</text:p>
          </table:table-cell>
          <table:table-cell table:style-name="表格139.A2" office:value-type="string">
            <text:p text:style-name="P41">任何人都需持續驗證</text:p>
          </table:table-cell>
        </table:table-row>
        <table:table-row table:style-name="表格139.1">
          <table:table-cell table:style-name="表格139.A3" office:value-type="string">
            <text:p text:style-name="P41">防護重點</text:p>
          </table:table-cell>
          <table:table-cell table:style-name="表格139.A3" office:value-type="string">
            <text:p text:style-name="P41">網路邊界 / 防火牆</text:p>
          </table:table-cell>
          <table:table-cell table:style-name="表格139.A3" office:value-type="string">
            <text:p text:style-name="P41">身份 × 設備 × 情境</text:p>
          </table:table-cell>
        </table:table-row>
        <table:table-row table:style-name="表格139.1">
          <table:table-cell table:style-name="表格139.A2" office:value-type="string">
            <text:p text:style-name="P41">登入之後</text:p>
          </table:table-cell>
          <table:table-cell table:style-name="表格139.A2" office:value-type="string">
            <text:p text:style-name="P41">幾乎不再驗證</text:p>
          </table:table-cell>
          <table:table-cell table:style-name="表格139.A2" office:value-type="string">
            <text:p text:style-name="P41">每個操作持續驗證</text:p>
          </table:table-cell>
        </table:table-row>
        <table:table-row table:style-name="表格139.1">
          <table:table-cell table:style-name="表格139.A3" office:value-type="string">
            <text:p text:style-name="P41">駭客入侵後</text:p>
          </table:table-cell>
          <table:table-cell table:style-name="表格139.A3" office:value-type="string">
            <text:p text:style-name="P41">可橫向移動整個內網</text:p>
          </table:table-cell>
          <table:table-cell table:style-name="表格139.A3" office:value-type="string">
            <text:p text:style-name="P41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41">適合時代</text:p>
          </table:table-cell>
          <table:table-cell table:style-name="表格139.A2" office:value-type="string">
            <text:p text:style-name="P41">固定辦公室 / 單一內網</text:p>
          </table:table-cell>
          <table:table-cell table:style-name="表格139.A2" office:value-type="string">
            <text:p text:style-name="P41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9"><text:span text:style-name="T15">🔑 <text:s/></text:span><text:span text:style-name="T24">核心一句話</text:span></text:p>
            <text:p text:style-name="P58">❝ 永不信任，始終驗證 ❞（Never Trust, Always Verify）</text:p>
            <text:p text:style-name="P4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37">支柱</text:p>
            </table:table-cell>
            <table:table-cell table:style-name="表格140.A1" office:value-type="string">
              <text:p text:style-name="P37">口訣</text:p>
            </table:table-cell>
            <table:table-cell table:style-name="表格140.A1" office:value-type="string">
              <text:p text:style-name="P37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3" text:outline-level="3"><text:span text:style-name="T16">▍</text:span><text:span text:style-name="T17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37">機制</text:p>
            </table:table-cell>
            <table:table-cell table:style-name="表格141.A1" office:value-type="string">
              <text:p text:style-name="P37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9"><text:span text:style-name="T15">🔥 <text:s/></text:span><text:span text:style-name="T17">考前 10 秒超濃縮</text:span></text:p>
            <text:p text:style-name="P43">ZT 核心：不信任任何人（含內網）；檢查三件事——人（Identity）、機（Device）、境（Context）；搭配四招——MFA ＋ 最小權限 ＋ 微分段 ＋ 持續監控。</text:p>
            <text:p text:style-name="P42">口訣：人機境，多驗、少給、切塊、一直看。</text:p>
          </table:table-cell>
          <table:covered-table-cell/>
        </table:table-row>
      </table:table>
      <text:h text:style-name="P3" text:outline-level="3"><text:span text:style-name="T16">▍</text:span><text:span text:style-name="T17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37">Step</text:p>
            </table:table-cell>
            <table:table-cell table:style-name="表格142.A1" office:value-type="string">
              <text:p text:style-name="P37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9"><text:span text:style-name="T15">⚠️ <text:s/></text:span><text:span text:style-name="T20">公職考試陷阱整理</text:span></text:p>
            <text:p text:style-name="P10"><text:span text:style-name="T12">ZT = 完全不相信員工？　</text:span><text:span text:style-name="T11">✗ 重點是「每次都驗證」，驗證通過員工仍可正常使用，只是不再預設信任。</text:span></text:p>
            <text:p text:style-name="P11"><text:span text:style-name="T12">只有外網才危險？　</text:span><text:span text:style-name="T11">✗ 內網也可能：帳號被盜、設備中毒、內部人員惡意操作，故內網也須驗證。</text:span></text:p>
            <text:p text:style-name="P11"><text:span text:style-name="T12">登入一次後就永久可信？　</text:span><text:span text:style-name="T11">✗ 持續驗證，單次登入不代表長期信任，高風險行為會觸發重新驗證。</text:span></text:p>
            <text:p text:style-name="P11"><text:span text:style-name="T12">Zero Trust 重視網路位置？（超常考）　</text:span><text:span text:style-name="T11">✗ 完全相反！重點從「位置」轉移到「身份 / 設備 / 情境」。</text:span></text:p>
          </table:table-cell>
          <table:covered-table-cell/>
        </table:table-row>
      </table:table>
      <text:h text:style-name="P14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9"><text:span text:style-name="T15">✅ <text:s/></text:span><text:span text:style-name="T17">你已經完成一輪</text:span></text:p>
            <text:p text:style-name="P43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9"><text:span text:style-name="T15">🎯 <text:s/></text:span><text:span text:style-name="T24">五個高頻拿分重點</text:span></text:p>
            <text:p text:style-name="P43">① 分層先記責任：應用給人用、傳輸怎麼送、網路走哪條、連結同區網。</text:p>
            <text:p text:style-name="P42">② 計算題動手練：VLSM「需求+2→最小 2ⁿ→/(32−n)」、可用主機「2^主機bit −2」。</text:p>
            <text:p text:style-name="P42">③ 流程要會串：上網＝DNS→ARP→NAT；TCP＝握手→Slow Start→CA→丟包降速。</text:p>
            <text:p text:style-name="P42">④ 易混成對背：FW/WAF/NGFW、IDS/IPS、HIDS/NIDS、SNMP/ICMP、EDR/MDR、RTO/RPO、Recursive/Iterative。</text:p>
            <text:p text:style-name="P4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32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15</meta:editing-cycles>
    <meta:creation-date>2026-06-12T00:41:46.189000000</meta:creation-date>
    <dc:date>2026-06-12T11:35:32.941000000</dc:date>
    <meta:generator>MODA_ODF_Application_Tools/3.8.4.2$Windows_X86_64 LibreOffice_project/4fb77107d5af14329e08085efe4fa19b5633383a</meta:generator>
    <meta:editing-duration>PT2H21M58S</meta:editing-duration>
    <meta:document-statistic meta:table-count="143" meta:image-count="0" meta:object-count="0" meta:page-count="51" meta:paragraph-count="2292" meta:word-count="29515" meta:character-count="46548" meta:non-whitespace-character-count="42022"/>
  </office:meta>
</office:document-meta>
</file>