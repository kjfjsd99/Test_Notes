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6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7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7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8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background-color="#ffd740" loext:char-shading-value="0"/>
    </style:style>
    <style:style style:name="T70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5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6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7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8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9" style:family="text">
      <style:text-properties fo:font-weight="bold" fo:background-color="#ffd740" loext:char-shading-value="0" style:font-weight-asian="bold" style:font-weight-complex="bold"/>
    </style:style>
    <style:style style:name="T80" style:family="text">
      <style:text-properties fo:background-color="#ffff00" loext:char-shading-value="0"/>
    </style:style>
    <style:style style:name="T8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3" style:family="text">
      <style:text-properties fo:color="#76ff03" loext:opacity="100%"/>
    </style:style>
    <style:style style:name="T84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85" style:family="text">
      <style:text-properties fo:color="#ffd740" loext:opacity="100%" fo:background-color="#3d5afe" loext:char-shading-value="0"/>
    </style:style>
    <style:style style:name="T86" style:family="text">
      <style:text-properties fo:color="#18ffff" loext:opacity="100%" fo:background-color="#d500f9" loext:char-shading-value="0"/>
    </style:style>
    <style:style style:name="T87" style:family="text">
      <style:text-properties fo:font-weight="bold" fo:background-color="#ffff00" loext:char-shading-value="0" style:font-weight-asian="bold" style:font-weight-complex="bold"/>
    </style:style>
    <style:style style:name="T88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8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9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9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92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93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94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6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7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8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9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02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3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4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5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6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7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8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10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111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112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1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4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69"> 將需求由大到小排序</text:span></text:p>
            <text:p text:style-name="P22"><text:span text:style-name="T10">② </text:span><text:span text:style-name="T70">計算每個需求所需前綴</text:span><text:span text:style-name="T10">：</text:span><text:span text:style-name="T71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72">子網路的起始位址必須是其大小的整數倍</text:span><text:span text:style-name="T4">。</text:span><text:span text:style-name="T73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4">再切大的 A（/25，128 個），最近可用對齊位址是 128</text:span><text:span text:style-name="T4"> → </text:span><text:span text:style-name="T75">中間 16～127 共 112 個 IP 全浪費！</text:span><text:span text:style-name="T4">正解：</text:span><text:span text:style-name="T76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7">前綴計算公式詳解</text:span><text:span text:style-name="T9">（以</text:span><text:span text:style-name="T78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79">加 2（預留網路 + 廣播）</text:span>：<text:span text:style-name="T80">100 + 2 = 102</text:span></text:p>
            <text:p text:style-name="P12">② <text:span text:style-name="T69">找「大於等於 102」的最小 2ⁿ</text:span>：2⁶ = 64（太小）、<text:span text:style-name="T81">2⁷ = 128（夠）→ n = 7</text:span></text:p>
            <text:p text:style-name="P12">③ <text:span text:style-name="T82">前綴 = 32 − n = 32 − 7 = 25</text:span> →<text:span text:style-name="T83"> </text:span><text:span text:style-name="T84">使用 /25（驗證：2⁷ = 128，可用 126 ≥ 100 ✔）</text:span></text:p>
            <text:p text:style-name="P70"><text:span text:style-name="T80">公式一句話</text:span>：<text:span text:style-name="T85">需求 +2 → 找最小 2ⁿ</text:span> → <text:span text:style-name="T86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87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79">/25</text:span>（0～<text:span text:style-name="T88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87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79">/26</text:span>（128～<text:span text:style-name="T88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87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79">/28</text:span>（192～<text:span text:style-name="T88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89">快速判斷一個 IP 屬於哪個 /26 子網</text:span>（<text:span text:style-name="T81">每段 64 個，起點 0、64、128、192</text:span>）：<text:span text:style-name="T87">看最後一個 Octet 落在哪個區間 </text:span>→</text:p>
            <text:p text:style-name="P12"><text:span text:style-name="T79">0～63</text:span> → x.0/26　｜　<text:span text:style-name="T79">64～127</text:span> → x.64/26　｜　<text:span text:style-name="T79">128～191</text:span> → x.128/26　｜　<text:span text:style-name="T79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90">VLSM 把大網路切小</text:span>；<text:span text:style-name="T91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92"><text:s/></text:span><text:span text:style-name="T93">合併三條件（缺一不可）</text:span></text:p>
            <text:p text:style-name="P11"><text:span text:style-name="T10">① </text:span><text:span text:style-name="T70">連續（Contiguous）</text:span><text:span text:style-name="T10">：</text:span><text:span text:style-name="T72">IP 範圍必須緊鄰</text:span><text:span text:style-name="T4">，</text:span><text:span text:style-name="T76">中間不能有空缺</text:span><text:span text:style-name="T4">。</text:span></text:p>
            <text:p text:style-name="P22"><text:span text:style-name="T10">② </text:span><text:span text:style-name="T70">數量是 2ⁿ</text:span><text:span text:style-name="T10">：</text:span><text:span text:style-name="T4">2、4、8…。</text:span></text:p>
            <text:p text:style-name="P22"><text:span text:style-name="T10">③ </text:span><text:span text:style-name="T70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94">2 個 /25 → 1 個 /24</text:span><text:span text:style-name="T15">　</text:span><text:span text:style-name="T4">192.168.1</text:span><text:span text:style-name="T95">.0</text:span><text:span text:style-name="T4">/25 ＋ 192.168.1</text:span><text:span text:style-name="T95">.128</text:span><text:span text:style-name="T4">/25 → ① 緊鄰✔ ② 2 個（2¹）✔ ③ 起點 .0，0÷256=0✔ → 合併為 192.168.1</text:span><text:span text:style-name="T95">.0</text:span><text:span text:style-name="T4">/24。</text:span></text:p>
            <text:p text:style-name="P22"><text:span text:style-name="T15">範例：</text:span><text:span text:style-name="T94">4 個 /24 → 1 個 /22</text:span><text:span text:style-name="T15">　</text:span><text:span text:style-name="T4">192.168</text:span><text:span text:style-name="T96">.0/1/2/3</text:span><text:span text:style-name="T4">.0/</text:span><text:span text:style-name="T97">24</text:span><text:span text:style-name="T4"> → 連續✔、4 個（2²）✔、對齊✔ → 合併為 192.168</text:span><text:span text:style-name="T98">.0</text:span><text:span text:style-name="T4">.0/</text:span><text:span text:style-name="T97">22</text:span><text:span text:style-name="T4">。</text:span></text:p>
            <text:p text:style-name="P22"><text:span text:style-name="T99">反例（無法合併）：</text:span><text:span text:style-name="T100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76">每合併一倍，/ 的數字減 1</text:span><text:span text:style-name="T4">）。</text:span></text:p>
            <text:p text:style-name="P12"><text:span text:style-name="T101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72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79">由大到小</text:span>；<text:span text:style-name="T81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82">連續</text:span> + 數量 2ⁿ + 對齊；<text:span text:style-name="T87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102">考試標準解題流程</text:span></text:p>
            <text:p text:style-name="P11"><text:span text:style-name="T103">遇到 VLSM 題：</text:span><text:span text:style-name="T104">確認起始網路</text:span><text:span text:style-name="T4"> → </text:span><text:span text:style-name="T105">需求由大到小</text:span><text:span text:style-name="T4"> → </text:span><text:span text:style-name="T106">各需求 +2 找 2ⁿ 算前綴</text:span><text:span text:style-name="T4"> → </text:span><text:span text:style-name="T107">大的先切</text:span><text:span text:style-name="T4">依序往後 → </text:span><text:span text:style-name="T108">驗證網路位址/廣播位址/可用範圍</text:span><text:span text:style-name="T4">。</text:span></text:p>
            <text:p text:style-name="P22"><text:span text:style-name="T103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</text:span></text:h>
      <text:p text:style-name="P36"><text:span text:style-name="T87">MTU</text:span> ＝ <text:span text:style-name="T109">Maximum Transmission Unit，</text:span><text:span text:style-name="T110">一條網路</text:span><text:span text:style-name="T109">「</text:span><text:span text:style-name="T111">一次最多</text:span><text:span text:style-name="T109">能傳送的</text:span><text:span text:style-name="T112">封包大小</text:span><text:span text:style-name="T109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82">若封包大小 &gt; MTU，就必須「切開」才能傳送</text:span>，這個動作就叫 <text:span text:style-name="T113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MTU = 1500（每段扣掉 20 bytes IP Header，剩 1480 可放資料）</text:p>
            <text:p text:style-name="P1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2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3">✅ 可以</text:p>
          </table:table-cell>
          <table:table-cell table:style-name="表格49.A3" office:value-type="string">
            <text:p text:style-name="P23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2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4">❌ 不行</text:p>
          </table:table-cell>
          <table:table-cell table:style-name="表格49.A4" office:value-type="string">
            <text:p text:style-name="P23">Router 不分段，由送端自行處理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Total Length：</text:span><text:span text:style-name="T4">封包總大小（Header + Data），最大 65535 bytes（16 bits）。</text:span></text:p>
            <text:p text:style-name="P22"><text:span text:style-name="T34">(2) Identification：</text:span><text:span text:style-name="T4">同一原始封包的所有分段共用同一 ID；接收端靠此 ID 判斷哪些 fragment 要拼在一起。</text:span></text:p>
            <text:p text:style-name="P22"><text:span text:style-name="T34">(3) Fragment Offset：</text:span><text:span text:style-name="T4">這段資料在原始封包中的「起始位置」。⚠️ 單位是 8 bytes（欄位僅 13 bits）→ Offset = 起始位置 ÷ 8。</text:span></text:p>
            <text:p text:style-name="P22"><text:span text:style-name="T34">(4) TTL：</text:span><text:span text:style-name="T4">最多可經過幾個 Router；每經過一個 −1，歸零時 Router 丟棄並回 ICMP「Time Exceeded」。常見初始值 Linux=64、Windows=128。traceroute 即利用 TTL。</text:span></text:p>
            <text:p text:style-name="P22"><text:span text:style-name="T34">(5) Protocol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2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2960 ÷ 8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23">ICMP</text:p>
          </table:table-cell>
          <table:table-cell table:style-name="表格50.A3" table:number-columns-spanned="2" office:value-type="string">
            <text:p text:style-name="P23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3">DF</text:p>
          </table:table-cell>
          <table:table-cell table:style-name="表格51.A2" office:value-type="string">
            <text:p text:style-name="P23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23">MF</text:p>
          </table:table-cell>
          <table:table-cell table:style-name="表格51.A3" office:value-type="string">
            <text:p text:style-name="P23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3">IPv4</text:p>
          </table:table-cell>
          <table:table-cell table:style-name="表格52.A2" office:value-type="string">
            <text:p text:style-name="P23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23">IPv6</text:p>
          </table:table-cell>
          <table:table-cell table:style-name="表格52.A3" office:value-type="string">
            <text:p text:style-name="P23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4">MSS = MTU − IP Header − TCP Header = 1500 − 20 − 20 = 1460 bytes。三向交握時雙方各自宣告 MSS，之後每段 ≤ MSS，讓 IP 層不需分段。</text:span></text:p>
            <text:p text:style-name="P22"><text:span text:style-name="T34">搭配 DF=1 + PMTUD：</text:span><text:span text:style-name="T4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102">結論</text:span></text:p>
            <text:p text:style-name="P18">TCP = 主動控制大小（MSS）＋ DF=1 ＋ PMTUD，從源頭就避免 Fragmentation 發生。</text:p>
          </table:table-cell>
        </table:table-row>
      </table:table>
      <text:h text:style-name="P19" text:outline-level="2">拾肆、Fragmentation DoS 攻擊</text:h>
      <text:p text:style-name="P36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6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6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6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102">防禦方式</text:span></text:p>
            <text:p text:style-name="P18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23">Identification</text:p>
          </table:table-cell>
          <table:table-cell table:style-name="表格55.A2" office:value-type="string">
            <text:p text:style-name="P23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23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23">PMTUD</text:p>
          </table:table-cell>
          <table:table-cell table:style-name="表格55.A2" office:value-type="string">
            <text:p text:style-name="P2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23">TTL</text:p>
          </table:table-cell>
          <table:table-cell table:style-name="表格55.A3" office:value-type="string">
            <text:p text:style-name="P23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23">MSS</text:p>
          </table:table-cell>
          <table:table-cell table:style-name="表格55.A2" office:value-type="string">
            <text:p text:style-name="P23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32 bit，約 43 億個 IP，已嚴重不足</text:p>
          </table:table-cell>
          <table:table-cell table:style-name="表格57.A2" office:value-type="string">
            <text:p text:style-name="P23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需 NAT 共用 IP，破壞 End-to-End</text:p>
          </table:table-cell>
          <table:table-cell table:style-name="表格57.A3" office:value-type="string">
            <text:p text:style-name="P23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須另裝 VPN</text:p>
          </table:table-cell>
          <table:table-cell table:style-name="表格57.A2" office:value-type="string">
            <text:p text:style-name="P23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可變長度含 Options，Router 效率低</text:p>
          </table:table-cell>
          <table:table-cell table:style-name="表格57.A3" office:value-type="string">
            <text:p text:style-name="P23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23">無法有效標記流量優先權</text:p>
          </table:table-cell>
          <table:table-cell table:style-name="表格57.A2" office:value-type="string">
            <text:p text:style-name="P23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Broadcast：一次發給所有人，浪費頻寬</text:p>
          </table:table-cell>
          <table:table-cell table:style-name="表格57.A3" office:value-type="string">
            <text:p text:style-name="P23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需手動設定或 DHCP，管理繁瑣</text:p>
          </table:table-cell>
          <table:table-cell table:style-name="表格57.A2" office:value-type="string">
            <text:p text:style-name="P23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Dual Stack（雙協定堆疊）— 最常用、最推薦</text:p>
            <text:p text:style-name="P1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75">② Tunneling（隧道技術）— 過渡期橋接方案</text:p>
            <text:p text:style-name="P12">中間網路只支援 IPv4，無法直接傳送 IPv6 封包。解法：將 IPv6 封包完整封裝進 IPv4 外殼，抵達目的地後拆除外層 IPv4、還原 IPv6 封包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6">③ Translation（NAT64）— 協定轉換、互通最後手段</text:p>
            <text:p text:style-name="P12">適用場景：IPv6-only 裝置需與 IPv4-only 裝置直接通訊。透過轉換閘道器即時將封包表頭轉換為對方格式。代表技術：NAT64 + DNS64。複雜度最高，有額外效能損耗。</text:p>
            <text:p text:style-name="P12">示意：IPv6 裝置 → [ NAT64 轉換閘道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同時會中文 + 英文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34">IPv4 的困境：</text:span><text:span text:style-name="T4">整棟公寓共用一個門牌（NAT），郵差只送到大門，裡面誰是誰要另外猜；地址快用光還在借號碼。</text:span></text:p>
            <text:p text:style-name="P22"><text:span text:style-name="T34">IPv6 的世界：</text:span><text:span text:style-name="T4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安全（IPsec）＋ 快（固定 Header）＋ 自動（SLAAC）＋ 乾淨（無 Broadcast）。</text:span></text:p>
            <text:p text:style-name="P22"><text:span text:style-name="T48">過渡技術：</text:span><text:span text:style-name="T4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23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15">IP 位址＝家庭住址</text:span><text:span text:style-name="T4">（192.168.1.5），找最終目的地；</text:span><text:span text:style-name="T15">MAC 位址＝身分證號碼</text:span><text:span text:style-name="T4">（AA:BB:CC:DD:EE），決定下一站交給哪台機器。</text:span></text:p>
            <text:p text:style-name="P12">資料在網路中「實際傳送」靠 MAC，但我們只知道對方的 IP——所以需要一個轉換機制，這就是 ARP 的工作。</text:p>
          </table:table-cell>
        </table:table-row>
      </table:table>
      <text:h text:style-name="P19" text:outline-level="2">一、ARP（Address Resolution Protocol）：IP → MAC</text:h>
      <text:p text:style-name="P36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查 ARP Cache（筆記本）：</text:span><text:span text:style-name="T4">先查自己的記錄「我之前有沒有問過這個 IP？」有 → 直接用。</text:span></text:p>
            <text:p text:style-name="P22"><text:span text:style-name="T34">② 發出 ARP Request（廣播）：</text:span><text:span text:style-name="T4">沒記錄 → 對整個區網廣播「誰是 192.168.1.5？請告訴我你的 MAC！」所有機器都收到。</text:span></text:p>
            <text:p text:style-name="P22"><text:span text:style-name="T34">③ 收到 ARP Reply（單播回應）：</text:span><text:span text:style-name="T4">IP 是 192.168.1.5 的機器回應「我是！MAC 是 AA:BB:CC」，其餘機器靜默忽略。</text:span></text:p>
            <text:p text:style-name="P22"><text:span text:style-name="T34">④ 存進 ARP Cache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6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99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6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99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99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99">✗ 以為 ARP 是找 Google 的 MAC　→　</text:span><text:span text:style-name="T4">✓ ARP 找的是「路由器」的 MAC！因為 ARP 只能在同一個 LAN 內使用。</text:span></text:p>
            <text:p text:style-name="P22"><text:span text:style-name="T99">✗ 以為封包直接送到 Google　→　</text:span><text:span text:style-name="T4">✓ 封包先送給路由器，路由器再轉到 Internet。</text:span></text:p>
            <text:p text:style-name="P22"><text:span text:style-name="T99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102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77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99">✗ 常見錯誤：</text:span><text:span text:style-name="T4">視窗 = cwnd（擁塞視窗）。</text:span><text:span text:style-name="T103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77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8">步驟</text:p>
          </table:table-cell>
          <table:table-cell table:style-name="表格84.A2" office:value-type="string">
            <text:p text:style-name="P78">層級</text:p>
          </table:table-cell>
          <table:table-cell table:style-name="表格84.A2" office:value-type="string">
            <text:p text:style-name="P78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76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102">申論題標準答案</text:span></text:p>
            <text:p text:style-name="P11"><text:span text:style-name="T103">一、DNS 功能：</text:span><text:span text:style-name="T4">DNS 為網際網路中負責將網域名稱轉換為 IP 位址的分散式系統。</text:span></text:p>
            <text:p text:style-name="P22"><text:soft-page-break/><text:span text:style-name="T103">二、查詢流程：</text:span><text:span text:style-name="T4">由快取開始，依序向 Local DNS、Root DNS、TLD DNS、Authoritative DNS 查詢，最終取得 IP 位址。</text:span></text:p>
            <text:p text:style-name="P22"><text:span text:style-name="T103">三、Recursive：</text:span><text:span text:style-name="T4">由 DNS 伺服器代替用戶端完整查詢並直接回傳最終 IP，用戶端只需等待結果。</text:span></text:p>
            <text:p text:style-name="P22"><text:span text:style-name="T103">四、Iterative：</text:span><text:span text:style-name="T4">DNS 伺服器僅回應下一步查詢位置，由用戶端自行逐層向各 DNS 查詢，直到取得 IP。</text:span></text:p>
            <text:p text:style-name="P22"><text:span text:style-name="T103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99">✗ ABR 負責連接外部網路　→　</text:span><text:span text:style-name="T4">✓ ABR 只負責 Area 之間的橋樑，對外是 ASBR 的工作。</text:span></text:p>
            <text:p text:style-name="P22"><text:span text:style-name="T99">✗ ASBR 是用來跨越不同 Area　→　</text:span><text:span text:style-name="T4">✓ ASBR 是跨越不同 AS（整個系統），不是跨 Area。</text:span></text:p>
            <text:p text:style-name="P22"><text:span text:style-name="T99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8">步驟</text:p>
            </table:table-cell>
            <table:table-cell table:style-name="表格94.A1" office:value-type="string">
              <text:p text:style-name="P78">屬性</text:p>
            </table:table-cell>
            <table:table-cell table:style-name="表格94.A1" office:value-type="string">
              <text:p text:style-name="P78">說明</text:p>
            </table:table-cell>
            <table:table-cell table:style-name="表格94.A1" office:value-type="string">
              <text:p text:style-name="P78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99">✗ AS-PATH 是 BGP 選路最重要的屬性　→　</text:span><text:span text:style-name="T4">✓ Local Preference 才是最重要的通用屬性（Weight 是 Cisco 私有）。</text:span></text:p>
            <text:p text:style-name="P22"><text:span text:style-name="T99">✗ AS-PATH 越短就一定會選那條　→　</text:span><text:span text:style-name="T4">✓ 只有前面的屬性（Local Pref 等）完全相同時，才會比較 AS-PATH。</text:span></text:p>
            <text:p text:style-name="P22"><text:span text:style-name="T99">✗ BGP 會自己計算最短路徑　→　</text:span><text:span text:style-name="T4">✓ BGP 不算距離，OSPF 才做最短路徑計算。</text:span></text:p>
            <text:p text:style-name="P22"><text:span text:style-name="T99">✗ iBGP 比 eBGP 優先　→　</text:span><text:span text:style-name="T4">✓ eBGP 優先於 iBGP（外部路由更可信）。</text:span></text:p>
            <text:p text:style-name="P22"><text:span text:style-name="T99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99">✗ 封包送不出去 → 一定是 BGP 問題　→　</text:span><text:span text:style-name="T4">✓ 應依序排查：防火牆有沒有擋？NAT 有沒有設？BGP 有沒有路？</text:span></text:p>
            <text:p text:style-name="P22"><text:span text:style-name="T99">✗ 有路但連不到 → 是 BGP 路由問題　→　</text:span><text:span text:style-name="T4">✓ 通常是防火牆或 NAT 問題，不是 BGP。</text:span></text:p>
            <text:p text:style-name="P22"><text:span text:style-name="T99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14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14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14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8">口訣</text:p>
          </table:table-cell>
          <table:table-cell table:style-name="表格116.A2" office:value-type="string">
            <text:p text:style-name="P78">IOC 類型</text:p>
          </table:table-cell>
          <table:table-cell table:style-name="表格116.A2" office:value-type="string">
            <text:p text:style-name="P78">白話說明</text:p>
          </table:table-cell>
          <table:table-cell table:style-name="表格116.A2" office:value-type="string">
            <text:p text:style-name="P78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102">防禦核心：Prepared Statement（預備語句）</text:span></text:p>
            <text:p text:style-name="P11"><text:span text:style-name="T103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8">Step</text:p>
            </table:table-cell>
            <table:table-cell table:style-name="表格122.A1" office:value-type="string">
              <text:p text:style-name="P78">階段</text:p>
            </table:table-cell>
            <table:table-cell table:style-name="表格122.A1" office:value-type="string">
              <text:p text:style-name="P78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77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77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99">① IDS 可以自動阻擋攻擊　→　</text:span><text:span text:style-name="T4">✓ IDS 只偵測＋發警報，IPS 才會阻擋。</text:span></text:p>
            <text:p text:style-name="P22"><text:span text:style-name="T99">② Firewall 可以偵測異常行為　→　</text:span><text:span text:style-name="T4">✓ Firewall 依規則（IP/Port）過濾，不做行為分析。</text:span></text:p>
            <text:p text:style-name="P22"><text:soft-page-break/><text:span text:style-name="T99">③ HIDS 用來監控網路封包　→　</text:span><text:span text:style-name="T4">✓ HIDS 監控主機 Log 與系統行為，封包是 NIDS 的工作。</text:span></text:p>
            <text:p text:style-name="P22"><text:span text:style-name="T99">④ ICMP 用來監控設備狀態　→　</text:span><text:span text:style-name="T4">✓ ICMP 只診斷網路（Ping），監控設備是 SNMP。</text:span></text:p>
            <text:p text:style-name="P22"><text:span text:style-name="T99">⑤ ICMP 屬於 Application Layer　→　</text:span><text:span text:style-name="T4">✓ ICMP 屬 Network Layer，SNMP 才是 Application Layer。</text:span></text:p>
            <text:p text:style-name="P22"><text:span text:style-name="T99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79">題目</text:p>
            </table:table-cell>
            <table:table-cell table:style-name="表格127.A1" office:value-type="string">
              <text:p text:style-name="P79">答案</text:p>
            </table:table-cell>
            <table:table-cell table:style-name="表格127.A1" office:value-type="string">
              <text:p text:style-name="P79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80">Q1 何者負責「過濾進出網路流量」？</text:p>
          </table:table-cell>
          <table:table-cell table:style-name="表格127.A2" office:value-type="string">
            <text:p text:style-name="P80">Firewall</text:p>
          </table:table-cell>
          <table:table-cell table:style-name="表格127.A2" office:value-type="string">
            <text:p text:style-name="P80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80">Q2 IDS 的主要功能為何？</text:p>
          </table:table-cell>
          <table:table-cell table:style-name="表格127.A3" office:value-type="string">
            <text:p text:style-name="P80">偵測並發出警報</text:p>
          </table:table-cell>
          <table:table-cell table:style-name="表格127.A3" office:value-type="string">
            <text:p text:style-name="P80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80">Q3 IPS 與 IDS 最大差別？</text:p>
          </table:table-cell>
          <table:table-cell table:style-name="表格127.A2" office:value-type="string">
            <text:p text:style-name="P80">IPS 會阻擋，IDS 不會</text:p>
          </table:table-cell>
          <table:table-cell table:style-name="表格127.A2" office:value-type="string">
            <text:p text:style-name="P80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80">Q4 何者屬「主機型入侵偵測」？</text:p>
          </table:table-cell>
          <table:table-cell table:style-name="表格127.A3" office:value-type="string">
            <text:p text:style-name="P80">HIDS</text:p>
          </table:table-cell>
          <table:table-cell table:style-name="表格127.A3" office:value-type="string">
            <text:p text:style-name="P80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80">Q5 NIDS 主要監控什麼？</text:p>
          </table:table-cell>
          <table:table-cell table:style-name="表格127.A2" office:value-type="string">
            <text:p text:style-name="P80">網路封包</text:p>
          </table:table-cell>
          <table:table-cell table:style-name="表格127.A2" office:value-type="string">
            <text:p text:style-name="P80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80">Q6 SNMP 的主要用途？</text:p>
          </table:table-cell>
          <table:table-cell table:style-name="表格127.A3" office:value-type="string">
            <text:p text:style-name="P80">管理網路設備</text:p>
          </table:table-cell>
          <table:table-cell table:style-name="表格127.A3" office:value-type="string">
            <text:p text:style-name="P80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80">Q7 ICMP 常用於哪種工具？</text:p>
          </table:table-cell>
          <table:table-cell table:style-name="表格127.A2" office:value-type="string">
            <text:p text:style-name="P80">Ping</text:p>
          </table:table-cell>
          <table:table-cell table:style-name="表格127.A2" office:value-type="string">
            <text:p text:style-name="P80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80">Q8 ICMP 屬 OSI 哪一層？</text:p>
          </table:table-cell>
          <table:table-cell table:style-name="表格127.A3" office:value-type="string">
            <text:p text:style-name="P80">Network Layer</text:p>
          </table:table-cell>
          <table:table-cell table:style-name="表格127.A3" office:value-type="string">
            <text:p text:style-name="P80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80">Q9 何者用 UDP 且屬應用層？</text:p>
          </table:table-cell>
          <table:table-cell table:style-name="表格127.A2" office:value-type="string">
            <text:p text:style-name="P80">SNMP</text:p>
          </table:table-cell>
          <table:table-cell table:style-name="表格127.A2" office:value-type="string">
            <text:p text:style-name="P80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80">Q10 下列何者正確？</text:p>
          </table:table-cell>
          <table:table-cell table:style-name="表格127.A3" office:value-type="string">
            <text:p text:style-name="P80">SNMP 用於設備管理</text:p>
          </table:table-cell>
          <table:table-cell table:style-name="表格127.A3" office:value-type="string">
            <text:p text:style-name="P80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77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76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8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104</meta:editing-cycles>
    <meta:creation-date>2026-06-12T00:41:46.189000000</meta:creation-date>
    <dc:date>2026-06-13T09:22:14.727258400</dc:date>
    <meta:generator>LibreOffice/26.2.3.2$Windows_X86_64 LibreOffice_project/70e089b17412e4cb7773e41413306b17a2328c34</meta:generator>
    <meta:editing-duration>PT20H10M13S</meta:editing-duration>
    <meta:document-statistic meta:table-count="143" meta:image-count="0" meta:object-count="0" meta:page-count="51" meta:paragraph-count="2292" meta:word-count="29563" meta:character-count="46615" meta:non-whitespace-character-count="42079"/>
  </office:meta>
</office:document-meta>
</file>