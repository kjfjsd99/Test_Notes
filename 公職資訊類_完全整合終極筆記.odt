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6" style:family="paragraph" style:parent-style-name="Standard">
      <style:paragraph-properties fo:margin-top="0.882cm" fo:margin-bottom="0cm" style:contextual-spacing="false" fo:text-align="center" style:justify-single-word="false"/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7" style:family="paragraph" style:parent-style-name="Standard">
      <style:paragraph-properties fo:margin-top="0.159cm" fo:margin-bottom="0cm" style:contextual-spacing="false" fo:text-align="center" style:justify-single-word="false"/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P8" style:family="paragraph" style:parent-style-name="Standard">
      <style:paragraph-properties fo:margin-top="1.235cm" fo:margin-bottom="0cm" style:contextual-spacing="false" fo:text-align="center" style:justify-single-word="false"/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P9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10" style:family="paragraph" style:parent-style-name="Standard">
      <style:paragraph-properties fo:margin-top="0.071cm" fo:margin-bottom="0.159cm" style:contextual-spacing="false" fo:line-height="120%"/>
    </style:style>
    <style:style style:name="P11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2" style:family="paragraph" style:parent-style-name="Standard">
      <style:paragraph-properties fo:margin-top="0.035cm" fo:margin-bottom="0.123cm" style:contextual-spacing="false" fo:line-height="115%"/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3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4" style:family="paragraph" style:parent-style-name="Standard">
      <style:paragraph-properties fo:margin-top="0.035cm" fo:margin-bottom="0.123cm" style:contextual-spacing="false" fo:line-height="115%"/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5" style:family="paragraph" style:parent-style-name="Standard">
      <style:paragraph-properties fo:margin-top="0.035cm" fo:margin-bottom="0.123cm" style:contextual-spacing="false" fo:line-height="115%"/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6" style:family="paragraph" style:parent-style-name="Standard">
      <style:paragraph-properties fo:margin-top="0.035cm" fo:margin-bottom="0.123cm" style:contextual-spacing="false" fo:line-height="115%"/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7" style:family="paragraph" style:parent-style-name="Standard">
      <style:paragraph-properties fo:margin-top="0.282cm" fo:margin-bottom="0.088cm" style:contextual-spacing="false"/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8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282cm" fo:margin-bottom="0.088cm" style:contextual-spacing="false"/>
    </style:style>
    <style:style style:name="P20" style:family="paragraph" style:parent-style-name="Standard">
      <style:paragraph-properties fo:margin-top="0.071cm" fo:margin-bottom="0.159cm" style:contextual-spacing="false" fo:line-height="120%"/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P2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officeooo:paragraph-rsid="0007b826" style:font-name-asian="Microsoft JhengHei2" style:font-size-asian="7pt" style:font-weight-asian="normal" style:font-name-complex="Microsoft JhengHei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8pt" fo:font-weight="bold" fo:background-color="#33691e" style:font-name-asian="Microsoft JhengHei2" style:font-size-asian="8pt" style:font-weight-asian="bold" style:font-name-complex="Microsoft JhengHei2" style:font-size-complex="8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d500f9" style:font-name-asian="Microsoft JhengHei2" style:font-size-asian="10pt" style:font-weight-asian="bold" style:font-name-complex="Microsoft JhengHei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style:font-name-asian="Microsoft JhengHei2" style:font-size-asian="7pt" style:font-weight-asian="normal" style:font-name-complex="Microsoft JhengHei2" style:font-size-complex="7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fo:background-color="#ffff00" style:font-name-asian="Microsoft JhengHei2" style:font-size-asian="10pt" style:font-weight-asian="bold" style:font-name-complex="Microsoft JhengHei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style:font-name-asian="Microsoft JhengHei2" style:font-size-asian="8pt" style:font-weight-asian="normal" style:font-name-complex="Microsoft JhengHei2" style:font-size-complex="8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71c1c" loext:opacity="100%" style:font-name="Microsoft JhengHei" fo:font-size="10pt" fo:font-weight="bold" fo:background-color="#ff9100" style:font-name-asian="Microsoft JhengHei2" style:font-size-asian="10pt" style:font-weight-asian="bold" style:font-name-complex="Microsoft JhengHei2" style:font-size-complex="10pt" style:font-weight-complex="bold"/>
    </style:style>
    <style:style style:name="P35" style:family="paragraph" style:parent-style-name="Standard">
      <style:paragraph-properties fo:margin-top="0.035cm" fo:margin-bottom="0.042cm" style:contextual-spacing="false" fo:line-height="120%"/>
      <style:text-properties fo:color="#ff3d00" loext:opacity="100%" style:font-name="Microsoft JhengHei" fo:font-size="10.5pt" fo:font-style="normal" fo:font-weight="bold" fo:background-color="#64ffda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6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37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8" style:family="paragraph" style:parent-style-name="Heading_20_3">
      <style:paragraph-properties fo:margin-top="0cm" fo:margin-bottom="0.159cm" style:contextual-spacing="false" fo:break-before="pag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0d47a1" style:font-name-asian="Microsoft JhengHei2" style:font-size-asian="10pt" style:font-weight-asian="bold" style:font-name-complex="Microsoft JhengHei2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10pt" fo:font-weight="bold" fo:background-color="#1b5e20" style:font-name-asian="Microsoft JhengHei2" style:font-size-asian="10pt" style:font-weight-asian="bold" style:font-name-complex="Microsoft JhengHei2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cdd2" loext:opacity="100%" style:font-name="Microsoft JhengHei" fo:font-size="10pt" fo:font-weight="bold" fo:background-color="#b71c1c" style:font-name-asian="Microsoft JhengHei2" style:font-size-asian="10pt" style:font-weight-asian="bold" style:font-name-complex="Microsoft JhengHei2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e0b2" loext:opacity="100%" style:font-name="Microsoft JhengHei" fo:font-size="10pt" fo:font-weight="bold" fo:background-color="#e65100" style:font-name-asian="Microsoft JhengHei2" style:font-size-asian="10pt" style:font-weight-asian="bold" style:font-name-complex="Microsoft JhengHei2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3d00" loext:opacity="100%" style:font-name="Microsoft JhengHei" fo:font-size="10pt" fo:font-weight="bold" fo:background-color="#64ffda" style:font-name-asian="Microsoft JhengHei2" style:font-size-asian="10pt" style:font-weight-asian="bold" style:font-name-complex="Microsoft JhengHei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5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P46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7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49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50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51" style:family="paragraph" style:parent-style-name="Standard">
      <style:paragraph-properties fo:margin-top="0.035cm" fo:margin-bottom="0.042cm" style:contextual-spacing="false" fo:line-height="120%"/>
    </style:style>
    <style:style style:name="P52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55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57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58" style:family="paragraph" style:parent-style-name="Heading_20_3">
      <style:paragraph-properties fo:margin-top="0.353cm" fo:margin-bottom="0.159cm" style:contextual-spacing="false"/>
    </style:style>
    <style:style style:name="P59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0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P61" style:family="paragraph" style:parent-style-name="Standard">
      <style:paragraph-properties fo:margin-top="0.035cm" fo:margin-bottom="0.123cm" style:contextual-spacing="false" fo:line-height="115%"/>
    </style:style>
    <style:style style:name="P62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63" style:family="paragraph" style:parent-style-name="Standard">
      <style:paragraph-properties fo:margin-top="0.035cm" fo:margin-bottom="0.042cm" style:contextual-spacing="false" fo:line-height="120%"/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35cm" fo:margin-bottom="0.123cm" style:contextual-spacing="false" fo:line-height="115%"/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5" style:family="paragraph" style:parent-style-name="Standard">
      <style:paragraph-properties fo:margin-top="0.035cm" fo:margin-bottom="0.042cm" style:contextual-spacing="false" fo:line-height="120%"/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7" style:family="paragraph" style:parent-style-name="List_20_Paragraph" style:list-style-name="WWNum2">
      <style:paragraph-properties fo:margin-top="0.035cm" fo:margin-bottom="0.071cm" style:contextual-spacing="false" fo:line-height="117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9" style:family="paragraph" style:parent-style-name="Standard">
      <style:paragraph-properties fo:margin-top="0.035cm" fo:margin-bottom="0.042cm" style:contextual-spacing="false" fo:line-height="120%"/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0" style:family="paragraph" style:parent-style-name="Standard">
      <style:paragraph-properties fo:margin-top="0.035cm" fo:margin-bottom="0.042cm" style:contextual-spacing="false" fo:line-height="120%"/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5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6" style:family="text">
      <style:text-properties officeooo:rsid="0001c769"/>
    </style:style>
    <style:style style:name="T7" style:family="text">
      <style:text-properties fo:color="#ffea00" loext:opacity="100%" fo:background-color="#3d5afe" loext:char-shading-value="0"/>
    </style:style>
    <style:style style:name="T8" style:family="text">
      <style:text-properties fo:color="#ffea00" loext:opacity="100%" officeooo:rsid="0001c769" fo:background-color="#3d5afe" loext:char-shading-value="0"/>
    </style:style>
    <style:style style:name="T9" style:family="text">
      <style:text-properties officeooo:rsid="000526df"/>
    </style:style>
    <style:style style:name="T10" style:family="text">
      <style:text-properties officeooo:rsid="00071afa"/>
    </style:style>
    <style:style style:name="T11" style:family="text">
      <style:text-properties fo:color="#ffea00" loext:opacity="100%" fo:font-weight="bold" officeooo:rsid="00071afa" fo:background-color="#e65100" loext:char-shading-value="0" style:font-weight-asian="bold" style:font-weight-complex="bold"/>
    </style:style>
    <style:style style:name="T12" style:family="text">
      <style:text-properties fo:font-weight="bold" officeooo:rsid="00071afa" fo:background-color="#ffff00" loext:char-shading-value="0" style:font-weight-asian="bold" style:font-weight-complex="bold"/>
    </style:style>
    <style:style style:name="T13" style:family="text">
      <style:text-properties fo:color="#76ff03" loext:opacity="100%" fo:font-weight="bold" officeooo:rsid="00071afa" fo:background-color="#1b5e20" loext:char-shading-value="0" style:font-weight-asian="bold" style:font-weight-complex="bold"/>
    </style:style>
    <style:style style:name="T14" style:family="text">
      <style:text-properties officeooo:rsid="00076c48"/>
    </style:style>
    <style:style style:name="T15" style:family="text">
      <style:text-properties officeooo:rsid="00136646"/>
    </style:style>
    <style:style style:name="T16" style:family="text">
      <style:text-properties fo:color="#18ffff" loext:opacity="100%" fo:background-color="#d500f9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9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20" style:family="text">
      <style:text-properties fo:font-weight="bold" fo:background-color="#ffea00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3" style:family="text">
      <style:text-properties fo:background-color="#ffff00" loext:char-shading-value="0"/>
    </style:style>
    <style:style style:name="T24" style:family="text">
      <style:text-properties fo:color="#18ffff" loext:opacity="100%" fo:background-color="#d500f9" loext:char-shading-value="0"/>
    </style:style>
    <style:style style:name="T25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26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30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公職資訊類</text:p>
      <text:p text:style-name="P2">資訊管理・網路・資安・雲端</text:p>
      <text:p text:style-name="P3">完全整合終極筆記</text:p>
      <text:p text:style-name="P4"/>
      <text:p text:style-name="P5">超白話圖解 × 口訣速記 × 考試陷阱大全</text:p>
      <text:p text:style-name="P6">涵蓋八大主題・三十二個章節</text:p>
      <text:p text:style-name="P7">5G／IoT／V2X　•　網路基礎與傳輸協定</text:p>
      <text:p text:style-name="P7">資安風險管理　•　防火牆與攻防手法　•　身分驗證</text:p>
      <text:p text:style-name="P7">雲端運算　•　軟體工程　•　UML　•　測試</text:p>
      <text:p text:style-name="P7">PMBOK 專案管理　•　資訊委外　•　數位轉型</text:p>
      <text:p text:style-name="P7">電子商務　•　政府數位化　•　資訊倫理與素養</text:p>
      <text:p text:style-name="P8">本筆記由 14 份主題筆記整合而成，內容完整不刪減，語句重新潤飾</text:p>
      <text:p text:style-name="Standard"/>
      <text:h text:style-name="P9" text:outline-level="1">本筆記怎麼用？</text:h>
      <text:p text:style-name="P10"><text:span text:style-name="T1">這份筆記把你原本的 14 份主題筆記，整合、潤飾、重新編排成一份完整的考前總複習。最大的設計重點是：</text:span><text:span text:style-name="T2">所有要背的口訣與必背表格，全部集中在最前面的「考前速記區」</text:span><text:span text:style-name="T1">，方便你在考前快速翻閱、強迫記憶。</text:span></text:p>
      <text:h text:style-name="P11" text:outline-level="3">▍ 全書色塊代表的意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🔑 <text:s/>這是「口訣框」</text:p>
            <text:p text:style-name="P13">出現口訣框，就是要你「背起來」的速記字串。考前把這些口訣全部背熟，等於拿到一半的分數。</text:p>
          </table:table-cell>
        </table:table-row>
        <table:table-row table:style-name="表格1.1">
          <table:table-cell table:style-name="表格1.A2" office:value-type="string">
            <text:p text:style-name="P14">💡 <text:s/>重點</text:p>
            <text:p text:style-name="P13">這是「重點框」：補充說明、生活比喻、核心定義，幫你真正理解，而不是死背。</text:p>
          </table:table-cell>
        </table:table-row>
        <table:table-row table:style-name="表格1.1">
          <table:table-cell table:style-name="表格1.A3" office:value-type="string">
            <text:p text:style-name="P15">⭐ <text:s/>核心觀念</text:p>
            <text:p text:style-name="P13">這是「核心觀念框」：每個主題最關鍵、最容易考的定義，務必精準掌握。</text:p>
          </table:table-cell>
        </table:table-row>
        <table:table-row table:style-name="表格1.1">
          <table:table-cell table:style-name="表格1.A4" office:value-type="string">
            <text:p text:style-name="P16">⚠️ <text:s/>考試陷阱</text:p>
            <text:p text:style-name="P13">這是「陷阱框」：考試最愛用來混淆你的錯誤選項。看懂陷阱，就能避免失分。</text:p>
          </table:table-cell>
        </table:table-row>
      </table:table>
      <text:p text:style-name="P10"><text:span text:style-name="T3">建議讀法：</text:span><text:span text:style-name="T1">第一輪先讀完各章建立理解 → 第二輪只看「考前速記區」與各章口訣／陷阱框 → 考前一天只翻速記區。</text:span></text:p>
      <text:p text:style-name="Standard"/>
      <text:h text:style-name="P9" text:outline-level="1">目錄</text:h>
      <text:p text:style-name="P17">★ 考前速記區（口訣＋必背表格全收錄）</text:p>
      <text:p text:style-name="P18"><text:a xlink:type="simple" xlink:href="#bm_mnem" text:style-name="ListLabel_20_13" text:visited-style-name="ListLabel_20_13"><text:span text:style-name="T4">　A. 全書口訣總表（依類別整理）</text:span></text:a></text:p>
      <text:p text:style-name="P18"><text:a xlink:type="simple" xlink:href="#bm_tables" text:style-name="ListLabel_20_14" text:visited-style-name="ListLabel_20_14"><text:span text:style-name="T4">　B. 必背對照表大全（依類別整理）</text:span></text:a></text:p>
      <text:p text:style-name="P17">第一篇　網路與通訊技術</text:p>
      <text:p text:style-name="P18"><text:a xlink:type="simple" xlink:href="#bm_c1" text:style-name="ListLabel_20_15" text:visited-style-name="ListLabel_20_15"><text:span text:style-name="T4">第 1 章　5G 行動通訊</text:span></text:a></text:p>
      <text:p text:style-name="P18"><text:a xlink:type="simple" xlink:href="#bm_c2" text:style-name="ListLabel_20_16" text:visited-style-name="ListLabel_20_16"><text:span text:style-name="T4">第 2 章　IoT 物聯網</text:span></text:a></text:p>
      <text:p text:style-name="P18"><text:a xlink:type="simple" xlink:href="#bm_c3" text:style-name="ListLabel_20_17" text:visited-style-name="ListLabel_20_17"><text:span text:style-name="T4">第 3 章　V2X 車聯網</text:span></text:a></text:p>
      <text:p text:style-name="P18"><text:a xlink:type="simple" xlink:href="#bm_c4" text:style-name="ListLabel_20_18" text:visited-style-name="ListLabel_20_18"><text:span text:style-name="T4">第 4 章　網路基礎：ISP／IXP／PoP／OSPF</text:span></text:a></text:p>
      <text:p text:style-name="P18"><text:a xlink:type="simple" xlink:href="#bm_c5" text:style-name="ListLabel_20_19" text:visited-style-name="ListLabel_20_19"><text:span text:style-name="T4">第 5 章　傳輸協定：HTTP／HTTPS／SSL／TLS</text:span></text:a></text:p>
      <text:p text:style-name="P17">第二篇　資訊安全</text:p>
      <text:p text:style-name="P18"><text:a xlink:type="simple" xlink:href="#bm_c6" text:style-name="ListLabel_20_20" text:visited-style-name="ListLabel_20_20"><text:span text:style-name="T4">第 6 章　資安風險管理</text:span></text:a></text:p>
      <text:p text:style-name="P18"><text:a xlink:type="simple" xlink:href="#bm_c7" text:style-name="ListLabel_20_21" text:visited-style-name="ListLabel_20_21"><text:span text:style-name="T4">第 7 章　防火牆與網路防禦</text:span></text:a></text:p>
      <text:p text:style-name="P18"><text:a xlink:type="simple" xlink:href="#bm_c8" text:style-name="ListLabel_20_22" text:visited-style-name="ListLabel_20_22"><text:span text:style-name="T4">第 8 章　常見攻擊手法大全</text:span></text:a></text:p>
      <text:p text:style-name="P18"><text:a xlink:type="simple" xlink:href="#bm_c9" text:style-name="ListLabel_20_23" text:visited-style-name="ListLabel_20_23"><text:span text:style-name="T4">第 9 章　身分驗證與帳號管理</text:span></text:a></text:p>
      <text:p text:style-name="P18"><text:a xlink:type="simple" xlink:href="#bm_c10" text:style-name="ListLabel_20_24" text:visited-style-name="ListLabel_20_24"><text:span text:style-name="T4">第 10 章　VPN 完整解析</text:span></text:a></text:p>
      <text:p text:style-name="P18"><text:a xlink:type="simple" xlink:href="#bm_c11" text:style-name="ListLabel_20_25" text:visited-style-name="ListLabel_20_25"><text:span text:style-name="T4">第 11 章　Port 與 Cookie／Session</text:span></text:a></text:p>
      <text:p text:style-name="P18"><text:a xlink:type="simple" xlink:href="#bm_c12" text:style-name="ListLabel_20_26" text:visited-style-name="ListLabel_20_26"><text:span text:style-name="T4">第 12 章　資安事件應變處理流程</text:span></text:a></text:p>
      <text:p text:style-name="P18"><text:a xlink:type="simple" xlink:href="#bm_c13" text:style-name="ListLabel_20_27" text:visited-style-name="ListLabel_20_27"><text:span text:style-name="T4">第 13 章　BIA／RTO／RPO 營運持續</text:span></text:a></text:p>
      <text:p text:style-name="P18"><text:a xlink:type="simple" xlink:href="#bm_c14" text:style-name="ListLabel_20_28" text:visited-style-name="ListLabel_20_28"><text:span text:style-name="T4">第 14 章　弱點掃描・滲透測試・紅隊演練</text:span></text:a></text:p>
      <text:p text:style-name="P18"><text:a xlink:type="simple" xlink:href="#bm_c15" text:style-name="ListLabel_20_29" text:visited-style-name="ListLabel_20_29"><text:span text:style-name="T4">第 15 章　Linux 常用資安指令</text:span></text:a></text:p>
      <text:p text:style-name="P17">第三篇　雲端運算</text:p>
      <text:p text:style-name="P18"><text:a xlink:type="simple" xlink:href="#bm_c16" text:style-name="ListLabel_20_30" text:visited-style-name="ListLabel_20_30"><text:span text:style-name="T4">第 16 章　雲端五大特徵（NIST）</text:span></text:a></text:p>
      <text:p text:style-name="P18"><text:a xlink:type="simple" xlink:href="#bm_c17" text:style-name="ListLabel_20_31" text:visited-style-name="ListLabel_20_31"><text:span text:style-name="T4">第 17 章　三種部署模式與混合雲</text:span></text:a></text:p>
      <text:p text:style-name="P18"><text:a xlink:type="simple" xlink:href="#bm_c18" text:style-name="ListLabel_20_32" text:visited-style-name="ListLabel_20_32"><text:span text:style-name="T4">第 18 章　雲端服務模式 SaaS／PaaS／IaaS 與 API</text:span></text:a></text:p>
      <text:p text:style-name="P17">第四篇　軟體工程</text:p>
      <text:p text:style-name="P18"><text:a xlink:type="simple" xlink:href="#bm_c19" text:style-name="ListLabel_20_33" text:visited-style-name="ListLabel_20_33"><text:span text:style-name="T4">第 19 章　軟體開發四大模型</text:span></text:a></text:p>
      <text:p text:style-name="P18"><text:a xlink:type="simple" xlink:href="#bm_c20" text:style-name="ListLabel_20_34" text:visited-style-name="ListLabel_20_34"><text:span text:style-name="T4">第 20 章　敏捷方法：Scrum／Kanban／XP／Lean</text:span></text:a></text:p>
      <text:p text:style-name="P18"><text:a xlink:type="simple" xlink:href="#bm_c21" text:style-name="ListLabel_20_35" text:visited-style-name="ListLabel_20_35"><text:span text:style-name="T4">第 21 章　SSDLC 安全軟體開發生命週期</text:span></text:a></text:p>
      <text:p text:style-name="P18"><text:a xlink:type="simple" xlink:href="#bm_c22" text:style-name="ListLabel_20_36" text:visited-style-name="ListLabel_20_36"><text:span text:style-name="T4">第 22 章　黑箱測試 vs 白箱測試</text:span></text:a></text:p>
      <text:p text:style-name="P18"><text:a xlink:type="simple" xlink:href="#bm_c23" text:style-name="ListLabel_20_37" text:visited-style-name="ListLabel_20_37"><text:span text:style-name="T4">第 23 章　UML 六大圖</text:span></text:a></text:p>
      <text:p text:style-name="P17">第五篇　專案與資訊管理</text:p>
      <text:p text:style-name="P18"><text:a xlink:type="simple" xlink:href="#bm_c24" text:style-name="ListLabel_20_38" text:visited-style-name="ListLabel_20_38"><text:span text:style-name="T4">第 24 章　PMBOK 專案管理</text:span></text:a></text:p>
      <text:p text:style-name="P18"><text:a xlink:type="simple" xlink:href="#bm_c25" text:style-name="ListLabel_20_39" text:visited-style-name="ListLabel_20_39"><text:span text:style-name="T4">第 25 章　資訊委外管理</text:span></text:a></text:p>
      <text:p text:style-name="P19"><text:soft-page-break/><text:span text:style-name="T5">第六篇　數位轉型與電子商務</text:span></text:p>
      <text:p text:style-name="P18"><text:a xlink:type="simple" xlink:href="#bm_c26" text:style-name="ListLabel_20_40" text:visited-style-name="ListLabel_20_40"><text:span text:style-name="T4">第 26 章　數位轉型：資訊化／DX／雙軸轉型</text:span></text:a></text:p>
      <text:p text:style-name="P18"><text:a xlink:type="simple" xlink:href="#bm_c27" text:style-name="ListLabel_20_41" text:visited-style-name="ListLabel_20_41"><text:span text:style-name="T4">第 27 章　企業系統 ERP／CRM／SCM／POS</text:span></text:a></text:p>
      <text:p text:style-name="P18"><text:a xlink:type="simple" xlink:href="#bm_c28" text:style-name="ListLabel_20_42" text:visited-style-name="ListLabel_20_42"><text:span text:style-name="T4">第 28 章　電子商務概論</text:span></text:a></text:p>
      <text:p text:style-name="P17">第七篇　政府數位化與資訊倫理</text:p>
      <text:p text:style-name="P18"><text:a xlink:type="simple" xlink:href="#bm_c29" text:style-name="ListLabel_20_43" text:visited-style-name="ListLabel_20_43"><text:span text:style-name="T4">第 29 章　政府數位化概念</text:span></text:a></text:p>
      <text:p text:style-name="P18"><text:a xlink:type="simple" xlink:href="#bm_c30" text:style-name="ListLabel_20_44" text:visited-style-name="ListLabel_20_44"><text:span text:style-name="T4">第 30 章　KSF 關鍵成功因素與統計檢定</text:span></text:a></text:p>
      <text:p text:style-name="P18"><text:a xlink:type="simple" xlink:href="#bm_c31" text:style-name="ListLabel_20_45" text:visited-style-name="ListLabel_20_45"><text:span text:style-name="T4">第 31 章　資訊倫理四大概念</text:span></text:a></text:p>
      <text:p text:style-name="P18"><text:a xlink:type="simple" xlink:href="#bm_c32" text:style-name="ListLabel_20_46" text:visited-style-name="ListLabel_20_46"><text:span text:style-name="T4">第 32 章　假訊息與匿名／隱私</text:span></text:a></text:p>
      <text:p text:style-name="P17">★ 全書考試陷阱總整理</text:p>
      <text:p text:style-name="P18"><text:a xlink:type="simple" xlink:href="#bm_traps" text:style-name="ListLabel_20_47" text:visited-style-name="ListLabel_20_47"><text:span text:style-name="T4">　易混淆觀念一次掃除</text:span></text:a></text:p>
      <text:p text:style-name="Standard"/>
      <text:h text:style-name="P9" text:outline-level="1"><text:bookmark-start text:name="bm_mnem"/>考前速記區 A　全書口訣總表<text:bookmark-end text:name="bm_mnem"/></text:h>
      <text:p text:style-name="P20">這一頁是全書精華。把下面每一條口訣背到反射，考場上看到關鍵字就能立刻對應答案。</text:p>
      <text:h text:style-name="P21" text:outline-level="2">▍一、網路與通訊類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🔑 <text:s/>5G／IoT／DX 終極口訣</text:p>
            <text:p text:style-name="P22">「5G 快連萬物，IoT 自動感測，DX 讓 AI 自己決定」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3">主題</text:p>
          </table:table-cell>
          <table:table-cell table:style-name="表格2.A2" office:value-type="string">
            <text:p text:style-name="P23">口訣／速記</text:p>
          </table:table-cell>
          <table:table-cell table:style-name="表格2.A2" office:value-type="string">
            <text:p text:style-name="P23">展開說明</text:p>
          </table:table-cell>
        </table:table-row>
        <table:table-row table:style-name="表格2.1">
          <table:table-cell table:style-name="表格2.A3" office:value-type="string">
            <text:p text:style-name="P24">5G 三大特點</text:p>
          </table:table-cell>
          <table:table-cell table:style-name="表格2.A3" office:value-type="string">
            <text:p text:style-name="P25">高速、低延遲、大量連線</text:p>
          </table:table-cell>
          <table:table-cell table:style-name="表格2.A3" office:value-type="string">
            <text:p text:style-name="P24">eMBB 高速度／URLLC 超低延遲／mMTC 大量連線</text:p>
          </table:table-cell>
        </table:table-row>
        <table:table-row table:style-name="表格2.1">
          <table:table-cell table:style-name="表格2.A4" office:value-type="string">
            <text:p text:style-name="P24">IoT 四步驟</text:p>
          </table:table-cell>
          <table:table-cell table:style-name="表格2.A4" office:value-type="string">
            <text:p text:style-name="P25">感測(收集現實資料) → 傳輸<text:span text:style-name="T6">(透過 5G 網路送出)</text:span> → 分析<text:span text:style-name="T6">(系統或 AI 判斷)</text:span> → <text:span text:style-name="T7">控制</text:span><text:span text:style-name="T8">(執行自動動作)</text:span></text:p>
          </table:table-cell>
          <table:table-cell table:style-name="表格2.A4" office:value-type="string">
            <text:p text:style-name="P24">物聯網永遠都在做的四件事</text:p>
          </table:table-cell>
        </table:table-row>
        <table:table-row table:style-name="表格2.1">
          <table:table-cell table:style-name="表格2.A3" office:value-type="string">
            <text:p text:style-name="P24">V2X 四子項</text:p>
          </table:table-cell>
          <table:table-cell table:style-name="表格2.A3" office:value-type="string">
            <text:p text:style-name="P25">V2V／V2I／V2P／V2N</text:p>
          </table:table-cell>
          <table:table-cell table:style-name="表格2.A3" office:value-type="string">
            <text:p text:style-name="P24">車對車／車對設施／車對行人／車對網路</text:p>
          </table:table-cell>
        </table:table-row>
        <table:table-row table:style-name="表格2.1">
          <table:table-cell table:style-name="表格2.A4" office:value-type="string">
            <text:p text:style-name="P24">上網三節點</text:p>
          </table:table-cell>
          <table:table-cell table:style-name="表格2.A4" office:value-type="string">
            <text:p text:style-name="P26">PoP 讓你接 → ISP 給你網 → IXP 幫互連<text:span text:style-name="T9">(PoP（Point of Presence，接入點） 負責接你進來，ISP（Internet Service Provider，網際網路服務供應商）負責提供網路服務，IXP（Internet Exchange Point，網際網路交換中心）負責讓不同 ISP 互相交換流量。)</text:span></text:p>
          </table:table-cell>
          <table:table-cell table:style-name="表格2.A4" office:value-type="string">
            <text:p text:style-name="P27">從你家連到全世界的順序<text:span text:style-name="T10">(1. ISP </text:span><text:span text:style-name="T11">在各地設置的「服務據點」</text:span><text:span text:style-name="T10">。例如你家申請中華電信光纖。</text:span><text:span text:style-name="T12">你家的光纖不會直接拉到中華電信總公司。而是先接到離你最近的機房。</text:span><text:span text:style-name="T13">這個機房就是 PoP</text:span><text:span text:style-name="T10">。PoP = 讓你接進 ISP 網路的入口。2. ISP = 真正提供你上網服務的公司。 </text:span><text:span text:style-name="T14">3.交換中心，讓不同 ISP 互連</text:span><text:span text:style-name="T10">。)</text:span></text:p>
          </table:table-cell>
        </table:table-row>
        <table:table-row table:style-name="表格2.1">
          <table:table-cell table:style-name="表格2.A3" office:value-type="string">
            <text:p text:style-name="P24">HTTP vs HTTPS</text:p>
          </table:table-cell>
          <table:table-cell table:style-name="表格2.A3" office:value-type="string">
            <text:p text:style-name="P25">HTTP 沒鎖=明信片；HTTPS 有鎖=保險箱</text:p>
          </table:table-cell>
          <table:table-cell table:style-name="表格2.A3" office:value-type="string">
            <text:p text:style-name="P24">SSL／TLS 就是那把鎖</text:p>
          </table:table-cell>
        </table:table-row>
        <table:table-row table:style-name="表格2.1">
          <table:table-cell table:style-name="表格2.A4" office:value-type="string">
            <text:p text:style-name="P24">OSPF</text:p>
          </table:table-cell>
          <table:table-cell table:style-name="表格2.A4" office:value-type="string">
            <text:p text:style-name="P25">網路世界的 Google Maps，找最短路</text:p>
          </table:table-cell>
          <table:table-cell table:style-name="表格2.A4" office:value-type="string">
            <text:p text:style-name="P24">路由協定，工作在 OSI 第三層（網路層）</text:p>
          </table:table-cell>
        </table:table-row>
      </table:table>
      <text:h text:style-name="P21" text:outline-level="2">▍二、資訊安全類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23">主題</text:p>
            </table:table-cell>
            <table:table-cell table:style-name="表格3.A1" office:value-type="string">
              <text:p text:style-name="P23">口訣／速記</text:p>
            </table:table-cell>
            <table:table-cell table:style-name="表格3.A1" office:value-type="string">
              <text:p text:style-name="P23">展開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風險公式</text:p>
          </table:table-cell>
          <table:table-cell table:style-name="表格3.A2" office:value-type="string">
            <text:p text:style-name="P28">財 ＋ 壞 ＋ 洞 ＝ 出事</text:p>
          </table:table-cell>
          <table:table-cell table:style-name="表格3.A2" office:value-type="string">
            <text:p text:style-name="P24">資產價值 × 威脅 × 弱點 ＝ 風險</text:p>
          </table:table-cell>
        </table:table-row>
        <table:table-row table:style-name="表格3.1">
          <table:table-cell table:style-name="表格3.A3" office:value-type="string">
            <text:p text:style-name="P24">CIA 三元素</text:p>
          </table:table-cell>
          <table:table-cell table:style-name="表格3.A3" office:value-type="string">
            <text:p text:style-name="P25">偷 → 改 → 掛</text:p>
          </table:table-cell>
          <table:table-cell table:style-name="表格3.A3" office:value-type="string">
            <text:p text:style-name="P24">機密性(C)／完整性(I)／可用性(A)</text:p>
          </table:table-cell>
        </table:table-row>
        <table:table-row table:style-name="表格3.1">
          <table:table-cell table:style-name="表格3.A2" office:value-type="string">
            <text:p text:style-name="P24">風險管理四步驟</text:p>
          </table:table-cell>
          <table:table-cell table:style-name="表格3.A2" office:value-type="string">
            <text:p text:style-name="P29">先找問題<text:span text:style-name="T15">(盤點所有資產，列出潛在威脅清單，找出系統中可能存在的弱點)</text:span> → 思考嚴重程度 → 依嚴重程度排優先順序 → <text:span text:style-name="T16">選擇適當的處理策略</text:span></text:p>
          </table:table-cell>
          <table:table-cell table:style-name="表格3.A2" office:value-type="string">
            <text:p text:style-name="P24">辨識 → 分析 → 評量 → <text:span text:style-name="T17">處理</text:span></text:p>
          </table:table-cell>
        </table:table-row>
        <table:table-row table:style-name="表格3.1">
          <table:table-cell table:style-name="表格3.A3" office:value-type="string">
            <text:p text:style-name="P30">四種風險處理策略</text:p>
          </table:table-cell>
          <table:table-cell table:style-name="表格3.A3" office:value-type="string">
            <text:p text:style-name="P25">避 → 降 → 轉 → A</text:p>
          </table:table-cell>
          <table:table-cell table:style-name="表格3.A3" office:value-type="string">
            <text:p text:style-name="P24">Avoid 避免／Mitigate 降低／Transfer 轉移／Accept 接受</text:p>
          </table:table-cell>
        </table:table-row>
        <text:soft-page-break/>
        <table:table-row table:style-name="表格3.1">
          <table:table-cell table:style-name="表格3.A2" office:value-type="string">
            <text:p text:style-name="P24">防火牆四大功能</text:p>
          </table:table-cell>
          <table:table-cell table:style-name="表格3.A2" office:value-type="string">
            <text:p text:style-name="P25">擋、藏、捉、記</text:p>
          </table:table-cell>
          <table:table-cell table:style-name="表格3.A2" office:value-type="string">
            <text:p text:style-name="P24">封包過濾／NAT／IDS-IPS／Log</text:p>
          </table:table-cell>
        </table:table-row>
        <table:table-row table:style-name="表格3.1">
          <table:table-cell table:style-name="表格3.A3" office:value-type="string">
            <text:p text:style-name="P24">勒索軟體七防護</text:p>
          </table:table-cell>
          <table:table-cell table:style-name="表格3.A3" office:value-type="string">
            <text:p text:style-name="P25">備、更、多、端、教、切、救</text:p>
          </table:table-cell>
          <table:table-cell table:style-name="表格3.A3" office:value-type="string">
            <text:p text:style-name="P24">備份／更新／MFA(多)／EDR(端)／教育／網路切割／應變救援</text:p>
          </table:table-cell>
        </table:table-row>
        <table:table-row table:style-name="表格3.1">
          <table:table-cell table:style-name="表格3.A2" office:value-type="string">
            <text:p text:style-name="P24">弱點掃描流程</text:p>
          </table:table-cell>
          <table:table-cell table:style-name="表格3.A2" office:value-type="string">
            <text:p text:style-name="P25">找 → 評 → 修 or 補</text:p>
          </table:table-cell>
          <table:table-cell table:style-name="表格3.A2" office:value-type="string">
            <text:p text:style-name="P24">找漏洞 → 評風險 → 直接修補 or 補償控制</text:p>
          </table:table-cell>
        </table:table-row>
        <table:table-row table:style-name="表格3.1">
          <table:table-cell table:style-name="表格3.A3" office:value-type="string">
            <text:p text:style-name="P24">IDS vs IPS</text:p>
          </table:table-cell>
          <table:table-cell table:style-name="表格3.A3" office:value-type="string">
            <text:p text:style-name="P25">IDS 只叫不擋；IPS 主動攔截</text:p>
          </table:table-cell>
          <table:table-cell table:style-name="表格3.A3" office:value-type="string">
            <text:p text:style-name="P24">偵測 Detection vs 防禦 Prevention</text:p>
          </table:table-cell>
        </table:table-row>
        <table:table-row table:style-name="表格3.1">
          <table:table-cell table:style-name="表格3.A2" office:value-type="string">
            <text:p text:style-name="P24">DDoS 防禦</text:p>
          </table:table-cell>
          <table:table-cell table:style-name="表格3.A2" office:value-type="string">
            <text:p text:style-name="P25">防（防火牆）→ C（CDN）→ 清（清洗中心）→ 擴（擴頻寬）</text:p>
          </table:table-cell>
          <table:table-cell table:style-name="表格3.A2" office:value-type="string">
            <text:p text:style-name="P31">防火牆規則先阻擋明顯異常流量。／<text:span text:style-name="T17">使用 CDN 分散與吸收攻擊流量。</text:span>／若攻擊規模更大，啟用 <text:span text:style-name="T18">流量清洗服務 </text:span>過濾惡意流量。／最後透過 頻寬擴充（增加網路容量）提高整體抗壓能力。</text:p>
          </table:table-cell>
        </table:table-row>
        <table:table-row table:style-name="表格3.1">
          <table:table-cell table:style-name="表格3.A3" office:value-type="string">
            <text:p text:style-name="P24">事件應變流程</text:p>
          </table:table-cell>
          <table:table-cell table:style-name="表格3.A3" office:value-type="string">
            <text:p text:style-name="P32">報 → 擋 → 復 → 改</text:p>
          </table:table-cell>
          <table:table-cell table:style-name="表格3.A3" office:value-type="string">
            <text:p text:style-name="P24">通報 → 應變(止血) → 復原 → 檢討</text:p>
          </table:table-cell>
        </table:table-row>
        <table:table-row table:style-name="表格3.1">
          <table:table-cell table:style-name="表格3.A2" office:value-type="string">
            <text:p text:style-name="P24">身分驗證四類型</text:p>
          </table:table-cell>
          <table:table-cell table:style-name="表格3.A2" office:value-type="string">
            <text:p text:style-name="P25">知 有 生 行</text:p>
          </table:table-cell>
          <table:table-cell table:style-name="表格3.A2" office:value-type="string">
            <text:p text:style-name="P33"><text:span text:style-name="T19">知識</text:span>(<text:span text:style-name="T20">密碼、PIN 碼、安全問題)</text:span>／<text:span text:style-name="T19">持有</text:span>(<text:span text:style-name="T20">手機、金融卡</text:span>)／<text:span text:style-name="T19">生物特徵</text:span>(<text:span text:style-name="T20">指紋、臉部辨識、虹膜</text:span>)／<text:span text:style-name="T19">行為習慣</text:span>(<text:span text:style-name="T20">打字速度、滑鼠移動習慣</text:span>)</text:p>
          </table:table-cell>
        </table:table-row>
        <table:table-row table:style-name="表格3.1">
          <table:table-cell table:style-name="表格3.A3" office:value-type="string">
            <text:p text:style-name="P24">帳號生命週期</text:p>
          </table:table-cell>
          <table:table-cell table:style-name="表格3.A3" office:value-type="string">
            <text:p text:style-name="P25">生 改 停</text:p>
          </table:table-cell>
          <table:table-cell table:style-name="表格3.A3" office:value-type="string">
            <text:p text:style-name="P24">建立 → 修改 → 停用</text:p>
          </table:table-cell>
        </table:table-row>
        <table:table-row table:style-name="表格3.1">
          <table:table-cell table:style-name="表格3.A2" office:value-type="string">
            <text:p text:style-name="P24">SSDLC 五階段</text:p>
          </table:table-cell>
          <table:table-cell table:style-name="表格3.A2" office:value-type="string">
            <text:p text:style-name="P25">需 設 開 測 維</text:p>
          </table:table-cell>
          <table:table-cell table:style-name="表格3.A2" office:value-type="string">
            <text:p text:style-name="P24">需求 → 設計 → 開發 → 測試 → 維運</text:p>
          </table:table-cell>
        </table:table-row>
        <table:table-row table:style-name="表格3.1">
          <table:table-cell table:style-name="表格3.A3" office:value-type="string">
            <text:p text:style-name="P24">黑箱 vs 白箱</text:p>
          </table:table-cell>
          <table:table-cell table:style-name="表格3.A3" office:value-type="string">
            <text:p text:style-name="P25">黑看外(結果)，白看內(邏輯)</text:p>
          </table:table-cell>
          <table:table-cell table:style-name="表格3.A3" office:value-type="string">
            <text:p text:style-name="P24"><text:span text:style-name="T21">黑箱看輸入輸出</text:span>；<text:span text:style-name="T22">白箱看程式邏輯與分支覆蓋</text:span></text:p>
          </table:table-cell>
        </table:table-row>
        <table:table-row table:style-name="表格3.1">
          <table:table-cell table:style-name="表格3.A2" office:value-type="string">
            <text:p text:style-name="P24">UML 六圖</text:p>
          </table:table-cell>
          <table:table-cell table:style-name="表格3.A2" office:value-type="string">
            <text:p text:style-name="P34">物 → 模 → 位 → 功 → 序 → 流</text:p>
          </table:table-cell>
          <table:table-cell table:style-name="表格3.A2" office:value-type="string">
            <text:p text:style-name="P24">類別／元件／部署／案例／循序／活動</text:p>
          </table:table-cell>
        </table:table-row>
        <table:table-row table:style-name="表格3.1">
          <table:table-cell table:style-name="表格3.A3" office:value-type="string">
            <text:p text:style-name="P24">RTO vs RPO</text:p>
          </table:table-cell>
          <table:table-cell table:style-name="表格3.A3" office:value-type="string">
            <text:p text:style-name="P25">RTO 看 Time；RPO 看 Point</text:p>
          </table:table-cell>
          <table:table-cell table:style-name="表格3.A3" office:value-type="string">
            <text:p text:style-name="P24">RTO 多久恢復；RPO 能丟多少資料</text:p>
          </table:table-cell>
        </table:table-row>
      </table:table>
      <text:h text:style-name="P21" text:outline-level="2">▍三、雲端運算類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2">🔑 <text:s/>雲端五大特徵（NIST）</text:p>
            <text:p text:style-name="P22">「<text:span text:style-name="T23">自 · 廣 · 池 · 彈 · 量</text:span>」</text:p>
            <text:p text:style-name="P35">自助取用／廣泛網路存取／資源池化／快速彈性／可量測服務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23">主題</text:p>
          </table:table-cell>
          <table:table-cell table:style-name="表格4.A2" office:value-type="string">
            <text:p text:style-name="P23">口訣／速記</text:p>
          </table:table-cell>
          <table:table-cell table:style-name="表格4.A2" office:value-type="string">
            <text:p text:style-name="P23">展開說明</text:p>
          </table:table-cell>
        </table:table-row>
        <table:table-row table:style-name="表格4.1">
          <table:table-cell table:style-name="表格4.A3" office:value-type="string">
            <text:p text:style-name="P24">雲端五大特徵</text:p>
          </table:table-cell>
          <table:table-cell table:style-name="表格4.A3" office:value-type="string">
            <text:p text:style-name="P25">自 · 廣 · 池 · 彈 · 量</text:p>
          </table:table-cell>
          <table:table-cell table:style-name="表格4.A3" office:value-type="string">
            <text:p text:style-name="P24">On-demand／Broad Access／Pooling／Elasticity／Measured</text:p>
          </table:table-cell>
        </table:table-row>
        <table:table-row table:style-name="表格4.1">
          <table:table-cell table:style-name="表格4.A4" office:value-type="string">
            <text:p text:style-name="P24">三種部署模式</text:p>
          </table:table-cell>
          <table:table-cell table:style-name="表格4.A4" office:value-type="string">
            <text:p text:style-name="P25">自建 → 私有 → 公有 → <text:span text:style-name="T24">混合</text:span></text:p>
          </table:table-cell>
          <table:table-cell table:style-name="表格4.A4" office:value-type="string">
            <text:p text:style-name="P24">機密程度越高越往左；混合雲是現代主流</text:p>
          </table:table-cell>
        </table:table-row>
        <table:table-row table:style-name="表格4.1">
          <table:table-cell table:style-name="表格4.A3" office:value-type="string">
            <text:p text:style-name="P24">三種服務模式</text:p>
          </table:table-cell>
          <table:table-cell table:style-name="表格4.A3" office:value-type="string">
            <text:p text:style-name="P25">IaaS 基礎／PaaS 平台／SaaS 軟體</text:p>
          </table:table-cell>
          <table:table-cell table:style-name="表格4.A3" office:value-type="string">
            <text:p text:style-name="P24">租的層級越高，自己要管的越少</text:p>
          </table:table-cell>
        </table:table-row>
      </table:table>
      <text:h text:style-name="P21" text:outline-level="2"><text:soft-page-break/>▍四、軟體工程與專案管理類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23">主題</text:p>
            </table:table-cell>
            <table:table-cell table:style-name="表格5.A1" office:value-type="string">
              <text:p text:style-name="P23">口訣／速記</text:p>
            </table:table-cell>
            <table:table-cell table:style-name="表格5.A1" office:value-type="string">
              <text:p text:style-name="P23">展開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4">PMBOK 五大流程</text:p>
          </table:table-cell>
          <table:table-cell table:style-name="表格5.A2" office:value-type="string">
            <text:p text:style-name="P25">起 → 計 → 做 → 控 → 收</text:p>
          </table:table-cell>
          <table:table-cell table:style-name="表格5.A2" office:value-type="string">
            <text:p text:style-name="P24">起始→計畫→執行→監控→結案（口訣：起床計畫做事控制收工）</text:p>
          </table:table-cell>
        </table:table-row>
        <table:table-row table:style-name="表格5.1">
          <table:table-cell table:style-name="表格5.A3" office:value-type="string">
            <text:p text:style-name="P24">資訊委外六階段</text:p>
          </table:table-cell>
          <table:table-cell table:style-name="表格5.A3" office:value-type="string">
            <text:p text:style-name="P25">計 → 招 → 決 → 履 → 驗 → 保</text:p>
          </table:table-cell>
          <table:table-cell table:style-name="表格5.A3" office:value-type="string">
            <text:p text:style-name="P24">計畫→招標→決標→履約→驗收→保固</text:p>
          </table:table-cell>
        </table:table-row>
        <table:table-row table:style-name="表格5.1">
          <table:table-cell table:style-name="表格5.A2" office:value-type="string">
            <text:p text:style-name="P24">軟體四大模型</text:p>
          </table:table-cell>
          <table:table-cell table:style-name="表格5.A2" office:value-type="string">
            <text:p text:style-name="P25">瀑布／雛型／漸增／敏捷</text:p>
          </table:table-cell>
          <table:table-cell table:style-name="表格5.A2" office:value-type="string">
            <text:p text:style-name="P24">線性／先做原型／分段加功能／短週期迭代</text:p>
          </table:table-cell>
        </table:table-row>
        <table:table-row table:style-name="表格5.1">
          <table:table-cell table:style-name="表格5.A3" office:value-type="string">
            <text:p text:style-name="P24">Scrum 本質</text:p>
          </table:table-cell>
          <table:table-cell table:style-name="表格5.A3" office:value-type="string">
            <text:p text:style-name="P25">Scrum = Iterative + Incremental</text:p>
          </table:table-cell>
          <table:table-cell table:style-name="表格5.A3" office:value-type="string">
            <text:p text:style-name="P24">反覆修正(迭代) ＋ 分段交付(漸增)</text:p>
          </table:table-cell>
        </table:table-row>
        <table:table-row table:style-name="表格5.1">
          <table:table-cell table:style-name="表格5.A2" office:value-type="string">
            <text:p text:style-name="P24">XP 核心</text:p>
          </table:table-cell>
          <table:table-cell table:style-name="表格5.A2" office:value-type="string">
            <text:p text:style-name="P25">TDD＋結對＋持續整合＋簡單設計</text:p>
          </table:table-cell>
          <table:table-cell table:style-name="表格5.A2" office:value-type="string">
            <text:p text:style-name="P24">工程技術品質最高的敏捷方法</text:p>
          </table:table-cell>
        </table:table-row>
        <table:table-row table:style-name="表格5.1">
          <table:table-cell table:style-name="表格5.A3" office:value-type="string">
            <text:p text:style-name="P24">Lean 核心</text:p>
          </table:table-cell>
          <table:table-cell table:style-name="表格5.A3" office:value-type="string">
            <text:p text:style-name="P25">消除浪費 ＋ MVP 最小可行產品</text:p>
          </table:table-cell>
          <table:table-cell table:style-name="表格5.A3" office:value-type="string">
            <text:p text:style-name="P24">用最少投入換最多學習</text:p>
          </table:table-cell>
        </table:table-row>
      </table:table>
      <text:h text:style-name="P21" text:outline-level="2">▍五、數位轉型與電子商務類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2">🔑 <text:s/>數位轉型終極口訣（7 字）</text:p>
            <text:p text:style-name="P36">「電 · 改 · 雙 · 企 · 客 · 物流 · 收銀」</text:p>
            <text:p text:style-name="P13">電=資訊化　改=DX　雙=雙軸轉型　企=ERP　客=CRM　物流=SCM　收銀=POS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2">🔑 <text:s/>電子商務一句貫通</text:p>
            <text:p text:style-name="P37">「價值鏈做流程，SIS 搶市場，TCT 降成本，網效靠人多，C2B 反過來，反拍供商殺價，KSF 找關鍵。」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23">主題</text:p>
          </table:table-cell>
          <table:table-cell table:style-name="表格6.A3" office:value-type="string">
            <text:p text:style-name="P23">口訣／速記</text:p>
          </table:table-cell>
          <table:table-cell table:style-name="表格6.A3" office:value-type="string">
            <text:p text:style-name="P23">展開說明</text:p>
          </table:table-cell>
        </table:table-row>
        <table:table-row table:style-name="表格6.1">
          <table:table-cell table:style-name="表格6.A4" office:value-type="string">
            <text:p text:style-name="P24">資訊化 vs DX</text:p>
          </table:table-cell>
          <table:table-cell table:style-name="表格6.A4" office:value-type="string">
            <text:p text:style-name="P25">資訊化=換電腦；DX=換腦袋</text:p>
          </table:table-cell>
          <table:table-cell table:style-name="表格6.A4" office:value-type="string">
            <text:p text:style-name="P24">資訊化只改工具；DX 改流程＋思維＋商業模式</text:p>
          </table:table-cell>
        </table:table-row>
        <table:table-row table:style-name="表格6.1">
          <table:table-cell table:style-name="表格6.A5" office:value-type="string">
            <text:p text:style-name="P24">雙軸轉型 Twin</text:p>
          </table:table-cell>
          <table:table-cell table:style-name="表格6.A5" office:value-type="string">
            <text:p text:style-name="P25">DX ＋ SX 一起做</text:p>
          </table:table-cell>
          <table:table-cell table:style-name="表格6.A5" office:value-type="string">
            <text:p text:style-name="P24">數位轉型 ＋ 永續(ESG)，缺一軸就不算</text:p>
          </table:table-cell>
        </table:table-row>
        <table:table-row table:style-name="表格6.1">
          <table:table-cell table:style-name="表格6.A4" office:value-type="string">
            <text:p text:style-name="P24">四大企業系統</text:p>
          </table:table-cell>
          <table:table-cell table:style-name="表格6.A4" office:value-type="string">
            <text:p text:style-name="P25">ERP 管公司／CRM 管客戶／SCM 管物流／POS 管收銀</text:p>
          </table:table-cell>
          <table:table-cell table:style-name="表格6.A4" office:value-type="string">
            <text:p text:style-name="P24">用「管什麼」一秒區分</text:p>
          </table:table-cell>
        </table:table-row>
        <table:table-row table:style-name="表格6.1">
          <table:table-cell table:style-name="表格6.A5" office:value-type="string">
            <text:p text:style-name="P24">Porter 價值鏈</text:p>
          </table:table-cell>
          <table:table-cell table:style-name="表格6.A5" office:value-type="string">
            <text:p text:style-name="P25">進營出銷服，基人技採（補）</text:p>
          </table:table-cell>
          <table:table-cell table:style-name="表格6.A5" office:value-type="string">
            <text:p text:style-name="P24">主要：進貨→營運→出貨→行銷→售後；支援：基礎設施／人資／技術／採購</text:p>
          </table:table-cell>
        </table:table-row>
      </table:table>
      <text:h text:style-name="P21" text:outline-level="2"><text:soft-page-break/>▍六、政府數位化與資訊倫理類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主題</text:p>
            </table:table-cell>
            <table:table-cell table:style-name="表格7.A1" office:value-type="string">
              <text:p text:style-name="P23">口訣／速記</text:p>
            </table:table-cell>
            <table:table-cell table:style-name="表格7.A1" office:value-type="string">
              <text:p text:style-name="P23">展開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政府數位化流程</text:p>
          </table:table-cell>
          <table:table-cell table:style-name="表格7.A2" office:value-type="string">
            <text:p text:style-name="P25">蒐 → 科 → 跨 → 公 → 民</text:p>
          </table:table-cell>
          <table:table-cell table:style-name="表格7.A2" office:value-type="string">
            <text:p text:style-name="P24">蒐集數據→科技分析→跨機關整合→開放公共資料→My Data 個人自主</text:p>
          </table:table-cell>
        </table:table-row>
        <table:table-row table:style-name="表格7.1">
          <table:table-cell table:style-name="表格7.A3" office:value-type="string">
            <text:p text:style-name="P24">KSF 分析五步</text:p>
          </table:table-cell>
          <table:table-cell table:style-name="表格7.A3" office:value-type="string">
            <text:p text:style-name="P25">定 → 找 → 篩 → 量 → 做</text:p>
          </table:table-cell>
          <table:table-cell table:style-name="表格7.A3" office:value-type="string">
            <text:p text:style-name="P24">定目標→找因素→篩關鍵→量指標→做計畫</text:p>
          </table:table-cell>
        </table:table-row>
        <table:table-row table:style-name="表格7.1">
          <table:table-cell table:style-name="表格7.A2" office:value-type="string">
            <text:p text:style-name="P24">統計三兄弟</text:p>
          </table:table-cell>
          <table:table-cell table:style-name="表格7.A2" office:value-type="string">
            <text:p text:style-name="P25">Z 大、t 小、ANOVA 多</text:p>
          </table:table-cell>
          <table:table-cell table:style-name="表格7.A2" office:value-type="string">
            <text:p text:style-name="P24">Z=大樣本或母體變異數已知；t=小樣本(兩組)；ANOVA=三組以上</text:p>
          </table:table-cell>
        </table:table-row>
        <table:table-row table:style-name="表格7.1">
          <table:table-cell table:style-name="表格7.A3" office:value-type="string">
            <text:p text:style-name="P24">資訊倫理四概念</text:p>
          </table:table-cell>
          <table:table-cell table:style-name="表格7.A3" office:value-type="string">
            <text:p text:style-name="P25">做、查、罰、程序</text:p>
          </table:table-cell>
          <table:table-cell table:style-name="表格7.A3" office:value-type="string">
            <text:p text:style-name="P24">責任→問責→法律責任→正當程序</text:p>
          </table:table-cell>
        </table:table-row>
        <table:table-row table:style-name="表格7.1">
          <table:table-cell table:style-name="表格7.A2" office:value-type="string">
            <text:p text:style-name="P24">假訊息三類型</text:p>
          </table:table-cell>
          <table:table-cell table:style-name="表格7.A2" office:value-type="string">
            <text:p text:style-name="P25">假故意、錯無心、操有目的</text:p>
          </table:table-cell>
          <table:table-cell table:style-name="表格7.A2" office:value-type="string">
            <text:p text:style-name="P24">Fake News／Misinformation／Disinformation</text:p>
          </table:table-cell>
        </table:table-row>
        <table:table-row table:style-name="表格7.1">
          <table:table-cell table:style-name="表格7.A3" office:value-type="string">
            <text:p text:style-name="P24">匿名 vs 隱私</text:p>
          </table:table-cell>
          <table:table-cell table:style-name="表格7.A3" office:value-type="string">
            <text:p text:style-name="P25">匿名藏人，隱私藏資料</text:p>
          </table:table-cell>
          <table:table-cell table:style-name="表格7.A3" office:value-type="string">
            <text:p text:style-name="P24">匿名是「手段」；隱私是「權利」</text:p>
          </table:table-cell>
        </table:table-row>
      </table:table>
      <text:p text:style-name="Standard"/>
      <text:h text:style-name="P9" text:outline-level="1"><text:bookmark-start text:name="bm_tables"/>考前速記區 B　必背對照表大全<text:bookmark-end text:name="bm_tables"/></text:h>
      <text:p text:style-name="P20">把下面這些表格直接「拍進腦袋」。每一張都是歷年考試最常出題的核心對照。</text:p>
      <text:h text:style-name="P11" text:outline-level="3">▍ 表 1　5G 三大核心特點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23">特點</text:p>
            </table:table-cell>
            <table:table-cell table:style-name="表格8.A1" office:value-type="string">
              <text:p text:style-name="P23">技術名稱</text:p>
            </table:table-cell>
            <table:table-cell table:style-name="表格8.A1" office:value-type="string">
              <text:p text:style-name="P23">白話說明</text:p>
            </table:table-cell>
            <table:table-cell table:style-name="表格8.A1" office:value-type="string">
              <text:p text:style-name="P23">4G</text:p>
            </table:table-cell>
            <table:table-cell table:style-name="表格8.A1" office:value-type="string">
              <text:p text:style-name="P23">5G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4">高速度</text:p>
          </table:table-cell>
          <table:table-cell table:style-name="表格8.A2" office:value-type="string">
            <text:p text:style-name="P24">eMBB</text:p>
          </table:table-cell>
          <table:table-cell table:style-name="表格8.A2" office:value-type="string">
            <text:p text:style-name="P24">傳影片、資料超快</text:p>
          </table:table-cell>
          <table:table-cell table:style-name="表格8.A2" office:value-type="string">
            <text:p text:style-name="P24">約 100 Mbps</text:p>
          </table:table-cell>
          <table:table-cell table:style-name="表格8.A2" office:value-type="string">
            <text:p text:style-name="P24">約 10 Gbps</text:p>
          </table:table-cell>
        </table:table-row>
        <table:table-row table:style-name="表格8.1">
          <table:table-cell table:style-name="表格8.A3" office:value-type="string">
            <text:p text:style-name="P24">超低延遲</text:p>
          </table:table-cell>
          <table:table-cell table:style-name="表格8.A3" office:value-type="string">
            <text:p text:style-name="P24">URLLC</text:p>
          </table:table-cell>
          <table:table-cell table:style-name="表格8.A3" office:value-type="string">
            <text:p text:style-name="P24">命令幾乎即時反應</text:p>
          </table:table-cell>
          <table:table-cell table:style-name="表格8.A3" office:value-type="string">
            <text:p text:style-name="P24">30–50 ms</text:p>
          </table:table-cell>
          <table:table-cell table:style-name="表格8.A3" office:value-type="string">
            <text:p text:style-name="P24">&lt; 1 ms</text:p>
          </table:table-cell>
        </table:table-row>
        <table:table-row table:style-name="表格8.1">
          <table:table-cell table:style-name="表格8.A2" office:value-type="string">
            <text:p text:style-name="P24">大量連線</text:p>
          </table:table-cell>
          <table:table-cell table:style-name="表格8.A2" office:value-type="string">
            <text:p text:style-name="P24">mMTC</text:p>
          </table:table-cell>
          <table:table-cell table:style-name="表格8.A2" office:value-type="string">
            <text:p text:style-name="P24">同時接很多設備</text:p>
          </table:table-cell>
          <table:table-cell table:style-name="表格8.A2" office:value-type="string">
            <text:p text:style-name="P24">一般量級</text:p>
          </table:table-cell>
          <table:table-cell table:style-name="表格8.A2" office:value-type="string">
            <text:p text:style-name="P24">百萬設備/km²</text:p>
          </table:table-cell>
        </table:table-row>
      </table:table>
      <text:h text:style-name="P11" text:outline-level="3">▍ 表 2　V2X 四大子項目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23">縮寫</text:p>
            </table:table-cell>
            <table:table-cell table:style-name="表格9.A1" office:value-type="string">
              <text:p text:style-name="P23">全名</text:p>
            </table:table-cell>
            <table:table-cell table:style-name="表格9.A1" office:value-type="string">
              <text:p text:style-name="P23">溝通對象</text:p>
            </table:table-cell>
            <table:table-cell table:style-name="表格9.A1" office:value-type="string">
              <text:p text:style-name="P23">白話舉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4">V2V</text:p>
          </table:table-cell>
          <table:table-cell table:style-name="表格9.A2" office:value-type="string">
            <text:p text:style-name="P24">Vehicle to Vehicle</text:p>
          </table:table-cell>
          <table:table-cell table:style-name="表格9.A2" office:value-type="string">
            <text:p text:style-name="P24">車 ↔ 車</text:p>
          </table:table-cell>
          <table:table-cell table:style-name="表格9.A2" office:value-type="string">
            <text:p text:style-name="P24">前車緊急煞車，立即通知後車減速</text:p>
          </table:table-cell>
        </table:table-row>
        <table:table-row table:style-name="表格9.1">
          <table:table-cell table:style-name="表格9.A3" office:value-type="string">
            <text:p text:style-name="P24">V2I</text:p>
          </table:table-cell>
          <table:table-cell table:style-name="表格9.A3" office:value-type="string">
            <text:p text:style-name="P24">Vehicle to Infrastructure</text:p>
          </table:table-cell>
          <table:table-cell table:style-name="表格9.A3" office:value-type="string">
            <text:p text:style-name="P24">車 ↔ 基礎設施</text:p>
          </table:table-cell>
          <table:table-cell table:style-name="表格9.A3" office:value-type="string">
            <text:p text:style-name="P24">紅綠燈倒數，車子提前準備停車</text:p>
          </table:table-cell>
        </table:table-row>
        <table:table-row table:style-name="表格9.1">
          <table:table-cell table:style-name="表格9.A2" office:value-type="string">
            <text:p text:style-name="P24">V2P</text:p>
          </table:table-cell>
          <table:table-cell table:style-name="表格9.A2" office:value-type="string">
            <text:p text:style-name="P24">Vehicle to Pedestrian</text:p>
          </table:table-cell>
          <table:table-cell table:style-name="表格9.A2" office:value-type="string">
            <text:p text:style-name="P24">車 ↔ 行人</text:p>
          </table:table-cell>
          <table:table-cell table:style-name="表格9.A2" office:value-type="string">
            <text:p text:style-name="P24">行人靠近盲區，自動發出警示</text:p>
          </table:table-cell>
        </table:table-row>
        <table:table-row table:style-name="表格9.1">
          <table:table-cell table:style-name="表格9.A3" office:value-type="string">
            <text:p text:style-name="P24">V2N</text:p>
          </table:table-cell>
          <table:table-cell table:style-name="表格9.A3" office:value-type="string">
            <text:p text:style-name="P24">Vehicle to Network</text:p>
          </table:table-cell>
          <table:table-cell table:style-name="表格9.A3" office:value-type="string">
            <text:p text:style-name="P24">車 ↔ 網路</text:p>
          </table:table-cell>
          <table:table-cell table:style-name="表格9.A3" office:value-type="string">
            <text:p text:style-name="P24">即時路況、地圖更新、OTA 升級</text:p>
          </table:table-cell>
        </table:table-row>
      </table:table>
      <text:h text:style-name="P11" text:outline-level="3">▍ 表 3　必背 Port 對照表（超高頻考點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23">Port</text:p>
            </table:table-cell>
            <table:table-cell table:style-name="表格10.A1" office:value-type="string">
              <text:p text:style-name="P23">協定</text:p>
            </table:table-cell>
            <table:table-cell table:style-name="表格10.A1" office:value-type="string">
              <text:p text:style-name="P23">用途</text:p>
            </table:table-cell>
            <table:table-cell table:style-name="表格10.A1" office:value-type="string">
              <text:p text:style-name="P23">記憶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4">80</text:p>
          </table:table-cell>
          <table:table-cell table:style-name="表格10.A2" office:value-type="string">
            <text:p text:style-name="P24">HTTP</text:p>
          </table:table-cell>
          <table:table-cell table:style-name="表格10.A2" office:value-type="string">
            <text:p text:style-name="P24">一般網頁瀏覽（未加密）</text:p>
          </table:table-cell>
          <table:table-cell table:style-name="表格10.A2" office:value-type="string">
            <text:p text:style-name="P24">8 橫放像 ∞，網頁無限瀏覽</text:p>
          </table:table-cell>
        </table:table-row>
        <table:table-row table:style-name="表格10.1">
          <table:table-cell table:style-name="表格10.A3" office:value-type="string">
            <text:p text:style-name="P24">443</text:p>
          </table:table-cell>
          <table:table-cell table:style-name="表格10.A3" office:value-type="string">
            <text:p text:style-name="P24">HTTPS</text:p>
          </table:table-cell>
          <table:table-cell table:style-name="表格10.A3" office:value-type="string">
            <text:p text:style-name="P24">安全網頁瀏覽（加密）</text:p>
          </table:table-cell>
          <table:table-cell table:style-name="表格10.A3" office:value-type="string">
            <text:p text:style-name="P24">443 &gt; 80，號碼更大更安全</text:p>
          </table:table-cell>
        </table:table-row>
        <table:table-row table:style-name="表格10.1">
          <table:table-cell table:style-name="表格10.A2" office:value-type="string">
            <text:p text:style-name="P24">21</text:p>
          </table:table-cell>
          <table:table-cell table:style-name="表格10.A2" office:value-type="string">
            <text:p text:style-name="P24">FTP</text:p>
          </table:table-cell>
          <table:table-cell table:style-name="表格10.A2" office:value-type="string">
            <text:p text:style-name="P24">檔案傳輸</text:p>
          </table:table-cell>
          <table:table-cell table:style-name="表格10.A2" office:value-type="string">
            <text:p text:style-name="P24">2 個人傳 1 個檔案</text:p>
          </table:table-cell>
        </table:table-row>
        <table:table-row table:style-name="表格10.1">
          <table:table-cell table:style-name="表格10.A3" office:value-type="string">
            <text:p text:style-name="P24">22</text:p>
          </table:table-cell>
          <table:table-cell table:style-name="表格10.A3" office:value-type="string">
            <text:p text:style-name="P24">SSH</text:p>
          </table:table-cell>
          <table:table-cell table:style-name="表格10.A3" office:value-type="string">
            <text:p text:style-name="P24">安全遠端登入（超常考）</text:p>
          </table:table-cell>
          <table:table-cell table:style-name="表格10.A3" office:value-type="string">
            <text:p text:style-name="P24">兩個 S 的 SSH</text:p>
          </table:table-cell>
        </table:table-row>
        <table:table-row table:style-name="表格10.1">
          <table:table-cell table:style-name="表格10.A2" office:value-type="string">
            <text:p text:style-name="P24">25</text:p>
          </table:table-cell>
          <table:table-cell table:style-name="表格10.A2" office:value-type="string">
            <text:p text:style-name="P24">SMTP</text:p>
          </table:table-cell>
          <table:table-cell table:style-name="表格10.A2" office:value-type="string">
            <text:p text:style-name="P24">電子郵件寄送</text:p>
          </table:table-cell>
          <table:table-cell table:style-name="表格10.A2" office:value-type="string">
            <text:p text:style-name="P24">25 = 郵筒號碼</text:p>
          </table:table-cell>
        </table:table-row>
        <table:table-row table:style-name="表格10.1">
          <table:table-cell table:style-name="表格10.A3" office:value-type="string">
            <text:p text:style-name="P24">3306</text:p>
          </table:table-cell>
          <table:table-cell table:style-name="表格10.A3" office:value-type="string">
            <text:p text:style-name="P24">MySQL</text:p>
          </table:table-cell>
          <table:table-cell table:style-name="表格10.A3" office:value-type="string">
            <text:p text:style-name="P24">資料庫連線</text:p>
          </table:table-cell>
          <table:table-cell table:style-name="表格10.A3" office:value-type="string">
            <text:p text:style-name="P24">資料庫的家門號碼</text:p>
          </table:table-cell>
        </table:table-row>
      </table:table>
      <text:h text:style-name="P11" text:outline-level="3">▍ 表 4　身分驗證四大類型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23">類型</text:p>
            </table:table-cell>
            <table:table-cell table:style-name="表格11.A1" office:value-type="string">
              <text:p text:style-name="P23">你「？」什麼</text:p>
            </table:table-cell>
            <table:table-cell table:style-name="表格11.A1" office:value-type="string">
              <text:p text:style-name="P23">例子</text:p>
            </table:table-cell>
            <table:table-cell table:style-name="表格11.A1" office:value-type="string">
              <text:p text:style-name="P23">特性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5">① 知識型</text:p>
          </table:table-cell>
          <table:table-cell table:style-name="表格11.A2" office:value-type="string">
            <text:p text:style-name="P24">你知道什麼</text:p>
          </table:table-cell>
          <table:table-cell table:style-name="表格11.A2" office:value-type="string">
            <text:p text:style-name="P24">密碼、PIN、安全問題</text:p>
          </table:table-cell>
          <table:table-cell table:style-name="表格11.A2" office:value-type="string">
            <text:p text:style-name="P24">最普遍，但最易被竊</text:p>
          </table:table-cell>
        </table:table-row>
        <table:table-row table:style-name="表格11.1">
          <table:table-cell table:style-name="表格11.A3" office:value-type="string">
            <text:p text:style-name="P25">② 持有型</text:p>
          </table:table-cell>
          <table:table-cell table:style-name="表格11.A3" office:value-type="string">
            <text:p text:style-name="P24">你擁有什麼</text:p>
          </table:table-cell>
          <table:table-cell table:style-name="表格11.A3" office:value-type="string">
            <text:p text:style-name="P24">手機、金融卡、OTP 卡</text:p>
          </table:table-cell>
          <table:table-cell table:style-name="表格11.A3" office:value-type="string">
            <text:p text:style-name="P24">需實體裝置在手</text:p>
          </table:table-cell>
        </table:table-row>
        <table:table-row table:style-name="表格11.1">
          <table:table-cell table:style-name="表格11.A2" office:value-type="string">
            <text:p text:style-name="P25">③ 生物型</text:p>
          </table:table-cell>
          <table:table-cell table:style-name="表格11.A2" office:value-type="string">
            <text:p text:style-name="P24">你是誰</text:p>
          </table:table-cell>
          <table:table-cell table:style-name="表格11.A2" office:value-type="string">
            <text:p text:style-name="P24">指紋、臉部辨識、虹膜</text:p>
          </table:table-cell>
          <table:table-cell table:style-name="表格11.A2" office:value-type="string">
            <text:p text:style-name="P24">方便但有隱私疑慮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25">④ 行為型</text:p>
          </table:table-cell>
          <table:table-cell table:style-name="表格11.A3" office:value-type="string">
            <text:p text:style-name="P24">你的習慣</text:p>
          </table:table-cell>
          <table:table-cell table:style-name="表格11.A3" office:value-type="string">
            <text:p text:style-name="P24">打字速度、滑鼠移動</text:p>
          </table:table-cell>
          <table:table-cell table:style-name="表格11.A3" office:value-type="string">
            <text:p text:style-name="P24">進階，常用於銀行</text:p>
          </table:table-cell>
        </table:table-row>
      </table:table>
      <text:h text:style-name="P11" text:outline-level="3">▍ 表 5　CIA 三元素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23">元素</text:p>
            </table:table-cell>
            <table:table-cell table:style-name="表格12.A1" office:value-type="string">
              <text:p text:style-name="P23">英文</text:p>
            </table:table-cell>
            <table:table-cell table:style-name="表格12.A1" office:value-type="string">
              <text:p text:style-name="P23">中文</text:p>
            </table:table-cell>
            <table:table-cell table:style-name="表格12.A1" office:value-type="string">
              <text:p text:style-name="P23">白話</text:p>
            </table:table-cell>
            <table:table-cell table:style-name="表格12.A1" office:value-type="string">
              <text:p text:style-name="P23">例子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24">C</text:p>
          </table:table-cell>
          <table:table-cell table:style-name="表格12.A2" office:value-type="string">
            <text:p text:style-name="P24">Confidentiality</text:p>
          </table:table-cell>
          <table:table-cell table:style-name="表格12.A2" office:value-type="string">
            <text:p text:style-name="P24">機密性</text:p>
          </table:table-cell>
          <table:table-cell table:style-name="表格12.A2" office:value-type="string">
            <text:p text:style-name="P24">資料不能被未授權者看到</text:p>
          </table:table-cell>
          <table:table-cell table:style-name="表格12.A2" office:value-type="string">
            <text:p text:style-name="P24">個資、密碼、醫療紀錄</text:p>
          </table:table-cell>
        </table:table-row>
        <table:table-row table:style-name="表格12.1">
          <table:table-cell table:style-name="表格12.A3" office:value-type="string">
            <text:p text:style-name="P24">I</text:p>
          </table:table-cell>
          <table:table-cell table:style-name="表格12.A3" office:value-type="string">
            <text:p text:style-name="P24">Integrity</text:p>
          </table:table-cell>
          <table:table-cell table:style-name="表格12.A3" office:value-type="string">
            <text:p text:style-name="P24">完整性</text:p>
          </table:table-cell>
          <table:table-cell table:style-name="表格12.A3" office:value-type="string">
            <text:p text:style-name="P24">資料不能被竄改</text:p>
          </table:table-cell>
          <table:table-cell table:style-name="表格12.A3" office:value-type="string">
            <text:p text:style-name="P24">銀行金額不被惡意修改</text:p>
          </table:table-cell>
        </table:table-row>
        <table:table-row table:style-name="表格12.1">
          <table:table-cell table:style-name="表格12.A2" office:value-type="string">
            <text:p text:style-name="P24">A</text:p>
          </table:table-cell>
          <table:table-cell table:style-name="表格12.A2" office:value-type="string">
            <text:p text:style-name="P24">Availability</text:p>
          </table:table-cell>
          <table:table-cell table:style-name="表格12.A2" office:value-type="string">
            <text:p text:style-name="P24">可用性</text:p>
          </table:table-cell>
          <table:table-cell table:style-name="表格12.A2" office:value-type="string">
            <text:p text:style-name="P24">系統必須正常運作</text:p>
          </table:table-cell>
          <table:table-cell table:style-name="表格12.A2" office:value-type="string">
            <text:p text:style-name="P24">銀行網站不能無故停機</text:p>
          </table:table-cell>
        </table:table-row>
      </table:table>
      <text:h text:style-name="P11" text:outline-level="3">▍ 表 6　四種風險處理策略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23">策略</text:p>
            </table:table-cell>
            <table:table-cell table:style-name="表格13.A1" office:value-type="string">
              <text:p text:style-name="P23">中文</text:p>
            </table:table-cell>
            <table:table-cell table:style-name="表格13.A1" office:value-type="string">
              <text:p text:style-name="P23">說明</text:p>
            </table:table-cell>
            <table:table-cell table:style-name="表格13.A1" office:value-type="string">
              <text:p text:style-name="P23">實例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4">Avoid</text:p>
          </table:table-cell>
          <table:table-cell table:style-name="表格13.A2" office:value-type="string">
            <text:p text:style-name="P24">避免</text:p>
          </table:table-cell>
          <table:table-cell table:style-name="表格13.A2" office:value-type="string">
            <text:p text:style-name="P24">完全停止活動以消除風險</text:p>
          </table:table-cell>
          <table:table-cell table:style-name="表格13.A2" office:value-type="string">
            <text:p text:style-name="P24">風險太高，直接關閉該服務</text:p>
          </table:table-cell>
        </table:table-row>
        <table:table-row table:style-name="表格13.1">
          <table:table-cell table:style-name="表格13.A3" office:value-type="string">
            <text:p text:style-name="P24">Mitigate</text:p>
          </table:table-cell>
          <table:table-cell table:style-name="表格13.A3" office:value-type="string">
            <text:p text:style-name="P24">降低</text:p>
          </table:table-cell>
          <table:table-cell table:style-name="表格13.A3" office:value-type="string">
            <text:p text:style-name="P24">降低發生機率或衝擊（最常見）</text:p>
          </table:table-cell>
          <table:table-cell table:style-name="表格13.A3" office:value-type="string">
            <text:p text:style-name="P24">裝防火牆、加密、定期備份</text:p>
          </table:table-cell>
        </table:table-row>
        <table:table-row table:style-name="表格13.1">
          <table:table-cell table:style-name="表格13.A2" office:value-type="string">
            <text:p text:style-name="P24">Transfer</text:p>
          </table:table-cell>
          <table:table-cell table:style-name="表格13.A2" office:value-type="string">
            <text:p text:style-name="P24">轉移</text:p>
          </table:table-cell>
          <table:table-cell table:style-name="表格13.A2" office:value-type="string">
            <text:p text:style-name="P24">責任轉移給第三方</text:p>
          </table:table-cell>
          <table:table-cell table:style-name="表格13.A2" office:value-type="string">
            <text:p text:style-name="P24">購買資安保險、委外廠商</text:p>
          </table:table-cell>
        </table:table-row>
        <table:table-row table:style-name="表格13.1">
          <table:table-cell table:style-name="表格13.A3" office:value-type="string">
            <text:p text:style-name="P24">Accept</text:p>
          </table:table-cell>
          <table:table-cell table:style-name="表格13.A3" office:value-type="string">
            <text:p text:style-name="P24">接受</text:p>
          </table:table-cell>
          <table:table-cell table:style-name="表格13.A3" office:value-type="string">
            <text:p text:style-name="P24">評估後可接受，選擇承擔</text:p>
          </table:table-cell>
          <table:table-cell table:style-name="表格13.A3" office:value-type="string">
            <text:p text:style-name="P24">修復成本遠高於風險損失</text:p>
          </table:table-cell>
        </table:table-row>
      </table:table>
      <text:p text:style-name="Standard"/>
      <text:h text:style-name="P38" text:outline-level="3">▍ 表 7　雲端五大特徵（NIST SP 800-145）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23">速記</text:p>
            </table:table-cell>
            <table:table-cell table:style-name="表格14.A1" office:value-type="string">
              <text:p text:style-name="P23">英文</text:p>
            </table:table-cell>
            <table:table-cell table:style-name="表格14.A1" office:value-type="string">
              <text:p text:style-name="P23">中文</text:p>
            </table:table-cell>
            <table:table-cell table:style-name="表格14.A1" office:value-type="string">
              <text:p text:style-name="P23">一句話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4">自</text:p>
          </table:table-cell>
          <table:table-cell table:style-name="表格14.A2" office:value-type="string">
            <text:p text:style-name="P24">On-demand Self-service</text:p>
          </table:table-cell>
          <table:table-cell table:style-name="表格14.A2" office:value-type="string">
            <text:p text:style-name="P24">自助取用</text:p>
          </table:table-cell>
          <table:table-cell table:style-name="表格14.A2" office:value-type="string">
            <text:p text:style-name="P39">想開就開，不需等 IT 申請</text:p>
          </table:table-cell>
        </table:table-row>
        <table:table-row table:style-name="表格14.1">
          <table:table-cell table:style-name="表格14.A3" office:value-type="string">
            <text:p text:style-name="P24">廣</text:p>
          </table:table-cell>
          <table:table-cell table:style-name="表格14.A3" office:value-type="string">
            <text:p text:style-name="P24">Broad Network Access</text:p>
          </table:table-cell>
          <table:table-cell table:style-name="表格14.A3" office:value-type="string">
            <text:p text:style-name="P24">廣泛網路存取</text:p>
          </table:table-cell>
          <table:table-cell table:style-name="表格14.A3" office:value-type="string">
            <text:p text:style-name="P40">手機、平板、電腦都能用</text:p>
          </table:table-cell>
        </table:table-row>
        <table:table-row table:style-name="表格14.1">
          <table:table-cell table:style-name="表格14.A2" office:value-type="string">
            <text:p text:style-name="P24">池</text:p>
          </table:table-cell>
          <table:table-cell table:style-name="表格14.A2" office:value-type="string">
            <text:p text:style-name="P24">Resource Pooling</text:p>
          </table:table-cell>
          <table:table-cell table:style-name="表格14.A2" office:value-type="string">
            <text:p text:style-name="P24">資源池化</text:p>
          </table:table-cell>
          <table:table-cell table:style-name="表格14.A2" office:value-type="string">
            <text:p text:style-name="P41">大家共用一個超大資源池</text:p>
          </table:table-cell>
        </table:table-row>
        <table:table-row table:style-name="表格14.1">
          <table:table-cell table:style-name="表格14.A3" office:value-type="string">
            <text:p text:style-name="P24">彈</text:p>
          </table:table-cell>
          <table:table-cell table:style-name="表格14.A3" office:value-type="string">
            <text:p text:style-name="P24">Rapid Elasticity</text:p>
          </table:table-cell>
          <table:table-cell table:style-name="表格14.A3" office:value-type="string">
            <text:p text:style-name="P24">快速彈性</text:p>
          </table:table-cell>
          <table:table-cell table:style-name="表格14.A3" office:value-type="string">
            <text:p text:style-name="P42">流量大自動擴充，用完縮回</text:p>
          </table:table-cell>
        </table:table-row>
        <table:table-row table:style-name="表格14.1">
          <table:table-cell table:style-name="表格14.A2" office:value-type="string">
            <text:p text:style-name="P24">量</text:p>
          </table:table-cell>
          <table:table-cell table:style-name="表格14.A2" office:value-type="string">
            <text:p text:style-name="P24">Measured Service</text:p>
          </table:table-cell>
          <table:table-cell table:style-name="表格14.A2" office:value-type="string">
            <text:p text:style-name="P24">可量測服務</text:p>
          </table:table-cell>
          <table:table-cell table:style-name="表格14.A2" office:value-type="string">
            <text:p text:style-name="P43">用多少付多少，計費透明</text:p>
          </table:table-cell>
        </table:table-row>
      </table:table>
      <text:h text:style-name="P11" text:outline-level="3">▍ 表 8　雲端三種部署模式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23">模式</text:p>
            </table:table-cell>
            <table:table-cell table:style-name="表格15.A1" office:value-type="string">
              <text:p text:style-name="P23">比喻</text:p>
            </table:table-cell>
            <table:table-cell table:style-name="表格15.A1" office:value-type="string">
              <text:p text:style-name="P23">成本</text:p>
            </table:table-cell>
            <table:table-cell table:style-name="表格15.A1" office:value-type="string">
              <text:p text:style-name="P23">彈性</text:p>
            </table:table-cell>
            <table:table-cell table:style-name="表格15.A1" office:value-type="string">
              <text:p text:style-name="P23">適合對象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4">自建機房 On-Premises</text:p>
          </table:table-cell>
          <table:table-cell table:style-name="表格15.A2" office:value-type="string">
            <text:p text:style-name="P24">自己蓋房子</text:p>
          </table:table-cell>
          <table:table-cell table:style-name="表格15.A2" office:value-type="string">
            <text:p text:style-name="P24">最貴</text:p>
          </table:table-cell>
          <table:table-cell table:style-name="表格15.A2" office:value-type="string">
            <text:p text:style-name="P24">最低</text:p>
          </table:table-cell>
          <table:table-cell table:style-name="表格15.A2" office:value-type="string">
            <text:p text:style-name="P24">軍方、國防</text:p>
          </table:table-cell>
        </table:table-row>
        <table:table-row table:style-name="表格15.1">
          <table:table-cell table:style-name="表格15.A3" office:value-type="string">
            <text:p text:style-name="P24">私有雲 Private</text:p>
          </table:table-cell>
          <table:table-cell table:style-name="表格15.A3" office:value-type="string">
            <text:p text:style-name="P24">VIP 專屬社區</text:p>
          </table:table-cell>
          <table:table-cell table:style-name="表格15.A3" office:value-type="string">
            <text:p text:style-name="P24">高</text:p>
          </table:table-cell>
          <table:table-cell table:style-name="表格15.A3" office:value-type="string">
            <text:p text:style-name="P24">中</text:p>
          </table:table-cell>
          <table:table-cell table:style-name="表格15.A3" office:value-type="string">
            <text:p text:style-name="P24">政府、金融、銀行</text:p>
          </table:table-cell>
        </table:table-row>
        <table:table-row table:style-name="表格15.1">
          <table:table-cell table:style-name="表格15.A2" office:value-type="string">
            <text:p text:style-name="P24">公有雲 Public</text:p>
          </table:table-cell>
          <table:table-cell table:style-name="表格15.A2" office:value-type="string">
            <text:p text:style-name="P24">租房子</text:p>
          </table:table-cell>
          <table:table-cell table:style-name="表格15.A2" office:value-type="string">
            <text:p text:style-name="P24">最便宜</text:p>
          </table:table-cell>
          <table:table-cell table:style-name="表格15.A2" office:value-type="string">
            <text:p text:style-name="P24">最高</text:p>
          </table:table-cell>
          <table:table-cell table:style-name="表格15.A2" office:value-type="string">
            <text:p text:style-name="P24">新創、一般企業、電商</text:p>
          </table:table-cell>
        </table:table-row>
        <table:table-row table:style-name="表格15.1">
          <table:table-cell table:style-name="表格15.A3" office:value-type="string">
            <text:p text:style-name="P44">混合雲 Hybrid</text:p>
          </table:table-cell>
          <table:table-cell table:style-name="表格15.A3" office:value-type="string">
            <text:p text:style-name="P24">保險箱＋行動支付</text:p>
          </table:table-cell>
          <table:table-cell table:style-name="表格15.A3" office:value-type="string">
            <text:p text:style-name="P24">彈性最佳</text:p>
          </table:table-cell>
          <table:table-cell table:style-name="表格15.A3" office:value-type="string">
            <text:p text:style-name="P24">兼具</text:p>
          </table:table-cell>
          <table:table-cell table:style-name="表格15.A3" office:value-type="string">
            <text:p text:style-name="P24">大企業、政府主流</text:p>
          </table:table-cell>
        </table:table-row>
      </table:table>
      <text:h text:style-name="P11" text:outline-level="3">▍ 表 9　軟體開發四大模型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23">項目</text:p>
            </table:table-cell>
            <table:table-cell table:style-name="表格16.A1" office:value-type="string">
              <text:p text:style-name="P23">瀑布</text:p>
            </table:table-cell>
            <table:table-cell table:style-name="表格16.A1" office:value-type="string">
              <text:p text:style-name="P23">雛型</text:p>
            </table:table-cell>
            <table:table-cell table:style-name="表格16.A1" office:value-type="string">
              <text:p text:style-name="P23">漸增</text:p>
            </table:table-cell>
            <table:table-cell table:style-name="表格16.A1" office:value-type="string">
              <text:p text:style-name="P23">敏捷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4">交付方式</text:p>
          </table:table-cell>
          <table:table-cell table:style-name="表格16.A2" office:value-type="string">
            <text:p text:style-name="P24">最後一次交付</text:p>
          </table:table-cell>
          <table:table-cell table:style-name="表格16.A2" office:value-type="string">
            <text:p text:style-name="P24">確認需求後交付</text:p>
          </table:table-cell>
          <table:table-cell table:style-name="表格16.A2" office:value-type="string">
            <text:p text:style-name="P24">分段交付</text:p>
          </table:table-cell>
          <table:table-cell table:style-name="表格16.A2" office:value-type="string">
            <text:p text:style-name="P24">持續交付</text:p>
          </table:table-cell>
        </table:table-row>
        <table:table-row table:style-name="表格16.1">
          <table:table-cell table:style-name="表格16.A3" office:value-type="string">
            <text:p text:style-name="P24">需求彈性</text:p>
          </table:table-cell>
          <table:table-cell table:style-name="表格16.A3" office:value-type="string">
            <text:p text:style-name="P24">幾乎不能變</text:p>
          </table:table-cell>
          <table:table-cell table:style-name="表格16.A3" office:value-type="string">
            <text:p text:style-name="P24">初期確認後固定</text:p>
          </table:table-cell>
          <table:table-cell table:style-name="表格16.A3" office:value-type="string">
            <text:p text:style-name="P24">中等</text:p>
          </table:table-cell>
          <table:table-cell table:style-name="表格16.A3" office:value-type="string">
            <text:p text:style-name="P24">極高</text:p>
          </table:table-cell>
        </table:table-row>
        <table:table-row table:style-name="表格16.1">
          <table:table-cell table:style-name="表格16.A2" office:value-type="string">
            <text:p text:style-name="P24">回饋修正</text:p>
          </table:table-cell>
          <table:table-cell table:style-name="表格16.A2" office:value-type="string">
            <text:p text:style-name="P24">沒有</text:p>
          </table:table-cell>
          <table:table-cell table:style-name="表格16.A2" office:value-type="string">
            <text:p text:style-name="P24">有</text:p>
          </table:table-cell>
          <table:table-cell table:style-name="表格16.A2" office:value-type="string">
            <text:p text:style-name="P24">不一定</text:p>
          </table:table-cell>
          <table:table-cell table:style-name="表格16.A2" office:value-type="string">
            <text:p text:style-name="P24">核心機制</text:p>
          </table:table-cell>
        </table:table-row>
        <table:table-row table:style-name="表格16.1">
          <table:table-cell table:style-name="表格16.A3" office:value-type="string">
            <text:p text:style-name="P24">文件完整度</text:p>
          </table:table-cell>
          <table:table-cell table:style-name="表格16.A3" office:value-type="string">
            <text:p text:style-name="P24">最完整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相對少</text:p>
          </table:table-cell>
        </table:table-row>
        <table:table-row table:style-name="表格16.1">
          <table:table-cell table:style-name="表格16.A2" office:value-type="string">
            <text:p text:style-name="P24">最適合</text:p>
          </table:table-cell>
          <table:table-cell table:style-name="表格16.A2" office:value-type="string">
            <text:p text:style-name="P24">需求穩定大型系統</text:p>
          </table:table-cell>
          <table:table-cell table:style-name="表格16.A2" office:value-type="string">
            <text:p text:style-name="P24">需求不明確</text:p>
          </table:table-cell>
          <table:table-cell table:style-name="表格16.A2" office:value-type="string">
            <text:p text:style-name="P24">複雜可擴充</text:p>
          </table:table-cell>
          <table:table-cell table:style-name="表格16.A2" office:value-type="string">
            <text:p text:style-name="P24">需求多變</text:p>
          </table:table-cell>
        </table:table-row>
      </table:table>
      <text:h text:style-name="P11" text:outline-level="3">▍ 表 10　UML 六大圖一覽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23">類型</text:p>
            </table:table-cell>
            <table:table-cell table:style-name="表格17.A1" office:value-type="string">
              <text:p text:style-name="P23">圖名</text:p>
            </table:table-cell>
            <table:table-cell table:style-name="表格17.A1" office:value-type="string">
              <text:p text:style-name="P23">核心問題</text:p>
            </table:table-cell>
            <table:table-cell table:style-name="表格17.A1" office:value-type="string">
              <text:p text:style-name="P23">考場關鍵字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① 類別圖 Class</text:p>
          </table:table-cell>
          <table:table-cell table:style-name="表格17.A2" office:value-type="string">
            <text:p text:style-name="P24">有哪些物件？</text:p>
          </table:table-cell>
          <table:table-cell table:style-name="表格17.A2" office:value-type="string">
            <text:p text:style-name="P24">物件、屬性、方法、關係</text:p>
          </table:table-cell>
        </table:table-row>
        <table:table-row table:style-name="表格17.1">
          <table:table-cell table:style-name="表格17.A3" office:value-type="string">
            <text:p text:style-name="P25">結構(靜態)</text:p>
          </table:table-cell>
          <table:table-cell table:style-name="表格17.A3" office:value-type="string">
            <text:p text:style-name="P24">② 元件圖 Component</text:p>
          </table:table-cell>
          <table:table-cell table:style-name="表格17.A3" office:value-type="string">
            <text:p text:style-name="P24">分哪些模組？</text:p>
          </table:table-cell>
          <table:table-cell table:style-name="表格17.A3" office:value-type="string">
            <text:p text:style-name="P24">模組、分層、依賴、外部 API</text:p>
          </table:table-cell>
        </table:table-row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③ 部署圖 Deployment</text:p>
          </table:table-cell>
          <table:table-cell table:style-name="表格17.A2" office:value-type="string">
            <text:p text:style-name="P24">跑在哪裡？</text:p>
          </table:table-cell>
          <table:table-cell table:style-name="表格17.A2" office:value-type="string">
            <text:p text:style-name="P24">伺服器、設備、網路、實體環境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④ 使用案例圖 Use Case</text:p>
          </table:table-cell>
          <table:table-cell table:style-name="表格17.A3" office:value-type="string">
            <text:p text:style-name="P24">使用者能做什麼？</text:p>
          </table:table-cell>
          <table:table-cell table:style-name="表格17.A3" office:value-type="string">
            <text:p text:style-name="P24">Actor、功能、系統邊界</text:p>
          </table:table-cell>
        </table:table-row>
        <table:table-row table:style-name="表格17.1">
          <table:table-cell table:style-name="表格17.A2" office:value-type="string">
            <text:p text:style-name="P25">行為(動態)</text:p>
          </table:table-cell>
          <table:table-cell table:style-name="表格17.A2" office:value-type="string">
            <text:p text:style-name="P24">⑤ 循序圖 Sequence</text:p>
          </table:table-cell>
          <table:table-cell table:style-name="表格17.A2" office:value-type="string">
            <text:p text:style-name="P24">誰先呼叫誰？</text:p>
          </table:table-cell>
          <table:table-cell table:style-name="表格17.A2" office:value-type="string">
            <text:p text:style-name="P24">時間順序、訊息箭頭、生命線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⑥ 活動圖 Activity</text:p>
          </table:table-cell>
          <table:table-cell table:style-name="表格17.A3" office:value-type="string">
            <text:p text:style-name="P24">流程怎麼走？</text:p>
          </table:table-cell>
          <table:table-cell table:style-name="表格17.A3" office:value-type="string">
            <text:p text:style-name="P24">判斷分支(菱形)、開始結束</text:p>
          </table:table-cell>
        </table:table-row>
      </table:table>
      <text:p text:style-name="Standard"><text:soft-page-break/></text:p>
      <text:h text:style-name="P38" text:outline-level="3">▍ 表 11　PMBOK vs 資訊委外管理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比較項目</text:p>
            </table:table-cell>
            <table:table-cell table:style-name="表格18.A1" office:value-type="string">
              <text:p text:style-name="P23">PMBOK 專案管理</text:p>
            </table:table-cell>
            <table:table-cell table:style-name="表格18.A1" office:value-type="string">
              <text:p text:style-name="P23">資訊委外管理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>口訣</text:p>
          </table:table-cell>
          <table:table-cell table:style-name="表格18.A2" office:value-type="string">
            <text:p text:style-name="P24">起 計 做 控 收</text:p>
          </table:table-cell>
          <table:table-cell table:style-name="表格18.A2" office:value-type="string">
            <text:p text:style-name="P24">計 招 決 履 驗 保</text:p>
          </table:table-cell>
        </table:table-row>
        <table:table-row table:style-name="表格18.1">
          <table:table-cell table:style-name="表格18.A3" office:value-type="string">
            <text:p text:style-name="P24">階段數</text:p>
          </table:table-cell>
          <table:table-cell table:style-name="表格18.A3" office:value-type="string">
            <text:p text:style-name="P24">5 個流程組</text:p>
          </table:table-cell>
          <table:table-cell table:style-name="表格18.A3" office:value-type="string">
            <text:p text:style-name="P24">6 個階段</text:p>
          </table:table-cell>
        </table:table-row>
        <table:table-row table:style-name="表格18.1">
          <table:table-cell table:style-name="表格18.A2" office:value-type="string">
            <text:p text:style-name="P24">重點</text:p>
          </table:table-cell>
          <table:table-cell table:style-name="表格18.A2" office:value-type="string">
            <text:p text:style-name="P24">自行管理專案</text:p>
          </table:table-cell>
          <table:table-cell table:style-name="表格18.A2" office:value-type="string">
            <text:p text:style-name="P24">外包給廠商執行</text:p>
          </table:table-cell>
        </table:table-row>
        <table:table-row table:style-name="表格18.1">
          <table:table-cell table:style-name="表格18.A3" office:value-type="string">
            <text:p text:style-name="P24">驗收方式</text:p>
          </table:table-cell>
          <table:table-cell table:style-name="表格18.A3" office:value-type="string">
            <text:p text:style-name="P24">內部驗收</text:p>
          </table:table-cell>
          <table:table-cell table:style-name="表格18.A3" office:value-type="string">
            <text:p text:style-name="P24">UAT 使用者驗收測試</text:p>
          </table:table-cell>
        </table:table-row>
        <table:table-row table:style-name="表格18.1">
          <table:table-cell table:style-name="表格18.A2" office:value-type="string">
            <text:p text:style-name="P24">上線後</text:p>
          </table:table-cell>
          <table:table-cell table:style-name="表格18.A2" office:value-type="string">
            <text:p text:style-name="P24">專案結案</text:p>
          </table:table-cell>
          <table:table-cell table:style-name="表格18.A2" office:value-type="string">
            <text:p text:style-name="P24">進入保固期</text:p>
          </table:table-cell>
        </table:table-row>
      </table:table>
      <text:h text:style-name="P11" text:outline-level="3">▍ 表 12　四大企業系統 ERP／CRM／SCM／POS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23">系統</text:p>
            </table:table-cell>
            <table:table-cell table:style-name="表格19.A1" office:value-type="string">
              <text:p text:style-name="P23">中文全名</text:p>
            </table:table-cell>
            <table:table-cell table:style-name="表格19.A1" office:value-type="string">
              <text:p text:style-name="P23">管什麼</text:p>
            </table:table-cell>
            <table:table-cell table:style-name="表格19.A1" office:value-type="string">
              <text:p text:style-name="P23">生活白話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4">ERP</text:p>
          </table:table-cell>
          <table:table-cell table:style-name="表格19.A2" office:value-type="string">
            <text:p text:style-name="P24">企業資源管理</text:p>
          </table:table-cell>
          <table:table-cell table:style-name="表格19.A2" office:value-type="string">
            <text:p text:style-name="P24">公司內部（庫存/財務/人事）</text:p>
          </table:table-cell>
          <table:table-cell table:style-name="表格19.A2" office:value-type="string">
            <text:p text:style-name="P24">公司的大腦總管，什麼都管</text:p>
          </table:table-cell>
        </table:table-row>
        <table:table-row table:style-name="表格19.1">
          <table:table-cell table:style-name="表格19.A3" office:value-type="string">
            <text:p text:style-name="P24">CRM</text:p>
          </table:table-cell>
          <table:table-cell table:style-name="表格19.A3" office:value-type="string">
            <text:p text:style-name="P24">客戶關係管理</text:p>
          </table:table-cell>
          <table:table-cell table:style-name="表格19.A3" office:value-type="string">
            <text:p text:style-name="P24">客戶資料與行為分析</text:p>
          </table:table-cell>
          <table:table-cell table:style-name="表格19.A3" office:value-type="string">
            <text:p text:style-name="P24">記錄你買什麼、推薦你喜歡的</text:p>
          </table:table-cell>
        </table:table-row>
        <table:table-row table:style-name="表格19.1">
          <table:table-cell table:style-name="表格19.A2" office:value-type="string">
            <text:p text:style-name="P24">SCM</text:p>
          </table:table-cell>
          <table:table-cell table:style-name="表格19.A2" office:value-type="string">
            <text:p text:style-name="P24">供應鏈管理</text:p>
          </table:table-cell>
          <table:table-cell table:style-name="表格19.A2" office:value-type="string">
            <text:p text:style-name="P24">進貨、物流、供應商</text:p>
          </table:table-cell>
          <table:table-cell table:style-name="表格19.A2" office:value-type="string">
            <text:p text:style-name="P24">管原料從哪來、何時到</text:p>
          </table:table-cell>
        </table:table-row>
        <table:table-row table:style-name="表格19.1">
          <table:table-cell table:style-name="表格19.A3" office:value-type="string">
            <text:p text:style-name="P24">POS</text:p>
          </table:table-cell>
          <table:table-cell table:style-name="表格19.A3" office:value-type="string">
            <text:p text:style-name="P24">銷售時點系統</text:p>
          </table:table-cell>
          <table:table-cell table:style-name="表格19.A3" office:value-type="string">
            <text:p text:style-name="P24">收銀與結帳</text:p>
          </table:table-cell>
          <table:table-cell table:style-name="表格19.A3" office:value-type="string">
            <text:p text:style-name="P24">超商收銀機、掃條碼結帳</text:p>
          </table:table-cell>
        </table:table-row>
      </table:table>
      <text:h text:style-name="P11" text:outline-level="3">▍ 表 13　資訊倫理四大概念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英文</text:p>
            </table:table-cell>
            <table:table-cell table:style-name="表格20.A1" office:value-type="string">
              <text:p text:style-name="P23">中文</text:p>
            </table:table-cell>
            <table:table-cell table:style-name="表格20.A1" office:value-type="string">
              <text:p text:style-name="P23">白話</text:p>
            </table:table-cell>
            <table:table-cell table:style-name="表格20.A1" office:value-type="string">
              <text:p text:style-name="P23">一句話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4">Responsibility</text:p>
          </table:table-cell>
          <table:table-cell table:style-name="表格20.A2" office:value-type="string">
            <text:p text:style-name="P24">責任</text:p>
          </table:table-cell>
          <table:table-cell table:style-name="表格20.A2" office:value-type="string">
            <text:p text:style-name="P24">你本來就該做的事</text:p>
          </table:table-cell>
          <table:table-cell table:style-name="表格20.A2" office:value-type="string">
            <text:p text:style-name="P24">做</text:p>
          </table:table-cell>
        </table:table-row>
        <table:table-row table:style-name="表格20.1">
          <table:table-cell table:style-name="表格20.A3" office:value-type="string">
            <text:p text:style-name="P24">Accountability</text:p>
          </table:table-cell>
          <table:table-cell table:style-name="表格20.A3" office:value-type="string">
            <text:p text:style-name="P24">問責</text:p>
          </table:table-cell>
          <table:table-cell table:style-name="表格20.A3" office:value-type="string">
            <text:p text:style-name="P24">出事後要被追究說明</text:p>
          </table:table-cell>
          <table:table-cell table:style-name="表格20.A3" office:value-type="string">
            <text:p text:style-name="P24">查</text:p>
          </table:table-cell>
        </table:table-row>
        <table:table-row table:style-name="表格20.1">
          <table:table-cell table:style-name="表格20.A2" office:value-type="string">
            <text:p text:style-name="P24">Liability</text:p>
          </table:table-cell>
          <table:table-cell table:style-name="表格20.A2" office:value-type="string">
            <text:p text:style-name="P24">法律責任</text:p>
          </table:table-cell>
          <table:table-cell table:style-name="表格20.A2" office:value-type="string">
            <text:p text:style-name="P24">違法後要賠錢、受罰</text:p>
          </table:table-cell>
          <table:table-cell table:style-name="表格20.A2" office:value-type="string">
            <text:p text:style-name="P24">罰</text:p>
          </table:table-cell>
        </table:table-row>
        <table:table-row table:style-name="表格20.1">
          <table:table-cell table:style-name="表格20.A3" office:value-type="string">
            <text:p text:style-name="P24">Due Process</text:p>
          </table:table-cell>
          <table:table-cell table:style-name="表格20.A3" office:value-type="string">
            <text:p text:style-name="P24">正當程序</text:p>
          </table:table-cell>
          <table:table-cell table:style-name="表格20.A3" office:value-type="string">
            <text:p text:style-name="P24">處罰前要公平、合法</text:p>
          </table:table-cell>
          <table:table-cell table:style-name="表格20.A3" office:value-type="string">
            <text:p text:style-name="P24">程序</text:p>
          </table:table-cell>
        </table:table-row>
      </table:table>
      <text:h text:style-name="P11" text:outline-level="3">▍ 表 14　三種假訊息類型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23">英文</text:p>
            </table:table-cell>
            <table:table-cell table:style-name="表格21.A1" office:value-type="string">
              <text:p text:style-name="P23">中文</text:p>
            </table:table-cell>
            <table:table-cell table:style-name="表格21.A1" office:value-type="string">
              <text:p text:style-name="P23">是否故意</text:p>
            </table:table-cell>
            <table:table-cell table:style-name="表格21.A1" office:value-type="string">
              <text:p text:style-name="P23">特徵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4">Fake News</text:p>
          </table:table-cell>
          <table:table-cell table:style-name="表格21.A2" office:value-type="string">
            <text:p text:style-name="P24">假新聞</text:p>
          </table:table-cell>
          <table:table-cell table:style-name="表格21.A2" office:value-type="string">
            <text:p text:style-name="P24">故意</text:p>
          </table:table-cell>
          <table:table-cell table:style-name="表格21.A2" office:value-type="string">
            <text:p text:style-name="P24">以新聞形式包裝的虛假內容</text:p>
          </table:table-cell>
        </table:table-row>
        <table:table-row table:style-name="表格21.1">
          <table:table-cell table:style-name="表格21.A3" office:value-type="string">
            <text:p text:style-name="P24">Misinformation</text:p>
          </table:table-cell>
          <table:table-cell table:style-name="表格21.A3" office:value-type="string">
            <text:p text:style-name="P24">錯誤訊息</text:p>
          </table:table-cell>
          <table:table-cell table:style-name="表格21.A3" office:value-type="string">
            <text:p text:style-name="P24">無意</text:p>
          </table:table-cell>
          <table:table-cell table:style-name="表格21.A3" office:value-type="string">
            <text:p text:style-name="P24">不知情下傳播的錯誤資訊，自己也被騙</text:p>
          </table:table-cell>
        </table:table-row>
        <table:table-row table:style-name="表格21.1">
          <table:table-cell table:style-name="表格21.A2" office:value-type="string">
            <text:p text:style-name="P24">Disinformation</text:p>
          </table:table-cell>
          <table:table-cell table:style-name="表格21.A2" office:value-type="string">
            <text:p text:style-name="P24">假消息</text:p>
          </table:table-cell>
          <table:table-cell table:style-name="表格21.A2" office:value-type="string">
            <text:p text:style-name="P24">故意＋有目的</text:p>
          </table:table-cell>
          <table:table-cell table:style-name="表格21.A2" office:value-type="string">
            <text:p text:style-name="P24">有計畫的資訊操控，不限形式</text:p>
          </table:table-cell>
        </table:table-row>
      </table:table>
      <text:h text:style-name="P11" text:outline-level="3">▍ 表 15　統計檢定 Z／t／ANOVA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檢定</text:p>
            </table:table-cell>
            <table:table-cell table:style-name="表格22.A1" office:value-type="string">
              <text:p text:style-name="P23">適用條件</text:p>
            </table:table-cell>
            <table:table-cell table:style-name="表格22.A1" office:value-type="string">
              <text:p text:style-name="P23">組數</text:p>
            </table:table-cell>
            <table:table-cell table:style-name="表格22.A1" office:value-type="string">
              <text:p text:style-name="P23">例子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>Z 檢定</text:p>
          </table:table-cell>
          <table:table-cell table:style-name="表格22.A2" office:value-type="string">
            <text:p text:style-name="P24">大樣本(n≥30) 或母體變異數已知</text:p>
          </table:table-cell>
          <table:table-cell table:style-name="表格22.A2" office:value-type="string">
            <text:p text:style-name="P24">—</text:p>
          </table:table-cell>
          <table:table-cell table:style-name="表格22.A2" office:value-type="string">
            <text:p text:style-name="P24">全台薪資男女比較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24">t 檢定</text:p>
          </table:table-cell>
          <table:table-cell table:style-name="表格22.A3" office:value-type="string">
            <text:p text:style-name="P24">小樣本(n&lt;30) 且母體變異數未知</text:p>
          </table:table-cell>
          <table:table-cell table:style-name="表格22.A3" office:value-type="string">
            <text:p text:style-name="P24">僅 2 組</text:p>
          </table:table-cell>
          <table:table-cell table:style-name="表格22.A3" office:value-type="string">
            <text:p text:style-name="P24">20 人實驗班 vs 對照班</text:p>
          </table:table-cell>
        </table:table-row>
        <table:table-row table:style-name="表格22.1">
          <table:table-cell table:style-name="表格22.A2" office:value-type="string">
            <text:p text:style-name="P24">ANOVA</text:p>
          </table:table-cell>
          <table:table-cell table:style-name="表格22.A2" office:value-type="string">
            <text:p text:style-name="P24">三組或三組以上比較</text:p>
          </table:table-cell>
          <table:table-cell table:style-name="表格22.A2" office:value-type="string">
            <text:p text:style-name="P24">3 組以上</text:p>
          </table:table-cell>
          <table:table-cell table:style-name="表格22.A2" office:value-type="string">
            <text:p text:style-name="P24">北中南三地薪資比較</text:p>
          </table:table-cell>
        </table:table-row>
      </table:table>
      <text:h text:style-name="P11" text:outline-level="3">▍ 表 16　RTO vs RPO（剛好相反，最愛考）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23">項目</text:p>
            </table:table-cell>
            <table:table-cell table:style-name="表格23.A1" office:value-type="string">
              <text:p text:style-name="P23">英文</text:p>
            </table:table-cell>
            <table:table-cell table:style-name="表格23.A1" office:value-type="string">
              <text:p text:style-name="P23">看什麼</text:p>
            </table:table-cell>
            <table:table-cell table:style-name="表格23.A1" office:value-type="string">
              <text:p text:style-name="P23">問的問題</text:p>
            </table:table-cell>
            <table:table-cell table:style-name="表格23.A1" office:value-type="string">
              <text:p text:style-name="P23">例子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>RTO</text:p>
          </table:table-cell>
          <table:table-cell table:style-name="表格23.A2" office:value-type="string">
            <text:p text:style-name="P24">Recovery Time Objective</text:p>
          </table:table-cell>
          <table:table-cell table:style-name="表格23.A2" office:value-type="string">
            <text:p text:style-name="P24">Time 時間</text:p>
          </table:table-cell>
          <table:table-cell table:style-name="表格23.A2" office:value-type="string">
            <text:p text:style-name="P24">多久內要恢復？</text:p>
          </table:table-cell>
          <table:table-cell table:style-name="表格23.A2" office:value-type="string">
            <text:p text:style-name="P24">2 小時內必須修復</text:p>
          </table:table-cell>
        </table:table-row>
        <table:table-row table:style-name="表格23.1">
          <table:table-cell table:style-name="表格23.A3" office:value-type="string">
            <text:p text:style-name="P25">RPO</text:p>
          </table:table-cell>
          <table:table-cell table:style-name="表格23.A3" office:value-type="string">
            <text:p text:style-name="P24">Recovery Point Objective</text:p>
          </table:table-cell>
          <table:table-cell table:style-name="表格23.A3" office:value-type="string">
            <text:p text:style-name="P24">Point 資料點</text:p>
          </table:table-cell>
          <table:table-cell table:style-name="表格23.A3" office:value-type="string">
            <text:p text:style-name="P24">最多能丟多少資料？</text:p>
          </table:table-cell>
          <table:table-cell table:style-name="表格23.A3" office:value-type="string">
            <text:p text:style-name="P24">只能丟最近 10 分鐘</text:p>
          </table:table-cell>
        </table:table-row>
      </table:table>
      <text:p text:style-name="Standard"/>
      <text:h text:style-name="P9" text:outline-level="1"><text:bookmark-start text:name="bm_c1"/>第 1 章　5G 行動通訊<text:bookmark-end text:name="bm_c1"/></text:h>
      <text:h text:style-name="P21" text:outline-level="2">▍1-1　用「道路」一秒理解 4G 與 5G</text:h>
      <text:p text:style-name="P45">把網路想成高速公路。4G 像普通高速公路：車輛（資料）可以流通，但人多容易塞車、反應也比較慢。5G 則像超大型智慧高速公路：車道更寬、速度更快，還能同時容納超多車輛行駛。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⭐ <text:s/>核心觀念</text:p>
            <text:p text:style-name="P46">4G 的核心是「讓人類手機上網」；5G 的核心是「讓萬物連網」。一句話：4G 給人用，5G 給世界用。</text:p>
          </table:table-cell>
        </table:table-row>
      </table:table>
      <text:h text:style-name="P21" text:outline-level="2">▍1-2　5G 三大核心特點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23">特點</text:p>
            </table:table-cell>
            <table:table-cell table:style-name="表格25.A1" office:value-type="string">
              <text:p text:style-name="P23">技術名稱</text:p>
            </table:table-cell>
            <table:table-cell table:style-name="表格25.A1" office:value-type="string">
              <text:p text:style-name="P23">白話說明</text:p>
            </table:table-cell>
            <table:table-cell table:style-name="表格25.A1" office:value-type="string">
              <text:p text:style-name="P23">4G</text:p>
            </table:table-cell>
            <table:table-cell table:style-name="表格25.A1" office:value-type="string">
              <text:p text:style-name="P23">5G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4">高速度</text:p>
          </table:table-cell>
          <table:table-cell table:style-name="表格25.A2" office:value-type="string">
            <text:p text:style-name="P24">eMBB</text:p>
          </table:table-cell>
          <table:table-cell table:style-name="表格25.A2" office:value-type="string">
            <text:p text:style-name="P24">傳輸影片、資料超快</text:p>
          </table:table-cell>
          <table:table-cell table:style-name="表格25.A2" office:value-type="string">
            <text:p text:style-name="P24">約 100 Mbps</text:p>
          </table:table-cell>
          <table:table-cell table:style-name="表格25.A2" office:value-type="string">
            <text:p text:style-name="P24">約 10 Gbps</text:p>
          </table:table-cell>
        </table:table-row>
        <table:table-row table:style-name="表格25.1">
          <table:table-cell table:style-name="表格25.A3" office:value-type="string">
            <text:p text:style-name="P24">超低延遲</text:p>
          </table:table-cell>
          <table:table-cell table:style-name="表格25.A3" office:value-type="string">
            <text:p text:style-name="P24">URLLC</text:p>
          </table:table-cell>
          <table:table-cell table:style-name="表格25.A3" office:value-type="string">
            <text:p text:style-name="P24">命令幾乎即時反應</text:p>
          </table:table-cell>
          <table:table-cell table:style-name="表格25.A3" office:value-type="string">
            <text:p text:style-name="P24">30–50 ms</text:p>
          </table:table-cell>
          <table:table-cell table:style-name="表格25.A3" office:value-type="string">
            <text:p text:style-name="P24">&lt; 1 ms</text:p>
          </table:table-cell>
        </table:table-row>
        <table:table-row table:style-name="表格25.1">
          <table:table-cell table:style-name="表格25.A2" office:value-type="string">
            <text:p text:style-name="P24">大量連線</text:p>
          </table:table-cell>
          <table:table-cell table:style-name="表格25.A2" office:value-type="string">
            <text:p text:style-name="P24">mMTC</text:p>
          </table:table-cell>
          <table:table-cell table:style-name="表格25.A2" office:value-type="string">
            <text:p text:style-name="P24">同時接很多設備上線</text:p>
          </table:table-cell>
          <table:table-cell table:style-name="表格25.A2" office:value-type="string">
            <text:p text:style-name="P24">一般量級</text:p>
          </table:table-cell>
          <table:table-cell table:style-name="表格25.A2" office:value-type="string">
            <text:p text:style-name="P24">百萬設備/km²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4">💡 <text:s/>重點</text:p>
            <text:p text:style-name="P46">什麼是延遲（Latency）？</text:p>
            <text:p text:style-name="P13">延遲＝你送出命令後，要等多久才收到回應。玩線上遊戲若延遲太高，你按「開槍」卻 0.5 秒後才反應，早就被擊倒了。5G 的低延遲讓自動駕駛、遠端手術、工廠即時控制成為可能。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6">⚠️ <text:s/>考試陷阱</text:p>
            <text:p text:style-name="P47">錯誤觀念：5G 只是速度更快。</text:p>
            <text:p text:style-name="P13">正確：5G 有三大重點——高速、超低延遲、大量連線，考試考的通常是後兩個！</text:p>
            <text:p text:style-name="P47">錯誤觀念：5G 只跟手機有關。</text:p>
            <text:p text:style-name="P13">正確：5G 的核心應用場景是 IoT 基礎建設，手機只是其中一個設備。</text:p>
          </table:table-cell>
          <table:covered-table-cell/>
          <table:covered-table-cell/>
          <table:covered-table-cell/>
          <table:covered-table-cell/>
        </table:table-row>
      </table:table>
      <text:h text:style-name="P48" text:outline-level="1"><text:bookmark-start text:name="bm_c2"/>第 2 章　IoT 物聯網<text:bookmark-end text:name="bm_c2"/></text:h>
      <text:p text:style-name="P10"><text:span text:style-name="T1">IoT＝Internet of Things＝</text:span><text:span text:style-name="T3">「讓各種東西都能上網」</text:span><text:span text:style-name="T1">。不只是電腦或手機——冰箱、路燈、汽車、工廠機器、感測器，全部都能連上網路，自動傳遞資訊。</text:span></text:p>
      <text:h text:style-name="P49" text:outline-level="2"><text:soft-page-break/><text:span text:style-name="T25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23">步驟</text:p>
            </table:table-cell>
            <table:table-cell table:style-name="表格26.A1" office:value-type="string">
              <text:p text:style-name="P23">名稱</text:p>
            </table:table-cell>
            <table:table-cell table:style-name="表格26.A1" office:value-type="string">
              <text:p text:style-name="P23">在做什麼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25">① 感測</text:p>
          </table:table-cell>
          <table:table-cell table:style-name="表格26.A2" office:value-type="string">
            <text:p text:style-name="P24">收集現實資料</text:p>
          </table:table-cell>
          <table:table-cell table:style-name="表格26.A2" office:value-type="string">
            <text:p text:style-name="P24">溫度、車流、光線、心跳等感測器偵測環境</text:p>
          </table:table-cell>
        </table:table-row>
        <table:table-row table:style-name="表格26.1">
          <table:table-cell table:style-name="表格26.A3" office:value-type="string">
            <text:p text:style-name="P25">② 傳輸</text:p>
          </table:table-cell>
          <table:table-cell table:style-name="表格26.A3" office:value-type="string">
            <text:p text:style-name="P24">透過 5G 高速送出</text:p>
          </table:table-cell>
          <table:table-cell table:style-name="表格26.A3" office:value-type="string">
            <text:p text:style-name="P24">資料快速、即時傳到雲端或邊緣運算節點</text:p>
          </table:table-cell>
        </table:table-row>
        <table:table-row table:style-name="表格26.1">
          <table:table-cell table:style-name="表格26.A2" office:value-type="string">
            <text:p text:style-name="P25">③ 分析</text:p>
          </table:table-cell>
          <table:table-cell table:style-name="表格26.A2" office:value-type="string">
            <text:p text:style-name="P24">系統或 AI 判斷</text:p>
          </table:table-cell>
          <table:table-cell table:style-name="表格26.A2" office:value-type="string">
            <text:p text:style-name="P24">有無異常、需不需要控制、要不要發警告</text:p>
          </table:table-cell>
        </table:table-row>
        <table:table-row table:style-name="表格26.1">
          <table:table-cell table:style-name="表格26.A3" office:value-type="string">
            <text:p text:style-name="P25">④ 控制</text:p>
          </table:table-cell>
          <table:table-cell table:style-name="表格26.A3" office:value-type="string">
            <text:p text:style-name="P24">執行自動動作</text:p>
          </table:table-cell>
          <table:table-cell table:style-name="表格26.A3" office:value-type="string">
            <text:p text:style-name="P24">開冷氣、調整紅綠燈、工廠停機、車子減速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2">🔑 <text:s/>IoT 四步驟</text:p>
            <text:p text:style-name="P22">感測 → 傳輸 → 分析 → 控制</text:p>
          </table:table-cell>
          <table:covered-table-cell/>
          <table:covered-table-cell/>
        </table:table-row>
      </table:table>
      <text:h text:style-name="P21" text:outline-level="2">▍2-2　生活中的 IoT 案例</text:h>
      <text:list text:style-name="WWNum2">
        <text:list-item text:start-value="1">
          <text:p text:style-name="P50"><text:span text:style-name="T26">智慧冷氣：</text:span><text:span text:style-name="T1">溫度感測器偵測 30°C → 5G 傳輸 → 系統判斷 → 自動開啟空調，不用人察覺再起身去開。</text:span></text:p>
        </text:list-item>
        <text:list-item>
          <text:p text:style-name="P50"><text:span text:style-name="T26">智慧路燈：</text:span><text:span text:style-name="T1">紅外線感測器偵測行人，有人靠近自動變亮，無人則調暗節省電力。</text:span></text:p>
        </text:list-item>
        <text:list-item>
          <text:p text:style-name="P50"><text:span text:style-name="T26">智慧工廠：</text:span><text:span text:style-name="T1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6">⚠️ <text:s/>考試陷阱</text:p>
            <text:p text:style-name="P47">錯誤觀念：IoT ＝ 手機 App。</text:p>
            <text:p text:style-name="P13">正確：IoT 的核心是「感測器 ＋ 網路 ＋ 自動控制」，跟 App 沒有直接關係。</text:p>
          </table:table-cell>
        </table:table-row>
      </table:table>
      <text:h text:style-name="P48" text:outline-level="1"><text:bookmark-start text:name="bm_c3"/>第 3 章　V2X 車聯網<text:bookmark-end text:name="bm_c3"/></text:h>
      <text:p text:style-name="P10"><text:span text:style-name="T1">V2X＝Vehicle to Everything，意思是「</text:span><text:span text:style-name="T3">車子跟周圍所有東西溝通</text:span><text:span text:style-name="T1">」。因為行車安全的反應時間只有幾毫秒，一般 4G 延遲太高，所以 V2X 必須搭配 5G（延遲 &lt; 10ms）才能真正發揮作用。</text:span></text:p>
      <text:h text:style-name="P21" text:outline-level="2">▍3-1　V2X 四大子項目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縮寫</text:p>
            </table:table-cell>
            <table:table-cell table:style-name="表格28.A1" office:value-type="string">
              <text:p text:style-name="P23">全名</text:p>
            </table:table-cell>
            <table:table-cell table:style-name="表格28.A1" office:value-type="string">
              <text:p text:style-name="P23">溝通對象</text:p>
            </table:table-cell>
            <table:table-cell table:style-name="表格28.A1" office:value-type="string">
              <text:p text:style-name="P23">白話舉例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>V2V</text:p>
          </table:table-cell>
          <table:table-cell table:style-name="表格28.A2" office:value-type="string">
            <text:p text:style-name="P24">Vehicle to Vehicle</text:p>
          </table:table-cell>
          <table:table-cell table:style-name="表格28.A2" office:value-type="string">
            <text:p text:style-name="P24">車 ↔ 車</text:p>
          </table:table-cell>
          <table:table-cell table:style-name="表格28.A2" office:value-type="string">
            <text:p text:style-name="P24">前車緊急煞車，立即通知後車自動減速</text:p>
          </table:table-cell>
        </table:table-row>
        <table:table-row table:style-name="表格28.1">
          <table:table-cell table:style-name="表格28.A3" office:value-type="string">
            <text:p text:style-name="P24">V2I</text:p>
          </table:table-cell>
          <table:table-cell table:style-name="表格28.A3" office:value-type="string">
            <text:p text:style-name="P24">Vehicle to Infrastructure</text:p>
          </table:table-cell>
          <table:table-cell table:style-name="表格28.A3" office:value-type="string">
            <text:p text:style-name="P24">車 ↔ 基礎設施</text:p>
          </table:table-cell>
          <table:table-cell table:style-name="表格28.A3" office:value-type="string">
            <text:p text:style-name="P24">紅綠燈倒數 3 秒，車子提前準備停車</text:p>
          </table:table-cell>
        </table:table-row>
        <table:table-row table:style-name="表格28.1">
          <table:table-cell table:style-name="表格28.A2" office:value-type="string">
            <text:p text:style-name="P24">V2P</text:p>
          </table:table-cell>
          <table:table-cell table:style-name="表格28.A2" office:value-type="string">
            <text:p text:style-name="P24">Vehicle to Pedestrian</text:p>
          </table:table-cell>
          <table:table-cell table:style-name="表格28.A2" office:value-type="string">
            <text:p text:style-name="P24">車 ↔ 行人</text:p>
          </table:table-cell>
          <table:table-cell table:style-name="表格28.A2" office:value-type="string">
            <text:p text:style-name="P24">行人靠近盲區，自動發出警示音</text:p>
          </table:table-cell>
        </table:table-row>
        <table:table-row table:style-name="表格28.1">
          <table:table-cell table:style-name="表格28.A3" office:value-type="string">
            <text:p text:style-name="P24">V2N</text:p>
          </table:table-cell>
          <table:table-cell table:style-name="表格28.A3" office:value-type="string">
            <text:p text:style-name="P24">Vehicle to Network</text:p>
          </table:table-cell>
          <table:table-cell table:style-name="表格28.A3" office:value-type="string">
            <text:p text:style-name="P24">車 ↔ 網路</text:p>
          </table:table-cell>
          <table:table-cell table:style-name="表格28.A3" office:value-type="string">
            <text:p text:style-name="P24">即時查詢路況、地圖更新、OTA 系統升級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2">🔑 <text:s/>V2X 四子項</text:p>
            <text:p text:style-name="P22">V2V／V2I／V2P／V2N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4">💡 <text:s/>重點</text:p>
            <text:p text:style-name="P46">為什麼一定要 5G？</text:p>
            <text:p text:style-name="P13">車禍危險往往發生在 0.1 秒內。4G 延遲約 30–50ms，5G 可達 1ms 以下。若通訊延遲 &gt; 10ms，剎車命令傳到時車子可能已經撞上了。V2X 的安全保障，幾乎完全取決於通訊夠不夠即時。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6">⚠️ <text:s/>考試陷阱</text:p>
            <text:p text:style-name="P47">錯誤觀念：V2X 只需要 4G 就夠。</text:p>
            <text:p text:style-name="P13">正確：V2X 安全需求延遲 &lt; 10ms，4G 約 30–50ms，遠遠不夠，必須靠 5G。</text:p>
          </table:table-cell>
          <table:covered-table-cell/>
          <table:covered-table-cell/>
          <table:covered-table-cell/>
        </table:table-row>
      </table:table>
      <text:h text:style-name="P48" text:outline-level="1"><text:bookmark-start text:name="bm_c4"/>第 4 章　網路基礎：ISP／IXP／PoP／OSPF<text:bookmark-end text:name="bm_c4"/></text:h>
      <text:h text:style-name="P21" text:outline-level="2">▍4-1　你上網的真實流程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23">順序</text:p>
            </table:table-cell>
            <table:table-cell table:style-name="表格29.A1" office:value-type="string">
              <text:p text:style-name="P23">節點</text:p>
            </table:table-cell>
            <table:table-cell table:style-name="表格29.A1" office:value-type="string">
              <text:p text:style-name="P23">說明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4">1</text:p>
          </table:table-cell>
          <table:table-cell table:style-name="表格29.A2" office:value-type="string">
            <text:p text:style-name="P24">你家電腦／手機</text:p>
          </table:table-cell>
          <table:table-cell table:style-name="表格29.A2" office:value-type="string">
            <text:p text:style-name="P24">起點</text:p>
          </table:table-cell>
        </table:table-row>
        <table:table-row table:style-name="表格29.1">
          <table:table-cell table:style-name="表格29.A3" office:value-type="string">
            <text:p text:style-name="P24">2</text:p>
          </table:table-cell>
          <table:table-cell table:style-name="表格29.A3" office:value-type="string">
            <text:p text:style-name="P24">PoP（附近接入點）</text:p>
          </table:table-cell>
          <table:table-cell table:style-name="表格29.A3" office:value-type="string">
            <text:p text:style-name="P24">你家附近的基地台或機房</text:p>
          </table:table-cell>
        </table:table-row>
        <table:table-row table:style-name="表格29.1">
          <table:table-cell table:style-name="表格29.A2" office:value-type="string">
            <text:p text:style-name="P24">3</text:p>
          </table:table-cell>
          <table:table-cell table:style-name="表格29.A2" office:value-type="string">
            <text:p text:style-name="P24">ISP（網路公司）</text:p>
          </table:table-cell>
          <table:table-cell table:style-name="表格29.A2" office:value-type="string">
            <text:p text:style-name="P24">中華電信、台灣大哥大、遠傳</text:p>
          </table:table-cell>
        </table:table-row>
        <table:table-row table:style-name="表格29.1">
          <table:table-cell table:style-name="表格29.A3" office:value-type="string">
            <text:p text:style-name="P24">4</text:p>
          </table:table-cell>
          <table:table-cell table:style-name="表格29.A3" office:value-type="string">
            <text:p text:style-name="P24">IXP（網路交換中心）</text:p>
          </table:table-cell>
          <table:table-cell table:style-name="表格29.A3" office:value-type="string">
            <text:p text:style-name="P24">各家 ISP 在此互連</text:p>
          </table:table-cell>
        </table:table-row>
        <table:table-row table:style-name="表格29.1">
          <table:table-cell table:style-name="表格29.A2" office:value-type="string">
            <text:p text:style-name="P24">5</text:p>
          </table:table-cell>
          <table:table-cell table:style-name="表格29.A2" office:value-type="string">
            <text:p text:style-name="P24">目的地</text:p>
          </table:table-cell>
          <table:table-cell table:style-name="表格29.A2" office:value-type="string">
            <text:p text:style-name="P24">Google、YouTube、任何網站</text:p>
          </table:table-cell>
        </table:table-row>
      </table:table>
      <text:h text:style-name="P21" text:outline-level="2">▍4-2　三個名詞白話速記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23">名詞</text:p>
            </table:table-cell>
            <table:table-cell table:style-name="表格30.A1" office:value-type="string">
              <text:p text:style-name="P23">全名</text:p>
            </table:table-cell>
            <table:table-cell table:style-name="表格30.A1" office:value-type="string">
              <text:p text:style-name="P23">白話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4">ISP</text:p>
          </table:table-cell>
          <table:table-cell table:style-name="表格30.A2" office:value-type="string">
            <text:p text:style-name="P24">Internet Service Provider 網際網路服務提供商</text:p>
          </table:table-cell>
          <table:table-cell table:style-name="表格30.A2" office:value-type="string">
            <text:p text:style-name="P24">自來水公司：沒有它根本上不了網</text:p>
          </table:table-cell>
        </table:table-row>
        <table:table-row table:style-name="表格30.1">
          <table:table-cell table:style-name="表格30.A3" office:value-type="string">
            <text:p text:style-name="P24">IXP</text:p>
          </table:table-cell>
          <table:table-cell table:style-name="表格30.A3" office:value-type="string">
            <text:p text:style-name="P24">Internet Exchange Point 網路交換中心</text:p>
          </table:table-cell>
          <table:table-cell table:style-name="表格30.A3" office:value-type="string">
            <text:p text:style-name="P24">高速公路交流道：不同網路公司在此互通</text:p>
          </table:table-cell>
        </table:table-row>
        <table:table-row table:style-name="表格30.1">
          <table:table-cell table:style-name="表格30.A2" office:value-type="string">
            <text:p text:style-name="P24">PoP</text:p>
          </table:table-cell>
          <table:table-cell table:style-name="表格30.A2" office:value-type="string">
            <text:p text:style-name="P24">Point of Presence 網路接入點</text:p>
          </table:table-cell>
          <table:table-cell table:style-name="表格30.A2" office:value-type="string">
            <text:p text:style-name="P24">你家附近的基地台：先接到這裡再進 Internet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4">💡 <text:s/>重點</text:p>
            <text:p text:style-name="P51"><text:soft-page-break/><text:span text:style-name="T26">為什麼需要 IXP？</text:span></text:p>
            <text:p text:style-name="P13">假設中華電信用戶要連台灣大哥大用戶，若每家 ISP 都單獨拉線，成本高、管線亂。有了 IXP，所有 ISP 集中到同一地點交換資料，大幅降低成本並提升效率。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2">🔑 <text:s/>上網三節點</text:p>
            <text:p text:style-name="P36">PoP 讓你接　→　ISP 給你網　→　IXP 幫互連</text:p>
          </table:table-cell>
          <table:covered-table-cell/>
          <table:covered-table-cell/>
        </table:table-row>
      </table:table>
      <text:h text:style-name="P21" text:outline-level="2">▍4-3　OSPF：網路世界的導航系統</text:h>
      <text:p text:style-name="P10"><text:span text:style-name="T1">OSPF（Open Shortest Path First，開放最短路徑優先）是一種</text:span><text:span text:style-name="T3">路由協定</text:span><text:span text:style-name="T1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⭐ <text:s/>核心觀念</text:p>
            <text:p text:style-name="P46">OSPF 是路由協定（非加密協定），工作在 OSI 第三層（網路層），功能是幫資料找最短路徑。</text:p>
          </table:table-cell>
        </table:table-row>
        <table:table-row table:style-name="表格31.1">
          <table:table-cell table:style-name="表格31.A2" office:value-type="string">
            <text:p text:style-name="P16">⚠️ <text:s/>考試陷阱</text:p>
            <text:p text:style-name="P47">錯誤觀念：OSPF 是一種加密或資安協定。</text:p>
            <text:p text:style-name="P13">正確：OSPF 是路由協定，工作在網路層（第三層），功能是找最短路徑，與加密無關。</text:p>
          </table:table-cell>
        </table:table-row>
      </table:table>
      <text:h text:style-name="P48" text:outline-level="1"><text:bookmark-start text:name="bm_c5"/>第 5 章　傳輸協定：HTTP／HTTPS／SSL／TLS<text:bookmark-end text:name="bm_c5"/></text:h>
      <text:h text:style-name="P21" text:outline-level="2">▍5-1　HTTP：沒有加密的普通傳輸</text:h>
      <text:p text:style-name="P10"><text:span text:style-name="T1">HTTP（HyperText Transfer Protocol，超文字傳輸協定）是瀏覽器與網站之間的溝通規則。問題是：</text:span><text:span text:style-name="T27">資料以明文傳送，途中任何人都可以攔截並讀取</text:span><text:span text:style-name="T1">，就像寄明信片，郵差、鄰居都能直接看到你寫了什麼。</text:span></text:p>
      <text:h text:style-name="P21" text:outline-level="2">▍5-2　HTTPS：加密版 HTTP</text:h>
      <text:p text:style-name="P10"><text:span text:style-name="T3">HTTPS ＝ HTTP ＋ SSL／TLS 加密。</text:span><text:span text:style-name="T1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3">項目</text:p>
            </table:table-cell>
            <table:table-cell table:style-name="表格32.A1" office:value-type="string">
              <text:p text:style-name="P23">HTTP</text:p>
            </table:table-cell>
            <table:table-cell table:style-name="表格32.A1" office:value-type="string">
              <text:p text:style-name="P23">HTTPS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4">加密</text:p>
          </table:table-cell>
          <table:table-cell table:style-name="表格32.A2" office:value-type="string">
            <text:p text:style-name="P24">無加密（明文傳輸）</text:p>
          </table:table-cell>
          <table:table-cell table:style-name="表格32.A2" office:value-type="string">
            <text:p text:style-name="P24">SSL／TLS 加密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24">Port</text:p>
          </table:table-cell>
          <table:table-cell table:style-name="表格32.A3" office:value-type="string">
            <text:p text:style-name="P24">80</text:p>
          </table:table-cell>
          <table:table-cell table:style-name="表格32.A3" office:value-type="string">
            <text:p text:style-name="P24">443</text:p>
          </table:table-cell>
        </table:table-row>
        <table:table-row table:style-name="表格32.1">
          <table:table-cell table:style-name="表格32.A2" office:value-type="string">
            <text:p text:style-name="P24">安全性</text:p>
          </table:table-cell>
          <table:table-cell table:style-name="表格32.A2" office:value-type="string">
            <text:p text:style-name="P24">傳輸途中可被攔截偷看</text:p>
          </table:table-cell>
          <table:table-cell table:style-name="表格32.A2" office:value-type="string">
            <text:p text:style-name="P24">傳輸途中為亂碼，無法破解</text:p>
          </table:table-cell>
        </table:table-row>
        <table:table-row table:style-name="表格32.1">
          <table:table-cell table:style-name="表格32.A3" office:value-type="string">
            <text:p text:style-name="P24">適用場景</text:p>
          </table:table-cell>
          <table:table-cell table:style-name="表格32.A3" office:value-type="string">
            <text:p text:style-name="P24">一般靜態頁面（不建議）</text:p>
          </table:table-cell>
          <table:table-cell table:style-name="表格32.A3" office:value-type="string">
            <text:p text:style-name="P24">任何需輸入帳密或個資的頁面</text:p>
          </table:table-cell>
        </table:table-row>
      </table:table>
      <text:p text:style-name="P10"><text:span text:style-name="T26">SSL／TLS 是什麼？</text:span><text:span text:style-name="T1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>🔑 <text:s/>加密三句訣</text:p>
            <text:p text:style-name="P37">HTTP 沒鎖 ＝ 明信片；HTTPS 有鎖 ＝ 保險箱；SSL／TLS 就是那把鎖。</text:p>
          </table:table-cell>
        </table:table-row>
        <table:table-row table:style-name="表格33.1">
          <table:table-cell table:style-name="表格33.A2" office:value-type="string">
            <text:p text:style-name="P16">⚠️ <text:s/>考試陷阱</text:p>
            <text:p text:style-name="P47">錯誤觀念：HTTPS 是一種全新的傳輸協定。</text:p>
            <text:p text:style-name="P13">正確：HTTPS ＝ HTTP ＋ SSL/TLS，是在 HTTP 上加了加密層，並非新協定。</text:p>
            <text:p text:style-name="P47">錯誤觀念：SSL 的加密位置在應用層。</text:p>
            <text:p text:style-name="P13">正確：SSL/TLS 介於應用層與傳輸層之間，負責的是「加密功能本身」，考試重點在『負責加密』而非精確層號。</text:p>
          </table:table-cell>
        </table:table-row>
      </table:table>
      <text:p text:style-name="Standard"/>
      <text:h text:style-name="P9" text:outline-level="1"><text:bookmark-start text:name="bm_c6"/>第 6 章　資安風險管理<text:bookmark-end text:name="bm_c6"/></text:h>
      <text:h text:style-name="P21" text:outline-level="2">▍6-1　什麼是「風險」？</text:h>
      <text:p text:style-name="P45">在資安領域，風險的高低取決於三個因素的乘積組合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23">資產價值 Asse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威脅 Threa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弱點 Vulnerability</text:p>
            </table:table-cell>
            <table:table-cell table:style-name="表格34.A1" office:value-type="string">
              <text:p text:style-name="P23">=</text:p>
            </table:table-cell>
            <table:table-cell table:style-name="表格34.A1" office:value-type="string">
              <text:p text:style-name="P23">風險 Risk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52">有價值的東西</text:p>
          </table:table-cell>
          <table:table-cell table:style-name="表格34.A2" office:value-type="string">
            <text:p text:style-name="P53">×</text:p>
          </table:table-cell>
          <table:table-cell table:style-name="表格34.A2" office:value-type="string">
            <text:p text:style-name="P52">會造成傷害的人事物</text:p>
          </table:table-cell>
          <table:table-cell table:style-name="表格34.A2" office:value-type="string">
            <text:p text:style-name="P53">×</text:p>
          </table:table-cell>
          <table:table-cell table:style-name="表格34.A2" office:value-type="string">
            <text:p text:style-name="P52">可被利用的缺陷</text:p>
          </table:table-cell>
          <table:table-cell table:style-name="表格34.A2" office:value-type="string">
            <text:p text:style-name="P53">=</text:p>
          </table:table-cell>
          <table:table-cell table:style-name="表格34.A2" office:value-type="string">
            <text:p text:style-name="P54">出事的可能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2">🔑 <text:s/>風險公式</text:p>
            <text:p text:style-name="P55">財 ＋ 壞 ＋ 洞 ＝ 出事</text:p>
            <text:p text:style-name="P13">財（資產）有價值、壞（威脅）想搞破壞、洞（弱點）剛好被利用 ── 三者同時存在才是高風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" text:outline-level="3">▍ 三因素各是什麼</text:h>
      <text:list xml:id="list224105629683150" text:continue-numbering="true" text:style-name="WWNum2">
        <text:list-item>
          <text:p text:style-name="P50"><text:span text:style-name="T26">資產（Asset）：</text:span><text:span text:style-name="T4">對組織有價值的東西，如資料庫、客戶個資、金融交易系統、伺服器、官網、員工帳號與權限。</text:span></text:p>
        </text:list-item>
        <text:list-item>
          <text:p text:style-name="P50"><text:span text:style-name="T26">威脅（Threat）：</text:span><text:span text:style-name="T4">可能造成傷害的人事物。外部如駭客、勒索軟體、釣魚信件；內部如員工疏失、惡意內鬼；環境如天災、火災、停電。</text:span></text:p>
        </text:list-item>
        <text:list-item>
          <text:p text:style-name="P50"><text:span text:style-name="T26">弱點（Vulnerability）：</text:span><text:span text:style-name="T4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>💡 <text:s/>重點</text:p>
            <text:p text:style-name="P46">只有資產沒威脅、或有威脅卻沒弱點，風險都低；唯有「資產＋威脅＋弱點」三者俱全，才是高風險。</text:p>
          </table:table-cell>
        </table:table-row>
      </table:table>
      <text:h text:style-name="P21" text:outline-level="2">▍6-2　CIA 三元素：衡量資產重要性</text:h>
      <text:p text:style-name="P10"><text:span text:style-name="T1">CIA 是評估資產重要程度的三個核心面向，</text:span><text:span text:style-name="T27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23">元素</text:p>
            </table:table-cell>
            <table:table-cell table:style-name="表格36.A1" office:value-type="string">
              <text:p text:style-name="P23">英文</text:p>
            </table:table-cell>
            <table:table-cell table:style-name="表格36.A1" office:value-type="string">
              <text:p text:style-name="P23">中文</text:p>
            </table:table-cell>
            <table:table-cell table:style-name="表格36.A1" office:value-type="string">
              <text:p text:style-name="P23">白話</text:p>
            </table:table-cell>
            <table:table-cell table:style-name="表格36.A1" office:value-type="string">
              <text:p text:style-name="P23">例子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4">C</text:p>
          </table:table-cell>
          <table:table-cell table:style-name="表格36.A2" office:value-type="string">
            <text:p text:style-name="P24">Confidentiality</text:p>
          </table:table-cell>
          <table:table-cell table:style-name="表格36.A2" office:value-type="string">
            <text:p text:style-name="P24">機密性</text:p>
          </table:table-cell>
          <table:table-cell table:style-name="表格36.A2" office:value-type="string">
            <text:p text:style-name="P24">資料不能被未授權者看到</text:p>
          </table:table-cell>
          <table:table-cell table:style-name="表格36.A2" office:value-type="string">
            <text:p text:style-name="P24">個資、密碼、醫療紀錄</text:p>
          </table:table-cell>
        </table:table-row>
        <table:table-row table:style-name="表格36.1">
          <table:table-cell table:style-name="表格36.A3" office:value-type="string">
            <text:p text:style-name="P24">I</text:p>
          </table:table-cell>
          <table:table-cell table:style-name="表格36.A3" office:value-type="string">
            <text:p text:style-name="P24">Integrity</text:p>
          </table:table-cell>
          <table:table-cell table:style-name="表格36.A3" office:value-type="string">
            <text:p text:style-name="P24">完整性</text:p>
          </table:table-cell>
          <table:table-cell table:style-name="表格36.A3" office:value-type="string">
            <text:p text:style-name="P24">資料不能被竄改</text:p>
          </table:table-cell>
          <table:table-cell table:style-name="表格36.A3" office:value-type="string">
            <text:p text:style-name="P24">銀行金額不被惡意修改</text:p>
          </table:table-cell>
        </table:table-row>
        <table:table-row table:style-name="表格36.1">
          <table:table-cell table:style-name="表格36.A2" office:value-type="string">
            <text:p text:style-name="P24">A</text:p>
          </table:table-cell>
          <table:table-cell table:style-name="表格36.A2" office:value-type="string">
            <text:p text:style-name="P24">Availability</text:p>
          </table:table-cell>
          <table:table-cell table:style-name="表格36.A2" office:value-type="string">
            <text:p text:style-name="P24">可用性</text:p>
          </table:table-cell>
          <table:table-cell table:style-name="表格36.A2" office:value-type="string">
            <text:p text:style-name="P24">系統必須正常運作</text:p>
          </table:table-cell>
          <table:table-cell table:style-name="表格36.A2" office:value-type="string">
            <text:p text:style-name="P24">銀行網站不能無故停機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2">🔑 <text:s/>CIA 三元素</text:p>
            <text:p text:style-name="P22">偷 → 改 → 掛</text:p>
            <text:p text:style-name="P51"><text:soft-page-break/><text:span text:style-name="T1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4">💡 <text:s/>重點</text:p>
            <text:p text:style-name="P13">一份資產可能同時涉及三個面向。例如醫療紀錄需要機密性（不外洩）、完整性（不竄改）、可用性（緊急時能查閱）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6-3　風險管理四大步驟</text:h>
      <text:p text:style-name="P45">資安風險管理是一套系統化流程，四個步驟依序執行：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23">順序</text:p>
            </table:table-cell>
            <table:table-cell table:style-name="表格37.A1" office:value-type="string">
              <text:p text:style-name="P23">步驟</text:p>
            </table:table-cell>
            <table:table-cell table:style-name="表格37.A1" office:value-type="string">
              <text:p text:style-name="P23">英文</text:p>
            </table:table-cell>
            <table:table-cell table:style-name="表格37.A1" office:value-type="string">
              <text:p text:style-name="P23">重點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4">01</text:p>
          </table:table-cell>
          <table:table-cell table:style-name="表格37.A2" office:value-type="string">
            <text:p text:style-name="P24">辨識</text:p>
          </table:table-cell>
          <table:table-cell table:style-name="表格37.A2" office:value-type="string">
            <text:p text:style-name="P24">Identify</text:p>
          </table:table-cell>
          <table:table-cell table:style-name="表格37.A2" office:value-type="string">
            <text:p text:style-name="P24">盤點所有資產，列出威脅清單，找出系統弱點（如過期軟體、預設密碼）</text:p>
          </table:table-cell>
        </table:table-row>
        <table:table-row table:style-name="表格37.1">
          <table:table-cell table:style-name="表格37.A3" office:value-type="string">
            <text:p text:style-name="P24">02</text:p>
          </table:table-cell>
          <table:table-cell table:style-name="表格37.A3" office:value-type="string">
            <text:p text:style-name="P24">分析</text:p>
          </table:table-cell>
          <table:table-cell table:style-name="表格37.A3" office:value-type="string">
            <text:p text:style-name="P24">Analysis</text:p>
          </table:table-cell>
          <table:table-cell table:style-name="表格37.A3" office:value-type="string">
            <text:p text:style-name="P24">評估兩件事：發生機率有多高？若發生，影響有多嚴重？</text:p>
          </table:table-cell>
        </table:table-row>
        <table:table-row table:style-name="表格37.1">
          <table:table-cell table:style-name="表格37.A2" office:value-type="string">
            <text:p text:style-name="P24">03</text:p>
          </table:table-cell>
          <table:table-cell table:style-name="表格37.A2" office:value-type="string">
            <text:p text:style-name="P24">評量</text:p>
          </table:table-cell>
          <table:table-cell table:style-name="表格37.A2" office:value-type="string">
            <text:p text:style-name="P24">Evaluation</text:p>
          </table:table-cell>
          <table:table-cell table:style-name="表格37.A2" office:value-type="string">
            <text:p text:style-name="P24">將風險依嚴重程度排序，確立處理優先順序，資源有限先處理最高風險</text:p>
          </table:table-cell>
        </table:table-row>
        <table:table-row table:style-name="表格37.1">
          <table:table-cell table:style-name="表格37.A3" office:value-type="string">
            <text:p text:style-name="P24">04</text:p>
          </table:table-cell>
          <table:table-cell table:style-name="表格37.A3" office:value-type="string">
            <text:p text:style-name="P24">處理</text:p>
          </table:table-cell>
          <table:table-cell table:style-name="表格37.A3" office:value-type="string">
            <text:p text:style-name="P24">Treatment</text:p>
          </table:table-cell>
          <table:table-cell table:style-name="表格37.A3" office:value-type="string">
            <text:p text:style-name="P24">選擇適當策略（見下節），並實際採取行動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2">🔑 <text:s/>風險管理四步驟</text:p>
            <text:p text:style-name="P22">盤 → 分 → 序 → 策</text:p>
            <text:p text:style-name="P13">盤點辨識 → 分析機率影響 → 排序優先 → 決定策略。</text:p>
          </table:table-cell>
          <table:covered-table-cell/>
          <table:covered-table-cell/>
          <table:covered-table-cell/>
        </table:table-row>
      </table:table>
      <text:h text:style-name="P21" text:outline-level="2">▍6-4　四種風險處理策略</text:h>
      <text:p text:style-name="P45">完成風險評量後，針對每項風險選擇以下四種策略之一：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23">策略</text:p>
            </table:table-cell>
            <table:table-cell table:style-name="表格38.A1" office:value-type="string">
              <text:p text:style-name="P23">中文</text:p>
            </table:table-cell>
            <table:table-cell table:style-name="表格38.A1" office:value-type="string">
              <text:p text:style-name="P23">說明</text:p>
            </table:table-cell>
            <table:table-cell table:style-name="表格38.A1" office:value-type="string">
              <text:p text:style-name="P23">實例</text:p>
            </table:table-cell>
            <table:table-cell table:style-name="表格38.A1" office:value-type="string">
              <text:p text:style-name="P23">何時選用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24">Avoid</text:p>
          </table:table-cell>
          <table:table-cell table:style-name="表格38.A2" office:value-type="string">
            <text:p text:style-name="P24">避免</text:p>
          </table:table-cell>
          <table:table-cell table:style-name="表格38.A2" office:value-type="string">
            <text:p text:style-name="P24">完全停止活動以消除風險</text:p>
          </table:table-cell>
          <table:table-cell table:style-name="表格38.A2" office:value-type="string">
            <text:p text:style-name="P24">風險太高，直接關閉服務</text:p>
          </table:table-cell>
          <table:table-cell table:style-name="表格38.A2" office:value-type="string">
            <text:p text:style-name="P24">風險極高且無可行降低措施</text:p>
          </table:table-cell>
        </table:table-row>
        <table:table-row table:style-name="表格38.1">
          <table:table-cell table:style-name="表格38.A3" office:value-type="string">
            <text:p text:style-name="P24">Mitigate</text:p>
          </table:table-cell>
          <table:table-cell table:style-name="表格38.A3" office:value-type="string">
            <text:p text:style-name="P24">降低</text:p>
          </table:table-cell>
          <table:table-cell table:style-name="表格38.A3" office:value-type="string">
            <text:p text:style-name="P24">降低發生機率或衝擊</text:p>
          </table:table-cell>
          <table:table-cell table:style-name="表格38.A3" office:value-type="string">
            <text:p text:style-name="P24">裝防火牆、加密、定期備份</text:p>
          </table:table-cell>
          <table:table-cell table:style-name="表格38.A3" office:value-type="string">
            <text:p text:style-name="P24">最常見，有技術或流程可降低就用</text:p>
          </table:table-cell>
        </table:table-row>
        <table:table-row table:style-name="表格38.1">
          <table:table-cell table:style-name="表格38.A2" office:value-type="string">
            <text:p text:style-name="P24">Transfer</text:p>
          </table:table-cell>
          <table:table-cell table:style-name="表格38.A2" office:value-type="string">
            <text:p text:style-name="P24">轉移</text:p>
          </table:table-cell>
          <table:table-cell table:style-name="表格38.A2" office:value-type="string">
            <text:p text:style-name="P24">責任轉移給第三方</text:p>
          </table:table-cell>
          <table:table-cell table:style-name="表格38.A2" office:value-type="string">
            <text:p text:style-name="P24">購買資安保險、委外廠商</text:p>
          </table:table-cell>
          <table:table-cell table:style-name="表格38.A2" office:value-type="string">
            <text:p text:style-name="P24">自身無法完全掌控，透過保險或外包</text:p>
          </table:table-cell>
        </table:table-row>
        <table:table-row table:style-name="表格38.1">
          <table:table-cell table:style-name="表格38.A3" office:value-type="string">
            <text:p text:style-name="P24">Accept</text:p>
          </table:table-cell>
          <table:table-cell table:style-name="表格38.A3" office:value-type="string">
            <text:p text:style-name="P24">接受</text:p>
          </table:table-cell>
          <table:table-cell table:style-name="表格38.A3" office:value-type="string">
            <text:p text:style-name="P56"><text:span text:style-name="T28">評估後可接受，選擇承</text:span><text:soft-page-break/><text:span text:style-name="T28">擔</text:span></text:p>
          </table:table-cell>
          <table:table-cell table:style-name="表格38.A3" office:value-type="string">
            <text:p text:style-name="P24">修復成本遠高於損失</text:p>
          </table:table-cell>
          <table:table-cell table:style-name="表格38.A3" office:value-type="string">
            <text:p text:style-name="P56"><text:span text:style-name="T28">損失遠小於處理成本，且</text:span><text:soft-page-break/><text:span text:style-name="T28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2">🔑 <text:s/>四種風險處理策略</text:p>
            <text:p text:style-name="P22">避 → 降 → 轉 → A</text:p>
            <text:p text:style-name="P13">Avoid 避免、Mitigate 降低、Transfer 轉移、Accept 接受（A 諧音記接受）。</text:p>
          </table:table-cell>
          <table:covered-table-cell/>
          <table:covered-table-cell/>
          <table:covered-table-cell/>
          <table:covered-table-cell/>
        </table:table-row>
      </table:table>
      <text:h text:style-name="P48" text:outline-level="1"><text:bookmark-start text:name="bm_c7"/>第 7 章　防火牆與網路防禦<text:bookmark-end text:name="bm_c7"/></text:h>
      <text:p text:style-name="P10"><text:span text:style-name="T1">把公司資訊系統想像成一棟大樓。防火牆（Firewall）部署於內外網路之間，負責</text:span><text:span text:style-name="T3">監控與控制所有進出流量</text:span><text:span text:style-name="T1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">💡 <text:s/>重點</text:p>
            <text:p text:style-name="P46">三個基本概念：IP ＝ 地址（哪棟大樓）、Port ＝ 房間號碼（哪個服務）、Protocol ＝ 溝通規則。</text:p>
          </table:table-cell>
        </table:table-row>
      </table:table>
      <text:h text:style-name="P21" text:outline-level="2">▍7-1　防火牆四大功能</text:h>
      <text:h text:style-name="P11" text:outline-level="3">▍ ① 封包過濾（Packet Filtering）</text:h>
      <text:p text:style-name="P45">防火牆依據 IP 位址、Port 埠號與 Protocol 通訊協定三項條件，逐一檢查每個封包，決定是否放行。</text:p>
      <text:h text:style-name="P11" text:outline-level="3">▍ ② NAT（網路位址轉換）</text:h>
      <text:p text:style-name="P57">NAT 隱藏內部網路結構。公司內部可能有數十台電腦，但對外只呈現單一 IP 位址，使駭客難以辨識並攻擊內部主機。</text:p>
      <text:h text:style-name="P11" text:outline-level="3">▍ ③ IDS 與 IPS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23">名稱</text:p>
            </table:table-cell>
            <table:table-cell table:style-name="表格40.A1" office:value-type="string">
              <text:p text:style-name="P23">全名</text:p>
            </table:table-cell>
            <table:table-cell table:style-name="表格40.A1" office:value-type="string">
              <text:p text:style-name="P23">功能</text:p>
            </table:table-cell>
            <table:table-cell table:style-name="表格40.A1" office:value-type="string">
              <text:p text:style-name="P23">比喻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4">IDS</text:p>
          </table:table-cell>
          <table:table-cell table:style-name="表格40.A2" office:value-type="string">
            <text:p text:style-name="P24">Intrusion Detection System 入侵偵測系統</text:p>
          </table:table-cell>
          <table:table-cell table:style-name="表格40.A2" office:value-type="string">
            <text:p text:style-name="P24">偵測到異常立即發出警報，但不主動攔截</text:p>
          </table:table-cell>
          <table:table-cell table:style-name="表格40.A2" office:value-type="string">
            <text:p text:style-name="P24">警報器：只會響，不會攔人</text:p>
          </table:table-cell>
        </table:table-row>
        <table:table-row table:style-name="表格40.1">
          <table:table-cell table:style-name="表格40.A3" office:value-type="string">
            <text:p text:style-name="P24">IPS</text:p>
          </table:table-cell>
          <table:table-cell table:style-name="表格40.A3" office:value-type="string">
            <text:p text:style-name="P24">Intrusion Prevention System 入侵防禦系統</text:p>
          </table:table-cell>
          <table:table-cell table:style-name="表格40.A3" office:value-type="string">
            <text:p text:style-name="P24">偵測到威脅後直接自動阻擋</text:p>
          </table:table-cell>
          <table:table-cell table:style-name="表格40.A3" office:value-type="string">
            <text:p text:style-name="P24">警衛：發現壞人直接壓制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2">🔑 <text:s/>IDS vs IPS</text:p>
            <text:p text:style-name="P37">IDS = Detection（偵測）= 只叫不擋；IPS = Prevention（防禦）= 主動攔截。</text:p>
          </table:table-cell>
          <table:covered-table-cell/>
          <table:covered-table-cell/>
          <table:covered-table-cell/>
        </table:table-row>
      </table:table>
      <text:h text:style-name="P58" text:outline-level="3"><text:soft-page-break/><text:span text:style-name="T29">▍ ④ Log 紀錄（稽核追蹤）</text:span></text:h>
      <text:p text:style-name="P45">Log 記錄所有事件，如同監視器錄影。發生資安事件後，可透過 Log 追查攻擊來源、手法及受害範圍。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🔑 <text:s/>防火牆四大功能</text:p>
            <text:p text:style-name="P59">擋、藏、捉、記</text:p>
            <text:p text:style-name="P13">擋＝封包過濾　藏＝NAT　捉＝IDS／IPS　記＝Log。</text:p>
          </table:table-cell>
        </table:table-row>
        <table:table-row table:style-name="表格41.1">
          <table:table-cell table:style-name="表格41.A2" office:value-type="string">
            <text:p text:style-name="P16">⚠️ <text:s/>考試陷阱</text:p>
            <text:p text:style-name="P47">錯誤觀念：NAT 是防毒功能。</text:p>
            <text:p text:style-name="P13">正確：NAT 的功能是「隱藏內部 IP 結構」，讓多台電腦對外只顯示單一 IP，不是防毒，也不是防火牆本身。</text:p>
          </table:table-cell>
        </table:table-row>
      </table:table>
      <text:h text:style-name="P21" text:outline-level="2">▍7-2　公司網路架構與 DMZ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23">層級</text:p>
            </table:table-cell>
            <table:table-cell table:style-name="表格42.A1" office:value-type="string">
              <text:p text:style-name="P23">元件</text:p>
            </table:table-cell>
            <table:table-cell table:style-name="表格42.A1" office:value-type="string">
              <text:p text:style-name="P23">功能說明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24">外部</text:p>
          </table:table-cell>
          <table:table-cell table:style-name="表格42.A2" office:value-type="string">
            <text:p text:style-name="P24">Internet 網際網路</text:p>
          </table:table-cell>
          <table:table-cell table:style-name="表格42.A2" office:value-type="string">
            <text:p text:style-name="P24">使用者、Google、外部服務等所有外部流量</text:p>
          </table:table-cell>
        </table:table-row>
        <table:table-row table:style-name="表格42.1">
          <table:table-cell table:style-name="表格42.A3" office:value-type="string">
            <text:p text:style-name="P24">第一道防線</text:p>
          </table:table-cell>
          <table:table-cell table:style-name="表格42.A3" office:value-type="string">
            <text:p text:style-name="P24">防火牆 Firewall</text:p>
          </table:table-cell>
          <table:table-cell table:style-name="表格42.A3" office:value-type="string">
            <text:p text:style-name="P24">檢查所有進出流量，擋下未授權連線</text:p>
          </table:table-cell>
        </table:table-row>
        <table:table-row table:style-name="表格42.1">
          <table:table-cell table:style-name="表格42.A2" office:value-type="string">
            <text:p text:style-name="P24">緩衝區</text:p>
          </table:table-cell>
          <table:table-cell table:style-name="表格42.A2" office:value-type="string">
            <text:p text:style-name="P24">DMZ 非軍事區</text:p>
          </table:table-cell>
          <table:table-cell table:style-name="表格42.A2" office:value-type="string">
            <text:p text:style-name="P24">放置對外公開的服務（網站、Email Server）</text:p>
          </table:table-cell>
        </table:table-row>
        <table:table-row table:style-name="表格42.1">
          <table:table-cell table:style-name="表格42.A3" office:value-type="string">
            <text:p text:style-name="P24">內部</text:p>
          </table:table-cell>
          <table:table-cell table:style-name="表格42.A3" office:value-type="string">
            <text:p text:style-name="P24">內部網路 Intranet</text:p>
          </table:table-cell>
          <table:table-cell table:style-name="表格42.A3" office:value-type="string">
            <text:p text:style-name="P24">員工電腦、內部伺服器、資料庫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5">⭐ <text:s/>核心觀念</text:p>
            <text:p text:style-name="P46">DMZ（非軍事區）是外部與內部網路之間的「緩衝區」。即使對外網站伺服器被入侵，駭客也無法直接進入公司內部網路。</text:p>
          </table:table-cell>
          <table:covered-table-cell/>
          <table:covered-table-cell/>
        </table:table-row>
      </table:table>
      <text:h text:style-name="P21" text:outline-level="2">▍7-3　DDoS 分散式阻斷服務攻擊</text:h>
      <text:p text:style-name="P10"><text:span text:style-name="T1">DDoS（Distributed Denial of Service）是攻擊者操控大量電腦（</text:span><text:span text:style-name="T3">殭屍網路</text:span><text:span text:style-name="T1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5">⭐ <text:s/>核心觀念</text:p>
            <text:p text:style-name="P46">DDoS 的目標不是「偷資料」，而是「讓服務無法使用」── 這是針對『可用性』的攻擊。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23">防禦手段</text:p>
          </table:table-cell>
          <table:table-cell table:style-name="表格43.A2" office:value-type="string">
            <text:p text:style-name="P23">說明</text:p>
          </table:table-cell>
        </table:table-row>
        <table:table-row table:style-name="表格43.1">
          <table:table-cell table:style-name="表格43.A3" office:value-type="string">
            <text:p text:style-name="P24">防火牆規則</text:p>
          </table:table-cell>
          <table:table-cell table:style-name="表格43.A3" office:value-type="string">
            <text:p text:style-name="P24">設定規則自動封鎖異常流量來源</text:p>
          </table:table-cell>
        </table:table-row>
        <table:table-row table:style-name="表格43.1">
          <table:table-cell table:style-name="表格43.A4" office:value-type="string">
            <text:p text:style-name="P24">CDN 分散流量</text:p>
          </table:table-cell>
          <table:table-cell table:style-name="表格43.A4" office:value-type="string">
            <text:p text:style-name="P24">透過全球節點分散攻擊流量，降低單點壓力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24">流量清洗 Scrubbing</text:p>
          </table:table-cell>
          <table:table-cell table:style-name="表格43.A3" office:value-type="string">
            <text:p text:style-name="P24">由專業服務商過濾惡意流量，只讓合法請求通過</text:p>
          </table:table-cell>
        </table:table-row>
        <table:table-row table:style-name="表格43.1">
          <table:table-cell table:style-name="表格43.A4" office:value-type="string">
            <text:p text:style-name="P24">頻寬擴充</text:p>
          </table:table-cell>
          <table:table-cell table:style-name="表格43.A4" office:value-type="string">
            <text:p text:style-name="P24">臨時增加頻寬以吸收攻擊流量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2">🔑 <text:s/>DDoS 防禦</text:p>
            <text:p text:style-name="P22">防 → C → 清 → 擴</text:p>
            <text:p text:style-name="P13">防火牆規則、CDN、流量清洗、頻寬擴充。</text:p>
          </table:table-cell>
          <table:covered-table-cell/>
        </table:table-row>
      </table:table>
      <text:h text:style-name="P48" text:outline-level="1"><text:bookmark-start text:name="bm_c8"/>第 8 章　常見攻擊手法大全<text:bookmark-end text:name="bm_c8"/></text:h>
      <text:h text:style-name="P21" text:outline-level="2">▍8-1　七大常見攻擊手法總覽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23">攻擊名稱</text:p>
            </table:table-cell>
            <table:table-cell table:style-name="表格44.A1" office:value-type="string">
              <text:p text:style-name="P23">白話說明</text:p>
            </table:table-cell>
            <table:table-cell table:style-name="表格44.A1" office:value-type="string">
              <text:p text:style-name="P23">防禦方式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4">釣魚 Phishing</text:p>
          </table:table-cell>
          <table:table-cell table:style-name="表格44.A2" office:value-type="string">
            <text:p text:style-name="P24">假冒合法信件或網站，誘騙點擊連結或輸入帳密</text:p>
          </table:table-cell>
          <table:table-cell table:style-name="表格44.A2" office:value-type="string">
            <text:p text:style-name="P24">員工教育訓練、郵件過濾系統</text:p>
          </table:table-cell>
        </table:table-row>
        <table:table-row table:style-name="表格44.1">
          <table:table-cell table:style-name="表格44.A3" office:value-type="string">
            <text:p text:style-name="P24">惡意軟體 Malware</text:p>
          </table:table-cell>
          <table:table-cell table:style-name="表格44.A3" office:value-type="string">
            <text:p text:style-name="P24">病毒、木馬、間諜程式等各類惡意程式</text:p>
          </table:table-cell>
          <table:table-cell table:style-name="表格44.A3" office:value-type="string">
            <text:p text:style-name="P24">防毒軟體、EDR、定期更新</text:p>
          </table:table-cell>
        </table:table-row>
        <table:table-row table:style-name="表格44.1">
          <table:table-cell table:style-name="表格44.A2" office:value-type="string">
            <text:p text:style-name="P24">勒索軟體 Ransomware</text:p>
          </table:table-cell>
          <table:table-cell table:style-name="表格44.A2" office:value-type="string">
            <text:p text:style-name="P24">加密所有檔案並要求支付贖金</text:p>
          </table:table-cell>
          <table:table-cell table:style-name="表格44.A2" office:value-type="string">
            <text:p text:style-name="P24">3-2-1 備份、MFA、EDR</text:p>
          </table:table-cell>
        </table:table-row>
        <table:table-row table:style-name="表格44.1">
          <table:table-cell table:style-name="表格44.A3" office:value-type="string">
            <text:p text:style-name="P24">SQL Injection</text:p>
          </table:table-cell>
          <table:table-cell table:style-name="表格44.A3" office:value-type="string">
            <text:p text:style-name="P24">在輸入框塞入 SQL 指令，騙過資料庫執行未授權查詢</text:p>
          </table:table-cell>
          <table:table-cell table:style-name="表格44.A3" office:value-type="string">
            <text:p text:style-name="P24">參數化查詢 Prepared Statement</text:p>
          </table:table-cell>
        </table:table-row>
        <table:table-row table:style-name="表格44.1">
          <table:table-cell table:style-name="表格44.A2" office:value-type="string">
            <text:p text:style-name="P24">XSS 跨站腳本</text:p>
          </table:table-cell>
          <table:table-cell table:style-name="表格44.A2" office:value-type="string">
            <text:p text:style-name="P24">在網頁植入惡意 JavaScript，竊取其他使用者 Cookie</text:p>
          </table:table-cell>
          <table:table-cell table:style-name="表格44.A2" office:value-type="string">
            <text:p text:style-name="P24">HTML Escape、內容安全政策 CSP</text:p>
          </table:table-cell>
        </table:table-row>
        <table:table-row table:style-name="表格44.1">
          <table:table-cell table:style-name="表格44.A3" office:value-type="string">
            <text:p text:style-name="P24">DDoS</text:p>
          </table:table-cell>
          <table:table-cell table:style-name="表格44.A3" office:value-type="string">
            <text:p text:style-name="P24">大量殭屍電腦同時攻擊，使服務癱瘓</text:p>
          </table:table-cell>
          <table:table-cell table:style-name="表格44.A3" office:value-type="string">
            <text:p text:style-name="P24">流量清洗、CDN、防火牆</text:p>
          </table:table-cell>
        </table:table-row>
        <table:table-row table:style-name="表格44.1">
          <table:table-cell table:style-name="表格44.A2" office:value-type="string">
            <text:p text:style-name="P24">社交工程</text:p>
          </table:table-cell>
          <table:table-cell table:style-name="表格44.A2" office:value-type="string">
            <text:p text:style-name="P24">透過心理操控、假冒身份欺騙人員洩露資訊</text:p>
          </table:table-cell>
          <table:table-cell table:style-name="表格44.A2" office:value-type="string">
            <text:p text:style-name="P24">資安意識教育、嚴格身份驗證</text:p>
          </table:table-cell>
        </table:table-row>
      </table:table>
      <text:h text:style-name="P21" text:outline-level="2">▍8-2　社交工程（Social Engineering）</text:h>
      <text:p text:style-name="P45">不破解電腦系統，而是直接「騙人」來取得資訊或存取權限。攻擊者假冒可信身份，誘導受害者自願提供敏感資料。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23">手法</text:p>
            </table:table-cell>
            <table:table-cell table:style-name="表格45.A1" office:value-type="string">
              <text:p text:style-name="P23">說明</text:p>
            </table:table-cell>
            <table:table-cell table:style-name="表格45.A1" office:value-type="string">
              <text:p text:style-name="P23">類型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24">假冒銀行</text:p>
          </table:table-cell>
          <table:table-cell table:style-name="表格45.A2" office:value-type="string">
            <text:p text:style-name="P24">寄送偽裝成銀行的釣魚信件，要求你「確認帳號」</text:p>
          </table:table-cell>
          <table:table-cell table:style-name="表格45.A2" office:value-type="string">
            <text:p text:style-name="P24">Phishing 釣魚</text:p>
          </table:table-cell>
        </table:table-row>
        <table:table-row table:style-name="表格45.1">
          <table:table-cell table:style-name="表格45.A3" office:value-type="string">
            <text:p text:style-name="P24">假冒長官</text:p>
          </table:table-cell>
          <table:table-cell table:style-name="表格45.A3" office:value-type="string">
            <text:p text:style-name="P24">冒充主管要求員工轉帳或提供密碼</text:p>
          </table:table-cell>
          <table:table-cell table:style-name="表格45.A3" office:value-type="string">
            <text:p text:style-name="P24">Spear Phishing 魚叉式</text:p>
          </table:table-cell>
        </table:table-row>
        <table:table-row table:style-name="表格45.1">
          <table:table-cell table:style-name="表格45.A2" office:value-type="string">
            <text:p text:style-name="P24">假冒技術支援</text:p>
          </table:table-cell>
          <table:table-cell table:style-name="表格45.A2" office:value-type="string">
            <text:p text:style-name="P24">電話假稱 IT 人員，要求你提供帳號密碼</text:p>
          </table:table-cell>
          <table:table-cell table:style-name="表格45.A2" office:value-type="string">
            <text:p text:style-name="P24">Vishing 語音釣魚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5">⭐ <text:s/>核心觀念</text:p>
            <text:p text:style-name="P46">社交工程攻擊的目標是「人」，不是技術。最有效的防禦是員工資安意識訓練。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6">⚠️ <text:s/>考試陷阱</text:p>
            <text:p text:style-name="P47">錯誤觀念：社交工程是利用技術漏洞攻擊系統。</text:p>
            <text:p text:style-name="P13">正確：社交工程攻擊的是「人」，利用欺騙、誘導讓受害者自願提供資訊。</text:p>
          </table:table-cell>
          <table:covered-table-cell/>
          <table:covered-table-cell/>
        </table:table-row>
      </table:table>
      <text:h text:style-name="P21" text:outline-level="2">▍8-3　勒索軟體（Ransomware）與七大防護</text:h>
      <text:p text:style-name="P45">勒索軟體以強加密方式鎖定所有檔案，使其無法開啟，再要求支付金錢（通常是加密貨幣）才提供解密金鑰。</text:p>
      <text:h text:style-name="P11" text:outline-level="3">▍ 七大防護策略</text:h>
      <text:list text:style-name="WWNum3">
        <text:list-item text:start-value="1">
          <text:p text:style-name="P60"><text:span text:style-name="T26">3-2-1 備份原則（最重要）：</text:span><text:span text:style-name="T4">3 份資料、2 種不同儲存媒介、1 份必須離線保存。</text:span></text:p>
        </text:list-item>
        <text:list-item>
          <text:p text:style-name="P60"><text:span text:style-name="T26">定期更新與修補（Patch Management）：</text:span><text:span text:style-name="T4">許多勒索軟體利用已知漏洞入侵，定期更新可封堵管道。</text:span></text:p>
        </text:list-item>
        <text:list-item>
          <text:p text:style-name="P60"><text:span text:style-name="T26">MFA 多因素驗證：</text:span><text:span text:style-name="T4">登入除密碼外還需手機 OTP、指紋或硬體金鑰，即使密碼外洩也難登入。</text:span></text:p>
        </text:list-item>
        <text:list-item>
          <text:p text:style-name="P60"><text:span text:style-name="T26">EDR 端點偵測與回應：</text:span><text:span text:style-name="T4">高級防毒，即時監控端點行為，發現大量檔案被加密便自動隔離阻擋。</text:span></text:p>
        </text:list-item>
        <text:list-item>
          <text:p text:style-name="P60"><text:span text:style-name="T26">資安意識教育訓練：</text:span><text:span text:style-name="T4">最主要入侵途徑是員工點擊釣魚郵件，定期演練可大幅降低人為疏失。</text:span></text:p>
        </text:list-item>
        <text:list-item>
          <text:p text:style-name="P60"><text:span text:style-name="T26">網路分段（Network Segmentation）：</text:span><text:span text:style-name="T4">依功能切割網路，某台中毒也能限制病毒橫向擴散。</text:span></text:p>
        </text:list-item>
        <text:list-item>
          <text:p text:style-name="P60"><text:span text:style-name="T26">事件應變計畫（Incident Response Plan）：</text:span><text:span text:style-name="T4">預先制定程序：隔離主機→通知團隊→評估損失→從備份還原。</text:span></text:p>
        </text:list-item>
      </text:list>
      <text:h text:style-name="P11" text:outline-level="3">▍ 3-2-1 備份原則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23">數字</text:p>
            </table:table-cell>
            <table:table-cell table:style-name="表格46.A1" office:value-type="string">
              <text:p text:style-name="P23">意義</text:p>
            </table:table-cell>
            <table:table-cell table:style-name="表格46.A1" office:value-type="string">
              <text:p text:style-name="P23">實務作法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24">3</text:p>
          </table:table-cell>
          <table:table-cell table:style-name="表格46.A2" office:value-type="string">
            <text:p text:style-name="P24">保留三份資料</text:p>
          </table:table-cell>
          <table:table-cell table:style-name="表格46.A2" office:value-type="string">
            <text:p text:style-name="P24">原始資料 ＋ 兩份備份</text:p>
          </table:table-cell>
        </table:table-row>
        <table:table-row table:style-name="表格46.1">
          <table:table-cell table:style-name="表格46.A3" office:value-type="string">
            <text:p text:style-name="P24">2</text:p>
          </table:table-cell>
          <table:table-cell table:style-name="表格46.A3" office:value-type="string">
            <text:p text:style-name="P24">使用兩種不同儲存媒介</text:p>
          </table:table-cell>
          <table:table-cell table:style-name="表格46.A3" office:value-type="string">
            <text:p text:style-name="P24">硬碟 ＋ 雲端儲存</text:p>
          </table:table-cell>
        </table:table-row>
        <table:table-row table:style-name="表格46.1">
          <table:table-cell table:style-name="表格46.A2" office:value-type="string">
            <text:p text:style-name="P24">1</text:p>
          </table:table-cell>
          <table:table-cell table:style-name="表格46.A2" office:value-type="string">
            <text:p text:style-name="P24">其中一份必須離線保存</text:p>
          </table:table-cell>
          <table:table-cell table:style-name="表格46.A2" office:value-type="string">
            <text:p text:style-name="P24">外接硬碟斷線保存，防止同步感染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2">🔑 <text:s/>勒索軟體七大防護</text:p>
            <text:p text:style-name="P22">備、更、多、端、教、切、救</text:p>
            <text:p text:style-name="P13">備份、更新、MFA(多)、EDR(端)、教育、網路切割、應變救援。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5">⭐ <text:s/>核心觀念</text:p>
            <text:p text:style-name="P51"><text:soft-page-break/><text:span text:style-name="T26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21" text:outline-level="2">▍8-4　SQL Injection 攻擊</text:h>
      <text:p text:style-name="P45">正常登入時，系統執行的 SQL 像：SELECT * FROM users WHERE id='admin' AND password='1234';</text:p>
      <text:p text:style-name="P10"><text:span text:style-name="T1">駭客在密碼欄輸入：</text:span><text:span text:style-name="T27">' OR '1'='1</text:span><text:span text:style-name="T1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💡 <text:s/>重點</text:p>
            <text:p text:style-name="P46">因為 '1'='1' 永遠成立，整個 WHERE 條件變為 TRUE，系統誤以為驗證通過，駭客直接登入成功！</text:p>
          </table:table-cell>
        </table:table-row>
      </table:table>
      <text:h text:style-name="P11" text:outline-level="3">▍ 防禦方式</text:h>
      <text:list text:continue-list="list224105629683150" text:style-name="WWNum2">
        <text:list-item>
          <text:p text:style-name="P50"><text:span text:style-name="T26">參數化查詢（Prepared Statement）：</text:span><text:span text:style-name="T4">將 SQL 指令與輸入資料分離，使惡意字元無法影響 SQL 結構。</text:span></text:p>
        </text:list-item>
        <text:list-item>
          <text:p text:style-name="P50"><text:span text:style-name="T26">輸入驗證與過濾：</text:span><text:span text:style-name="T4">拒絕或逸出特殊字元（如單引號、分號）。</text:span></text:p>
        </text:list-item>
        <text:list-item>
          <text:p text:style-name="P50"><text:span text:style-name="T26">最小權限原則：</text:span><text:span text:style-name="T4">資料庫帳號只給予必要的最低權限。</text:span></text:p>
        </text:list-item>
      </text:list>
      <text:h text:style-name="P21" text:outline-level="2">▍8-5　XSS 跨站腳本攻擊</text:h>
      <text:p text:style-name="P10"><text:span text:style-name="T1">XSS（Cross-Site Scripting）是攻擊者將惡意 JavaScript 注入網頁，當其他使用者瀏覽時惡意程式碼自動執行，通常用來</text:span><text:span text:style-name="T27">竊取 Cookie（Session Token）</text:span><text:span text:style-name="T1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23">步驟</text:p>
            </table:table-cell>
            <table:table-cell table:style-name="表格48.A1" office:value-type="string">
              <text:p text:style-name="P23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4">1. 注入惡意程式碼</text:p>
          </table:table-cell>
          <table:table-cell table:style-name="表格48.A2" office:value-type="string">
            <text:p text:style-name="P24">駭客在留言板輸入含 &lt;script&gt; 的惡意內容</text:p>
          </table:table-cell>
        </table:table-row>
        <table:table-row table:style-name="表格48.1">
          <table:table-cell table:style-name="表格48.A3" office:value-type="string">
            <text:p text:style-name="P24">2. 網站未過濾</text:p>
          </table:table-cell>
          <table:table-cell table:style-name="表格48.A3" office:value-type="string">
            <text:p text:style-name="P24">網站未做 HTML Escape，直接將惡意碼存入資料庫</text:p>
          </table:table-cell>
        </table:table-row>
        <table:table-row table:style-name="表格48.1">
          <table:table-cell table:style-name="表格48.A2" office:value-type="string">
            <text:p text:style-name="P24">3. 受害者觸發</text:p>
          </table:table-cell>
          <table:table-cell table:style-name="表格48.A2" office:value-type="string">
            <text:p text:style-name="P24">其他使用者開啟頁面，瀏覽器誤以為合法程式並執行</text:p>
          </table:table-cell>
        </table:table-row>
        <table:table-row table:style-name="表格48.1">
          <table:table-cell table:style-name="表格48.A3" office:value-type="string">
            <text:p text:style-name="P24">4. Cookie 外洩</text:p>
          </table:table-cell>
          <table:table-cell table:style-name="表格48.A3" office:value-type="string">
            <text:p text:style-name="P24">受害者的 Cookie（含登入狀態）被送往駭客伺服器</text:p>
          </table:table-cell>
        </table:table-row>
        <table:table-row table:style-name="表格48.1">
          <table:table-cell table:style-name="表格48.A2" office:value-type="string">
            <text:p text:style-name="P24">5. 帳號遭盜用</text:p>
          </table:table-cell>
          <table:table-cell table:style-name="表格48.A2" office:value-type="string">
            <text:p text:style-name="P24">駭客利用偷來的 Cookie 冒用受害者身份登入</text:p>
          </table:table-cell>
        </table:table-row>
      </table:table>
      <text:h text:style-name="P11" text:outline-level="3">▍ 防禦方式</text:h>
      <text:list text:continue-numbering="true" text:style-name="WWNum2">
        <text:list-item>
          <text:p text:style-name="P50"><text:span text:style-name="T26">HTML Escape：</text:span><text:span text:style-name="T4">將 &lt; &gt; " ' &amp; 等特殊字元轉為 HTML 實體，使其不被當作程式碼執行。</text:span></text:p>
        </text:list-item>
        <text:list-item>
          <text:p text:style-name="P50"><text:span text:style-name="T26">內容安全政策（CSP）：</text:span><text:span text:style-name="T4">限制網頁只能執行來自指定來源的腳本。</text:span></text:p>
        </text:list-item>
        <text:list-item>
          <text:p text:style-name="P50"><text:span text:style-name="T26">HttpOnly Cookie：</text:span><text:span text:style-name="T4">設定 HttpOnly 屬性，使 JavaScript 無法讀取 Cookie 內容。</text:span></text:p>
        </text:list-item>
      </text:list>
      <text:h text:style-name="P49" text:outline-level="2"><text:soft-page-break/><text:span text:style-name="T25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3">手法</text:p>
            </table:table-cell>
            <table:table-cell table:style-name="表格49.A1" office:value-type="string">
              <text:p text:style-name="P23">說明</text:p>
            </table:table-cell>
            <table:table-cell table:style-name="表格49.A1" office:value-type="string">
              <text:p text:style-name="P23">防禦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4">暴力破解 Brute Force</text:p>
          </table:table-cell>
          <table:table-cell table:style-name="表格49.A2" office:value-type="string">
            <text:p text:style-name="P24">程式逐一嘗試所有密碼組合，直到猜中</text:p>
          </table:table-cell>
          <table:table-cell table:style-name="表格49.A2" office:value-type="string">
            <text:p text:style-name="P24">限制登入失敗次數、加入 CAPTCHA</text:p>
          </table:table-cell>
        </table:table-row>
        <table:table-row table:style-name="表格49.1">
          <table:table-cell table:style-name="表格49.A3" office:value-type="string">
            <text:p text:style-name="P24">字典攻擊 Dictionary</text:p>
          </table:table-cell>
          <table:table-cell table:style-name="表格49.A3" office:value-type="string">
            <text:p text:style-name="P24">用常見密碼清單嘗試（password、123456…）</text:p>
          </table:table-cell>
          <table:table-cell table:style-name="表格49.A3" office:value-type="string">
            <text:p text:style-name="P24">不用常見密碼、用密碼管理器產生隨機密碼</text:p>
          </table:table-cell>
        </table:table-row>
        <table:table-row table:style-name="表格49.1">
          <table:table-cell table:style-name="表格49.A2" office:value-type="string">
            <text:p text:style-name="P24">釣魚攻擊 Phishing</text:p>
          </table:table-cell>
          <table:table-cell table:style-name="表格49.A2" office:value-type="string">
            <text:p text:style-name="P24">偽造幾乎一樣的假網站誘你輸入帳密</text:p>
          </table:table-cell>
          <table:table-cell table:style-name="表格49.A2" office:value-type="string">
            <text:p text:style-name="P24">核對網址、不點不明連結、開啟 MFA</text:p>
          </table:table-cell>
        </table:table-row>
        <table:table-row table:style-name="表格49.1">
          <table:table-cell table:style-name="表格49.A3" office:value-type="string">
            <text:p text:style-name="P24">撞庫攻擊 Credential Stuffing</text:p>
          </table:table-cell>
          <table:table-cell table:style-name="表格49.A3" office:value-type="string">
            <text:p text:style-name="P24">拿某站外洩的帳密去「撞」其他平台</text:p>
          </table:table-cell>
          <table:table-cell table:style-name="表格49.A3" office:value-type="string">
            <text:p text:style-name="P24">每站用不同密碼、搭配 MFA、定期檢查外洩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4">💡 <text:s/>重點</text:p>
            <text:p text:style-name="P13">假網站常用相似字混淆，例如 gmail.com（真）vs gmaii.com（假，把 l 換成 i）。登入前務必仔細核對網址。</text:p>
          </table:table-cell>
          <table:covered-table-cell/>
          <table:covered-table-cell/>
        </table:table-row>
      </table:table>
      <text:h text:style-name="P48" text:outline-level="1"><text:bookmark-start text:name="bm_c9"/>第 9 章　身分驗證與帳號管理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⭐ <text:s/>核心觀念</text:p>
            <text:p text:style-name="P46">一句話總結：「如何確認你真的是你？」── 這就是身分驗證（Authentication）的核心問題。</text:p>
          </table:table-cell>
        </table:table-row>
      </table:table>
      <text:h text:style-name="P21" text:outline-level="2">▍9-1　系統防護需求分級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23">等級</text:p>
            </table:table-cell>
            <table:table-cell table:style-name="表格51.A1" office:value-type="string">
              <text:p text:style-name="P23">適用系統</text:p>
            </table:table-cell>
            <table:table-cell table:style-name="表格51.A1" office:value-type="string">
              <text:p text:style-name="P23">說明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4">低級</text:p>
          </table:table-cell>
          <table:table-cell table:style-name="表格51.A2" office:value-type="string">
            <text:p text:style-name="P24">公告網站、一般查詢系統</text:p>
          </table:table-cell>
          <table:table-cell table:style-name="表格51.A2" office:value-type="string">
            <text:p text:style-name="P24">資料外洩影響有限，普通保護即可</text:p>
          </table:table-cell>
        </table:table-row>
        <table:table-row table:style-name="表格51.1">
          <table:table-cell table:style-name="表格51.A3" office:value-type="string">
            <text:p text:style-name="P24">中級</text:p>
          </table:table-cell>
          <table:table-cell table:style-name="表格51.A3" office:value-type="string">
            <text:p text:style-name="P24">員工個資、學校系統</text:p>
          </table:table-cell>
          <table:table-cell table:style-name="表格51.A3" office:value-type="string">
            <text:p text:style-name="P24">個資外洩影響較大，需嚴格管控</text:p>
          </table:table-cell>
        </table:table-row>
        <table:table-row table:style-name="表格51.1">
          <table:table-cell table:style-name="表格51.A2" office:value-type="string">
            <text:p text:style-name="P24">高級</text:p>
          </table:table-cell>
          <table:table-cell table:style-name="表格51.A2" office:value-type="string">
            <text:p text:style-name="P24">國防、銀行核心、電力系統</text:p>
          </table:table-cell>
          <table:table-cell table:style-name="表格51.A2" office:value-type="string">
            <text:p text:style-name="P24">遭駭可能影響整個國家，安全要求最高</text:p>
          </table:table-cell>
        </table:table-row>
      </table:table>
      <text:h text:style-name="P21" text:outline-level="2">▍9-2　帳號管理（存取控制）</text:h>
      <text:p text:style-name="P10"><text:span text:style-name="T26">帳號管理的核心問題只有兩個：</text:span><text:span text:style-name="T1">「誰能登入？登入後能做什麼？」</text:span></text:p>
      <text:h text:style-name="P11" text:outline-level="3">▍ 最小權限原則（Least Privilege）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1"><text:span text:style-name="T30">⭐ <text:s/>核心觀念</text:span><text:soft-page-break/></text:p>
            <text:p text:style-name="P46">只給予使用者完成工作所需的最低限度權限，多餘的權限一律不開放。</text:p>
          </table:table-cell>
        </table:table-row>
      </table:table>
      <text:p text:style-name="P45">生活比喻：一位工讀生只需要「輸入資料」的權限，就不應同時擁有「刪除資料庫」或「查看全體薪資」的權限。權限越大，風險越高。</text:p>
      <text:h text:style-name="P11" text:outline-level="3">▍ 帳號生命週期管理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23">階段</text:p>
            </table:table-cell>
            <table:table-cell table:style-name="表格53.A1" office:value-type="string">
              <text:p text:style-name="P23">時機</text:p>
            </table:table-cell>
            <table:table-cell table:style-name="表格53.A1" office:value-type="string">
              <text:p text:style-name="P23">動作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24">① 建立</text:p>
          </table:table-cell>
          <table:table-cell table:style-name="表格53.A2" office:value-type="string">
            <text:p text:style-name="P24">新員工到職</text:p>
          </table:table-cell>
          <table:table-cell table:style-name="表格53.A2" office:value-type="string">
            <text:p text:style-name="P24">設定帳號與初始密碼</text:p>
          </table:table-cell>
        </table:table-row>
        <table:table-row table:style-name="表格53.1">
          <table:table-cell table:style-name="表格53.A3" office:value-type="string">
            <text:p text:style-name="P24">② 修改</text:p>
          </table:table-cell>
          <table:table-cell table:style-name="表格53.A3" office:value-type="string">
            <text:p text:style-name="P24">部門調動、職位升遷</text:p>
          </table:table-cell>
          <table:table-cell table:style-name="表格53.A3" office:value-type="string">
            <text:p text:style-name="P24">更新對應權限範圍</text:p>
          </table:table-cell>
        </table:table-row>
        <table:table-row table:style-name="表格53.1">
          <table:table-cell table:style-name="表格53.A2" office:value-type="string">
            <text:p text:style-name="P24">③ 停用</text:p>
          </table:table-cell>
          <table:table-cell table:style-name="表格53.A2" office:value-type="string">
            <text:p text:style-name="P24">員工離職</text:p>
          </table:table-cell>
          <table:table-cell table:style-name="表格53.A2" office:value-type="string">
            <text:p text:style-name="P24">立即停用帳號與所有權限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6">⚠️ <text:s/>考試陷阱</text:p>
            <text:p text:style-name="P47">重要：若員工離職後未停用帳號，前員工仍可存取公司系統，是非常嚴重的資安漏洞！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2">🔑 <text:s/>帳號生命週期</text:p>
            <text:p text:style-name="P59">生 改 停</text:p>
            <text:p text:style-name="P13">建立 → 修改 → 停用。</text:p>
          </table:table-cell>
          <table:covered-table-cell/>
          <table:covered-table-cell/>
        </table:table-row>
      </table:table>
      <text:h text:style-name="P21" text:outline-level="2">▍9-3　OTP 與 MFA</text:h>
      <text:p text:style-name="P10"><text:span text:style-name="T26">OTP（One-Time Password 一次性密碼）</text:span><text:span text:style-name="T1">：用過即廢的臨時密碼，最常見形式是手機簡訊驗證碼。即使駭客已偷到帳密，沒有當下的 OTP 仍無法登入。</text:span></text:p>
      <text:p text:style-name="P10"><text:span text:style-name="T26">MFA（Multi-Factor Authentication 多因素驗證）</text:span><text:span text:style-name="T1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3">生活場景</text:p>
            </table:table-cell>
            <table:table-cell table:style-name="表格54.A1" office:value-type="string">
              <text:p text:style-name="P23">第一因素</text:p>
            </table:table-cell>
            <table:table-cell table:style-name="表格54.A1" office:value-type="string">
              <text:p text:style-name="P23">第二因素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4">網路銀行登入</text:p>
          </table:table-cell>
          <table:table-cell table:style-name="表格54.A2" office:value-type="string">
            <text:p text:style-name="P24">密碼（知識型）</text:p>
          </table:table-cell>
          <table:table-cell table:style-name="表格54.A2" office:value-type="string">
            <text:p text:style-name="P24">手機 OTP（持有型）</text:p>
          </table:table-cell>
        </table:table-row>
        <table:table-row table:style-name="表格54.1">
          <table:table-cell table:style-name="表格54.A3" office:value-type="string">
            <text:p text:style-name="P24">iPhone 解鎖</text:p>
          </table:table-cell>
          <table:table-cell table:style-name="表格54.A3" office:value-type="string">
            <text:p text:style-name="P24">手機本身（持有型）</text:p>
          </table:table-cell>
          <table:table-cell table:style-name="表格54.A3" office:value-type="string">
            <text:p text:style-name="P24">Face ID（生物特徵型）</text:p>
          </table:table-cell>
        </table:table-row>
        <table:table-row table:style-name="表格54.1">
          <table:table-cell table:style-name="表格54.A2" office:value-type="string">
            <text:p text:style-name="P24">ATM 提款</text:p>
          </table:table-cell>
          <table:table-cell table:style-name="表格54.A2" office:value-type="string">
            <text:p text:style-name="P24">金融卡（持有型）</text:p>
          </table:table-cell>
          <table:table-cell table:style-name="表格54.A2" office:value-type="string">
            <text:p text:style-name="P24">PIN 碼（知識型）</text:p>
          </table:table-cell>
        </table:table-row>
        <table:table-row table:style-name="表格54.1">
          <table:table-cell table:style-name="表格54.A3" office:value-type="string">
            <text:p text:style-name="P24">公司 VPN</text:p>
          </table:table-cell>
          <table:table-cell table:style-name="表格54.A3" office:value-type="string">
            <text:p text:style-name="P24">帳號密碼（知識型）</text:p>
          </table:table-cell>
          <table:table-cell table:style-name="表格54.A3" office:value-type="string">
            <text:p text:style-name="P24">驗證 App（持有型）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5">⭐ <text:s/>核心觀念</text:p>
            <text:p text:style-name="P46">「OTP 本身不等於 MFA」── 密碼 ＋ OTP 兩者合用才構成 MFA！單獨使用 OTP 不算 MFA。</text:p>
          </table:table-cell>
          <table:covered-table-cell/>
          <table:covered-table-cell/>
        </table:table-row>
      </table:table>
      <text:h text:style-name="P49" text:outline-level="2"><text:soft-page-break/><text:span text:style-name="T25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23">類型</text:p>
            </table:table-cell>
            <table:table-cell table:style-name="表格55.A1" office:value-type="string">
              <text:p text:style-name="P23">你「？」什麼</text:p>
            </table:table-cell>
            <table:table-cell table:style-name="表格55.A1" office:value-type="string">
              <text:p text:style-name="P23">例子</text:p>
            </table:table-cell>
            <table:table-cell table:style-name="表格55.A1" office:value-type="string">
              <text:p text:style-name="P23">特性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>① 知識型</text:p>
          </table:table-cell>
          <table:table-cell table:style-name="表格55.A2" office:value-type="string">
            <text:p text:style-name="P24">你知道什麼</text:p>
          </table:table-cell>
          <table:table-cell table:style-name="表格55.A2" office:value-type="string">
            <text:p text:style-name="P24">密碼、PIN、安全問題</text:p>
          </table:table-cell>
          <table:table-cell table:style-name="表格55.A2" office:value-type="string">
            <text:p text:style-name="P24">最普遍，但最易被竊</text:p>
          </table:table-cell>
        </table:table-row>
        <table:table-row table:style-name="表格55.1">
          <table:table-cell table:style-name="表格55.A3" office:value-type="string">
            <text:p text:style-name="P25">② 持有型</text:p>
          </table:table-cell>
          <table:table-cell table:style-name="表格55.A3" office:value-type="string">
            <text:p text:style-name="P24">你擁有什麼</text:p>
          </table:table-cell>
          <table:table-cell table:style-name="表格55.A3" office:value-type="string">
            <text:p text:style-name="P24">手機、金融卡、OTP 卡</text:p>
          </table:table-cell>
          <table:table-cell table:style-name="表格55.A3" office:value-type="string">
            <text:p text:style-name="P24">需實體裝置在手</text:p>
          </table:table-cell>
        </table:table-row>
        <table:table-row table:style-name="表格55.1">
          <table:table-cell table:style-name="表格55.A2" office:value-type="string">
            <text:p text:style-name="P25">③ 生物型</text:p>
          </table:table-cell>
          <table:table-cell table:style-name="表格55.A2" office:value-type="string">
            <text:p text:style-name="P24">你是誰</text:p>
          </table:table-cell>
          <table:table-cell table:style-name="表格55.A2" office:value-type="string">
            <text:p text:style-name="P24">指紋、臉部辨識、虹膜</text:p>
          </table:table-cell>
          <table:table-cell table:style-name="表格55.A2" office:value-type="string">
            <text:p text:style-name="P24">方便但有隱私疑慮</text:p>
          </table:table-cell>
        </table:table-row>
        <table:table-row table:style-name="表格55.1">
          <table:table-cell table:style-name="表格55.A3" office:value-type="string">
            <text:p text:style-name="P25">④ 行為型</text:p>
          </table:table-cell>
          <table:table-cell table:style-name="表格55.A3" office:value-type="string">
            <text:p text:style-name="P24">你的習慣</text:p>
          </table:table-cell>
          <table:table-cell table:style-name="表格55.A3" office:value-type="string">
            <text:p text:style-name="P24">打字速度、滑鼠移動</text:p>
          </table:table-cell>
          <table:table-cell table:style-name="表格55.A3" office:value-type="string">
            <text:p text:style-name="P24">進階，常用於銀行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2">🔑 <text:s/>身分驗證四大類型</text:p>
            <text:p text:style-name="P59">知 有 生 行</text:p>
            <text:p text:style-name="P13">知道的／擁有的／生物特徵／行為習慣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6">⚠️ <text:s/>考試陷阱</text:p>
            <text:p text:style-name="P47">陷阱：ATM 不是 MFA？錯！</text:p>
            <text:p text:style-name="P13">ATM 是 MFA ── 金融卡（持有型）＋ PIN 碼（知識型），兩種因素同時使用。</text:p>
            <text:p text:style-name="P47">陷阱：最小權限 = 沒有任何權限？錯！</text:p>
            <text:p text:style-name="P13">最小權限是「給予完成工作所需的最低權限」，不是零權限，是『剛好夠用』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5">⭐ <text:s/>核心觀念</text:p>
            <text:p text:style-name="P46">MFA ＋ 最小權限 ＋ 帳號生命週期，是資安帳號管理的三大核心。考試遇到不確定的題目，先想這三個！</text:p>
          </table:table-cell>
          <table:covered-table-cell/>
          <table:covered-table-cell/>
          <table:covered-table-cell/>
        </table:table-row>
      </table:table>
      <text:h text:style-name="P48" text:outline-level="1"><text:bookmark-start text:name="bm_c10"/>第 10 章　VPN 完整解析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5">⭐ <text:s/>核心觀念</text:p>
            <text:p text:style-name="P46">終極一句話：先證明你是自己人，再把資料加密，安全穿過 Internet 進公司內網。</text:p>
          </table:table-cell>
        </table:table-row>
      </table:table>
      <text:h text:style-name="P21" text:outline-level="2">▍10-1　為什麼需要 VPN？</text:h>
      <text:p text:style-name="P45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p>
      <text:h text:style-name="P49" text:outline-level="2"><text:soft-page-break/><text:span text:style-name="T25">▍10-2　VPN 做的兩件事</text:span></text:h>
      <text:h text:style-name="P11" text:outline-level="3">▍ 第一件事：驗證身份</text:h>
      <text:p text:style-name="P45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p>
      <text:h text:style-name="P11" text:outline-level="3">▍ 第二件事：建立加密通道</text:h>
      <text:p text:style-name="P45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4">💡 <text:s/>重點</text:p>
            <text:p text:style-name="P46">什麼叫「隧道」（Tunnel）？</text:p>
            <text:p text:style-name="P13">VPN 並沒有真的拉一條新網路線，而是透過加密讓公開網路「看起來像私人專線」，這就是為什麼叫 Tunnel（隧道）。</text:p>
          </table:table-cell>
        </table:table-row>
      </table:table>
      <text:h text:style-name="P21" text:outline-level="2">▍10-3　VPN 三個關鍵字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23">字</text:p>
            </table:table-cell>
            <table:table-cell table:style-name="表格58.A1" office:value-type="string">
              <text:p text:style-name="P23">英文</text:p>
            </table:table-cell>
            <table:table-cell table:style-name="表格58.A1" office:value-type="string">
              <text:p text:style-name="P23">正確意思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24">虛擬</text:p>
          </table:table-cell>
          <table:table-cell table:style-name="表格58.A2" office:value-type="string">
            <text:p text:style-name="P24">Virtual</text:p>
          </table:table-cell>
          <table:table-cell table:style-name="表格58.A2" office:value-type="string">
            <text:p text:style-name="P24">不是真的實體專線，而是用加密「模擬」出來的私人通道</text:p>
          </table:table-cell>
        </table:table-row>
        <table:table-row table:style-name="表格58.1">
          <table:table-cell table:style-name="表格58.A3" office:value-type="string">
            <text:p text:style-name="P24">私人</text:p>
          </table:table-cell>
          <table:table-cell table:style-name="表格58.A3" office:value-type="string">
            <text:p text:style-name="P24">Private</text:p>
          </table:table-cell>
          <table:table-cell table:style-name="表格58.A3" office:value-type="string">
            <text:p text:style-name="P24">別人看不到通道內的內容，只有你和公司能讀取</text:p>
          </table:table-cell>
        </table:table-row>
        <table:table-row table:style-name="表格58.1">
          <table:table-cell table:style-name="表格58.A2" office:value-type="string">
            <text:p text:style-name="P24">網路</text:p>
          </table:table-cell>
          <table:table-cell table:style-name="表格58.A2" office:value-type="string">
            <text:p text:style-name="P24">Network</text:p>
          </table:table-cell>
          <table:table-cell table:style-name="表格58.A2" office:value-type="string">
            <text:p text:style-name="P24">連上後就能存取公司內部完整網路，就像人在辦公室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5">⭐ <text:s/>核心觀念</text:p>
            <text:p text:style-name="P46">VPN 核心三功能：① 加密傳輸（TLS 或 IPSec）② 身份驗證（帳密＋MFA＋憑證）③ 通過驗證後取得內網 IP，遠端存取內部資源。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4">💡 <text:s/>重點</text:p>
            <text:p text:style-name="P13">延伸考點：VPN 常用加密協定為 IPSec（常見於企業 VPN）或 TLS（常見於 SSL VPN），兩者都是將封包加密後再傳送。</text:p>
          </table:table-cell>
          <table:covered-table-cell/>
          <table:covered-table-cell/>
        </table:table-row>
      </table:table>
      <text:h text:style-name="P62" text:outline-level="1"><text:bookmark-start text:name="bm_c11"/><text:soft-page-break/><text:span text:style-name="T31">第 11 章　Port 與 Cookie／Session</text:span><text:bookmark-end text:name="bm_c11"/></text:h>
      <text:h text:style-name="P21" text:outline-level="2">▍11-1　Port 是什麼？建立腦中畫面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5">⭐ <text:s/>核心觀念</text:p>
            <text:p text:style-name="P46">最重要的一句話（背到反射）：IP 找電腦，Port 找程式。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23">概念</text:p>
          </table:table-cell>
          <table:table-cell table:style-name="表格59.A2" office:value-type="string">
            <text:p text:style-name="P23">比喻</text:p>
          </table:table-cell>
          <table:table-cell table:style-name="表格59.A2" office:value-type="string">
            <text:p text:style-name="P23">實際意義</text:p>
          </table:table-cell>
        </table:table-row>
        <table:table-row table:style-name="表格59.1">
          <table:table-cell table:style-name="表格59.A3" office:value-type="string">
            <text:p text:style-name="P24">IP 位址</text:p>
          </table:table-cell>
          <table:table-cell table:style-name="表格59.A3" office:value-type="string">
            <text:p text:style-name="P24">大樓地址（台北市 XX 路 100 號）</text:p>
          </table:table-cell>
          <table:table-cell table:style-name="表格59.A3" office:value-type="string">
            <text:p text:style-name="P24">找到是哪一台電腦</text:p>
          </table:table-cell>
        </table:table-row>
        <table:table-row table:style-name="表格59.1">
          <table:table-cell table:style-name="表格59.A4" office:value-type="string">
            <text:p text:style-name="P24">Port</text:p>
          </table:table-cell>
          <table:table-cell table:style-name="表格59.A4" office:value-type="string">
            <text:p text:style-name="P24">大樓裡的房間號碼（101、202…）</text:p>
          </table:table-cell>
          <table:table-cell table:style-name="表格59.A4" office:value-type="string">
            <text:p text:style-name="P24">找到電腦裡是哪一個程式</text:p>
          </table:table-cell>
        </table:table-row>
        <table:table-row table:style-name="表格59.1">
          <table:table-cell table:style-name="表格59.A3" office:value-type="string">
            <text:p text:style-name="P24">網路封包</text:p>
          </table:table-cell>
          <table:table-cell table:style-name="表格59.A3" office:value-type="string">
            <text:p text:style-name="P24">快遞包裹</text:p>
          </table:table-cell>
          <table:table-cell table:style-name="表格59.A3" office:value-type="string">
            <text:p text:style-name="P24">要傳送的資料</text:p>
          </table:table-cell>
        </table:table-row>
        <table:table-row table:style-name="表格59.1">
          <table:table-cell table:style-name="表格59.A4" office:value-type="string">
            <text:p text:style-name="P24">作業系統</text:p>
          </table:table-cell>
          <table:table-cell table:style-name="表格59.A4" office:value-type="string">
            <text:p text:style-name="P24">大樓管理員</text:p>
          </table:table-cell>
          <table:table-cell table:style-name="表格59.A4" office:value-type="string">
            <text:p text:style-name="P24">看房間號碼，把包裹送給正確的程式</text:p>
          </table:table-cell>
        </table:table-row>
      </table:table>
      <text:p text:style-name="P45">你的電腦同時開著 Chrome、Line、Discord、Web Server。當封包進來時，作業系統會查看 Port 號碼，將封包正確交給對應的程式。例如 Port 80 → Web Server、Port 3306 → MySQL、Port 22 → SSH。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>💡 <text:s/>重點</text:p>
            <text:p text:style-name="P13">192.168.1.5:80 的意思是：位址為 192.168.1.5 的電腦上的網頁服務（Port 80）。冒號後面就是 Port 號碼。</text:p>
          </table:table-cell>
        </table:table-row>
        <table:table-row table:style-name="表格60.1">
          <table:table-cell table:style-name="表格60.A2" office:value-type="string">
            <text:p text:style-name="P16">⚠️ <text:s/>考試陷阱</text:p>
            <text:p text:style-name="P47">超重要：Port 不是實體的洞！</text:p>
            <text:p text:style-name="P13">Port 只是一個數字（0～65535），是作業系統用來分辨程式的『邏輯識別碼』，純屬軟體概念，跟實體網路線無關。換 Port 只需改軟體設定。</text:p>
          </table:table-cell>
        </table:table-row>
      </table:table>
      <text:h text:style-name="P11" text:outline-level="3">▍ 必背 Port 對照表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23">Port</text:p>
            </table:table-cell>
            <table:table-cell table:style-name="表格61.A1" office:value-type="string">
              <text:p text:style-name="P23">協定</text:p>
            </table:table-cell>
            <table:table-cell table:style-name="表格61.A1" office:value-type="string">
              <text:p text:style-name="P23">功能</text:p>
            </table:table-cell>
            <table:table-cell table:style-name="表格61.A1" office:value-type="string">
              <text:p text:style-name="P23">記憶法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24">80</text:p>
          </table:table-cell>
          <table:table-cell table:style-name="表格61.A2" office:value-type="string">
            <text:p text:style-name="P24">HTTP</text:p>
          </table:table-cell>
          <table:table-cell table:style-name="表格61.A2" office:value-type="string">
            <text:p text:style-name="P24">一般網頁瀏覽（無加密）</text:p>
          </table:table-cell>
          <table:table-cell table:style-name="表格61.A2" office:value-type="string">
            <text:p text:style-name="P24">8 橫放像 ∞，網頁無限瀏覽</text:p>
          </table:table-cell>
        </table:table-row>
        <table:table-row table:style-name="表格61.1">
          <table:table-cell table:style-name="表格61.A3" office:value-type="string">
            <text:p text:style-name="P24">443</text:p>
          </table:table-cell>
          <table:table-cell table:style-name="表格61.A3" office:value-type="string">
            <text:p text:style-name="P24">HTTPS</text:p>
          </table:table-cell>
          <table:table-cell table:style-name="表格61.A3" office:value-type="string">
            <text:p text:style-name="P24">安全網頁瀏覽（加密）</text:p>
          </table:table-cell>
          <table:table-cell table:style-name="表格61.A3" office:value-type="string">
            <text:p text:style-name="P24">443 &gt; 80，更大更安全</text:p>
          </table:table-cell>
        </table:table-row>
        <table:table-row table:style-name="表格61.1">
          <table:table-cell table:style-name="表格61.A2" office:value-type="string">
            <text:p text:style-name="P24">21</text:p>
          </table:table-cell>
          <table:table-cell table:style-name="表格61.A2" office:value-type="string">
            <text:p text:style-name="P24">FTP</text:p>
          </table:table-cell>
          <table:table-cell table:style-name="表格61.A2" office:value-type="string">
            <text:p text:style-name="P24">檔案傳輸</text:p>
          </table:table-cell>
          <table:table-cell table:style-name="表格61.A2" office:value-type="string">
            <text:p text:style-name="P24">2 個人傳 1 個檔案</text:p>
          </table:table-cell>
        </table:table-row>
        <table:table-row table:style-name="表格61.1">
          <table:table-cell table:style-name="表格61.A3" office:value-type="string">
            <text:p text:style-name="P24">22</text:p>
          </table:table-cell>
          <table:table-cell table:style-name="表格61.A3" office:value-type="string">
            <text:p text:style-name="P24">SSH</text:p>
          </table:table-cell>
          <table:table-cell table:style-name="表格61.A3" office:value-type="string">
            <text:p text:style-name="P24">安全遠端登入（超常考）</text:p>
          </table:table-cell>
          <table:table-cell table:style-name="表格61.A3" office:value-type="string">
            <text:p text:style-name="P24">兩個 S 的 SSH</text:p>
          </table:table-cell>
        </table:table-row>
        <table:table-row table:style-name="表格61.1">
          <table:table-cell table:style-name="表格61.A2" office:value-type="string">
            <text:p text:style-name="P24">25</text:p>
          </table:table-cell>
          <table:table-cell table:style-name="表格61.A2" office:value-type="string">
            <text:p text:style-name="P24">SMTP</text:p>
          </table:table-cell>
          <table:table-cell table:style-name="表格61.A2" office:value-type="string">
            <text:p text:style-name="P24">電子郵件寄送</text:p>
          </table:table-cell>
          <table:table-cell table:style-name="表格61.A2" office:value-type="string">
            <text:p text:style-name="P24">25 = 郵筒號碼</text:p>
          </table:table-cell>
        </table:table-row>
        <table:table-row table:style-name="表格61.1">
          <table:table-cell table:style-name="表格61.A3" office:value-type="string">
            <text:p text:style-name="P24">3306</text:p>
          </table:table-cell>
          <table:table-cell table:style-name="表格61.A3" office:value-type="string">
            <text:p text:style-name="P24">MySQL</text:p>
          </table:table-cell>
          <table:table-cell table:style-name="表格61.A3" office:value-type="string">
            <text:p text:style-name="P24">資料庫連線</text:p>
          </table:table-cell>
          <table:table-cell table:style-name="表格61.A3" office:value-type="string">
            <text:p text:style-name="P24">資料庫的家門號碼</text:p>
          </table:table-cell>
        </table:table-row>
      </table:table>
      <text:h text:style-name="P49" text:outline-level="2"><text:soft-page-break/><text:span text:style-name="T25">▍11-2　Cookie 與 Session 的差異</text:span></text:h>
      <text:p text:style-name="P57">由於 HTTP 是「無狀態」協定，網站本身不會記得你。Cookie 與 Session 是解決這個問題的兩種機制，讓網站識別「你就是剛才登入的那位用戶」。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23">項目</text:p>
            </table:table-cell>
            <table:table-cell table:style-name="表格62.A1" office:value-type="string">
              <text:p text:style-name="P23">Cookie</text:p>
            </table:table-cell>
            <table:table-cell table:style-name="表格62.A1" office:value-type="string">
              <text:p text:style-name="P23">Session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24">儲存位置</text:p>
          </table:table-cell>
          <table:table-cell table:style-name="表格62.A2" office:value-type="string">
            <text:p text:style-name="P24">使用者的瀏覽器端</text:p>
          </table:table-cell>
          <table:table-cell table:style-name="表格62.A2" office:value-type="string">
            <text:p text:style-name="P24">伺服器端</text:p>
          </table:table-cell>
        </table:table-row>
        <table:table-row table:style-name="表格62.1">
          <table:table-cell table:style-name="表格62.A3" office:value-type="string">
            <text:p text:style-name="P24">內容</text:p>
          </table:table-cell>
          <table:table-cell table:style-name="表格62.A3" office:value-type="string">
            <text:p text:style-name="P24">儲存 Session ID 等識別資料</text:p>
          </table:table-cell>
          <table:table-cell table:style-name="表格62.A3" office:value-type="string">
            <text:p text:style-name="P24">儲存登入狀態、使用者資料</text:p>
          </table:table-cell>
        </table:table-row>
        <table:table-row table:style-name="表格62.1">
          <table:table-cell table:style-name="表格62.A2" office:value-type="string">
            <text:p text:style-name="P24">比喻</text:p>
          </table:table-cell>
          <table:table-cell table:style-name="表格62.A2" office:value-type="string">
            <text:p text:style-name="P24">餐廳給你的號碼牌（帶在身上）</text:p>
          </table:table-cell>
          <table:table-cell table:style-name="表格62.A2" office:value-type="string">
            <text:p text:style-name="P24">餐廳後台的點餐紀錄（存在店裡）</text:p>
          </table:table-cell>
        </table:table-row>
        <table:table-row table:style-name="表格62.1">
          <table:table-cell table:style-name="表格62.A3" office:value-type="string">
            <text:p text:style-name="P24">安全性風險</text:p>
          </table:table-cell>
          <table:table-cell table:style-name="表格62.A3" office:value-type="string">
            <text:p text:style-name="P24">可能被 XSS 竊取（用 HttpOnly 防護）</text:p>
          </table:table-cell>
          <table:table-cell table:style-name="表格62.A3" office:value-type="string">
            <text:p text:style-name="P24">Session ID 洩漏仍會導致帳號被盜用</text:p>
          </table:table-cell>
        </table:table-row>
      </table:table>
      <text:h text:style-name="P48" text:outline-level="1"><text:bookmark-start text:name="bm_c12"/>第 12 章　資安事件應變處理流程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5">⭐ <text:s/>核心觀念</text:p>
            <text:p text:style-name="P46">核心精神：「先通報、先止血，再修復，最後檢討。」整個流程濃縮成四個字：報 → 擋 → 修 → 改。</text:p>
          </table:table-cell>
        </table:table-row>
      </table:table>
      <text:h text:style-name="P21" text:outline-level="2">▍12-1　四步驟總覽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23">步驟</text:p>
            </table:table-cell>
            <table:table-cell table:style-name="表格64.A1" office:value-type="string">
              <text:p text:style-name="P23">一字訣</text:p>
            </table:table-cell>
            <table:table-cell table:style-name="表格64.A1" office:value-type="string">
              <text:p text:style-name="P23">內容</text:p>
            </table:table-cell>
            <table:table-cell table:style-name="表格64.A1" office:value-type="string">
              <text:p text:style-name="P23">白話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24">① 通報</text:p>
          </table:table-cell>
          <table:table-cell table:style-name="表格64.A2" office:value-type="string">
            <text:p text:style-name="P24">報</text:p>
          </table:table-cell>
          <table:table-cell table:style-name="表格64.A2" office:value-type="string">
            <text:p text:style-name="P24">通知主管、資安單位、上級機關</text:p>
          </table:table-cell>
          <table:table-cell table:style-name="表格64.A2" office:value-type="string">
            <text:p text:style-name="P24">出事了！快叫人！</text:p>
          </table:table-cell>
        </table:table-row>
        <table:table-row table:style-name="表格64.1">
          <table:table-cell table:style-name="表格64.A3" office:value-type="string">
            <text:p text:style-name="P24">② 應變</text:p>
          </table:table-cell>
          <table:table-cell table:style-name="表格64.A3" office:value-type="string">
            <text:p text:style-name="P24">擋</text:p>
          </table:table-cell>
          <table:table-cell table:style-name="表格64.A3" office:value-type="string">
            <text:p text:style-name="P24">隔離系統、封鎖連線、保留 Log</text:p>
          </table:table-cell>
          <table:table-cell table:style-name="表格64.A3" office:value-type="string">
            <text:p text:style-name="P24">先止血，不讓災情擴大！</text:p>
          </table:table-cell>
        </table:table-row>
        <table:table-row table:style-name="表格64.1">
          <table:table-cell table:style-name="表格64.A2" office:value-type="string">
            <text:p text:style-name="P24">③ 復原</text:p>
          </table:table-cell>
          <table:table-cell table:style-name="表格64.A2" office:value-type="string">
            <text:p text:style-name="P24">修</text:p>
          </table:table-cell>
          <table:table-cell table:style-name="表格64.A2" office:value-type="string">
            <text:p text:style-name="P24">修漏洞、移除病毒、還原資料</text:p>
          </table:table-cell>
          <table:table-cell table:style-name="表格64.A2" office:value-type="string">
            <text:p text:style-name="P24">止血完畢，才開始修！</text:p>
          </table:table-cell>
        </table:table-row>
        <table:table-row table:style-name="表格64.1">
          <table:table-cell table:style-name="表格64.A3" office:value-type="string">
            <text:p text:style-name="P24">④ 檢討</text:p>
          </table:table-cell>
          <table:table-cell table:style-name="表格64.A3" office:value-type="string">
            <text:p text:style-name="P24">改</text:p>
          </table:table-cell>
          <table:table-cell table:style-name="表格64.A3" office:value-type="string">
            <text:p text:style-name="P24">分析原因、改善流程、教育訓練</text:p>
          </table:table-cell>
          <table:table-cell table:style-name="表格64.A3" office:value-type="string">
            <text:p text:style-name="P24">找病因，避免下次再發生！</text:p>
          </table:table-cell>
        </table:table-row>
      </table:table>
      <text:h text:style-name="P11" text:outline-level="3">▍ 步驟 1：通報 ── 先叫人，絕對不能裝沒事</text:h>
      <text:p text:style-name="P45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p>
      <text:h text:style-name="P11" text:outline-level="3">▍ 步驟 2：應變（止血）── 先阻止災情擴大，不是急著修復</text:h>
      <text:p text:style-name="P45">第一件事不是急著修，而是先「止血」。正確動作：拔掉網路線隔離感染電腦、封鎖異常連線與惡意 IP、停用被盜用的帳號、保全系統 Log 禁止刪除。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>💡 <text:s/>重點</text:p>
            <text:p text:style-name="P51"><text:soft-page-break/><text:span text:style-name="T26">什麼是 Log？</text:span></text:p>
            <text:p text:style-name="P13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p>
          </table:table-cell>
        </table:table-row>
      </table:table>
      <text:h text:style-name="P11" text:outline-level="3">▍ 步驟 3：復原（修復）── 確認止血完成後才開始</text:h>
      <text:p text:style-name="P45">這時才輪到真正的修復：更新作業系統與軟體修補漏洞、移除惡意程式、還原備份資料、重設帳密與權限、測試系統功能是否恢復正常。就像病人止血穩定後才能進開刀房，不能一送來就先開刀。</text:p>
      <text:h text:style-name="P11" text:outline-level="3">▍ 步驟 4：檢討（改進）── 找出根本原因</text:h>
      <text:p text:style-name="P45">事件平息後務必撰寫事後報告，分析為什麼會被駭（密碼太簡單、系統未更新、員工點開釣魚信、防火牆設定錯誤），並改善：加強監控與警示、定期更新、辦理員工資安教育訓練、強化作業規定。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">🔑 <text:s/>資安事件應變</text:p>
            <text:p text:style-name="P59">報 → 擋 → 修 → 改</text:p>
            <text:p text:style-name="P13">通報 → 應變(止血) → 復原(修復) → 檢討(改進)。</text:p>
          </table:table-cell>
        </table:table-row>
        <table:table-row table:style-name="表格66.1">
          <table:table-cell table:style-name="表格66.A2" office:value-type="string">
            <text:p text:style-name="P16">⚠️ <text:s/>考試陷阱</text:p>
            <text:p text:style-name="P47">政府最怕（也最常考）的兩個錯誤：</text:p>
            <text:p text:style-name="P13">❌ 隱瞞資安事件，不通報。　❌ 一發現中毒就直接重灌，破壞證據。</text:p>
            <text:p text:style-name="P63">✅ 標準答案永遠是：先通報 ＋ 先隔離，再修復。</text:p>
          </table:table-cell>
        </table:table-row>
      </table:table>
      <text:h text:style-name="P48" text:outline-level="1"><text:bookmark-start text:name="bm_c13"/>第 13 章　BIA／RTO／RPO 營運持續<text:bookmark-end text:name="bm_c13"/></text:h>
      <text:h text:style-name="P21" text:outline-level="2">▍13-1　BIA：營運衝擊分析</text:h>
      <text:p text:style-name="P45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p>
      <text:h text:style-name="P21" text:outline-level="2">▍13-2　RTO vs RPO（剛好相反，最愛考）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23">項目</text:p>
            </table:table-cell>
            <table:table-cell table:style-name="表格67.A1" office:value-type="string">
              <text:p text:style-name="P23">英文</text:p>
            </table:table-cell>
            <table:table-cell table:style-name="表格67.A1" office:value-type="string">
              <text:p text:style-name="P23">看什麼</text:p>
            </table:table-cell>
            <table:table-cell table:style-name="表格67.A1" office:value-type="string">
              <text:p text:style-name="P23">問的問題</text:p>
            </table:table-cell>
            <table:table-cell table:style-name="表格67.A1" office:value-type="string">
              <text:p text:style-name="P23">例子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>RTO</text:p>
          </table:table-cell>
          <table:table-cell table:style-name="表格67.A2" office:value-type="string">
            <text:p text:style-name="P24">Recovery Time Objective</text:p>
          </table:table-cell>
          <table:table-cell table:style-name="表格67.A2" office:value-type="string">
            <text:p text:style-name="P24">Time 時間</text:p>
          </table:table-cell>
          <table:table-cell table:style-name="表格67.A2" office:value-type="string">
            <text:p text:style-name="P56"><text:span text:style-name="T28">系統壞掉後，最多幾小</text:span><text:soft-page-break/><text:span text:style-name="T28">時內必須恢復？</text:span></text:p>
          </table:table-cell>
          <table:table-cell table:style-name="表格67.A2" office:value-type="string">
            <text:p text:style-name="P24">2 小時內必須修復</text:p>
          </table:table-cell>
        </table:table-row>
        <table:table-row table:style-name="表格67.1">
          <table:table-cell table:style-name="表格67.A3" office:value-type="string">
            <text:p text:style-name="P25">RPO</text:p>
          </table:table-cell>
          <table:table-cell table:style-name="表格67.A3" office:value-type="string">
            <text:p text:style-name="P24">Recovery Point Objective</text:p>
          </table:table-cell>
          <table:table-cell table:style-name="表格67.A3" office:value-type="string">
            <text:p text:style-name="P24">Point 資料點</text:p>
          </table:table-cell>
          <table:table-cell table:style-name="表格67.A3" office:value-type="string">
            <text:p text:style-name="P24">恢復後最多能接受丟失多久的資料？</text:p>
          </table:table-cell>
          <table:table-cell table:style-name="表格67.A3" office:value-type="string">
            <text:p text:style-name="P24">只能丟最近 10 分鐘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64">🧩 <text:s/>生活比喻</text:p>
            <text:p text:style-name="P13">RTO：你的車壞了，最多等多久才要修好？→ 2 小時內（恢復時間）。</text:p>
            <text:p text:style-name="P13">RPO：修好之後，最多能接受丟失多少行車記錄？→ 只能丟最近 10 分鐘（資料損失上限）。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2">🔑 <text:s/>RTO vs RPO</text:p>
            <text:p text:style-name="P37">T = Time → RTO 看時間（多久恢復？）</text:p>
            <text:p text:style-name="P37">P = Point → RPO 看資料點（能丟到哪個時間點？）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6">⚠️ <text:s/>考試陷阱</text:p>
            <text:p text:style-name="P47">陷阱：RTO 看資料損失，RPO 看恢復時間？兩個剛好相反！</text:p>
            <text:p text:style-name="P13">正確：RTO = Time（恢復時間）；RPO = Point（資料點，資料損失上限）。</text:p>
          </table:table-cell>
          <table:covered-table-cell/>
          <table:covered-table-cell/>
          <table:covered-table-cell/>
          <table:covered-table-cell/>
        </table:table-row>
      </table:table>
      <text:h text:style-name="P48" text:outline-level="1"><text:bookmark-start text:name="bm_c14"/>第 14 章　弱點掃描・滲透測試・紅隊演練<text:bookmark-end text:name="bm_c14"/></text:h>
      <text:h text:style-name="P21" text:outline-level="2">▍14-1　弱點掃描（Vulnerability Scan）</text:h>
      <text:p text:style-name="P45">弱點掃描是主動式資安防護：在駭客發現漏洞之前，由組織自行找出系統安全缺陷並修補，就像定期健康檢查，防患於未然。掃描對象包含網路設備、作業系統、應用程式、資料庫。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23">狀況</text:p>
            </table:table-cell>
            <table:table-cell table:style-name="表格68.A1" office:value-type="string">
              <text:p text:style-name="P23">處理方式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24">可直接修補</text:p>
          </table:table-cell>
          <table:table-cell table:style-name="表格68.A2" office:value-type="string">
            <text:p text:style-name="P24">更新版本、修改設定、套用安全修補程式（Patch）</text:p>
          </table:table-cell>
        </table:table-row>
        <table:table-row table:style-name="表格68.1">
          <table:table-cell table:style-name="表格68.A3" office:value-type="string">
            <text:p text:style-name="P24">暫時無法修補</text:p>
          </table:table-cell>
          <table:table-cell table:style-name="表格68.A3" office:value-type="string">
            <text:p text:style-name="P24">隔離該系統、加強監控、採用補償控制措施（Compensating Control）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2">🔑 <text:s/>弱點掃描流程</text:p>
            <text:p text:style-name="P22">找 → 評 → 修 or 補</text:p>
            <text:p text:style-name="P13">找出漏洞 → 評估風險等級 → 直接修補 or 補償控制。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5">⭐ <text:s/>核心觀念</text:p>
            <text:p text:style-name="P46">弱點掃描的目的是「主動找出自身系統的漏洞」，不是防毒，也不是偵測入侵，而是預防性的安全評估。</text:p>
          </table:table-cell>
          <table:covered-table-cell/>
        </table:table-row>
      </table:table>
      <text:h text:style-name="P49" text:outline-level="2"><text:soft-page-break/><text:span text:style-name="T25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3">項目</text:p>
            </table:table-cell>
            <table:table-cell table:style-name="表格69.A1" office:value-type="string">
              <text:p text:style-name="P23">弱點掃描 Vulnerability Scan</text:p>
            </table:table-cell>
            <table:table-cell table:style-name="表格69.A1" office:value-type="string">
              <text:p text:style-name="P23">滲透測試 Penetration Test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4">執行方式</text:p>
          </table:table-cell>
          <table:table-cell table:style-name="表格69.A2" office:value-type="string">
            <text:p text:style-name="P24">自動化工具定期掃描</text:p>
          </table:table-cell>
          <table:table-cell table:style-name="表格69.A2" office:value-type="string">
            <text:p text:style-name="P24">由專業人員模擬真實駭客攻擊</text:p>
          </table:table-cell>
        </table:table-row>
        <table:table-row table:style-name="表格69.1">
          <table:table-cell table:style-name="表格69.A3" office:value-type="string">
            <text:p text:style-name="P24">生活比喻</text:p>
          </table:table-cell>
          <table:table-cell table:style-name="表格69.A3" office:value-type="string">
            <text:p text:style-name="P24">醫院年度健康檢查（自動量血壓驗血）</text:p>
          </table:table-cell>
          <table:table-cell table:style-name="表格69.A3" office:value-type="string">
            <text:p text:style-name="P24">聘請白帽駭客真的來打你的系統</text:p>
          </table:table-cell>
        </table:table-row>
        <table:table-row table:style-name="表格69.1">
          <table:table-cell table:style-name="表格69.A2" office:value-type="string">
            <text:p text:style-name="P24">優點</text:p>
          </table:table-cell>
          <table:table-cell table:style-name="表格69.A2" office:value-type="string">
            <text:p text:style-name="P24">快速、成本低、可排程</text:p>
          </table:table-cell>
          <table:table-cell table:style-name="表格69.A2" office:value-type="string">
            <text:p text:style-name="P24">能發現複雜邏輯缺陷與組合攻擊</text:p>
          </table:table-cell>
        </table:table-row>
        <table:table-row table:style-name="表格69.1">
          <table:table-cell table:style-name="表格69.A3" office:value-type="string">
            <text:p text:style-name="P24">找到什麼</text:p>
          </table:table-cell>
          <table:table-cell table:style-name="表格69.A3" office:value-type="string">
            <text:p text:style-name="P24">已知漏洞、弱密碼、過期套件</text:p>
          </table:table-cell>
          <table:table-cell table:style-name="表格69.A3" office:value-type="string">
            <text:p text:style-name="P24">業務邏輯漏洞、權限繞過、零日漏洞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4">💡 <text:s/>重點</text:p>
            <text:p text:style-name="P13">兩者互補：弱掃找已知問題（廣），滲透測試挖深層漏洞（深）。</text:p>
          </table:table-cell>
          <table:covered-table-cell/>
          <table:covered-table-cell/>
        </table:table-row>
      </table:table>
      <text:h text:style-name="P21" text:outline-level="2">▍14-3　紅隊演練（Red Team Exercise）</text:h>
      <text:p text:style-name="P45">紅隊演練是組織為測試自身防禦能力，主動聘請安全專家模擬真實攻擊者，嘗試入侵自家系統、找出安全漏洞。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23">隊伍</text:p>
            </table:table-cell>
            <table:table-cell table:style-name="表格70.A1" office:value-type="string">
              <text:p text:style-name="P23">角色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4">紅隊 Red Team</text:p>
          </table:table-cell>
          <table:table-cell table:style-name="表格70.A2" office:value-type="string">
            <text:p text:style-name="P24">扮演攻擊者，盡力入侵、找漏洞</text:p>
          </table:table-cell>
        </table:table-row>
        <table:table-row table:style-name="表格70.1">
          <table:table-cell table:style-name="表格70.A3" office:value-type="string">
            <text:p text:style-name="P24">藍隊 Blue Team</text:p>
          </table:table-cell>
          <table:table-cell table:style-name="表格70.A3" office:value-type="string">
            <text:p text:style-name="P24">扮演防禦者，負責偵測並阻擋攻擊</text:p>
          </table:table-cell>
        </table:table-row>
        <table:table-row table:style-name="表格70.1">
          <table:table-cell table:style-name="表格70.A2" office:value-type="string">
            <text:p text:style-name="P24">紫隊 Purple Team</text:p>
          </table:table-cell>
          <table:table-cell table:style-name="表格70.A2" office:value-type="string">
            <text:p text:style-name="P24">紅藍合作，共同改善整體防禦</text:p>
          </table:table-cell>
        </table:table-row>
      </table:table>
      <text:h text:style-name="P48" text:outline-level="1"><text:bookmark-start text:name="bm_c15"/>第 15 章　Linux 常用資安指令<text:bookmark-end text:name="bm_c15"/></text:h>
      <text:p text:style-name="P45">以下指令在排查資安事件、確認系統狀態時非常實用，考試也偶有出題。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23">指令</text:p>
            </table:table-cell>
            <table:table-cell table:style-name="表格71.A1" office:value-type="string">
              <text:p text:style-name="P23">功能說明</text:p>
            </table:table-cell>
            <table:table-cell table:style-name="表格71.A1" office:value-type="string">
              <text:p text:style-name="P23">使用場景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24">who</text:p>
          </table:table-cell>
          <table:table-cell table:style-name="表格71.A2" office:value-type="string">
            <text:p text:style-name="P24">顯示目前已登入系統的使用者</text:p>
          </table:table-cell>
          <table:table-cell table:style-name="表格71.A2" office:value-type="string">
            <text:p text:style-name="P24">確認是否有異常登入者</text:p>
          </table:table-cell>
        </table:table-row>
        <table:table-row table:style-name="表格71.1">
          <table:table-cell table:style-name="表格71.A3" office:value-type="string">
            <text:p text:style-name="P24">whoami</text:p>
          </table:table-cell>
          <table:table-cell table:style-name="表格71.A3" office:value-type="string">
            <text:p text:style-name="P24">顯示目前執行指令的帳號</text:p>
          </table:table-cell>
          <table:table-cell table:style-name="表格71.A3" office:value-type="string">
            <text:p text:style-name="P24">確認當前操作身份</text:p>
          </table:table-cell>
        </table:table-row>
        <table:table-row table:style-name="表格71.1">
          <table:table-cell table:style-name="表格71.A2" office:value-type="string">
            <text:p text:style-name="P24">ps aux</text:p>
          </table:table-cell>
          <table:table-cell table:style-name="表格71.A2" office:value-type="string">
            <text:p text:style-name="P24">列出所有執行中的程序</text:p>
          </table:table-cell>
          <table:table-cell table:style-name="表格71.A2" office:value-type="string">
            <text:p text:style-name="P24">找出可疑的惡意程序</text:p>
          </table:table-cell>
        </table:table-row>
        <table:table-row table:style-name="表格71.1">
          <table:table-cell table:style-name="表格71.A3" office:value-type="string">
            <text:p text:style-name="P24">netstat -tunlp</text:p>
          </table:table-cell>
          <table:table-cell table:style-name="表格71.A3" office:value-type="string">
            <text:p text:style-name="P24">顯示所有網路連線與監聽中的 Port</text:p>
          </table:table-cell>
          <table:table-cell table:style-name="表格71.A3" office:value-type="string">
            <text:p text:style-name="P24">找出異常網路連線或惡意服務</text:p>
          </table:table-cell>
        </table:table-row>
        <table:table-row table:style-name="表格71.1">
          <table:table-cell table:style-name="表格71.A2" office:value-type="string">
            <text:p text:style-name="P24">ss -tunlp</text:p>
          </table:table-cell>
          <table:table-cell table:style-name="表格71.A2" office:value-type="string">
            <text:p text:style-name="P24">netstat 的現代替代指令（功能相同）</text:p>
          </table:table-cell>
          <table:table-cell table:style-name="表格71.A2" office:value-type="string">
            <text:p text:style-name="P24">較新系統上使用</text:p>
          </table:table-cell>
        </table:table-row>
        <table:table-row table:style-name="表格71.1">
          <table:table-cell table:style-name="表格71.A3" office:value-type="string">
            <text:p text:style-name="P24">lsof -i</text:p>
          </table:table-cell>
          <table:table-cell table:style-name="表格71.A3" office:value-type="string">
            <text:p text:style-name="P24">列出所有開啟網路連線的程序</text:p>
          </table:table-cell>
          <table:table-cell table:style-name="表格71.A3" office:value-type="string">
            <text:p text:style-name="P24">追蹤哪支程式在用哪個 Port</text:p>
          </table:table-cell>
        </table:table-row>
        <table:table-row table:style-name="表格71.1">
          <table:table-cell table:style-name="表格71.A2" office:value-type="string">
            <text:p text:style-name="P24">ls -l</text:p>
          </table:table-cell>
          <table:table-cell table:style-name="表格71.A2" office:value-type="string">
            <text:p text:style-name="P24">列出檔案並顯示詳細權限</text:p>
          </table:table-cell>
          <table:table-cell table:style-name="表格71.A2" office:value-type="string">
            <text:p text:style-name="P24">檢查檔案是否被異常修改</text:p>
          </table:table-cell>
        </table:table-row>
        <table:table-row table:style-name="表格71.1">
          <table:table-cell table:style-name="表格71.A3" office:value-type="string">
            <text:p text:style-name="P24">chmod</text:p>
          </table:table-cell>
          <table:table-cell table:style-name="表格71.A3" office:value-type="string">
            <text:p text:style-name="P24">修改檔案或目錄的存取權限</text:p>
          </table:table-cell>
          <table:table-cell table:style-name="表格71.A3" office:value-type="string">
            <text:p text:style-name="P24">修正不安全的檔案權限設定<text:soft-page-break/></text:p>
          </table:table-cell>
        </table:table-row>
        <table:table-row table:style-name="表格71.1">
          <table:table-cell table:style-name="表格71.A2" office:value-type="string">
            <text:p text:style-name="P24">journalctl</text:p>
          </table:table-cell>
          <table:table-cell table:style-name="表格71.A2" office:value-type="string">
            <text:p text:style-name="P24">查看 systemd 系統日誌</text:p>
          </table:table-cell>
          <table:table-cell table:style-name="表格71.A2" office:value-type="string">
            <text:p text:style-name="P24">排查系統錯誤與安全事件</text:p>
          </table:table-cell>
        </table:table-row>
        <table:table-row table:style-name="表格71.1">
          <table:table-cell table:style-name="表格71.A3" office:value-type="string">
            <text:p text:style-name="P24">cat /var/log/auth.log</text:p>
          </table:table-cell>
          <table:table-cell table:style-name="表格71.A3" office:value-type="string">
            <text:p text:style-name="P24">查看認證相關日誌</text:p>
          </table:table-cell>
          <table:table-cell table:style-name="表格71.A3" office:value-type="string">
            <text:p text:style-name="P24">追查帳號登入／失敗嘗試</text:p>
          </table:table-cell>
        </table:table-row>
        <table:table-row table:style-name="表格71.1">
          <table:table-cell table:style-name="表格71.A2" office:value-type="string">
            <text:p text:style-name="P24">ufw status</text:p>
          </table:table-cell>
          <table:table-cell table:style-name="表格71.A2" office:value-type="string">
            <text:p text:style-name="P24">查看 UFW 防火牆狀態與規則</text:p>
          </table:table-cell>
          <table:table-cell table:style-name="表格71.A2" office:value-type="string">
            <text:p text:style-name="P24">確認防火牆是否啟用</text:p>
          </table:table-cell>
        </table:table-row>
        <table:table-row table:style-name="表格71.1">
          <table:table-cell table:style-name="表格71.A3" office:value-type="string">
            <text:p text:style-name="P24">ufw enable</text:p>
          </table:table-cell>
          <table:table-cell table:style-name="表格71.A3" office:value-type="string">
            <text:p text:style-name="P24">啟用 UFW 防火牆</text:p>
          </table:table-cell>
          <table:table-cell table:style-name="表格71.A3" office:value-type="string">
            <text:p text:style-name="P24">初始化防火牆保護</text:p>
          </table:table-cell>
        </table:table-row>
        <table:table-row table:style-name="表格71.1">
          <table:table-cell table:style-name="表格71.A2" office:value-type="string">
            <text:p text:style-name="P24">uname -a</text:p>
          </table:table-cell>
          <table:table-cell table:style-name="表格71.A2" office:value-type="string">
            <text:p text:style-name="P24">顯示核心版本與系統資訊</text:p>
          </table:table-cell>
          <table:table-cell table:style-name="表格71.A2" office:value-type="string">
            <text:p text:style-name="P24">評估是否需要更新</text:p>
          </table:table-cell>
        </table:table-row>
      </table:table>
      <text:p text:style-name="Standard"/>
      <text:h text:style-name="P9" text:outline-level="1"><text:bookmark-start text:name="bm_c16"/>第 16 章　雲端運算：NIST 五大特徵<text:bookmark-end text:name="bm_c16"/></text:h>
      <text:p text:style-name="P10"><text:span text:style-name="T1">雲端運算（Cloud Computing）就是：</text:span><text:span text:style-name="T3">「不必自己買主機，透過網路就能租用運算資源」</text:span><text:span text:style-name="T1">。就像你不必自己挖井，打開水龍頭就有水、用多少付多少。美國國家標準技術研究院（NIST）定義雲端有五大必備特徵，這是考試最常出的選擇題。</text:span></text:p>
      <text:h text:style-name="P21" text:outline-level="2">▍16-1　NIST 五大特徵一次看懂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23">特徵</text:p>
            </table:table-cell>
            <table:table-cell table:style-name="表格72.A1" office:value-type="string">
              <text:p text:style-name="P23">英文</text:p>
            </table:table-cell>
            <table:table-cell table:style-name="表格72.A1" office:value-type="string">
              <text:p text:style-name="P23">白話說明</text:p>
            </table:table-cell>
            <table:table-cell table:style-name="表格72.A1" office:value-type="string">
              <text:p text:style-name="P23">生活比喻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>隨需自助</text:p>
          </table:table-cell>
          <table:table-cell table:style-name="表格72.A2" office:value-type="string">
            <text:p text:style-name="P24">On-demand self-service</text:p>
          </table:table-cell>
          <table:table-cell table:style-name="表格72.A2" office:value-type="string">
            <text:p text:style-name="P24">自己上網點一點就能開通，不用打電話求人</text:p>
          </table:table-cell>
          <table:table-cell table:style-name="表格72.A2" office:value-type="string">
            <text:p text:style-name="P24">自己用提款機領錢</text:p>
          </table:table-cell>
        </table:table-row>
        <table:table-row table:style-name="表格72.1">
          <table:table-cell table:style-name="表格72.A3" office:value-type="string">
            <text:p text:style-name="P25">廣泛網路存取</text:p>
          </table:table-cell>
          <table:table-cell table:style-name="表格72.A3" office:value-type="string">
            <text:p text:style-name="P24">Broad network access</text:p>
          </table:table-cell>
          <table:table-cell table:style-name="表格72.A3" office:value-type="string">
            <text:p text:style-name="P24">任何裝置（手機/筆電/平板）連網都能用</text:p>
          </table:table-cell>
          <table:table-cell table:style-name="表格72.A3" office:value-type="string">
            <text:p text:style-name="P24">水龍頭哪裡都能接</text:p>
          </table:table-cell>
        </table:table-row>
        <table:table-row table:style-name="表格72.1">
          <table:table-cell table:style-name="表格72.A2" office:value-type="string">
            <text:p text:style-name="P25">資源池化</text:p>
          </table:table-cell>
          <table:table-cell table:style-name="表格72.A2" office:value-type="string">
            <text:p text:style-name="P24">Resource pooling</text:p>
          </table:table-cell>
          <table:table-cell table:style-name="表格72.A2" office:value-type="string">
            <text:p text:style-name="P24">業者把資源集中成大水池，多人共享</text:p>
          </table:table-cell>
          <table:table-cell table:style-name="表格72.A2" office:value-type="string">
            <text:p text:style-name="P24">公共水庫供全城用</text:p>
          </table:table-cell>
        </table:table-row>
        <table:table-row table:style-name="表格72.1">
          <table:table-cell table:style-name="表格72.A3" office:value-type="string">
            <text:p text:style-name="P25">快速彈性</text:p>
          </table:table-cell>
          <table:table-cell table:style-name="表格72.A3" office:value-type="string">
            <text:p text:style-name="P24">Rapid elasticity</text:p>
          </table:table-cell>
          <table:table-cell table:style-name="表格72.A3" office:value-type="string">
            <text:p text:style-name="P24">用量暴增可瞬間擴充，用完即縮</text:p>
          </table:table-cell>
          <table:table-cell table:style-name="表格72.A3" office:value-type="string">
            <text:p text:style-name="P24">水管可粗可細隨需求</text:p>
          </table:table-cell>
        </table:table-row>
        <table:table-row table:style-name="表格72.1">
          <table:table-cell table:style-name="表格72.A2" office:value-type="string">
            <text:p text:style-name="P25">可計量服務</text:p>
          </table:table-cell>
          <table:table-cell table:style-name="表格72.A2" office:value-type="string">
            <text:p text:style-name="P24">Measured service</text:p>
          </table:table-cell>
          <table:table-cell table:style-name="表格72.A2" office:value-type="string">
            <text:p text:style-name="P24">用多少算多少，計費透明</text:p>
          </table:table-cell>
          <table:table-cell table:style-name="表格72.A2" office:value-type="string">
            <text:p text:style-name="P24">裝水錶按度數收費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2">🔑 <text:s/>NIST 五大特徵口訣</text:p>
            <text:p text:style-name="P59">自 · 廣 · 池 · 彈 · 量</text:p>
            <text:p text:style-name="P65">（隨需自助・廣泛存取・資源池化・快速彈性・可計量）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4">💡 <text:s/>重點</text:p>
            <text:p text:style-name="P46">「彈性」是最大賣點。</text:p>
            <text:p text:style-name="P13">傳統機房若遇到雙11流量暴衝，必須事先買一堆主機平時閒置；雲端則可在尖峰瞬間擴充上百台、過後立即釋放，只為實際用量付費。這就是『快速彈性 + 可計量』的威力。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6">⚠️ <text:s/>考試陷阱</text:p>
            <text:p text:style-name="P47">錯誤觀念：雲端就是「把資料放到網路上」而已。</text:p>
            <text:p text:style-name="P13">正確：雲端的核心是這五大特徵（尤其是彈性與計量），不是單純的線上儲存。</text:p>
            <text:p text:style-name="P47">錯誤觀念：資源池化代表每個人都用同一台主機。</text:p>
            <text:p text:style-name="P13">正確：池化是「邏輯上共享、實體上隔離」，多租戶（Multi-tenant）各自獨立、互不可見。</text:p>
          </table:table-cell>
          <table:covered-table-cell/>
          <table:covered-table-cell/>
          <table:covered-table-cell/>
        </table:table-row>
      </table:table>
      <text:h text:style-name="P62" text:outline-level="1"><text:bookmark-start text:name="bm_c17"/><text:soft-page-break/><text:span text:style-name="T31">第 17 章　雲端三大部署模式 + 混合雲</text:span><text:bookmark-end text:name="bm_c17"/></text:h>
      <text:h text:style-name="P21" text:outline-level="2">▍17-1　三種部署模式比較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23">模式</text:p>
            </table:table-cell>
            <table:table-cell table:style-name="表格73.A1" office:value-type="string">
              <text:p text:style-name="P23">誰擁有</text:p>
            </table:table-cell>
            <table:table-cell table:style-name="表格73.A1" office:value-type="string">
              <text:p text:style-name="P23">誰能用</text:p>
            </table:table-cell>
            <table:table-cell table:style-name="表格73.A1" office:value-type="string">
              <text:p text:style-name="P23">優點</text:p>
            </table:table-cell>
            <table:table-cell table:style-name="表格73.A1" office:value-type="string">
              <text:p text:style-name="P23">缺點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66">私有雲</text:p>
          </table:table-cell>
          <table:table-cell table:style-name="表格73.A2" office:value-type="string">
            <text:p text:style-name="P24">自己企業</text:p>
          </table:table-cell>
          <table:table-cell table:style-name="表格73.A2" office:value-type="string">
            <text:p text:style-name="P24">只有自己</text:p>
          </table:table-cell>
          <table:table-cell table:style-name="表格73.A2" office:value-type="string">
            <text:p text:style-name="P24">安全、可控、客製高</text:p>
          </table:table-cell>
          <table:table-cell table:style-name="表格73.A2" office:value-type="string">
            <text:p text:style-name="P24">成本高、要自己維護</text:p>
          </table:table-cell>
        </table:table-row>
        <table:table-row table:style-name="表格73.1">
          <table:table-cell table:style-name="表格73.A3" office:value-type="string">
            <text:p text:style-name="P66">公有雲</text:p>
          </table:table-cell>
          <table:table-cell table:style-name="表格73.A3" office:value-type="string">
            <text:p text:style-name="P24">雲端業者</text:p>
          </table:table-cell>
          <table:table-cell table:style-name="表格73.A3" office:value-type="string">
            <text:p text:style-name="P24">大家共用</text:p>
          </table:table-cell>
          <table:table-cell table:style-name="表格73.A3" office:value-type="string">
            <text:p text:style-name="P24">便宜、彈性、免維護</text:p>
          </table:table-cell>
          <table:table-cell table:style-name="表格73.A3" office:value-type="string">
            <text:p text:style-name="P24">資料在別人手上、合規疑慮</text:p>
          </table:table-cell>
        </table:table-row>
        <table:table-row table:style-name="表格73.1">
          <table:table-cell table:style-name="表格73.A2" office:value-type="string">
            <text:p text:style-name="P66">社群雲</text:p>
          </table:table-cell>
          <table:table-cell table:style-name="表格73.A2" office:value-type="string">
            <text:p text:style-name="P24">特定團體共建</text:p>
          </table:table-cell>
          <table:table-cell table:style-name="表格73.A2" office:value-type="string">
            <text:p text:style-name="P24">同產業/同需求</text:p>
          </table:table-cell>
          <table:table-cell table:style-name="表格73.A2" office:value-type="string">
            <text:p text:style-name="P24">共擔成本、符合產業規範</text:p>
          </table:table-cell>
          <table:table-cell table:style-name="表格73.A2" office:value-type="string">
            <text:p text:style-name="P24">彈性與規模有限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64">🧩 <text:s/>生活比喻</text:p>
            <text:p text:style-name="P51"><text:span text:style-name="T26">私有雲 ＝ 自家廚房</text:span><text:span text:style-name="T1">（只給自己人，安全但要自己顧）；</text:span></text:p>
            <text:p text:style-name="P51"><text:span text:style-name="T26">公有雲 ＝ 餐廳外食</text:span><text:span text:style-name="T1">（大家都能點，便宜方便但廚房不是你的）；</text:span></text:p>
            <text:p text:style-name="P51"><text:span text:style-name="T26">社群雲 ＝ 社區共享廚房</text:span><text:span text:style-name="T1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7-2　混合雲（Hybrid Cloud）——考試最愛</text:h>
      <text:p text:style-name="P10"><text:span text:style-name="T1">混合雲 ＝ </text:span><text:span text:style-name="T3">私有雲 ＋ 公有雲，兩者搭配使用</text:span><text:span text:style-name="T1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4">💡 <text:s/>重點</text:p>
            <text:p text:style-name="P46">混合雲經典情境：</text:p>
            <text:p text:style-name="P13">銀行把「客戶帳務」放私有雲確保安全，把「行銷活動網站」放公有雲應付流量尖峰。平時用私有雲，雙11就把多出來的運算需求『溢流（Cloud Bursting）』到公有雲。</text:p>
          </table:table-cell>
        </table:table-row>
        <table:table-row table:style-name="表格74.1">
          <table:table-cell table:style-name="表格74.A2" office:value-type="string">
            <text:p text:style-name="P16">⚠️ <text:s/>考試陷阱</text:p>
            <text:p text:style-name="P47">錯誤觀念：混合雲 ＝ 兩個公有雲一起用。</text:p>
            <text:p text:style-name="P13">正確：那叫「多雲（Multi-cloud）」。混合雲必須是『私有 ＋ 公有』的組合。</text:p>
          </table:table-cell>
        </table:table-row>
      </table:table>
      <text:h text:style-name="P48" text:outline-level="1"><text:bookmark-start text:name="bm_c18"/>第 18 章　雲端三大服務模式 + API<text:bookmark-end text:name="bm_c18"/></text:h>
      <text:h text:style-name="P21" text:outline-level="2">▍18-1　IaaS / PaaS / SaaS 三層比較</text:h>
      <text:p text:style-name="P57">服務模式的差別，在於「業者幫你顧多少、你自己管多少」。由下往上：IaaS 管最少（給你硬體）、<text:soft-page-break/>PaaS 中間（給你開發平台）、SaaS 管最多（直接給你能用的軟體）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模式</text:p>
            </table:table-cell>
            <table:table-cell table:style-name="表格75.A1" office:value-type="string">
              <text:p text:style-name="P23">全名</text:p>
            </table:table-cell>
            <table:table-cell table:style-name="表格75.A1" office:value-type="string">
              <text:p text:style-name="P23">業者提供</text:p>
            </table:table-cell>
            <table:table-cell table:style-name="表格75.A1" office:value-type="string">
              <text:p text:style-name="P23">你負責</text:p>
            </table:table-cell>
            <table:table-cell table:style-name="表格75.A1" office:value-type="string">
              <text:p text:style-name="P23">例子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4">IaaS</text:p>
          </table:table-cell>
          <table:table-cell table:style-name="表格75.A2" office:value-type="string">
            <text:p text:style-name="P24">基礎設施即服務</text:p>
          </table:table-cell>
          <table:table-cell table:style-name="表格75.A2" office:value-type="string">
            <text:p text:style-name="P24">虛擬機、儲存、網路（硬體層）</text:p>
          </table:table-cell>
          <table:table-cell table:style-name="表格75.A2" office:value-type="string">
            <text:p text:style-name="P24">作業系統以上全都自己裝</text:p>
          </table:table-cell>
          <table:table-cell table:style-name="表格75.A2" office:value-type="string">
            <text:p text:style-name="P24">AWS EC2、Google Compute</text:p>
          </table:table-cell>
        </table:table-row>
        <table:table-row table:style-name="表格75.1">
          <table:table-cell table:style-name="表格75.A3" office:value-type="string">
            <text:p text:style-name="P44">PaaS</text:p>
          </table:table-cell>
          <table:table-cell table:style-name="表格75.A3" office:value-type="string">
            <text:p text:style-name="P24">平台即服務</text:p>
          </table:table-cell>
          <table:table-cell table:style-name="表格75.A3" office:value-type="string">
            <text:p text:style-name="P24">開發平台、資料庫、執行環境</text:p>
          </table:table-cell>
          <table:table-cell table:style-name="表格75.A3" office:value-type="string">
            <text:p text:style-name="P24">只要寫程式、丟上去跑</text:p>
          </table:table-cell>
          <table:table-cell table:style-name="表格75.A3" office:value-type="string">
            <text:p text:style-name="P24">Heroku、Google App Engine</text:p>
          </table:table-cell>
        </table:table-row>
        <table:table-row table:style-name="表格75.1">
          <table:table-cell table:style-name="表格75.A2" office:value-type="string">
            <text:p text:style-name="P44">SaaS</text:p>
          </table:table-cell>
          <table:table-cell table:style-name="表格75.A2" office:value-type="string">
            <text:p text:style-name="P24">軟體即服務</text:p>
          </table:table-cell>
          <table:table-cell table:style-name="表格75.A2" office:value-type="string">
            <text:p text:style-name="P24">現成可直接用的軟體</text:p>
          </table:table-cell>
          <table:table-cell table:style-name="表格75.A2" office:value-type="string">
            <text:p text:style-name="P24">什麼都不用管，開瀏覽器就用</text:p>
          </table:table-cell>
          <table:table-cell table:style-name="表格75.A2" office:value-type="string">
            <text:p text:style-name="P24">Gmail、ChatGPT、Office 365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64">🧩 <text:s/>生活比喻</text:p>
            <text:p text:style-name="P46">用「吃披薩」記三層：</text:p>
            <text:p text:style-name="P51"><text:span text:style-name="T26">IaaS ＝ 買冷凍披薩回家</text:span><text:span text:style-name="T1">（業者給材料，烤箱、餐桌、烤製你自己來）；</text:span></text:p>
            <text:p text:style-name="P51"><text:span text:style-name="T26">PaaS ＝ 叫外送披薩</text:span><text:span text:style-name="T1">（業者做好送到，你只要準備餐桌、開動）；</text:span></text:p>
            <text:p text:style-name="P51"><text:span text:style-name="T26">SaaS ＝ 直接上餐廳吃</text:span><text:span text:style-name="T1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2">🔑 <text:s/>服務模式記憶法</text:p>
            <text:p text:style-name="P37">I 在最底層（Infrastructure 硬體）→ P 中間（Platform 平台）→ S 在最上層（Software 軟體）</text:p>
            <text:p text:style-name="P65">越往上，你越輕鬆、業者管越多。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6">⚠️ <text:s/>考試陷阱</text:p>
            <text:p text:style-name="P47">錯誤觀念：Gmail、ChatGPT 屬於 IaaS。</text:p>
            <text:p text:style-name="P13">正確：能打開瀏覽器直接用的現成軟體都是 SaaS。IaaS 是租「硬體/虛擬機」。</text:p>
            <text:p text:style-name="P47">錯誤觀念：SaaS 使用者要自己維護伺服器。</text:p>
            <text:p text:style-name="P13">正確：SaaS 連伺服器、更新、備份全由業者負責，使用者只管用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8-2　API——軟體之間的「點餐窗口」</text:h>
      <text:p text:style-name="P10"><text:span text:style-name="T1">API（Application Programming Interface，應用程式介面）＝ </text:span><text:span text:style-name="T3">兩個軟體溝通的標準窗口</text:span><text:span text:style-name="T1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64">🧩 <text:s/>生活比喻</text:p>
            <text:p text:style-name="P46">API ＝ 餐廳的菜單與服務生。</text:p>
            <text:p text:style-name="P13"><text:soft-page-break/>你（程式 A）不必衝進廚房（程式 B 的內部）自己煮，只要看菜單（API 文件）跟服務生（API）點餐，廚房做好就端出來。你不用懂廚房怎麼運作，雙方靠『菜單』這個約定溝通。</text:p>
          </table:table-cell>
        </table:table-row>
      </table:table>
      <text:list text:continue-numbering="true" text:style-name="WWNum2">
        <text:list-item>
          <text:p text:style-name="P67">天氣 App 透過氣象局 API 取得即時氣溫；</text:p>
        </text:list-item>
        <text:list-item>
          <text:p text:style-name="P67">網站用 Google 地圖 API 嵌入地圖；</text:p>
        </text:list-item>
        <text:list-item>
          <text:p text:style-name="P67">用 LINE Pay／信用卡 API 完成付款，自己不必開發金流系統。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4">💡 <text:s/>重點</text:p>
            <text:p text:style-name="P46">為什麼 API 這麼重要？</text:p>
            <text:p text:style-name="P13">現代軟體幾乎都是「組裝」出來的——靠呼叫各種 API 把地圖、金流、登入、AI 等功能拼起來，不必每個都自己從零開發。API 是雲端時代軟體互通的基礎。</text:p>
          </table:table-cell>
        </table:table-row>
      </table:table>
      <text:p text:style-name="Standard"/>
      <text:h text:style-name="P9" text:outline-level="1"><text:bookmark-start text:name="bm_c19"/>第 19 章　軟體開發四大模型<text:bookmark-end text:name="bm_c19"/></text:h>
      <text:p text:style-name="P10"><text:span text:style-name="T1">軟體開發模型 ＝ </text:span><text:span text:style-name="T3">「把軟體做出來的流程方法」</text:span><text:span text:style-name="T1">。四個必考模型由古典到現代：瀑布 → 雛型 → 漸增 → 敏捷。重點在「它們怎麼面對需求變動」。</text:span></text:p>
      <text:h text:style-name="P21" text:outline-level="2">▍19-1　四大模型總覽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23">模型</text:p>
            </table:table-cell>
            <table:table-cell table:style-name="表格78.A1" office:value-type="string">
              <text:p text:style-name="P23">核心精神</text:p>
            </table:table-cell>
            <table:table-cell table:style-name="表格78.A1" office:value-type="string">
              <text:p text:style-name="P23">適合情境</text:p>
            </table:table-cell>
            <table:table-cell table:style-name="表格78.A1" office:value-type="string">
              <text:p text:style-name="P23">最大缺點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66">瀑布模型</text:p>
          </table:table-cell>
          <table:table-cell table:style-name="表格78.A2" office:value-type="string">
            <text:p text:style-name="P24">一步步往下、不回頭</text:p>
          </table:table-cell>
          <table:table-cell table:style-name="表格78.A2" office:value-type="string">
            <text:p text:style-name="P24">需求明確、規格固定</text:p>
          </table:table-cell>
          <table:table-cell table:style-name="表格78.A2" office:value-type="string">
            <text:p text:style-name="P24">需求一變就全盤重來</text:p>
          </table:table-cell>
        </table:table-row>
        <table:table-row table:style-name="表格78.1">
          <table:table-cell table:style-name="表格78.A3" office:value-type="string">
            <text:p text:style-name="P66">雛型模型</text:p>
          </table:table-cell>
          <table:table-cell table:style-name="表格78.A3" office:value-type="string">
            <text:p text:style-name="P24">先做樣品給你看、再修</text:p>
          </table:table-cell>
          <table:table-cell table:style-name="表格78.A3" office:value-type="string">
            <text:p text:style-name="P24">需求模糊、講不清楚</text:p>
          </table:table-cell>
          <table:table-cell table:style-name="表格78.A3" office:value-type="string">
            <text:p text:style-name="P24">樣品反覆改、易拖延</text:p>
          </table:table-cell>
        </table:table-row>
        <table:table-row table:style-name="表格78.1">
          <table:table-cell table:style-name="表格78.A2" office:value-type="string">
            <text:p text:style-name="P66">漸增模型</text:p>
          </table:table-cell>
          <table:table-cell table:style-name="表格78.A2" office:value-type="string">
            <text:p text:style-name="P24">切成小塊、一塊塊交付</text:p>
          </table:table-cell>
          <table:table-cell table:style-name="表格78.A2" office:value-type="string">
            <text:p text:style-name="P24">可分模組、想早點看到成果</text:p>
          </table:table-cell>
          <table:table-cell table:style-name="表格78.A2" office:value-type="string">
            <text:p text:style-name="P24">模組切割設計要好</text:p>
          </table:table-cell>
        </table:table-row>
        <table:table-row table:style-name="表格78.1">
          <table:table-cell table:style-name="表格78.A3" office:value-type="string">
            <text:p text:style-name="P66">敏捷模型</text:p>
          </table:table-cell>
          <table:table-cell table:style-name="表格78.A3" office:value-type="string">
            <text:p text:style-name="P24">短週期迭代、持續回饋修正</text:p>
          </table:table-cell>
          <table:table-cell table:style-name="表格78.A3" office:value-type="string">
            <text:p text:style-name="P24">需求常變、要快速反應</text:p>
          </table:table-cell>
          <table:table-cell table:style-name="表格78.A3" office:value-type="string">
            <text:p text:style-name="P24">文件少、靠團隊紀律</text:p>
          </table:table-cell>
        </table:table-row>
      </table:table>
      <text:h text:style-name="P21" text:outline-level="2">▍19-2　瀑布模型（Waterfall）</text:h>
      <text:p text:style-name="P10"><text:span text:style-name="T1">像瀑布的水往下流，</text:span><text:span text:style-name="T3">需求 → 設計 → 開發 → 測試 → 維護</text:span><text:span text:style-name="T1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6">⚠️ <text:s/>考試陷阱</text:p>
            <text:p text:style-name="P47">錯誤觀念：瀑布模型可以隨時回到上一階段修改。</text:p>
            <text:p text:style-name="P13">正確：傳統瀑布是「單向、不回頭」，這正是它最大的限制；需求一變動成本極高。</text:p>
          </table:table-cell>
        </table:table-row>
      </table:table>
      <text:h text:style-name="P21" text:outline-level="2">▍19-3　雛型模型（Prototyping）</text:h>
      <text:p text:style-name="P57">先快速做出一個「樣品（雛型）」給使用者看，依回饋反覆修改，直到滿意。專治「客戶講不清楚要什麼」。分兩種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3">類型</text:p>
            </table:table-cell>
            <table:table-cell table:style-name="表格80.A1" office:value-type="string">
              <text:p text:style-name="P23">做法</text:p>
            </table:table-cell>
            <table:table-cell table:style-name="表格80.A1" office:value-type="string">
              <text:p text:style-name="P23">雛型的命運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>拋棄式雛型</text:p>
          </table:table-cell>
          <table:table-cell table:style-name="表格80.A2" office:value-type="string">
            <text:p text:style-name="P24">只為釐清需求，做完即丟</text:p>
          </table:table-cell>
          <table:table-cell table:style-name="表格80.A2" office:value-type="string">
            <text:p text:style-name="P24">確認需求後丟掉，正式重做</text:p>
          </table:table-cell>
        </table:table-row>
        <table:table-row table:style-name="表格80.1">
          <table:table-cell table:style-name="表格80.A3" office:value-type="string">
            <text:p text:style-name="P25">演化式雛型</text:p>
          </table:table-cell>
          <table:table-cell table:style-name="表格80.A3" office:value-type="string">
            <text:p text:style-name="P24">雛型不斷修改、逐步長成正式系統</text:p>
          </table:table-cell>
          <table:table-cell table:style-name="表格80.A3" office:value-type="string">
            <text:p text:style-name="P24">雛型最後變成成品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4">💡 <text:s/>重點</text:p>
            <text:p text:style-name="P46">雛型模型的價值：</text:p>
            <text:p text:style-name="P51"><text:span text:style-name="T1">讓抽象的需求「具體化」。使用者看到實際畫面，往往才說得出「對、就是這個」或「不對，我要的</text:span><text:soft-page-break/><text:span text:style-name="T1">是那樣」，比看規格書有效得多。</text:span></text:p>
          </table:table-cell>
          <table:covered-table-cell/>
          <table:covered-table-cell/>
        </table:table-row>
      </table:table>
      <text:h text:style-name="P21" text:outline-level="2">▍19-4　漸增模型（Incremental）</text:h>
      <text:p text:style-name="P10"><text:span text:style-name="T1">把系統切成數個模組，</text:span><text:span text:style-name="T3">一塊一塊開發、一塊一塊交付</text:span><text:span text:style-name="T1">。每交付一塊就有可用功能，使用者能提早看到成果。例如先做登入、再做購物車、再做付款。</text:span></text:p>
      <text:h text:style-name="P11" text:outline-level="3">▍ 漸增 vs 敏捷：最常混淆的考點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23">比較</text:p>
            </table:table-cell>
            <table:table-cell table:style-name="表格81.A1" office:value-type="string">
              <text:p text:style-name="P23">漸增模型</text:p>
            </table:table-cell>
            <table:table-cell table:style-name="表格81.A1" office:value-type="string">
              <text:p text:style-name="P23">敏捷模型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25">交付方式</text:p>
          </table:table-cell>
          <table:table-cell table:style-name="表格81.A2" office:value-type="string">
            <text:p text:style-name="P24">分批交付完整模組</text:p>
          </table:table-cell>
          <table:table-cell table:style-name="表格81.A2" office:value-type="string">
            <text:p text:style-name="P24">短迭代持續交付</text:p>
          </table:table-cell>
        </table:table-row>
        <table:table-row table:style-name="表格81.1">
          <table:table-cell table:style-name="表格81.A3" office:value-type="string">
            <text:p text:style-name="P25">需求變動</text:p>
          </table:table-cell>
          <table:table-cell table:style-name="表格81.A3" office:value-type="string">
            <text:p text:style-name="P24">模組規劃多半事先定好</text:p>
          </table:table-cell>
          <table:table-cell table:style-name="表格81.A3" office:value-type="string">
            <text:p text:style-name="P24">歡迎需求隨時改變</text:p>
          </table:table-cell>
        </table:table-row>
        <table:table-row table:style-name="表格81.1">
          <table:table-cell table:style-name="表格81.A2" office:value-type="string">
            <text:p text:style-name="P25">回饋修正</text:p>
          </table:table-cell>
          <table:table-cell table:style-name="表格81.A2" office:value-type="string">
            <text:p text:style-name="P24">不一定每批都收集回饋再修</text:p>
          </table:table-cell>
          <table:table-cell table:style-name="表格81.A2" office:value-type="string">
            <text:p text:style-name="P24">每個迭代都收集回饋並調整</text:p>
          </table:table-cell>
        </table:table-row>
        <table:table-row table:style-name="表格81.1">
          <table:table-cell table:style-name="表格81.A3" office:value-type="string">
            <text:p text:style-name="P25">關係</text:p>
          </table:table-cell>
          <table:table-cell table:style-name="表格81.A3" office:value-type="string">
            <text:p text:style-name="P24">敏捷可說是漸增的進化版</text:p>
          </table:table-cell>
          <table:table-cell table:style-name="表格81.A3" office:value-type="string">
            <text:p text:style-name="P24">＝ 漸增 ＋ 迭代 ＋ 持續回饋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6">⚠️ <text:s/>考試陷阱</text:p>
            <text:p text:style-name="P47">錯誤觀念：漸增模型 ＝ 敏捷開發。</text:p>
            <text:p text:style-name="P13">正確：漸增只是「分批交付」，不一定有每批回饋修正；敏捷強調『短迭代 ＋ 持續回饋 ＋ 擁抱變動』。漸增不等於敏捷。</text:p>
          </table:table-cell>
          <table:covered-table-cell/>
          <table:covered-table-cell/>
        </table:table-row>
      </table:table>
      <text:h text:style-name="P21" text:outline-level="2">▍19-5　敏捷宣言（Agile）四大價值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23">重視（左）</text:p>
            </table:table-cell>
            <table:table-cell table:style-name="表格82.A1" office:value-type="string">
              <text:p text:style-name="P23">勝過（右）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24">個人與互動</text:p>
          </table:table-cell>
          <table:table-cell table:style-name="表格82.A2" office:value-type="string">
            <text:p text:style-name="P24">流程與工具</text:p>
          </table:table-cell>
        </table:table-row>
        <table:table-row table:style-name="表格82.1">
          <table:table-cell table:style-name="表格82.A3" office:value-type="string">
            <text:p text:style-name="P24">可用的軟體</text:p>
          </table:table-cell>
          <table:table-cell table:style-name="表格82.A3" office:value-type="string">
            <text:p text:style-name="P24">詳盡的文件</text:p>
          </table:table-cell>
        </table:table-row>
        <table:table-row table:style-name="表格82.1">
          <table:table-cell table:style-name="表格82.A2" office:value-type="string">
            <text:p text:style-name="P24">與客戶協作</text:p>
          </table:table-cell>
          <table:table-cell table:style-name="表格82.A2" office:value-type="string">
            <text:p text:style-name="P24">合約談判</text:p>
          </table:table-cell>
        </table:table-row>
        <table:table-row table:style-name="表格82.1">
          <table:table-cell table:style-name="表格82.A3" office:value-type="string">
            <text:p text:style-name="P24">回應變化</text:p>
          </table:table-cell>
          <table:table-cell table:style-name="表格82.A3" office:value-type="string">
            <text:p text:style-name="P24">遵循計畫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2">🔑 <text:s/>敏捷宣言精神</text:p>
            <text:p text:style-name="P37">「左邊比右邊重要，但右邊也有價值」</text:p>
            <text:p text:style-name="P13">敏捷不是不要文件，而是『人、可用軟體、協作、應變』優先。</text:p>
          </table:table-cell>
          <table:covered-table-cell/>
        </table:table-row>
      </table:table>
      <text:h text:style-name="P62" text:outline-level="1"><text:bookmark-start text:name="bm_c20"/><text:soft-page-break/><text:span text:style-name="T31">第 20 章　敏捷實作：Scrum / Kanban / XP / Lean</text:span><text:bookmark-end text:name="bm_c20"/></text:h>
      <text:h text:style-name="P21" text:outline-level="2">▍20-1　Scrum——最熱門的敏捷框架</text:h>
      <text:p text:style-name="P57">Scrum 用「短衝（Sprint）」把開發切成 1–4 週的小週期，每個 Sprint 結束就交付一個可運作的增量。</text:p>
      <text:h text:style-name="P11" text:outline-level="3">▍ Scrum 三大角色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23">角色</text:p>
            </table:table-cell>
            <table:table-cell table:style-name="表格83.A1" office:value-type="string">
              <text:p text:style-name="P23">英文</text:p>
            </table:table-cell>
            <table:table-cell table:style-name="表格83.A1" office:value-type="string">
              <text:p text:style-name="P23">職責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>產品負責人</text:p>
          </table:table-cell>
          <table:table-cell table:style-name="表格83.A2" office:value-type="string">
            <text:p text:style-name="P24">Product Owner（PO）</text:p>
          </table:table-cell>
          <table:table-cell table:style-name="表格83.A2" office:value-type="string">
            <text:p text:style-name="P24">決定要做什麼、排優先序、顧需求清單</text:p>
          </table:table-cell>
        </table:table-row>
        <table:table-row table:style-name="表格83.1">
          <table:table-cell table:style-name="表格83.A3" office:value-type="string">
            <text:p text:style-name="P25">敏捷大師</text:p>
          </table:table-cell>
          <table:table-cell table:style-name="表格83.A3" office:value-type="string">
            <text:p text:style-name="P24">Scrum Master（SM）</text:p>
          </table:table-cell>
          <table:table-cell table:style-name="表格83.A3" office:value-type="string">
            <text:p text:style-name="P24">排除障礙、確保流程順暢、保護團隊</text:p>
          </table:table-cell>
        </table:table-row>
        <table:table-row table:style-name="表格83.1">
          <table:table-cell table:style-name="表格83.A2" office:value-type="string">
            <text:p text:style-name="P25">開發團隊</text:p>
          </table:table-cell>
          <table:table-cell table:style-name="表格83.A2" office:value-type="string">
            <text:p text:style-name="P24">Development Team</text:p>
          </table:table-cell>
          <table:table-cell table:style-name="表格83.A2" office:value-type="string">
            <text:p text:style-name="P24">實際把功能做出來，自我管理</text:p>
          </table:table-cell>
        </table:table-row>
      </table:table>
      <text:h text:style-name="P11" text:outline-level="3">▍ Scrum 重要名詞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23">名詞</text:p>
            </table:table-cell>
            <table:table-cell table:style-name="表格84.A1" office:value-type="string">
              <text:p text:style-name="P23">意思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24">Product Backlog</text:p>
          </table:table-cell>
          <table:table-cell table:style-name="表格84.A2" office:value-type="string">
            <text:p text:style-name="P24">產品待辦清單：所有想做的功能（PO 維護排序）</text:p>
          </table:table-cell>
        </table:table-row>
        <table:table-row table:style-name="表格84.1">
          <table:table-cell table:style-name="表格84.A3" office:value-type="string">
            <text:p text:style-name="P24">Sprint Backlog</text:p>
          </table:table-cell>
          <table:table-cell table:style-name="表格84.A3" office:value-type="string">
            <text:p text:style-name="P24">本次短衝要做的工作清單</text:p>
          </table:table-cell>
        </table:table-row>
        <table:table-row table:style-name="表格84.1">
          <table:table-cell table:style-name="表格84.A2" office:value-type="string">
            <text:p text:style-name="P24">Increment</text:p>
          </table:table-cell>
          <table:table-cell table:style-name="表格84.A2" office:value-type="string">
            <text:p text:style-name="P24">增量：每個 Sprint 產出的可用成果</text:p>
          </table:table-cell>
        </table:table-row>
        <table:table-row table:style-name="表格84.1">
          <table:table-cell table:style-name="表格84.A3" office:value-type="string">
            <text:p text:style-name="P24">Velocity</text:p>
          </table:table-cell>
          <table:table-cell table:style-name="表格84.A3" office:value-type="string">
            <text:p text:style-name="P24">團隊速度：一個 Sprint 大約能完成多少工作量</text:p>
          </table:table-cell>
        </table:table-row>
        <table:table-row table:style-name="表格84.1">
          <table:table-cell table:style-name="表格84.A2" office:value-type="string">
            <text:p text:style-name="P24">DoD</text:p>
          </table:table-cell>
          <table:table-cell table:style-name="表格84.A2" office:value-type="string">
            <text:p text:style-name="P24">完成的定義（Definition of Done）：怎樣才算真正做完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2">🔑 <text:s/>Scrum 本質</text:p>
            <text:p text:style-name="P37">Scrum ＝ 漸增（Incremental）＋ 迭代（Iterative）</text:p>
            <text:p text:style-name="P13">每個 Sprint 都交付一塊（漸增），且不斷重複改良（迭代）。</text:p>
          </table:table-cell>
          <table:covered-table-cell/>
        </table:table-row>
      </table:table>
      <text:h text:style-name="P21" text:outline-level="2">▍20-2　Kanban（看板）</text:h>
      <text:p text:style-name="P10"><text:span text:style-name="T1">用一塊看板把工作分成「待辦 / 進行中 / 完成」等欄位，工作像卡片一樣往右流動。核心是 </text:span><text:span text:style-name="T3">WIP 限制（限制同時進行的工作量）</text:span><text:span text:style-name="T1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">💡 <text:s/>重點</text:p>
            <text:p text:style-name="P46">Scrum 與 Kanban 差異：</text:p>
            <text:p text:style-name="P13">Scrum 有固定長度的 Sprint 與角色；Kanban 沒有固定迭代，強調『視覺化流程 ＋ 限制在製品 ＋ 持續流動』，更彈性。</text:p>
          </table:table-cell>
        </table:table-row>
      </table:table>
      <text:h text:style-name="P49" text:outline-level="2"><text:soft-page-break/><text:span text:style-name="T25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23">實踐</text:p>
            </table:table-cell>
            <table:table-cell table:style-name="表格86.A1" office:value-type="string">
              <text:p text:style-name="P23">說明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>TDD 測試驅動開發</text:p>
          </table:table-cell>
          <table:table-cell table:style-name="表格86.A2" office:value-type="string">
            <text:p text:style-name="P24">先寫測試、再寫程式，讓測試通過</text:p>
          </table:table-cell>
        </table:table-row>
        <table:table-row table:style-name="表格86.1">
          <table:table-cell table:style-name="表格86.A3" office:value-type="string">
            <text:p text:style-name="P25">結對編程</text:p>
          </table:table-cell>
          <table:table-cell table:style-name="表格86.A3" office:value-type="string">
            <text:p text:style-name="P24">兩人一組，一人寫一人審，即時抓錯</text:p>
          </table:table-cell>
        </table:table-row>
        <table:table-row table:style-name="表格86.1">
          <table:table-cell table:style-name="表格86.A2" office:value-type="string">
            <text:p text:style-name="P25">持續整合（CI）</text:p>
          </table:table-cell>
          <table:table-cell table:style-name="表格86.A2" office:value-type="string">
            <text:p text:style-name="P24">頻繁把程式碼合併並自動測試</text:p>
          </table:table-cell>
        </table:table-row>
        <table:table-row table:style-name="表格86.1">
          <table:table-cell table:style-name="表格86.A3" office:value-type="string">
            <text:p text:style-name="P25">重構</text:p>
          </table:table-cell>
          <table:table-cell table:style-name="表格86.A3" office:value-type="string">
            <text:p text:style-name="P24">在不改變功能下持續優化程式結構</text:p>
          </table:table-cell>
        </table:table-row>
        <table:table-row table:style-name="表格86.1">
          <table:table-cell table:style-name="表格86.A2" office:value-type="string">
            <text:p text:style-name="P25">簡單設計</text:p>
          </table:table-cell>
          <table:table-cell table:style-name="表格86.A2" office:value-type="string">
            <text:p text:style-name="P24">只做現在需要的，不過度設計</text:p>
          </table:table-cell>
        </table:table-row>
      </table:table>
      <text:h text:style-name="P21" text:outline-level="2">▍20-4　Lean 精實開發</text:h>
      <text:p text:style-name="P10"><text:span text:style-name="T1">源自豐田生產方式，核心是「</text:span><text:span text:style-name="T3">消除浪費、極大化價值</text:span><text:span text:style-name="T1">」。先做 MVP（最小可行產品）快速驗證市場，再依回饋持續改良。</text:span></text:p>
      <text:list text:continue-numbering="true" text:style-name="WWNum2">
        <text:list-item>
          <text:p text:style-name="P50"><text:span text:style-name="T26">MVP（Minimum Viable Product）：</text:span><text:span text:style-name="T1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6">⚠️ <text:s/>考試陷阱</text:p>
            <text:p text:style-name="P47">錯誤觀念：MVP ＝ 半成品、粗製濫造。</text:p>
            <text:p text:style-name="P13">正確：MVP 是『功能最小但可用、能驗證價值』的完整產品，不是隨便做做的瑕疵品。</text:p>
          </table:table-cell>
        </table:table-row>
      </table:table>
      <text:h text:style-name="P48" text:outline-level="1"><text:bookmark-start text:name="bm_c21"/>第 21 章　SSDLC 安全軟體開發生命週期<text:bookmark-end text:name="bm_c21"/></text:h>
      <text:p text:style-name="P10"><text:span text:style-name="T1">SSDLC（Secure SDLC）＝ </text:span><text:span text:style-name="T3">把「資安」融入軟體開發的每一個階段</text:span><text:span text:style-name="T1">，而不是等做完才檢查。核心理念：安全要『左移（Shift Left）』，越早處理成本越低。</text:span></text:p>
      <text:h text:style-name="P21" text:outline-level="2">▍21-1　五大階段都要做安全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23">階段</text:p>
            </table:table-cell>
            <table:table-cell table:style-name="表格88.A1" office:value-type="string">
              <text:p text:style-name="P23">這階段的安全工作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25">① 需求</text:p>
          </table:table-cell>
          <table:table-cell table:style-name="表格88.A2" office:value-type="string">
            <text:p text:style-name="P24">訂出安全需求、法規遵循、隱私要求</text:p>
          </table:table-cell>
        </table:table-row>
        <table:table-row table:style-name="表格88.1">
          <table:table-cell table:style-name="表格88.A3" office:value-type="string">
            <text:p text:style-name="P25">② 設計</text:p>
          </table:table-cell>
          <table:table-cell table:style-name="表格88.A3" office:value-type="string">
            <text:p text:style-name="P24">威脅建模、安全架構、零信任設計</text:p>
          </table:table-cell>
        </table:table-row>
        <table:table-row table:style-name="表格88.1">
          <table:table-cell table:style-name="表格88.A2" office:value-type="string">
            <text:p text:style-name="P25">③ 開發</text:p>
          </table:table-cell>
          <table:table-cell table:style-name="表格88.A2" office:value-type="string">
            <text:p text:style-name="P24">安全編碼規範、Code Review、避免漏洞</text:p>
          </table:table-cell>
        </table:table-row>
        <table:table-row table:style-name="表格88.1">
          <table:table-cell table:style-name="表格88.A3" office:value-type="string">
            <text:p text:style-name="P25">④ 測試</text:p>
          </table:table-cell>
          <table:table-cell table:style-name="表格88.A3" office:value-type="string">
            <text:p text:style-name="P24">弱點掃描、滲透測試、API 安全測試</text:p>
          </table:table-cell>
        </table:table-row>
        <table:table-row table:style-name="表格88.1">
          <table:table-cell table:style-name="表格88.A2" office:value-type="string">
            <text:p text:style-name="P25">⑤ 維護</text:p>
          </table:table-cell>
          <table:table-cell table:style-name="表格88.A2" office:value-type="string">
            <text:p text:style-name="P24">漏洞修補、持續監控、版本更新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2">🔑 <text:s/>SSDLC 五階段口訣</text:p>
            <text:p text:style-name="P59">需 · 設 · 開 · 測 · 維</text:p>
            <text:p text:style-name="P65">（需求・設計・開發・測試・維護，每一階段都要做安全）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5">⭐ <text:s/>核心觀念</text:p>
            <text:p text:style-name="P51"><text:span text:style-name="T26">零信任（Zero Trust）：</text:span><text:span text:style-name="T1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6">⚠️ <text:s/>考試陷阱</text:p>
            <text:p text:style-name="P47">錯誤觀念：安全只要在測試階段做就好。</text:p>
            <text:p text:style-name="P13">正確：SSDLC 強調『每一階段都要納入安全』，安全左移，越早做越省成本。</text:p>
            <text:p text:style-name="P47">錯誤觀念：零信任只防外部攻擊者。</text:p>
            <text:p text:style-name="P13">正確：零信任連『內部使用者與裝置』都不預設信任，一律持續驗證。</text:p>
          </table:table-cell>
          <table:covered-table-cell/>
        </table:table-row>
      </table:table>
      <text:h text:style-name="P48" text:outline-level="1"><text:bookmark-start text:name="bm_c22"/>第 22 章　軟體測試：黑箱 vs 白箱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23">測試</text:p>
            </table:table-cell>
            <table:table-cell table:style-name="表格89.A1" office:value-type="string">
              <text:p text:style-name="P23">看不看程式碼</text:p>
            </table:table-cell>
            <table:table-cell table:style-name="表格89.A1" office:value-type="string">
              <text:p text:style-name="P23">測試重點</text:p>
            </table:table-cell>
            <table:table-cell table:style-name="表格89.A1" office:value-type="string">
              <text:p text:style-name="P23">誰來測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66">黑箱測試</text:p>
          </table:table-cell>
          <table:table-cell table:style-name="表格89.A2" office:value-type="string">
            <text:p text:style-name="P24">不看內部程式碼</text:p>
          </table:table-cell>
          <table:table-cell table:style-name="表格89.A2" office:value-type="string">
            <text:p text:style-name="P24">輸入 → 輸出對不對（功能面）</text:p>
          </table:table-cell>
          <table:table-cell table:style-name="表格89.A2" office:value-type="string">
            <text:p text:style-name="P24">測試人員 / 使用者</text:p>
          </table:table-cell>
        </table:table-row>
        <table:table-row table:style-name="表格89.1">
          <table:table-cell table:style-name="表格89.A3" office:value-type="string">
            <text:p text:style-name="P66">白箱測試</text:p>
          </table:table-cell>
          <table:table-cell table:style-name="表格89.A3" office:value-type="string">
            <text:p text:style-name="P24">看內部程式碼結構</text:p>
          </table:table-cell>
          <table:table-cell table:style-name="表格89.A3" office:value-type="string">
            <text:p text:style-name="P24">每行/每分支都有跑到（結構面）</text:p>
          </table:table-cell>
          <table:table-cell table:style-name="表格89.A3" office:value-type="string">
            <text:p text:style-name="P24">開發人員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2">🔑 <text:s/>黑箱白箱口訣</text:p>
            <text:p text:style-name="P59">黑看外、白看內</text:p>
            <text:p text:style-name="P13">黑箱看外部行為（功能對不對），白箱看內部結構（程式碼有沒有跑遍）。</text:p>
          </table:table-cell>
          <table:covered-table-cell/>
          <table:covered-table-cell/>
          <table:covered-table-cell/>
        </table:table-row>
      </table:table>
      <text:h text:style-name="P21" text:outline-level="2">▍22-1　白箱的覆蓋率概念</text:h>
      <text:list text:continue-numbering="true" text:style-name="WWNum2">
        <text:list-item>
          <text:p text:style-name="P50"><text:span text:style-name="T26">陳述（Statement）覆蓋：</text:span><text:span text:style-name="T1">每一行程式碼至少執行一次。</text:span></text:p>
        </text:list-item>
        <text:list-item>
          <text:p text:style-name="P50"><text:span text:style-name="T26">分支（Branch）覆蓋：</text:span><text:span text:style-name="T1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6">⚠️ <text:s/>考試陷阱</text:p>
            <text:p text:style-name="P47">錯誤觀念：黑箱測試需要看程式碼。</text:p>
            <text:p text:style-name="P13">正確：黑箱『不看程式碼』，只看輸入輸出。看程式碼的是白箱。</text:p>
            <text:p text:style-name="P51"><text:soft-page-break/><text:span text:style-name="T27">錯誤觀念：達到 100% 陳述覆蓋就代表測試完整。</text:span></text:p>
            <text:p text:style-name="P13">正確：陳述覆蓋無法保證分支都測到；分支覆蓋比陳述覆蓋更嚴謹。</text:p>
          </table:table-cell>
        </table:table-row>
      </table:table>
      <text:h text:style-name="P48" text:outline-level="1"><text:bookmark-start text:name="bm_c23"/>第 23 章　UML 六大常考圖<text:bookmark-end text:name="bm_c23"/></text:h>
      <text:p text:style-name="P10"><text:span text:style-name="T1">UML（統一塑模語言）用圖形描述系統。分兩類：</text:span><text:span text:style-name="T3">結構圖（靜態：系統長什麼樣）</text:span><text:span text:style-name="T1"> 與 </text:span><text:span text:style-name="T3">行為圖（動態：系統怎麼運作）</text:span><text:span text:style-name="T1">。</text:span></text:p>
      <text:h text:style-name="P21" text:outline-level="2">▍23-1　六大圖對照表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23">分類</text:p>
            </table:table-cell>
            <table:table-cell table:style-name="表格91.A1" office:value-type="string">
              <text:p text:style-name="P23">圖</text:p>
            </table:table-cell>
            <table:table-cell table:style-name="表格91.A1" office:value-type="string">
              <text:p text:style-name="P23">用途</text:p>
            </table:table-cell>
            <table:table-cell table:style-name="表格91.A1" office:value-type="string">
              <text:p text:style-name="P23">關鍵字（看到就選它）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44">結構</text:p>
          </table:table-cell>
          <table:table-cell table:style-name="表格91.A2" office:value-type="string">
            <text:p text:style-name="P24">類別圖</text:p>
          </table:table-cell>
          <table:table-cell table:style-name="表格91.A2" office:value-type="string">
            <text:p text:style-name="P24">畫類別、屬性、方法與關係</text:p>
          </table:table-cell>
          <table:table-cell table:style-name="表格91.A2" office:value-type="string">
            <text:p text:style-name="P24">類別、屬性、繼承</text:p>
          </table:table-cell>
        </table:table-row>
        <table:table-row table:style-name="表格91.1">
          <table:table-cell table:style-name="表格91.A3" office:value-type="string">
            <text:p text:style-name="P44">結構</text:p>
          </table:table-cell>
          <table:table-cell table:style-name="表格91.A3" office:value-type="string">
            <text:p text:style-name="P24">元件圖</text:p>
          </table:table-cell>
          <table:table-cell table:style-name="表格91.A3" office:value-type="string">
            <text:p text:style-name="P24">畫軟體模組/元件的組成</text:p>
          </table:table-cell>
          <table:table-cell table:style-name="表格91.A3" office:value-type="string">
            <text:p text:style-name="P24">模組、元件、介面</text:p>
          </table:table-cell>
        </table:table-row>
        <table:table-row table:style-name="表格91.1">
          <table:table-cell table:style-name="表格91.A2" office:value-type="string">
            <text:p text:style-name="P44">結構</text:p>
          </table:table-cell>
          <table:table-cell table:style-name="表格91.A2" office:value-type="string">
            <text:p text:style-name="P24">部署圖</text:p>
          </table:table-cell>
          <table:table-cell table:style-name="表格91.A2" office:value-type="string">
            <text:p text:style-name="P24">畫軟硬體實體部署位置</text:p>
          </table:table-cell>
          <table:table-cell table:style-name="表格91.A2" office:value-type="string">
            <text:p text:style-name="P24">伺服器、硬體、節點</text:p>
          </table:table-cell>
        </table:table-row>
        <table:table-row table:style-name="表格91.1">
          <table:table-cell table:style-name="表格91.A3" office:value-type="string">
            <text:p text:style-name="P68">行為</text:p>
          </table:table-cell>
          <table:table-cell table:style-name="表格91.A3" office:value-type="string">
            <text:p text:style-name="P24">使用案例圖</text:p>
          </table:table-cell>
          <table:table-cell table:style-name="表格91.A3" office:value-type="string">
            <text:p text:style-name="P24">畫使用者(Actor)與系統功能</text:p>
          </table:table-cell>
          <table:table-cell table:style-name="表格91.A3" office:value-type="string">
            <text:p text:style-name="P24">使用者、角色、功能</text:p>
          </table:table-cell>
        </table:table-row>
        <table:table-row table:style-name="表格91.1">
          <table:table-cell table:style-name="表格91.A2" office:value-type="string">
            <text:p text:style-name="P68">行為</text:p>
          </table:table-cell>
          <table:table-cell table:style-name="表格91.A2" office:value-type="string">
            <text:p text:style-name="P24">循序圖</text:p>
          </table:table-cell>
          <table:table-cell table:style-name="表格91.A2" office:value-type="string">
            <text:p text:style-name="P24">畫物件間訊息的時間順序</text:p>
          </table:table-cell>
          <table:table-cell table:style-name="表格91.A2" office:value-type="string">
            <text:p text:style-name="P24">時間順序、訊息傳遞</text:p>
          </table:table-cell>
        </table:table-row>
        <table:table-row table:style-name="表格91.1">
          <table:table-cell table:style-name="表格91.A3" office:value-type="string">
            <text:p text:style-name="P68">行為</text:p>
          </table:table-cell>
          <table:table-cell table:style-name="表格91.A3" office:value-type="string">
            <text:p text:style-name="P24">活動圖</text:p>
          </table:table-cell>
          <table:table-cell table:style-name="表格91.A3" office:value-type="string">
            <text:p text:style-name="P24">畫流程與判斷分支(像流程圖)</text:p>
          </table:table-cell>
          <table:table-cell table:style-name="表格91.A3" office:value-type="string">
            <text:p text:style-name="P24">流程、判斷、菱形分支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2">🔑 <text:s/>UML 六圖口訣</text:p>
            <text:p text:style-name="P22">物 · 模 · 位　／　功 · 序 · 流</text:p>
            <text:p text:style-name="P65">結構三圖：類別(物件)・元件(模組)・部署(位置)；</text:p>
            <text:p text:style-name="P65">行為三圖：使用案例(功能)・循序(順序)・活動(流程)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4">💡 <text:s/>重點</text:p>
            <text:p text:style-name="P46">快速判斷技巧：</text:p>
            <text:p text:style-name="P13">看到「使用者/角色 + 系統功能」→ 使用案例圖；</text:p>
            <text:p text:style-name="P13">看到「時間先後、誰呼叫誰」→ 循序圖；</text:p>
            <text:p text:style-name="P13">看到「流程、判斷、菱形」→ 活動圖；</text:p>
            <text:p text:style-name="P13">看到「伺服器、實體硬體擺哪」→ 部署圖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6">⚠️ <text:s/>考試陷阱</text:p>
            <text:p text:style-name="P47">錯誤觀念：循序圖是用來畫模組組成的。</text:p>
            <text:p text:style-name="P13">正確：循序圖畫『訊息的時間順序』；畫模組組成的是元件圖。</text:p>
            <text:p text:style-name="P51"><text:soft-page-break/><text:span text:style-name="T27">錯誤觀念：部署圖描述系統功能。</text:span></text:p>
            <text:p text:style-name="P13">正確：部署圖描述『軟硬體實體部署位置』（屬結構圖），功能是使用案例圖。</text:p>
            <text:p text:style-name="P47">錯誤觀念：活動圖不需要判斷分支。</text:p>
            <text:p text:style-name="P13">正確：活動圖描述流程，遇到判斷會用『菱形』分岔，是它的特徵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c24"/>第 24 章　專案管理 PMBOK 五大流程<text:bookmark-end text:name="bm_c24"/></text:h>
      <text:p text:style-name="P10"><text:span text:style-name="T1">專案（Project）＝ </text:span><text:span text:style-name="T3">「為了完成特定目標，有明確起訖時間的一次性工作」</text:span><text:span text:style-name="T1">。重點在「臨時性」與「獨特性」——做完就結束，不是日常重複的營運。PMBOK 把專案管理整理成五大流程群組。</text:span></text:p>
      <text:h text:style-name="P21" text:outline-level="2">▍24-1　五大流程群組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23">流程</text:p>
            </table:table-cell>
            <table:table-cell table:style-name="表格92.A1" office:value-type="string">
              <text:p text:style-name="P23">在做什麼</text:p>
            </table:table-cell>
            <table:table-cell table:style-name="表格92.A1" office:value-type="string">
              <text:p text:style-name="P23">產出範例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>① 起始</text:p>
          </table:table-cell>
          <table:table-cell table:style-name="表格92.A2" office:value-type="string">
            <text:p text:style-name="P24">確認專案目標、授權啟動</text:p>
          </table:table-cell>
          <table:table-cell table:style-name="表格92.A2" office:value-type="string">
            <text:p text:style-name="P24">專案章程、找出利害關係人</text:p>
          </table:table-cell>
        </table:table-row>
        <table:table-row table:style-name="表格92.1">
          <table:table-cell table:style-name="表格92.A3" office:value-type="string">
            <text:p text:style-name="P25">② 規劃</text:p>
          </table:table-cell>
          <table:table-cell table:style-name="表格92.A3" office:value-type="string">
            <text:p text:style-name="P24">訂範圍、時程、成本、品質、風險</text:p>
          </table:table-cell>
          <table:table-cell table:style-name="表格92.A3" office:value-type="string">
            <text:p text:style-name="P24">專案管理計畫書、WBS</text:p>
          </table:table-cell>
        </table:table-row>
        <table:table-row table:style-name="表格92.1">
          <table:table-cell table:style-name="表格92.A2" office:value-type="string">
            <text:p text:style-name="P25">③ 執行</text:p>
          </table:table-cell>
          <table:table-cell table:style-name="表格92.A2" office:value-type="string">
            <text:p text:style-name="P24">實際做事、帶團隊、產出成果</text:p>
          </table:table-cell>
          <table:table-cell table:style-name="表格92.A2" office:value-type="string">
            <text:p text:style-name="P24">可交付成果、團隊運作</text:p>
          </table:table-cell>
        </table:table-row>
        <table:table-row table:style-name="表格92.1">
          <table:table-cell table:style-name="表格92.A3" office:value-type="string">
            <text:p text:style-name="P25">④ 監控</text:p>
          </table:table-cell>
          <table:table-cell table:style-name="表格92.A3" office:value-type="string">
            <text:p text:style-name="P24">追蹤進度、比對計畫、矯正偏差</text:p>
          </table:table-cell>
          <table:table-cell table:style-name="表格92.A3" office:value-type="string">
            <text:p text:style-name="P24">績效報告、變更控制</text:p>
          </table:table-cell>
        </table:table-row>
        <table:table-row table:style-name="表格92.1">
          <table:table-cell table:style-name="表格92.A2" office:value-type="string">
            <text:p text:style-name="P25">⑤ 結案</text:p>
          </table:table-cell>
          <table:table-cell table:style-name="表格92.A2" office:value-type="string">
            <text:p text:style-name="P24">驗收交付、結束合約、總結經驗</text:p>
          </table:table-cell>
          <table:table-cell table:style-name="表格92.A2" office:value-type="string">
            <text:p text:style-name="P24">結案報告、經驗學習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2">🔑 <text:s/>PMBOK 五流程口訣</text:p>
            <text:p text:style-name="P59">起 · 計 · 做 · 控 · 收</text:p>
            <text:p text:style-name="P65">（起始・規劃・執行・監控・結案）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5">⭐ <text:s/>核心觀念</text:p>
            <text:p text:style-name="P51"><text:span text:style-name="T26">監控與執行是「同時進行」的！</text:span><text:span text:style-name="T1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6">⚠️ <text:s/>考試陷阱</text:p>
            <text:p text:style-name="P47">錯誤觀念：五大流程是嚴格按順序、一個做完才換下一個。</text:p>
            <text:p text:style-name="P13">正確：規劃、執行、監控常『反覆交錯』；尤其監控與執行是同步進行的。</text:p>
            <text:p text:style-name="P47">錯誤觀念：專案與日常營運是一樣的。</text:p>
            <text:p text:style-name="P13">正確：專案是『臨時性、有起訖、獨特』；營運是『持續性、重複』的日常工作。</text:p>
          </table:table-cell>
          <table:covered-table-cell/>
          <table:covered-table-cell/>
        </table:table-row>
      </table:table>
      <text:h text:style-name="P48" text:outline-level="1"><text:bookmark-start text:name="bm_c25"/>第 25 章　資訊委外管理六階段<text:bookmark-end text:name="bm_c25"/></text:h>
      <text:p text:style-name="P10"><text:span text:style-name="T1">委外（Outsourcing）＝ </text:span><text:span text:style-name="T3">把資訊工作（如系統開發、機房維運）交給外部廠商做</text:span><text:span text:style-name="T1">。政府與大型專案幾乎都採委外，因此「委外流程」是熱門考點。</text:span></text:p>
      <text:h text:style-name="P49" text:outline-level="2"><text:soft-page-break/><text:span text:style-name="T25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23">階段</text:p>
            </table:table-cell>
            <table:table-cell table:style-name="表格93.A1" office:value-type="string">
              <text:p text:style-name="P23">重點工作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>① 規劃</text:p>
          </table:table-cell>
          <table:table-cell table:style-name="表格93.A2" office:value-type="string">
            <text:p text:style-name="P24">確認需求、評估該不該委外、編預算</text:p>
          </table:table-cell>
        </table:table-row>
        <table:table-row table:style-name="表格93.1">
          <table:table-cell table:style-name="表格93.A3" office:value-type="string">
            <text:p text:style-name="P25">② 招標</text:p>
          </table:table-cell>
          <table:table-cell table:style-name="表格93.A3" office:value-type="string">
            <text:p text:style-name="P24">公告需求、製作招標文件(RFP)、邀廠商投標</text:p>
          </table:table-cell>
        </table:table-row>
        <table:table-row table:style-name="表格93.1">
          <table:table-cell table:style-name="表格93.A2" office:value-type="string">
            <text:p text:style-name="P25">③ 決標</text:p>
          </table:table-cell>
          <table:table-cell table:style-name="表格93.A2" office:value-type="string">
            <text:p text:style-name="P24">評選廠商、議價、決定得標者</text:p>
          </table:table-cell>
        </table:table-row>
        <table:table-row table:style-name="表格93.1">
          <table:table-cell table:style-name="表格93.A3" office:value-type="string">
            <text:p text:style-name="P25">④ 履約</text:p>
          </table:table-cell>
          <table:table-cell table:style-name="表格93.A3" office:value-type="string">
            <text:p text:style-name="P24">廠商依約執行、專案管理與監督</text:p>
          </table:table-cell>
        </table:table-row>
        <table:table-row table:style-name="表格93.1">
          <table:table-cell table:style-name="表格93.A2" office:value-type="string">
            <text:p text:style-name="P25">⑤ 驗收</text:p>
          </table:table-cell>
          <table:table-cell table:style-name="表格93.A2" office:value-type="string">
            <text:p text:style-name="P24">檢查成果是否符合規格（含 UAT）</text:p>
          </table:table-cell>
        </table:table-row>
        <table:table-row table:style-name="表格93.1">
          <table:table-cell table:style-name="表格93.A3" office:value-type="string">
            <text:p text:style-name="P25">⑥ 保固</text:p>
          </table:table-cell>
          <table:table-cell table:style-name="表格93.A3" office:value-type="string">
            <text:p text:style-name="P24">上線後保固期維護、缺失修正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2">🔑 <text:s/>委外六階段口訣</text:p>
            <text:p text:style-name="P59">計 · 招 · 決 · 履 · 驗 · 保</text:p>
            <text:p text:style-name="P65">（規劃・招標・決標・履約・驗收・保固）</text:p>
          </table:table-cell>
          <table:covered-table-cell/>
        </table:table-row>
      </table:table>
      <text:h text:style-name="P21" text:outline-level="2">▍25-2　招標方式三種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23">方式</text:p>
            </table:table-cell>
            <table:table-cell table:style-name="表格94.A1" office:value-type="string">
              <text:p text:style-name="P23">說明</text:p>
            </table:table-cell>
            <table:table-cell table:style-name="表格94.A1" office:value-type="string">
              <text:p text:style-name="P23">適用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5">公開招標</text:p>
          </table:table-cell>
          <table:table-cell table:style-name="表格94.A2" office:value-type="string">
            <text:p text:style-name="P24">公告周知，凡符合資格皆可投標</text:p>
          </table:table-cell>
          <table:table-cell table:style-name="表格94.A2" office:value-type="string">
            <text:p text:style-name="P24">最常見，公平公開</text:p>
          </table:table-cell>
        </table:table-row>
        <table:table-row table:style-name="表格94.1">
          <table:table-cell table:style-name="表格94.A3" office:value-type="string">
            <text:p text:style-name="P25">選擇性招標</text:p>
          </table:table-cell>
          <table:table-cell table:style-name="表格94.A3" office:value-type="string">
            <text:p text:style-name="P24">先資格審查、建立合格廠商名單再邀標</text:p>
          </table:table-cell>
          <table:table-cell table:style-name="表格94.A3" office:value-type="string">
            <text:p text:style-name="P24">技術門檻較高的案子</text:p>
          </table:table-cell>
        </table:table-row>
        <table:table-row table:style-name="表格94.1">
          <table:table-cell table:style-name="表格94.A2" office:value-type="string">
            <text:p text:style-name="P25">限制性招標</text:p>
          </table:table-cell>
          <table:table-cell table:style-name="表格94.A2" office:value-type="string">
            <text:p text:style-name="P24">直接洽特定廠商議價(不公開競爭)</text:p>
          </table:table-cell>
          <table:table-cell table:style-name="表格94.A2" office:value-type="string">
            <text:p text:style-name="P24">獨家技術或緊急情況</text:p>
          </table:table-cell>
        </table:table-row>
      </table:table>
      <text:h text:style-name="P21" text:outline-level="2">▍25-3　驗收與 UAT（超級熱門考點）</text:h>
      <text:p text:style-name="P10"><text:span text:style-name="T1">UAT（User Acceptance Test，使用者驗收測試）＝ </text:span><text:span text:style-name="T3">由「實際使用者」站在使用立場測試系統是否符合需求</text:span><text:span text:style-name="T1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4">💡 <text:s/>重點</text:p>
            <text:p text:style-name="P46">為什麼 UAT 重要？</text:p>
            <text:p text:style-name="P13">前面的測試多由開發/測試人員做（技術面），UAT 則由『真正要用的人』檢驗『合不合用、符不符合當初需求』。它是業主與廠商交付的最後一道把關，常與『驗收』綁在一起考。</text:p>
          </table:table-cell>
        </table:table-row>
        <table:table-row table:style-name="表格95.1">
          <table:table-cell table:style-name="表格95.A2" office:value-type="string">
            <text:p text:style-name="P15">⭐ <text:s/>核心觀念</text:p>
            <text:p text:style-name="P51"><text:span text:style-name="T26">保固（Warranty）：</text:span><text:span text:style-name="T1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49" text:outline-level="2"><text:soft-page-break/><text:span text:style-name="T25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3">面向</text:p>
            </table:table-cell>
            <table:table-cell table:style-name="表格96.A1" office:value-type="string">
              <text:p text:style-name="P23">PMBOK 五流程</text:p>
            </table:table-cell>
            <table:table-cell table:style-name="表格96.A1" office:value-type="string">
              <text:p text:style-name="P23">委外六階段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>視角</text:p>
          </table:table-cell>
          <table:table-cell table:style-name="表格96.A2" office:value-type="string">
            <text:p text:style-name="P24">專案『內部』如何管理</text:p>
          </table:table-cell>
          <table:table-cell table:style-name="表格96.A2" office:value-type="string">
            <text:p text:style-name="P24">業主對『外部廠商』如何採購監督</text:p>
          </table:table-cell>
        </table:table-row>
        <table:table-row table:style-name="表格96.1">
          <table:table-cell table:style-name="表格96.A3" office:value-type="string">
            <text:p text:style-name="P25">起點</text:p>
          </table:table-cell>
          <table:table-cell table:style-name="表格96.A3" office:value-type="string">
            <text:p text:style-name="P24">起始（立專案）</text:p>
          </table:table-cell>
          <table:table-cell table:style-name="表格96.A3" office:value-type="string">
            <text:p text:style-name="P24">規劃（要不要委外）</text:p>
          </table:table-cell>
        </table:table-row>
        <table:table-row table:style-name="表格96.1">
          <table:table-cell table:style-name="表格96.A2" office:value-type="string">
            <text:p text:style-name="P25">驗收</text:p>
          </table:table-cell>
          <table:table-cell table:style-name="表格96.A2" office:value-type="string">
            <text:p text:style-name="P24">結案</text:p>
          </table:table-cell>
          <table:table-cell table:style-name="表格96.A2" office:value-type="string">
            <text:p text:style-name="P24">驗收（含 UAT）＋ 保固</text:p>
          </table:table-cell>
        </table:table-row>
        <table:table-row table:style-name="表格96.1">
          <table:table-cell table:style-name="表格96.A3" office:value-type="string">
            <text:p text:style-name="P25">重點</text:p>
          </table:table-cell>
          <table:table-cell table:style-name="表格96.A3" office:value-type="string">
            <text:p text:style-name="P24">管理一個專案的生命週期</text:p>
          </table:table-cell>
          <table:table-cell table:style-name="表格96.A3" office:value-type="string">
            <text:p text:style-name="P24">採購一個外包案的完整流程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6">⚠️ <text:s/>考試陷阱</text:p>
            <text:p text:style-name="P47">錯誤觀念：驗收測試由開發人員自己做就好。</text:p>
            <text:p text:style-name="P13">正確：UAT 必須由『使用者』執行，站在使用立場驗證，不是開發者自驗。</text:p>
            <text:p text:style-name="P47">錯誤觀念：系統上線、驗收通過，委外就結束了。</text:p>
            <text:p text:style-name="P13">正確：還有『保固』階段，廠商須在保固期內負責維護與修正瑕疵。</text:p>
          </table:table-cell>
          <table:covered-table-cell/>
          <table:covered-table-cell/>
        </table:table-row>
      </table:table>
      <text:p text:style-name="Standard"/>
      <text:h text:style-name="P9" text:outline-level="1"><text:bookmark-start text:name="bm_c26"/>第 26 章　數位轉型 DX 三階段<text:bookmark-end text:name="bm_c26"/></text:h>
      <text:p text:style-name="P10"><text:span text:style-name="T1">企業數位化會經歷三個層次，由淺到深：</text:span><text:span text:style-name="T3">資訊化 → 數位轉型 → 數位雙生</text:span><text:span text:style-name="T1">。差別在於「數位技術改變的是工具，還是整個商業模式」。</text:span></text:p>
      <text:h text:style-name="P21" text:outline-level="2">▍26-1　三階段比較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23">階段</text:p>
            </table:table-cell>
            <table:table-cell table:style-name="表格97.A1" office:value-type="string">
              <text:p text:style-name="P23">英文</text:p>
            </table:table-cell>
            <table:table-cell table:style-name="表格97.A1" office:value-type="string">
              <text:p text:style-name="P23">核心</text:p>
            </table:table-cell>
            <table:table-cell table:style-name="表格97.A1" office:value-type="string">
              <text:p text:style-name="P23">白話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66">① 資訊化</text:p>
          </table:table-cell>
          <table:table-cell table:style-name="表格97.A2" office:value-type="string">
            <text:p text:style-name="P24">Digitization</text:p>
          </table:table-cell>
          <table:table-cell table:style-name="表格97.A2" office:value-type="string">
            <text:p text:style-name="P24">把紙本/流程電子化</text:p>
          </table:table-cell>
          <table:table-cell table:style-name="表格97.A2" office:value-type="string">
            <text:p text:style-name="P24">紙本表單變成線上表單</text:p>
          </table:table-cell>
        </table:table-row>
        <table:table-row table:style-name="表格97.1">
          <table:table-cell table:style-name="表格97.A3" office:value-type="string">
            <text:p text:style-name="P66">② 數位轉型</text:p>
          </table:table-cell>
          <table:table-cell table:style-name="表格97.A3" office:value-type="string">
            <text:p text:style-name="P24">DX / Transformation</text:p>
          </table:table-cell>
          <table:table-cell table:style-name="表格97.A3" office:value-type="string">
            <text:p text:style-name="P24">用數位改變商業模式</text:p>
          </table:table-cell>
          <table:table-cell table:style-name="表格97.A3" office:value-type="string">
            <text:p text:style-name="P24">從賣光碟變成賣訂閱串流</text:p>
          </table:table-cell>
        </table:table-row>
        <table:table-row table:style-name="表格97.1">
          <table:table-cell table:style-name="表格97.A2" office:value-type="string">
            <text:p text:style-name="P66">③ 數位雙生</text:p>
          </table:table-cell>
          <table:table-cell table:style-name="表格97.A2" office:value-type="string">
            <text:p text:style-name="P24">Digital Twin</text:p>
          </table:table-cell>
          <table:table-cell table:style-name="表格97.A2" office:value-type="string">
            <text:p text:style-name="P24">在虛擬世界建實體的孿生模型</text:p>
          </table:table-cell>
          <table:table-cell table:style-name="表格97.A2" office:value-type="string">
            <text:p text:style-name="P24">虛擬工廠即時模擬真工廠</text:p>
          </table:table-cell>
        </table:table-row>
      </table:table>
      <text:h text:style-name="P11" text:outline-level="3">▍ 資訊化 vs 數位轉型：最常考的差別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23">比較</text:p>
            </table:table-cell>
            <table:table-cell table:style-name="表格98.A1" office:value-type="string">
              <text:p text:style-name="P23">資訊化</text:p>
            </table:table-cell>
            <table:table-cell table:style-name="表格98.A1" office:value-type="string">
              <text:p text:style-name="P23">數位轉型(DX)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25">改變什麼</text:p>
          </table:table-cell>
          <table:table-cell table:style-name="表格98.A2" office:value-type="string">
            <text:p text:style-name="P24">只是把既有流程電子化</text:p>
          </table:table-cell>
          <table:table-cell table:style-name="表格98.A2" office:value-type="string">
            <text:p text:style-name="P24">重新設計商業模式與價值</text:p>
          </table:table-cell>
        </table:table-row>
        <table:table-row table:style-name="表格98.1">
          <table:table-cell table:style-name="表格98.A3" office:value-type="string">
            <text:p text:style-name="P25">深度</text:p>
          </table:table-cell>
          <table:table-cell table:style-name="表格98.A3" office:value-type="string">
            <text:p text:style-name="P24">工具升級（換工具）</text:p>
          </table:table-cell>
          <table:table-cell table:style-name="表格98.A3" office:value-type="string">
            <text:p text:style-name="P24">組織與營運模式革新</text:p>
          </table:table-cell>
        </table:table-row>
        <table:table-row table:style-name="表格98.1">
          <table:table-cell table:style-name="表格98.A2" office:value-type="string">
            <text:p text:style-name="P25">例子</text:p>
          </table:table-cell>
          <table:table-cell table:style-name="表格98.A2" office:value-type="string">
            <text:p text:style-name="P24">把報表從紙本改成 Excel</text:p>
          </table:table-cell>
          <table:table-cell table:style-name="表格98.A2" office:value-type="string">
            <text:p text:style-name="P24">Netflix 從寄 DVD 變線上串流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2">🔑 <text:s/>三階段口訣</text:p>
            <text:p text:style-name="P37">電子化（資訊化）→ 改模式（DX）→ 雙胞胎（Twin）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5">⭐ <text:s/>核心觀念</text:p>
            <text:p text:style-name="P51"><text:span text:style-name="T26">SX 永續轉型（Sustainability Transformation）：</text:span><text:span text:style-name="T1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6">⚠️ <text:s/>考試陷阱</text:p>
            <text:p text:style-name="P47">錯誤觀念：把紙本改成電子檔就是數位轉型。</text:p>
            <text:p text:style-name="P13">正確：那只是『資訊化』。數位轉型必須『改變商業模式與價值創造方式』。</text:p>
            <text:p text:style-name="P47">錯誤觀念：數位雙生就是 3D 模型。</text:p>
            <text:p text:style-name="P13">正確：數位雙生會與實體『即時連動同步』，不只是靜態 3D 模型。</text:p>
          </table:table-cell>
          <table:covered-table-cell/>
          <table:covered-table-cell/>
        </table:table-row>
      </table:table>
      <text:h text:style-name="P62" text:outline-level="1"><text:bookmark-start text:name="bm_c27"/><text:soft-page-break/><text:span text:style-name="T31">第 27 章　企業資訊系統 ERP/CRM/SCM/POS</text:span><text:bookmark-end text:name="bm_c27"/></text:h>
      <text:h text:style-name="P21" text:outline-level="2">▍27-1　四大系統一次記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23">系統</text:p>
            </table:table-cell>
            <table:table-cell table:style-name="表格99.A1" office:value-type="string">
              <text:p text:style-name="P23">全名</text:p>
            </table:table-cell>
            <table:table-cell table:style-name="表格99.A1" office:value-type="string">
              <text:p text:style-name="P23">管什麼</text:p>
            </table:table-cell>
            <table:table-cell table:style-name="表格99.A1" office:value-type="string">
              <text:p text:style-name="P23">一句話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4">ERP</text:p>
          </table:table-cell>
          <table:table-cell table:style-name="表格99.A2" office:value-type="string">
            <text:p text:style-name="P24">企業資源規劃</text:p>
          </table:table-cell>
          <table:table-cell table:style-name="表格99.A2" office:value-type="string">
            <text:p text:style-name="P24">整合公司內部資源(財/人/物/產)</text:p>
          </table:table-cell>
          <table:table-cell table:style-name="表格99.A2" office:value-type="string">
            <text:p text:style-name="P24">管『整間公司』的中樞</text:p>
          </table:table-cell>
        </table:table-row>
        <table:table-row table:style-name="表格99.1">
          <table:table-cell table:style-name="表格99.A3" office:value-type="string">
            <text:p text:style-name="P44">CRM</text:p>
          </table:table-cell>
          <table:table-cell table:style-name="表格99.A3" office:value-type="string">
            <text:p text:style-name="P24">客戶關係管理</text:p>
          </table:table-cell>
          <table:table-cell table:style-name="表格99.A3" office:value-type="string">
            <text:p text:style-name="P24">管理客戶資料與互動</text:p>
          </table:table-cell>
          <table:table-cell table:style-name="表格99.A3" office:value-type="string">
            <text:p text:style-name="P24">管『客戶』、提升回購</text:p>
          </table:table-cell>
        </table:table-row>
        <table:table-row table:style-name="表格99.1">
          <table:table-cell table:style-name="表格99.A2" office:value-type="string">
            <text:p text:style-name="P44">SCM</text:p>
          </table:table-cell>
          <table:table-cell table:style-name="表格99.A2" office:value-type="string">
            <text:p text:style-name="P24">供應鏈管理</text:p>
          </table:table-cell>
          <table:table-cell table:style-name="表格99.A2" office:value-type="string">
            <text:p text:style-name="P24">管理上下游採購到物流</text:p>
          </table:table-cell>
          <table:table-cell table:style-name="表格99.A2" office:value-type="string">
            <text:p text:style-name="P24">管『物流供應鏈』</text:p>
          </table:table-cell>
        </table:table-row>
        <table:table-row table:style-name="表格99.1">
          <table:table-cell table:style-name="表格99.A3" office:value-type="string">
            <text:p text:style-name="P44">POS</text:p>
          </table:table-cell>
          <table:table-cell table:style-name="表格99.A3" office:value-type="string">
            <text:p text:style-name="P24">銷售時點系統</text:p>
          </table:table-cell>
          <table:table-cell table:style-name="表格99.A3" office:value-type="string">
            <text:p text:style-name="P24">結帳收銀、即時銷售紀錄</text:p>
          </table:table-cell>
          <table:table-cell table:style-name="表格99.A3" office:value-type="string">
            <text:p text:style-name="P24">管『收銀與銷售資料』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2">🔑 <text:s/>四系統口訣</text:p>
            <text:p text:style-name="P37">ERP 管公司、CRM 管客戶、SCM 管物流、POS 管收銀</text:p>
          </table:table-cell>
          <table:covered-table-cell/>
          <table:covered-table-cell/>
          <table:covered-table-cell/>
        </table:table-row>
      </table:table>
      <text:h text:style-name="P21" text:outline-level="2">▍27-2　通路與行銷概念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23">概念</text:p>
            </table:table-cell>
            <table:table-cell table:style-name="表格100.A1" office:value-type="string">
              <text:p text:style-name="P23">英文</text:p>
            </table:table-cell>
            <table:table-cell table:style-name="表格100.A1" office:value-type="string">
              <text:p text:style-name="P23">意思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25">全通路</text:p>
          </table:table-cell>
          <table:table-cell table:style-name="表格100.A2" office:value-type="string">
            <text:p text:style-name="P24">Omnichannel</text:p>
          </table:table-cell>
          <table:table-cell table:style-name="表格100.A2" office:value-type="string">
            <text:p text:style-name="P24">線上線下整合，顧客體驗無縫接軌</text:p>
          </table:table-cell>
        </table:table-row>
        <table:table-row table:style-name="表格100.1">
          <table:table-cell table:style-name="表格100.A3" office:value-type="string">
            <text:p text:style-name="P25">虛實整合</text:p>
          </table:table-cell>
          <table:table-cell table:style-name="表格100.A3" office:value-type="string">
            <text:p text:style-name="P24">O2O (Online to Offline)</text:p>
          </table:table-cell>
          <table:table-cell table:style-name="表格100.A3" office:value-type="string">
            <text:p text:style-name="P24">線上吸引、導引到線下消費(或反向)</text:p>
          </table:table-cell>
        </table:table-row>
        <table:table-row table:style-name="表格100.1">
          <table:table-cell table:style-name="表格100.A2" office:value-type="string">
            <text:p text:style-name="P25">數據驅動決策</text:p>
          </table:table-cell>
          <table:table-cell table:style-name="表格100.A2" office:value-type="string">
            <text:p text:style-name="P24">Data-Driven</text:p>
          </table:table-cell>
          <table:table-cell table:style-name="表格100.A2" office:value-type="string">
            <text:p text:style-name="P24">用數據分析做決策，而非靠直覺經驗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4">💡 <text:s/>重點</text:p>
            <text:p text:style-name="P46">全通路 vs 多通路：</text:p>
            <text:p text:style-name="P13">多通路（Multichannel）只是『有很多管道』各自為政；全通路（Omnichannel）是『所有管道資料打通、體驗一致』——線上看好、門市試穿、App 結帳、超商取貨，全程無縫。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6">⚠️ <text:s/>考試陷阱</text:p>
            <text:p text:style-name="P47">錯誤觀念：POS 就是 ERP。</text:p>
            <text:p text:style-name="P13">正確：POS 只負責『結帳與銷售紀錄』；ERP 整合整間公司資源，範圍大得多。</text:p>
            <text:p text:style-name="P47">錯誤觀念：ERP 是用來管理客戶關係的。</text:p>
            <text:p text:style-name="P13">正確：管客戶關係是 CRM；ERP 管的是公司『內部資源整合』。</text:p>
            <text:p text:style-name="P47">錯誤觀念：全通路就是『有開網路商店』。</text:p>
            <text:p text:style-name="P13">正確：全通路強調『線上線下資料與體驗整合一致』，不只是多開一個賣場。</text:p>
            <text:p text:style-name="P47">錯誤觀念：數據驅動決策 ＝ 憑經驗直覺判斷。</text:p>
            <text:p text:style-name="P51"><text:soft-page-break/><text:span text:style-name="T1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48" text:outline-level="1"><text:bookmark-start text:name="bm_c28"/>第 28 章　電子商務核心理論<text:bookmark-end text:name="bm_c28"/></text:h>
      <text:h text:style-name="P21" text:outline-level="2">▍28-1　Porter 價值鏈（Value Chain）</text:h>
      <text:p text:style-name="P10"><text:span text:style-name="T1">Porter 把企業活動分成「</text:span><text:span text:style-name="T3">主要活動</text:span><text:span text:style-name="T1">」與「</text:span><text:span text:style-name="T3">支援活動</text:span><text:span text:style-name="T1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23">類別</text:p>
            </table:table-cell>
            <table:table-cell table:style-name="表格101.A1" office:value-type="string">
              <text:p text:style-name="P23">活動</text:p>
            </table:table-cell>
            <table:table-cell table:style-name="表格101.A1" office:value-type="string">
              <text:p text:style-name="P23">內容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68">主要活動</text:p>
          </table:table-cell>
          <table:table-cell table:style-name="表格101.A2" office:value-type="string">
            <text:p text:style-name="P24">進貨後勤</text:p>
          </table:table-cell>
          <table:table-cell table:style-name="表格101.A2" office:value-type="string">
            <text:p text:style-name="P24">原料進貨、倉儲</text:p>
          </table:table-cell>
        </table:table-row>
        <table:table-row table:style-name="表格101.1">
          <table:table-cell table:style-name="表格101.A3" office:value-type="string">
            <text:p text:style-name="P68">主要活動</text:p>
          </table:table-cell>
          <table:table-cell table:style-name="表格101.A3" office:value-type="string">
            <text:p text:style-name="P24">生產營運</text:p>
          </table:table-cell>
          <table:table-cell table:style-name="表格101.A3" office:value-type="string">
            <text:p text:style-name="P24">製造、加工</text:p>
          </table:table-cell>
        </table:table-row>
        <table:table-row table:style-name="表格101.1">
          <table:table-cell table:style-name="表格101.A2" office:value-type="string">
            <text:p text:style-name="P68">主要活動</text:p>
          </table:table-cell>
          <table:table-cell table:style-name="表格101.A2" office:value-type="string">
            <text:p text:style-name="P24">出貨後勤</text:p>
          </table:table-cell>
          <table:table-cell table:style-name="表格101.A2" office:value-type="string">
            <text:p text:style-name="P24">成品配送出貨</text:p>
          </table:table-cell>
        </table:table-row>
        <table:table-row table:style-name="表格101.1">
          <table:table-cell table:style-name="表格101.A3" office:value-type="string">
            <text:p text:style-name="P68">主要活動</text:p>
          </table:table-cell>
          <table:table-cell table:style-name="表格101.A3" office:value-type="string">
            <text:p text:style-name="P24">行銷銷售</text:p>
          </table:table-cell>
          <table:table-cell table:style-name="表格101.A3" office:value-type="string">
            <text:p text:style-name="P24">廣告、銷售</text:p>
          </table:table-cell>
        </table:table-row>
        <table:table-row table:style-name="表格101.1">
          <table:table-cell table:style-name="表格101.A2" office:value-type="string">
            <text:p text:style-name="P68">主要活動</text:p>
          </table:table-cell>
          <table:table-cell table:style-name="表格101.A2" office:value-type="string">
            <text:p text:style-name="P24">服務</text:p>
          </table:table-cell>
          <table:table-cell table:style-name="表格101.A2" office:value-type="string">
            <text:p text:style-name="P24">售後服務</text:p>
          </table:table-cell>
        </table:table-row>
        <table:table-row table:style-name="表格101.1">
          <table:table-cell table:style-name="表格101.A3" office:value-type="string">
            <text:p text:style-name="P44">支援活動</text:p>
          </table:table-cell>
          <table:table-cell table:style-name="表格101.A3" office:value-type="string">
            <text:p text:style-name="P24">基礎建設</text:p>
          </table:table-cell>
          <table:table-cell table:style-name="表格101.A3" office:value-type="string">
            <text:p text:style-name="P24">管理、財務、法務</text:p>
          </table:table-cell>
        </table:table-row>
        <table:table-row table:style-name="表格101.1">
          <table:table-cell table:style-name="表格101.A2" office:value-type="string">
            <text:p text:style-name="P44">支援活動</text:p>
          </table:table-cell>
          <table:table-cell table:style-name="表格101.A2" office:value-type="string">
            <text:p text:style-name="P24">人力資源</text:p>
          </table:table-cell>
          <table:table-cell table:style-name="表格101.A2" office:value-type="string">
            <text:p text:style-name="P24">招募、訓練</text:p>
          </table:table-cell>
        </table:table-row>
        <table:table-row table:style-name="表格101.1">
          <table:table-cell table:style-name="表格101.A3" office:value-type="string">
            <text:p text:style-name="P44">支援活動</text:p>
          </table:table-cell>
          <table:table-cell table:style-name="表格101.A3" office:value-type="string">
            <text:p text:style-name="P24">技術發展</text:p>
          </table:table-cell>
          <table:table-cell table:style-name="表格101.A3" office:value-type="string">
            <text:p text:style-name="P24">研發、IT 系統</text:p>
          </table:table-cell>
        </table:table-row>
        <table:table-row table:style-name="表格101.1">
          <table:table-cell table:style-name="表格101.A2" office:value-type="string">
            <text:p text:style-name="P44">支援活動</text:p>
          </table:table-cell>
          <table:table-cell table:style-name="表格101.A2" office:value-type="string">
            <text:p text:style-name="P24">採購</text:p>
          </table:table-cell>
          <table:table-cell table:style-name="表格101.A2" office:value-type="string">
            <text:p text:style-name="P24">採買資源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2">🔑 <text:s/>價值鏈口訣</text:p>
            <text:p text:style-name="P69">主要：進 · 營 · 出 · 銷 · 服</text:p>
            <text:p text:style-name="P70">支援：基 · 人 · 技 · 採</text:p>
            <text:p text:style-name="P65">（進貨・營運・出貨・行銷・服務／基礎建設・人資・技術・採購）</text:p>
          </table:table-cell>
          <table:covered-table-cell/>
          <table:covered-table-cell/>
        </table:table-row>
      </table:table>
      <text:h text:style-name="P21" text:outline-level="2">▍28-2　SIS 策略資訊系統</text:h>
      <text:p text:style-name="P10"><text:span text:style-name="T1">SIS（Strategic Information System）＝ </text:span><text:span text:style-name="T3">用來建立『競爭優勢』的資訊系統</text:span><text:span text:style-name="T1">，不只是提升效率，而是改變競爭地位。例如航空公司的訂位系統、便利商店的物流系統，讓對手難以追上。</text:span></text:p>
      <text:h text:style-name="P21" text:outline-level="2">▍28-3　TCT 交易成本理論</text:h>
      <text:p text:style-name="P10"><text:span text:style-name="T1">交易成本（Transaction Cost）＝ </text:span><text:span text:style-name="T3">完成一筆交易過程中花的各種隱形成本</text:span><text:span text:style-name="T1">。電子商務的價值，就在於用網</text:span><text:soft-page-break/><text:span text:style-name="T1">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3">成本類型</text:p>
            </table:table-cell>
            <table:table-cell table:style-name="表格102.A1" office:value-type="string">
              <text:p text:style-name="P23">意思</text:p>
            </table:table-cell>
            <table:table-cell table:style-name="表格102.A1" office:value-type="string">
              <text:p text:style-name="P23">電商如何降低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4">搜尋成本</text:p>
          </table:table-cell>
          <table:table-cell table:style-name="表格102.A2" office:value-type="string">
            <text:p text:style-name="P24">找商品/找賣家花的力氣</text:p>
          </table:table-cell>
          <table:table-cell table:style-name="表格102.A2" office:value-type="string">
            <text:p text:style-name="P24">搜尋引擎、比價網一鍵找到</text:p>
          </table:table-cell>
        </table:table-row>
        <table:table-row table:style-name="表格102.1">
          <table:table-cell table:style-name="表格102.A3" office:value-type="string">
            <text:p text:style-name="P24">比價成本</text:p>
          </table:table-cell>
          <table:table-cell table:style-name="表格102.A3" office:value-type="string">
            <text:p text:style-name="P24">比較價格的時間</text:p>
          </table:table-cell>
          <table:table-cell table:style-name="表格102.A3" office:value-type="string">
            <text:p text:style-name="P24">平台自動列出各家價格</text:p>
          </table:table-cell>
        </table:table-row>
        <table:table-row table:style-name="表格102.1">
          <table:table-cell table:style-name="表格102.A2" office:value-type="string">
            <text:p text:style-name="P24">信任成本</text:p>
          </table:table-cell>
          <table:table-cell table:style-name="表格102.A2" office:value-type="string">
            <text:p text:style-name="P24">擔心被騙的風險</text:p>
          </table:table-cell>
          <table:table-cell table:style-name="表格102.A2" office:value-type="string">
            <text:p text:style-name="P24">評價機制、第三方支付擔保</text:p>
          </table:table-cell>
        </table:table-row>
        <table:table-row table:style-name="表格102.1">
          <table:table-cell table:style-name="表格102.A3" office:value-type="string">
            <text:p text:style-name="P24">協調成本</text:p>
          </table:table-cell>
          <table:table-cell table:style-name="表格102.A3" office:value-type="string">
            <text:p text:style-name="P24">溝通下單的往返</text:p>
          </table:table-cell>
          <table:table-cell table:style-name="表格102.A3" office:value-type="string">
            <text:p text:style-name="P24">線上自動下單、即時客服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2">🔑 <text:s/>交易成本口訣</text:p>
            <text:p text:style-name="P22">搜 · 比 · 信 · 協</text:p>
            <text:p text:style-name="P65">（搜尋・比價・信任・協調成本）——電商核心價值就是降低它們。</text:p>
          </table:table-cell>
          <table:covered-table-cell/>
          <table:covered-table-cell/>
        </table:table-row>
      </table:table>
      <text:h text:style-name="P21" text:outline-level="2">▍28-4　網路效應與新商業模式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5">⭐ <text:s/>核心觀念</text:p>
            <text:p text:style-name="P51"><text:span text:style-name="T26">網路效應（Network Effect）：</text:span><text:span text:style-name="T1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23">模式</text:p>
          </table:table-cell>
          <table:table-cell table:style-name="表格103.A2" office:value-type="string">
            <text:p text:style-name="P23">意思</text:p>
          </table:table-cell>
          <table:table-cell table:style-name="表格103.A2" office:value-type="string">
            <text:p text:style-name="P23">例子</text:p>
          </table:table-cell>
        </table:table-row>
        <table:table-row table:style-name="表格103.1">
          <table:table-cell table:style-name="表格103.A3" office:value-type="string">
            <text:p text:style-name="P25">C2B</text:p>
          </table:table-cell>
          <table:table-cell table:style-name="表格103.A3" office:value-type="string">
            <text:p text:style-name="P24">消費者主導、企業配合</text:p>
          </table:table-cell>
          <table:table-cell table:style-name="表格103.A3" office:value-type="string">
            <text:p text:style-name="P24">團購、群眾募資、客製化下單</text:p>
          </table:table-cell>
        </table:table-row>
        <table:table-row table:style-name="表格103.1">
          <table:table-cell table:style-name="表格103.A4" office:value-type="string">
            <text:p text:style-name="P25">反向拍賣</text:p>
          </table:table-cell>
          <table:table-cell table:style-name="表格103.A4" office:value-type="string">
            <text:p text:style-name="P24">買家出條件，賣家來競標</text:p>
          </table:table-cell>
          <table:table-cell table:style-name="表格103.A4" office:value-type="string">
            <text:p text:style-name="P24">旅遊網填預算讓旅館來搶單</text:p>
          </table:table-cell>
        </table:table-row>
      </table:table>
      <text:p text:style-name="P10"><text:span text:style-name="T26">KSF 關鍵成功因素（Key Success Factor）：</text:span><text:span text:style-name="T1"> 一個產業要成功『非做好不可』的少數關鍵要素。電商的 KSF 常包括：物流速度、金流安全、平台流量與信任機制。</text:span></text:p>
      <text:h text:style-name="P21" text:outline-level="2">▍28-5　蝦皮一例貫通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4">💡 <text:s/>重點</text:p>
            <text:p text:style-name="P46">用蝦皮把本章串起來：</text:p>
            <text:p text:style-name="P13">• 網路效應：買家多 → 吸引賣家 → 商品多 → 又吸引更多買家。</text:p>
            <text:p text:style-name="P13">• 降低交易成本：搜尋、比價、評價(信任)、線上下單(協調)全包。</text:p>
            <text:p text:style-name="P13">• 全通路 / O2O：線上下單、超商取貨，虛實整合。</text:p>
            <text:p text:style-name="P13">• 數據驅動：用購買數據推薦商品、精準行銷。</text:p>
          </table:table-cell>
        </table:table-row>
        <table:table-row table:style-name="表格104.1">
          <table:table-cell table:style-name="表格104.A2" office:value-type="string">
            <text:p text:style-name="P16">⚠️ <text:s/>考試陷阱</text:p>
            <text:p text:style-name="P47"><text:soft-page-break/>錯誤觀念：價值鏈的『採購』屬於主要活動。</text:p>
            <text:p text:style-name="P13">正確：採購屬於『支援活動』。主要活動是進貨→營運→出貨→行銷→服務。</text:p>
            <text:p text:style-name="P47">錯誤觀念：SIS 只是提升內部作業效率的系統。</text:p>
            <text:p text:style-name="P13">正確：SIS 著重『建立競爭優勢、改變競爭地位』，層次高於單純效率。</text:p>
            <text:p text:style-name="P47">錯誤觀念：反向拍賣是賣家喊價、買家競標。</text:p>
            <text:p text:style-name="P13">正確：反向拍賣是『買家出條件、賣家來競標搶單』，方向與一般拍賣相反。</text:p>
          </table:table-cell>
        </table:table-row>
      </table:table>
      <text:p text:style-name="Standard"/>
      <text:h text:style-name="P9" text:outline-level="1"><text:bookmark-start text:name="bm_c29"/>第 29 章　政府數位化與數位治理<text:bookmark-end text:name="bm_c29"/></text:h>
      <text:p text:style-name="P10"><text:span text:style-name="T1">政府數位化 ＝ </text:span><text:span text:style-name="T3">運用數位科技改善政府治理與為民服務</text:span><text:span text:style-name="T1">。核心精神是「以資料輔助決策、開放透明、便民」。</text:span></text:p>
      <text:h text:style-name="P21" text:outline-level="2">▍29-1　四大核心概念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23">概念</text:p>
            </table:table-cell>
            <table:table-cell table:style-name="表格105.A1" office:value-type="string">
              <text:p text:style-name="P23">英文</text:p>
            </table:table-cell>
            <table:table-cell table:style-name="表格105.A1" office:value-type="string">
              <text:p text:style-name="P23">意思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44">循證決策</text:p>
          </table:table-cell>
          <table:table-cell table:style-name="表格105.A2" office:value-type="string">
            <text:p text:style-name="P24">Evidence-based</text:p>
          </table:table-cell>
          <table:table-cell table:style-name="表格105.A2" office:value-type="string">
            <text:p text:style-name="P24">用『資料證據』做政策決定，不憑感覺</text:p>
          </table:table-cell>
        </table:table-row>
        <table:table-row table:style-name="表格105.1">
          <table:table-cell table:style-name="表格105.A3" office:value-type="string">
            <text:p text:style-name="P44">數位治理</text:p>
          </table:table-cell>
          <table:table-cell table:style-name="表格105.A3" office:value-type="string">
            <text:p text:style-name="P24">Digital Governance</text:p>
          </table:table-cell>
          <table:table-cell table:style-name="表格105.A3" office:value-type="string">
            <text:p text:style-name="P24">用數位工具提升治理效率與透明</text:p>
          </table:table-cell>
        </table:table-row>
        <table:table-row table:style-name="表格105.1">
          <table:table-cell table:style-name="表格105.A2" office:value-type="string">
            <text:p text:style-name="P44">開放資料</text:p>
          </table:table-cell>
          <table:table-cell table:style-name="表格105.A2" office:value-type="string">
            <text:p text:style-name="P24">Open Data</text:p>
          </table:table-cell>
          <table:table-cell table:style-name="表格105.A2" office:value-type="string">
            <text:p text:style-name="P24">政府主動公開資料供大眾自由運用</text:p>
          </table:table-cell>
        </table:table-row>
        <table:table-row table:style-name="表格105.1">
          <table:table-cell table:style-name="表格105.A3" office:value-type="string">
            <text:p text:style-name="P44">個人資料自主</text:p>
          </table:table-cell>
          <table:table-cell table:style-name="表格105.A3" office:value-type="string">
            <text:p text:style-name="P24">My Data</text:p>
          </table:table-cell>
          <table:table-cell table:style-name="表格105.A3" office:value-type="string">
            <text:p text:style-name="P24">人民可自主下載/授權使用自己的資料</text:p>
          </table:table-cell>
        </table:table-row>
      </table:table>
      <text:h text:style-name="P11" text:outline-level="3">▍ Open Data vs My Data：最常考的對比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23">比較</text:p>
            </table:table-cell>
            <table:table-cell table:style-name="表格106.A1" office:value-type="string">
              <text:p text:style-name="P23">Open Data 開放資料</text:p>
            </table:table-cell>
            <table:table-cell table:style-name="表格106.A1" office:value-type="string">
              <text:p text:style-name="P23">My Data 個人資料自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>是誰的資料</text:p>
          </table:table-cell>
          <table:table-cell table:style-name="表格106.A2" office:value-type="string">
            <text:p text:style-name="P24">政府的公共/非個資資料</text:p>
          </table:table-cell>
          <table:table-cell table:style-name="表格106.A2" office:value-type="string">
            <text:p text:style-name="P24">屬於『個人』的資料</text:p>
          </table:table-cell>
        </table:table-row>
        <table:table-row table:style-name="表格106.1">
          <table:table-cell table:style-name="表格106.A3" office:value-type="string">
            <text:p text:style-name="P25">目的</text:p>
          </table:table-cell>
          <table:table-cell table:style-name="表格106.A3" office:value-type="string">
            <text:p text:style-name="P24">公開透明、供大眾運用</text:p>
          </table:table-cell>
          <table:table-cell table:style-name="表格106.A3" office:value-type="string">
            <text:p text:style-name="P24">讓本人掌控、可授權第三方使用</text:p>
          </table:table-cell>
        </table:table-row>
        <table:table-row table:style-name="表格106.1">
          <table:table-cell table:style-name="表格106.A2" office:value-type="string">
            <text:p text:style-name="P25">例子</text:p>
          </table:table-cell>
          <table:table-cell table:style-name="表格106.A2" office:value-type="string">
            <text:p text:style-name="P24">公開預算、空品、交通即時資料</text:p>
          </table:table-cell>
          <table:table-cell table:style-name="表格106.A2" office:value-type="string">
            <text:p text:style-name="P24">下載自己的健保/報稅資料去用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2">🔑 <text:s/>政府數位化流程口訣</text:p>
            <text:p text:style-name="P22">蒐 · 科 · 跨 · 公 · 民</text:p>
            <text:p text:style-name="P65">（蒐集資料・科技輔助・跨機關整合・公開透明・便民服務）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6">⚠️ <text:s/>考試陷阱</text:p>
            <text:p text:style-name="P47">錯誤觀念：Open Data 就是公開所有人民的個人資料。</text:p>
            <text:p text:style-name="P13">正確：Open Data 公開的是『非個資的公共資料』；個人資料的自主權屬於 My Data，且受個資法保護。</text:p>
            <text:p text:style-name="P47">錯誤觀念：循證決策 ＝ 憑經驗與直覺決策。</text:p>
            <text:p text:style-name="P13">正確：循證決策強調『以資料證據為依據』，與憑直覺相反。</text:p>
          </table:table-cell>
          <table:covered-table-cell/>
          <table:covered-table-cell/>
        </table:table-row>
      </table:table>
      <text:h text:style-name="P62" text:outline-level="1"><text:bookmark-start text:name="bm_c30"/><text:soft-page-break/><text:span text:style-name="T31">第 30 章　KSF 與統計檢定方法</text:span><text:bookmark-end text:name="bm_c30"/></text:h>
      <text:h text:style-name="P21" text:outline-level="2">▍30-1　KSF 關鍵成功因素五步驟</text:h>
      <text:p text:style-name="P10"><text:span text:style-name="T1">KSF（Key Success Factor）分析 ＝ </text:span><text:span text:style-name="T3">找出一件事『成功的少數關鍵因素』並聚焦</text:span><text:span text:style-name="T1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23">步驟</text:p>
            </table:table-cell>
            <table:table-cell table:style-name="表格107.A1" office:value-type="string">
              <text:p text:style-name="P23">做什麼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>① 定目標</text:p>
          </table:table-cell>
          <table:table-cell table:style-name="表格107.A2" office:value-type="string">
            <text:p text:style-name="P24">先確定要成功的目標是什麼</text:p>
          </table:table-cell>
        </table:table-row>
        <table:table-row table:style-name="表格107.1">
          <table:table-cell table:style-name="表格107.A3" office:value-type="string">
            <text:p text:style-name="P25">② 找因素</text:p>
          </table:table-cell>
          <table:table-cell table:style-name="表格107.A3" office:value-type="string">
            <text:p text:style-name="P24">列出所有可能影響成功的因素</text:p>
          </table:table-cell>
        </table:table-row>
        <table:table-row table:style-name="表格107.1">
          <table:table-cell table:style-name="表格107.A2" office:value-type="string">
            <text:p text:style-name="P25">③ 篩關鍵</text:p>
          </table:table-cell>
          <table:table-cell table:style-name="表格107.A2" office:value-type="string">
            <text:p text:style-name="P24">篩出真正關鍵、不可或缺的少數</text:p>
          </table:table-cell>
        </table:table-row>
        <table:table-row table:style-name="表格107.1">
          <table:table-cell table:style-name="表格107.A3" office:value-type="string">
            <text:p text:style-name="P25">④ 量指標</text:p>
          </table:table-cell>
          <table:table-cell table:style-name="表格107.A3" office:value-type="string">
            <text:p text:style-name="P24">為關鍵因素訂可衡量的指標(KPI)</text:p>
          </table:table-cell>
        </table:table-row>
        <table:table-row table:style-name="表格107.1">
          <table:table-cell table:style-name="表格107.A2" office:value-type="string">
            <text:p text:style-name="P25">⑤ 做執行</text:p>
          </table:table-cell>
          <table:table-cell table:style-name="表格107.A2" office:value-type="string">
            <text:p text:style-name="P24">集中資源執行並持續追蹤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2">🔑 <text:s/>KSF 五步口訣</text:p>
            <text:p text:style-name="P59">定 · 找 · 篩 · 量 · 做</text:p>
            <text:p text:style-name="P65">（定目標・找因素・篩關鍵・量指標・做執行）</text:p>
          </table:table-cell>
          <table:covered-table-cell/>
        </table:table-row>
      </table:table>
      <text:h text:style-name="P21" text:outline-level="2">▍30-2　三大統計檢定方法</text:h>
      <text:p text:style-name="P10"><text:span text:style-name="T1">考試常問「這個情境該用哪種檢定」。關鍵看：</text:span><text:span text:style-name="T3">樣本大小、母體變異數是否已知、比較幾組</text:span><text:span text:style-name="T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23">檢定</text:p>
            </table:table-cell>
            <table:table-cell table:style-name="表格108.A1" office:value-type="string">
              <text:p text:style-name="P23">什麼時候用</text:p>
            </table:table-cell>
            <table:table-cell table:style-name="表格108.A1" office:value-type="string">
              <text:p text:style-name="P23">比較幾組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66">Z 檢定</text:p>
          </table:table-cell>
          <table:table-cell table:style-name="表格108.A2" office:value-type="string">
            <text:p text:style-name="P24">大樣本(n≥30) 或 母體變異數已知</text:p>
          </table:table-cell>
          <table:table-cell table:style-name="表格108.A2" office:value-type="string">
            <text:p text:style-name="P24">一/兩組</text:p>
          </table:table-cell>
        </table:table-row>
        <table:table-row table:style-name="表格108.1">
          <table:table-cell table:style-name="表格108.A3" office:value-type="string">
            <text:p text:style-name="P66">t 檢定</text:p>
          </table:table-cell>
          <table:table-cell table:style-name="表格108.A3" office:value-type="string">
            <text:p text:style-name="P24">小樣本(n&lt;30) 且 母體變異數未知</text:p>
          </table:table-cell>
          <table:table-cell table:style-name="表格108.A3" office:value-type="string">
            <text:p text:style-name="P24">一/兩組</text:p>
          </table:table-cell>
        </table:table-row>
        <table:table-row table:style-name="表格108.1">
          <table:table-cell table:style-name="表格108.A2" office:value-type="string">
            <text:p text:style-name="P66">ANOVA 變異數分析</text:p>
          </table:table-cell>
          <table:table-cell table:style-name="表格108.A2" office:value-type="string">
            <text:p text:style-name="P24">要比較『三組以上』平均數差異</text:p>
          </table:table-cell>
          <table:table-cell table:style-name="表格108.A2" office:value-type="string">
            <text:p text:style-name="P24">三組以上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2">🔑 <text:s/>統計檢定口訣</text:p>
            <text:p text:style-name="P59">Z 大、t 小、ANOVA 多</text:p>
            <text:p text:style-name="P65">Z＝大樣本(或變異數已知)；t＝小樣本；ANOVA＝三組以上比較。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6">⚠️ <text:s/>考試陷阱</text:p>
            <text:p text:style-name="P47">錯誤觀念：比較三組以上平均數可以用 t 檢定一組組比。</text:p>
            <text:p text:style-name="P13">正確：三組以上應用『ANOVA』，反覆兩兩 t 檢定會放大型一錯誤。</text:p>
            <text:p text:style-name="P47">錯誤觀念：小樣本、母體變異數未知時用 Z 檢定。</text:p>
            <text:p text:style-name="P51"><text:soft-page-break/><text:span text:style-name="T1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48" text:outline-level="1"><text:bookmark-start text:name="bm_c31"/>第 31 章　資訊倫理四大概念<text:bookmark-end text:name="bm_c31"/></text:h>
      <text:p text:style-name="P57">資訊倫理探討「在資訊社會中，誰該為行為負什麼責任」。四個核心概念由『責任歸屬』到『正當程序』：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23">概念</text:p>
            </table:table-cell>
            <table:table-cell table:style-name="表格109.A1" office:value-type="string">
              <text:p text:style-name="P23">英文</text:p>
            </table:table-cell>
            <table:table-cell table:style-name="表格109.A1" office:value-type="string">
              <text:p text:style-name="P23">意思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44">責任</text:p>
          </table:table-cell>
          <table:table-cell table:style-name="表格109.A2" office:value-type="string">
            <text:p text:style-name="P24">Responsibility</text:p>
          </table:table-cell>
          <table:table-cell table:style-name="表格109.A2" office:value-type="string">
            <text:p text:style-name="P24">你該為自己的行為與後果負責</text:p>
          </table:table-cell>
        </table:table-row>
        <table:table-row table:style-name="表格109.1">
          <table:table-cell table:style-name="表格109.A3" office:value-type="string">
            <text:p text:style-name="P44">當責</text:p>
          </table:table-cell>
          <table:table-cell table:style-name="表格109.A3" office:value-type="string">
            <text:p text:style-name="P24">Accountability</text:p>
          </table:table-cell>
          <table:table-cell table:style-name="表格109.A3" office:value-type="string">
            <text:p text:style-name="P24">可追究是『誰』造成的、向誰交代</text:p>
          </table:table-cell>
        </table:table-row>
        <table:table-row table:style-name="表格109.1">
          <table:table-cell table:style-name="表格109.A2" office:value-type="string">
            <text:p text:style-name="P44">賠償責任</text:p>
          </table:table-cell>
          <table:table-cell table:style-name="表格109.A2" office:value-type="string">
            <text:p text:style-name="P24">Liability</text:p>
          </table:table-cell>
          <table:table-cell table:style-name="表格109.A2" office:value-type="string">
            <text:p text:style-name="P24">造成損害時，法律上要負的賠償</text:p>
          </table:table-cell>
        </table:table-row>
        <table:table-row table:style-name="表格109.1">
          <table:table-cell table:style-name="表格109.A3" office:value-type="string">
            <text:p text:style-name="P44">正當程序</text:p>
          </table:table-cell>
          <table:table-cell table:style-name="表格109.A3" office:value-type="string">
            <text:p text:style-name="P24">Due Process</text:p>
          </table:table-cell>
          <table:table-cell table:style-name="表格109.A3" office:value-type="string">
            <text:p text:style-name="P24">追究責任須依『公平合法的程序』進行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2">🔑 <text:s/>資訊倫理口訣</text:p>
            <text:p text:style-name="P22">做 · 查 · 罰 · 程序</text:p>
            <text:p text:style-name="P65">做(Responsibility 為行為負責)→查(Accountability 追是誰)→罰(Liability 賠償)→程序(Due Process 依正當程序)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4">💡 <text:s/>重點</text:p>
            <text:p text:style-name="P46">Responsibility vs Accountability 怎麼分？</text:p>
            <text:p text:style-name="P13">Responsibility 偏『事前的份內責任』（這是我該做的）；Accountability 偏『事後可被追究、要交代』（出事要找得到負責的人）。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6">⚠️ <text:s/>考試陷阱</text:p>
            <text:p text:style-name="P47">錯誤觀念：有了責任歸屬就能直接處罰，不必管程序。</text:p>
            <text:p text:style-name="P13">正確：必須符合『正當程序（Due Process）』——公平、合法、給當事人答辯機會，才能追究。</text:p>
          </table:table-cell>
          <table:covered-table-cell/>
          <table:covered-table-cell/>
        </table:table-row>
      </table:table>
      <text:h text:style-name="P48" text:outline-level="1"><text:bookmark-start text:name="bm_c32"/>第 32 章　假訊息與數位素養<text:bookmark-end text:name="bm_c32"/></text:h>
      <text:p text:style-name="P57">數位素養的重點之一，是分辨「假訊息」的種類。關鍵差別在『內容真假』與『有沒有惡意』。</text:p>
      <text:h text:style-name="P49" text:outline-level="2"><text:soft-page-break/><text:span text:style-name="T25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23">類型</text:p>
            </table:table-cell>
            <table:table-cell table:style-name="表格110.A1" office:value-type="string">
              <text:p text:style-name="P23">英文</text:p>
            </table:table-cell>
            <table:table-cell table:style-name="表格110.A1" office:value-type="string">
              <text:p text:style-name="P23">內容真假</text:p>
            </table:table-cell>
            <table:table-cell table:style-name="表格110.A1" office:value-type="string">
              <text:p text:style-name="P23">有無惡意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28">假新聞</text:p>
          </table:table-cell>
          <table:table-cell table:style-name="表格110.A2" office:value-type="string">
            <text:p text:style-name="P24">Fake News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假裝成新聞、刻意誤導</text:p>
          </table:table-cell>
        </table:table-row>
        <table:table-row table:style-name="表格110.1">
          <table:table-cell table:style-name="表格110.A3" office:value-type="string">
            <text:p text:style-name="P68">錯誤訊息</text:p>
          </table:table-cell>
          <table:table-cell table:style-name="表格110.A3" office:value-type="string">
            <text:p text:style-name="P24">Misinformation</text:p>
          </table:table-cell>
          <table:table-cell table:style-name="表格110.A3" office:value-type="string">
            <text:p text:style-name="P24">假的</text:p>
          </table:table-cell>
          <table:table-cell table:style-name="表格110.A3" office:value-type="string">
            <text:p text:style-name="P24">無惡意，誤信而轉傳</text:p>
          </table:table-cell>
        </table:table-row>
        <table:table-row table:style-name="表格110.1">
          <table:table-cell table:style-name="表格110.A2" office:value-type="string">
            <text:p text:style-name="P71">不實訊息</text:p>
          </table:table-cell>
          <table:table-cell table:style-name="表格110.A2" office:value-type="string">
            <text:p text:style-name="P24">Disinformation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有惡意、有目的地操弄散布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2">🔑 <text:s/>假訊息三類口訣</text:p>
            <text:p text:style-name="P37">假(假新聞)故意　／　錯(Misinfo)無心　／　操(Disinfo)有目的</text:p>
            <text:p text:style-name="P65">差別在『有沒有惡意』：Mis＝無意轉傳、Dis＝蓄意操弄。</text:p>
          </table:table-cell>
          <table:covered-table-cell/>
          <table:covered-table-cell/>
          <table:covered-table-cell/>
        </table:table-row>
      </table:table>
      <text:h text:style-name="P21" text:outline-level="2">▍32-2　假訊息為何傳得快</text:h>
      <text:list text:continue-numbering="true" text:style-name="WWNum2">
        <text:list-item>
          <text:p text:style-name="P50"><text:span text:style-name="T26">確認偏誤（Confirmation Bias）：</text:span><text:span text:style-name="T1">人傾向相信『符合自己既有想法』的訊息，假消息只要迎合立場就容易被相信並轉傳。</text:span></text:p>
        </text:list-item>
        <text:list-item>
          <text:p text:style-name="P50"><text:span text:style-name="T26">情緒煽動：</text:span><text:span text:style-name="T1">引發憤怒/恐懼的內容轉發率最高，理性查證往往慢半拍。</text:span></text:p>
        </text:list-item>
        <text:list-item>
          <text:p text:style-name="P50"><text:span text:style-name="T26">演算法同溫層：</text:span><text:span text:style-name="T1">平台推播相似內容，形成回音室，越看越深信。</text:span></text:p>
        </text:list-item>
      </text:list>
      <text:h text:style-name="P21" text:outline-level="2">▍32-3　匿名 vs 隱私（易混淆）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23">概念</text:p>
            </table:table-cell>
            <table:table-cell table:style-name="表格111.A1" office:value-type="string">
              <text:p text:style-name="P23">英文</text:p>
            </table:table-cell>
            <table:table-cell table:style-name="表格111.A1" office:value-type="string">
              <text:p text:style-name="P23">本質</text:p>
            </table:table-cell>
            <table:table-cell table:style-name="表格111.A1" office:value-type="string">
              <text:p text:style-name="P23">一句話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66">匿名</text:p>
          </table:table-cell>
          <table:table-cell table:style-name="表格111.A2" office:value-type="string">
            <text:p text:style-name="P24">Anonymity</text:p>
          </table:table-cell>
          <table:table-cell table:style-name="表格111.A2" office:value-type="string">
            <text:p text:style-name="P24">隱藏『身分』的手段</text:p>
          </table:table-cell>
          <table:table-cell table:style-name="表格111.A2" office:value-type="string">
            <text:p text:style-name="P24">別人不知道你是誰</text:p>
          </table:table-cell>
        </table:table-row>
        <table:table-row table:style-name="表格111.1">
          <table:table-cell table:style-name="表格111.A3" office:value-type="string">
            <text:p text:style-name="P66">隱私</text:p>
          </table:table-cell>
          <table:table-cell table:style-name="表格111.A3" office:value-type="string">
            <text:p text:style-name="P24">Privacy</text:p>
          </table:table-cell>
          <table:table-cell table:style-name="表格111.A3" office:value-type="string">
            <text:p text:style-name="P24">保護『個人資料』的權利</text:p>
          </table:table-cell>
          <table:table-cell table:style-name="表格111.A3" office:value-type="string">
            <text:p text:style-name="P24">你的資料不被擅自蒐用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2">🔑 <text:s/>匿名 vs 隱私口訣</text:p>
            <text:p text:style-name="P22">匿名藏『人』、隱私藏『資料』</text:p>
            <text:p text:style-name="P65">匿名是一種『手段』，隱私是一種受保護的『權利』。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6">⚠️ <text:s/>考試陷阱</text:p>
            <text:p text:style-name="P47">錯誤觀念：錯誤訊息(Misinformation)是故意造假害人。</text:p>
            <text:p text:style-name="P13">正確：Misinformation 是『無惡意、誤信而轉傳』；蓄意操弄的是 Disinformation。</text:p>
            <text:p text:style-name="P47">錯誤觀念：匿名和隱私是同一件事。</text:p>
            <text:p text:style-name="P13">正確：匿名是『隱藏身分的手段』，隱私是『個資受保護的權利』，兩者不同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traps"/>第八篇　全書考試陷阱總整理<text:bookmark-end text:name="bm_traps"/></text:h>
      <text:p text:style-name="P57">這一篇把全書最容易答錯的「陷阱題」集中起來。考前一天把這篇掃過一遍，等於替自己的觀念做最後一次防呆檢查。每一條都是「❌ 常見錯誤 → ✅ 正確觀念」。</text:p>
      <text:h text:style-name="P21" text:outline-level="2">▍一、網路通訊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23">❌ 常見錯誤觀念</text:p>
            </table:table-cell>
            <table:table-cell table:style-name="表格112.A1" office:value-type="string">
              <text:p text:style-name="P23">✅ 正確觀念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24">5G 只是速度更快</text:p>
          </table:table-cell>
          <table:table-cell table:style-name="表格112.A2" office:value-type="string">
            <text:p text:style-name="P24">三大重點：高速 eMBB、超低延遲 URLLC、大量連線 mMTC，後兩個更常考</text:p>
          </table:table-cell>
        </table:table-row>
        <table:table-row table:style-name="表格112.1">
          <table:table-cell table:style-name="表格112.A3" office:value-type="string">
            <text:p text:style-name="P24">IoT ＝ 手機 App</text:p>
          </table:table-cell>
          <table:table-cell table:style-name="表格112.A3" office:value-type="string">
            <text:p text:style-name="P24">IoT ＝ 感測器＋網路＋自動控制，與 App 無直接關係</text:p>
          </table:table-cell>
        </table:table-row>
        <table:table-row table:style-name="表格112.1">
          <table:table-cell table:style-name="表格112.A2" office:value-type="string">
            <text:p text:style-name="P24">V2X 用 4G 就夠</text:p>
          </table:table-cell>
          <table:table-cell table:style-name="表格112.A2" office:value-type="string">
            <text:p text:style-name="P24">V2X 安全需延遲&lt;10ms，4G 約30–50ms不夠，必須靠 5G</text:p>
          </table:table-cell>
        </table:table-row>
        <table:table-row table:style-name="表格112.1">
          <table:table-cell table:style-name="表格112.A3" office:value-type="string">
            <text:p text:style-name="P24">HTTPS 是全新協定</text:p>
          </table:table-cell>
          <table:table-cell table:style-name="表格112.A3" office:value-type="string">
            <text:p text:style-name="P24">HTTPS ＝ HTTP ＋ SSL/TLS，加了加密層，非新協定</text:p>
          </table:table-cell>
        </table:table-row>
        <table:table-row table:style-name="表格112.1">
          <table:table-cell table:style-name="表格112.A2" office:value-type="string">
            <text:p text:style-name="P24">SSL/TLS 不負責加密</text:p>
          </table:table-cell>
          <table:table-cell table:style-name="表格112.A2" office:value-type="string">
            <text:p text:style-name="P24">SSL/TLS 的核心職責就是『負責加密』</text:p>
          </table:table-cell>
        </table:table-row>
        <table:table-row table:style-name="表格112.1">
          <table:table-cell table:style-name="表格112.A3" office:value-type="string">
            <text:p text:style-name="P24">OSPF 是加密協定</text:p>
          </table:table-cell>
          <table:table-cell table:style-name="表格112.A3" office:value-type="string">
            <text:p text:style-name="P24">OSPF 是路由協定（OSI 第三層），負責找最短路徑，不加密</text:p>
          </table:table-cell>
        </table:table-row>
      </table:table>
      <text:h text:style-name="P21" text:outline-level="2">▍二、資訊安全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23">❌ 常見錯誤觀念</text:p>
            </table:table-cell>
            <table:table-cell table:style-name="表格113.A1" office:value-type="string">
              <text:p text:style-name="P23">✅ 正確觀念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4">NAT 可以防毒/防駭</text:p>
          </table:table-cell>
          <table:table-cell table:style-name="表格113.A2" office:value-type="string">
            <text:p text:style-name="P24">NAT 是轉換/隱藏內部 IP，不是防毒，不等於防火牆</text:p>
          </table:table-cell>
        </table:table-row>
        <table:table-row table:style-name="表格113.1">
          <table:table-cell table:style-name="表格113.A3" office:value-type="string">
            <text:p text:style-name="P24">IDS 會主動阻擋攻擊</text:p>
          </table:table-cell>
          <table:table-cell table:style-name="表格113.A3" office:value-type="string">
            <text:p text:style-name="P24">IDS『只偵測告警、不阻擋』；會阻擋的是 IPS</text:p>
          </table:table-cell>
        </table:table-row>
        <table:table-row table:style-name="表格113.1">
          <table:table-cell table:style-name="表格113.A2" office:value-type="string">
            <text:p text:style-name="P24">RTO 看資料能還原到哪</text:p>
          </table:table-cell>
          <table:table-cell table:style-name="表格113.A2" office:value-type="string">
            <text:p text:style-name="P24">RTO 看『時間(Time)』可容忍多久才復原；RPO 看『資料點(Point)』可容忍掉多少資料</text:p>
          </table:table-cell>
        </table:table-row>
        <table:table-row table:style-name="表格113.1">
          <table:table-cell table:style-name="表格113.A3" office:value-type="string">
            <text:p text:style-name="P24">社交工程是攻擊系統漏洞</text:p>
          </table:table-cell>
          <table:table-cell table:style-name="表格113.A3" office:value-type="string">
            <text:p text:style-name="P24">社交工程攻擊的是『人』的心理弱點，非技術漏洞</text:p>
          </table:table-cell>
        </table:table-row>
        <table:table-row table:style-name="表格113.1">
          <table:table-cell table:style-name="表格113.A2" office:value-type="string">
            <text:p text:style-name="P24">OTP 就是 MFA</text:p>
          </table:table-cell>
          <table:table-cell table:style-name="表格113.A2" office:value-type="string">
            <text:p text:style-name="P24">OTP 只是一個因素；MFA 需兩種以上不同類型因素(如密碼＋OTP)</text:p>
          </table:table-cell>
        </table:table-row>
        <table:table-row table:style-name="表格113.1">
          <table:table-cell table:style-name="表格113.A3" office:value-type="string">
            <text:p text:style-name="P24">最小權限 ＝ 給最少/不給權限</text:p>
          </table:table-cell>
          <table:table-cell table:style-name="表格113.A3" office:value-type="string">
            <text:p text:style-name="P24">最小權限是『給剛好夠用的權限』，不是不給</text:p>
          </table:table-cell>
        </table:table-row>
        <table:table-row table:style-name="表格113.1">
          <table:table-cell table:style-name="表格113.A2" office:value-type="string">
            <text:p text:style-name="P24">員工離職可慢慢停用帳號</text:p>
          </table:table-cell>
          <table:table-cell table:style-name="表格113.A2" office:value-type="string">
            <text:p text:style-name="P24">應『立即停用』，避免帳號被濫用(帳號生命週期重點)</text:p>
          </table:table-cell>
        </table:table-row>
        <table:table-row table:style-name="表格113.1">
          <table:table-cell table:style-name="表格113.A3" office:value-type="string">
            <text:p text:style-name="P24">Port 是實體插孔</text:p>
          </table:table-cell>
          <table:table-cell table:style-name="表格113.A3" office:value-type="string">
            <text:p text:style-name="P24">Port 是邏輯通訊埠號(0–65535)，非實體孔</text:p>
          </table:table-cell>
        </table:table-row>
      </table:table>
      <text:h text:style-name="P49" text:outline-level="2"><text:soft-page-break/><text:span text:style-name="T25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23">❌ 常見錯誤觀念</text:p>
            </table:table-cell>
            <table:table-cell table:style-name="表格114.A1" office:value-type="string">
              <text:p text:style-name="P23">✅ 正確觀念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4">Gmail/ChatGPT 屬於 IaaS</text:p>
          </table:table-cell>
          <table:table-cell table:style-name="表格114.A2" office:value-type="string">
            <text:p text:style-name="P24">開瀏覽器直接用的現成軟體是 SaaS；IaaS 是租虛擬機/硬體</text:p>
          </table:table-cell>
        </table:table-row>
        <table:table-row table:style-name="表格114.1">
          <table:table-cell table:style-name="表格114.A3" office:value-type="string">
            <text:p text:style-name="P24">SaaS 使用者要自己維護伺服器</text:p>
          </table:table-cell>
          <table:table-cell table:style-name="表格114.A3" office:value-type="string">
            <text:p text:style-name="P24">SaaS 連伺服器、更新、備份全由業者負責</text:p>
          </table:table-cell>
        </table:table-row>
        <table:table-row table:style-name="表格114.1">
          <table:table-cell table:style-name="表格114.A2" office:value-type="string">
            <text:p text:style-name="P24">混合雲 ＝ 兩個公有雲</text:p>
          </table:table-cell>
          <table:table-cell table:style-name="表格114.A2" office:value-type="string">
            <text:p text:style-name="P24">混合雲 ＝ 私有雲 ＋ 公有雲；兩個公有雲叫多雲(Multi-cloud)</text:p>
          </table:table-cell>
        </table:table-row>
        <table:table-row table:style-name="表格114.1">
          <table:table-cell table:style-name="表格114.A3" office:value-type="string">
            <text:p text:style-name="P24">雲端 ＝ 把資料放網路上</text:p>
          </table:table-cell>
          <table:table-cell table:style-name="表格114.A3" office:value-type="string">
            <text:p text:style-name="P24">核心是 NIST 五特徵(自廣池彈量)，尤其彈性與計量</text:p>
          </table:table-cell>
        </table:table-row>
      </table:table>
      <text:h text:style-name="P21" text:outline-level="2">▍四、軟體工程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23">❌ 常見錯誤觀念</text:p>
            </table:table-cell>
            <table:table-cell table:style-name="表格115.A1" office:value-type="string">
              <text:p text:style-name="P23">✅ 正確觀念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24">瀑布模型可隨時回上一階段</text:p>
          </table:table-cell>
          <table:table-cell table:style-name="表格115.A2" office:value-type="string">
            <text:p text:style-name="P24">傳統瀑布『單向不回頭』，需求一變成本極高</text:p>
          </table:table-cell>
        </table:table-row>
        <table:table-row table:style-name="表格115.1">
          <table:table-cell table:style-name="表格115.A3" office:value-type="string">
            <text:p text:style-name="P24">漸增模型 ＝ 敏捷</text:p>
          </table:table-cell>
          <table:table-cell table:style-name="表格115.A3" office:value-type="string">
            <text:p text:style-name="P24">漸增只是分批交付；敏捷＝漸增＋迭代＋持續回饋擁抱變動</text:p>
          </table:table-cell>
        </table:table-row>
        <table:table-row table:style-name="表格115.1">
          <table:table-cell table:style-name="表格115.A2" office:value-type="string">
            <text:p text:style-name="P24">黑箱測試要看程式碼</text:p>
          </table:table-cell>
          <table:table-cell table:style-name="表格115.A2" office:value-type="string">
            <text:p text:style-name="P24">黑箱『不看碼』只看輸入輸出；看碼的是白箱</text:p>
          </table:table-cell>
        </table:table-row>
        <table:table-row table:style-name="表格115.1">
          <table:table-cell table:style-name="表格115.A3" office:value-type="string">
            <text:p text:style-name="P24">100% 陳述覆蓋就測試完整</text:p>
          </table:table-cell>
          <table:table-cell table:style-name="表格115.A3" office:value-type="string">
            <text:p text:style-name="P24">陳述覆蓋不保證分支都測到；分支覆蓋更嚴謹</text:p>
          </table:table-cell>
        </table:table-row>
        <table:table-row table:style-name="表格115.1">
          <table:table-cell table:style-name="表格115.A2" office:value-type="string">
            <text:p text:style-name="P24">安全只要在測試階段做</text:p>
          </table:table-cell>
          <table:table-cell table:style-name="表格115.A2" office:value-type="string">
            <text:p text:style-name="P24">SSDLC 每階段(需設開測維)都要做安全，安全左移</text:p>
          </table:table-cell>
        </table:table-row>
        <table:table-row table:style-name="表格115.1">
          <table:table-cell table:style-name="表格115.A3" office:value-type="string">
            <text:p text:style-name="P24">零信任只防外部</text:p>
          </table:table-cell>
          <table:table-cell table:style-name="表格115.A3" office:value-type="string">
            <text:p text:style-name="P24">零信任連『內部使用者與裝置』都不預設信任</text:p>
          </table:table-cell>
        </table:table-row>
        <table:table-row table:style-name="表格115.1">
          <table:table-cell table:style-name="表格115.A2" office:value-type="string">
            <text:p text:style-name="P24">循序圖畫模組組成</text:p>
          </table:table-cell>
          <table:table-cell table:style-name="表格115.A2" office:value-type="string">
            <text:p text:style-name="P24">循序圖畫『訊息時間順序』；畫模組組成是元件圖</text:p>
          </table:table-cell>
        </table:table-row>
        <table:table-row table:style-name="表格115.1">
          <table:table-cell table:style-name="表格115.A3" office:value-type="string">
            <text:p text:style-name="P24">部署圖描述系統功能</text:p>
          </table:table-cell>
          <table:table-cell table:style-name="表格115.A3" office:value-type="string">
            <text:p text:style-name="P24">部署圖描述『軟硬體實體部署位置』；功能是使用案例圖</text:p>
          </table:table-cell>
        </table:table-row>
        <table:table-row table:style-name="表格115.1">
          <table:table-cell table:style-name="表格115.A2" office:value-type="string">
            <text:p text:style-name="P24">活動圖不需判斷分支</text:p>
          </table:table-cell>
          <table:table-cell table:style-name="表格115.A2" office:value-type="string">
            <text:p text:style-name="P24">活動圖遇判斷用『菱形』分岔，是其特徵</text:p>
          </table:table-cell>
        </table:table-row>
        <table:table-row table:style-name="表格115.1">
          <table:table-cell table:style-name="表格115.A3" office:value-type="string">
            <text:p text:style-name="P24">MVP ＝ 粗製濫造半成品</text:p>
          </table:table-cell>
          <table:table-cell table:style-name="表格115.A3" office:value-type="string">
            <text:p text:style-name="P24">MVP 是『最小但可用、能驗證價值』的完整產品</text:p>
          </table:table-cell>
        </table:table-row>
      </table:table>
      <text:h text:style-name="P21" text:outline-level="2">▍五、專案管理與委外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23">❌ 常見錯誤觀念</text:p>
            </table:table-cell>
            <table:table-cell table:style-name="表格116.A1" office:value-type="string">
              <text:p text:style-name="P23">✅ 正確觀念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24">五大流程嚴格照順序、不交錯</text:p>
          </table:table-cell>
          <table:table-cell table:style-name="表格116.A2" office:value-type="string">
            <text:p text:style-name="P24">規劃/執行/監控常反覆交錯；監控與執行『同步進行』</text:p>
          </table:table-cell>
        </table:table-row>
        <table:table-row table:style-name="表格116.1">
          <table:table-cell table:style-name="表格116.A3" office:value-type="string">
            <text:p text:style-name="P24">專案與日常營運一樣</text:p>
          </table:table-cell>
          <table:table-cell table:style-name="表格116.A3" office:value-type="string">
            <text:p text:style-name="P24">專案是臨時性、有起訖、獨特；營運是持續重複</text:p>
          </table:table-cell>
        </table:table-row>
        <table:table-row table:style-name="表格116.1">
          <table:table-cell table:style-name="表格116.A2" office:value-type="string">
            <text:p text:style-name="P24">驗收由開發人員自己做</text:p>
          </table:table-cell>
          <table:table-cell table:style-name="表格116.A2" office:value-type="string">
            <text:p text:style-name="P24">UAT 必須由『使用者』執行，站使用立場驗證</text:p>
          </table:table-cell>
        </table:table-row>
        <table:table-row table:style-name="表格116.1">
          <table:table-cell table:style-name="表格116.A3" office:value-type="string">
            <text:p text:style-name="P24">驗收通過委外就結束</text:p>
          </table:table-cell>
          <table:table-cell table:style-name="表格116.A3" office:value-type="string">
            <text:p text:style-name="P24">還有『保固』階段，廠商須於保固期維護修正</text:p>
          </table:table-cell>
        </table:table-row>
      </table:table>
      <text:h text:style-name="P49" text:outline-level="2"><text:soft-page-break/><text:span text:style-name="T25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23">❌ 常見錯誤觀念</text:p>
            </table:table-cell>
            <table:table-cell table:style-name="表格117.A1" office:value-type="string">
              <text:p text:style-name="P23">✅ 正確觀念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4">紙本改電子檔 ＝ 數位轉型</text:p>
          </table:table-cell>
          <table:table-cell table:style-name="表格117.A2" office:value-type="string">
            <text:p text:style-name="P24">那只是『資訊化』；DX 要改變商業模式與價值</text:p>
          </table:table-cell>
        </table:table-row>
        <table:table-row table:style-name="表格117.1">
          <table:table-cell table:style-name="表格117.A3" office:value-type="string">
            <text:p text:style-name="P24">數位雙生 ＝ 靜態 3D 模型</text:p>
          </table:table-cell>
          <table:table-cell table:style-name="表格117.A3" office:value-type="string">
            <text:p text:style-name="P24">數位雙生會與實體『即時連動同步』</text:p>
          </table:table-cell>
        </table:table-row>
        <table:table-row table:style-name="表格117.1">
          <table:table-cell table:style-name="表格117.A2" office:value-type="string">
            <text:p text:style-name="P24">POS ＝ ERP</text:p>
          </table:table-cell>
          <table:table-cell table:style-name="表格117.A2" office:value-type="string">
            <text:p text:style-name="P24">POS 只管結帳與銷售紀錄；ERP 整合整間公司資源</text:p>
          </table:table-cell>
        </table:table-row>
        <table:table-row table:style-name="表格117.1">
          <table:table-cell table:style-name="表格117.A3" office:value-type="string">
            <text:p text:style-name="P24">ERP 管客戶關係</text:p>
          </table:table-cell>
          <table:table-cell table:style-name="表格117.A3" office:value-type="string">
            <text:p text:style-name="P24">管客戶是 CRM；ERP 管公司內部資源整合</text:p>
          </table:table-cell>
        </table:table-row>
        <table:table-row table:style-name="表格117.1">
          <table:table-cell table:style-name="表格117.A2" office:value-type="string">
            <text:p text:style-name="P24">全通路 ＝ 有開網路商店</text:p>
          </table:table-cell>
          <table:table-cell table:style-name="表格117.A2" office:value-type="string">
            <text:p text:style-name="P24">全通路強調線上線下『資料與體驗整合一致』</text:p>
          </table:table-cell>
        </table:table-row>
        <table:table-row table:style-name="表格117.1">
          <table:table-cell table:style-name="表格117.A3" office:value-type="string">
            <text:p text:style-name="P24">數據驅動 ＝ 憑直覺判斷</text:p>
          </table:table-cell>
          <table:table-cell table:style-name="表格117.A3" office:value-type="string">
            <text:p text:style-name="P24">數據驅動正好相反，用數據分析取代直覺</text:p>
          </table:table-cell>
        </table:table-row>
        <table:table-row table:style-name="表格117.1">
          <table:table-cell table:style-name="表格117.A2" office:value-type="string">
            <text:p text:style-name="P24">價值鏈的採購屬主要活動</text:p>
          </table:table-cell>
          <table:table-cell table:style-name="表格117.A2" office:value-type="string">
            <text:p text:style-name="P24">採購屬『支援活動』；主要是進營出銷服</text:p>
          </table:table-cell>
        </table:table-row>
        <table:table-row table:style-name="表格117.1">
          <table:table-cell table:style-name="表格117.A3" office:value-type="string">
            <text:p text:style-name="P24">SIS 只是提升效率</text:p>
          </table:table-cell>
          <table:table-cell table:style-name="表格117.A3" office:value-type="string">
            <text:p text:style-name="P24">SIS 著重『建立競爭優勢、改變競爭地位』</text:p>
          </table:table-cell>
        </table:table-row>
        <table:table-row table:style-name="表格117.1">
          <table:table-cell table:style-name="表格117.A2" office:value-type="string">
            <text:p text:style-name="P24">反向拍賣是賣家喊價競標</text:p>
          </table:table-cell>
          <table:table-cell table:style-name="表格117.A2" office:value-type="string">
            <text:p text:style-name="P24">反向拍賣是『買家出條件、賣家競標搶單』</text:p>
          </table:table-cell>
        </table:table-row>
      </table:table>
      <text:h text:style-name="P21" text:outline-level="2">▍七、政府數位化、倫理與統計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23">❌ 常見錯誤觀念</text:p>
            </table:table-cell>
            <table:table-cell table:style-name="表格118.A1" office:value-type="string">
              <text:p text:style-name="P23">✅ 正確觀念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24">Open Data 公開所有人個資</text:p>
          </table:table-cell>
          <table:table-cell table:style-name="表格118.A2" office:value-type="string">
            <text:p text:style-name="P24">Open Data 公開『非個資公共資料』；個資自主屬 My Data 並受個資法保護</text:p>
          </table:table-cell>
        </table:table-row>
        <table:table-row table:style-name="表格118.1">
          <table:table-cell table:style-name="表格118.A3" office:value-type="string">
            <text:p text:style-name="P24">循證決策 ＝ 憑經驗直覺</text:p>
          </table:table-cell>
          <table:table-cell table:style-name="表格118.A3" office:value-type="string">
            <text:p text:style-name="P24">循證決策強調『以資料證據為依據』</text:p>
          </table:table-cell>
        </table:table-row>
        <table:table-row table:style-name="表格118.1">
          <table:table-cell table:style-name="表格118.A2" office:value-type="string">
            <text:p text:style-name="P24">三組以上用 t 檢定兩兩比</text:p>
          </table:table-cell>
          <table:table-cell table:style-name="表格118.A2" office:value-type="string">
            <text:p text:style-name="P24">三組以上用 ANOVA；反覆 t 檢定會放大型一錯誤</text:p>
          </table:table-cell>
        </table:table-row>
        <table:table-row table:style-name="表格118.1">
          <table:table-cell table:style-name="表格118.A3" office:value-type="string">
            <text:p text:style-name="P24">小樣本變異數未知用 Z 檢定</text:p>
          </table:table-cell>
          <table:table-cell table:style-name="表格118.A3" office:value-type="string">
            <text:p text:style-name="P24">此情況用 t 檢定；Z 用於大樣本或母體變異數已知</text:p>
          </table:table-cell>
        </table:table-row>
        <table:table-row table:style-name="表格118.1">
          <table:table-cell table:style-name="表格118.A2" office:value-type="string">
            <text:p text:style-name="P24">有責任歸屬就能直接處罰</text:p>
          </table:table-cell>
          <table:table-cell table:style-name="表格118.A2" office:value-type="string">
            <text:p text:style-name="P24">須符合正當程序(Due Process)：公平合法、給答辯機會</text:p>
          </table:table-cell>
        </table:table-row>
        <table:table-row table:style-name="表格118.1">
          <table:table-cell table:style-name="表格118.A3" office:value-type="string">
            <text:p text:style-name="P24">錯誤訊息(Misinfo)是故意害人</text:p>
          </table:table-cell>
          <table:table-cell table:style-name="表格118.A3" office:value-type="string">
            <text:p text:style-name="P24">Misinfo 無惡意、誤信轉傳；蓄意操弄是 Disinfo</text:p>
          </table:table-cell>
        </table:table-row>
        <table:table-row table:style-name="表格118.1">
          <table:table-cell table:style-name="表格118.A2" office:value-type="string">
            <text:p text:style-name="P24">匿名 ＝ 隱私</text:p>
          </table:table-cell>
          <table:table-cell table:style-name="表格118.A2" office:value-type="string">
            <text:p text:style-name="P24">匿名是『隱藏身分的手段』；隱私是『個資受保護的權利』</text:p>
          </table:table-cell>
        </table:table-row>
      </table:table>
      <text:h text:style-name="P21" text:outline-level="2">▍八、給考前的你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5">⭐ <text:s/>核心觀念</text:p>
            <text:p text:style-name="P46">最後叮嚀：</text:p>
            <text:p text:style-name="P13">這份筆記的每個口訣、每張表、每個陷阱，都是為了讓你在考場上『一看就反應得出來』。考前不必再貪多，把前面的速記區(口訣＋必背表)和這篇陷阱總整理反覆看熟，就是最高效的衝刺。</text:p>
            <text:p text:style-name="P51"/>
            <text:p text:style-name="P51"><text:soft-page-break/><text:span text:style-name="T3">你已經把整個資訊類的脈絡都讀通了。穩住、相信自己的準備，祝你金榜題名！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公職資訊類　完全整合終極筆記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meta:editing-cycles>40</meta:editing-cycles>
    <meta:creation-date>2026-06-19T01:41:54.457000000</meta:creation-date>
    <dc:date>2026-06-19T22:37:41.889070800</dc:date>
    <meta:generator>LibreOffice/26.2.3.2$Windows_X86_64 LibreOffice_project/70e089b17412e4cb7773e41413306b17a2328c34</meta:generator>
    <meta:editing-duration>PT11H17M56S</meta:editing-duration>
    <meta:document-statistic meta:table-count="119" meta:image-count="0" meta:object-count="0" meta:page-count="63" meta:paragraph-count="2286" meta:word-count="26239" meta:character-count="34130" meta:non-whitespace-character-count="31718"/>
  </office:meta>
</office:document-meta>
</file>