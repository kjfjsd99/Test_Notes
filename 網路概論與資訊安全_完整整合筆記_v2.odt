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Standard">
      <style:paragraph-properties fo:margin-top="2.822cm" fo:margin-bottom="0cm" style:contextual-spacing="false"/>
    </style:style>
    <style:style style:name="P3" style:family="paragraph" style:parent-style-name="Standard">
      <style:paragraph-properties fo:margin-top="0cm" fo:margin-bottom="0.388cm" style:contextual-spacing="false"/>
    </style:style>
    <style:style style:name="P4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5" style:family="paragraph" style:parent-style-name="Standard">
      <style:paragraph-properties fo:margin-top="0cm" fo:margin-bottom="0.353cm" style:contextual-spacing="false"/>
    </style:style>
    <style:style style:name="P6" style:family="paragraph" style:parent-style-name="Standard">
      <style:paragraph-properties fo:margin-top="0.035cm" fo:margin-bottom="0.106cm" style:contextual-spacing="false" fo:line-height="0.459cm"/>
    </style:style>
    <style:style style:name="P7" style:family="paragraph" style:parent-style-name="Standard">
      <style:paragraph-properties fo:margin-top="0cm" fo:margin-bottom="0.042cm" style:contextual-spacing="false" fo:line-height="0.455cm"/>
    </style:style>
    <style:style style:name="P8" style:family="paragraph" style:parent-style-name="Standard">
      <style:paragraph-properties fo:margin-top="0.042cm" fo:margin-bottom="0.042cm" style:contextual-spacing="false" fo:line-height="0.455cm"/>
    </style:style>
    <style:style style:name="P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2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d740" style:font-weight-asian="bold" style:font-weight-complex="bold"/>
    </style:style>
    <style:style style:name="P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fo:font-weight="bold" fo:background-color="#880e4f" style:font-weight-asian="bold" style:font-weight-complex="bold"/>
    </style:style>
    <style:style style:name="P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fo:font-weight="bold" fo:background-color="#3d5afe" style:font-weight-asian="bold" style:font-weight-complex="bold"/>
    </style:style>
    <style:style style:name="P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5d4037" style:font-weight-asian="bold" style:font-weight-complex="bold"/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22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23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26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27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2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30" style:family="paragraph" style:parent-style-name="Standard">
      <style:paragraph-properties fo:margin-top="0.042cm" fo:margin-bottom="0.042cm" style:contextual-spacing="false" fo:line-height="0.455cm"/>
    </style:style>
    <style:style style:name="P31" style:family="paragraph" style:parent-style-name="Standard">
      <style:paragraph-properties fo:margin-top="0cm" fo:margin-bottom="0.042cm" style:contextual-spacing="false" fo:line-height="0.455cm"/>
    </style:style>
    <style:style style:name="P32" style:family="paragraph" style:parent-style-name="Standard">
      <style:paragraph-properties fo:margin-top="0cm" fo:margin-bottom="0.212cm" style:contextual-spacing="false" fo:break-before="page"/>
    </style:style>
    <style:style style:name="P3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4" style:family="paragraph" style:parent-style-name="Standard">
      <style:paragraph-properties fo:margin-top="0.035cm" fo:margin-bottom="0.106cm" style:contextual-spacing="false" fo:line-height="0.459cm"/>
    </style:style>
    <style:style style:name="P35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P36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17bb8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4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5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38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48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49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5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51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8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59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0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6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66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7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70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71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2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3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4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5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6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7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9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0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1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2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3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4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5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6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7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8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9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0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2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4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6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7" style:family="text">
      <style:text-properties fo:color="#2b2b2b" loext:opacity="100%" style:font-name="Microsoft JhengHei" fo:font-size="10.5pt" fo:font-style="normal" fo:font-weight="normal" fo:background-color="#01579b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8" style:family="text">
      <style:text-properties fo:color="#2b2b2b" loext:opacity="100%" style:font-name="Microsoft JhengHei" fo:font-size="10.5pt" fo:font-style="normal" fo:font-weight="normal" fo:background-color="#01579b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9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0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1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2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3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0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2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23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4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5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2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27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28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29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0" style:family="text">
      <style:text-properties fo:color="#2b2b2b" loext:opacity="100%" style:font-name="Microsoft JhengHei" fo:font-size="9pt" fo:font-style="normal" fo:font-weight="normal" fo:background-color="#b71c1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1" style:family="text">
      <style:text-properties fo:color="#2b2b2b" loext:opacity="100%" style:font-name="Microsoft JhengHei" fo:font-size="9pt" fo:font-style="normal" fo:font-weight="normal" fo:background-color="#b71c1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2" style:family="text">
      <style:text-properties fo:color="#2b2b2b" loext:opacity="100%" style:font-name="Microsoft JhengHei" fo:font-size="9pt" fo:font-style="normal" fo:font-weight="normal" fo:background-color="#1a237e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3" style:family="text">
      <style:text-properties fo:color="#2b2b2b" loext:opacity="100%" style:font-name="Microsoft JhengHei" fo:font-size="9pt" fo:font-style="normal" fo:font-weight="normal" fo:background-color="#1a237e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4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5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6" style:family="text">
      <style:text-properties fo:color="#2b2b2b" loext:opacity="100%" style:font-name="Microsoft JhengHei" fo:font-size="9pt" fo:font-style="normal" fo:font-weight="normal" fo:background-color="#e651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7" style:family="text">
      <style:text-properties fo:color="#2b2b2b" loext:opacity="100%" style:font-name="Microsoft JhengHei" fo:font-size="9pt" fo:font-style="normal" fo:font-weight="normal" fo:background-color="#e651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38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39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0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1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2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3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4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145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46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47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48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49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0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1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2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3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4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55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6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7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8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9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0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1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2" style:family="text">
      <style:text-properties fo:color="#2b2b2b" loext:opacity="100%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3" style:family="text">
      <style:text-properties fo:color="#2b2b2b" loext:opacity="100%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4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5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6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7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3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4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5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76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7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78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79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0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1" style:family="text">
      <style:text-properties fo:color="#2b2b2b" loext:opacity="100%" fo:font-size="9pt" fo:font-style="normal" fo:font-weight="normal" fo:background-color="#b71c1c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2" style:family="text">
      <style:text-properties fo:color="#2b2b2b" loext:opacity="100%" fo:font-size="9pt" fo:font-style="normal" fo:font-weight="normal" fo:background-color="#b71c1c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3" style:family="text">
      <style:text-properties fo:color="#2b2b2b" loext:opacity="100%" fo:font-size="9pt" fo:font-style="normal" fo:font-weight="normal" fo:background-color="#1a237e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4" style:family="text">
      <style:text-properties fo:color="#2b2b2b" loext:opacity="100%" fo:font-size="9pt" fo:font-style="normal" fo:font-weight="normal" fo:background-color="#1a237e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5" style:family="text">
      <style:text-properties fo:color="#2b2b2b" loext:opacity="100%" fo:font-size="9pt" fo:font-style="normal" fo:font-weight="normal" fo:background-color="#1b5e2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6" style:family="text">
      <style:text-properties fo:color="#2b2b2b" loext:opacity="100%" fo:font-size="9pt" fo:font-style="normal" fo:font-weight="normal" fo:background-color="#1b5e2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7" style:family="text">
      <style:text-properties fo:color="#2b2b2b" loext:opacity="100%" fo:font-size="9pt" fo:font-style="normal" fo:font-weight="normal" fo:background-color="#e651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8" style:family="text">
      <style:text-properties fo:color="#2b2b2b" loext:opacity="100%" fo:font-size="9pt" fo:font-style="normal" fo:font-weight="normal" fo:background-color="#e651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89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90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91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92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93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194" style:family="text">
      <style:text-properties fo:color="#2b2b2b" loext:opacity="100%" style:font-name="OpenSymbol" fo:font-size="10.5pt" fo:font-style="normal" fo:font-weight="normal" style:font-name-asian="OpenSymbol1" style:font-size-asian="10.5pt" style:font-style-asian="normal" style:font-weight-asian="normal" style:font-name-complex="OpenSymbol1" style:font-size-complex="10.5pt" style:font-style-complex="normal" style:font-weight-complex="normal"/>
    </style:style>
    <style:style style:name="T195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96" style:family="text">
      <style:text-properties fo:font-size="11pt" style:font-name-asian="Microsoft JhengHei2" style:font-size-asian="11pt" style:font-name-complex="Microsoft JhengHei2" style:font-size-complex="11pt"/>
    </style:style>
    <style:style style:name="T197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19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9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0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01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02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03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4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7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8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9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10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11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4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19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23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4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5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26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27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28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9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0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1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2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33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34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40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1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4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44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45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47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49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0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1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3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7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8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9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0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1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2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3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4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6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7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8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9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80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81" style:family="text">
      <style:text-properties fo:color="#18ffff" loext:opacity="100%" style:font-name="Microsoft JhengHei" fo:font-size="9pt" fo:font-style="normal" fo:font-weight="normal" fo:background-color="#1a237e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82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3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4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8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9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0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1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18ffff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7" style:family="text">
      <style:text-properties fo:color="#18ffff" loext:opacity="100%" style:font-name="Microsoft JhengHei" fo:font-size="10.5pt" fo:font-style="normal" fo:font-weight="normal" fo:background-color="#0000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8" style:family="text">
      <style:text-properties fo:color="#18ffff" loext:opacity="100%" style:font-name="Microsoft JhengHei" fo:font-size="10.5pt" fo:font-style="normal" fo:font-weight="normal" fo:background-color="#0000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99" style:family="text">
      <style:text-properties fo:color="#18ffff" loext:opacity="100%" style:font-name="Microsoft JhengHei" fo:font-size="10.5pt" fo:font-style="normal" fo:font-weight="normal" fo:background-color="#01579b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00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1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302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3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4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6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8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3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4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5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6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7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8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0" style:family="text">
      <style:text-properties fo:color="#18ffff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1" style:family="text">
      <style:text-properties fo:color="#18ffff" loext:opacity="100%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2" style:family="text">
      <style:text-properties fo:color="#18ffff" loext:opacity="100%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3" style:family="text">
      <style:text-properties fo:color="#18ffff" loext:opacity="100%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5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7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8" style:family="text">
      <style:text-properties fo:color="#18ffff" loext:opacity="100%" fo:font-size="9pt" fo:font-style="normal" fo:font-weight="normal" fo:background-color="#1a237e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29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0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1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2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4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5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6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39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43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44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5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6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1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2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3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4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5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356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57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1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2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3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4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5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6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1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2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3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4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5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7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8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9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76ff03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85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6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7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8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9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0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2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3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4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5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97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8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9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1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2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3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4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5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6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7" style:family="text">
      <style:text-properties fo:color="#76ff03" loext:opacity="100%" fo:font-size="9pt" fo:font-style="normal" fo:font-weight="normal" fo:background-color="#1b5e2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408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9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0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1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3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4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6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7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18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0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5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6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7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00e676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5" style:family="text">
      <style:text-properties fo:color="#00e676" loext:opacity="100%" style:font-name="Microsoft JhengHei" fo:font-size="10.5pt" fo:font-style="normal" fo:font-weight="normal" fo:background-color="#5d4037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6" style:family="text">
      <style:text-properties fo:color="#00e676" loext:opacity="100%" style:font-name="Microsoft JhengHei" fo:font-size="10.5pt" fo:font-style="normal" fo:font-weight="normal" fo:background-color="#5d4037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7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0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1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2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3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4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5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6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7" style:family="text">
      <style:text-properties fo:color="#00e676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48" style:family="text">
      <style:text-properties fo:color="#00e676" loext:opacity="100%" fo:font-size="10.5pt" fo:font-style="normal" fo:font-weight="normal" fo:background-color="#5d4037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49" style:family="text">
      <style:text-properties fo:color="#00e676" loext:opacity="100%" fo:font-size="10.5pt" fo:font-style="normal" fo:font-weight="normal" fo:background-color="#5d4037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5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2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3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4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5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6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7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8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9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0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2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3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4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5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0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1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2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3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4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5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6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7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0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1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2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3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486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487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88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9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0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1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2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3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4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5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6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7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8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9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0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1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5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6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7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8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9" style:family="text">
      <style:text-properties fo:color="#ffd740" loext:opacity="100%" style:font-name="Microsoft JhengHei" fo:font-size="9pt" fo:font-style="normal" fo:font-weight="normal" fo:background-color="#e651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2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ffd740" loext:opacity="100%" fo:font-size="9pt" fo:font-style="normal" fo:font-weight="normal" fo:background-color="#e651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22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3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4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5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6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7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8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9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0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1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2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5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6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38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0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43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8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1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2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3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4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5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6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2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3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5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6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7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8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9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0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3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4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5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6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7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8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79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2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5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7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8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0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1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2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3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4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5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6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8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9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1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4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5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6" style:family="text">
      <style:text-properties fo:color="#ffcdd2" loext:opacity="100%" style:font-name="Microsoft JhengHei" fo:font-size="9pt" fo:font-style="normal" fo:font-weight="normal" fo:background-color="#b71c1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07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8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9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0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1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2" style:family="text">
      <style:text-properties fo:color="#ffcdd2" loext:opacity="100%" fo:font-size="9pt" fo:font-style="normal" fo:font-weight="normal" fo:background-color="#b71c1c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13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4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5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6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8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9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1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2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4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5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6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7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3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634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1" loext:marker-style-name="T21"><text:span text:style-name="T22">公職考試 </text:span><text:span text:style-name="T37">· </text:span><text:span text:style-name="T22">資訊類</text:span></text:p>
      <text:p text:style-name="P22" loext:marker-style-name="T44"><text:span text:style-name="T45">網路概論 與 資訊安全</text:span><text:span text:style-name="T44"/></text:p>
      <text:p text:style-name="P23" loext:marker-style-name="T46"><text:span text:style-name="T47">完整整合筆記 </text:span><text:span text:style-name="T60">· </text:span><text:span text:style-name="T47">最終版</text:span></text:p>
      <text:p text:style-name="P24" loext:marker-style-name="T3"><text:span text:style-name="T14">OSI / TCP/IP ‧ IP </text:span><text:span text:style-name="T4">子網 ‧ </text:span><text:span text:style-name="T14">IPv6 ‧ ARP/NAT ‧ TCP ‧ DNS ‧ </text:span><text:span text:style-name="T4">路由 ‧ </text:span><text:span text:style-name="T14">SDN/CDN/5G ‧ </text:span><text:span text:style-name="T4">無線 ‧ 資安全攻防</text:span></text:p>
      <text:p text:style-name="P3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6" loext:marker-style-name="T67"><text:span text:style-name="T68">涵蓋十大主題</text:span><text:span text:style-name="T67"/></text:p>
            </table:table-cell>
            <table:table-cell table:style-name="表格1.A1" office:value-type="string">
              <text:p text:style-name="P26" loext:marker-style-name="T67"><text:span text:style-name="T68">前置速記</text:span><text:span text:style-name="T67"/></text:p>
            </table:table-cell>
            <table:table-cell table:style-name="表格1.A1" office:value-type="string">
              <text:p text:style-name="P26" loext:marker-style-name="T67"><text:span text:style-name="T68">全程對照</text:span><text:span text:style-name="T67"/></text:p>
            </table:table-cell>
            <table:table-cell table:style-name="表格1.A1" office:value-type="string">
              <text:p text:style-name="P26" loext:marker-style-name="T67"><text:span text:style-name="T68">考試導向</text:span><text:span text:style-name="T67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8" loext:marker-style-name="T81"><text:span text:style-name="T82">十篇章節</text:span><text:span text:style-name="T81"/></text:p>
          </table:table-cell>
          <table:table-cell table:style-name="表格1.A2" office:value-type="string">
            <text:p text:style-name="P28" loext:marker-style-name="T81"><text:span text:style-name="T82">口訣 </text:span><text:span text:style-name="T147">+ </text:span><text:span text:style-name="T82">表格</text:span></text:p>
          </table:table-cell>
          <table:table-cell table:style-name="表格1.A2" office:value-type="string">
            <text:p text:style-name="P28" loext:marker-style-name="T81"><text:span text:style-name="T82">陷阱 </text:span><text:span text:style-name="T147">+ </text:span><text:span text:style-name="T82">正解</text:span></text:p>
          </table:table-cell>
          <table:table-cell table:style-name="表格1.A2" office:value-type="string">
            <text:p text:style-name="P28" loext:marker-style-name="T81"><text:span text:style-name="T82">申論 </text:span><text:span text:style-name="T147">+ </text:span><text:span text:style-name="T82">選擇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<text:span text:style-name="T196">📖 <text:s/></text:span><text:span text:style-name="T23">讀這份筆記的方法</text:span></text:p>
            <text:p text:style-name="P7"><text:span text:style-name="T24">使用方式：</text:span><text:span text:style-name="T97">第〇篇「考前速記總表」收錄全書所有口訣與必背表格，考前衝刺只看這篇即可；</text:span></text:p>
            <text:p text:style-name="P8" loext:marker-style-name="T98"><text:span text:style-name="T97">第一～十篇為完整詳解，建立觀念與申論寫法時閱讀。每篇皆附「常見陷阱」與「考試標準答案」。</text:span><text:span text:style-name="T98"/></text:p>
          </table:table-cell>
        </table:table-row>
      </table:table>
      <text:p text:style-name="P32" loext:marker-style-name="T48"><text:span text:style-name="T49">目　錄</text:span><text:span text:style-name="T48"/></text:p>
      <text:p text:style-name="P33" loext:marker-style-name="T5"><text:span text:style-name="T15">Table of Contents</text:span><text:span text:style-name="T5"/></text:p>
      <text:p text:style-name="P9"><text:span text:style-name="T23">第 〇 篇　考前速記總表 — 口訣 </text:span><text:span text:style-name="T38">× </text:span><text:span text:style-name="T23">必背表格</text:span><text:span text:style-name="T18"><text:tab/>3</text:span></text:p>
      <text:p text:style-name="P9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9"><text:span text:style-name="T9">　　</text:span><text:span text:style-name="T19">Part B</text:span><text:span text:style-name="T9">　必背表格精選</text:span><text:span text:style-name="T18"><text:tab/>5</text:span></text:p>
      <text:p text:style-name="P10"><text:span text:style-name="T50">第 一 篇　網路基礎架構：</text:span><text:span text:style-name="T61">OSI / TCP-IP · </text:span><text:span text:style-name="T50">協定 </text:span><text:span text:style-name="T61">· ARP · Traceroute</text:span><text:span text:style-name="T18"><text:tab/>9</text:span></text:p>
      <text:p text:style-name="P9"><text:span text:style-name="T50">第 二 篇　</text:span><text:span text:style-name="T61">IP </text:span><text:span text:style-name="T50">位址與封包處理：分類 </text:span><text:span text:style-name="T61">· CIDR · VLSM · Fragmentation</text:span><text:span text:style-name="T18"><text:tab/>13</text:span></text:p>
      <text:p text:style-name="P9"><text:span text:style-name="T50">第 三 篇　</text:span><text:span text:style-name="T61">IPv4 → IPv6 </text:span><text:span text:style-name="T50">過渡技術</text:span><text:span text:style-name="T18"><text:tab/>19</text:span></text:p>
      <text:p text:style-name="P9"><text:span text:style-name="T50">第 四 篇　</text:span><text:span text:style-name="T61">ARP</text:span><text:span text:style-name="T50">、</text:span><text:span text:style-name="T61">NAT </text:span><text:span text:style-name="T50">與完整上網流程</text:span><text:span text:style-name="T18"><text:tab/>21</text:span></text:p>
      <text:p text:style-name="P9"><text:span text:style-name="T50">第 五 篇　</text:span><text:span text:style-name="T61">TCP </text:span><text:span text:style-name="T50">傳輸控制深入</text:span><text:span text:style-name="T18"><text:tab/>24</text:span></text:p>
      <text:p text:style-name="P9"><text:span text:style-name="T50">第 六 篇　</text:span><text:span text:style-name="T61">DNS </text:span><text:span text:style-name="T50">與 </text:span><text:span text:style-name="T61">DNSSEC</text:span><text:span text:style-name="T18"><text:tab/>28</text:span></text:p>
      <text:p text:style-name="P9"><text:span text:style-name="T50">第 七 篇　路由協定：</text:span><text:span text:style-name="T61">OSPF </text:span><text:span text:style-name="T50">與 </text:span><text:span text:style-name="T61">BGP</text:span><text:span text:style-name="T18"><text:tab/>31</text:span></text:p>
      <text:p text:style-name="P9"><text:span text:style-name="T50">第 八 篇　網路系統進階：</text:span><text:span text:style-name="T61">SDN · LB · CDN · 5G</text:span><text:span text:style-name="T18"><text:tab/>34</text:span></text:p>
      <text:p text:style-name="P9"><text:span text:style-name="T50">第 九 篇　無線通訊：</text:span><text:span text:style-name="T61">WiFi vs Bluetooth</text:span><text:span text:style-name="T18"><text:tab/>37</text:span></text:p>
      <text:p text:style-name="P9"><text:span text:style-name="T50">第 十 篇　資訊安全：設備 </text:span><text:span text:style-name="T61">· </text:span><text:span text:style-name="T50">攻防 </text:span><text:span text:style-name="T61">· </text:span><text:span text:style-name="T50">企業資安 </text:span><text:span text:style-name="T61">· Zero Trust</text:span><text:span text:style-name="T18"><text:tab/>40</text:span></text:p>
      <text:p text:style-name="P10"><text:span text:style-name="T23">結　語　考前最後叮嚀</text:span><text:span text:style-name="T18"><text:tab/>51</text:span></text:p>
      <text:h text:style-name="P17" text:outline-level="1" loext:marker-style-name="T69"><text:span text:style-name="T70">第 〇 篇　考前速記總表 — 口訣 </text:span><text:span text:style-name="T69">× </text:span><text:span text:style-name="T70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><text:span text:style-name="T196">⚡ <text:s/></text:span><text:span text:style-name="T50">本篇用途</text:span></text:p>
            <text:p text:style-name="P7" loext:marker-style-name="T98"><text:span text:style-name="T97">這一篇把全書最關鍵的「記憶口訣」與「必背表格」依主題集中，方便考前快速複習；每一條後方括號為對應的詳解篇章。</text:span><text:span text:style-name="T98"/></text:p>
          </table:table-cell>
        </table:table-row>
      </table:table>
      <text:h text:style-name="P11" text:outline-level="2" loext:marker-style-name="T27"><text:span text:style-name="T27">Part A</text:span><text:span text:style-name="T28">　口訣大全（依主題分類）</text:span></text:h>
      <text:h text:style-name="P12" text:outline-level="3"><text:span text:style-name="T198">▍</text:span><text:span text:style-name="T199"> </text:span><text:span text:style-name="T200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11">TCP/IP </text:span><text:span text:style-name="T203">四層心法：</text:span><text:span text:style-name="T97">應用層→給人用（</text:span><text:span text:style-name="T155">HTTP/DNS/DHCP/SSH/MQTT</text:span><text:span text:style-name="T97">）｜傳輸層→怎麼送（</text:span><text:span text:style-name="T155">TCP </text:span><text:span text:style-name="T97">穩、</text:span><text:span text:style-name="T155">UDP </text:span><text:span text:style-name="T97">快）｜網路層→走哪條路（</text:span><text:span text:style-name="T155">IP/ICMP</text:span><text:span text:style-name="T97">）｜連結層→同一區網怎麼接（</text:span><text:span text:style-name="T155">Ethernet/ARP</text:span><text:span text:style-name="T97">）</text:span></text:p>
            <text:p text:style-name="P8"><text:span text:style-name="T211">OSI vs TCP/IP</text:span><text:span text:style-name="T203">：</text:span><text:span text:style-name="T155">OSI 7 </text:span><text:span text:style-name="T97">層（理論）、</text:span><text:span text:style-name="T155">TCP/IP 4 </text:span><text:span text:style-name="T97">層（實際）；差別在 </text:span><text:span text:style-name="T155">TCP/IP </text:span><text:span text:style-name="T97">把 </text:span><text:span text:style-name="T155">Session</text:span><text:span text:style-name="T97">＋</text:span><text:span text:style-name="T155">Presentation </text:span><text:span text:style-name="T97">併入 </text:span><text:span text:style-name="T155">Application</text:span><text:span text:style-name="T97">。</text:span></text:p>
            <text:p text:style-name="P8"><text:span text:style-name="T211">TCP vs UDP</text:span><text:span text:style-name="T203">：</text:span><text:span text:style-name="T155">TCP</text:span><text:span text:style-name="T97">「穩定優先」（保證送達、會重傳）；</text:span><text:span text:style-name="T155">UDP</text:span><text:span text:style-name="T97">「速度優先」（不保證、不重傳）。</text:span></text:p>
            <text:p text:style-name="P8"><text:span text:style-name="T203">三件事：</text:span><text:span text:style-name="T155">IP→</text:span><text:span text:style-name="T97">定位（目的地是誰）｜</text:span><text:span text:style-name="T155">Routing→</text:span><text:span text:style-name="T97">選路（怎麼走最快）｜</text:span><text:span text:style-name="T155">ICMP→</text:span><text:span text:style-name="T97">回報（出錯通知你）。</text:span></text:p>
            <text:p text:style-name="P8"><text:span text:style-name="T211">Traceroute</text:span><text:span text:style-name="T203">＝</text:span><text:span text:style-name="T155">TTL </text:span><text:span text:style-name="T97">遞增 ＋ </text:span><text:span text:style-name="T155">ICMP </text:span><text:span text:style-name="T97">回報，逐步「炸出」完整路徑。</text:span></text:p>
            <text:p text:style-name="P8"><text:span text:style-name="T211">ARP</text:span><text:span text:style-name="T203">＝</text:span><text:span text:style-name="T97">用 </text:span><text:span text:style-name="T155">IP </text:span><text:span text:style-name="T97">找 </text:span><text:span text:style-name="T155">MAC</text:span><text:span text:style-name="T97">，只在同一個 </text:span><text:span text:style-name="T155">LAN </text:span><text:span text:style-name="T97">內使用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二、</text:span><text:span text:style-name="T199">IP </text:span><text:span text:style-name="T200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11">VLSM </text:span><text:span text:style-name="T203">黃金公式：</text:span><text:span text:style-name="T97">需求 ＋</text:span><text:span text:style-name="T155">2 → </text:span><text:span text:style-name="T97">找最小 </text:span><text:span text:style-name="T155">2ⁿ → </text:span><text:span text:style-name="T97">前綴 </text:span><text:span text:style-name="T155">/(32−n)</text:span><text:span text:style-name="T97">。</text:span></text:p>
            <text:p text:style-name="P8"><text:span text:style-name="T203">可用主機數：</text:span><text:span text:style-name="T155">2^(</text:span><text:span text:style-name="T97">主機 </text:span><text:span text:style-name="T155">bit) − 2</text:span><text:span text:style-name="T97">（扣掉網路位址與廣播位址）。</text:span></text:p>
            <text:p text:style-name="P8"><text:span text:style-name="T211">CIDR </text:span><text:span text:style-name="T203">合併：</text:span><text:span text:style-name="T97">連續 ＋ 數量 </text:span><text:span text:style-name="T155">2ⁿ </text:span><text:span text:style-name="T97">＋ 起點對齊 → 合併 </text:span><text:span text:style-name="T155">2ⁿ </text:span><text:span text:style-name="T97">個子網則「前綴減 </text:span><text:span text:style-name="T155">n</text:span><text:span text:style-name="T97">」。</text:span></text:p>
            <text:p text:style-name="P8"><text:span text:style-name="T203">前綴速背：</text:span><text:span text:style-name="T155">/25=126</text:span><text:span text:style-name="T97">、</text:span><text:span text:style-name="T155">/26=62</text:span><text:span text:style-name="T97">、</text:span><text:span text:style-name="T155">/27=30</text:span><text:span text:style-name="T97">、</text:span><text:span text:style-name="T155">/28=14</text:span><text:span text:style-name="T97">、</text:span><text:span text:style-name="T155">/29=6</text:span><text:span text:style-name="T97">、</text:span><text:span text:style-name="T155">/30=2</text:span><text:span text:style-name="T97">。</text:span></text:p>
            <text:p text:style-name="P8"><text:span text:style-name="T203">封包切割：</text:span><text:span text:style-name="T97">封包 </text:span><text:span text:style-name="T155">&gt; MTU </text:span><text:span text:style-name="T97">就切（</text:span><text:span text:style-name="T155">Fragmentation</text:span><text:span text:style-name="T97">）；</text:span><text:span text:style-name="T155">Fragment Offset </text:span><text:span text:style-name="T97">＝ 起始位置 </text:span><text:span text:style-name="T155">÷ 8</text:span><text:span text:style-name="T97">。</text:span></text:p>
            <text:p text:style-name="P8"><text:span text:style-name="T203">誰能切：</text:span><text:span text:style-name="T155">IPv4</text:span><text:span text:style-name="T97">＝</text:span><text:span text:style-name="T155">Router </text:span><text:span text:style-name="T97">或 </text:span><text:span text:style-name="T155">Source </text:span><text:span text:style-name="T97">可切；</text:span><text:span text:style-name="T155">IPv6</text:span><text:span text:style-name="T97">＝只有 </text:span><text:span text:style-name="T155">Source </text:span><text:span text:style-name="T97">切，必搭 </text:span><text:span text:style-name="T155">PMTUD</text:span><text:span text:style-name="T97">。</text:span></text:p>
            <text:p text:style-name="P8"><text:span text:style-name="T211">Protocol </text:span><text:span text:style-name="T203">值：</text:span><text:span text:style-name="T155">ICMP=1</text:span><text:span text:style-name="T97">、</text:span><text:span text:style-name="T155">TCP=6</text:span><text:span text:style-name="T97">、</text:span><text:span text:style-name="T155">UDP=17</text:span><text:span text:style-name="T97">｜</text:span><text:span text:style-name="T155">DF=1 </text:span><text:span text:style-name="T97">禁止切、</text:span><text:span text:style-name="T155">MF=1 </text:span><text:span text:style-name="T97">後面還有分段｜</text:span><text:span text:style-name="T155">MSS</text:span><text:span text:style-name="T97">＝</text:span><text:span text:style-name="T155">MTU−20−20</text:span><text:span text:style-name="T97">＝</text:span><text:span text:style-name="T155">1460</text:span><text:span text:style-name="T97">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三、</text:span><text:span text:style-name="T199">IPv4 → IPv6</text:span><text:span text:style-name="T200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11">IPv6 </text:span><text:span text:style-name="T203">特點：</text:span><text:span text:style-name="T97">大（</text:span><text:span text:style-name="T155">128 bit</text:span><text:span text:style-name="T97">）＋ 安全（</text:span><text:span text:style-name="T155">IPsec</text:span><text:span text:style-name="T97">）＋ 快（固定 </text:span><text:span text:style-name="T155">Header</text:span><text:span text:style-name="T97">）＋ 自動（</text:span><text:span text:style-name="T155">SLAAC</text:span><text:span text:style-name="T97">）＋ 乾淨（無 </text:span><text:span text:style-name="T155">Broadcast</text:span><text:span text:style-name="T97">）。</text:span></text:p>
            <text:p text:style-name="P8"><text:span text:style-name="T203">三種過渡技術：</text:span><text:span text:style-name="T97">雙語（</text:span><text:span text:style-name="T155">Dual Stack</text:span><text:span text:style-name="T97">）＋ 偽裝（</text:span><text:span text:style-name="T155">Tunneling</text:span><text:span text:style-name="T97">）＋ 翻譯（</text:span><text:span text:style-name="T155">Translation</text:span><text:span text:style-name="T97">）。</text:span></text:p>
            <text:p text:style-name="P8"><text:span text:style-name="T203">生活比喻：</text:span><text:span text:style-name="T155">Dual Stack</text:span><text:span text:style-name="T97">＝同時會中英文；</text:span><text:span text:style-name="T155">Tunneling</text:span><text:span text:style-name="T97">＝英文信裝進中文信封偷渡；</text:span><text:span text:style-name="T155">Translation</text:span><text:span text:style-name="T97">＝現場請翻譯口譯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四、</text:span><text:span text:style-name="T199">ARP</text:span><text:span text:style-name="T200">、</text:span><text:span text:style-name="T199">NAT </text:span><text:span text:style-name="T200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上網流程：</text:span><text:span text:style-name="T155">DNS → ARP → L2 </text:span><text:span text:style-name="T97">封包 → </text:span><text:span text:style-name="T155">NAT</text:span><text:span text:style-name="T97">（去程）→ </text:span><text:span text:style-name="T155">Internet → NAT</text:span><text:span text:style-name="T97">（回程）→ 你。</text:span></text:p>
            <text:p text:style-name="P8"><text:span text:style-name="T203">核心觀念：</text:span><text:span text:style-name="T155">IP</text:span><text:span text:style-name="T97">＝最終目的地（全程不變）；</text:span><text:span text:style-name="T155">MAC</text:span><text:span text:style-name="T97">＝下一站（每跳更換）。</text:span></text:p>
            <text:p text:style-name="P8"><text:span text:style-name="T203">最大地雷：</text:span><text:span text:style-name="T155">ARP </text:span><text:span text:style-name="T97">找的是「路由器（預設閘道）」的 </text:span><text:span text:style-name="T155">MAC</text:span><text:span text:style-name="T97">，不是 </text:span><text:span text:style-name="T155">Google </text:span><text:span text:style-name="T97">的 </text:span><text:span text:style-name="T155">MAC</text:span><text:span text:style-name="T97">。</text:span></text:p>
            <text:p text:style-name="P8"><text:span text:style-name="T211">PAT</text:span><text:span text:style-name="T203">：</text:span><text:span text:style-name="T97">多台共用一個公網 </text:span><text:span text:style-name="T155">IP</text:span><text:span text:style-name="T97">，靠 </text:span><text:span text:style-name="T155">Port </text:span><text:span text:style-name="T97">號碼區分（最重要）。</text:span></text:p>
          </table:table-cell>
        </table:table-row>
      </table:table>
      <text:h text:style-name="P12" text:outline-level="3"><text:soft-page-break/><text:span text:style-name="T198">▍</text:span><text:span text:style-name="T199"> </text:span><text:span text:style-name="T200">五、</text:span><text:span text:style-name="T199">TCP </text:span><text:span text:style-name="T200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三次握手：</text:span><text:span text:style-name="T155">SYN → SYN</text:span><text:span text:style-name="T97">＋</text:span><text:span text:style-name="T155">ACK → ACK</text:span><text:span text:style-name="T97">，確認雙向都能通訊。</text:span></text:p>
            <text:p text:style-name="P8"><text:span text:style-name="T203">傳送量公式：</text:span><text:span text:style-name="T97">實際傳送量 ＝ </text:span><text:span text:style-name="T155">min(rwnd, cwnd)</text:span><text:span text:style-name="T97">。</text:span><text:span text:style-name="T155">rwnd</text:span><text:span text:style-name="T97">＝接收端限制、</text:span><text:span text:style-name="T155">cwnd</text:span><text:span text:style-name="T97">＝網路限制。</text:span></text:p>
            <text:p text:style-name="P8"><text:span text:style-name="T203">擁塞控制節奏：</text:span><text:span text:style-name="T155">Slow Start</text:span><text:span text:style-name="T97">（指數成長）→ </text:span><text:span text:style-name="T155">Congestion Avoidance</text:span><text:span text:style-name="T97">（線性成長）→ 丟包（減速）。</text:span></text:p>
            <text:p text:style-name="P8"><text:span text:style-name="T203">丟包處理：</text:span><text:span text:style-name="T155">Timeout → cwnd </text:span><text:span text:style-name="T97">重設為 </text:span><text:span text:style-name="T155">1 </text:span><text:span text:style-name="T97">回 </text:span><text:span text:style-name="T155">Slow Start</text:span><text:span text:style-name="T97">；</text:span><text:span text:style-name="T155">3 </text:span><text:span text:style-name="T97">個重複 </text:span><text:span text:style-name="T155">ACK → cwnd </text:span><text:span text:style-name="T97">減半續 </text:span><text:span text:style-name="T155">CA</text:span><text:span text:style-name="T97">。</text:span></text:p>
            <text:p text:style-name="P8"><text:span text:style-name="T211">AIMD</text:span><text:span text:style-name="T203">：</text:span><text:span text:style-name="T97">沒丟包 每 </text:span><text:span text:style-name="T155">RTT</text:span><text:span text:style-name="T97">＋</text:span><text:span text:style-name="T155">1</text:span><text:span text:style-name="T97">（加法增長）；丟包 </text:span><text:span text:style-name="T155">×0.5</text:span><text:span text:style-name="T97">（乘法減少）。</text:span></text:p>
            <text:p text:style-name="P8"><text:span text:style-name="T211">SYN Flood</text:span><text:span text:style-name="T203">：</text:span><text:span text:style-name="T97">大量半連線（</text:span><text:span text:style-name="T155">Half-open</text:span><text:span text:style-name="T97">）耗盡 </text:span><text:span text:style-name="T155">Server </text:span><text:span text:style-name="T97">資源 → </text:span><text:span text:style-name="T155">DoS</text:span><text:span text:style-name="T97">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六、</text:span><text:span text:style-name="T199">DNS </text:span><text:span text:style-name="T200">與 </text:span><text:span text:style-name="T199">DNSSEC</text:span><text:span text:style-name="T200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查詢流程：</text:span><text:span text:style-name="T155">Cache → Local → Root → TLD → Authoritative → </text:span><text:span text:style-name="T97">取得 </text:span><text:span text:style-name="T155">IP</text:span><text:span text:style-name="T97">。</text:span></text:p>
            <text:p text:style-name="P8"><text:span text:style-name="T211">Recursive</text:span><text:span text:style-name="T203">：</text:span><text:span text:style-name="T97">「代查到底」（</text:span><text:span text:style-name="T155">DNS </text:span><text:span text:style-name="T97">幫你問完，你只問一次）。</text:span></text:p>
            <text:p text:style-name="P8"><text:span text:style-name="T211">Iterative</text:span><text:span text:style-name="T203">：</text:span><text:span text:style-name="T97">「逐層詢問」（你自己一層一層問）。</text:span></text:p>
            <text:p text:style-name="P8"><text:span text:style-name="T211">DNSSEC</text:span><text:span text:style-name="T203">：</text:span><text:span text:style-name="T97">驗證真偽，不是加密、不防 </text:span><text:span text:style-name="T155">DDoS</text:span><text:span text:style-name="T97">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七、路由協定 </text:span><text:span text:style-name="T199">OSPF / BGP</text:span><text:span text:style-name="T200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範圍分類：</text:span><text:span text:style-name="T97">公司／校園內 → </text:span><text:span text:style-name="T155">IGP</text:span><text:span text:style-name="T97">（</text:span><text:span text:style-name="T155">OSPF</text:span><text:span text:style-name="T97">、</text:span><text:span text:style-name="T155">RIP</text:span><text:span text:style-name="T97">）；公司與公司間 → </text:span><text:span text:style-name="T155">EGP</text:span><text:span text:style-name="T97">（</text:span><text:span text:style-name="T155">BGP</text:span><text:span text:style-name="T97">）。</text:span></text:p>
            <text:p text:style-name="P8"><text:span text:style-name="T211">OSPF </text:span><text:span text:style-name="T203">規定：</text:span><text:span text:style-name="T97">所有 </text:span><text:span text:style-name="T155">Area </text:span><text:span text:style-name="T97">一定要連到 </text:span><text:span text:style-name="T155">Area 0</text:span><text:span text:style-name="T97">（骨幹）才能互通。</text:span></text:p>
            <text:p text:style-name="P8"><text:span text:style-name="T211">OSPF </text:span><text:span text:style-name="T203">四種 </text:span><text:span text:style-name="T211">Router</text:span><text:span text:style-name="T203">：</text:span><text:span text:style-name="T155">Internal</text:span><text:span text:style-name="T97">（不出 </text:span><text:span text:style-name="T155">Area</text:span><text:span text:style-name="T97">）／</text:span><text:span text:style-name="T155">Backbone</text:span><text:span text:style-name="T97">（在 </text:span><text:span text:style-name="T155">Area 0</text:span><text:span text:style-name="T97">）／</text:span><text:span text:style-name="T155">ABR</text:span><text:span text:style-name="T97">（跨 </text:span><text:span text:style-name="T155">Area </text:span><text:span text:style-name="T97">橋樑）／</text:span><text:span text:style-name="T155">ASBR</text:span><text:span text:style-name="T97">（跨 </text:span><text:span text:style-name="T155">AS </text:span><text:span text:style-name="T97">入口）。</text:span></text:p>
            <text:p text:style-name="P8"><text:span text:style-name="T211">BGP </text:span><text:span text:style-name="T203">選路順序：</text:span><text:span text:style-name="T155">Weight &gt; Local Pref &gt; </text:span><text:span text:style-name="T97">自己產生 </text:span><text:span text:style-name="T155">&gt; AS-PATH &gt; Origin &gt; MED &gt; eBGP &gt; IGP cost &gt; Router ID</text:span><text:span text:style-name="T97">。</text:span></text:p>
            <text:p text:style-name="P8"><text:span text:style-name="T211">BGP </text:span><text:span text:style-name="T203">本質：</text:span><text:span text:style-name="T97">政策導向（不是距離導向）；</text:span><text:span text:style-name="T155">Local Preference </text:span><text:span text:style-name="T97">才是最重要的「通用」屬性（</text:span><text:span text:style-name="T155">Weight </text:span><text:span text:style-name="T97">為 </text:span><text:span text:style-name="T155">Cisco </text:span><text:span text:style-name="T97">私有）。</text:span></text:p>
            <text:p text:style-name="P8"><text:span text:style-name="T203">三層分工：</text:span><text:span text:style-name="T97">防火牆→「能不能走」｜</text:span><text:span text:style-name="T155">NAT→</text:span><text:span text:style-name="T97">「你是誰」｜</text:span><text:span text:style-name="T155">BGP→</text:span><text:span text:style-name="T97">「怎麼走」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八、網路系統進階 </text:span><text:span text:style-name="T199">SDN / LB / CDN / 5G</text:span><text:span text:style-name="T200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11">SDN</text:span><text:span text:style-name="T203">：</text:span><text:span text:style-name="T97">「分平面、三層 </text:span><text:span text:style-name="T155">App-</text:span><text:span text:style-name="T97">控</text:span><text:span text:style-name="T155">-</text:span><text:span text:style-name="T97">基」＝控制／資料分離；</text:span><text:span text:style-name="T155">Application → Control → Infrastructure</text:span><text:span text:style-name="T97">。</text:span></text:p>
            <text:p text:style-name="P8"><text:span text:style-name="T211">Load Balancing</text:span><text:span text:style-name="T203">：</text:span><text:span text:style-name="T97">「</text:span><text:span text:style-name="T155">LB </text:span><text:span text:style-name="T97">輪、重、黏」＝</text:span><text:span text:style-name="T155">Round Robin</text:span><text:span text:style-name="T97">（輪流）／</text:span><text:span text:style-name="T155">Weighted RR</text:span><text:span text:style-name="T97">（加權）／</text:span><text:span text:style-name="T155">Stickiness</text:span><text:span text:style-name="T97">（同人同台）。</text:span></text:p>
            <text:p text:style-name="P8"><text:span text:style-name="T211">CDN</text:span><text:span text:style-name="T203">：</text:span><text:span text:style-name="T97">「網址轉轉轉（</text:span><text:span text:style-name="T155">CNAME</text:span><text:span text:style-name="T97">），資料找最近（</text:span><text:span text:style-name="T155">Edge</text:span><text:span text:style-name="T97">）」；</text:span><text:span text:style-name="T155">CNAME</text:span><text:span text:style-name="T97">＝網址→網址（非 </text:span><text:span text:style-name="T155">IP</text:span><text:span text:style-name="T97">）。</text:span></text:p>
            <text:p text:style-name="P8"><text:span text:style-name="T211">5G</text:span><text:span text:style-name="T203">：</text:span><text:span text:style-name="T97">「快、低、多、切」＝</text:span><text:span text:style-name="T155">eMBB</text:span><text:span text:style-name="T97">（高速）／</text:span><text:span text:style-name="T155">URLLC</text:span><text:span text:style-name="T97">（超低延遲）／</text:span><text:span text:style-name="T155">mMTC</text:span><text:span text:style-name="T97">（大量連線）／</text:span><text:span text:style-name="T155">Network Slicing</text:span><text:span text:style-name="T97">（切片）。</text:span></text:p>
            <text:p text:style-name="P8"><text:span text:style-name="T211">10 </text:span><text:span text:style-name="T203">秒總背：</text:span><text:span text:style-name="T155">SDN </text:span><text:span text:style-name="T97">分離三層、</text:span><text:span text:style-name="T155">LB </text:span><text:span text:style-name="T97">輪重黏、</text:span><text:span text:style-name="T155">CDN CNAME→</text:span><text:span text:style-name="T97">最近、</text:span><text:span text:style-name="T155">5G </text:span><text:span text:style-name="T97">快低多切、</text:span><text:span text:style-name="T155">WiFi </text:span><text:span text:style-name="T97">聽、</text:span><text:span text:style-name="T155">BT </text:span><text:span text:style-name="T97">跳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九、無線通訊 </text:span><text:span text:style-name="T199">WiFi vs Bluetooth</text:span><text:span text:style-name="T200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一句總綱：</text:span><text:span text:style-name="T97">「</text:span><text:span text:style-name="T155">WiFi </text:span><text:span text:style-name="T97">先聽再說（</text:span><text:span text:style-name="T155">CSMA/CA</text:span><text:span text:style-name="T97">），</text:span><text:span text:style-name="T155">Bluetooth </text:span><text:span text:style-name="T97">一直換頻道（</text:span><text:span text:style-name="T155">FHSS</text:span><text:span text:style-name="T97">）」。</text:span></text:p>
            <text:p text:style-name="P8"><text:span text:style-name="T203">本質對比：</text:span><text:span text:style-name="T155">WiFi</text:span><text:span text:style-name="T97">＝搶頻道（菜市場）；</text:span><text:span text:style-name="T155">BT</text:span><text:span text:style-name="T97">＝排班（會議室預約）；時槽＝時間格子；</text:span><text:span text:style-name="T155">SCO</text:span><text:span text:style-name="T97">＝語音；</text:span><text:span text:style-name="T155">L2CAP</text:span><text:span text:style-name="T97">＝三通道。</text:span></text:p>
            <text:p text:style-name="P8"><text:span text:style-name="T203">最大陷阱：</text:span><text:span text:style-name="T97">有線 </text:span><text:span text:style-name="T155">Ethernet</text:span><text:span text:style-name="T97">＝</text:span><text:span text:style-name="T155">CD</text:span><text:span text:style-name="T97">（</text:span><text:span text:style-name="T155">Detect </text:span><text:span text:style-name="T97">偵測）；無線 </text:span><text:span text:style-name="T155">WiFi</text:span><text:span text:style-name="T97">＝</text:span><text:span text:style-name="T155">CA</text:span><text:span text:style-name="T97">（</text:span><text:span text:style-name="T155">Avoid </text:span><text:span text:style-name="T97">避免）。</text:span></text:p>
            <text:p text:style-name="P8"><text:span text:style-name="T211">QoS</text:span><text:span text:style-name="T203">／語音：</text:span><text:span text:style-name="T155">WiFi QoS</text:span><text:span text:style-name="T97">＝</text:span><text:span text:style-name="T155">EDCA</text:span><text:span text:style-name="T97">（急診室分級）；藍牙即時語音＝</text:span><text:span text:style-name="T155">SCO</text:span><text:span text:style-name="T97">／</text:span><text:span text:style-name="T155">eSCO</text:span><text:span text:style-name="T97">；</text:span><text:span text:style-name="T155">L2CAP </text:span><text:span text:style-name="T97">位於 </text:span><text:span text:style-name="T155">Data </text:span><text:soft-page-break/><text:span text:style-name="T155">Link </text:span><text:span text:style-name="T97">層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" loext:marker-style-name="T199"><text:span text:style-name="T210">🔑 </text:span><text:span text:style-name="T200">口訣</text:span></text:p>
            <text:p text:style-name="P7"><text:span text:style-name="T203">設備萬用口訣：</text:span><text:span text:style-name="T155">FW </text:span><text:span text:style-name="T97">封外、</text:span><text:span text:style-name="T155">WAF </text:span><text:span text:style-name="T97">看內、</text:span><text:span text:style-name="T155">NGFW </text:span><text:span text:style-name="T97">最強、</text:span><text:span text:style-name="T155">DMZ </text:span><text:span text:style-name="T97">隔離、</text:span><text:span text:style-name="T155">IOC </text:span><text:span text:style-name="T97">壞人、</text:span><text:span text:style-name="T155">Proxy </text:span><text:span text:style-name="T97">幫客、</text:span><text:span text:style-name="T155">Reverse </text:span><text:span text:style-name="T97">幫服。</text:span></text:p>
            <text:p text:style-name="P8"><text:span text:style-name="T211">IOC </text:span><text:span text:style-name="T203">四線索：</text:span><text:span text:style-name="T97">網（</text:span><text:span text:style-name="T155">Domain</text:span><text:span text:style-name="T97">）→ 檔（</text:span><text:span text:style-name="T155">Hash</text:span><text:span text:style-name="T97">）→ 連（</text:span><text:span text:style-name="T155">IP</text:span><text:span text:style-name="T97">）→ 控（</text:span><text:span text:style-name="T155">C2</text:span><text:span text:style-name="T97">）。</text:span></text:p>
            <text:p text:style-name="P8"><text:span text:style-name="T203">封包闖關順序：</text:span><text:span text:style-name="T155">Client → Proxy → Internet → FW/NGFW → DMZ → WAF → Reverse Proxy → </text:span><text:span text:style-name="T97">內部 </text:span><text:span text:style-name="T155">Server</text:span><text:span text:style-name="T97">。</text:span></text:p>
            <text:p text:style-name="P8"><text:span text:style-name="T203">三防分工：</text:span><text:span text:style-name="T155">Firewall </text:span><text:span text:style-name="T97">擋入口、</text:span><text:span text:style-name="T155">IDS </text:span><text:span text:style-name="T97">只看、</text:span><text:span text:style-name="T155">IPS </text:span><text:span text:style-name="T97">看＋擋；</text:span><text:span text:style-name="T155">HIDS </text:span><text:span text:style-name="T97">看主機（</text:span><text:span text:style-name="T155">Log</text:span><text:span text:style-name="T97">）、</text:span><text:span text:style-name="T155">NIDS </text:span><text:span text:style-name="T97">看網路（封包）。</text:span></text:p>
            <text:p text:style-name="P8"><text:span text:style-name="T203">易混兩協定：</text:span><text:span text:style-name="T155">SNMP </text:span><text:span text:style-name="T97">管理設備（應用層／</text:span><text:span text:style-name="T155">UDP</text:span><text:span text:style-name="T97">）、</text:span><text:span text:style-name="T155">ICMP </text:span><text:span text:style-name="T97">診斷網路（網路層）。</text:span></text:p>
            <text:p text:style-name="P8"><text:span text:style-name="T211">SQL Injection</text:span><text:span text:style-name="T203">：</text:span><text:span text:style-name="T97">攻擊＝</text:span><text:span text:style-name="T155">' OR 1=1 --</text:span><text:span text:style-name="T97">；防禦核心＝</text:span><text:span text:style-name="T155">Prepared Statement</text:span><text:span text:style-name="T97">（預備語句）。</text:span></text:p>
            <text:p text:style-name="P8"><text:span text:style-name="T211">Zero-Day</text:span><text:span text:style-name="T203">：</text:span><text:span text:style-name="T97">最怕「沒有 </text:span><text:span text:style-name="T155">Signature</text:span><text:span text:style-name="T97">」；防禦＝</text:span><text:span text:style-name="T155">Patch </text:span><text:span text:style-name="T97">更新 ＋ </text:span><text:span text:style-name="T155">IDS/IPS </text:span><text:span text:style-name="T97">＋ 網路分段。</text:span></text:p>
            <text:p text:style-name="P8"><text:span text:style-name="T203">企業資安三階段：</text:span><text:span text:style-name="T97">事前預防 → 事中偵測 → 事後復原。</text:span><text:span text:style-name="T155">RTO</text:span><text:span text:style-name="T97">＝停機時間、</text:span><text:span text:style-name="T155">RPO</text:span><text:span text:style-name="T97">＝資料損失量。</text:span></text:p>
            <text:p text:style-name="P8"><text:span text:style-name="T211">EDR/MDR</text:span><text:span text:style-name="T203">：</text:span><text:span text:style-name="T155">EDR</text:span><text:span text:style-name="T97">＝自己買工具守、</text:span><text:span text:style-name="T155">MDR</text:span><text:span text:style-name="T97">＝請公司幫你守、</text:span><text:span text:style-name="T155">ATT&amp;CK</text:span><text:span text:style-name="T97">＝駭客招式教材、數位韌性＝撐住快速復原。</text:span></text:p>
            <text:p text:style-name="P8"><text:span text:style-name="T211">SSDLC</text:span><text:span text:style-name="T203">：</text:span><text:span text:style-name="T155">Define→Design→Develop→Test→Deploy→Maintain</text:span><text:span text:style-name="T97">，精神是「左移（</text:span><text:span text:style-name="T155">Shift Left</text:span><text:span text:style-name="T97">）」。</text:span></text:p>
            <text:p text:style-name="P8"><text:span text:style-name="T211">Zero Trust</text:span><text:span text:style-name="T203">：</text:span><text:span text:style-name="T97">永不信任，始終驗證；查「人（</text:span><text:span text:style-name="T155">Identity</text:span><text:span text:style-name="T97">）機（</text:span><text:span text:style-name="T155">Device</text:span><text:span text:style-name="T97">）境（</text:span><text:span text:style-name="T155">Context</text:span><text:span text:style-name="T97">）」；配 </text:span><text:span text:style-name="T155">MFA</text:span><text:span text:style-name="T97">＋最小權限＋微分段＋持續監控。</text:span></text:p>
          </table:table-cell>
        </table:table-row>
      </table:table>
      <text:h text:style-name="P11" text:outline-level="2" loext:marker-style-name="T27"><text:span text:style-name="T27">Part B</text:span><text:span text:style-name="T28">　必背表格精選（考前掃一遍）</text:span></text:h>
      <text:h text:style-name="P12" text:outline-level="3"><text:span text:style-name="T198">▍</text:span><text:span text:style-name="T199"> ① </text:span><text:span text:style-name="T200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6" loext:marker-style-name="T67"><text:span text:style-name="T68">前綴</text:span><text:span text:style-name="T67"/></text:p>
            </table:table-cell>
            <table:table-cell table:style-name="表格14.A1" office:value-type="string">
              <text:p text:style-name="P26" loext:marker-style-name="T67"><text:span text:style-name="T68">主機 </text:span><text:span text:style-name="T77">bit</text:span></text:p>
            </table:table-cell>
            <table:table-cell table:style-name="表格14.A1" office:value-type="string">
              <text:p text:style-name="P26" loext:marker-style-name="T67"><text:span text:style-name="T77">IP </text:span><text:span text:style-name="T68">總數</text:span></text:p>
            </table:table-cell>
            <table:table-cell table:style-name="表格14.A1" office:value-type="string">
              <text:p text:style-name="P26" loext:marker-style-name="T67"><text:span text:style-name="T68">可用主機</text:span><text:span text:style-name="T67"/></text:p>
            </table:table-cell>
            <table:table-cell table:style-name="表格14.A1" office:value-type="string">
              <text:p text:style-name="P26" loext:marker-style-name="T67"><text:span text:style-name="T68">區塊步長</text:span><text:span text:style-name="T67"/></text:p>
            </table:table-cell>
            <table:table-cell table:style-name="表格14.A1" office:value-type="string">
              <text:p text:style-name="P26" loext:marker-style-name="T67"><text:span text:style-name="T68">廣播尾數範例</text:span><text:span text:style-name="T67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9" loext:marker-style-name="T81"><text:span text:style-name="T147">/24</text:span><text:span text:style-name="T81"/></text:p>
          </table:table-cell>
          <table:table-cell table:style-name="表格14.A2" office:value-type="string">
            <text:p text:style-name="P28" loext:marker-style-name="T81"><text:span text:style-name="T147">8</text:span><text:span text:style-name="T81"/></text:p>
          </table:table-cell>
          <table:table-cell table:style-name="表格14.A2" office:value-type="string">
            <text:p text:style-name="P29" loext:marker-style-name="T81"><text:span text:style-name="T147">256</text:span><text:span text:style-name="T81"/></text:p>
          </table:table-cell>
          <table:table-cell table:style-name="表格14.A2" office:value-type="string">
            <text:p text:style-name="P28" loext:marker-style-name="T31"><text:span text:style-name="T39">254</text:span><text:span text:style-name="T31"/></text:p>
          </table:table-cell>
          <table:table-cell table:style-name="表格14.A2" office:value-type="string">
            <text:p text:style-name="P29" loext:marker-style-name="T81"><text:span text:style-name="T147">+256</text:span><text:span text:style-name="T81"/></text:p>
          </table:table-cell>
          <table:table-cell table:style-name="表格14.A2" office:value-type="string">
            <text:p text:style-name="P29" loext:marker-style-name="T81"><text:span text:style-name="T147">255</text:span><text:span text:style-name="T81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1"><text:span text:style-name="T147">/25</text:span><text:span text:style-name="T81"/></text:p>
          </table:table-cell>
          <table:table-cell table:style-name="表格14.A3" office:value-type="string">
            <text:p text:style-name="P28" loext:marker-style-name="T81"><text:span text:style-name="T147">7</text:span><text:span text:style-name="T81"/></text:p>
          </table:table-cell>
          <table:table-cell table:style-name="表格14.A3" office:value-type="string">
            <text:p text:style-name="P29" loext:marker-style-name="T81"><text:span text:style-name="T147">128</text:span><text:span text:style-name="T81"/></text:p>
          </table:table-cell>
          <table:table-cell table:style-name="表格14.A3" office:value-type="string">
            <text:p text:style-name="P28" loext:marker-style-name="T31"><text:span text:style-name="T39">126</text:span><text:span text:style-name="T31"/></text:p>
          </table:table-cell>
          <table:table-cell table:style-name="表格14.A3" office:value-type="string">
            <text:p text:style-name="P29" loext:marker-style-name="T81"><text:span text:style-name="T147">+128</text:span><text:span text:style-name="T81"/></text:p>
          </table:table-cell>
          <table:table-cell table:style-name="表格14.A3" office:value-type="string">
            <text:p text:style-name="P29" loext:marker-style-name="T81"><text:span text:style-name="T147">127, 255</text:span><text:span text:style-name="T81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1"><text:span text:style-name="T147">/26</text:span><text:span text:style-name="T81"/></text:p>
          </table:table-cell>
          <table:table-cell table:style-name="表格14.A2" office:value-type="string">
            <text:p text:style-name="P28" loext:marker-style-name="T81"><text:span text:style-name="T147">6</text:span><text:span text:style-name="T81"/></text:p>
          </table:table-cell>
          <table:table-cell table:style-name="表格14.A2" office:value-type="string">
            <text:p text:style-name="P29" loext:marker-style-name="T81"><text:span text:style-name="T147">64</text:span><text:span text:style-name="T81"/></text:p>
          </table:table-cell>
          <table:table-cell table:style-name="表格14.A2" office:value-type="string">
            <text:p text:style-name="P28" loext:marker-style-name="T31"><text:span text:style-name="T39">62</text:span><text:span text:style-name="T31"/></text:p>
          </table:table-cell>
          <table:table-cell table:style-name="表格14.A2" office:value-type="string">
            <text:p text:style-name="P29" loext:marker-style-name="T81"><text:span text:style-name="T147">+64</text:span><text:span text:style-name="T81"/></text:p>
          </table:table-cell>
          <table:table-cell table:style-name="表格14.A2" office:value-type="string">
            <text:p text:style-name="P29" loext:marker-style-name="T81"><text:span text:style-name="T147">63, 127, 191, 255</text:span><text:span text:style-name="T81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1"><text:span text:style-name="T147">/27</text:span><text:span text:style-name="T81"/></text:p>
          </table:table-cell>
          <table:table-cell table:style-name="表格14.A3" office:value-type="string">
            <text:p text:style-name="P28" loext:marker-style-name="T81"><text:span text:style-name="T147">5</text:span><text:span text:style-name="T81"/></text:p>
          </table:table-cell>
          <table:table-cell table:style-name="表格14.A3" office:value-type="string">
            <text:p text:style-name="P29" loext:marker-style-name="T81"><text:span text:style-name="T147">32</text:span><text:span text:style-name="T81"/></text:p>
          </table:table-cell>
          <table:table-cell table:style-name="表格14.A3" office:value-type="string">
            <text:p text:style-name="P28" loext:marker-style-name="T31"><text:span text:style-name="T39">30</text:span><text:span text:style-name="T31"/></text:p>
          </table:table-cell>
          <table:table-cell table:style-name="表格14.A3" office:value-type="string">
            <text:p text:style-name="P29" loext:marker-style-name="T81"><text:span text:style-name="T147">+32</text:span><text:span text:style-name="T81"/></text:p>
          </table:table-cell>
          <table:table-cell table:style-name="表格14.A3" office:value-type="string">
            <text:p text:style-name="P29" loext:marker-style-name="T81"><text:span text:style-name="T147">31, 63, 95 …</text:span><text:span text:style-name="T81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1"><text:span text:style-name="T147">/28</text:span><text:span text:style-name="T81"/></text:p>
          </table:table-cell>
          <table:table-cell table:style-name="表格14.A2" office:value-type="string">
            <text:p text:style-name="P28" loext:marker-style-name="T81"><text:span text:style-name="T147">4</text:span><text:span text:style-name="T81"/></text:p>
          </table:table-cell>
          <table:table-cell table:style-name="表格14.A2" office:value-type="string">
            <text:p text:style-name="P29" loext:marker-style-name="T81"><text:span text:style-name="T147">16</text:span><text:span text:style-name="T81"/></text:p>
          </table:table-cell>
          <table:table-cell table:style-name="表格14.A2" office:value-type="string">
            <text:p text:style-name="P28" loext:marker-style-name="T31"><text:span text:style-name="T39">14</text:span><text:span text:style-name="T31"/></text:p>
          </table:table-cell>
          <table:table-cell table:style-name="表格14.A2" office:value-type="string">
            <text:p text:style-name="P29" loext:marker-style-name="T81"><text:span text:style-name="T147">+16</text:span><text:span text:style-name="T81"/></text:p>
          </table:table-cell>
          <table:table-cell table:style-name="表格14.A2" office:value-type="string">
            <text:p text:style-name="P29" loext:marker-style-name="T81"><text:span text:style-name="T147">15, 31, 47 …</text:span><text:span text:style-name="T81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1"><text:span text:style-name="T147">/29</text:span><text:span text:style-name="T81"/></text:p>
          </table:table-cell>
          <table:table-cell table:style-name="表格14.A3" office:value-type="string">
            <text:p text:style-name="P28" loext:marker-style-name="T81"><text:span text:style-name="T147">3</text:span><text:span text:style-name="T81"/></text:p>
          </table:table-cell>
          <table:table-cell table:style-name="表格14.A3" office:value-type="string">
            <text:p text:style-name="P29" loext:marker-style-name="T81"><text:span text:style-name="T147">8</text:span><text:span text:style-name="T81"/></text:p>
          </table:table-cell>
          <table:table-cell table:style-name="表格14.A3" office:value-type="string">
            <text:p text:style-name="P28" loext:marker-style-name="T31"><text:span text:style-name="T39">6</text:span><text:span text:style-name="T31"/></text:p>
          </table:table-cell>
          <table:table-cell table:style-name="表格14.A3" office:value-type="string">
            <text:p text:style-name="P29" loext:marker-style-name="T81"><text:span text:style-name="T147">+8</text:span><text:span text:style-name="T81"/></text:p>
          </table:table-cell>
          <table:table-cell table:style-name="表格14.A3" office:value-type="string">
            <text:p text:style-name="P29" loext:marker-style-name="T81"><text:span text:style-name="T147">7, 15, 23 …</text:span><text:span text:style-name="T81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1"><text:span text:style-name="T147">/30</text:span><text:span text:style-name="T81"/></text:p>
          </table:table-cell>
          <table:table-cell table:style-name="表格14.A2" office:value-type="string">
            <text:p text:style-name="P28" loext:marker-style-name="T81"><text:span text:style-name="T147">2</text:span><text:span text:style-name="T81"/></text:p>
          </table:table-cell>
          <table:table-cell table:style-name="表格14.A2" office:value-type="string">
            <text:p text:style-name="P29" loext:marker-style-name="T81"><text:span text:style-name="T147">4</text:span><text:span text:style-name="T81"/></text:p>
          </table:table-cell>
          <table:table-cell table:style-name="表格14.A2" office:value-type="string">
            <text:p text:style-name="P28" loext:marker-style-name="T31"><text:span text:style-name="T39">2</text:span><text:span text:style-name="T31"/></text:p>
          </table:table-cell>
          <table:table-cell table:style-name="表格14.A2" office:value-type="string">
            <text:p text:style-name="P29" loext:marker-style-name="T81"><text:span text:style-name="T147">+4</text:span><text:span text:style-name="T81"/></text:p>
          </table:table-cell>
          <table:table-cell table:style-name="表格14.A2" office:value-type="string">
            <text:p text:style-name="P29" loext:marker-style-name="T81"><text:span text:style-name="T147">3, 7, 11 …</text:span><text:span text:style-name="T81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7"><text:span text:style-name="T214">例外 </text:span><text:span text:style-name="T219">/31</text:span><text:span text:style-name="T214">：</text:span><text:span text:style-name="T97">點對點連線（</text:span><text:span text:style-name="T155">RFC 3021</text:span><text:span text:style-name="T97">），</text:span><text:span text:style-name="T155">2 </text:span><text:span text:style-name="T97">個 </text:span><text:span text:style-name="T155">IP </text:span><text:span text:style-name="T97">全部可用，無網路位址與廣播位址。</text:span><text:span text:style-name="T155">/32 </text:span><text:span text:style-name="T97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② TCP vs UDP</text:span><text:span text:style-name="T200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15.A1" office:value-type="string">
              <text:p text:style-name="P4" loext:marker-style-name="T71"><text:span text:style-name="T78">TCP</text:span><text:span text:style-name="T72">（穩定）</text:span></text:p>
            </table:table-cell>
            <table:table-cell table:style-name="表格15.A1" office:value-type="string">
              <text:p text:style-name="P4" loext:marker-style-name="T71"><text:span text:style-name="T78">UDP</text:span><text:span text:style-name="T72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9" loext:marker-style-name="T121"><text:span text:style-name="T122">連線方式</text:span><text:span text:style-name="T121"/></text:p>
          </table:table-cell>
          <table:table-cell table:style-name="表格15.A2" office:value-type="string">
            <text:p text:style-name="P29" loext:marker-style-name="T121"><text:span text:style-name="T122">三次握手才開始</text:span><text:span text:style-name="T121"/></text:p>
          </table:table-cell>
          <table:table-cell table:style-name="表格15.A2" office:value-type="string">
            <text:p text:style-name="P29" loext:marker-style-name="T121"><text:span text:style-name="T122">無連線，直接送</text:span><text:span text:style-name="T121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21"><text:span text:style-name="T122">可靠性</text:span><text:span text:style-name="T121"/></text:p>
          </table:table-cell>
          <table:table-cell table:style-name="表格15.A3" office:value-type="string">
            <text:p text:style-name="P29" loext:marker-style-name="T121"><text:span text:style-name="T122">保證送達、會重傳</text:span><text:span text:style-name="T121"/></text:p>
          </table:table-cell>
          <table:table-cell table:style-name="表格15.A3" office:value-type="string">
            <text:p text:style-name="P29" loext:marker-style-name="T121"><text:span text:style-name="T122">不保證、不重傳</text:span><text:span text:style-name="T121"/></text:p>
          </table:table-cell>
        </table:table-row>
        <table:table-row table:style-name="表格15.1">
          <table:table-cell table:style-name="表格15.A2" office:value-type="string">
            <text:p text:style-name="P29" loext:marker-style-name="T121"><text:span text:style-name="T122">順序</text:span><text:span text:style-name="T121"/></text:p>
          </table:table-cell>
          <table:table-cell table:style-name="表格15.A2" office:value-type="string">
            <text:p text:style-name="P29" loext:marker-style-name="T121"><text:span text:style-name="T122">保證順序</text:span><text:span text:style-name="T121"/></text:p>
          </table:table-cell>
          <table:table-cell table:style-name="表格15.A2" office:value-type="string">
            <text:p text:style-name="P29" loext:marker-style-name="T121"><text:span text:style-name="T122">不保證順序</text:span><text:span text:style-name="T121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21"><text:span text:style-name="T122">速度</text:span><text:span text:style-name="T121"/></text:p>
          </table:table-cell>
          <table:table-cell table:style-name="表格15.A3" office:value-type="string">
            <text:p text:style-name="P29" loext:marker-style-name="T121"><text:span text:style-name="T122">較慢（有控制機制）</text:span><text:span text:style-name="T121"/></text:p>
          </table:table-cell>
          <table:table-cell table:style-name="表格15.A3" office:value-type="string">
            <text:p text:style-name="P29" loext:marker-style-name="T121"><text:span text:style-name="T122">較快（無額外開銷）</text:span><text:span text:style-name="T12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9" loext:marker-style-name="T121"><text:span text:style-name="T122">適用</text:span><text:span text:style-name="T121"/></text:p>
          </table:table-cell>
          <table:table-cell table:style-name="表格15.A2" office:value-type="string">
            <text:p text:style-name="P29" loext:marker-style-name="T121"><text:span text:style-name="T122">網頁、</text:span><text:span text:style-name="T175">Email</text:span><text:span text:style-name="T122">、</text:span><text:span text:style-name="T175">FTP</text:span><text:span text:style-name="T122">、檔案</text:span></text:p>
          </table:table-cell>
          <table:table-cell table:style-name="表格15.A2" office:value-type="string">
            <text:p text:style-name="P29" loext:marker-style-name="T121"><text:span text:style-name="T122">串流、遊戲、</text:span><text:span text:style-name="T175">VoIP</text:span><text:span text:style-name="T122">、</text:span><text:span text:style-name="T175">DNS</text:span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21"><text:span text:style-name="T122">一句話</text:span><text:span text:style-name="T121"/></text:p>
          </table:table-cell>
          <table:table-cell table:style-name="表格15.A3" office:value-type="string">
            <text:p text:style-name="P29" loext:marker-style-name="T206"><text:span text:style-name="T207">「穩定優先」</text:span><text:span text:style-name="T206"/></text:p>
          </table:table-cell>
          <table:table-cell table:style-name="表格15.A3" office:value-type="string">
            <text:p text:style-name="P29" loext:marker-style-name="T33"><text:span text:style-name="T34">「速度優先」</text:span><text:span text:style-name="T33"/></text:p>
          </table:table-cell>
        </table:table-row>
      </table:table>
      <text:h text:style-name="P12" text:outline-level="3"><text:span text:style-name="T198">▍</text:span><text:span text:style-name="T199"> ③ IPv4 vs IPv6 </text:span><text:span text:style-name="T200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4" loext:marker-style-name="T67"><text:span text:style-name="T68">比較項目</text:span><text:span text:style-name="T67"/></text:p>
            </table:table-cell>
            <table:table-cell table:style-name="表格16.A1" office:value-type="string">
              <text:p text:style-name="P4" loext:marker-style-name="T67"><text:span text:style-name="T77">✗ IPv4 </text:span><text:span text:style-name="T68">問題</text:span></text:p>
            </table:table-cell>
            <table:table-cell table:style-name="表格16.A1" office:value-type="string">
              <text:p text:style-name="P4" loext:marker-style-name="T67"><text:span text:style-name="T77">✓ IPv6 </text:span><text:span text:style-name="T68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9" loext:marker-style-name="T81"><text:span text:style-name="T82">位址長度</text:span><text:span text:style-name="T81"/></text:p>
          </table:table-cell>
          <table:table-cell table:style-name="表格16.A2" office:value-type="string">
            <text:p text:style-name="P29" loext:marker-style-name="T81"><text:span text:style-name="T147">32 bit</text:span><text:span text:style-name="T82">，約 </text:span><text:span text:style-name="T147">43 </text:span><text:span text:style-name="T82">億個，已不足</text:span></text:p>
          </table:table-cell>
          <table:table-cell table:style-name="表格16.A2" office:value-type="string">
            <text:p text:style-name="P29" loext:marker-style-name="T81"><text:span text:style-name="T147">128 bit</text:span><text:span text:style-name="T82">，約 </text:span><text:span text:style-name="T147">3.4×10³⁸</text:span><text:span text:style-name="T82">，近乎無限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1"><text:span text:style-name="T147">NAT</text:span><text:span text:style-name="T81"/></text:p>
          </table:table-cell>
          <table:table-cell table:style-name="表格16.A3" office:value-type="string">
            <text:p text:style-name="P29" loext:marker-style-name="T81"><text:span text:style-name="T82">需 </text:span><text:span text:style-name="T147">NAT </text:span><text:span text:style-name="T82">共用 </text:span><text:span text:style-name="T147">IP</text:span><text:span text:style-name="T82">，破壞 </text:span><text:span text:style-name="T147">E2E</text:span></text:p>
          </table:table-cell>
          <table:table-cell table:style-name="表格16.A3" office:value-type="string">
            <text:p text:style-name="P29" loext:marker-style-name="T81"><text:span text:style-name="T82">每裝置獨立公開 </text:span><text:span text:style-name="T147">IP</text:span><text:span text:style-name="T82">，恢復 </text:span><text:span text:style-name="T147">E2E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1"><text:span text:style-name="T82">安全性</text:span><text:span text:style-name="T81"/></text:p>
          </table:table-cell>
          <table:table-cell table:style-name="表格16.A2" office:value-type="string">
            <text:p text:style-name="P29" loext:marker-style-name="T81"><text:span text:style-name="T82">無內建加密／驗證</text:span><text:span text:style-name="T81"/></text:p>
          </table:table-cell>
          <table:table-cell table:style-name="表格16.A2" office:value-type="string">
            <text:p text:style-name="P29" loext:marker-style-name="T81"><text:span text:style-name="T82">支援 </text:span><text:span text:style-name="T147">IPsec</text:span><text:span text:style-name="T82">（</text:span><text:span text:style-name="T147">RFC 6434 </text:span><text:span text:style-name="T82">後改建議）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1"><text:span text:style-name="T147">Header</text:span><text:span text:style-name="T81"/></text:p>
          </table:table-cell>
          <table:table-cell table:style-name="表格16.A3" office:value-type="string">
            <text:p text:style-name="P29" loext:marker-style-name="T81"><text:span text:style-name="T82">可變長度含 </text:span><text:span text:style-name="T147">Options</text:span><text:span text:style-name="T82">，效率低</text:span></text:p>
          </table:table-cell>
          <table:table-cell table:style-name="表格16.A3" office:value-type="string">
            <text:p text:style-name="P29" loext:marker-style-name="T81"><text:span text:style-name="T82">固定 </text:span><text:span text:style-name="T147">40 bytes</text:span><text:span text:style-name="T82">，轉送更快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1"><text:span text:style-name="T147">QoS</text:span><text:span text:style-name="T81"/></text:p>
          </table:table-cell>
          <table:table-cell table:style-name="表格16.A2" office:value-type="string">
            <text:p text:style-name="P29" loext:marker-style-name="T81"><text:span text:style-name="T82">無法標記優先權</text:span><text:span text:style-name="T81"/></text:p>
          </table:table-cell>
          <table:table-cell table:style-name="表格16.A2" office:value-type="string">
            <text:p text:style-name="P29" loext:marker-style-name="T81"><text:span text:style-name="T147">Flow Label </text:span><text:span text:style-name="T82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1"><text:span text:style-name="T82">廣播</text:span><text:span text:style-name="T81"/></text:p>
          </table:table-cell>
          <table:table-cell table:style-name="表格16.A3" office:value-type="string">
            <text:p text:style-name="P29" loext:marker-style-name="T81"><text:span text:style-name="T147">Broadcast </text:span><text:span text:style-name="T82">發給所有人</text:span></text:p>
          </table:table-cell>
          <table:table-cell table:style-name="表格16.A3" office:value-type="string">
            <text:p text:style-name="P29" loext:marker-style-name="T81"><text:span text:style-name="T82">改用 </text:span><text:span text:style-name="T147">Multicast</text:span><text:span text:style-name="T82">／</text:span><text:span text:style-name="T147">Anycast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1"><text:span text:style-name="T147">IP </text:span><text:span text:style-name="T82">配置</text:span></text:p>
          </table:table-cell>
          <table:table-cell table:style-name="表格16.A2" office:value-type="string">
            <text:p text:style-name="P29" loext:marker-style-name="T81"><text:span text:style-name="T82">手動或 </text:span><text:span text:style-name="T147">DHCP</text:span><text:span text:style-name="T82">，繁瑣</text:span></text:p>
          </table:table-cell>
          <table:table-cell table:style-name="表格16.A2" office:value-type="string">
            <text:p text:style-name="P29" loext:marker-style-name="T81"><text:span text:style-name="T147">SLAAC </text:span><text:span text:style-name="T82">無狀態自動配置</text:span></text:p>
          </table:table-cell>
        </table:table-row>
      </table:table>
      <text:h text:style-name="P12" text:outline-level="3"><text:span text:style-name="T198">▍</text:span><text:span text:style-name="T199"> ④ TCP </text:span><text:span text:style-name="T200">丟包處理（第五篇 </text:span><text:span text:style-name="T199">· </text:span><text:span text:style-name="T200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4" loext:marker-style-name="T67"><text:span text:style-name="T68">丟包偵測</text:span><text:span text:style-name="T67"/></text:p>
            </table:table-cell>
            <table:table-cell table:style-name="表格17.A1" office:value-type="string">
              <text:p text:style-name="P4" loext:marker-style-name="T67"><text:span text:style-name="T68">代表意義</text:span><text:span text:style-name="T67"/></text:p>
            </table:table-cell>
            <table:table-cell table:style-name="表格17.A1" office:value-type="string">
              <text:p text:style-name="P4" loext:marker-style-name="T67"><text:span text:style-name="T77">ssthresh</text:span><text:span text:style-name="T67"/></text:p>
            </table:table-cell>
            <table:table-cell table:style-name="表格17.A1" office:value-type="string">
              <text:p text:style-name="P4" loext:marker-style-name="T67"><text:span text:style-name="T77">cwnd</text:span><text:span text:style-name="T67"/></text:p>
            </table:table-cell>
            <table:table-cell table:style-name="表格17.A1" office:value-type="string">
              <text:p text:style-name="P4" loext:marker-style-name="T67"><text:span text:style-name="T68">下一階段</text:span><text:span text:style-name="T67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9" loext:marker-style-name="T81"><text:span text:style-name="T147">Timeout</text:span><text:span text:style-name="T82">（逾時）</text:span></text:p>
          </table:table-cell>
          <table:table-cell table:style-name="表格17.A2" office:value-type="string">
            <text:p text:style-name="P29" loext:marker-style-name="T81"><text:span text:style-name="T82">網路嚴重擁塞</text:span><text:span text:style-name="T81"/></text:p>
          </table:table-cell>
          <table:table-cell table:style-name="表格17.A2" office:value-type="string">
            <text:p text:style-name="P29" loext:marker-style-name="T81"><text:span text:style-name="T147">= cwnd / 2</text:span><text:span text:style-name="T81"/></text:p>
          </table:table-cell>
          <table:table-cell table:style-name="表格17.A2" office:value-type="string">
            <text:p text:style-name="P29" loext:marker-style-name="T223"><text:span text:style-name="T224">重設為 </text:span><text:span text:style-name="T232">1</text:span></text:p>
          </table:table-cell>
          <table:table-cell table:style-name="表格17.A2" office:value-type="string">
            <text:p text:style-name="P29" loext:marker-style-name="T81"><text:span text:style-name="T82">重回 </text:span><text:span text:style-name="T147">Slow Start</text:span></text:p>
          </table:table-cell>
        </table:table-row>
        <table:table-row table:style-name="表格17.1">
          <table:table-cell table:style-name="表格17.A3" office:value-type="string">
            <text:p text:style-name="P29" loext:marker-style-name="T81"><text:span text:style-name="T147">3 </text:span><text:span text:style-name="T82">個重複 </text:span><text:span text:style-name="T147">ACK</text:span></text:p>
          </table:table-cell>
          <table:table-cell table:style-name="表格17.A3" office:value-type="string">
            <text:p text:style-name="P29" loext:marker-style-name="T81"><text:span text:style-name="T82">單一封包遺失</text:span><text:span text:style-name="T81"/></text:p>
          </table:table-cell>
          <table:table-cell table:style-name="表格17.A3" office:value-type="string">
            <text:p text:style-name="P29" loext:marker-style-name="T81"><text:span text:style-name="T147">= cwnd / 2</text:span><text:span text:style-name="T81"/></text:p>
          </table:table-cell>
          <table:table-cell table:style-name="表格17.A3" office:value-type="string">
            <text:p text:style-name="P29" loext:marker-style-name="T31"><text:span text:style-name="T39">= ssthresh</text:span><text:span text:style-name="T32">（減半）</text:span></text:p>
          </table:table-cell>
          <table:table-cell table:style-name="表格17.A3" office:value-type="string">
            <text:p text:style-name="P29" loext:marker-style-name="T81"><text:span text:style-name="T82">續 </text:span><text:span text:style-name="T147">Congestion Avoidance</text:span></text:p>
          </table:table-cell>
        </table:table-row>
      </table:table>
      <text:h text:style-name="P12" text:outline-level="3"><text:span text:style-name="T198">▍</text:span><text:span text:style-name="T199"> ⑤ BGP </text:span><text:span text:style-name="T200">選路九步（前面贏就停 </text:span><text:span text:style-name="T199">· </text:span><text:span text:style-name="T200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6" loext:marker-style-name="T67"><text:span text:style-name="T68">順序</text:span><text:span text:style-name="T67"/></text:p>
            </table:table-cell>
            <table:table-cell table:style-name="表格18.A1" office:value-type="string">
              <text:p text:style-name="P26" loext:marker-style-name="T67"><text:span text:style-name="T68">屬性</text:span><text:span text:style-name="T67"/></text:p>
            </table:table-cell>
            <table:table-cell table:style-name="表格18.A1" office:value-type="string">
              <text:p text:style-name="P26" loext:marker-style-name="T67"><text:span text:style-name="T68">規則／備註</text:span><text:span text:style-name="T67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8" loext:marker-style-name="T81"><text:span text:style-name="T147">①</text:span><text:span text:style-name="T81"/></text:p>
          </table:table-cell>
          <table:table-cell table:style-name="表格18.A2" office:value-type="string">
            <text:p text:style-name="P29" loext:marker-style-name="T81"><text:span text:style-name="T147">Weight</text:span><text:span text:style-name="T81"/></text:p>
          </table:table-cell>
          <table:table-cell table:style-name="表格18.A2" office:value-type="string">
            <text:p text:style-name="P29" loext:marker-style-name="T81"><text:span text:style-name="T82">數值越高越優先 ⚠️ </text:span><text:span text:style-name="T147">Cisco </text:span><text:span text:style-name="T82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1"><text:span text:style-name="T147">②</text:span><text:span text:style-name="T81"/></text:p>
          </table:table-cell>
          <table:table-cell table:style-name="表格18.A3" office:value-type="string">
            <text:p text:style-name="P29" loext:marker-style-name="T31"><text:span text:style-name="T39">Local Preference</text:span><text:span text:style-name="T31"/></text:p>
          </table:table-cell>
          <table:table-cell table:style-name="表格18.A3" office:value-type="string">
            <text:p text:style-name="P29" loext:marker-style-name="T31"><text:span text:style-name="T32">數值越高越優先 ✅ 最重要的「通用」屬性</text:span><text:span text:style-name="T31"/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1"><text:span text:style-name="T147">③</text:span><text:span text:style-name="T81"/></text:p>
          </table:table-cell>
          <table:table-cell table:style-name="表格18.A2" office:value-type="string">
            <text:p text:style-name="P29" loext:marker-style-name="T81"><text:span text:style-name="T82">本地產生</text:span><text:span text:style-name="T81"/></text:p>
          </table:table-cell>
          <table:table-cell table:style-name="表格18.A2" office:value-type="string">
            <text:p text:style-name="P29" loext:marker-style-name="T81"><text:span text:style-name="T147">network / aggregate </text:span><text:span text:style-name="T82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1"><text:span text:style-name="T147">④</text:span><text:span text:style-name="T81"/></text:p>
          </table:table-cell>
          <table:table-cell table:style-name="表格18.A3" office:value-type="string">
            <text:p text:style-name="P29" loext:marker-style-name="T81"><text:span text:style-name="T147">AS-PATH</text:span><text:span text:style-name="T81"/></text:p>
          </table:table-cell>
          <table:table-cell table:style-name="表格18.A3" office:value-type="string">
            <text:p text:style-name="P29" loext:marker-style-name="T81"><text:span text:style-name="T82">路徑越短（經過 </text:span><text:span text:style-name="T147">AS </text:span><text:span text:style-name="T82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1"><text:span text:style-name="T147">⑤</text:span><text:span text:style-name="T81"/></text:p>
          </table:table-cell>
          <table:table-cell table:style-name="表格18.A2" office:value-type="string">
            <text:p text:style-name="P29" loext:marker-style-name="T81"><text:span text:style-name="T147">Origin</text:span><text:span text:style-name="T81"/></text:p>
          </table:table-cell>
          <table:table-cell table:style-name="表格18.A2" office:value-type="string">
            <text:p text:style-name="P29" loext:marker-style-name="T81"><text:span text:style-name="T147">IGP &gt; EGP &gt; Incomplete</text:span><text:span text:style-name="T81"/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1"><text:span text:style-name="T147">⑥</text:span><text:span text:style-name="T81"/></text:p>
          </table:table-cell>
          <table:table-cell table:style-name="表格18.A3" office:value-type="string">
            <text:p text:style-name="P29" loext:marker-style-name="T81"><text:span text:style-name="T147">MED</text:span><text:span text:style-name="T81"/></text:p>
          </table:table-cell>
          <table:table-cell table:style-name="表格18.A3" office:value-type="string">
            <text:p text:style-name="P29" loext:marker-style-name="T81"><text:span text:style-name="T82">數值越小越優先（只比同一 </text:span><text:span text:style-name="T147">AS </text:span><text:span text:style-name="T82">來的路由）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1"><text:span text:style-name="T147">⑦</text:span><text:span text:style-name="T81"/></text:p>
          </table:table-cell>
          <table:table-cell table:style-name="表格18.A2" office:value-type="string">
            <text:p text:style-name="P29" loext:marker-style-name="T81"><text:span text:style-name="T147">eBGP vs iBGP</text:span><text:span text:style-name="T81"/></text:p>
          </table:table-cell>
          <table:table-cell table:style-name="表格18.A2" office:value-type="string">
            <text:p text:style-name="P29" loext:marker-style-name="T81"><text:span text:style-name="T147">eBGP </text:span><text:span text:style-name="T82">優先於 </text:span><text:span text:style-name="T147">iBGP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1"><text:span text:style-name="T147">⑧</text:span><text:span text:style-name="T81"/></text:p>
          </table:table-cell>
          <table:table-cell table:style-name="表格18.A3" office:value-type="string">
            <text:p text:style-name="P29" loext:marker-style-name="T81"><text:span text:style-name="T147">IGP cost</text:span><text:span text:style-name="T81"/></text:p>
          </table:table-cell>
          <table:table-cell table:style-name="表格18.A3" office:value-type="string">
            <text:p text:style-name="P29" loext:marker-style-name="T81"><text:span text:style-name="T82">到 </text:span><text:span text:style-name="T147">next-hop </text:span><text:span text:style-name="T82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1"><text:span text:style-name="T147">⑨</text:span><text:span text:style-name="T81"/></text:p>
          </table:table-cell>
          <table:table-cell table:style-name="表格18.A2" office:value-type="string">
            <text:p text:style-name="P29" loext:marker-style-name="T81"><text:span text:style-name="T147">Router ID</text:span><text:span text:style-name="T81"/></text:p>
          </table:table-cell>
          <table:table-cell table:style-name="表格18.A2" office:value-type="string">
            <text:p text:style-name="P29" loext:marker-style-name="T81"><text:span text:style-name="T147">Router ID </text:span><text:span text:style-name="T82">最小者優先（最後決勝點）</text:span></text:p>
          </table:table-cell>
        </table:table-row>
      </table:table>
      <text:h text:style-name="P12" text:outline-level="3"><text:span text:style-name="T198">▍</text:span><text:span text:style-name="T199"> ⑥ OSPF </text:span><text:span text:style-name="T200">四種 </text:span><text:span text:style-name="T199">Router</text:span><text:span text:style-name="T200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4" loext:marker-style-name="T67"><text:span text:style-name="T68">類型</text:span><text:span text:style-name="T67"/></text:p>
            </table:table-cell>
            <table:table-cell table:style-name="表格19.A1" office:value-type="string">
              <text:p text:style-name="P4" loext:marker-style-name="T67"><text:span text:style-name="T68">本質</text:span><text:span text:style-name="T67"/></text:p>
            </table:table-cell>
            <table:table-cell table:style-name="表格19.A1" office:value-type="string">
              <text:p text:style-name="P4" loext:marker-style-name="T67"><text:span text:style-name="T68">核心記憶點</text:span><text:span text:style-name="T6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9" loext:marker-style-name="T81"><text:span text:style-name="T147">Internal</text:span><text:span text:style-name="T81"/></text:p>
          </table:table-cell>
          <table:table-cell table:style-name="表格19.A2" office:value-type="string">
            <text:p text:style-name="P29" loext:marker-style-name="T81"><text:span text:style-name="T82">不出 </text:span><text:span text:style-name="T147">Area</text:span></text:p>
          </table:table-cell>
          <table:table-cell table:style-name="表格19.A2" office:value-type="string">
            <text:p text:style-name="P29" loext:marker-style-name="T81"><text:span text:style-name="T82">只負責自己這一區，對外一無所知</text:span><text:span text:style-name="T81"/></text:p>
          </table:table-cell>
        </table:table-row>
        <table:table-row table:style-name="表格19.1">
          <table:table-cell table:style-name="表格19.A3" office:value-type="string">
            <text:p text:style-name="P29" loext:marker-style-name="T81"><text:span text:style-name="T147">Backbone</text:span><text:span text:style-name="T81"/></text:p>
          </table:table-cell>
          <table:table-cell table:style-name="表格19.A3" office:value-type="string">
            <text:p text:style-name="P29" loext:marker-style-name="T81"><text:span text:style-name="T82">在 </text:span><text:span text:style-name="T147">Area 0</text:span></text:p>
          </table:table-cell>
          <table:table-cell table:style-name="表格19.A3" office:value-type="string">
            <text:p text:style-name="P29" loext:marker-style-name="T81"><text:span text:style-name="T82">城市主幹道節點，跨區流量必經</text:span><text:span text:style-name="T81"/></text:p>
          </table:table-cell>
        </table:table-row>
        <table:table-row table:style-name="表格19.1">
          <table:table-cell table:style-name="表格19.A2" office:value-type="string">
            <text:p text:style-name="P29" loext:marker-style-name="T81"><text:span text:style-name="T147">ABR</text:span><text:span text:style-name="T81"/></text:p>
          </table:table-cell>
          <table:table-cell table:style-name="表格19.A2" office:value-type="string">
            <text:p text:style-name="P29" loext:marker-style-name="T81"><text:span text:style-name="T82">跨 </text:span><text:span text:style-name="T147">Area </text:span><text:span text:style-name="T82">橋樑</text:span></text:p>
          </table:table-cell>
          <table:table-cell table:style-name="表格19.A2" office:value-type="string">
            <text:p text:style-name="P29" loext:marker-style-name="T81"><text:span text:style-name="T82">一端連 </text:span><text:span text:style-name="T147">Area 0</text:span><text:span text:style-name="T82">、一端連其他 </text:span><text:span text:style-name="T147">Area</text:span><text:span text:style-name="T82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9" loext:marker-style-name="T81"><text:span text:style-name="T147">ASBR</text:span><text:span text:style-name="T81"/></text:p>
          </table:table-cell>
          <table:table-cell table:style-name="表格19.A3" office:value-type="string">
            <text:p text:style-name="P29" loext:marker-style-name="T81"><text:span text:style-name="T82">跨 </text:span><text:span text:style-name="T147">AS </text:span><text:span text:style-name="T82">入口</text:span></text:p>
          </table:table-cell>
          <table:table-cell table:style-name="表格19.A3" office:value-type="string">
            <text:p text:style-name="P29" loext:marker-style-name="T81"><text:span text:style-name="T82">把外部路由（</text:span><text:span text:style-name="T147">BGP </text:span><text:span text:style-name="T82">等）帶進 </text:span><text:span text:style-name="T147">OSPF</text:span><text:span text:style-name="T82">，是對外的大門</text:span></text:p>
          </table:table-cell>
        </table:table-row>
      </table:table>
      <text:h text:style-name="P12" text:outline-level="3"><text:span text:style-name="T198">▍</text:span><text:span text:style-name="T199"> ⑦ </text:span><text:span text:style-name="T200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6" loext:marker-style-name="T67"><text:span text:style-name="T68">能力</text:span><text:span text:style-name="T67"/></text:p>
            </table:table-cell>
            <table:table-cell table:style-name="表格20.A1" office:value-type="string">
              <text:p text:style-name="P26" loext:marker-style-name="T67"><text:span text:style-name="T77">FW</text:span><text:span text:style-name="T67"/></text:p>
            </table:table-cell>
            <table:table-cell table:style-name="表格20.A1" office:value-type="string">
              <text:p text:style-name="P26" loext:marker-style-name="T67"><text:span text:style-name="T77">WAF</text:span><text:span text:style-name="T67"/></text:p>
            </table:table-cell>
            <table:table-cell table:style-name="表格20.A1" office:value-type="string">
              <text:p text:style-name="P26" loext:marker-style-name="T67"><text:span text:style-name="T77">NGFW</text:span><text:span text:style-name="T67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9" loext:marker-style-name="T81"><text:span text:style-name="T147">IP / Port </text:span><text:span text:style-name="T82">過濾</text:span></text:p>
          </table:table-cell>
          <table:table-cell table:style-name="表格20.A2" office:value-type="string">
            <text:p text:style-name="P28" loext:marker-style-name="T239"><text:span text:style-name="T244">○</text:span><text:span text:style-name="T239"/></text:p>
          </table:table-cell>
          <table:table-cell table:style-name="表格20.A2" office:value-type="string">
            <text:p text:style-name="P28" loext:marker-style-name="T239"><text:span text:style-name="T244">○</text:span><text:span text:style-name="T239"/></text:p>
          </table:table-cell>
          <table:table-cell table:style-name="表格20.A2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1"><text:span text:style-name="T147">HTTP </text:span><text:span text:style-name="T82">內容檢查</text:span></text:p>
          </table:table-cell>
          <table:table-cell table:style-name="表格20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20.A3" office:value-type="string">
            <text:p text:style-name="P28" loext:marker-style-name="T239"><text:span text:style-name="T244">○</text:span><text:span text:style-name="T239"/></text:p>
          </table:table-cell>
          <table:table-cell table:style-name="表格20.A3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1"><text:span text:style-name="T147">DPI </text:span><text:span text:style-name="T82">深度檢查</text:span></text:p>
          </table:table-cell>
          <table:table-cell table:style-name="表格20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20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20.A2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1"><text:span text:style-name="T147">App </text:span><text:span text:style-name="T82">識別 </text:span><text:span text:style-name="T147">/ IPS</text:span></text:p>
          </table:table-cell>
          <table:table-cell table:style-name="表格20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20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20.A3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1"><text:span text:style-name="T147">OSI </text:span><text:span text:style-name="T82">層</text:span></text:p>
          </table:table-cell>
          <table:table-cell table:style-name="表格20.A2" office:value-type="string">
            <text:p text:style-name="P28" loext:marker-style-name="T81"><text:span text:style-name="T147">L3 / L4</text:span><text:span text:style-name="T81"/></text:p>
          </table:table-cell>
          <table:table-cell table:style-name="表格20.A2" office:value-type="string">
            <text:p text:style-name="P28" loext:marker-style-name="T31"><text:span text:style-name="T39">L7</text:span><text:span text:style-name="T31"/></text:p>
          </table:table-cell>
          <table:table-cell table:style-name="表格20.A2" office:value-type="string">
            <text:p text:style-name="P28" loext:marker-style-name="T81"><text:span text:style-name="T147">L3–L7</text:span><text:span text:style-name="T81"/></text:p>
          </table:table-cell>
        </table:table-row>
      </table:table>
      <text:h text:style-name="P12" text:outline-level="3"><text:span text:style-name="T198">▍</text:span><text:span text:style-name="T199"> ⑧ </text:span><text:span text:style-name="T200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4" loext:marker-style-name="T67"><text:span text:style-name="T68">工具</text:span><text:span text:style-name="T67"/></text:p>
            </table:table-cell>
            <table:table-cell table:style-name="表格21.A1" office:value-type="string">
              <text:p text:style-name="P4" loext:marker-style-name="T67"><text:span text:style-name="T68">角色</text:span><text:span text:style-name="T67"/></text:p>
            </table:table-cell>
            <table:table-cell table:style-name="表格21.A1" office:value-type="string">
              <text:p text:style-name="P4" loext:marker-style-name="T67"><text:span text:style-name="T68">關鍵差異</text:span><text:span text:style-name="T67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9" loext:marker-style-name="T81"><text:span text:style-name="T147">Firewall</text:span><text:span text:style-name="T81"/></text:p>
          </table:table-cell>
          <table:table-cell table:style-name="表格21.A2" office:value-type="string">
            <text:p text:style-name="P29" loext:marker-style-name="T81"><text:span text:style-name="T82">大門警衛</text:span><text:span text:style-name="T81"/></text:p>
          </table:table-cell>
          <table:table-cell table:style-name="表格21.A2" office:value-type="string">
            <text:p text:style-name="P29" loext:marker-style-name="T81"><text:span text:style-name="T82">依 </text:span><text:span text:style-name="T147">IP / Port / </text:span><text:span text:style-name="T82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1"><text:span text:style-name="T147">IDS</text:span><text:span text:style-name="T81"/></text:p>
          </table:table-cell>
          <table:table-cell table:style-name="表格21.A3" office:value-type="string">
            <text:p text:style-name="P29" loext:marker-style-name="T81"><text:span text:style-name="T82">監視器（只看）</text:span><text:span text:style-name="T81"/></text:p>
          </table:table-cell>
          <table:table-cell table:style-name="表格21.A3" office:value-type="string">
            <text:p text:style-name="P29" loext:marker-style-name="T81"><text:span text:style-name="T82">偵測異常 → 只發警報，不阻擋</text:span><text:span text:style-name="T81"/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1"><text:span text:style-name="T147">IPS</text:span><text:span text:style-name="T81"/></text:p>
          </table:table-cell>
          <table:table-cell table:style-name="表格21.A2" office:value-type="string">
            <text:p text:style-name="P29" loext:marker-style-name="T81"><text:span text:style-name="T82">監視器＋警衛</text:span><text:span text:style-name="T81"/></text:p>
          </table:table-cell>
          <table:table-cell table:style-name="表格21.A2" office:value-type="string">
            <text:p text:style-name="P29" loext:marker-style-name="T81"><text:span text:style-name="T82">偵測異常 → 自動阻擋（</text:span><text:span text:style-name="T147">IDS </text:span><text:span text:style-name="T82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1"><text:span text:style-name="T147">HIDS</text:span><text:span text:style-name="T81"/></text:p>
          </table:table-cell>
          <table:table-cell table:style-name="表格21.A3" office:value-type="string">
            <text:p text:style-name="P29" loext:marker-style-name="T81"><text:span text:style-name="T82">主機型</text:span><text:span text:style-name="T81"/></text:p>
          </table:table-cell>
          <table:table-cell table:style-name="表格21.A3" office:value-type="string">
            <text:p text:style-name="P29" loext:marker-style-name="T81"><text:span text:style-name="T82">看主機 </text:span><text:span text:style-name="T147">Log</text:span><text:span text:style-name="T82">／系統行為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1"><text:span text:style-name="T147">NIDS</text:span><text:span text:style-name="T81"/></text:p>
          </table:table-cell>
          <table:table-cell table:style-name="表格21.A2" office:value-type="string">
            <text:p text:style-name="P29" loext:marker-style-name="T81"><text:span text:style-name="T82">網路型</text:span><text:span text:style-name="T81"/></text:p>
          </table:table-cell>
          <table:table-cell table:style-name="表格21.A2" office:value-type="string">
            <text:p text:style-name="P29" loext:marker-style-name="T81"><text:span text:style-name="T82">看網路封包／流量</text:span><text:span text:style-name="T81"/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1"><text:span text:style-name="T147">SNMP</text:span><text:span text:style-name="T81"/></text:p>
          </table:table-cell>
          <table:table-cell table:style-name="表格21.A3" office:value-type="string">
            <text:p text:style-name="P29" loext:marker-style-name="T81"><text:span text:style-name="T82">管理室</text:span><text:span text:style-name="T81"/></text:p>
          </table:table-cell>
          <table:table-cell table:style-name="表格21.A3" office:value-type="string">
            <text:p text:style-name="P29" loext:marker-style-name="T81"><text:span text:style-name="T82">管理設備狀態（應用層／</text:span><text:span text:style-name="T147">UDP</text:span><text:span text:style-name="T82">）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1"><text:span text:style-name="T147">ICMP</text:span><text:span text:style-name="T81"/></text:p>
          </table:table-cell>
          <table:table-cell table:style-name="表格21.A2" office:value-type="string">
            <text:p text:style-name="P29" loext:marker-style-name="T81"><text:span text:style-name="T82">網路測試員</text:span><text:span text:style-name="T81"/></text:p>
          </table:table-cell>
          <table:table-cell table:style-name="表格21.A2" office:value-type="string">
            <text:p text:style-name="P29" loext:marker-style-name="T81"><text:span text:style-name="T82">診斷網路連線（網路層／</text:span><text:span text:style-name="T147">Ping</text:span><text:span text:style-name="T82">）</text:span></text:p>
          </table:table-cell>
        </table:table-row>
      </table:table>
      <text:h text:style-name="P12" text:outline-level="3"><text:span text:style-name="T198">▍</text:span><text:span text:style-name="T199"> ⑨ IOC </text:span><text:span text:style-name="T200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6" loext:marker-style-name="T67"><text:span text:style-name="T68">口訣</text:span><text:span text:style-name="T67"/></text:p>
            </table:table-cell>
            <table:table-cell table:style-name="表格22.A1" office:value-type="string">
              <text:p text:style-name="P26" loext:marker-style-name="T67"><text:span text:style-name="T77">IOC </text:span><text:span text:style-name="T68">類型</text:span></text:p>
            </table:table-cell>
            <table:table-cell table:style-name="表格22.A1" office:value-type="string">
              <text:p text:style-name="P26" loext:marker-style-name="T67"><text:span text:style-name="T68">白話</text:span><text:span text:style-name="T67"/></text:p>
            </table:table-cell>
            <table:table-cell table:style-name="表格22.A1" office:value-type="string">
              <text:p text:style-name="P26" loext:marker-style-name="T67"><text:span text:style-name="T68">對應防禦</text:span><text:span text:style-name="T67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8" loext:marker-style-name="T248"><text:span text:style-name="T249">網</text:span><text:span text:style-name="T248"/></text:p>
          </table:table-cell>
          <table:table-cell table:style-name="表格22.A2" office:value-type="string">
            <text:p text:style-name="P29" loext:marker-style-name="T81"><text:span text:style-name="T82">惡意 </text:span><text:span text:style-name="T147">Domain</text:span></text:p>
          </table:table-cell>
          <table:table-cell table:style-name="表格22.A2" office:value-type="string">
            <text:p text:style-name="P29" loext:marker-style-name="T81"><text:span text:style-name="T82">釣魚網站網址</text:span><text:span text:style-name="T81"/></text:p>
          </table:table-cell>
          <table:table-cell table:style-name="表格22.A2" office:value-type="string">
            <text:p text:style-name="P29" loext:marker-style-name="T81"><text:span text:style-name="T147">DNS </text:span><text:span text:style-name="T82">封鎖網域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48"><text:span text:style-name="T249">檔</text:span><text:span text:style-name="T248"/></text:p>
          </table:table-cell>
          <table:table-cell table:style-name="表格22.A3" office:value-type="string">
            <text:p text:style-name="P29" loext:marker-style-name="T81"><text:span text:style-name="T82">惡意 </text:span><text:span text:style-name="T147">Hash</text:span></text:p>
          </table:table-cell>
          <table:table-cell table:style-name="表格22.A3" office:value-type="string">
            <text:p text:style-name="P29" loext:marker-style-name="T81"><text:span text:style-name="T82">惡意程式特徵碼（改名也認得）</text:span><text:span text:style-name="T81"/></text:p>
          </table:table-cell>
          <table:table-cell table:style-name="表格22.A3" office:value-type="string">
            <text:p text:style-name="P29" loext:marker-style-name="T81"><text:span text:style-name="T82">防毒比對特徵</text:span><text:span text:style-name="T81"/></text:p>
          </table:table-cell>
        </table:table-row>
        <table:table-row table:style-name="表格22.1">
          <table:table-cell table:style-name="表格22.A2" office:value-type="string">
            <text:p text:style-name="P28" loext:marker-style-name="T248"><text:span text:style-name="T249">連</text:span><text:span text:style-name="T248"/></text:p>
          </table:table-cell>
          <table:table-cell table:style-name="表格22.A2" office:value-type="string">
            <text:p text:style-name="P29" loext:marker-style-name="T81"><text:span text:style-name="T82">惡意 </text:span><text:span text:style-name="T147">IP</text:span></text:p>
          </table:table-cell>
          <table:table-cell table:style-name="表格22.A2" office:value-type="string">
            <text:p text:style-name="P29" loext:marker-style-name="T81"><text:span text:style-name="T82">感染後對外異常連線目標</text:span><text:span text:style-name="T81"/></text:p>
          </table:table-cell>
          <table:table-cell table:style-name="表格22.A2" office:value-type="string">
            <text:p text:style-name="P29" loext:marker-style-name="T81"><text:span text:style-name="T147">FW / NGFW </text:span><text:span text:style-name="T82">封鎖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48"><text:span text:style-name="T249">控</text:span><text:span text:style-name="T248"/></text:p>
          </table:table-cell>
          <table:table-cell table:style-name="表格22.A3" office:value-type="string">
            <text:p text:style-name="P29" loext:marker-style-name="T81"><text:span text:style-name="T147">C2 Server</text:span><text:span text:style-name="T81"/></text:p>
          </table:table-cell>
          <table:table-cell table:style-name="表格22.A3" office:value-type="string">
            <text:p text:style-name="P29" loext:marker-style-name="T81"><text:span text:style-name="T82">駭客遠端操控總部</text:span><text:span text:style-name="T81"/></text:p>
          </table:table-cell>
          <table:table-cell table:style-name="表格22.A3" office:value-type="string">
            <text:p text:style-name="P29" loext:marker-style-name="T81"><text:span text:style-name="T147">SIEM / IDS </text:span><text:span text:style-name="T82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7"><text:span text:style-name="T214">必記：</text:span><text:span text:style-name="T155">IOC </text:span><text:span text:style-name="T97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⑩ DNS </text:span><text:span text:style-name="T200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4" loext:marker-style-name="T71"><text:span text:style-name="T72">項目</text:span><text:span text:style-name="T71"/></text:p>
            </table:table-cell>
            <table:table-cell table:style-name="表格23.A1" office:value-type="string">
              <text:p text:style-name="P4" loext:marker-style-name="T71"><text:span text:style-name="T78">Recursive </text:span><text:span text:style-name="T72">遞迴</text:span></text:p>
            </table:table-cell>
            <table:table-cell table:style-name="表格23.A1" office:value-type="string">
              <text:p text:style-name="P4" loext:marker-style-name="T71"><text:span text:style-name="T78">Iterative </text:span><text:span text:style-name="T72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9" loext:marker-style-name="T121"><text:span text:style-name="T122">口訣</text:span><text:span text:style-name="T121"/></text:p>
          </table:table-cell>
          <table:table-cell table:style-name="表格23.A2" office:value-type="string">
            <text:p text:style-name="P29" loext:marker-style-name="T206"><text:span text:style-name="T207">代查到底</text:span><text:span text:style-name="T206"/></text:p>
          </table:table-cell>
          <table:table-cell table:style-name="表格23.A2" office:value-type="string">
            <text:p text:style-name="P29" loext:marker-style-name="T33"><text:span text:style-name="T34">逐層詢問</text:span><text:span text:style-name="T33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21"><text:span text:style-name="T122">誰去問</text:span><text:span text:style-name="T121"/></text:p>
          </table:table-cell>
          <table:table-cell table:style-name="表格23.A3" office:value-type="string">
            <text:p text:style-name="P29" loext:marker-style-name="T121"><text:span text:style-name="T175">DNS </text:span><text:span text:style-name="T122">伺服器代你問完</text:span></text:p>
          </table:table-cell>
          <table:table-cell table:style-name="表格23.A3" office:value-type="string">
            <text:p text:style-name="P29" loext:marker-style-name="T121"><text:span text:style-name="T122">你自己逐層查詢</text:span><text:span text:style-name="T121"/></text:p>
          </table:table-cell>
        </table:table-row>
        <table:table-row table:style-name="表格23.1">
          <table:table-cell table:style-name="表格23.A2" office:value-type="string">
            <text:p text:style-name="P29" loext:marker-style-name="T121"><text:span text:style-name="T122">問幾次</text:span><text:span text:style-name="T121"/></text:p>
          </table:table-cell>
          <table:table-cell table:style-name="表格23.A2" office:value-type="string">
            <text:p text:style-name="P29" loext:marker-style-name="T121"><text:span text:style-name="T122">只問 </text:span><text:span text:style-name="T175">1 </text:span><text:span text:style-name="T122">次</text:span></text:p>
          </table:table-cell>
          <table:table-cell table:style-name="表格23.A2" office:value-type="string">
            <text:p text:style-name="P29" loext:marker-style-name="T121"><text:span text:style-name="T122">每層各問一次，共多次</text:span><text:span text:style-name="T121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21"><text:span text:style-name="T122">常見場合</text:span><text:span text:style-name="T121"/></text:p>
          </table:table-cell>
          <table:table-cell table:style-name="表格23.A3" office:value-type="string">
            <text:p text:style-name="P29" loext:marker-style-name="T121"><text:span text:style-name="T122">一般使用者 → </text:span><text:span text:style-name="T175">Local DNS</text:span></text:p>
          </table:table-cell>
          <table:table-cell table:style-name="表格23.A3" office:value-type="string">
            <text:p text:style-name="P29" loext:marker-style-name="T121"><text:span text:style-name="T175">DNS </text:span><text:span text:style-name="T122">伺服器之間互查</text:span></text:p>
          </table:table-cell>
        </table:table-row>
      </table:table>
      <text:h text:style-name="P12" text:outline-level="3"><text:soft-page-break/><text:span text:style-name="T198">▍</text:span><text:span text:style-name="T199"> ⑪ </text:span><text:span text:style-name="T200">企業資安關鍵對：</text:span><text:span text:style-name="T199">RTO/RPO</text:span><text:span text:style-name="T200">、</text:span><text:span text:style-name="T199">EDR/MDR</text:span><text:span text:style-name="T200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4" loext:marker-style-name="T67"><text:span text:style-name="T68">指標 </text:span><text:span text:style-name="T77">/ </text:span><text:span text:style-name="T68">名詞</text:span></text:p>
            </table:table-cell>
            <table:table-cell table:style-name="表格24.A1" office:value-type="string">
              <text:p text:style-name="P4" loext:marker-style-name="T67"><text:span text:style-name="T68">意義</text:span><text:span text:style-name="T67"/></text:p>
            </table:table-cell>
            <table:table-cell table:style-name="表格24.A1" office:value-type="string">
              <text:p text:style-name="P4" loext:marker-style-name="T67"><text:span text:style-name="T68">一句話記憶</text:span><text:span text:style-name="T67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9" loext:marker-style-name="T81"><text:span text:style-name="T147">RTO</text:span><text:span text:style-name="T81"/></text:p>
          </table:table-cell>
          <table:table-cell table:style-name="表格24.A2" office:value-type="string">
            <text:p text:style-name="P29" loext:marker-style-name="T81"><text:span text:style-name="T147">Recovery Time Objective </text:span><text:span text:style-name="T82">復原時間目標</text:span></text:p>
          </table:table-cell>
          <table:table-cell table:style-name="表格24.A2" office:value-type="string">
            <text:p text:style-name="P29" loext:marker-style-name="T51"><text:span text:style-name="T52">停機時間（能停多久）</text:span><text:span text:style-name="T51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1"><text:span text:style-name="T147">RPO</text:span><text:span text:style-name="T81"/></text:p>
          </table:table-cell>
          <table:table-cell table:style-name="表格24.A3" office:value-type="string">
            <text:p text:style-name="P29" loext:marker-style-name="T81"><text:span text:style-name="T147">Recovery Point Objective </text:span><text:span text:style-name="T82">復原點目標</text:span></text:p>
          </table:table-cell>
          <table:table-cell table:style-name="表格24.A3" office:value-type="string">
            <text:p text:style-name="P29" loext:marker-style-name="T51"><text:span text:style-name="T52">資料損失量（能丟幾小時）</text:span><text:span text:style-name="T51"/></text:p>
          </table:table-cell>
        </table:table-row>
        <table:table-row table:style-name="表格24.1">
          <table:table-cell table:style-name="表格24.A2" office:value-type="string">
            <text:p text:style-name="P29" loext:marker-style-name="T81"><text:span text:style-name="T147">EDR</text:span><text:span text:style-name="T81"/></text:p>
          </table:table-cell>
          <table:table-cell table:style-name="表格24.A2" office:value-type="string">
            <text:p text:style-name="P29" loext:marker-style-name="T81"><text:span text:style-name="T147">Endpoint Detection &amp; Response</text:span><text:span text:style-name="T81"/></text:p>
          </table:table-cell>
          <table:table-cell table:style-name="表格24.A2" office:value-type="string">
            <text:p text:style-name="P29" loext:marker-style-name="T81"><text:span text:style-name="T82">自己買工具守（需內部資安人員）</text:span><text:span text:style-name="T81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1"><text:span text:style-name="T147">MDR</text:span><text:span text:style-name="T81"/></text:p>
          </table:table-cell>
          <table:table-cell table:style-name="表格24.A3" office:value-type="string">
            <text:p text:style-name="P29" loext:marker-style-name="T81"><text:span text:style-name="T147">Managed Detection &amp; Response</text:span><text:span text:style-name="T81"/></text:p>
          </table:table-cell>
          <table:table-cell table:style-name="表格24.A3" office:value-type="string">
            <text:p text:style-name="P29" loext:marker-style-name="T81"><text:span text:style-name="T82">請資安公司委外守（</text:span><text:span text:style-name="T147">24</text:span><text:span text:style-name="T82">／</text:span><text:span text:style-name="T147">7</text:span><text:span text:style-name="T82">，適合中小企業）</text:span></text:p>
          </table:table-cell>
        </table:table-row>
      </table:table>
      <text:h text:style-name="P12" text:outline-level="3"><text:span text:style-name="T198">▍</text:span><text:span text:style-name="T199"> ⑫ </text:span><text:span text:style-name="T200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6" loext:marker-style-name="T67"><text:span text:style-name="T77">Protocol </text:span><text:span text:style-name="T68">值</text:span></text:p>
            </table:table-cell>
            <table:table-cell table:style-name="表格25.A1" office:value-type="string">
              <text:p text:style-name="P26" loext:marker-style-name="T67"><text:span text:style-name="T77">DF Flag</text:span><text:span text:style-name="T67"/></text:p>
            </table:table-cell>
            <table:table-cell table:style-name="表格25.A1" office:value-type="string">
              <text:p text:style-name="P26" loext:marker-style-name="T67"><text:span text:style-name="T77">MF Flag</text:span><text:span text:style-name="T67"/></text:p>
            </table:table-cell>
            <table:table-cell table:style-name="表格25.A1" office:value-type="string">
              <text:p text:style-name="P26" loext:marker-style-name="T67"><text:span text:style-name="T68">關鍵公式</text:span><text:span text:style-name="T67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9" loext:marker-style-name="T81"><text:span text:style-name="T147">ICMP=1 / TCP=6 / UDP=17</text:span><text:span text:style-name="T81"/></text:p>
          </table:table-cell>
          <table:table-cell table:style-name="表格25.A2" office:value-type="string">
            <text:p text:style-name="P29" loext:marker-style-name="T81"><text:span text:style-name="T147">DF=1</text:span><text:span text:style-name="T82">：禁止切，太大就丟＋</text:span><text:span text:style-name="T147">ICMP</text:span></text:p>
          </table:table-cell>
          <table:table-cell table:style-name="表格25.A2" office:value-type="string">
            <text:p text:style-name="P29" loext:marker-style-name="T81"><text:span text:style-name="T147">MF=1</text:span><text:span text:style-name="T82">：後面還有分段（最後段</text:span><text:span text:style-name="T147">=0</text:span><text:span text:style-name="T82">）</text:span></text:p>
          </table:table-cell>
          <table:table-cell table:style-name="表格25.A2" office:value-type="string">
            <text:p text:style-name="P29" loext:marker-style-name="T31"><text:span text:style-name="T39">Offset=</text:span><text:span text:style-name="T32">起始</text:span><text:span text:style-name="T39">÷8</text:span><text:span text:style-name="T32">；</text:span><text:span text:style-name="T39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6"><text:span text:style-name="T196">✅ <text:s/></text:span><text:span text:style-name="T50">提醒</text:span></text:p>
            <text:p text:style-name="P7" loext:marker-style-name="T98"><text:span text:style-name="T97">以上即全書精華。接下來各篇為完整觀念詳解、生活比喻、申論寫法與考試陷阱，務必至少讀過一遍以建立理解，再用本篇反覆速記。</text:span><text:span text:style-name="T98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69"><text:span text:style-name="T70">第 一 篇　網路基礎架構：</text:span><text:span text:style-name="T69">OSI / TCP-IP · </text:span><text:span text:style-name="T70">協定 </text:span><text:span text:style-name="T69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><text:span text:style-name="T196">🌐 <text:s/></text:span><text:span text:style-name="T50">本篇重點</text:span></text:p>
            <text:p text:style-name="P7" loext:marker-style-name="T98"><text:span text:style-name="T97">本篇先建立整個網路的「分層」骨架，再逐層認識常見協定，最後切入網路層三大工作與兩個必考工具（</text:span><text:span text:style-name="T155">ARP</text:span><text:span text:style-name="T97">、</text:span><text:span text:style-name="T155">Traceroute</text:span><text:span text:style-name="T97">）。理解每一層的「責任」，比死背名詞更重要。</text:span></text:p>
          </table:table-cell>
        </table:table-row>
      </table:table>
      <text:h text:style-name="P11" text:outline-level="2" loext:marker-style-name="T27"><text:span text:style-name="T28">一、用「寄信」理解分層（修正版）</text:span><text:span text:style-name="T27"/></text:h>
      <text:p text:style-name="P35" loext:marker-style-name="T98"><text:span text:style-name="T97">每一層就像寄信流程中各自獨立的環節，各司其職、互不干涉：</text:span><text:span text:style-name="T98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4" loext:marker-style-name="T67"><text:span text:style-name="T77">TCP/IP </text:span><text:span text:style-name="T68">層</text:span></text:p>
            </table:table-cell>
            <table:table-cell table:style-name="表格27.A1" office:value-type="string">
              <text:p text:style-name="P4" loext:marker-style-name="T67"><text:span text:style-name="T68">郵寄比喻</text:span><text:span text:style-name="T67"/></text:p>
            </table:table-cell>
            <table:table-cell table:style-name="表格27.A1" office:value-type="string">
              <text:p text:style-name="P4" loext:marker-style-name="T67"><text:span text:style-name="T68">實際負責的事</text:span><text:span text:style-name="T67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9" loext:marker-style-name="T81"><text:span text:style-name="T147">🟢 </text:span><text:span text:style-name="T82">應用層 </text:span><text:span text:style-name="T147">Application</text:span></text:p>
          </table:table-cell>
          <table:table-cell table:style-name="表格27.A2" office:value-type="string">
            <text:p text:style-name="P29" loext:marker-style-name="T81"><text:span text:style-name="T82">決定「</text:span><text:span text:style-name="T84">寄什麼內容</text:span><text:span text:style-name="T82">」（信的內容與格式）</text:span></text:p>
          </table:table-cell>
          <table:table-cell table:style-name="表格27.A2" office:value-type="string">
            <text:p text:style-name="P29" loext:marker-style-name="T81"><text:span text:style-name="T147">HTTP</text:span><text:span text:style-name="T82">、</text:span><text:span text:style-name="T147">DNS</text:span><text:span text:style-name="T82">、</text:span><text:span text:style-name="T147">DHCP</text:span><text:span text:style-name="T82">、</text:span><text:span text:style-name="T147">SSH …</text:span><text:span text:style-name="T82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1"><text:span text:style-name="T147">🟡 </text:span><text:span text:style-name="T82">傳輸層 </text:span><text:span text:style-name="T147">Transport</text:span></text:p>
          </table:table-cell>
          <table:table-cell table:style-name="表格27.A3" office:value-type="string">
            <text:p text:style-name="P29" loext:marker-style-name="T262"><text:span text:style-name="T263">切分、編頁碼、確認收件</text:span><text:span text:style-name="T262"/></text:p>
          </table:table-cell>
          <table:table-cell table:style-name="表格27.A3" office:value-type="string">
            <text:p text:style-name="P29" loext:marker-style-name="T81"><text:span text:style-name="T147">TCP / UDP</text:span><text:span text:style-name="T82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9" loext:marker-style-name="T81"><text:span text:style-name="T147">🔵 </text:span><text:span text:style-name="T82">網路層 </text:span><text:span text:style-name="T147">Network</text:span></text:p>
          </table:table-cell>
          <table:table-cell table:style-name="表格27.A2" office:value-type="string">
            <text:p text:style-name="P29" loext:marker-style-name="T81"><text:span text:style-name="T266">寫地址＋規劃路線</text:span><text:span text:style-name="T82">（郵遞區號＋郵局選路）</text:span></text:p>
          </table:table-cell>
          <table:table-cell table:style-name="表格27.A2" office:value-type="string">
            <text:p text:style-name="P29" loext:marker-style-name="T267"><text:span text:style-name="T302">IP </text:span><text:span text:style-name="T268">路由、</text:span><text:span text:style-name="T302">ICMP</text:span><text:span text:style-name="T268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1"><text:span text:style-name="T147">🟠 </text:span><text:span text:style-name="T82">連結層 </text:span><text:span text:style-name="T147">Link</text:span></text:p>
          </table:table-cell>
          <table:table-cell table:style-name="表格27.A3" office:value-type="string">
            <text:p text:style-name="P29" loext:marker-style-name="T81"><text:span text:style-name="T82">當前路段的區域配送</text:span><text:span text:style-name="T81"/></text:p>
          </table:table-cell>
          <table:table-cell table:style-name="表格27.A3" office:value-type="string">
            <text:p text:style-name="P29" loext:marker-style-name="T329"><text:span text:style-name="T339">Ethernet</text:span><text:span text:style-name="T330">、</text:span><text:span text:style-name="T339">ARP</text:span><text:span text:style-name="T330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6"><text:span text:style-name="T196">⚠️ <text:s/></text:span><text:span text:style-name="T218">舊版三大比喻的錯誤</text:span></text:p>
            <text:p text:style-name="P7"><text:span text:style-name="T164">❌ </text:span><text:span text:style-name="T109">舊：「寫地址 → 應用層」　</text:span><text:span text:style-name="T155">IP </text:span><text:span text:style-name="T97">位址屬於網路層；應用層負責的是「內容與格式」，不是地址。</text:span></text:p>
            <text:p text:style-name="P8"><text:span text:style-name="T164">❌ </text:span><text:span text:style-name="T109">舊：「打包 → 傳輸層」　</text:span><text:span text:style-name="T97">傳輸層還負責切割、編號、重傳、流量控制，遠不只「打包」。</text:span></text:p>
            <text:p text:style-name="P8"><text:span text:style-name="T164">❌ </text:span><text:span text:style-name="T109">舊：「實際搬運 → 連結層」　</text:span><text:span text:style-name="T97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35" loext:marker-style-name="T98"><text:span text:style-name="T165">OSI </text:span><text:span text:style-name="T110">是理論模型（</text:span><text:span text:style-name="T165">7 </text:span><text:span text:style-name="T110">層）</text:span><text:span text:style-name="T97">；</text:span><text:span text:style-name="T167">TCP/IP </text:span><text:span text:style-name="T112">是實際使用的模型（</text:span><text:span text:style-name="T167">4 </text:span><text:span text:style-name="T112">層）</text:span><text:span text:style-name="T97">。</text:span><text:span text:style-name="T155">TCP/IP </text:span><text:span text:style-name="T97">將 </text:span><text:span text:style-name="T155">OSI </text:span><text:span text:style-name="T97">的 </text:span><text:span text:style-name="T155">Session </text:span><text:span text:style-name="T97">層與 </text:span><text:span text:style-name="T155">Presentation </text:span><text:span text:style-name="T97">層併入 </text:span><text:span text:style-name="T155">Application </text:span><text:span text:style-name="T97">層，並把 </text:span><text:span text:style-name="T155">Physical </text:span><text:span text:style-name="T97">併入 </text:span><text:span text:style-name="T155">Link</text:span><text:span text:style-name="T97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6" loext:marker-style-name="T67"><text:span text:style-name="T68">層號</text:span><text:span text:style-name="T67"/></text:p>
            </table:table-cell>
            <table:table-cell table:style-name="表格28.A1" office:value-type="string">
              <text:p text:style-name="P26" loext:marker-style-name="T67"><text:span text:style-name="T77">OSI </text:span><text:span text:style-name="T68">層名</text:span></text:p>
            </table:table-cell>
            <table:table-cell table:style-name="表格28.A1" office:value-type="string">
              <text:p text:style-name="P26" loext:marker-style-name="T67"><text:span text:style-name="T68">主要功能</text:span><text:span text:style-name="T67"/></text:p>
            </table:table-cell>
            <table:table-cell table:style-name="表格28.A1" office:value-type="string">
              <text:p text:style-name="P26" loext:marker-style-name="T67"><text:span text:style-name="T77">TCP/IP </text:span><text:span text:style-name="T68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8" loext:marker-style-name="T81"><text:span text:style-name="T147">7</text:span><text:span text:style-name="T81"/></text:p>
          </table:table-cell>
          <table:table-cell table:style-name="表格28.A2" office:value-type="string">
            <text:p text:style-name="P29" loext:marker-style-name="T81"><text:span text:style-name="T147">Application </text:span><text:span text:style-name="T86">應</text:span><text:span text:style-name="T82">用層</text:span></text:p>
          </table:table-cell>
          <table:table-cell table:style-name="表格28.A2" office:value-type="string">
            <text:p text:style-name="P29" loext:marker-style-name="T81"><text:span text:style-name="T82">使用者直接操作：</text:span><text:span text:style-name="T147">HTTP</text:span><text:span text:style-name="T82">、</text:span><text:span text:style-name="T147">DNS</text:span><text:span text:style-name="T82">、</text:span><text:span text:style-name="T147">DHCP</text:span></text:p>
          </table:table-cell>
          <table:table-cell table:style-name="表格28.A2" office:value-type="string">
            <text:p text:style-name="P29" loext:marker-style-name="T81"><text:span text:style-name="T147">Application</text:span><text:span text:style-name="T81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1"><text:span text:style-name="T147">6</text:span><text:span text:style-name="T81"/></text:p>
          </table:table-cell>
          <table:table-cell table:style-name="表格28.A3" office:value-type="string">
            <text:p text:style-name="P29" loext:marker-style-name="T81"><text:span text:style-name="T147">Presentation </text:span><text:span text:style-name="T86">表</text:span><text:span text:style-name="T82">示層</text:span></text:p>
          </table:table-cell>
          <table:table-cell table:style-name="表格28.A3" office:value-type="string">
            <text:p text:style-name="P29" loext:marker-style-name="T346"><text:span text:style-name="T347">資料格式轉換、加解密、壓縮</text:span><text:span text:style-name="T346"/></text:p>
          </table:table-cell>
          <table:table-cell table:style-name="表格28.A3" office:value-type="string">
            <text:p text:style-name="P29" loext:marker-style-name="T81"><text:span text:style-name="T147">↑ </text:span><text:span text:style-name="T82">併入 </text:span><text:span text:style-name="T147">Application</text:span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1"><text:span text:style-name="T147">5</text:span><text:span text:style-name="T81"/></text:p>
          </table:table-cell>
          <table:table-cell table:style-name="表格28.A2" office:value-type="string">
            <text:p text:style-name="P29" loext:marker-style-name="T81"><text:span text:style-name="T147">Session </text:span><text:span text:style-name="T86">會</text:span><text:span text:style-name="T82">話層</text:span></text:p>
          </table:table-cell>
          <table:table-cell table:style-name="表格28.A2" office:value-type="string">
            <text:p text:style-name="P29" loext:marker-style-name="T362"><text:span text:style-name="T363">連線的建立、維持與終止</text:span><text:span text:style-name="T362"/></text:p>
          </table:table-cell>
          <table:table-cell table:style-name="表格28.A2" office:value-type="string">
            <text:p text:style-name="P29" loext:marker-style-name="T81"><text:span text:style-name="T147">↑ </text:span><text:span text:style-name="T82">併入 </text:span><text:span text:style-name="T147">Application</text:span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1"><text:span text:style-name="T147">4</text:span><text:span text:style-name="T81"/></text:p>
          </table:table-cell>
          <table:table-cell table:style-name="表格28.A3" office:value-type="string">
            <text:p text:style-name="P29" loext:marker-style-name="T81"><text:span text:style-name="T147">Transport </text:span><text:span text:style-name="T86">傳</text:span><text:span text:style-name="T82">輸層</text:span></text:p>
          </table:table-cell>
          <table:table-cell table:style-name="表格28.A3" office:value-type="string">
            <text:p text:style-name="P29" loext:marker-style-name="T81"><text:span text:style-name="T82">端對端傳輸控制（</text:span><text:span text:style-name="T147">TCP / UDP</text:span><text:span text:style-name="T82">）</text:span></text:p>
          </table:table-cell>
          <table:table-cell table:style-name="表格28.A3" office:value-type="string">
            <text:p text:style-name="P29" loext:marker-style-name="T81"><text:span text:style-name="T147">Transport</text:span><text:span text:style-name="T81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1"><text:span text:style-name="T147">3</text:span><text:span text:style-name="T81"/></text:p>
          </table:table-cell>
          <table:table-cell table:style-name="表格28.A2" office:value-type="string">
            <text:p text:style-name="P29" loext:marker-style-name="T81"><text:span text:style-name="T147">Network </text:span><text:span text:style-name="T86">網</text:span><text:span text:style-name="T82">路層</text:span></text:p>
          </table:table-cell>
          <table:table-cell table:style-name="表格28.A2" office:value-type="string">
            <text:p text:style-name="P29" loext:marker-style-name="T329"><text:span text:style-name="T339">IP </text:span><text:span text:style-name="T330">路由、</text:span><text:span text:style-name="T339">ICMP </text:span><text:span text:style-name="T330">錯誤回報</text:span></text:p>
          </table:table-cell>
          <table:table-cell table:style-name="表格28.A2" office:value-type="string">
            <text:p text:style-name="P29" loext:marker-style-name="T81"><text:span text:style-name="T147">Internet</text:span><text:span text:style-name="T81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1"><text:span text:style-name="T147">2</text:span><text:span text:style-name="T81"/></text:p>
          </table:table-cell>
          <table:table-cell table:style-name="表格28.A3" office:value-type="string">
            <text:p text:style-name="P29" loext:marker-style-name="T81"><text:span text:style-name="T147">Data Link </text:span><text:span text:style-name="T366">資</text:span><text:span text:style-name="T82">料鏈結層</text:span></text:p>
          </table:table-cell>
          <table:table-cell table:style-name="表格28.A3" office:value-type="string">
            <text:p text:style-name="P29" loext:marker-style-name="T370"><text:span text:style-name="T397">MAC </text:span><text:span text:style-name="T371">位址、區域網路傳輸（</text:span><text:span text:style-name="T397">ARP</text:span><text:span text:style-name="T371">）</text:span></text:p>
          </table:table-cell>
          <table:table-cell table:style-name="表格28.A3" office:value-type="string">
            <text:p text:style-name="P29" loext:marker-style-name="T81"><text:span text:style-name="T147">Link</text:span><text:span text:style-name="T81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1"><text:span text:style-name="T147">1</text:span><text:span text:style-name="T81"/></text:p>
          </table:table-cell>
          <table:table-cell table:style-name="表格28.A2" office:value-type="string">
            <text:p text:style-name="P29" loext:marker-style-name="T81"><text:span text:style-name="T147">Physical </text:span><text:span text:style-name="T86">實</text:span><text:span text:style-name="T82">體層</text:span></text:p>
          </table:table-cell>
          <table:table-cell table:style-name="表格28.A2" office:value-type="string">
            <text:p text:style-name="P29" loext:marker-style-name="T81"><text:span text:style-name="T82">電訊號、光訊號、無線電波</text:span><text:span text:style-name="T81"/></text:p>
          </table:table-cell>
          <table:table-cell table:style-name="表格28.A2" office:value-type="string">
            <text:p text:style-name="P29" loext:marker-style-name="T81"><text:span text:style-name="T147">↑ </text:span><text:span text:style-name="T82">併入 </text:span><text:span text:style-name="T147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6"><text:span text:style-name="T196">⚡ <text:s/></text:span><text:span text:style-name="T200">速記</text:span></text:p>
            <text:p text:style-name="P7" loext:marker-style-name="T98"><text:span text:style-name="T165">OSI → 7 </text:span><text:span text:style-name="T110">層（理論）</text:span><text:span text:style-name="T97">，</text:span><text:span text:style-name="T167">TCP/IP → 4 </text:span><text:span text:style-name="T112">層（實際）</text:span><text:span text:style-name="T97">；差別在於 </text:span><text:span text:style-name="T155">TCP/IP </text:span><text:span text:style-name="T97">少了獨立的 </text:span><text:span text:style-name="T155">Session </text:span><text:span text:style-name="T97">與 </text:span><text:span text:style-name="T155">Presentation </text:span><text:span text:style-name="T97">兩層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6" loext:marker-style-name="T67"><text:span text:style-name="T77">🟢 Application </text:span><text:span text:style-name="T68">應用層</text:span></text:p>
            </table:table-cell>
            <table:table-cell table:style-name="表格29.A1" office:value-type="string">
              <text:p text:style-name="P26" loext:marker-style-name="T67"><text:span text:style-name="T77">🟡 Transport </text:span><text:span text:style-name="T68">傳輸層</text:span></text:p>
            </table:table-cell>
            <table:table-cell table:style-name="表格29.A1" office:value-type="string">
              <text:p text:style-name="P26" loext:marker-style-name="T67"><text:span text:style-name="T77">🔵 Network </text:span><text:span text:style-name="T68">網路層</text:span></text:p>
            </table:table-cell>
            <table:table-cell table:style-name="表格29.A1" office:value-type="string">
              <text:p text:style-name="P26" loext:marker-style-name="T67"><text:span text:style-name="T77">🟠 Link </text:span><text:span text:style-name="T68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9" loext:marker-style-name="T81"><text:span text:style-name="T147">HTTP / HTTPS</text:span><text:span text:style-name="T82">、</text:span><text:span text:style-name="T147">DNS</text:span><text:span text:style-name="T82">、</text:span><text:span text:style-name="T147">DHCP</text:span><text:span text:style-name="T82">、</text:span><text:span text:style-name="T147">SSH</text:span><text:span text:style-name="T82">、</text:span><text:span text:style-name="T147">MQTT</text:span><text:span text:style-name="T82">、</text:span><text:span text:style-name="T148">OSPF*</text:span></text:p>
          </table:table-cell>
          <table:table-cell table:style-name="表格29.A2" office:value-type="string">
            <text:p text:style-name="P29" loext:marker-style-name="T418"><text:span text:style-name="T437">TCP</text:span><text:span text:style-name="T419">（可靠傳輸）、</text:span><text:span text:style-name="T437">UDP</text:span><text:span text:style-name="T419">（高速傳輸）</text:span></text:p>
          </table:table-cell>
          <table:table-cell table:style-name="表格29.A2" office:value-type="string">
            <text:p text:style-name="P29" loext:marker-style-name="T81"><text:span text:style-name="T147">IP</text:span><text:span text:style-name="T82">（路由定址）、</text:span><text:span text:style-name="T450">ICMP</text:span><text:span text:style-name="T453">（錯誤回報 </text:span><text:span text:style-name="T450">/ ping</text:span><text:span text:style-name="T453">）</text:span></text:p>
          </table:table-cell>
          <table:table-cell table:style-name="表格29.A2" office:value-type="string">
            <text:p text:style-name="P29" loext:marker-style-name="T81"><text:span text:style-name="T147">Ethernet</text:span><text:span text:style-name="T82">（有線網路）、</text:span><text:span text:style-name="T340">ARP</text:span><text:span text:style-name="T331">（</text:span><text:span text:style-name="T340">IP → MAC</text:span><text:span text:style-name="T331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7"><text:span text:style-name="T219">OSPF </text:span><text:span text:style-name="T214">分層備註：</text:span><text:span text:style-name="T155">OSPF </text:span><text:span text:style-name="T97">在 </text:span><text:span text:style-name="T155">OSI </text:span><text:span text:style-name="T97">模型屬第 </text:span><text:span text:style-name="T155">3 </text:span><text:span text:style-name="T97">層（</text:span><text:span text:style-name="T155">Network</text:span><text:span text:style-name="T97">）；但在 </text:span><text:span text:style-name="T155">TCP/IP </text:span><text:span text:style-name="T97">模型中，因為它直接跑在 </text:span><text:span text:style-name="T155">IP </text:span><text:span text:style-name="T97">上（不透過 </text:span><text:span text:style-name="T155">TCP/UDP</text:span><text:span text:style-name="T97">），通常歸為 </text:span><text:span text:style-name="T155">Application </text:span><text:span text:style-name="T97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" loext:marker-style-name="T73"><text:span text:style-name="T74">協定</text:span><text:span text:style-name="T73"/></text:p>
            </table:table-cell>
            <table:table-cell table:style-name="表格30.A1" office:value-type="string">
              <text:p text:style-name="P4" loext:marker-style-name="T73"><text:span text:style-name="T74">層級</text:span><text:span text:style-name="T73"/></text:p>
            </table:table-cell>
            <table:table-cell table:style-name="表格30.A1" office:value-type="string">
              <text:p text:style-name="P4" loext:marker-style-name="T73"><text:span text:style-name="T74">做什麼（白話）</text:span><text:span text:style-name="T73"/></text:p>
            </table:table-cell>
            <table:table-cell table:style-name="表格30.A1" office:value-type="string">
              <text:p text:style-name="P4" loext:marker-style-name="T73"><text:span text:style-name="T74">生活比喻</text:span><text:span text:style-name="T73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9" loext:marker-style-name="T126"><text:span text:style-name="T177">DHCP</text:span><text:span text:style-name="T179"> Dynamic Host Configuration Protocol</text:span></text:p>
          </table:table-cell>
          <table:table-cell table:style-name="表格30.A2" office:value-type="string">
            <text:p text:style-name="P29" loext:marker-style-name="T126"><text:span text:style-name="T127">應用層</text:span><text:span text:style-name="T126"/></text:p>
          </table:table-cell>
          <table:table-cell table:style-name="表格30.A2" office:value-type="string">
            <text:p text:style-name="P29" loext:marker-style-name="T126"><text:span text:style-name="T138">連上 </text:span><text:span text:style-name="T189">WiFi </text:span><text:span text:style-name="T138">時不必手動設定 </text:span><text:span text:style-name="T189">IP</text:span><text:span text:style-name="T127">，</text:span><text:span text:style-name="T179">DHCP </text:span><text:span text:style-name="T127">伺服器</text:span><text:span text:style-name="T333">自動分配一個 </text:span><text:span text:style-name="T342">IP </text:span><text:span text:style-name="T333">給你</text:span><text:span text:style-name="T127">。</text:span></text:p>
          </table:table-cell>
          <table:table-cell table:style-name="表格30.A2" office:value-type="string">
            <text:p text:style-name="P29" loext:marker-style-name="T126"><text:span text:style-name="T127">進飯店前台自動安排房號</text:span><text:span text:style-name="T126"/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26"><text:span text:style-name="T177">SSH</text:span><text:span text:style-name="T179"> Secure Shell</text:span></text:p>
          </table:table-cell>
          <table:table-cell table:style-name="表格30.A3" office:value-type="string">
            <text:p text:style-name="P29" loext:marker-style-name="T126"><text:span text:style-name="T127">應用層</text:span><text:span text:style-name="T126"/></text:p>
          </table:table-cell>
          <table:table-cell table:style-name="表格30.A3" office:value-type="string">
            <text:p text:style-name="P29" loext:marker-style-name="T126"><text:span text:style-name="T424">透過加密通道遠端操控</text:span><text:span text:style-name="T127">另一台 </text:span><text:span text:style-name="T179">Linux</text:span><text:span text:style-name="T127">／伺服器的終端機。</text:span></text:p>
          </table:table-cell>
          <table:table-cell table:style-name="表格30.A3" office:value-type="string">
            <text:p text:style-name="P29" loext:marker-style-name="T126"><text:span text:style-name="T127">加密版的遠端遙控器</text:span><text:span text:style-name="T126"/></text:p>
          </table:table-cell>
        </table:table-row>
        <table:table-row table:style-name="表格30.1">
          <table:table-cell table:style-name="表格30.A2" office:value-type="string">
            <text:p text:style-name="P29" loext:marker-style-name="T126"><text:span text:style-name="T177">MQTT</text:span><text:span text:style-name="T179"> Message Queuing Telemetry Transport</text:span></text:p>
          </table:table-cell>
          <table:table-cell table:style-name="表格30.A2" office:value-type="string">
            <text:p text:style-name="P29" loext:marker-style-name="T126"><text:span text:style-name="T127">應用層</text:span><text:span text:style-name="T126"/></text:p>
          </table:table-cell>
          <table:table-cell table:style-name="表格30.A2" office:value-type="string">
            <text:p text:style-name="P29" loext:marker-style-name="T126"><text:span text:style-name="T403">IoT </text:span><text:span text:style-name="T379">裝置常用的輕量傳訊協定</text:span><text:span text:style-name="T127">，採</text:span><text:span text:style-name="T462">「發布／訂閱」模式</text:span><text:span text:style-name="T127">，非常省流量。</text:span></text:p>
          </table:table-cell>
          <table:table-cell table:style-name="表格30.A2" office:value-type="string">
            <text:p text:style-name="P29" loext:marker-style-name="T126"><text:span text:style-name="T127">溫度感測器發布「</text:span><text:span text:style-name="T179">30°C</text:span><text:span text:style-name="T127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26"><text:span text:style-name="T177">OSPF</text:span><text:span text:style-name="T179"> Open Shortest Path First</text:span></text:p>
          </table:table-cell>
          <table:table-cell table:style-name="表格30.A3" office:value-type="string">
            <text:p text:style-name="P29" loext:marker-style-name="T126"><text:span text:style-name="T127">視模型而定 ⚠️</text:span><text:span text:style-name="T126"/></text:p>
          </table:table-cell>
          <table:table-cell table:style-name="表格30.A3" office:value-type="string">
            <text:p text:style-name="P29" loext:marker-style-name="T126"><text:span text:style-name="T275">路由器之間使用</text:span><text:span text:style-name="T127">，</text:span><text:span text:style-name="T334">自動計算封包走哪條路徑最短、最快</text:span><text:span text:style-name="T127">。</text:span></text:p>
          </table:table-cell>
          <table:table-cell table:style-name="表格30.A3" office:value-type="string">
            <text:p text:style-name="P29" loext:marker-style-name="T126"><text:span text:style-name="T179">Google Maps </text:span><text:span text:style-name="T127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6"><text:span text:style-name="T196">💡 <text:s/></text:span><text:span text:style-name="T200">快速判斷層級的技巧</text:span></text:p>
            <text:p text:style-name="P7"><text:span text:style-name="T203">使用者／應用服務</text:span><text:span text:style-name="T97">（</text:span><text:span text:style-name="T155">SSH</text:span><text:span text:style-name="T97">、</text:span><text:span text:style-name="T155">DHCP</text:span><text:span text:style-name="T97">、</text:span><text:span text:style-name="T155">MQTT</text:span><text:span text:style-name="T97">、</text:span><text:span text:style-name="T155">HTTP</text:span><text:span text:style-name="T97">）→ 幾乎都是應用層。</text:span></text:p>
            <text:p text:style-name="P8"><text:span text:style-name="T203">幫路由器決定走哪條路</text:span><text:span text:style-name="T97">（</text:span><text:span text:style-name="T155">OSPF</text:span><text:span text:style-name="T97">、</text:span><text:span text:style-name="T155">RIP</text:span><text:span text:style-name="T97">、</text:span><text:span text:style-name="T155">BGP</text:span><text:span text:style-name="T97">）→ 在 </text:span><text:span text:style-name="T155">OSI </text:span><text:span text:style-name="T97">屬網路層，</text:span><text:span text:style-name="T155">TCP/IP </text:span><text:span text:style-name="T97">多歸應用層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網路層深度解析：</text:span><text:span text:style-name="T27">IP · Routing · ICMP</text:span></text:h>
      <text:p text:style-name="P35" loext:marker-style-name="T98"><text:span text:style-name="T97">網路層（第 </text:span><text:span text:style-name="T155">3 </text:span><text:span text:style-name="T97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6" loext:marker-style-name="T67"><text:span text:style-name="T77">📍 IP</text:span><text:span text:style-name="T68">（位址）</text:span></text:p>
            </table:table-cell>
            <table:table-cell table:style-name="表格31.A1" office:value-type="string">
              <text:p text:style-name="P26" loext:marker-style-name="T67"><text:span text:style-name="T77">🗺️ Routing</text:span><text:span text:style-name="T68">（路由）</text:span></text:p>
            </table:table-cell>
            <table:table-cell table:style-name="表格31.A1" office:value-type="string">
              <text:p text:style-name="P26" loext:marker-style-name="T67"><text:span text:style-name="T77">🚨 ICMP</text:span><text:span text:style-name="T68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9" loext:marker-style-name="T81"><text:span text:style-name="T84">決定「目的地在哪」</text:span><text:span text:style-name="T82">。每台設備都有 </text:span><text:span text:style-name="T147">IP</text:span><text:span text:style-name="T82">，就像門牌；</text:span><text:span text:style-name="T147">IP </text:span><text:span text:style-name="T82">負責標記「我要送去哪裡」。</text:span></text:p>
          </table:table-cell>
          <table:table-cell table:style-name="表格31.A2" office:value-type="string">
            <text:p text:style-name="P29" loext:marker-style-name="T81"><text:span text:style-name="T84">決定「怎麼走最快」</text:span><text:span text:style-name="T82">。</text:span><text:span text:style-name="T88">封包經過很多路由器</text:span><text:span text:style-name="T82">，</text:span><text:span text:style-name="T419">每台都問「下一站往哪送？」</text:span><text:span text:style-name="T302">OSPF </text:span><text:span text:style-name="T268">等協定算出最短路徑。</text:span></text:p>
          </table:table-cell>
          <table:table-cell table:style-name="表格31.A2" office:value-type="string">
            <text:p text:style-name="P29" loext:marker-style-name="T81"><text:span text:style-name="T84">回報「出了什麼問題」</text:span><text:span text:style-name="T82">。找不到主機、路不通、</text:span><text:span text:style-name="T147">TTL </text:span><text:span text:style-name="T82">歸零 → </text:span><text:span text:style-name="T330">各自回傳對應 </text:span><text:span text:style-name="T339">ICMP </text:span><text:span text:style-name="T330">訊息</text:span><text:span text:style-name="T82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6"><text:span text:style-name="T196">🔍 <text:s/></text:span><text:span text:style-name="T61">ping </text:span><text:span text:style-name="T50">是什麼？為什麼跟 </text:span><text:span text:style-name="T61">ICMP </text:span><text:span text:style-name="T50">有關？</text:span></text:p>
            <text:p text:style-name="P7" loext:marker-style-name="T53"><text:span text:style-name="T62">ping google.com </text:span><text:span text:style-name="T54">的運作</text:span><text:span text:style-name="T55">：</text:span></text:p>
            <text:p text:style-name="P8" loext:marker-style-name="T98"><text:span text:style-name="T155">① </text:span><text:span text:style-name="T97">你的電腦發出 </text:span><text:span text:style-name="T165">ICMP Echo Request</text:span><text:span text:style-name="T97">（「你在嗎？」）</text:span></text:p>
            <text:p text:style-name="P8" loext:marker-style-name="T98"><text:span text:style-name="T155">② </text:span><text:span text:style-name="T97">目標主機回傳 </text:span><text:span text:style-name="T165">ICMP Echo Reply</text:span><text:span text:style-name="T97">（「我在！」）</text:span></text:p>
            <text:p text:style-name="P8" loext:marker-style-name="T98"><text:span text:style-name="T155">③ </text:span><text:span text:style-name="T350">顯示來回時間（</text:span><text:span text:style-name="T357">ms</text:span><text:span text:style-name="T350">），數字越小代表網路越暢通</text:span></text:p>
            <text:p text:style-name="P8"><text:span text:style-name="T219">⚠️ </text:span><text:span text:style-name="T214">重點：</text:span><text:span text:style-name="T344">ping </text:span><text:span text:style-name="T336">完全使用 </text:span><text:span text:style-name="T344">ICMP</text:span><text:span text:style-name="T336">，不走 </text:span><text:span text:style-name="T344">TCP </text:span><text:span text:style-name="T336">也不走 </text:span><text:span text:style-name="T344">UDP</text:span><text:span text:style-name="T97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6"><text:span text:style-name="T196">⚡ <text:s/></text:span><text:span text:style-name="T200">三個概念一次記清楚</text:span></text:p>
            <text:p text:style-name="P7"><text:span text:style-name="T211">📍 IP → </text:span><text:span text:style-name="T97">定位（目的地是誰）　</text:span><text:span text:style-name="T203">🗺️ </text:span><text:span text:style-name="T211">Routing → </text:span><text:span text:style-name="T425">選路（怎麼走最快）</text:span><text:span text:style-name="T97">　</text:span><text:span text:style-name="T203">🚨 </text:span><text:span text:style-name="T212">ICMP → </text:span><text:span text:style-name="T336">回報（出錯了通知你）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六、</text:span><text:span text:style-name="T27">TCP vs UDP </text:span><text:span text:style-name="T28">差異比較</text:span></text:h>
      <text:p text:style-name="P35" loext:marker-style-name="T98"><text:span text:style-name="T97">傳輸層最核心的兩個協定，差異在於「是否保證送達」（更深入的擁塞控制見第五篇）。</text:span><text:span text:style-name="T98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32.A1" office:value-type="string">
              <text:p text:style-name="P4" loext:marker-style-name="T71"><text:span text:style-name="T78">TCP</text:span><text:span text:style-name="T71"/></text:p>
            </table:table-cell>
            <table:table-cell table:style-name="表格32.A1" office:value-type="string">
              <text:p text:style-name="P4" loext:marker-style-name="T71"><text:span text:style-name="T78">UDP</text:span><text:span text:style-name="T71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9" loext:marker-style-name="T121"><text:span text:style-name="T122">連線方式</text:span><text:span text:style-name="T121"/></text:p>
          </table:table-cell>
          <table:table-cell table:style-name="表格32.A2" office:value-type="string">
            <text:p text:style-name="P29" loext:marker-style-name="T121"><text:span text:style-name="T122">需要握手（三向交握）</text:span><text:span text:style-name="T121"/></text:p>
          </table:table-cell>
          <table:table-cell table:style-name="表格32.A2" office:value-type="string">
            <text:p text:style-name="P29" loext:marker-style-name="T121"><text:span text:style-name="T122">無連線，直接送出</text:span><text:span text:style-name="T121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21"><text:span text:style-name="T122">可靠性</text:span><text:span text:style-name="T121"/></text:p>
          </table:table-cell>
          <table:table-cell table:style-name="表格32.A3" office:value-type="string">
            <text:p text:style-name="P29" loext:marker-style-name="T282"><text:span text:style-name="T283">保證送達，遺失會重傳</text:span><text:span text:style-name="T282"/></text:p>
          </table:table-cell>
          <table:table-cell table:style-name="表格32.A3" office:value-type="string">
            <text:p text:style-name="P29" loext:marker-style-name="T385"><text:span text:style-name="T386">不保證，遺失不補</text:span><text:span text:style-name="T385"/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21"><text:span text:style-name="T122">速度</text:span><text:span text:style-name="T121"/></text:p>
          </table:table-cell>
          <table:table-cell table:style-name="表格32.A2" office:value-type="string">
            <text:p text:style-name="P29" loext:marker-style-name="T123"><text:span text:style-name="T124">較慢（有確認機制）</text:span><text:span text:style-name="T123"/></text:p>
          </table:table-cell>
          <table:table-cell table:style-name="表格32.A2" office:value-type="string">
            <text:p text:style-name="P29" loext:marker-style-name="T123"><text:span text:style-name="T124">較快（無確認機制）</text:span><text:span text:style-name="T123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21"><text:span text:style-name="T122">使用情境</text:span><text:span text:style-name="T121"/></text:p>
          </table:table-cell>
          <table:table-cell table:style-name="表格32.A3" office:value-type="string">
            <text:p text:style-name="P29" loext:marker-style-name="T121"><text:span text:style-name="T175">HTTP</text:span><text:span text:style-name="T122">、</text:span><text:span text:style-name="T175">Email</text:span><text:span text:style-name="T122">、</text:span><text:span text:style-name="T175">FTP</text:span></text:p>
          </table:table-cell>
          <table:table-cell table:style-name="表格32.A3" office:value-type="string">
            <text:p text:style-name="P29" loext:marker-style-name="T121"><text:span text:style-name="T122">串流影音、</text:span><text:span text:style-name="T175">VoIP</text:span><text:span text:style-name="T122">、</text:span><text:span text:style-name="T175">DNS</text:span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21"><text:span text:style-name="T122">一句話</text:span><text:span text:style-name="T121"/></text:p>
          </table:table-cell>
          <table:table-cell table:style-name="表格32.A2" office:value-type="string">
            <text:p text:style-name="P29" loext:marker-style-name="T208"><text:span text:style-name="T209">「穩定優先」</text:span><text:span text:style-name="T208"/></text:p>
          </table:table-cell>
          <table:table-cell table:style-name="表格32.A2" office:value-type="string">
            <text:p text:style-name="P29" loext:marker-style-name="T35"><text:span text:style-name="T36">「速度優先」</text:span><text:span text:style-name="T35"/></text:p>
          </table:table-cell>
        </table:table-row>
      </table:table>
      <text:h text:style-name="P11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><text:span text:style-name="T196">🔗 <text:s/></text:span><text:span text:style-name="T61">ARP </text:span><text:span text:style-name="T50">重點</text:span></text:p>
            <text:p text:style-name="P7"><text:span text:style-name="T63">ARP </text:span><text:span text:style-name="T55">做什麼？　</text:span><text:span text:style-name="T110">在</text:span><text:span text:style-name="T459">同一個</text:span><text:span text:style-name="T110">區域網路（</text:span><text:span text:style-name="T165">LAN</text:span><text:span text:style-name="T110">）中</text:span><text:span text:style-name="T97">，</text:span><text:span text:style-name="T351">將「</text:span><text:span text:style-name="T358">IP </text:span><text:span text:style-name="T351">位址（邏輯位址）」轉換成「</text:span><text:span text:style-name="T358">MAC </text:span><text:span text:style-name="T351">位址（實體位址）」</text:span><text:span text:style-name="T97">。</text:span></text:p>
            <text:p text:style-name="P8"><text:span text:style-name="T55">為何屬於 </text:span><text:span text:style-name="T63">Link </text:span><text:span text:style-name="T55">層？　</text:span><text:span text:style-name="T344">ARP </text:span><text:span text:style-name="T336">的作用範圍僅限於同一區域網路內，</text:span><text:span text:style-name="T460">無法跨越路由器</text:span><text:span text:style-name="T97">，因此歸屬 </text:span><text:span text:style-name="T155">Link</text:span><text:span text:style-name="T97">（連結）層。</text:span></text:p>
            <text:p text:style-name="P8" loext:marker-style-name="T53"><text:span text:style-name="T55">運作流程：</text:span><text:span text:style-name="T53"/></text:p>
            <text:p text:style-name="P8" loext:marker-style-name="T98"><text:span text:style-name="T155">① </text:span><text:span text:style-name="T114">裝置 </text:span><text:span text:style-name="T168">A </text:span><text:span text:style-name="T114">廣播詢問：</text:span><text:span text:style-name="T97">「</text:span><text:span text:style-name="T110">誰的 </text:span><text:span text:style-name="T165">IP</text:span><text:span text:style-name="T155"> </text:span><text:span text:style-name="T97">是 </text:span><text:span text:style-name="T155">192.168.1.5</text:span><text:span text:style-name="T97">？」</text:span></text:p>
            <text:p text:style-name="P8" loext:marker-style-name="T98"><text:span text:style-name="T155">② </text:span><text:span text:style-name="T115">裝置 </text:span><text:span text:style-name="T169">B </text:span><text:span text:style-name="T115">回應：</text:span><text:span text:style-name="T97">「</text:span><text:span text:style-name="T112">是我！</text:span><text:span text:style-name="T167">MAC </text:span><text:span text:style-name="T112">是</text:span><text:span text:style-name="T97"> </text:span><text:span text:style-name="T155">AA:BB:CC:DD:EE:FF</text:span><text:span text:style-name="T97">」</text:span></text:p>
            <text:p text:style-name="P8" loext:marker-style-name="T98"><text:span text:style-name="T155">③ </text:span><text:span text:style-name="T97">裝置 </text:span><text:span text:style-name="T155">A </text:span><text:span text:style-name="T97">記錄此對應至 </text:span><text:span text:style-name="T155">ARP </text:span><text:span text:style-name="T97">快取，下次直接使用</text:span></text:p>
          </table:table-cell>
        </table:table-row>
      </table:table>
      <text:p text:style-name="P35" loext:marker-style-name="T6"><text:span text:style-name="T7">（</text:span><text:span text:style-name="T16">ARP </text:span><text:span text:style-name="T7">完整流程、</text:span><text:span text:style-name="T16">ARP Spoofing </text:span><text:span text:style-name="T7">與完整上網流程，詳見第四篇。）</text:span></text:p>
      <text:h text:style-name="P11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7"><text:span text:style-name="T24">目的：</text:span><text:span text:style-name="T503">找出封包從來源到目的地</text:span><text:span text:style-name="T264">，</text:span><text:span text:style-name="T507">中間經過哪些路由器</text:span><text:span text:style-name="T97">（完整路徑偵測）。</text:span></text:p>
            <text:p text:style-name="P8"><text:span text:style-name="T508">TTL</text:span><text:span text:style-name="T513">（</text:span><text:span text:style-name="T508">Time To Live</text:span><text:span text:style-name="T513">）</text:span><text:span text:style-name="T24">：</text:span><text:span text:style-name="T350">封包的「存活計數器」。每經過一個路由器就減 </text:span><text:span text:style-name="T357">1</text:span><text:span text:style-name="T97">；</text:span><text:span text:style-name="T284">歸零時路由器丟棄封包</text:span><text:span text:style-name="T97">，並</text:span><text:span text:style-name="T387">回傳 </text:span><text:span text:style-name="T408">ICMP Time Exceeded </text:span><text:span text:style-name="T387">給發送方</text:span><text:span text:style-name="T97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" loext:marker-style-name="T73"><text:span text:style-name="T74">封包次數</text:span><text:span text:style-name="T73"/></text:p>
          </table:table-cell>
          <table:table-cell table:style-name="表格34.A2" office:value-type="string">
            <text:p text:style-name="P4" loext:marker-style-name="T73"><text:span text:style-name="T79">TTL </text:span><text:span text:style-name="T74">值</text:span></text:p>
          </table:table-cell>
          <table:table-cell table:style-name="表格34.A2" office:value-type="string">
            <text:p text:style-name="P4" loext:marker-style-name="T73"><text:span text:style-name="T74">發生什麼事</text:span><text:span text:style-name="T73"/></text:p>
          </table:table-cell>
          <table:table-cell table:style-name="表格34.A2" office:value-type="string">
            <text:p text:style-name="P4" loext:marker-style-name="T73"><text:span text:style-name="T74">取得資訊</text:span><text:span text:style-name="T73"/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26"><text:span text:style-name="T127">第 </text:span><text:span text:style-name="T179">1 </text:span><text:span text:style-name="T127">次</text:span></text:p>
          </table:table-cell>
          <table:table-cell table:style-name="表格34.A3" office:value-type="string">
            <text:p text:style-name="P29" loext:marker-style-name="T126"><text:span text:style-name="T179">TTL = 1</text:span><text:span text:style-name="T126"/></text:p>
          </table:table-cell>
          <table:table-cell table:style-name="表格34.A3" office:value-type="string">
            <text:p text:style-name="P29" loext:marker-style-name="T126"><text:span text:style-name="T140">抵達第 </text:span><text:span text:style-name="T190">1 </text:span><text:span text:style-name="T140">個 </text:span><text:span text:style-name="T190">Router </text:span><text:span text:style-name="T179">→ TTL </text:span><text:span text:style-name="T127">歸零 → 回傳 </text:span><text:span text:style-name="T179">ICMP Time Exceeded</text:span></text:p>
          </table:table-cell>
          <table:table-cell table:style-name="表格34.A3" office:value-type="string">
            <text:p text:style-name="P29" loext:marker-style-name="T139"><text:span text:style-name="T138">得知第 </text:span><text:span text:style-name="T189">1 </text:span><text:span text:style-name="T138">站位置</text:span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26"><text:span text:style-name="T127">第 </text:span><text:span text:style-name="T179">2 </text:span><text:span text:style-name="T127">次</text:span></text:p>
          </table:table-cell>
          <table:table-cell table:style-name="表格34.A4" office:value-type="string">
            <text:p text:style-name="P29" loext:marker-style-name="T126"><text:span text:style-name="T179">TTL = 2</text:span><text:span text:style-name="T126"/></text:p>
          </table:table-cell>
          <table:table-cell table:style-name="表格34.A4" office:value-type="string">
            <text:p text:style-name="P29" loext:marker-style-name="T126"><text:span text:style-name="T140">通過第 </text:span><text:span text:style-name="T190">1 </text:span><text:span text:style-name="T140">站 → 抵達第 </text:span><text:span text:style-name="T190">2 </text:span><text:span text:style-name="T140">個 </text:span><text:span text:style-name="T190">Router</text:span><text:span text:style-name="T179"> → TTL </text:span><text:span text:style-name="T127">歸零 → 回傳 </text:span><text:span text:style-name="T179">ICMP</text:span></text:p>
          </table:table-cell>
          <table:table-cell table:style-name="表格34.A4" office:value-type="string">
            <text:p text:style-name="P29" loext:marker-style-name="T139"><text:span text:style-name="T138">得知第 </text:span><text:span text:style-name="T189">2 </text:span><text:span text:style-name="T138">站位置</text:span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26"><text:span text:style-name="T127">第 </text:span><text:span text:style-name="T179">N </text:span><text:span text:style-name="T127">次</text:span></text:p>
          </table:table-cell>
          <table:table-cell table:style-name="表格34.A3" office:value-type="string">
            <text:p text:style-name="P29" loext:marker-style-name="T126"><text:span text:style-name="T179">TTL = N</text:span><text:span text:style-name="T126"/></text:p>
          </table:table-cell>
          <table:table-cell table:style-name="表格34.A3" office:value-type="string">
            <text:p text:style-name="P29" loext:marker-style-name="T126"><text:span text:style-name="T127">以此類推，每次多走一站</text:span><text:span text:style-name="T126"/></text:p>
          </table:table-cell>
          <table:table-cell table:style-name="表格34.A3" office:value-type="string">
            <text:p text:style-name="P29" loext:marker-style-name="T126"><text:span text:style-name="T127">逐步還原完整路徑</text:span><text:span text:style-name="T126"/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26"><text:span text:style-name="T127">最後</text:span><text:span text:style-name="T126"/></text:p>
          </table:table-cell>
          <table:table-cell table:style-name="表格34.A4" office:value-type="string">
            <text:p text:style-name="P29" loext:marker-style-name="T126"><text:span text:style-name="T179">TTL = </text:span><text:span text:style-name="T127">距離</text:span></text:p>
          </table:table-cell>
          <table:table-cell table:style-name="表格34.A4" office:value-type="string">
            <text:p text:style-name="P29" loext:marker-style-name="T126"><text:span text:style-name="T127">封包抵達目的地，回傳正常應答</text:span><text:span text:style-name="T126"/></text:p>
          </table:table-cell>
          <table:table-cell table:style-name="表格34.A4" office:value-type="string">
            <text:p text:style-name="P29" loext:marker-style-name="T126"><text:span text:style-name="T127">路徑偵測完成 ✓</text:span><text:span text:style-name="T12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6"><text:span text:style-name="T196">⚡ <text:s/></text:span><text:span text:style-name="T200">一句話記憶</text:span></text:p>
            <text:p text:style-name="P7" loext:marker-style-name="T98"><text:span text:style-name="T344">Traceroute = TTL </text:span><text:span text:style-name="T336">遞增 ＋ </text:span><text:span text:style-name="T344">ICMP </text:span><text:span text:style-name="T336">回報</text:span><text:span text:style-name="T97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><text:span text:style-name="T196">🔥 <text:s/></text:span><text:span text:style-name="T256">TCP/IP </text:span><text:span text:style-name="T250">四層心法（背這個就夠）</text:span></text:p>
            <text:p text:style-name="P7"><text:span text:style-name="T257">🟢 Application</text:span><text:span text:style-name="T251">（應用層） → </text:span><text:span text:style-name="T97">給人用（</text:span><text:span text:style-name="T155">HTTP</text:span><text:span text:style-name="T97">、</text:span><text:span text:style-name="T155">DNS</text:span><text:span text:style-name="T97">、</text:span><text:span text:style-name="T155">DHCP</text:span><text:span text:style-name="T97">、</text:span><text:span text:style-name="T155">SSH</text:span><text:span text:style-name="T97">、</text:span><text:span text:style-name="T155">MQTT</text:span><text:span text:style-name="T97">）</text:span></text:p>
            <text:p text:style-name="P8"><text:soft-page-break/><text:span text:style-name="T257">🟡 Transport</text:span><text:span text:style-name="T251">（傳輸層） → </text:span><text:span text:style-name="T97">怎麼送（</text:span><text:span text:style-name="T155">TCP</text:span><text:span text:style-name="T97">＝穩定 </text:span><text:span text:style-name="T155">/ UDP</text:span><text:span text:style-name="T97">＝快速）</text:span><text:span text:style-name="T155">(</text:span><text:span text:style-name="T263">切分、編頁碼、確認收件</text:span><text:span text:style-name="T155">)</text:span></text:p>
            <text:p text:style-name="P8"><text:span text:style-name="T257">🔵 Network</text:span><text:span text:style-name="T251">（網路層） → </text:span><text:span text:style-name="T97">走哪條路（</text:span><text:span text:style-name="T155">IP</text:span><text:span text:style-name="T97">、</text:span><text:span text:style-name="T155">ICMP</text:span><text:span text:style-name="T97">）</text:span></text:p>
            <text:p text:style-name="P8"><text:span text:style-name="T257">🟠 Link</text:span><text:span text:style-name="T251">（連結層） → </text:span><text:span text:style-name="T97">同一區網怎麼接（</text:span><text:span text:style-name="T155">Ethernet</text:span><text:span text:style-name="T97">、</text:span><text:span text:style-name="T155">ARP</text:span><text:span text:style-name="T97">）</text:span><text:span text:style-name="T155">(</text:span><text:span text:style-name="T62">ARP</text:span><text:span text:style-name="T63"> </text:span><text:span text:style-name="T55">：</text:span><text:span text:style-name="T110">在</text:span><text:span text:style-name="T459">同一個</text:span><text:span text:style-name="T110">區域網路（</text:span><text:span text:style-name="T165">LAN</text:span><text:span text:style-name="T110">）中</text:span><text:span text:style-name="T97">，</text:span><text:span text:style-name="T351">將「</text:span><text:span text:style-name="T358">IP </text:span><text:span text:style-name="T351">位址（邏輯位址）」轉換成「</text:span><text:span text:style-name="T358">MAC </text:span><text:span text:style-name="T351">位址（實體位址）」</text:span><text:span text:style-name="T155">)</text:span></text:p>
          </table:table-cell>
        </table:table-row>
      </table:table>
      <text:h text:style-name="P17" text:outline-level="1" loext:marker-style-name="T69"><text:span text:style-name="T70">第 二 篇　</text:span><text:span text:style-name="T69">IP </text:span><text:span text:style-name="T70">位址與封包處理：分類 </text:span><text:span text:style-name="T69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6"><text:span text:style-name="T196">📐 <text:s/></text:span><text:span text:style-name="T50">本篇重點</text:span></text:p>
            <text:p text:style-name="P7" loext:marker-style-name="T98"><text:span text:style-name="T97">本篇分兩大主軸：前半談「</text:span><text:span text:style-name="T167">IP </text:span><text:span text:style-name="T112">位址如何劃分</text:span><text:span text:style-name="T97">」（分類、</text:span><text:span text:style-name="T155">CIDR</text:span><text:span text:style-name="T97">、子網計算、</text:span><text:span text:style-name="T155">VLSM</text:span><text:span text:style-name="T97">、</text:span><text:span text:style-name="T155">CIDR </text:span><text:span text:style-name="T97">合併）；後半談「</text:span><text:span text:style-name="T112">封包如何被切割傳送</text:span><text:span text:style-name="T97">」（</text:span><text:span text:style-name="T155">MTU</text:span><text:span text:style-name="T97">、</text:span><text:span text:style-name="T155">Fragmentation</text:span><text:span text:style-name="T97">、</text:span><text:span text:style-name="T155">IP Header</text:span><text:span text:style-name="T97">、</text:span><text:span text:style-name="T155">DF/MF</text:span><text:span text:style-name="T97">、</text:span><text:span text:style-name="T155">PMTUD</text:span><text:span text:style-name="T97">、</text:span><text:span text:style-name="T155">MSS</text:span><text:span text:style-name="T97">、</text:span><text:span text:style-name="T155">Frag DoS</text:span><text:span text:style-name="T97">）。子網計算是計算題必考，務必動手練。</text:span></text:p>
          </table:table-cell>
        </table:table-row>
      </table:table>
      <text:h text:style-name="P11" text:outline-level="2" loext:marker-style-name="T27"><text:span text:style-name="T28">壹、</text:span><text:span text:style-name="T27">IP </text:span><text:span text:style-name="T28">位址基礎</text:span></text:h>
      <text:p text:style-name="P35" loext:marker-style-name="T98"><text:span text:style-name="T165">IP </text:span><text:span text:style-name="T110">位址（</text:span><text:span text:style-name="T165">IPv4</text:span><text:span text:style-name="T110">）是</text:span><text:span text:style-name="T286">一組 </text:span><text:span text:style-name="T308">32 </text:span><text:span text:style-name="T286">個 </text:span><text:span text:style-name="T308">bit</text:span><text:span text:style-name="T97">，用來</text:span><text:span text:style-name="T426">識別網路上每一台設備的「地址」</text:span><text:span text:style-name="T97">。</text:span><text:span text:style-name="T110">為了人類方便閱讀</text:span><text:span text:style-name="T97">，</text:span><text:span text:style-name="T112">這 </text:span><text:span text:style-name="T167">32 </text:span><text:span text:style-name="T112">個 </text:span><text:span text:style-name="T167">bit </text:span><text:span text:style-name="T112">被分成 </text:span><text:span text:style-name="T167">4 </text:span><text:span text:style-name="T112">組</text:span><text:span text:style-name="T97">、</text:span><text:span text:style-name="T336">每組 </text:span><text:span text:style-name="T344">8 </text:span><text:span text:style-name="T336">個 </text:span><text:span text:style-name="T344">bit</text:span><text:span text:style-name="T336">（一個 </text:span><text:span text:style-name="T344">Octet</text:span><text:span text:style-name="T336">），再轉成十進位</text:span><text:span text:style-name="T97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6" loext:marker-style-name="T71"><text:span text:style-name="T78">Octet 1</text:span><text:span text:style-name="T71"/></text:p>
            </table:table-cell>
            <table:table-cell table:style-name="表格37.A1" office:value-type="string">
              <text:p text:style-name="P26" loext:marker-style-name="T71"><text:span text:style-name="T78">Octet 2</text:span><text:span text:style-name="T71"/></text:p>
            </table:table-cell>
            <table:table-cell table:style-name="表格37.A1" office:value-type="string">
              <text:p text:style-name="P26" loext:marker-style-name="T71"><text:span text:style-name="T78">Octet 3</text:span><text:span text:style-name="T71"/></text:p>
            </table:table-cell>
            <table:table-cell table:style-name="表格37.A1" office:value-type="string">
              <text:p text:style-name="P26" loext:marker-style-name="T71"><text:span text:style-name="T78">Octet 4</text:span><text:span text:style-name="T71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9" loext:marker-style-name="T121"><text:span text:style-name="T175">192</text:span><text:span text:style-name="T121"/></text:p>
          </table:table-cell>
          <table:table-cell table:style-name="表格37.A2" office:value-type="string">
            <text:p text:style-name="P29" loext:marker-style-name="T121"><text:span text:style-name="T175">168</text:span><text:span text:style-name="T121"/></text:p>
          </table:table-cell>
          <table:table-cell table:style-name="表格37.A2" office:value-type="string">
            <text:p text:style-name="P29" loext:marker-style-name="T121"><text:span text:style-name="T175">1</text:span><text:span text:style-name="T121"/></text:p>
          </table:table-cell>
          <table:table-cell table:style-name="表格37.A2" office:value-type="string">
            <text:p text:style-name="P29" loext:marker-style-name="T121"><text:span text:style-name="T175">0</text:span><text:span text:style-name="T121"/></text:p>
          </table:table-cell>
        </table:table-row>
      </table:table>
      <text:p text:style-name="P35" loext:marker-style-name="T10"><text:span text:style-name="T20">→ </text:span><text:span text:style-name="T286">總共 </text:span><text:span text:style-name="T308">4 × 8 = 32 </text:span><text:span text:style-name="T286">個 </text:span><text:span text:style-name="T308">bit</text:span><text:span text:style-name="T11">，</text:span><text:span text:style-name="T523">每組數字範圍 </text:span><text:span text:style-name="T524">0</text:span><text:span text:style-name="T523">～</text:span><text:span text:style-name="T524">255</text:span><text:span text:style-name="T11">（因為 </text:span><text:span text:style-name="T524">2⁸ = 256 </text:span><text:span text:style-name="T523">種組合</text:span><text:span text:style-name="T11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><text:span text:style-name="T196">💡 <text:s/></text:span><text:span text:style-name="T218">為什麼 </text:span><text:span text:style-name="T222">IP </text:span><text:span text:style-name="T218">數量一定是 </text:span><text:span text:style-name="T222">2 </text:span><text:span text:style-name="T218">的次方？</text:span></text:p>
            <text:p text:style-name="P7" loext:marker-style-name="T98"><text:span text:style-name="T112">每一個 </text:span><text:span text:style-name="T167">bit </text:span><text:span text:style-name="T112">只有 </text:span><text:span text:style-name="T167">0 </text:span><text:span text:style-name="T112">或 </text:span><text:span text:style-name="T167">1 </text:span><text:span text:style-name="T112">兩種狀態</text:span><text:span text:style-name="T97">。若有 </text:span><text:span text:style-name="T155">n </text:span><text:span text:style-name="T97">個 </text:span><text:span text:style-name="T155">bit </text:span><text:span text:style-name="T97">可自由變化，可能的組合數 ＝ </text:span><text:span text:style-name="T155">2ⁿ</text:span><text:span text:style-name="T97">。</text:span></text:p>
            <text:p text:style-name="P8" loext:marker-style-name="T98"><text:span text:style-name="T97">因此</text:span><text:span text:style-name="T264">子網路的 </text:span><text:span text:style-name="T265">IP </text:span><text:span text:style-name="T264">總數一定是 </text:span><text:span text:style-name="T265">2</text:span><text:span text:style-name="T264">、</text:span><text:span text:style-name="T265">4</text:span><text:span text:style-name="T264">、</text:span><text:span text:style-name="T265">8</text:span><text:span text:style-name="T264">、</text:span><text:span text:style-name="T265">16</text:span><text:span text:style-name="T264">、</text:span><text:span text:style-name="T265">32</text:span><text:span text:style-name="T264">、</text:span><text:span text:style-name="T265">64</text:span><text:span text:style-name="T264">、</text:span><text:span text:style-name="T265">128</text:span><text:span text:style-name="T264">、</text:span><text:span text:style-name="T265">256… </text:span><text:span text:style-name="T264">等 </text:span><text:span text:style-name="T265">2 </text:span><text:span text:style-name="T264">的次方</text:span><text:span text:style-name="T97">，不可能是 </text:span><text:span text:style-name="T155">100 </text:span><text:span text:style-name="T97">或 </text:span><text:span text:style-name="T155">50</text:span><text:span text:style-name="T97">。這就是</text:span><text:span text:style-name="T525">計算子網時必須「找最接近的 </text:span><text:span text:style-name="T543">2ⁿ</text:span><text:span text:style-name="T525">」</text:span><text:span text:style-name="T97">的根本原因。</text:span></text:p>
          </table:table-cell>
        </table:table-row>
      </table:table>
      <text:h text:style-name="P11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4" loext:marker-style-name="T67"><text:span text:style-name="T68">類別</text:span><text:span text:style-name="T67"/></text:p>
            </table:table-cell>
            <table:table-cell table:style-name="表格39.A1" office:value-type="string">
              <text:p text:style-name="P4" loext:marker-style-name="T67"><text:span text:style-name="T68">第一組數字範圍</text:span><text:span text:style-name="T67"/></text:p>
            </table:table-cell>
            <table:table-cell table:style-name="表格39.A1" office:value-type="string">
              <text:p text:style-name="P4" loext:marker-style-name="T67"><text:span text:style-name="T68">預設遮罩</text:span><text:span text:style-name="T67"/></text:p>
            </table:table-cell>
            <table:table-cell table:style-name="表格39.A1" office:value-type="string">
              <text:p text:style-name="P4" loext:marker-style-name="T67"><text:span text:style-name="T68">用途</text:span><text:span text:style-name="T67"/></text:p>
            </table:table-cell>
            <table:table-cell table:style-name="表格39.A1" office:value-type="string">
              <text:p text:style-name="P4" loext:marker-style-name="T67"><text:span text:style-name="T68">每網路主機數</text:span><text:span text:style-name="T67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9" loext:marker-style-name="T81"><text:span text:style-name="T147">A </text:span><text:span text:style-name="T82">類</text:span></text:p>
          </table:table-cell>
          <table:table-cell table:style-name="表格39.A2" office:value-type="string">
            <text:p text:style-name="P29" loext:marker-style-name="T329"><text:span text:style-name="T339">1 </text:span><text:span text:style-name="T330">～ </text:span><text:span text:style-name="T339">126</text:span></text:p>
          </table:table-cell>
          <table:table-cell table:style-name="表格39.A2" office:value-type="string">
            <text:p text:style-name="P29" loext:marker-style-name="T364"><text:span text:style-name="T365">/8</text:span><text:span text:style-name="T364"/></text:p>
          </table:table-cell>
          <table:table-cell table:style-name="表格39.A2" office:value-type="string">
            <text:p text:style-name="P29" loext:marker-style-name="T81"><text:span text:style-name="T82">超大型網路</text:span><text:span text:style-name="T81"/></text:p>
          </table:table-cell>
          <table:table-cell table:style-name="表格39.A2" office:value-type="string">
            <text:p text:style-name="P29" loext:marker-style-name="T81"><text:span text:style-name="T82">約 </text:span><text:span text:style-name="T147">1,677 </text:span><text:span text:style-name="T82">萬</text:span></text:p>
          </table:table-cell>
        </table:table-row>
        <table:table-row table:style-name="表格39.1">
          <table:table-cell table:style-name="表格39.A3" office:value-type="string">
            <text:p text:style-name="P29" loext:marker-style-name="T81"><text:span text:style-name="T147">B </text:span><text:span text:style-name="T82">類</text:span></text:p>
          </table:table-cell>
          <table:table-cell table:style-name="表格39.A3" office:value-type="string">
            <text:p text:style-name="P29" loext:marker-style-name="T329"><text:span text:style-name="T339">128 </text:span><text:span text:style-name="T330">～ </text:span><text:span text:style-name="T339">191</text:span></text:p>
          </table:table-cell>
          <table:table-cell table:style-name="表格39.A3" office:value-type="string">
            <text:p text:style-name="P29" loext:marker-style-name="T364"><text:span text:style-name="T365">/16</text:span><text:span text:style-name="T364"/></text:p>
          </table:table-cell>
          <table:table-cell table:style-name="表格39.A3" office:value-type="string">
            <text:p text:style-name="P29" loext:marker-style-name="T81"><text:span text:style-name="T82">中型網路</text:span><text:span text:style-name="T81"/></text:p>
          </table:table-cell>
          <table:table-cell table:style-name="表格39.A3" office:value-type="string">
            <text:p text:style-name="P29" loext:marker-style-name="T81"><text:span text:style-name="T82">約 </text:span><text:span text:style-name="T147">6.5 </text:span><text:span text:style-name="T82">萬</text:span></text:p>
          </table:table-cell>
        </table:table-row>
        <table:table-row table:style-name="表格39.1">
          <table:table-cell table:style-name="表格39.A2" office:value-type="string">
            <text:p text:style-name="P29" loext:marker-style-name="T81"><text:span text:style-name="T147">C </text:span><text:span text:style-name="T82">類</text:span></text:p>
          </table:table-cell>
          <table:table-cell table:style-name="表格39.A2" office:value-type="string">
            <text:p text:style-name="P29" loext:marker-style-name="T329"><text:span text:style-name="T339">192 </text:span><text:span text:style-name="T330">～ </text:span><text:span text:style-name="T339">223</text:span></text:p>
          </table:table-cell>
          <table:table-cell table:style-name="表格39.A2" office:value-type="string">
            <text:p text:style-name="P29" loext:marker-style-name="T364"><text:span text:style-name="T365">/24</text:span><text:span text:style-name="T364"/></text:p>
          </table:table-cell>
          <table:table-cell table:style-name="表格39.A2" office:value-type="string">
            <text:p text:style-name="P29" loext:marker-style-name="T81"><text:span text:style-name="T82">小型網路</text:span><text:span text:style-name="T81"/></text:p>
          </table:table-cell>
          <table:table-cell table:style-name="表格39.A2" office:value-type="string">
            <text:p text:style-name="P29" loext:marker-style-name="T81"><text:span text:style-name="T147">254</text:span><text:span text:style-name="T81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7"><text:span text:style-name="T220">127.x.x.x </text:span><text:span text:style-name="T215">為何不在 </text:span><text:span text:style-name="T220">A </text:span><text:span text:style-name="T215">類？　</text:span><text:span text:style-name="T156">127.0.0.1 </text:span><text:span text:style-name="T99">是回送位址（</text:span><text:span text:style-name="T156">Loopback</text:span><text:span text:style-name="T99">），保留給本機自我測試</text:span><text:span text:style-name="T97">；</text:span><text:span text:style-name="T543">ping 127.0.0.1 </text:span><text:span text:style-name="T525">可測本機協定是否正常，故 </text:span><text:span text:style-name="T543">A </text:span><text:span text:style-name="T525">類跳過 </text:span><text:span text:style-name="T543">127</text:span><text:span text:style-name="T97">，只到 </text:span><text:span text:style-name="T155">126</text:span><text:span text:style-name="T97">。</text:span></text:p>
            <text:p text:style-name="P8"><text:span text:style-name="T214">其他保留位址：</text:span><text:span text:style-name="T170">0.x.x.x</text:span><text:span text:style-name="T116">＝代表「這個網路本身」</text:span><text:span text:style-name="T97">；</text:span><text:span text:style-name="T169">224</text:span><text:span text:style-name="T115">～</text:span><text:span text:style-name="T169">239</text:span><text:span text:style-name="T115">＝</text:span><text:span text:style-name="T169">D </text:span><text:span text:style-name="T115">類（群播 </text:span><text:span text:style-name="T169">Multicast</text:span><text:span text:style-name="T115">）</text:span><text:span text:style-name="T97">；</text:span><text:span text:style-name="T167">240</text:span><text:span text:style-name="T112">～</text:span><text:span text:style-name="T167">255</text:span><text:span text:style-name="T112">＝</text:span><text:span text:style-name="T167">E </text:span><text:span text:style-name="T112">類（實驗用）</text:span><text:span text:style-name="T97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35" loext:marker-style-name="T98"><text:span text:style-name="T165">CIDR</text:span><text:span text:style-name="T110">（無類別網域間路由）</text:span><text:span text:style-name="T97">以</text:span><text:span text:style-name="T286">「</text:span><text:span text:style-name="T308">IP + / + </text:span><text:span text:style-name="T286">數字」精確表示網路大小</text:span><text:span text:style-name="T97">，例如 </text:span><text:span text:style-name="T155">192.168.1.0/24</text:span><text:span text:style-name="T97">。</text:span><text:span text:style-name="T344">/ </text:span><text:span text:style-name="T336">後面的數字 ＝ 前幾個 </text:span><text:span text:style-name="T344">bit </text:span><text:span text:style-name="T336">是「網路部分」（固定不變）</text:span><text:span text:style-name="T97">，</text:span><text:span text:style-name="T264">剩下的才是「主機部分」（可變）</text:span><text:span text:style-name="T97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4" loext:marker-style-name="T67"><text:span text:style-name="T68">表示法</text:span><text:span text:style-name="T67"/></text:p>
            </table:table-cell>
            <table:table-cell table:style-name="表格40.A1" office:value-type="string">
              <text:p text:style-name="P4" loext:marker-style-name="T67"><text:span text:style-name="T68">網路 </text:span><text:span text:style-name="T77">bit</text:span></text:p>
            </table:table-cell>
            <table:table-cell table:style-name="表格40.A1" office:value-type="string">
              <text:p text:style-name="P4" loext:marker-style-name="T67"><text:span text:style-name="T68">主機 </text:span><text:span text:style-name="T77">bit</text:span></text:p>
            </table:table-cell>
            <table:table-cell table:style-name="表格40.A1" office:value-type="string">
              <text:p text:style-name="P4" loext:marker-style-name="T67"><text:span text:style-name="T77">IP </text:span><text:span text:style-name="T68">總數</text:span></text:p>
            </table:table-cell>
            <table:table-cell table:style-name="表格40.A1" office:value-type="string">
              <text:p text:style-name="P4" loext:marker-style-name="T67"><text:span text:style-name="T68">對應哪段固定</text:span><text:span text:style-name="T67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9" loext:marker-style-name="T364"><text:span text:style-name="T365">/8</text:span><text:span text:style-name="T364"/></text:p>
          </table:table-cell>
          <table:table-cell table:style-name="表格40.A2" office:value-type="string">
            <text:p text:style-name="P29" loext:marker-style-name="T372"><text:span text:style-name="T398">8</text:span><text:span text:style-name="T372"/></text:p>
          </table:table-cell>
          <table:table-cell table:style-name="表格40.A2" office:value-type="string">
            <text:p text:style-name="P29" loext:marker-style-name="T269"><text:span text:style-name="T303">24</text:span><text:span text:style-name="T269"/></text:p>
          </table:table-cell>
          <table:table-cell table:style-name="表格40.A2" office:value-type="string">
            <text:p text:style-name="P29" loext:marker-style-name="T454"><text:span text:style-name="T450">16,777,216</text:span><text:span text:style-name="T454"/></text:p>
          </table:table-cell>
          <table:table-cell table:style-name="表格40.A2" office:value-type="string">
            <text:p text:style-name="P29" loext:marker-style-name="T81"><text:span text:style-name="T82">第 </text:span><text:span text:style-name="T147">1 </text:span><text:span text:style-name="T82">組（</text:span><text:span text:style-name="T147">A </text:span><text:span text:style-name="T82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364"><text:span text:style-name="T365">/16</text:span><text:span text:style-name="T364"/></text:p>
          </table:table-cell>
          <table:table-cell table:style-name="表格40.A3" office:value-type="string">
            <text:p text:style-name="P29" loext:marker-style-name="T372"><text:span text:style-name="T398">16</text:span><text:span text:style-name="T372"/></text:p>
          </table:table-cell>
          <table:table-cell table:style-name="表格40.A3" office:value-type="string">
            <text:p text:style-name="P29" loext:marker-style-name="T269"><text:span text:style-name="T303">16</text:span><text:span text:style-name="T269"/></text:p>
          </table:table-cell>
          <table:table-cell table:style-name="表格40.A3" office:value-type="string">
            <text:p text:style-name="P29" loext:marker-style-name="T454"><text:span text:style-name="T450">65,536</text:span><text:span text:style-name="T454"/></text:p>
          </table:table-cell>
          <table:table-cell table:style-name="表格40.A3" office:value-type="string">
            <text:p text:style-name="P29" loext:marker-style-name="T81"><text:span text:style-name="T82">第 </text:span><text:span text:style-name="T147">1-2 </text:span><text:span text:style-name="T82">組（</text:span><text:span text:style-name="T147">B </text:span><text:span text:style-name="T82">類）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364"><text:span text:style-name="T365">/24</text:span><text:span text:style-name="T364"/></text:p>
          </table:table-cell>
          <table:table-cell table:style-name="表格40.A2" office:value-type="string">
            <text:p text:style-name="P29" loext:marker-style-name="T372"><text:span text:style-name="T398">24</text:span><text:span text:style-name="T372"/></text:p>
          </table:table-cell>
          <table:table-cell table:style-name="表格40.A2" office:value-type="string">
            <text:p text:style-name="P29" loext:marker-style-name="T269"><text:span text:style-name="T303">8</text:span><text:span text:style-name="T269"/></text:p>
          </table:table-cell>
          <table:table-cell table:style-name="表格40.A2" office:value-type="string">
            <text:p text:style-name="P29" loext:marker-style-name="T454"><text:span text:style-name="T450">256</text:span><text:span text:style-name="T454"/></text:p>
          </table:table-cell>
          <table:table-cell table:style-name="表格40.A2" office:value-type="string">
            <text:p text:style-name="P29" loext:marker-style-name="T81"><text:span text:style-name="T82">第 </text:span><text:span text:style-name="T147">1-3 </text:span><text:span text:style-name="T82">組（</text:span><text:span text:style-name="T147">C </text:span><text:span text:style-name="T82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364"><text:span text:style-name="T365">/25</text:span><text:span text:style-name="T364"/></text:p>
          </table:table-cell>
          <table:table-cell table:style-name="表格40.A3" office:value-type="string">
            <text:p text:style-name="P29" loext:marker-style-name="T372"><text:span text:style-name="T398">25</text:span><text:span text:style-name="T372"/></text:p>
          </table:table-cell>
          <table:table-cell table:style-name="表格40.A3" office:value-type="string">
            <text:p text:style-name="P29" loext:marker-style-name="T269"><text:span text:style-name="T303">7</text:span><text:span text:style-name="T269"/></text:p>
          </table:table-cell>
          <table:table-cell table:style-name="表格40.A3" office:value-type="string">
            <text:p text:style-name="P29" loext:marker-style-name="T454"><text:span text:style-name="T450">128</text:span><text:span text:style-name="T454"/></text:p>
          </table:table-cell>
          <table:table-cell table:style-name="表格40.A3" office:value-type="string">
            <text:p text:style-name="P29" loext:marker-style-name="T81"><text:span text:style-name="T82">第 </text:span><text:span text:style-name="T147">1-3 </text:span><text:span text:style-name="T82">組 </text:span><text:span text:style-name="T147">+ </text:span><text:span text:style-name="T82">第 </text:span><text:span text:style-name="T147">4 </text:span><text:span text:style-name="T82">組前 </text:span><text:span text:style-name="T147">1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364"><text:span text:style-name="T365">/26</text:span><text:span text:style-name="T364"/></text:p>
          </table:table-cell>
          <table:table-cell table:style-name="表格40.A2" office:value-type="string">
            <text:p text:style-name="P29" loext:marker-style-name="T373"><text:span text:style-name="T399">26</text:span><text:span text:style-name="T373"/></text:p>
          </table:table-cell>
          <table:table-cell table:style-name="表格40.A2" office:value-type="string">
            <text:p text:style-name="P29" loext:marker-style-name="T270"><text:span text:style-name="T304">6</text:span><text:span text:style-name="T270"/></text:p>
          </table:table-cell>
          <table:table-cell table:style-name="表格40.A2" office:value-type="string">
            <text:p text:style-name="P29" loext:marker-style-name="T454"><text:span text:style-name="T450">64</text:span><text:span text:style-name="T454"/></text:p>
          </table:table-cell>
          <table:table-cell table:style-name="表格40.A2" office:value-type="string">
            <text:p text:style-name="P29" loext:marker-style-name="T81"><text:span text:style-name="T82">第 </text:span><text:span text:style-name="T147">1-3 </text:span><text:span text:style-name="T82">組 </text:span><text:span text:style-name="T147">+ </text:span><text:span text:style-name="T82">第 </text:span><text:span text:style-name="T147">4 </text:span><text:span text:style-name="T82">組前 </text:span><text:span text:style-name="T147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9" loext:marker-style-name="T364"><text:span text:style-name="T365">/27</text:span><text:span text:style-name="T364"/></text:p>
          </table:table-cell>
          <table:table-cell table:style-name="表格40.A3" office:value-type="string">
            <text:p text:style-name="P29" loext:marker-style-name="T373"><text:span text:style-name="T399">27</text:span><text:span text:style-name="T373"/></text:p>
          </table:table-cell>
          <table:table-cell table:style-name="表格40.A3" office:value-type="string">
            <text:p text:style-name="P29" loext:marker-style-name="T270"><text:span text:style-name="T304">5</text:span><text:span text:style-name="T270"/></text:p>
          </table:table-cell>
          <table:table-cell table:style-name="表格40.A3" office:value-type="string">
            <text:p text:style-name="P29" loext:marker-style-name="T454"><text:span text:style-name="T450">32</text:span><text:span text:style-name="T454"/></text:p>
          </table:table-cell>
          <table:table-cell table:style-name="表格40.A3" office:value-type="string">
            <text:p text:style-name="P29" loext:marker-style-name="T81"><text:span text:style-name="T82">第 </text:span><text:span text:style-name="T147">1-3 </text:span><text:span text:style-name="T82">組 </text:span><text:span text:style-name="T147">+ </text:span><text:span text:style-name="T82">第 </text:span><text:span text:style-name="T147">4 </text:span><text:span text:style-name="T82">組前 </text:span><text:span text:style-name="T147">3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364"><text:span text:style-name="T365">/28</text:span><text:span text:style-name="T364"/></text:p>
          </table:table-cell>
          <table:table-cell table:style-name="表格40.A2" office:value-type="string">
            <text:p text:style-name="P29" loext:marker-style-name="T373"><text:span text:style-name="T399">28</text:span><text:span text:style-name="T373"/></text:p>
          </table:table-cell>
          <table:table-cell table:style-name="表格40.A2" office:value-type="string">
            <text:p text:style-name="P29" loext:marker-style-name="T270"><text:span text:style-name="T304">4</text:span><text:span text:style-name="T270"/></text:p>
          </table:table-cell>
          <table:table-cell table:style-name="表格40.A2" office:value-type="string">
            <text:p text:style-name="P29" loext:marker-style-name="T454"><text:span text:style-name="T450">16</text:span><text:span text:style-name="T454"/></text:p>
          </table:table-cell>
          <table:table-cell table:style-name="表格40.A2" office:value-type="string">
            <text:p text:style-name="P29" loext:marker-style-name="T81"><text:span text:style-name="T82">第 </text:span><text:span text:style-name="T147">1-3 </text:span><text:span text:style-name="T82">組 </text:span><text:span text:style-name="T147">+ </text:span><text:span text:style-name="T82">第 </text:span><text:span text:style-name="T147">4 </text:span><text:span text:style-name="T82">組前 </text:span><text:span text:style-name="T147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6"><text:span text:style-name="T196">▸ <text:s/></text:span><text:span text:style-name="T50">用 </text:span><text:span text:style-name="T61">bit </text:span><text:span text:style-name="T50">切割理解 </text:span><text:span text:style-name="T61">/26</text:span></text:p>
            <text:p text:style-name="P7" loext:marker-style-name="T98"><text:span text:style-name="T97">以 </text:span><text:span text:style-name="T155">192.168.1.0</text:span><text:span text:style-name="T156">/26</text:span><text:span text:style-name="T155"> </text:span><text:span text:style-name="T97">為例：</text:span></text:p>
            <text:p text:style-name="P8"><text:span text:style-name="T63">11000000 . 10101000 . 00000001 . 00</text:span><text:span text:style-name="T43">|000000</text:span></text:p>
            <text:p text:style-name="P8" loext:marker-style-name="T98"><text:span text:style-name="T155">└── </text:span><text:span text:style-name="T112">前 </text:span><text:span text:style-name="T167">26 bit</text:span><text:span text:style-name="T112">（固定＝網路）</text:span><text:span text:style-name="T97">──┘ └ </text:span><text:span text:style-name="T286">後 </text:span><text:span text:style-name="T308">6 bit</text:span><text:span text:style-name="T286">（可變＝主機）</text:span><text:span text:style-name="T97">┘</text:span></text:p>
            <text:p text:style-name="P8" loext:marker-style-name="T98"><text:span text:style-name="T155">→ </text:span><text:span text:style-name="T556">主機 </text:span><text:span text:style-name="T557">bit </text:span><text:span text:style-name="T556">有 </text:span><text:span text:style-name="T557">6 </text:span><text:span text:style-name="T556">個 → </text:span><text:span text:style-name="T557">2⁶ = 64 </text:span><text:span text:style-name="T556">個 </text:span><text:span text:style-name="T557">IP</text:span><text:span text:style-name="T97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4" loext:marker-style-name="T67"><text:span text:style-name="T68">名稱</text:span><text:span text:style-name="T67"/></text:p>
            </table:table-cell>
            <table:table-cell table:style-name="表格41.A1" office:value-type="string">
              <text:p text:style-name="P4" loext:marker-style-name="T67"><text:span text:style-name="T68">位置</text:span><text:span text:style-name="T67"/></text:p>
            </table:table-cell>
            <table:table-cell table:style-name="表格41.A1" office:value-type="string">
              <text:p text:style-name="P4" loext:marker-style-name="T67"><text:span text:style-name="T68">用途</text:span><text:span text:style-name="T67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9" loext:marker-style-name="T469"><text:span text:style-name="T470">網路位址 </text:span><text:span text:style-name="T488">Network Address</text:span></text:p>
          </table:table-cell>
          <table:table-cell table:style-name="表格41.A2" office:value-type="string">
            <text:p text:style-name="P29" loext:marker-style-name="T329"><text:span text:style-name="T330">第一個 </text:span><text:span text:style-name="T339">IP</text:span><text:span text:style-name="T330">（最小）</text:span></text:p>
          </table:table-cell>
          <table:table-cell table:style-name="表格41.A2" office:value-type="string">
            <text:p text:style-name="P29" loext:marker-style-name="T81"><text:span text:style-name="T82">代表這整個子網路本身，不能分配給設備</text:span><text:span text:style-name="T81"/></text:p>
          </table:table-cell>
        </table:table-row>
        <table:table-row table:style-name="表格41.1">
          <table:table-cell table:style-name="表格41.A3" office:value-type="string">
            <text:p text:style-name="P29" loext:marker-style-name="T469"><text:span text:style-name="T470">廣播位址 </text:span><text:span text:style-name="T488">Broadcast Address</text:span></text:p>
          </table:table-cell>
          <table:table-cell table:style-name="表格41.A3" office:value-type="string">
            <text:p text:style-name="P29" loext:marker-style-name="T329"><text:span text:style-name="T330">最後一個 </text:span><text:span text:style-name="T339">IP</text:span><text:span text:style-name="T330">（最大）</text:span></text:p>
          </table:table-cell>
          <table:table-cell table:style-name="表格41.A3" office:value-type="string">
            <text:p text:style-name="P29" loext:marker-style-name="T81"><text:span text:style-name="T347">送到此位址＝網路內所有設備都收到</text:span><text:span text:style-name="T82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" loext:marker-style-name="T252"><text:span text:style-name="T253">可用主機數 ＝ </text:span><text:span text:style-name="T258">IP </text:span><text:span text:style-name="T253">總數 − </text:span><text:span text:style-name="T258">2</text:span></text:p>
            <text:p text:style-name="P8" loext:marker-style-name="T98"><text:span text:style-name="T97">【</text:span><text:span text:style-name="T155">/24 </text:span><text:span text:style-name="T97">示範】</text:span><text:span text:style-name="T165">192.168.1.0</text:span><text:span text:style-name="T110">＝網路位址（不能用）</text:span><text:span text:style-name="T97">… </text:span><text:span text:style-name="T169">192.168.1.255</text:span><text:span text:style-name="T115">＝廣播位址（不能用）</text:span><text:span text:style-name="T97">→ </text:span><text:span text:style-name="T514">共 </text:span><text:span text:style-name="T509">256 </text:span><text:span text:style-name="T514">個，可用 </text:span><text:span text:style-name="T509">254 </text:span><text:span text:style-name="T514">個</text:span><text:span text:style-name="T97">。</text:span></text:p>
            <text:p text:style-name="P8" loext:marker-style-name="T98"><text:span text:style-name="T97">【</text:span><text:span text:style-name="T155">/26 </text:span><text:span text:style-name="T97">示範</text:span><text:span text:style-name="T155">·</text:span><text:span text:style-name="T97">最常考】</text:span><text:span text:style-name="T165">192.168.1.0</text:span><text:span text:style-name="T110">＝網路位址</text:span><text:span text:style-name="T97"> … </text:span><text:span text:style-name="T169">192.168.1.63</text:span><text:span text:style-name="T115">＝廣播位址</text:span><text:span text:style-name="T97"> → </text:span><text:span text:style-name="T514">共 </text:span><text:span text:style-name="T509">64 </text:span><text:span text:style-name="T514">個（</text:span><text:span text:style-name="T509">2⁶</text:span><text:span text:style-name="T514">），可用 </text:span><text:span text:style-name="T509">62 </text:span><text:span text:style-name="T514">個</text:span><text:span text:style-name="T97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7"><text:span text:style-name="T216">唯一例外 </text:span><text:span text:style-name="T221">/31</text:span><text:span text:style-name="T216">（點對點，</text:span><text:span text:style-name="T221">RFC 3021</text:span><text:span text:style-name="T216">）：</text:span><text:span text:style-name="T388">只有 </text:span><text:span text:style-name="T409">2 </text:span><text:span text:style-name="T388">個 </text:span><text:span text:style-name="T409">IP</text:span><text:span text:style-name="T396">，</text:span><text:span text:style-name="T388">兩個都可用作主機</text:span><text:span text:style-name="T286">，沒有網路位址和廣播位址</text:span><text:span text:style-name="T97">。考試若未特別提到，預設仍要 −</text:span><text:span text:style-name="T155">2</text:span><text:span text:style-name="T97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</text:span><text:span text:style-name="T27">VLSM</text:span><text:span text:style-name="T28">（可變長度子網路遮罩）</text:span></text:h>
      <text:p text:style-name="P35" loext:marker-style-name="T98"><text:span text:style-name="T155">VLSM </text:span><text:span text:style-name="T97">的做法：</text:span><text:span text:style-name="T110">依各部門「實際需求」分配</text:span><text:span text:style-name="T428">剛剛好大小</text:span><text:span text:style-name="T110">的子網路，</text:span><text:span text:style-name="T477">不多給、不浪費</text:span><text:span text:style-name="T97">。例如 </text:span><text:span text:style-name="T155">A </text:span><text:span text:style-name="T97">部門 </text:span><text:span text:style-name="T155">100 </text:span><text:span text:style-name="T97">台、</text:span><text:span text:style-name="T155">B </text:span><text:span text:style-name="T97">部門 </text:span><text:span text:style-name="T155">50 </text:span><text:span text:style-name="T97">台、</text:span><text:span text:style-name="T155">C </text:span><text:span text:style-name="T97">部門 </text:span><text:span text:style-name="T155">10 </text:span><text:span text:style-name="T97">台，</text:span><text:span text:style-name="T389">若全用 </text:span><text:span text:style-name="T410">/24 </text:span><text:span text:style-name="T389">會浪費大量 </text:span><text:span text:style-name="T410">IP</text:span><text:span text:style-name="T97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6"><text:span text:style-name="T196">📋 <text:s/></text:span><text:span text:style-name="T210">VLSM </text:span><text:span text:style-name="T200">標準流程（三步驟）</text:span></text:p>
            <text:p text:style-name="P7" loext:marker-style-name="T204"><text:span text:style-name="T211">①</text:span><text:span text:style-name="T213"> </text:span><text:span text:style-name="T205">將需求由大到小排序</text:span></text:p>
            <text:p text:style-name="P8"><text:span text:style-name="T211">② </text:span><text:span text:style-name="T205">計算每個需求所需前綴</text:span><text:span text:style-name="T203">：</text:span><text:span text:style-name="T459">需求 </text:span><text:span text:style-name="T461">+ 2 → </text:span><text:span text:style-name="T459">找最小 </text:span><text:span text:style-name="T461">2ⁿ → </text:span><text:span text:style-name="T459">前綴 </text:span><text:span text:style-name="T461">= 32 − n</text:span></text:p>
            <text:p text:style-name="P8" loext:marker-style-name="T204"><text:span text:style-name="T211">③ </text:span><text:span text:style-name="T203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7"><text:span text:style-name="T214">為什麼要「由大到小」？　</text:span><text:span text:style-name="T97">因為「對齊（</text:span><text:span text:style-name="T155">Alignment</text:span><text:span text:style-name="T97">）」：</text:span><text:span text:style-name="T286">子網路的起始位址必須是其大小的整數倍</text:span><text:span text:style-name="T97">。</text:span><text:span text:style-name="T558">大小 </text:span><text:span text:style-name="T570">128 </text:span><text:span text:style-name="T558">的子網只能從 </text:span><text:span text:style-name="T570">0</text:span><text:span text:style-name="T558">、</text:span><text:span text:style-name="T570">128… </text:span><text:span text:style-name="T558">開始；大小 </text:span><text:span text:style-name="T570">64 </text:span><text:span text:style-name="T558">的只能從 </text:span><text:span text:style-name="T570">0</text:span><text:span text:style-name="T558">、</text:span><text:span text:style-name="T570">64</text:span><text:span text:style-name="T558">、</text:span><text:span text:style-name="T570">128… </text:span><text:span text:style-name="T558">開始</text:span><text:span text:style-name="T97">。</text:span></text:p>
            <text:p text:style-name="P8"><text:span text:style-name="T214">反面示範：</text:span><text:span text:style-name="T97">若先切小的 </text:span><text:span text:style-name="T155">C</text:span><text:span text:style-name="T97">（</text:span><text:span text:style-name="T155">/28</text:span><text:span text:style-name="T97">，</text:span><text:span text:style-name="T155">0</text:span><text:span text:style-name="T97">～</text:span><text:span text:style-name="T155">15</text:span><text:span text:style-name="T97">），</text:span><text:span text:style-name="T429">再切大的 </text:span><text:span text:style-name="T440">A</text:span><text:span text:style-name="T429">（</text:span><text:span text:style-name="T440">/25</text:span><text:span text:style-name="T429">，</text:span><text:span text:style-name="T440">128 </text:span><text:span text:style-name="T429">個），最近可用對齊位址是 </text:span><text:span text:style-name="T440">128</text:span><text:span text:style-name="T155"> → </text:span><text:span text:style-name="T287">中間 </text:span><text:span text:style-name="T310">16</text:span><text:span text:style-name="T287">～</text:span><text:span text:style-name="T310">127 </text:span><text:span text:style-name="T287">共 </text:span><text:span text:style-name="T310">112 </text:span><text:span text:style-name="T287">個 </text:span><text:span text:style-name="T310">IP </text:span><text:span text:style-name="T287">全浪費！</text:span><text:span text:style-name="T97">正解：</text:span><text:span text:style-name="T336">先切大的，大的天然對齊，小的再從後面切</text:span><text:span text:style-name="T97">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1">前綴計算公式詳解</text:span><text:span text:style-name="T200">（以</text:span><text:span text:style-name="T485">需要 </text:span><text:span text:style-name="T486">100 </text:span><text:span text:style-name="T485">台主機為例</text:span><text:span text:style-name="T200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98"><text:span text:style-name="T155">① </text:span><text:span text:style-name="T112">加 </text:span><text:span text:style-name="T167">2</text:span><text:span text:style-name="T112">（預留網路 </text:span><text:span text:style-name="T167">+ </text:span><text:span text:style-name="T112">廣播）</text:span><text:span text:style-name="T97">：</text:span><text:span text:style-name="T156">100 + 2 = 102</text:span></text:p>
            <text:p text:style-name="P8" loext:marker-style-name="T98"><text:span text:style-name="T155">② </text:span><text:span text:style-name="T101">找「大於等於 </text:span><text:span text:style-name="T158">102</text:span><text:span text:style-name="T101">」的最小 </text:span><text:span text:style-name="T158">2ⁿ</text:span><text:span text:style-name="T97">：</text:span><text:span text:style-name="T155">2⁶ = 64</text:span><text:span text:style-name="T97">（太小）、</text:span><text:span text:style-name="T308">2⁷ = 128</text:span><text:span text:style-name="T286">（夠）→ </text:span><text:span text:style-name="T308">n = 7</text:span></text:p>
            <text:p text:style-name="P8" loext:marker-style-name="T98"><text:span text:style-name="T155">③ </text:span><text:span text:style-name="T336">前綴 </text:span><text:span text:style-name="T344">= 32 − n = 32 − 7 = 25</text:span><text:span text:style-name="T155"> →</text:span><text:span text:style-name="T417"> </text:span><text:span text:style-name="T390">使用 </text:span><text:span text:style-name="T411">/25</text:span><text:span text:style-name="T390">（驗證：</text:span><text:span text:style-name="T411">2⁷ = 128</text:span><text:span text:style-name="T390">，可用 </text:span><text:span text:style-name="T411">126 ≥ 100 ✔</text:span><text:span text:style-name="T390">）</text:span></text:p>
            <text:p text:style-name="P8" loext:marker-style-name="T25"><text:span text:style-name="T26">公式一句話</text:span><text:span text:style-name="T24">：</text:span><text:span text:style-name="T515">需求 </text:span><text:span text:style-name="T510">+2 → </text:span><text:span text:style-name="T515">找最小 </text:span><text:span text:style-name="T510">2ⁿ</text:span><text:span text:style-name="T43"> → </text:span><text:span text:style-name="T308">/(32−n)</text:span></text:p>
          </table:table-cell>
        </table:table-row>
      </table:table>
      <text:h text:style-name="P12" text:outline-level="3"><text:soft-page-break/><text:span text:style-name="T198">▍</text:span><text:span text:style-name="T199"> </text:span><text:span text:style-name="T200">完整範例：起始 </text:span><text:span text:style-name="T199">192.168.1.0/24</text:span><text:span text:style-name="T200">，需求 </text:span><text:span text:style-name="T199">A=100</text:span><text:span text:style-name="T200">、</text:span><text:span text:style-name="T199">B=50</text:span><text:span text:style-name="T200">、</text:span><text:span text:style-name="T199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" loext:marker-style-name="T73"><text:span text:style-name="T74">部門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4">需求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9">+2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9">2ⁿ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4">前綴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4">切割結果（範圍）</text:span><text:span text:style-name="T73"/></text:p>
            </table:table-cell>
            <table:table-cell table:style-name="表格44.A1" office:value-type="string">
              <text:p text:style-name="P4" loext:marker-style-name="T73"><text:span text:style-name="T74">可用 </text:span><text:span text:style-name="T79">/ </text:span><text:span text:style-name="T74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9" loext:marker-style-name="T126"><text:span text:style-name="T179">A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00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02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28</text:span><text:span text:style-name="T127">（</text:span><text:span text:style-name="T179">2</text:span><text:span text:style-name="T189">⁷</text:span><text:span text:style-name="T127">）</text:span></text:p>
          </table:table-cell>
          <table:table-cell table:style-name="表格44.A2" office:value-type="string">
            <text:p text:style-name="P29" loext:marker-style-name="T142"><text:span text:style-name="T190">/25</text:span><text:span text:style-name="T142"/></text:p>
          </table:table-cell>
          <table:table-cell table:style-name="表格44.A2" office:value-type="string">
            <text:p text:style-name="P29" loext:marker-style-name="T126"><text:span text:style-name="T179">192.168.1.0</text:span><text:span text:style-name="T190">/25</text:span><text:span text:style-name="T127">（</text:span><text:span text:style-name="T179">0</text:span><text:span text:style-name="T127">～</text:span><text:span text:style-name="T403">127</text:span><text:span text:style-name="T127">）</text:span></text:p>
          </table:table-cell>
          <table:table-cell table:style-name="表格44.A2" office:value-type="string">
            <text:p text:style-name="P29" loext:marker-style-name="T126"><text:span text:style-name="T179">126 ≥ 100 ✔</text:span><text:span text:style-name="T126"/></text:p>
          </table:table-cell>
        </table:table-row>
        <table:table-row table:style-name="表格44.1">
          <table:table-cell table:style-name="表格44.A3" office:value-type="string">
            <text:p text:style-name="P29" loext:marker-style-name="T126"><text:span text:style-name="T179">B</text:span><text:span text:style-name="T126"/></text:p>
          </table:table-cell>
          <table:table-cell table:style-name="表格44.A3" office:value-type="string">
            <text:p text:style-name="P29" loext:marker-style-name="T126"><text:span text:style-name="T179">50</text:span><text:span text:style-name="T126"/></text:p>
          </table:table-cell>
          <table:table-cell table:style-name="表格44.A3" office:value-type="string">
            <text:p text:style-name="P29" loext:marker-style-name="T126"><text:span text:style-name="T179">52</text:span><text:span text:style-name="T126"/></text:p>
          </table:table-cell>
          <table:table-cell table:style-name="表格44.A3" office:value-type="string">
            <text:p text:style-name="P29" loext:marker-style-name="T126"><text:span text:style-name="T179">64</text:span><text:span text:style-name="T127">（</text:span><text:span text:style-name="T179">2</text:span><text:span text:style-name="T189">⁶</text:span><text:span text:style-name="T127">）</text:span></text:p>
          </table:table-cell>
          <table:table-cell table:style-name="表格44.A3" office:value-type="string">
            <text:p text:style-name="P29" loext:marker-style-name="T142"><text:span text:style-name="T190">/26</text:span><text:span text:style-name="T142"/></text:p>
          </table:table-cell>
          <table:table-cell table:style-name="表格44.A3" office:value-type="string">
            <text:p text:style-name="P29" loext:marker-style-name="T126"><text:span text:style-name="T179">192.168.1.128</text:span><text:span text:style-name="T190">/26</text:span><text:span text:style-name="T127">（</text:span><text:span text:style-name="T179">128</text:span><text:span text:style-name="T127">～</text:span><text:span text:style-name="T403">191</text:span><text:span text:style-name="T127">）</text:span></text:p>
          </table:table-cell>
          <table:table-cell table:style-name="表格44.A3" office:value-type="string">
            <text:p text:style-name="P29" loext:marker-style-name="T126"><text:span text:style-name="T179">62 ≥ 50 ✔</text:span><text:span text:style-name="T126"/></text:p>
          </table:table-cell>
        </table:table-row>
        <table:table-row table:style-name="表格44.1">
          <table:table-cell table:style-name="表格44.A2" office:value-type="string">
            <text:p text:style-name="P29" loext:marker-style-name="T126"><text:span text:style-name="T179">C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0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2</text:span><text:span text:style-name="T126"/></text:p>
          </table:table-cell>
          <table:table-cell table:style-name="表格44.A2" office:value-type="string">
            <text:p text:style-name="P29" loext:marker-style-name="T126"><text:span text:style-name="T179">16</text:span><text:span text:style-name="T127">（</text:span><text:span text:style-name="T179">2</text:span><text:span text:style-name="T189">⁴</text:span><text:span text:style-name="T127">）</text:span></text:p>
          </table:table-cell>
          <table:table-cell table:style-name="表格44.A2" office:value-type="string">
            <text:p text:style-name="P29" loext:marker-style-name="T142"><text:span text:style-name="T190">/28</text:span><text:span text:style-name="T142"/></text:p>
          </table:table-cell>
          <table:table-cell table:style-name="表格44.A2" office:value-type="string">
            <text:p text:style-name="P29" loext:marker-style-name="T126"><text:span text:style-name="T179">192.168.1.192</text:span><text:span text:style-name="T190">/28</text:span><text:span text:style-name="T127">（</text:span><text:span text:style-name="T179">192</text:span><text:span text:style-name="T127">～</text:span><text:span text:style-name="T403">207</text:span><text:span text:style-name="T127">）</text:span></text:p>
          </table:table-cell>
          <table:table-cell table:style-name="表格44.A2" office:value-type="string">
            <text:p text:style-name="P29" loext:marker-style-name="T126"><text:span text:style-name="T179">14 ≥ 10 ✔</text:span><text:span text:style-name="T126"/></text:p>
          </table:table-cell>
        </table:table-row>
      </table:table>
      <text:p text:style-name="P35" loext:marker-style-name="T10"><text:span text:style-name="T11">剩餘 </text:span><text:span text:style-name="T20">192.168.1.208 </text:span><text:span text:style-name="T11">～ </text:span><text:span text:style-name="T20">.255</text:span><text:span text:style-name="T11">（</text:span><text:span text:style-name="T20">48 </text:span><text:span text:style-name="T11">個 </text:span><text:span text:style-name="T20">IP</text:span><text:span text:style-name="T11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><text:span text:style-name="T196">💡 <text:s/></text:span><text:span text:style-name="T250">考試技巧</text:span></text:p>
            <text:p text:style-name="P7" loext:marker-style-name="T98"><text:span text:style-name="T391">快速判斷一個 </text:span><text:span text:style-name="T412">IP </text:span><text:span text:style-name="T391">屬於哪個 </text:span><text:span text:style-name="T412">/26 </text:span><text:span text:style-name="T391">子網</text:span><text:span text:style-name="T97">（</text:span><text:span text:style-name="T286">每段 </text:span><text:span text:style-name="T308">64 </text:span><text:span text:style-name="T286">個，起點 </text:span><text:span text:style-name="T308">0</text:span><text:span text:style-name="T286">、</text:span><text:span text:style-name="T308">64</text:span><text:span text:style-name="T286">、</text:span><text:span text:style-name="T308">128</text:span><text:span text:style-name="T286">、</text:span><text:span text:style-name="T308">192</text:span><text:span text:style-name="T97">）：</text:span><text:span text:style-name="T110">看最後一個 </text:span><text:span text:style-name="T165">Octet </text:span><text:span text:style-name="T110">落在哪個區間 </text:span><text:span text:style-name="T97">→</text:span></text:p>
            <text:p text:style-name="P8" loext:marker-style-name="T98"><text:span text:style-name="T167">0</text:span><text:span text:style-name="T112">～</text:span><text:span text:style-name="T167">63</text:span><text:span text:style-name="T155"> → x.0/26</text:span><text:span text:style-name="T97">　｜　</text:span><text:span text:style-name="T167">64</text:span><text:span text:style-name="T112">～</text:span><text:span text:style-name="T167">127</text:span><text:span text:style-name="T155"> → x.64/26</text:span><text:span text:style-name="T97">　｜　</text:span><text:span text:style-name="T167">128</text:span><text:span text:style-name="T112">～</text:span><text:span text:style-name="T167">191</text:span><text:span text:style-name="T155"> → x.128/26</text:span><text:span text:style-name="T97">　｜　</text:span><text:span text:style-name="T167">192</text:span><text:span text:style-name="T112">～</text:span><text:span text:style-name="T167">255</text:span><text:span text:style-name="T155"> → x.192/26</text:span></text:p>
          </table:table-cell>
        </table:table-row>
      </table:table>
      <text:h text:style-name="P11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35" loext:marker-style-name="T98"><text:span text:style-name="T155">CIDR </text:span><text:span text:style-name="T97">的合併功能是 </text:span><text:span text:style-name="T155">VLSM </text:span><text:span text:style-name="T97">的「反向操作」：</text:span><text:span text:style-name="T441">VLSM </text:span><text:span text:style-name="T426">把大網路切小</text:span><text:span text:style-name="T97">；</text:span><text:span text:style-name="T413">CIDR </text:span><text:span text:style-name="T392">合併把小網路合成一個大網路表示</text:span><text:span text:style-name="T97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><text:span text:style-name="T196">🔑 </text:span><text:span text:style-name="T197"><text:s/></text:span><text:span text:style-name="T202">合併三條件（缺一不可）</text:span></text:p>
            <text:p text:style-name="P7"><text:span text:style-name="T211">① </text:span><text:span text:style-name="T205">連續（</text:span><text:span text:style-name="T213">Contiguous</text:span><text:span text:style-name="T205">）</text:span><text:span text:style-name="T203">：</text:span><text:span text:style-name="T308">IP </text:span><text:span text:style-name="T286">範圍必須緊鄰</text:span><text:span text:style-name="T97">，</text:span><text:span text:style-name="T336">中間不能有空缺</text:span><text:span text:style-name="T97">。</text:span></text:p>
            <text:p text:style-name="P8"><text:span text:style-name="T211">② </text:span><text:span text:style-name="T205">數量是 </text:span><text:span text:style-name="T213">2ⁿ</text:span><text:span text:style-name="T203">：</text:span><text:span text:style-name="T155">2</text:span><text:span text:style-name="T97">、</text:span><text:span text:style-name="T155">4</text:span><text:span text:style-name="T97">、</text:span><text:span text:style-name="T155">8…</text:span><text:span text:style-name="T97">。</text:span></text:p>
            <text:p text:style-name="P8"><text:span text:style-name="T211">③ </text:span><text:span text:style-name="T205">起始位址對齊</text:span><text:span text:style-name="T203">：</text:span><text:span text:style-name="T97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6"><text:span text:style-name="T196">▸ <text:s/></text:span><text:span text:style-name="T50">合併範例與反例</text:span></text:p>
            <text:p text:style-name="P7"><text:span text:style-name="T109">範例：</text:span><text:span text:style-name="T414">2 </text:span><text:span text:style-name="T393">個 </text:span><text:span text:style-name="T414">/25 → 1 </text:span><text:span text:style-name="T393">個 </text:span><text:span text:style-name="T414">/24</text:span><text:span text:style-name="T109">　</text:span><text:span text:style-name="T155">192.168.1</text:span><text:span text:style-name="T165">.0</text:span><text:span text:style-name="T155">/25 </text:span><text:span text:style-name="T97">＋ </text:span><text:span text:style-name="T155">192.168.1</text:span><text:span text:style-name="T165">.128</text:span><text:span text:style-name="T155">/25 → ① </text:span><text:span text:style-name="T97">緊鄰✔ ② </text:span><text:span text:style-name="T155">2 </text:span><text:span text:style-name="T97">個（</text:span><text:span text:style-name="T155">2¹</text:span><text:span text:style-name="T97">）✔ ③ 起點 </text:span><text:span text:style-name="T155">.0</text:span><text:span text:style-name="T97">，</text:span><text:span text:style-name="T155">0÷256=0✔ → </text:span><text:span text:style-name="T97">合併為 </text:span><text:span text:style-name="T155">192.168.1</text:span><text:span text:style-name="T165">.0</text:span><text:span text:style-name="T155">/24</text:span><text:span text:style-name="T97">。</text:span></text:p>
            <text:p text:style-name="P8"><text:span text:style-name="T109">範例：</text:span><text:span text:style-name="T414">4 </text:span><text:span text:style-name="T393">個 </text:span><text:span text:style-name="T414">/24 → 1 </text:span><text:span text:style-name="T393">個 </text:span><text:span text:style-name="T414">/22</text:span><text:span text:style-name="T109">　</text:span><text:span text:style-name="T155">192.168</text:span><text:span text:style-name="T167">.0/1/2/3</text:span><text:span text:style-name="T155">.0/</text:span><text:span text:style-name="T156">24</text:span><text:span text:style-name="T155"> → </text:span><text:span text:style-name="T97">連續✔、</text:span><text:span text:style-name="T155">4 </text:span><text:span text:style-name="T97">個（</text:span><text:span text:style-name="T155">2²</text:span><text:span text:style-name="T97">）✔、對齊✔ → 合併為 </text:span><text:span text:style-name="T155">192.168</text:span><text:span text:style-name="T158">.0</text:span><text:span text:style-name="T155">.0/</text:span><text:span text:style-name="T156">22</text:span><text:span text:style-name="T97">。</text:span></text:p>
            <text:p text:style-name="P8"><text:span text:style-name="T228">反例（無法合併）：</text:span><text:span text:style-name="T493">192.168.1.0/24 </text:span><text:span text:style-name="T478">＋ </text:span><text:span text:style-name="T493">192.168.2.0/24 → </text:span><text:span text:style-name="T478">雖數量為 </text:span><text:span text:style-name="T493">2</text:span><text:span text:style-name="T478">，但起點 </text:span><text:span text:style-name="T493">.1 </text:span><text:span text:style-name="T478">不對齊</text:span><text:span text:style-name="T97">（</text:span><text:span text:style-name="T155">/23 </text:span><text:span text:style-name="T97">起點只能是偶數倍 </text:span><text:span text:style-name="T155">.0 </text:span><text:span text:style-name="T97">或 </text:span><text:span text:style-name="T155">.2</text:span><text:span text:style-name="T97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7"><text:span text:style-name="T251">合併後前綴公式：</text:span><text:span text:style-name="T97">合併 </text:span><text:span text:style-name="T155">2ⁿ </text:span><text:span text:style-name="T97">個子網 → 前綴減 </text:span><text:span text:style-name="T155">n</text:span><text:span text:style-name="T97">（</text:span><text:span text:style-name="T336">每合併一倍，</text:span><text:span text:style-name="T344">/ </text:span><text:span text:style-name="T336">的數字減 </text:span><text:span text:style-name="T344">1</text:span><text:span text:style-name="T97">）。</text:span></text:p>
            <text:p text:style-name="P8" loext:marker-style-name="T98"><text:span text:style-name="T544">2 </text:span><text:span text:style-name="T526">個 </text:span><text:span text:style-name="T544">/26 → /25</text:span><text:span text:style-name="T526">；</text:span><text:span text:style-name="T544">4 </text:span><text:span text:style-name="T526">個 </text:span><text:span text:style-name="T544">/26 → /24</text:span><text:span text:style-name="T526">；</text:span><text:span text:style-name="T544">2 </text:span><text:span text:style-name="T526">個 </text:span><text:span text:style-name="T544">/24 → /23</text:span><text:span text:style-name="T97">。</text:span></text:p>
          </table:table-cell>
        </table:table-row>
      </table:table>
      <text:h text:style-name="P11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4" loext:marker-style-name="T67"><text:span text:style-name="T68">概念</text:span><text:span text:style-name="T67"/></text:p>
            </table:table-cell>
            <table:table-cell table:style-name="表格47.A1" office:value-type="string">
              <text:p text:style-name="P4" loext:marker-style-name="T67"><text:span text:style-name="T68">關鍵字</text:span><text:span text:style-name="T67"/></text:p>
            </table:table-cell>
            <table:table-cell table:style-name="表格47.A1" office:value-type="string">
              <text:p text:style-name="P4" loext:marker-style-name="T67"><text:span text:style-name="T68">核心規則</text:span><text:span text:style-name="T67"/></text:p>
            </table:table-cell>
            <table:table-cell table:style-name="表格47.A1" office:value-type="string">
              <text:p text:style-name="P4" loext:marker-style-name="T67"><text:span text:style-name="T68">比喻</text:span><text:span text:style-name="T67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9" loext:marker-style-name="T81"><text:span text:style-name="T147">IP </text:span><text:span text:style-name="T82">分類</text:span></text:p>
          </table:table-cell>
          <table:table-cell table:style-name="表格47.A2" office:value-type="string">
            <text:p text:style-name="P29" loext:marker-style-name="T81"><text:span text:style-name="T147">A/B/C </text:span><text:span text:style-name="T82">類</text:span></text:p>
          </table:table-cell>
          <table:table-cell table:style-name="表格47.A2" office:value-type="string">
            <text:p text:style-name="P29" loext:marker-style-name="T329"><text:span text:style-name="T330">看第一組數字判斷類別</text:span><text:span text:style-name="T329"/></text:p>
          </table:table-cell>
          <table:table-cell table:style-name="表格47.A2" office:value-type="string">
            <text:p text:style-name="P29" loext:marker-style-name="T81"><text:span text:style-name="T82">土地大小分類</text:span><text:span text:style-name="T81"/></text:p>
          </table:table-cell>
        </table:table-row>
        <table:table-row table:style-name="表格47.1">
          <table:table-cell table:style-name="表格47.A3" office:value-type="string">
            <text:p text:style-name="P29" loext:marker-style-name="T81"><text:span text:style-name="T147">VLSM</text:span><text:span text:style-name="T81"/></text:p>
          </table:table-cell>
          <table:table-cell table:style-name="表格47.A3" office:value-type="string">
            <text:p text:style-name="P29" loext:marker-style-name="T81"><text:span text:style-name="T82">切子網路</text:span><text:span text:style-name="T81"/></text:p>
          </table:table-cell>
          <table:table-cell table:style-name="表格47.A3" office:value-type="string">
            <text:p text:style-name="P29" loext:marker-style-name="T81"><text:span text:style-name="T84">由大到小</text:span><text:span text:style-name="T82">；</text:span><text:span text:style-name="T268">需求</text:span><text:span text:style-name="T302">+2→2ⁿ→/(32−n)</text:span></text:p>
          </table:table-cell>
          <table:table-cell table:style-name="表格47.A3" office:value-type="string">
            <text:p text:style-name="P29" loext:marker-style-name="T81"><text:span text:style-name="T82">把大地切成不同大小的小塊</text:span><text:span text:style-name="T81"/></text:p>
          </table:table-cell>
        </table:table-row>
        <table:table-row table:style-name="表格47.1">
          <table:table-cell table:style-name="表格47.A2" office:value-type="string">
            <text:p text:style-name="P29" loext:marker-style-name="T81"><text:span text:style-name="T147">CIDR </text:span><text:span text:style-name="T82">合併</text:span></text:p>
          </table:table-cell>
          <table:table-cell table:style-name="表格47.A2" office:value-type="string">
            <text:p text:style-name="P29" loext:marker-style-name="T81"><text:span text:style-name="T82">聚合路由</text:span><text:span text:style-name="T81"/></text:p>
          </table:table-cell>
          <table:table-cell table:style-name="表格47.A2" office:value-type="string">
            <text:p text:style-name="P29" loext:marker-style-name="T81"><text:span text:style-name="T330">連續</text:span><text:span text:style-name="T82"> </text:span><text:span text:style-name="T147">+ </text:span><text:span text:style-name="T82">數量 </text:span><text:span text:style-name="T147">2ⁿ + </text:span><text:span text:style-name="T82">對齊；</text:span><text:span text:style-name="T88">前綴減 </text:span><text:span text:style-name="T149">n</text:span></text:p>
          </table:table-cell>
          <table:table-cell table:style-name="表格47.A2" office:value-type="string">
            <text:p text:style-name="P29" loext:marker-style-name="T81"><text:span text:style-name="T82">把相鄰小地合成大地</text:span><text:span text:style-name="T81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6"><text:span text:style-name="T196">🎯 <text:s/></text:span><text:span text:style-name="T240">考試標準解題流程</text:span></text:p>
            <text:p text:style-name="P7"><text:span text:style-name="T241">遇到 </text:span><text:span text:style-name="T245">VLSM </text:span><text:span text:style-name="T241">題：</text:span><text:span text:style-name="T514">確認起始網路</text:span><text:span text:style-name="T97"> → </text:span><text:span text:style-name="T504">需求由大到小</text:span><text:span text:style-name="T97"> → </text:span><text:span text:style-name="T288">各需求 </text:span><text:span text:style-name="T311">+2 </text:span><text:span text:style-name="T288">找 </text:span><text:span text:style-name="T311">2ⁿ </text:span><text:span text:style-name="T288">算前綴</text:span><text:span text:style-name="T97"> → </text:span><text:span text:style-name="T389">大的先切</text:span><text:span text:style-name="T97">依序往後 → </text:span><text:span text:style-name="T477">驗證網路位址</text:span><text:span text:style-name="T494">/</text:span><text:span text:style-name="T477">廣播位址</text:span><text:span text:style-name="T494">/</text:span><text:span text:style-name="T477">可用範圍</text:span><text:span text:style-name="T97">。</text:span></text:p>
            <text:p text:style-name="P8"><text:span text:style-name="T241">遇到 </text:span><text:span text:style-name="T245">CIDR </text:span><text:span text:style-name="T241">合併題：</text:span><text:span text:style-name="T97">列出網路確認連續 → 確認數量 </text:span><text:span text:style-name="T155">2ⁿ → </text:span><text:span text:style-name="T97">確認起點對齊（起點</text:span><text:span text:style-name="T155">÷</text:span><text:span text:style-name="T97">合併後大小</text:span><text:span text:style-name="T155">=</text:span><text:span text:style-name="T97">整數）→ 前綴 </text:span><text:span text:style-name="T155">= </text:span><text:span text:style-name="T97">原前綴 − </text:span><text:span text:style-name="T155">n</text:span><text:span text:style-name="T97">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355">一條網路，一次最多</text:span><text:span text:style-name="T27">)</text:span></text:h>
      <text:p text:style-name="P35" loext:marker-style-name="T98"><text:span text:style-name="T165">MTU</text:span><text:span text:style-name="T155"> </text:span><text:span text:style-name="T97">＝ </text:span><text:span text:style-name="T495">Maximum Transmission Unit</text:span><text:span text:style-name="T479">，</text:span><text:span text:style-name="T289">一條網路</text:span><text:span text:style-name="T479">「</text:span><text:span text:style-name="T430">一次最多</text:span><text:span text:style-name="T479">能傳送的</text:span><text:span text:style-name="T353">封包大小</text:span><text:span text:style-name="T479">」</text:span><text:span text:style-name="T97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4" loext:marker-style-name="T67"><text:span text:style-name="T68">網路類型</text:span><text:span text:style-name="T67"/></text:p>
            </table:table-cell>
            <table:table-cell table:style-name="表格48.A1" office:value-type="string">
              <text:p text:style-name="P4" loext:marker-style-name="T67"><text:span text:style-name="T77">MTU </text:span><text:span text:style-name="T68">值</text:span></text:p>
            </table:table-cell>
            <table:table-cell table:style-name="表格48.A1" office:value-type="string">
              <text:p text:style-name="P4" loext:marker-style-name="T67"><text:span text:style-name="T68">說明</text:span><text:span text:style-name="T67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9" loext:marker-style-name="T81"><text:span text:style-name="T147">Ethernet</text:span><text:span text:style-name="T82">（乙太網）</text:span></text:p>
          </table:table-cell>
          <table:table-cell table:style-name="表格48.A2" office:value-type="string">
            <text:p text:style-name="P29" loext:marker-style-name="T81"><text:span text:style-name="T147">1500 bytes</text:span><text:span text:style-name="T81"/></text:p>
          </table:table-cell>
          <table:table-cell table:style-name="表格48.A2" office:value-type="string">
            <text:p text:style-name="P29" loext:marker-style-name="T81"><text:span text:style-name="T82">最常見，</text:span><text:span text:style-name="T147">99% </text:span><text:span text:style-name="T82">環境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1"><text:span text:style-name="T147">Wi-Fi (802.11)</text:span><text:span text:style-name="T81"/></text:p>
          </table:table-cell>
          <table:table-cell table:style-name="表格48.A3" office:value-type="string">
            <text:p text:style-name="P29" loext:marker-style-name="T81"><text:span text:style-name="T147">2304 bytes</text:span><text:span text:style-name="T81"/></text:p>
          </table:table-cell>
          <table:table-cell table:style-name="表格48.A3" office:value-type="string">
            <text:p text:style-name="P29" loext:marker-style-name="T81"><text:span text:style-name="T82">無線區域網路</text:span><text:span text:style-name="T81"/></text:p>
          </table:table-cell>
        </table:table-row>
        <table:table-row table:style-name="表格48.1">
          <table:table-cell table:style-name="表格48.A2" office:value-type="string">
            <text:p text:style-name="P29" loext:marker-style-name="T81"><text:span text:style-name="T147">PPPoE</text:span><text:span text:style-name="T82">（</text:span><text:span text:style-name="T147">ADSL</text:span><text:span text:style-name="T82">）</text:span></text:p>
          </table:table-cell>
          <table:table-cell table:style-name="表格48.A2" office:value-type="string">
            <text:p text:style-name="P29" loext:marker-style-name="T81"><text:span text:style-name="T147">1492 bytes</text:span><text:span text:style-name="T81"/></text:p>
          </table:table-cell>
          <table:table-cell table:style-name="表格48.A2" office:value-type="string">
            <text:p text:style-name="P29" loext:marker-style-name="T81"><text:span text:style-name="T82">需扣掉 </text:span><text:span text:style-name="T147">PPPoE header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1"><text:span text:style-name="T147">Loopback</text:span><text:span text:style-name="T82">（本機）</text:span></text:p>
          </table:table-cell>
          <table:table-cell table:style-name="表格48.A3" office:value-type="string">
            <text:p text:style-name="P29" loext:marker-style-name="T81"><text:span text:style-name="T147">65536 bytes</text:span><text:span text:style-name="T81"/></text:p>
          </table:table-cell>
          <table:table-cell table:style-name="表格48.A3" office:value-type="string">
            <text:p text:style-name="P29" loext:marker-style-name="T81"><text:span text:style-name="T82">本機內部通訊</text:span><text:span text:style-name="T81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6"><text:span text:style-name="T196">❗ <text:s/></text:span><text:span text:style-name="T218">重點</text:span></text:p>
            <text:p text:style-name="P7" loext:marker-style-name="T98"><text:span text:style-name="T336">若封包大小 </text:span><text:span text:style-name="T344">&gt; MTU</text:span><text:span text:style-name="T336">，就必須「切開」才能傳送</text:span><text:span text:style-name="T97">，這個動作就叫 </text:span><text:span text:style-name="T509">Fragmentation</text:span><text:span text:style-name="T514">（分段）</text:span><text:span text:style-name="T97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6"><text:span text:style-name="T196">📦 <text:s/></text:span><text:span text:style-name="T50">怎麼切？</text:span></text:p>
            <text:p text:style-name="P7" loext:marker-style-name="T98"><text:span text:style-name="T97">範例：送出 </text:span><text:span text:style-name="T155">4000 bytes</text:span><text:span text:style-name="T97">、</text:span><text:span text:style-name="T167">MTU = 1500</text:span><text:span text:style-name="T97">（</text:span><text:span text:style-name="T286">每段扣掉 </text:span><text:span text:style-name="T308">20 bytes IP Header</text:span><text:span text:style-name="T97">，</text:span><text:span text:style-name="T110">剩 </text:span><text:span text:style-name="T165">1480 </text:span><text:span text:style-name="T110">可放資料</text:span><text:span text:style-name="T97">）</text:span></text:p>
            <text:p text:style-name="P8" loext:marker-style-name="T352"><text:span text:style-name="T351">第 </text:span><text:span text:style-name="T358">1 </text:span><text:span text:style-name="T351">段：</text:span><text:span text:style-name="T358">1480 bytes</text:span><text:span text:style-name="T351">｜第 </text:span><text:span text:style-name="T358">2 </text:span><text:span text:style-name="T351">段：</text:span><text:span text:style-name="T358">1480 bytes</text:span><text:span text:style-name="T351">｜第 </text:span><text:span text:style-name="T358">3 </text:span><text:span text:style-name="T351">段：</text:span><text:span text:style-name="T358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4" loext:marker-style-name="T67"><text:span text:style-name="T68">版本</text:span><text:span text:style-name="T67"/></text:p>
          </table:table-cell>
          <table:table-cell table:style-name="表格49.A2" office:value-type="string">
            <text:p text:style-name="P4" loext:marker-style-name="T67"><text:span text:style-name="T68">誰負責分段</text:span><text:span text:style-name="T67"/></text:p>
          </table:table-cell>
          <table:table-cell table:style-name="表格49.A2" office:value-type="string">
            <text:p text:style-name="P4" loext:marker-style-name="T67"><text:span text:style-name="T77">Router </text:span><text:span text:style-name="T68">可切？</text:span></text:p>
          </table:table-cell>
          <table:table-cell table:style-name="表格49.A2" office:value-type="string">
            <text:p text:style-name="P4" loext:marker-style-name="T67"><text:span text:style-name="T68">說明</text:span><text:span text:style-name="T67"/></text:p>
          </table:table-cell>
        </table:table-row>
        <table:table-row table:style-name="表格49.1">
          <table:table-cell table:style-name="表格49.A3" office:value-type="string">
            <text:p text:style-name="P29" loext:marker-style-name="T83"><text:span text:style-name="T148">IPv4</text:span><text:span text:style-name="T83"/></text:p>
          </table:table-cell>
          <table:table-cell table:style-name="表格49.A3" office:value-type="string">
            <text:p text:style-name="P29" loext:marker-style-name="T81"><text:span text:style-name="T147">Router </text:span><text:span text:style-name="T82">或 </text:span><text:span text:style-name="T147">Source</text:span></text:p>
          </table:table-cell>
          <table:table-cell table:style-name="表格49.A3" office:value-type="string">
            <text:p text:style-name="P29" loext:marker-style-name="T242"><text:span text:style-name="T246">✅ </text:span><text:span text:style-name="T243">可以</text:span></text:p>
          </table:table-cell>
          <table:table-cell table:style-name="表格49.A3" office:value-type="string">
            <text:p text:style-name="P29" loext:marker-style-name="T420"><text:span text:style-name="T421">封包到 </text:span><text:span text:style-name="T438">Router </text:span><text:span text:style-name="T421">太大時，</text:span><text:span text:style-name="T438">Router </text:span><text:span text:style-name="T421">直接幫你切</text:span></text:p>
          </table:table-cell>
        </table:table-row>
        <table:table-row table:style-name="表格49.1">
          <table:table-cell table:style-name="表格49.A4" office:value-type="string">
            <text:p text:style-name="P29" loext:marker-style-name="T83"><text:span text:style-name="T148">IPv6</text:span><text:span text:style-name="T83"/></text:p>
          </table:table-cell>
          <table:table-cell table:style-name="表格49.A4" office:value-type="string">
            <text:p text:style-name="P29" loext:marker-style-name="T81"><text:span text:style-name="T82">僅 </text:span><text:span text:style-name="T147">Source</text:span><text:span text:style-name="T82">（送端）</text:span></text:p>
          </table:table-cell>
          <table:table-cell table:style-name="表格49.A4" office:value-type="string">
            <text:p text:style-name="P29" loext:marker-style-name="T225"><text:span text:style-name="T233">❌ </text:span><text:span text:style-name="T226">不行</text:span></text:p>
          </table:table-cell>
          <table:table-cell table:style-name="表格49.A4" office:value-type="string">
            <text:p text:style-name="P29" loext:marker-style-name="T81"><text:span text:style-name="T550">Router </text:span><text:span text:style-name="T532">不分段</text:span><text:span text:style-name="T82">，</text:span><text:span text:style-name="T419">由送端自行處理</text:span><text:span text:style-name="T82">，搭配 </text:span><text:span text:style-name="T147">PMTUD</text:span></text:p>
          </table:table-cell>
        </table:table-row>
      </table:table>
      <text:h text:style-name="P11" text:outline-level="2" loext:marker-style-name="T27"><text:span text:style-name="T28">拾、</text:span><text:span text:style-name="T27">IP Header </text:span><text:span text:style-name="T28">關鍵欄位</text:span></text:h>
      <text:p text:style-name="P35" loext:marker-style-name="T98"><text:span text:style-name="T97">每個封包都有一個「說明書」（</text:span><text:span text:style-name="T155">IP Header</text:span><text:span text:style-name="T97">），無選項時長度固定 </text:span><text:span text:style-name="T155">20 bytes</text:span><text:span text:style-name="T97">。最重要的 </text:span><text:span text:style-name="T155">5 </text:span><text:span text:style-name="T97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7"><text:span text:style-name="T63">(1) </text:span><text:span text:style-name="T62">Total Length</text:span><text:span text:style-name="T55">：</text:span><text:span text:style-name="T97">封包總大小（</text:span><text:span text:style-name="T155">Header + Data</text:span><text:span text:style-name="T97">），最大 </text:span><text:span text:style-name="T155">65535 bytes</text:span><text:span text:style-name="T97">（</text:span><text:span text:style-name="T155">16 bits</text:span><text:span text:style-name="T97">）。</text:span></text:p>
            <text:p text:style-name="P8"><text:span text:style-name="T63">(2) </text:span><text:span text:style-name="T62">Identification</text:span><text:span text:style-name="T55">：</text:span><text:span text:style-name="T286">同一原始封包的所有分段共用同一 </text:span><text:span text:style-name="T308">ID</text:span><text:span text:style-name="T97">；</text:span><text:span text:style-name="T394">接收端靠此 </text:span><text:span text:style-name="T415">ID </text:span><text:span text:style-name="T394">判斷哪些 </text:span><text:span text:style-name="T415">fragment </text:span><text:span text:style-name="T394">要拼在一起</text:span><text:span text:style-name="T97">。</text:span></text:p>
            <text:p text:style-name="P8"><text:span text:style-name="T63">(3) </text:span><text:span text:style-name="T62">Fragment Offset</text:span><text:span text:style-name="T55">：</text:span><text:span text:style-name="T336">這段資料在原始封包中的「起始位置」</text:span><text:span text:style-name="T97">。⚠️ 單位是 </text:span><text:span text:style-name="T155">8 bytes</text:span><text:span text:style-name="T97">（欄位僅 </text:span><text:span text:style-name="T155">13 bits</text:span><text:span text:style-name="T97">）→ </text:span><text:span text:style-name="T344">Offset = </text:span><text:span text:style-name="T336">起始位置 </text:span><text:span text:style-name="T344">÷ 8</text:span><text:span text:style-name="T97">。</text:span></text:p>
            <text:p text:style-name="P8"><text:span text:style-name="T63">(4) </text:span><text:span text:style-name="T62">TTL</text:span><text:span text:style-name="T55">：</text:span><text:span text:style-name="T527">最多可經過幾個 </text:span><text:span text:style-name="T545">Router</text:span><text:span text:style-name="T527">；每經過一個 −</text:span><text:span text:style-name="T545">1</text:span><text:span text:style-name="T97">，</text:span><text:span text:style-name="T477">歸零時 </text:span><text:span text:style-name="T494">Router </text:span><text:span text:style-name="T477">丟棄並回 </text:span><text:span text:style-name="T494">ICMP</text:span><text:span text:style-name="T477">「</text:span><text:span text:style-name="T494">Time Exceeded</text:span><text:span text:style-name="T477">」</text:span><text:span text:style-name="T97">。常見初始值 </text:span><text:span text:style-name="T155">Linux=64</text:span><text:span text:style-name="T97">、</text:span><text:span text:style-name="T155">Windows=128</text:span><text:span text:style-name="T97">。</text:span><text:span text:style-name="T155">traceroute </text:span><text:span text:style-name="T97">即利用 </text:span><text:span text:style-name="T155">TTL</text:span><text:span text:style-name="T97">。</text:span></text:p>
            <text:p text:style-name="P8"><text:span text:style-name="T63">(5) </text:span><text:span text:style-name="T62">Protocol</text:span><text:span text:style-name="T55">：</text:span><text:span text:style-name="T97">告訴 </text:span><text:span text:style-name="T155">OS </text:span><text:span text:style-name="T97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4" loext:marker-style-name="T67"><text:span text:style-name="T68">計算範例（</text:span><text:span text:style-name="T77">MTU=1500, Header=20, </text:span><text:span text:style-name="T68">資料</text:span><text:span text:style-name="T77">=4000</text:span><text:span text:style-name="T68">）</text:span></text:p>
          </table:table-cell>
          <table:covered-table-cell/>
          <table:covered-table-cell/>
          <table:table-cell table:style-name="表格50.A2" office:value-type="string">
            <text:p text:style-name="P4" loext:marker-style-name="T67"><text:span text:style-name="T77">Offset </text:span><text:span text:style-name="T68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1"><text:span text:style-name="T82">第 </text:span><text:span text:style-name="T147">1 </text:span><text:span text:style-name="T82">段：資料 </text:span><text:span text:style-name="T147">148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3"><text:span text:style-name="T148">0 ÷ 8 = 0</text:span><text:span text:style-name="T83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9" loext:marker-style-name="T81"><text:span text:style-name="T82">第 </text:span><text:span text:style-name="T147">2 </text:span><text:span text:style-name="T82">段：資料 </text:span><text:span text:style-name="T147">1480 bytes</text:span></text:p>
          </table:table-cell>
          <table:covered-table-cell/>
          <table:covered-table-cell/>
          <table:table-cell table:style-name="表格50.A4" office:value-type="string">
            <text:p text:style-name="P29" loext:marker-style-name="T81"><text:span text:style-name="T148">1480 ÷ 8 </text:span><text:span text:style-name="T147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1"><text:span text:style-name="T82">第 </text:span><text:span text:style-name="T147">3 </text:span><text:span text:style-name="T82">段：資料 </text:span><text:span text:style-name="T147">104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1"><text:span text:style-name="T148">2960 ÷ 8</text:span><text:span text:style-name="T147"> = 370</text:span></text:p>
          </table:table-cell>
        </table:table-row>
        <table:table-row table:style-name="表格50.1">
          <table:table-cell table:style-name="表格50.A2" office:value-type="string">
            <text:p text:style-name="P26" loext:marker-style-name="T67"><text:span text:style-name="T77">Protocol </text:span><text:span text:style-name="T68">值</text:span></text:p>
          </table:table-cell>
          <table:table-cell table:style-name="表格50.A2" office:value-type="string">
            <text:p text:style-name="P26" loext:marker-style-name="T67"><text:span text:style-name="T68">對應協定</text:span><text:span text:style-name="T67"/></text:p>
          </table:table-cell>
          <table:table-cell table:style-name="表格50.A2" table:number-columns-spanned="2" office:value-type="string">
            <text:p text:style-name="P26" loext:marker-style-name="T67"><text:span text:style-name="T68">常見用途</text:span><text:span text:style-name="T67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1"><text:span text:style-name="T147">1</text:span><text:span text:style-name="T81"/></text:p>
          </table:table-cell>
          <table:table-cell table:style-name="表格50.A3" office:value-type="string">
            <text:p text:style-name="P29" loext:marker-style-name="T90"><text:span text:style-name="T150">ICMP</text:span><text:span text:style-name="T90"/></text:p>
          </table:table-cell>
          <table:table-cell table:style-name="表格50.A3" table:number-columns-spanned="2" office:value-type="string">
            <text:p text:style-name="P29" loext:marker-style-name="T348"><text:span text:style-name="T360">ping</text:span><text:span text:style-name="T349">、</text:span><text:span text:style-name="T360">TTL </text:span><text:span text:style-name="T349">超時通知、</text:span><text:span text:style-name="T360">Fragmentation </text:span><text:span text:style-name="T349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9" loext:marker-style-name="T81"><text:span text:style-name="T147">6</text:span><text:span text:style-name="T81"/></text:p>
          </table:table-cell>
          <table:table-cell table:style-name="表格50.A4" office:value-type="string">
            <text:p text:style-name="P29" loext:marker-style-name="T81"><text:span text:style-name="T147">TCP</text:span><text:span text:style-name="T81"/></text:p>
          </table:table-cell>
          <table:table-cell table:style-name="表格50.A4" table:number-columns-spanned="2" office:value-type="string">
            <text:p text:style-name="P29" loext:marker-style-name="T81"><text:span text:style-name="T147">HTTP</text:span><text:span text:style-name="T82">、</text:span><text:span text:style-name="T147">HTTPS</text:span><text:span text:style-name="T82">、</text:span><text:span text:style-name="T147">SSH</text:span><text:span text:style-name="T82">、</text:span><text:span text:style-name="T147">FTP </text:span><text:span text:style-name="T82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1"><text:span text:style-name="T147">17</text:span><text:span text:style-name="T81"/></text:p>
          </table:table-cell>
          <table:table-cell table:style-name="表格50.A3" office:value-type="string">
            <text:p text:style-name="P29" loext:marker-style-name="T81"><text:span text:style-name="T147">UDP</text:span><text:span text:style-name="T81"/></text:p>
          </table:table-cell>
          <table:table-cell table:style-name="表格50.A3" table:number-columns-spanned="2" office:value-type="string">
            <text:p text:style-name="P29" loext:marker-style-name="T81"><text:span text:style-name="T147">DNS</text:span><text:span text:style-name="T82">、</text:span><text:span text:style-name="T147">DHCP</text:span><text:span text:style-name="T82">、影音串流等速度優先</text:span></text:p>
          </table:table-cell>
          <table:covered-table-cell/>
        </table:table-row>
      </table:table>
      <text:h text:style-name="P11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4" loext:marker-style-name="T67"><text:span text:style-name="T77">Flag</text:span><text:span text:style-name="T67"/></text:p>
            </table:table-cell>
            <table:table-cell table:style-name="表格51.A1" office:value-type="string">
              <text:p text:style-name="P4" loext:marker-style-name="T67"><text:span text:style-name="T68">全名</text:span><text:span text:style-name="T67"/></text:p>
            </table:table-cell>
            <table:table-cell table:style-name="表格51.A1" office:value-type="string">
              <text:p text:style-name="P4" loext:marker-style-name="T67"><text:span text:style-name="T68">值 </text:span><text:span text:style-name="T77">= 1 </text:span><text:span text:style-name="T68">代表</text:span></text:p>
            </table:table-cell>
            <table:table-cell table:style-name="表格51.A1" office:value-type="string">
              <text:p text:style-name="P4" loext:marker-style-name="T67"><text:span text:style-name="T68">值 </text:span><text:span text:style-name="T77">= 0 </text:span><text:span text:style-name="T68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9" loext:marker-style-name="T329"><text:span text:style-name="T339">DF</text:span><text:span text:style-name="T329"/></text:p>
          </table:table-cell>
          <table:table-cell table:style-name="表格51.A2" office:value-type="string">
            <text:p text:style-name="P29" loext:marker-style-name="T329"><text:span text:style-name="T339">Don't Fragment</text:span><text:span text:style-name="T329"/></text:p>
          </table:table-cell>
          <table:table-cell table:style-name="表格51.A2" office:value-type="string">
            <text:p text:style-name="P29" loext:marker-style-name="T81"><text:span text:style-name="T147">❌ </text:span><text:span text:style-name="T82">不准切！超大就丟並回 </text:span><text:span text:style-name="T147">ICMP</text:span></text:p>
          </table:table-cell>
          <table:table-cell table:style-name="表格51.A2" office:value-type="string">
            <text:p text:style-name="P29" loext:marker-style-name="T81"><text:span text:style-name="T82">允許分段（一般封包）</text:span><text:span text:style-name="T81"/></text:p>
          </table:table-cell>
        </table:table-row>
        <table:table-row table:style-name="表格51.1">
          <table:table-cell table:style-name="表格51.A3" office:value-type="string">
            <text:p text:style-name="P29" loext:marker-style-name="T267"><text:span text:style-name="T302">MF</text:span><text:span text:style-name="T267"/></text:p>
          </table:table-cell>
          <table:table-cell table:style-name="表格51.A3" office:value-type="string">
            <text:p text:style-name="P29" loext:marker-style-name="T267"><text:span text:style-name="T302">More Fragments</text:span><text:span text:style-name="T267"/></text:p>
          </table:table-cell>
          <table:table-cell table:style-name="表格51.A3" office:value-type="string">
            <text:p text:style-name="P29" loext:marker-style-name="T81"><text:span text:style-name="T82">後面還有更多分段</text:span><text:span text:style-name="T81"/></text:p>
          </table:table-cell>
          <table:table-cell table:style-name="表格51.A3" office:value-type="string">
            <text:p text:style-name="P29" loext:marker-style-name="T81"><text:span text:style-name="T82">這是最後一段（或未分段）</text:span><text:span text:style-name="T81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6"><text:span text:style-name="T196">▸ <text:s/></text:span><text:span text:style-name="T61">DF = 1 </text:span><text:span text:style-name="T50">的完整流程</text:span></text:p>
            <text:p text:style-name="P7" loext:marker-style-name="T98"><text:span text:style-name="T155">① </text:span><text:span text:style-name="T97">送出封包（</text:span><text:span text:style-name="T165">DF=1</text:span><text:span text:style-name="T110">，不准切</text:span><text:span text:style-name="T97">）→ ② 到某 </text:span><text:span text:style-name="T155">Router</text:span><text:span text:style-name="T97">，發現</text:span><text:span text:style-name="T284">封包 </text:span><text:span text:style-name="T312">&gt; </text:span><text:span text:style-name="T284">該路段 </text:span><text:span text:style-name="T312">MTU</text:span><text:span text:style-name="T155"> → ③ </text:span><text:span text:style-name="T443">Router </text:span><text:span text:style-name="T425">不能切，直接丟棄 </text:span><text:span text:style-name="T97">→ ④ </text:span><text:span text:style-name="T545">Router </text:span><text:span text:style-name="T527">回傳 </text:span><text:span text:style-name="T545">ICMP</text:span><text:span text:style-name="T527">「</text:span><text:span text:style-name="T545">Fragmentation Needed</text:span><text:span text:style-name="T527">」（含可用 </text:span><text:span text:style-name="T545">MTU </text:span><text:span text:style-name="T527">大小）</text:span><text:span text:style-name="T97">→ ⑤ </text:span><text:span text:style-name="T286">送端調整封包大小後</text:span><text:span text:style-name="T480">重送</text:span><text:span text:style-name="T97">。這就是 </text:span><text:span text:style-name="T167">PMTUD </text:span><text:span text:style-name="T112">的核心機制</text:span><text:span text:style-name="T97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35" loext:marker-style-name="T98"><text:span text:style-name="T165">PMTUD </text:span><text:span text:style-name="T97">＝</text:span><text:span text:style-name="T480"> </text:span><text:span text:style-name="T496">Path MTU Discovery</text:span><text:span text:style-name="T480">，自動找出</text:span><text:span text:style-name="T579">來源到目的地</text:span><text:span text:style-name="T480">整條路徑中</text:span><text:span text:style-name="T528">最小的 </text:span><text:span text:style-name="T546">MTU </text:span><text:span text:style-name="T528">值</text:span><text:span text:style-name="T97">。</text:span><text:span text:style-name="T115">網路路徑可能途經不同網路</text:span><text:span text:style-name="T97">（</text:span><text:span text:style-name="T155">Ethernet → PPPoE → Wi-Fi</text:span><text:span text:style-name="T97">），封包必須符合「最小的那個 </text:span><text:span text:style-name="T155">MTU</text:span><text:span text:style-name="T97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4" loext:marker-style-name="T67"><text:span text:style-name="T68">版本</text:span><text:span text:style-name="T67"/></text:p>
            </table:table-cell>
            <table:table-cell table:style-name="表格52.A1" office:value-type="string">
              <text:p text:style-name="P4" loext:marker-style-name="T67"><text:span text:style-name="T77">Router </text:span><text:span text:style-name="T68">可分段？</text:span></text:p>
            </table:table-cell>
            <table:table-cell table:style-name="表格52.A1" office:value-type="string">
              <text:p text:style-name="P4" loext:marker-style-name="T67"><text:span text:style-name="T77">PMTUD </text:span><text:span text:style-name="T68">必要性</text:span></text:p>
            </table:table-cell>
            <table:table-cell table:style-name="表格52.A1" office:value-type="string">
              <text:p text:style-name="P4" loext:marker-style-name="T67"><text:span text:style-name="T77">Router </text:span><text:span text:style-name="T68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9" loext:marker-style-name="T89"><text:span text:style-name="T149">IPv4</text:span><text:span text:style-name="T89"/></text:p>
          </table:table-cell>
          <table:table-cell table:style-name="表格52.A2" office:value-type="string">
            <text:p text:style-name="P29" loext:marker-style-name="T85"><text:span text:style-name="T151">✅ </text:span><text:span text:style-name="T84">可以（但不推薦）</text:span></text:p>
          </table:table-cell>
          <table:table-cell table:style-name="表格52.A2" office:value-type="string">
            <text:p text:style-name="P29" loext:marker-style-name="T81"><text:span text:style-name="T82">可選，但建議使用</text:span><text:span text:style-name="T81"/></text:p>
          </table:table-cell>
          <table:table-cell table:style-name="表格52.A2" office:value-type="string">
            <text:p text:style-name="P29" loext:marker-style-name="T81"><text:span text:style-name="T147">ICMP Fragmentation Needed</text:span><text:span text:style-name="T81"/></text:p>
          </table:table-cell>
        </table:table-row>
        <table:table-row table:style-name="表格52.1">
          <table:table-cell table:style-name="表格52.A3" office:value-type="string">
            <text:p text:style-name="P29" loext:marker-style-name="T89"><text:span text:style-name="T149">IPv6</text:span><text:span text:style-name="T89"/></text:p>
          </table:table-cell>
          <table:table-cell table:style-name="表格52.A3" office:value-type="string">
            <text:p text:style-name="P29" loext:marker-style-name="T85"><text:span text:style-name="T151">❌ </text:span><text:span text:style-name="T84">不行</text:span></text:p>
          </table:table-cell>
          <table:table-cell table:style-name="表格52.A3" office:value-type="string">
            <text:p text:style-name="P29" loext:marker-style-name="T81"><text:span text:style-name="T147">⚠️ </text:span><text:span text:style-name="T82">必須使用</text:span></text:p>
          </table:table-cell>
          <table:table-cell table:style-name="表格52.A3" office:value-type="string">
            <text:p text:style-name="P29" loext:marker-style-name="T81"><text:span text:style-name="T147">ICMPv6 Packet Too Big</text:span><text:span text:style-name="T81"/></text:p>
          </table:table-cell>
        </table:table-row>
      </table:table>
      <text:h text:style-name="P11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35" loext:marker-style-name="T98"><text:span text:style-name="T344">TCP </text:span><text:span text:style-name="T336">不依賴 </text:span><text:span text:style-name="T344">IP </text:span><text:span text:style-name="T336">層切封包，而是「自己先控制好大小」</text:span><text:span text:style-name="T97">，</text:span><text:span text:style-name="T110">讓 </text:span><text:span text:style-name="T165">IP </text:span><text:span text:style-name="T110">層根本不需要切</text:span><text:span text:style-name="T97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7"><text:span text:style-name="T63">MSS</text:span><text:span text:style-name="T55">（</text:span><text:span text:style-name="T63">Maximum Segment Size</text:span><text:span text:style-name="T55">）：</text:span><text:span text:style-name="T314">MSS = MTU − IP Header − TCP Header </text:span><text:span text:style-name="T155">= </text:span><text:span text:style-name="T165">1500 − 20 − 20 = 1460 bytes</text:span><text:span text:style-name="T97">。</text:span><text:span text:style-name="T431">三向交握時雙方各自宣告 </text:span><text:span text:style-name="T444">MSS</text:span><text:span text:style-name="T431">，之後每段 ≤ </text:span><text:span text:style-name="T444">MSS</text:span><text:span text:style-name="T97">，</text:span><text:span text:style-name="T110">讓 </text:span><text:span text:style-name="T165">IP </text:span><text:span text:style-name="T110">層不需分段</text:span><text:span text:style-name="T97">。</text:span></text:p>
            <text:p text:style-name="P8"><text:span text:style-name="T55">搭配 </text:span><text:span text:style-name="T63">DF=1 + PMTUD</text:span><text:span text:style-name="T55">：</text:span><text:span text:style-name="T155">TCP </text:span><text:span text:style-name="T97">連線設 </text:span><text:span text:style-name="T155">DF=1 </text:span><text:span text:style-name="T97">禁止 </text:span><text:span text:style-name="T155">Router </text:span><text:span text:style-name="T97">分段；</text:span><text:span text:style-name="T286">若收到 </text:span><text:span text:style-name="T308">ICMP</text:span><text:span text:style-name="T286">「</text:span><text:span text:style-name="T308">Fragmentation Needed</text:span><text:span text:style-name="T286">」，自動調低 </text:span><text:span text:style-name="T308">MSS </text:span><text:span text:style-name="T286">重試</text:span><text:span text:style-name="T97">，最終找到整條路徑都能通過的最佳 </text:span><text:span text:style-name="T155">MSS</text:span><text:span text:style-name="T97">。</text:span></text:p>
          </table:table-cell>
        </table:table-row>
        <table:table-row table:style-name="表格53.1">
          <table:table-cell table:style-name="表格53.A2" office:value-type="string">
            <text:p text:style-name="P6"><text:span text:style-name="T196">✅ <text:s/></text:span><text:span text:style-name="T240">結論</text:span></text:p>
            <text:p text:style-name="P7" loext:marker-style-name="T98"><text:span text:style-name="T509">TCP = </text:span><text:span text:style-name="T514">主動控制大小（</text:span><text:span text:style-name="T509">MSS</text:span><text:span text:style-name="T514">）＋ </text:span><text:span text:style-name="T509">DF=1 </text:span><text:span text:style-name="T514">＋ </text:span><text:span text:style-name="T509">PMTUD</text:span><text:span text:style-name="T97">，</text:span><text:span text:style-name="T290">從源頭就避免 </text:span><text:span text:style-name="T314">Fragmentation </text:span><text:span text:style-name="T290">發生</text:span><text:span text:style-name="T97">。</text:span><text:span text:style-name="T415">TCP </text:span><text:span text:style-name="T394">做 </text:span><text:span text:style-name="T415">Segmentation </text:span><text:span text:style-name="T394">的主要目的之一，就是讓每個封包符合 </text:span><text:span text:style-name="T415">MTU</text:span><text:span text:style-name="T97">，從而避免 </text:span><text:span text:style-name="T155">IP </text:span><text:span text:style-name="T97">再做 </text:span><text:span text:style-name="T155">Fragmentation</text:span><text:span text:style-name="T97">。</text:span></text:p>
          </table:table-cell>
        </table:table-row>
      </table:table>
      <text:h text:style-name="P11" text:outline-level="2" loext:marker-style-name="T27"><text:span text:style-name="T28">拾肆、</text:span><text:span text:style-name="T27">Fragmentation DoS </text:span><text:span text:style-name="T28">攻擊</text:span></text:h>
      <text:p text:style-name="P35" loext:marker-style-name="T98"><text:span text:style-name="T286">攻擊者利用「接收端重組封包很耗資源」這個特性</text:span><text:span text:style-name="T97">，</text:span><text:span text:style-name="T336">刻意製造大量異常 </text:span><text:span text:style-name="T344">Fragment</text:span><text:span text:style-name="T97">。正常重組流程：收到 </text:span><text:span text:style-name="T155">Fragment </text:span><text:span text:style-name="T479">放入緩衝區 </text:span><text:span text:style-name="T97">→ </text:span><text:span text:style-name="T527">等同一 </text:span><text:span text:style-name="T545">ID </text:span><text:span text:style-name="T527">的所有 </text:span><text:span text:style-name="T545">Fragment </text:span><text:span text:style-name="T527">到齊 → 依</text:span><text:span text:style-name="T337"> </text:span><text:span text:style-name="T345">Offset </text:span><text:span text:style-name="T527">排序 → 拼回原始封包</text:span><text:span text:style-name="T97">；每步都消耗 </text:span><text:span text:style-name="T155">RAM </text:span><text:span text:style-name="T97">與 </text:span><text:span text:style-name="T155">CPU</text:span><text:span text:style-name="T97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" loext:marker-style-name="T73"><text:span text:style-name="T74">攻擊手法</text:span><text:span text:style-name="T73"/></text:p>
            </table:table-cell>
            <table:table-cell table:style-name="表格54.A1" office:value-type="string">
              <text:p text:style-name="P4" loext:marker-style-name="T73"><text:span text:style-name="T74">做法</text:span><text:span text:style-name="T73"/></text:p>
            </table:table-cell>
            <table:table-cell table:style-name="表格54.A1" office:value-type="string">
              <text:p text:style-name="P4" loext:marker-style-name="T73"><text:span text:style-name="T74">後果</text:span><text:span text:style-name="T73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9" loext:marker-style-name="T139"><text:span text:style-name="T189">1 </text:span><text:span text:style-name="T138">不完整 </text:span><text:span text:style-name="T189">Fragment</text:span></text:p>
          </table:table-cell>
          <table:table-cell table:style-name="表格54.A2" office:value-type="string">
            <text:p text:style-name="P29" loext:marker-style-name="T126"><text:span text:style-name="T127">只送部分分段（缺其中一段）</text:span><text:span text:style-name="T126"/></text:p>
          </table:table-cell>
          <table:table-cell table:style-name="表格54.A2" office:value-type="string">
            <text:p text:style-name="P29" loext:marker-style-name="T126"><text:span text:style-name="T127">接收端一直等待不敢丟棄 → </text:span><text:span text:style-name="T179">RAM </text:span><text:span text:style-name="T127">持續被占用</text:span></text:p>
          </table:table-cell>
        </table:table-row>
        <table:table-row table:style-name="表格54.1">
          <table:table-cell table:style-name="表格54.A3" office:value-type="string">
            <text:p text:style-name="P29" loext:marker-style-name="T139"><text:span text:style-name="T189">2 Offset </text:span><text:span text:style-name="T138">重疊</text:span></text:p>
          </table:table-cell>
          <table:table-cell table:style-name="表格54.A3" office:value-type="string">
            <text:p text:style-name="P29" loext:marker-style-name="T126"><text:span text:style-name="T127">送出 </text:span><text:span text:style-name="T179">Offset </text:span><text:span text:style-name="T127">互相重疊的 </text:span><text:span text:style-name="T179">Fragment</text:span></text:p>
          </table:table-cell>
          <table:table-cell table:style-name="表格54.A3" office:value-type="string">
            <text:p text:style-name="P29" loext:marker-style-name="T126"><text:span text:style-name="T140">接收端須判斷哪個才是正確資料 </text:span><text:span text:style-name="T127">→ </text:span><text:span text:style-name="T179">CPU </text:span><text:span text:style-name="T127">暴增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139"><text:span text:style-name="T189">3 </text:span><text:span text:style-name="T138">大量碎片</text:span></text:p>
          </table:table-cell>
          <table:table-cell table:style-name="表格54.A2" office:value-type="string">
            <text:p text:style-name="P29" loext:marker-style-name="T126"><text:span text:style-name="T127">送出數萬個 </text:span><text:span text:style-name="T179">Fragment</text:span><text:span text:style-name="T127">（同一 </text:span><text:span text:style-name="T179">ID</text:span><text:span text:style-name="T127">）</text:span></text:p>
          </table:table-cell>
          <table:table-cell table:style-name="表格54.A2" office:value-type="string">
            <text:p text:style-name="P29" loext:marker-style-name="T126"><text:span text:style-name="T127">開大量 </text:span><text:span text:style-name="T179">buffer</text:span><text:span text:style-name="T127">、持續重組 → </text:span><text:span text:style-name="T179">RAM </text:span><text:span text:style-name="T127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6"><text:span text:style-name="T196">🛡️ <text:s/></text:span><text:span text:style-name="T240">防禦方式</text:span></text:p>
            <text:p text:style-name="P7" loext:marker-style-name="T98"><text:span text:style-name="T97">防禦：</text:span><text:span text:style-name="T118">設定重組 </text:span><text:span text:style-name="T172">buffer </text:span><text:span text:style-name="T118">上限</text:span><text:span text:style-name="T97">避免無限占用記憶體；</text:span><text:span text:style-name="T116">丟棄等待過久或異常的 </text:span><text:span text:style-name="T170">Fragment</text:span><text:span text:style-name="T97">；</text:span><text:span text:style-name="T115">部署 </text:span><text:span text:style-name="T169">IDS / Firewall </text:span><text:span text:style-name="T115">偵測異常分段</text:span><text:span text:style-name="T97">模式。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4" loext:marker-style-name="T67"><text:span text:style-name="T68">技術概念</text:span><text:span text:style-name="T67"/></text:p>
            </table:table-cell>
            <table:table-cell table:style-name="表格55.A1" office:value-type="string">
              <text:p text:style-name="P4" loext:marker-style-name="T67"><text:span text:style-name="T68">白話比喻</text:span><text:span text:style-name="T6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9" loext:marker-style-name="T81"><text:span text:style-name="T147">MTU</text:span><text:span text:style-name="T81"/></text:p>
          </table:table-cell>
          <table:table-cell table:style-name="表格55.A2" office:value-type="string">
            <text:p text:style-name="P29" loext:marker-style-name="T81"><text:span text:style-name="T82">一個貨運箱子最多裝 </text:span><text:span text:style-name="T147">1500g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1"><text:span text:style-name="T147">Fragmentation</text:span><text:span text:style-name="T81"/></text:p>
          </table:table-cell>
          <table:table-cell table:style-name="表格55.A3" office:value-type="string">
            <text:p text:style-name="P29" loext:marker-style-name="T81"><text:span text:style-name="T82">東西太重 → 分成好幾箱</text:span><text:span text:style-name="T81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85"><text:span text:style-name="T151">Identification</text:span><text:span text:style-name="T85"/></text:p>
          </table:table-cell>
          <table:table-cell table:style-name="表格55.A2" office:value-type="string">
            <text:p text:style-name="P29" loext:marker-style-name="T89"><text:span text:style-name="T88">每箱貼上同一個「訂單號碼」</text:span><text:span text:style-name="T89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5"><text:span text:style-name="T151">Fragment Offset</text:span><text:span text:style-name="T85"/></text:p>
          </table:table-cell>
          <table:table-cell table:style-name="表格55.A3" office:value-type="string">
            <text:p text:style-name="P29" loext:marker-style-name="T81"><text:span text:style-name="T82">每箱寫上「我是第幾克開始的貨」</text:span><text:span text:style-name="T81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81"><text:span text:style-name="T147">IPv4 / IPv6</text:span><text:span text:style-name="T81"/></text:p>
          </table:table-cell>
          <table:table-cell table:style-name="表格55.A2" office:value-type="string">
            <text:p text:style-name="P29" loext:marker-style-name="T81"><text:span text:style-name="T147">IPv4</text:span><text:span text:style-name="T82">：郵局可幫你分箱（但最好自己分）／ </text:span><text:span text:style-name="T147">IPv6</text:span><text:span text:style-name="T82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1"><text:span text:style-name="T147">DF = 1</text:span><text:span text:style-name="T81"/></text:p>
          </table:table-cell>
          <table:table-cell table:style-name="表格55.A3" office:value-type="string">
            <text:p text:style-name="P29" loext:marker-style-name="T81"><text:span text:style-name="T82">貼上「禁止拆箱」標籤 → 太重就退件</text:span><text:span text:style-name="T81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374"><text:span text:style-name="T400">PMTUD</text:span><text:span text:style-name="T374"/></text:p>
          </table:table-cell>
          <table:table-cell table:style-name="表格55.A2" office:value-type="string">
            <text:p text:style-name="P29" loext:marker-style-name="T92"><text:span text:style-name="T93">先試寄 → 被退 → 知道上限 → 調整大小再寄</text:span><text:span text:style-name="T92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271"><text:span text:style-name="T305">TTL</text:span><text:span text:style-name="T271"/></text:p>
          </table:table-cell>
          <table:table-cell table:style-name="表格55.A3" office:value-type="string">
            <text:p text:style-name="P29" loext:marker-style-name="T87"><text:span text:style-name="T86">貨物限轉 </text:span><text:span text:style-name="T152">64 </text:span><text:span text:style-name="T86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9" loext:marker-style-name="T85"><text:span text:style-name="T151">MSS</text:span><text:span text:style-name="T85"/></text:p>
          </table:table-cell>
          <table:table-cell table:style-name="表格55.A2" office:value-type="string">
            <text:p text:style-name="P29" loext:marker-style-name="T89"><text:span text:style-name="T88">你自己量好每箱重量，確保不超重</text:span><text:span text:style-name="T89"/></text:p>
          </table:table-cell>
        </table:table-row>
      </table:table>
      <text:h text:style-name="P17" text:outline-level="1" loext:marker-style-name="T69"><text:span text:style-name="T70">第 三 篇　</text:span><text:span text:style-name="T69">IPv4 → IPv6 </text:span><text:span text:style-name="T70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6"><text:span text:style-name="T196">💡 <text:s/></text:span><text:span text:style-name="T50">為什麼要從 </text:span><text:span text:style-name="T61">IPv4 </text:span><text:span text:style-name="T50">換到 </text:span><text:span text:style-name="T61">IPv6</text:span><text:span text:style-name="T50">？</text:span></text:p>
            <text:p text:style-name="P7" loext:marker-style-name="T98"><text:span text:style-name="T155">IPv4 </text:span><text:span text:style-name="T97">在設計之初無法預料網路規模的爆炸性成長。隨著智慧型手機、</text:span><text:span text:style-name="T155">IoT </text:span><text:span text:style-name="T97">裝置大量普及，</text:span><text:span text:style-name="T155">IPv4 </text:span><text:span text:style-name="T97">位址已幾近耗盡，並衍生多項架構缺陷，因此 </text:span><text:span text:style-name="T155">IPv6 </text:span><text:span text:style-name="T97">誕生以從根本解決這些問題。但 </text:span><text:span text:style-name="T155">IPv4 </text:span><text:span text:style-name="T97">不會一夕消失，兩種協定長期並存，因此需要過渡技術。</text:span></text:p>
          </table:table-cell>
        </table:table-row>
      </table:table>
      <text:h text:style-name="P11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4" loext:marker-style-name="T67"><text:span text:style-name="T68">比較項目</text:span><text:span text:style-name="T67"/></text:p>
            </table:table-cell>
            <table:table-cell table:style-name="表格57.A1" office:value-type="string">
              <text:p text:style-name="P4" loext:marker-style-name="T67"><text:span text:style-name="T77">✗ IPv4 </text:span><text:span text:style-name="T68">問題</text:span></text:p>
            </table:table-cell>
            <table:table-cell table:style-name="表格57.A1" office:value-type="string">
              <text:p text:style-name="P4" loext:marker-style-name="T67"><text:span text:style-name="T77">✓ IPv6 </text:span><text:span text:style-name="T68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9" loext:marker-style-name="T81"><text:span text:style-name="T82">位址長度</text:span><text:span text:style-name="T81"/></text:p>
          </table:table-cell>
          <table:table-cell table:style-name="表格57.A2" office:value-type="string">
            <text:p text:style-name="P29" loext:marker-style-name="T81"><text:span text:style-name="T302">32 bit</text:span><text:span text:style-name="T82">，約 </text:span><text:span text:style-name="T147">43 </text:span><text:span text:style-name="T82">億個 </text:span><text:span text:style-name="T147">IP</text:span><text:span text:style-name="T82">，已嚴重不足</text:span></text:p>
          </table:table-cell>
          <table:table-cell table:style-name="表格57.A2" office:value-type="string">
            <text:p text:style-name="P29" loext:marker-style-name="T81"><text:span text:style-name="T401">128 bit</text:span><text:span text:style-name="T82">，約 </text:span><text:span text:style-name="T147">3.4×10³⁸ </text:span><text:span text:style-name="T82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9" loext:marker-style-name="T81"><text:span text:style-name="T147">NAT </text:span><text:span text:style-name="T82">位址轉換</text:span></text:p>
          </table:table-cell>
          <table:table-cell table:style-name="表格57.A3" office:value-type="string">
            <text:p text:style-name="P29" loext:marker-style-name="T81"><text:span text:style-name="T88">需 </text:span><text:span text:style-name="T149">NAT </text:span><text:span text:style-name="T88">共用 </text:span><text:span text:style-name="T149">IP</text:span><text:span text:style-name="T82">，破壞 </text:span><text:span text:style-name="T147">End-to-End</text:span></text:p>
          </table:table-cell>
          <table:table-cell table:style-name="表格57.A3" office:value-type="string">
            <text:p text:style-name="P29" loext:marker-style-name="T81"><text:span text:style-name="T84">每裝置獨立公開 </text:span><text:span text:style-name="T151">IP</text:span><text:span text:style-name="T84">，不需 </text:span><text:span text:style-name="T151">NAT</text:span><text:span text:style-name="T82">，恢復 </text:span><text:span text:style-name="T147">E2E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1"><text:span text:style-name="T82">安全性</text:span><text:span text:style-name="T81"/></text:p>
          </table:table-cell>
          <table:table-cell table:style-name="表格57.A2" office:value-type="string">
            <text:p text:style-name="P29" loext:marker-style-name="T81"><text:span text:style-name="T82">無內建加密／驗證，</text:span><text:span text:style-name="T88">須另裝 </text:span><text:span text:style-name="T149">VPN</text:span></text:p>
          </table:table-cell>
          <table:table-cell table:style-name="表格57.A2" office:value-type="string">
            <text:p text:style-name="P29" loext:marker-style-name="T81"><text:span text:style-name="T272">支援 </text:span><text:span text:style-name="T306">IPsec</text:span><text:span text:style-name="T84">（加密＋驗證）</text:span><text:span text:style-name="T82">※ </text:span><text:span text:style-name="T147">RFC 6434 </text:span><text:span text:style-name="T82">後改建議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1"><text:span text:style-name="T147">Header </text:span><text:span text:style-name="T82">結構</text:span></text:p>
          </table:table-cell>
          <table:table-cell table:style-name="表格57.A3" office:value-type="string">
            <text:p text:style-name="P29" loext:marker-style-name="T81"><text:span text:style-name="T88">可變長度</text:span><text:span text:style-name="T82">含 </text:span><text:span text:style-name="T147">Options</text:span><text:span text:style-name="T82">，</text:span><text:span text:style-name="T147">Router </text:span><text:span text:style-name="T82">效率低</text:span></text:p>
          </table:table-cell>
          <table:table-cell table:style-name="表格57.A3" office:value-type="string">
            <text:p text:style-name="P29" loext:marker-style-name="T81"><text:span text:style-name="T84">固定 </text:span><text:span text:style-name="T151">40 bytes </text:span><text:span text:style-name="T82">基本 </text:span><text:span text:style-name="T147">Header</text:span><text:span text:style-name="T82">，轉送更快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1"><text:span text:style-name="T82">服務品質 </text:span><text:span text:style-name="T147">QoS</text:span></text:p>
          </table:table-cell>
          <table:table-cell table:style-name="表格57.A2" office:value-type="string">
            <text:p text:style-name="P29" loext:marker-style-name="T89"><text:span text:style-name="T88">無法有效標記流量優先權</text:span><text:span text:style-name="T89"/></text:p>
          </table:table-cell>
          <table:table-cell table:style-name="表格57.A2" office:value-type="string">
            <text:p text:style-name="P29" loext:marker-style-name="T81"><text:span text:style-name="T151">Flow Label </text:span><text:span text:style-name="T84">欄位</text:span><text:span text:style-name="T82">，</text:span><text:span text:style-name="T347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1"><text:span text:style-name="T82">廣播方式</text:span><text:span text:style-name="T81"/></text:p>
          </table:table-cell>
          <table:table-cell table:style-name="表格57.A3" office:value-type="string">
            <text:p text:style-name="P29" loext:marker-style-name="T81"><text:span text:style-name="T149">Broadcast</text:span><text:span text:style-name="T82">：一次發給所有人，浪費頻寬</text:span></text:p>
          </table:table-cell>
          <table:table-cell table:style-name="表格57.A3" office:value-type="string">
            <text:p text:style-name="P29" loext:marker-style-name="T81"><text:span text:style-name="T82">改用</text:span><text:span text:style-name="T84"> </text:span><text:span text:style-name="T151">Multicast</text:span><text:span text:style-name="T84">（群播）／ </text:span><text:span text:style-name="T151">Anycast</text:span><text:span text:style-name="T84">（任播）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1"><text:span text:style-name="T147">IP </text:span><text:span text:style-name="T82">配置方式</text:span></text:p>
          </table:table-cell>
          <table:table-cell table:style-name="表格57.A2" office:value-type="string">
            <text:p text:style-name="P29" loext:marker-style-name="T81"><text:span text:style-name="T86">需手動設定或 </text:span><text:span text:style-name="T152">DHCP</text:span><text:span text:style-name="T82">，管理繁瑣</text:span></text:p>
          </table:table-cell>
          <table:table-cell table:style-name="表格57.A2" office:value-type="string">
            <text:p text:style-name="P29" loext:marker-style-name="T81"><text:span text:style-name="T147">SLAAC </text:span><text:span text:style-name="T82">無狀態自動配置，</text:span><text:span text:style-name="T330">插網路即取得 </text:span><text:span text:style-name="T339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6"><text:span text:style-name="T196">📌 <text:s/></text:span><text:span text:style-name="T218">補充：</text:span><text:span text:style-name="T222">IPsec </text:span><text:span text:style-name="T218">強制 </text:span><text:span text:style-name="T222">vs </text:span><text:span text:style-name="T218">建議</text:span></text:p>
            <text:p text:style-name="P7" loext:marker-style-name="T98"><text:span text:style-name="T155">IPv6 </text:span><text:span text:style-name="T97">早期規範（</text:span><text:span text:style-name="T155">RFC 2460</text:span><text:span text:style-name="T97">）將 </text:span><text:span text:style-name="T155">IPsec </text:span><text:span text:style-name="T97">列為「強制」；</text:span><text:span text:style-name="T155">2011 </text:span><text:span text:style-name="T97">年 </text:span><text:span text:style-name="T155">RFC 6434 </text:span><text:span text:style-name="T97">修訂後改為「建議（</text:span><text:span text:style-name="T155">SHOULD</text:span><text:span text:style-name="T97">）」。考試普遍仍以「原生支援 </text:span><text:span text:style-name="T155">IPsec</text:span><text:span text:style-name="T97">」作為 </text:span><text:span text:style-name="T155">IPv6 </text:span><text:span text:style-name="T97">改進特色，此處標注供參考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7" loext:marker-style-name="T204"><text:span text:style-name="T211">① </text:span><text:span text:style-name="T213">Dual Stack</text:span><text:span text:style-name="T205">（雙協定堆疊）</text:span><text:span text:style-name="T203">— 最常用、最推薦</text:span></text:p>
            <text:p text:style-name="P8" loext:marker-style-name="T98"><text:span text:style-name="T432">裝置同時具備 </text:span><text:span text:style-name="T445">IPv4 </text:span><text:span text:style-name="T432">與 </text:span><text:span text:style-name="T445">IPv6 </text:span><text:span text:style-name="T432">兩套協定堆疊</text:span><text:span text:style-name="T97">。</text:span><text:span text:style-name="T165">DNS A record → </text:span><text:span text:style-name="T110">回傳 </text:span><text:span text:style-name="T165">IPv4</text:span><text:span text:style-name="T110">；</text:span><text:span text:style-name="T165">DNS AAAA record → </text:span><text:span text:style-name="T110">回傳 </text:span><text:span text:style-name="T165">IPv6</text:span><text:span text:style-name="T97">。連線時優先選用 </text:span><text:span text:style-name="T155">IPv6</text:span><text:span text:style-name="T97">，對端不支援則自動退回 </text:span><text:span text:style-name="T155">IPv4</text:span><text:span text:style-name="T97">。不需任何封包轉換，效能損耗最低。</text:span></text:p>
            <text:p text:style-name="P8" loext:marker-style-name="T98"><text:span text:style-name="T97">流程：輸入 </text:span><text:span text:style-name="T155">google.com → DNS </text:span><text:span text:style-name="T97">回傳 </text:span><text:span text:style-name="T155">A</text:span><text:span text:style-name="T97">＋</text:span><text:span text:style-name="T155">AAAA → </text:span><text:span text:style-name="T97">優先選 </text:span><text:span text:style-name="T155">IPv6 → </text:span><text:span text:style-name="T97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7" loext:marker-style-name="T217"><text:span text:style-name="T219">②</text:span><text:span text:style-name="T221"> Tunneling</text:span><text:span text:style-name="T216">（隧道技術）</text:span><text:span text:style-name="T214">— 過渡期橋接方案</text:span></text:p>
            <text:p text:style-name="P8" loext:marker-style-name="T98"><text:span text:style-name="T97">中間網路只支援 </text:span><text:span text:style-name="T155">IPv4</text:span><text:span text:style-name="T97">，無法直接傳送 </text:span><text:span text:style-name="T155">IPv6 </text:span><text:span text:style-name="T97">封包。解法：</text:span><text:span text:style-name="T432">將 </text:span><text:span text:style-name="T445">IPv6 </text:span><text:span text:style-name="T432">封包完整封裝進 </text:span><text:span text:style-name="T445">IPv4 </text:span><text:span text:style-name="T432">外殼，抵達目的地後拆除外層 </text:span><text:span text:style-name="T445">IPv4</text:span><text:span text:style-name="T432">、還原 </text:span><text:span text:style-name="T445">IPv6 </text:span><text:span text:style-name="T432">封包</text:span><text:span text:style-name="T97">。常見技術：</text:span><text:span text:style-name="T155">6in4</text:span><text:span text:style-name="T97">、</text:span><text:span text:style-name="T155">6to4</text:span><text:span text:style-name="T97">、</text:span><text:span text:style-name="T155">Teredo</text:span><text:span text:style-name="T97">、</text:span><text:span text:style-name="T155">ISATAP</text:span><text:span text:style-name="T97">。</text:span></text:p>
            <text:p text:style-name="P8" loext:marker-style-name="T98"><text:span text:style-name="T97">示意：</text:span><text:span text:style-name="T155">[ IPv4 </text:span><text:span text:style-name="T97">外層 </text:span><text:span text:style-name="T155">Header ][ IPv6 </text:span><text:span text:style-name="T97">封包（完整保留）</text:span><text:span text:style-name="T155">] → </text:span><text:span text:style-name="T97">目的地拆除外殼 → 還原 </text:span><text:span text:style-name="T155">IPv6</text:span><text:span text:style-name="T97">。</text:span></text:p>
          </table:table-cell>
        </table:table-row>
        <table:table-row table:style-name="表格58.1">
          <table:table-cell table:style-name="表格58.A3" office:value-type="string">
            <text:p text:style-name="P7" loext:marker-style-name="T254"><text:span text:style-name="T257">③ </text:span><text:span text:style-name="T258">Translation</text:span><text:span text:style-name="T253">（</text:span><text:span text:style-name="T258">NAT64</text:span><text:span text:style-name="T253">）</text:span><text:span text:style-name="T251">— 協定轉換、互通最後手段</text:span></text:p>
            <text:p text:style-name="P8" loext:marker-style-name="T98"><text:span text:style-name="T97">適用場景：</text:span><text:span text:style-name="T155">IPv6-only </text:span><text:span text:style-name="T97">裝置需與 </text:span><text:span text:style-name="T155">IPv4-only </text:span><text:span text:style-name="T97">裝置直接通訊。</text:span><text:span text:style-name="T290">透過轉換閘道器即時將封包表頭轉換為對方格式</text:span><text:span text:style-name="T97">。代表技術：</text:span><text:span text:style-name="T155">NAT64 + DNS64</text:span><text:span text:style-name="T97">。</text:span><text:span text:style-name="T284">複雜度最高，有額外效能損耗</text:span><text:span text:style-name="T97">。</text:span></text:p>
            <text:p text:style-name="P8" loext:marker-style-name="T98"><text:span text:style-name="T97">示意：</text:span><text:span text:style-name="T155">IPv6 </text:span><text:span text:style-name="T97">裝置 → </text:span><text:span text:style-name="T155">[ NAT64 </text:span><text:span text:style-name="T479">轉換閘道</text:span><text:span text:style-name="T97"> </text:span><text:span text:style-name="T155">] → IPv4 </text:span><text:span text:style-name="T97">裝置（雙向互轉）。</text:span></text:p>
          </table:table-cell>
        </table:table-row>
      </table:table>
      <text:h text:style-name="P11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4" loext:marker-style-name="T71"><text:span text:style-name="T72">技術</text:span><text:span text:style-name="T71"/></text:p>
            </table:table-cell>
            <table:table-cell table:style-name="表格59.A1" office:value-type="string">
              <text:p text:style-name="P4" loext:marker-style-name="T71"><text:span text:style-name="T72">生活比喻</text:span><text:span text:style-name="T71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9" loext:marker-style-name="T121"><text:span text:style-name="T175">Dual Stack</text:span><text:span text:style-name="T121"/></text:p>
          </table:table-cell>
          <table:table-cell table:style-name="表格59.A2" office:value-type="string">
            <text:p text:style-name="P29" loext:marker-style-name="T121"><text:span text:style-name="T122">你</text:span><text:span text:style-name="T125">同時會中文 </text:span><text:span text:style-name="T176">+ </text:span><text:span text:style-name="T125">英文</text:span><text:span text:style-name="T12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9" loext:marker-style-name="T121"><text:span text:style-name="T175">Tunneling</text:span><text:span text:style-name="T121"/></text:p>
          </table:table-cell>
          <table:table-cell table:style-name="表格59.A3" office:value-type="string">
            <text:p text:style-name="P29" loext:marker-style-name="T121"><text:span text:style-name="T338">把英文信裝進中文信封偷渡過去</text:span><text:span text:style-name="T12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9" loext:marker-style-name="T121"><text:span text:style-name="T175">Translation</text:span><text:span text:style-name="T121"/></text:p>
          </table:table-cell>
          <table:table-cell table:style-name="表格59.A2" office:value-type="string">
            <text:p text:style-name="P29" loext:marker-style-name="T121"><text:span text:style-name="T537">現場請翻譯員</text:span><text:span text:style-name="T12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6"><text:span text:style-name="T196">🏠 <text:s/></text:span><text:span text:style-name="T50">用「寄信</text:span><text:span text:style-name="T61">/</text:span><text:span text:style-name="T50">門牌」理解</text:span></text:p>
            <text:p text:style-name="P7"><text:span text:style-name="T357">IPv4 </text:span><text:span text:style-name="T350">的困境：整棟公寓共用一個門牌</text:span><text:span text:style-name="T481">（</text:span><text:span text:style-name="T497">NAT</text:span><text:span text:style-name="T481">）</text:span><text:span text:style-name="T97">，郵差只送到大門，裡面誰是誰要另外猜；地址快用光還在借號碼。</text:span></text:p>
            <text:p text:style-name="P8"><text:span text:style-name="T308">IPv6 </text:span><text:span text:style-name="T286">的世界：每個人都有獨立門牌（公開 </text:span><text:span text:style-name="T308">IP</text:span><text:span text:style-name="T286">）</text:span><text:span text:style-name="T97">，地址多到用不完，郵件直接送到本人手上，不需中間人轉達。</text:span></text:p>
          </table:table-cell>
          <table:covered-table-cell/>
        </table:table-row>
      </table:table>
      <text:h text:style-name="P11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6"><text:span text:style-name="T196">🧠 <text:s/></text:span><text:span text:style-name="T250">一句話記憶法</text:span></text:p>
            <text:p text:style-name="P7"><text:span text:style-name="T257">IPv6 </text:span><text:span text:style-name="T251">特點：</text:span><text:span text:style-name="T97">大（</text:span><text:span text:style-name="T155">128 bit</text:span><text:span text:style-name="T97">）＋ </text:span><text:span text:style-name="T395">安全（</text:span><text:span text:style-name="T416">IPsec</text:span><text:span text:style-name="T395">）</text:span><text:span text:style-name="T97">＋ </text:span><text:span text:style-name="T477">快（固定 </text:span><text:span text:style-name="T494">Header</text:span><text:span text:style-name="T477">）</text:span><text:span text:style-name="T97">＋ 自動（</text:span><text:span text:style-name="T155">SLAAC</text:span><text:span text:style-name="T97">）＋ 乾淨（無 </text:span><text:span text:style-name="T155">Broadcast</text:span><text:span text:style-name="T97">）。</text:span></text:p>
            <text:p text:style-name="P8"><text:span text:style-name="T253">過渡技術</text:span><text:span text:style-name="T251">：</text:span><text:span text:style-name="T97">雙語（</text:span><text:span text:style-name="T165">Dual Stack</text:span><text:span text:style-name="T97">）＋ 偽裝（</text:span><text:span text:style-name="T165">Tunneling</text:span><text:span text:style-name="T97">）＋ 翻譯（</text:span><text:span text:style-name="T165">Translation</text:span><text:span text:style-name="T97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6" loext:marker-style-name="T67"><text:span text:style-name="T77">IPv4 </text:span><text:span text:style-name="T68">七大問題</text:span></text:p>
          </table:table-cell>
          <table:table-cell table:style-name="表格60.A2" office:value-type="string">
            <text:p text:style-name="P26" loext:marker-style-name="T67"><text:span text:style-name="T77">IPv6 </text:span><text:span text:style-name="T68">七大改進</text:span></text:p>
          </table:table-cell>
        </table:table-row>
        <table:table-row table:style-name="表格60.1">
          <table:table-cell table:style-name="表格60.A3" office:value-type="string">
            <text:p text:style-name="P29" loext:marker-style-name="T81"><text:span text:style-name="T82">位址不足（</text:span><text:span text:style-name="T147">32 bit</text:span><text:span text:style-name="T82">）／需 </text:span><text:span text:style-name="T147">NAT </text:span><text:span text:style-name="T82">破壞 </text:span><text:span text:style-name="T147">E2E</text:span><text:span text:style-name="T82">／無加密驗證／</text:span><text:span text:style-name="T489">Header </text:span><text:span text:style-name="T471">可變效率低</text:span><text:span text:style-name="T82">／缺 </text:span><text:span text:style-name="T147">QoS</text:span><text:span text:style-name="T82">／用 </text:span><text:span text:style-name="T147">Broadcast </text:span><text:span text:style-name="T82">浪費／</text:span><text:span text:style-name="T147">IP </text:span><text:span text:style-name="T82">需手動設定</text:span></text:p>
          </table:table-cell>
          <table:table-cell table:style-name="表格60.A3" office:value-type="string">
            <text:p text:style-name="P29" loext:marker-style-name="T81"><text:span text:style-name="T147">128 bit </text:span><text:span text:style-name="T82">近乎無限／不需 </text:span><text:span text:style-name="T147">NAT </text:span><text:span text:style-name="T82">恢復 </text:span><text:span text:style-name="T147">E2E</text:span><text:span text:style-name="T82">／</text:span><text:span text:style-name="T272">支援 </text:span><text:span text:style-name="T306">IPsec</text:span><text:span text:style-name="T82">／</text:span><text:span text:style-name="T272">固定 </text:span><text:span text:style-name="T306">40 bytes </text:span><text:span text:style-name="T272">轉送快</text:span><text:span text:style-name="T82">／</text:span><text:span text:style-name="T147">Flow Label </text:span><text:span text:style-name="T82">支援 </text:span><text:span text:style-name="T147">QoS</text:span><text:span text:style-name="T82">／改用 </text:span><text:span text:style-name="T147">Multicast/Anycast</text:span><text:span text:style-name="T82">／</text:span><text:span text:style-name="T147">SLAAC </text:span><text:span text:style-name="T82">自動配置</text:span></text:p>
          </table:table-cell>
        </table:table-row>
      </table:table>
      <text:h text:style-name="P17" text:outline-level="1" loext:marker-style-name="T69"><text:span text:style-name="T70">第 四 篇　</text:span><text:span text:style-name="T69">ARP</text:span><text:span text:style-name="T70">、</text:span><text:span text:style-name="T69">NAT </text:span><text:span text:style-name="T70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><text:span text:style-name="T196">🔑 <text:s/></text:span><text:span text:style-name="T50">最基礎的比喻，先懂這個</text:span></text:p>
            <text:p text:style-name="P7" loext:marker-style-name="T98"><text:span text:style-name="T155">IP </text:span><text:span text:style-name="T97">位址決定「最終送到哪台電腦」；</text:span><text:span text:style-name="T155">MAC </text:span><text:span text:style-name="T97">位址決定「目前這一跳要交給哪個網路設備」。</text:span></text:p>
            <text:p text:style-name="P8" loext:marker-style-name="T98"><text:span text:style-name="T528">資料在網路中「實際傳送」靠 </text:span><text:span text:style-name="T546">MAC</text:span><text:span text:style-name="T97">，</text:span><text:span text:style-name="T394">但我們只知道對方的 </text:span><text:span text:style-name="T415">IP</text:span><text:span text:style-name="T155">——</text:span><text:span text:style-name="T97">所以</text:span><text:span text:style-name="T350">需要一個轉換機制</text:span><text:span text:style-name="T97">，這就是 </text:span><text:span text:style-name="T155">ARP </text:span><text:span text:style-name="T97">的工作。</text:span></text:p>
          </table:table-cell>
        </table:table-row>
      </table:table>
      <text:h text:style-name="P11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35" loext:marker-style-name="T98"><text:span text:style-name="T97">一句話定義：</text:span><text:span text:style-name="T167">ARP</text:span><text:span text:style-name="T155"> </text:span><text:span text:style-name="T97">＝ </text:span><text:span text:style-name="T336">用 </text:span><text:span text:style-name="T344">IP </text:span><text:span text:style-name="T336">找 </text:span><text:span text:style-name="T344">MAC</text:span><text:span text:style-name="T97">，</text:span><text:span text:style-name="T286">只在同一個區域網路（</text:span><text:span text:style-name="T308">LAN</text:span><text:span text:style-name="T286">）內使用</text:span><text:span text:style-name="T97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6"><text:span text:style-name="T196">📋 <text:s/></text:span><text:span text:style-name="T61">ARP </text:span><text:span text:style-name="T50">運作流程（考試必考）</text:span></text:p>
            <text:p text:style-name="P7"><text:span text:style-name="T63">① </text:span><text:span text:style-name="T54">查 </text:span><text:span text:style-name="T62">ARP Cache</text:span><text:span text:style-name="T54">（筆記本）</text:span><text:span text:style-name="T55">：</text:span><text:span text:style-name="T97">先查自己的記錄「</text:span><text:span text:style-name="T559">我之前有沒有問過這個 </text:span><text:span text:style-name="T571">IP</text:span><text:span text:style-name="T559">？</text:span><text:span text:style-name="T97">」有 → 直接用。</text:span></text:p>
            <text:p text:style-name="P8"><text:span text:style-name="T63">② </text:span><text:span text:style-name="T54">發出 </text:span><text:span text:style-name="T62">ARP Request</text:span><text:span text:style-name="T54">（廣播）</text:span><text:span text:style-name="T55">：</text:span><text:span text:style-name="T97">沒記錄 →</text:span><text:span text:style-name="T527"> 對整個區網廣播</text:span><text:span text:style-name="T97">「誰是 </text:span><text:span text:style-name="T155">192.168.1.5</text:span><text:span text:style-name="T97">？</text:span><text:span text:style-name="T527">請告訴我你的 </text:span><text:span text:style-name="T545">MAC</text:span><text:span text:style-name="T527">！</text:span><text:span text:style-name="T97">」所有機器都收到。</text:span></text:p>
            <text:p text:style-name="P8"><text:span text:style-name="T63">③ </text:span><text:span text:style-name="T54">收到 </text:span><text:span text:style-name="T62">ARP Reply</text:span><text:span text:style-name="T54">（單播回應）</text:span><text:span text:style-name="T55">：</text:span><text:span text:style-name="T265">IP </text:span><text:span text:style-name="T264">是 </text:span><text:span text:style-name="T265">192.168.1.5 </text:span><text:span text:style-name="T264">的機器回應「我是！</text:span><text:span text:style-name="T265">MAC </text:span><text:span text:style-name="T264">是 </text:span><text:span text:style-name="T265">AA:BB:CC</text:span><text:span text:style-name="T264">」</text:span><text:span text:style-name="T97">，其餘機器靜默忽略。</text:span></text:p>
            <text:p text:style-name="P8"><text:span text:style-name="T63">④ </text:span><text:span text:style-name="T54">存進 </text:span><text:span text:style-name="T62">ARP Cache</text:span><text:span text:style-name="T55">：</text:span><text:span text:style-name="T393">把「</text:span><text:span text:style-name="T414">IP ↔ MAC</text:span><text:span text:style-name="T393">」對應記下</text:span><text:span text:style-name="T97">，</text:span><text:span text:style-name="T286">下次直接用</text:span><text:span text:style-name="T97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4" loext:marker-style-name="T67"><text:span text:style-name="T68">項目</text:span><text:span text:style-name="T67"/></text:p>
          </table:table-cell>
          <table:table-cell table:style-name="表格62.A2" office:value-type="string">
            <text:p text:style-name="P4" loext:marker-style-name="T67"><text:span text:style-name="T68">內容</text:span><text:span text:style-name="T67"/></text:p>
          </table:table-cell>
        </table:table-row>
        <table:table-row table:style-name="表格62.1">
          <table:table-cell table:style-name="表格62.A3" office:value-type="string">
            <text:p text:style-name="P29" loext:marker-style-name="T472"><text:span text:style-name="T490">ARP Spoofing</text:span><text:span text:style-name="T473">（</text:span><text:span text:style-name="T490">ARP </text:span><text:span text:style-name="T473">欺騙）</text:span></text:p>
          </table:table-cell>
          <table:table-cell table:style-name="表格62.A3" office:value-type="string">
            <text:p text:style-name="P29" loext:marker-style-name="T81"><text:span text:style-name="T375">攻擊者</text:span><text:span text:style-name="T533">假冒他人</text:span><text:span text:style-name="T375">的 </text:span><text:span text:style-name="T401">MAC</text:span><text:span text:style-name="T375">，讓封包被送到錯的地方</text:span><text:span text:style-name="T82"> → 中間人攻擊（</text:span><text:span text:style-name="T147">MITM</text:span><text:span text:style-name="T82">）</text:span></text:p>
          </table:table-cell>
        </table:table-row>
        <table:table-row table:style-name="表格62.1">
          <table:table-cell table:style-name="表格62.A4" office:value-type="string">
            <text:p text:style-name="P29" loext:marker-style-name="T89"><text:span text:style-name="T149">arp -a</text:span><text:span text:style-name="T89"/></text:p>
          </table:table-cell>
          <table:table-cell table:style-name="表格62.A4" office:value-type="string">
            <text:p text:style-name="P29" loext:marker-style-name="T81"><text:span text:style-name="T534">查看本機的 </text:span><text:span text:style-name="T551">ARP </text:span><text:span text:style-name="T534">對應表</text:span><text:span text:style-name="T82">（</text:span><text:span text:style-name="T153">IP ↔ MAC </text:span><text:span text:style-name="T94">清單</text:span><text:span text:style-name="T82">）</text:span></text:p>
          </table:table-cell>
        </table:table-row>
        <table:table-row table:style-name="表格62.1">
          <table:table-cell table:style-name="表格62.A3" office:value-type="string">
            <text:p text:style-name="P29" loext:marker-style-name="T273"><text:span text:style-name="T306">ping [IP]</text:span><text:span text:style-name="T273"/></text:p>
          </table:table-cell>
          <table:table-cell table:style-name="表格62.A3" office:value-type="string">
            <text:p text:style-name="P29" loext:marker-style-name="T81"><text:span text:style-name="T330">觸發 </text:span><text:span text:style-name="T339">ARP </text:span><text:span text:style-name="T330">運作</text:span><text:span text:style-name="T82">，</text:span><text:span text:style-name="T268">讓電腦主動查詢對應 </text:span><text:span text:style-name="T302">MAC</text:span></text:p>
          </table:table-cell>
        </table:table-row>
      </table:table>
      <text:h text:style-name="P11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35" loext:marker-style-name="T98"><text:span text:style-name="T97">一句話定義：</text:span><text:span text:style-name="T165">NAT</text:span><text:span text:style-name="T155"> </text:span><text:span text:style-name="T97">＝ </text:span><text:span text:style-name="T559">路由器幫你把「私有 </text:span><text:span text:style-name="T571">IP</text:span><text:span text:style-name="T559">」改成「公網 </text:span><text:span text:style-name="T571">IP</text:span><text:span text:style-name="T559">」</text:span><text:span text:style-name="T97">，讓內部機器能夠上網。</text:span><text:span text:style-name="T264">私有 </text:span><text:span text:style-name="T265">IP</text:span><text:span text:style-name="T264">（如 </text:span><text:span text:style-name="T265">192.168.1.2</text:span><text:span text:style-name="T264">）外網看不到，只在家裡用</text:span><text:span text:style-name="T97">；路由器的公網 </text:span><text:span text:style-name="T155">IP</text:span><text:span text:style-name="T97">（</text:span><text:span text:style-name="T155">220.x.x.x</text:span><text:span text:style-name="T97">，</text:span><text:span text:style-name="T155">ISP </text:span><text:span text:style-name="T97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6"><text:span text:style-name="T196">▸ <text:s/></text:span><text:span text:style-name="T61">NAT </text:span><text:span text:style-name="T50">運作流程</text:span></text:p>
            <text:p text:style-name="P7" loext:marker-style-name="T98"><text:span text:style-name="T155">① </text:span><text:span text:style-name="T97">你的電腦（</text:span><text:span text:style-name="T155">192.168.1.2</text:span><text:span text:style-name="T97">）發送資料給 </text:span><text:span text:style-name="T155">Google → ② </text:span><text:span text:style-name="T350">封包抵達路由器</text:span><text:span text:style-name="T97">，</text:span><text:span text:style-name="T308">NAT </text:span><text:span text:style-name="T286">把來源 </text:span><text:span text:style-name="T308">IP </text:span><text:span text:style-name="T286">改成公網 </text:span><text:span text:style-name="T308">IP</text:span><text:span text:style-name="T286">（</text:span><text:span text:style-name="T308">220.x.x.x</text:span><text:span text:style-name="T286">）</text:span><text:span text:style-name="T477">對外偽裝身份</text:span><text:span text:style-name="T97"> → ③ </text:span><text:span text:style-name="T155">Google </text:span><text:span text:style-name="T97">收到，回應給公網 </text:span><text:span text:style-name="T155">IP</text:span><text:span text:style-name="T97">（</text:span><text:span text:style-name="T155">220.x.x.x</text:span><text:span text:style-name="T97">）→ ④ 路由器把目的地 </text:span><text:span text:style-name="T155">IP </text:span><text:span text:style-name="T97">換回 </text:span><text:span text:style-name="T155">192.168.1.2</text:span><text:span text:style-name="T97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4" loext:marker-style-name="T67"><text:span text:style-name="T68">類型</text:span><text:span text:style-name="T67"/></text:p>
          </table:table-cell>
          <table:table-cell table:style-name="表格63.A2" office:value-type="string">
            <text:p text:style-name="P4" loext:marker-style-name="T67"><text:span text:style-name="T68">中文</text:span><text:span text:style-name="T67"/></text:p>
          </table:table-cell>
          <table:table-cell table:style-name="表格63.A2" office:value-type="string">
            <text:p text:style-name="P4" loext:marker-style-name="T67"><text:span text:style-name="T68">說明</text:span><text:span text:style-name="T67"/></text:p>
          </table:table-cell>
          <table:table-cell table:style-name="表格63.A2" office:value-type="string">
            <text:p text:style-name="P4" loext:marker-style-name="T67"><text:span text:style-name="T68">特點</text:span><text:span text:style-name="T67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85"><text:span text:style-name="T151">Static NAT</text:span><text:span text:style-name="T85"/></text:p>
          </table:table-cell>
          <table:table-cell table:style-name="表格63.A3" office:value-type="string">
            <text:p text:style-name="P29" loext:marker-style-name="T81"><text:span text:style-name="T82">靜態 </text:span><text:span text:style-name="T147">NAT</text:span></text:p>
          </table:table-cell>
          <table:table-cell table:style-name="表格63.A3" office:value-type="string">
            <text:p text:style-name="P29" loext:marker-style-name="T422"><text:span text:style-name="T423">一個私有 </text:span><text:span text:style-name="T439">IP ↔ </text:span><text:span text:style-name="T423">一個公網 </text:span><text:span text:style-name="T439">IP</text:span></text:p>
          </table:table-cell>
          <table:table-cell table:style-name="表格63.A3" office:value-type="string">
            <text:p text:style-name="P29" loext:marker-style-name="T422"><text:span text:style-name="T423">固定對應</text:span><text:span text:style-name="T422"/></text:p>
          </table:table-cell>
        </table:table-row>
        <table:table-row table:style-name="表格63.1">
          <table:table-cell table:style-name="表格63.A4" office:value-type="string">
            <text:p text:style-name="P29" loext:marker-style-name="T85"><text:span text:style-name="T151">Dynamic NAT</text:span><text:span text:style-name="T85"/></text:p>
          </table:table-cell>
          <table:table-cell table:style-name="表格63.A4" office:value-type="string">
            <text:p text:style-name="P29" loext:marker-style-name="T81"><text:span text:style-name="T82">動態 </text:span><text:span text:style-name="T147">NAT</text:span></text:p>
          </table:table-cell>
          <table:table-cell table:style-name="表格63.A4" office:value-type="string">
            <text:p text:style-name="P29" loext:marker-style-name="T580"><text:span text:style-name="T581">多個私有 </text:span><text:span text:style-name="T584">IP </text:span><text:span text:style-name="T581">對應 </text:span><text:span text:style-name="T584">IP </text:span><text:span text:style-name="T581">池（</text:span><text:span text:style-name="T584">pool</text:span><text:span text:style-name="T581">）</text:span></text:p>
          </table:table-cell>
          <table:table-cell table:style-name="表格63.A4" office:value-type="string">
            <text:p text:style-name="P29" loext:marker-style-name="T580"><text:span text:style-name="T581">動態分配</text:span><text:span text:style-name="T580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472"><text:span text:style-name="T490">PAT</text:span><text:span text:style-name="T472"/></text:p>
          </table:table-cell>
          <table:table-cell table:style-name="表格63.A3" office:value-type="string">
            <text:p text:style-name="P29" loext:marker-style-name="T81"><text:span text:style-name="T82">連接埠位址轉換</text:span><text:span text:style-name="T81"/></text:p>
          </table:table-cell>
          <table:table-cell table:style-name="表格63.A3" office:value-type="string">
            <text:p text:style-name="P29" loext:marker-style-name="T586"><text:span text:style-name="T587">多台共用一個公網 </text:span><text:span text:style-name="T588">IP</text:span></text:p>
          </table:table-cell>
          <table:table-cell table:style-name="表格63.A3" office:value-type="string">
            <text:p text:style-name="P29" loext:marker-style-name="T586"><text:span text:style-name="T587">靠 </text:span><text:span text:style-name="T588">Port </text:span><text:span text:style-name="T587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6"><text:span text:style-name="T196">⚠️ <text:s/></text:span><text:span text:style-name="T222">NAT </text:span><text:span text:style-name="T218">的缺點（考試超愛）</text:span></text:p>
            <text:p text:style-name="P7"><text:span text:style-name="T528">破壞 </text:span><text:span text:style-name="T546">End-to-End </text:span><text:span text:style-name="T528">連線</text:span><text:span text:style-name="T214">（最重要）：</text:span><text:span text:style-name="T97">原本你↔對方是真正點對點；</text:span><text:span text:style-name="T110">有 </text:span><text:span text:style-name="T165">NAT </text:span><text:span text:style-name="T110">後變成你→</text:span><text:span text:style-name="T165">NAT→</text:span><text:span text:style-name="T110">對方，多一層轉換，不再是端對端</text:span><text:span text:style-name="T97">。</text:span></text:p>
            <text:p text:style-name="P8"><text:span text:style-name="T546">P2P / VoIP </text:span><text:span text:style-name="T528">難以運作</text:span><text:span text:style-name="T214">：</text:span><text:span text:style-name="T286">外部機器找不到你（被藏在 </text:span><text:span text:style-name="T308">NAT </text:span><text:span text:style-name="T286">後）</text:span><text:span text:style-name="T97">，</text:span><text:span text:style-name="T155">P2P </text:span><text:span text:style-name="T97">下載、</text:span><text:span text:style-name="T155">VoIP </text:span><text:span text:style-name="T97">通話等</text:span><text:span text:style-name="T582">直連功能受限</text:span><text:span text:style-name="T97">。</text:span></text:p>
            <text:p text:style-name="P8"><text:span text:style-name="T528">增加延遲</text:span><text:span text:style-name="T214">：</text:span><text:span text:style-name="T367">每個封包都需要</text:span><text:span text:style-name="T589">多一道 </text:span><text:span text:style-name="T590">IP </text:span><text:span text:style-name="T589">轉換處理</text:span><text:span text:style-name="T97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35" loext:marker-style-name="T98"><text:span text:style-name="T110">核心問題</text:span><text:span text:style-name="T97">：</text:span><text:span text:style-name="T350">外面的人只看到一個公網 </text:span><text:span text:style-name="T357">IP</text:span><text:span text:style-name="T97">，但</text:span><text:span text:style-name="T591">內部有多台機器，路由器不知道要轉給哪一台</text:span><text:span text:style-name="T97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7" loext:marker-style-name="T53"><text:span text:style-name="T55">方法一：</text:span><text:span text:style-name="T62">Port Forwarding</text:span><text:span text:style-name="T54">（手動指定轉發）</text:span></text:p>
            <text:p text:style-name="P8" loext:marker-style-name="T98"><text:span text:style-name="T97">比喻：</text:span><text:span text:style-name="T415">Port</text:span><text:span text:style-name="T394">＝房間號碼</text:span><text:span text:style-name="T97">；</text:span><text:span text:style-name="T571">NAT </text:span><text:span text:style-name="T559">路由器＝大樓</text:span><text:span text:style-name="T97">；</text:span><text:span text:style-name="T415">Port Forwarding</text:span><text:span text:style-name="T394">＝門口指示牌「</text:span><text:span text:style-name="T415">80 </text:span><text:span text:style-name="T394">號房 → </text:span><text:span text:style-name="T415">192.168.1.2</text:span><text:span text:style-name="T394">」</text:span><text:span text:style-name="T97">。例：</text:span><text:span text:style-name="T155">220.x.x.x:80 → 192.168.1.2:80</text:span><text:span text:style-name="T97">（</text:span><text:span text:style-name="T562">網頁</text:span><text:span text:style-name="T97">）；</text:span><text:span text:style-name="T155">220.x.x.x:25565 → 192.168.1.2:25565</text:span><text:span text:style-name="T97">（</text:span><text:span text:style-name="T155">Minecraft</text:span><text:span text:style-name="T97">）。</text:span></text:p>
            <text:p text:style-name="P8"><text:span text:style-name="T109">優點：</text:span><text:span text:style-name="T97">設定直接、穩定，可精確控制。</text:span><text:span text:style-name="T109">缺點：</text:span><text:span text:style-name="T479">每個服務都要手動設定，</text:span><text:span text:style-name="T495">IP </text:span><text:span text:style-name="T479">改變要重設</text:span><text:span text:style-name="T97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7" loext:marker-style-name="T204"><text:span text:style-name="T203">方法二：</text:span><text:span text:style-name="T213">UPnP</text:span><text:span text:style-name="T205">（自動版 </text:span><text:span text:style-name="T213">Port Forwarding</text:span><text:span text:style-name="T205">）</text:span></text:p>
            <text:p text:style-name="P8" loext:marker-style-name="T98"><text:span text:style-name="T291">讓裝置自動跟</text:span><text:span text:style-name="T505">路由器</text:span><text:span text:style-name="T291">要求「幫我開一個 </text:span><text:span text:style-name="T315">Port</text:span><text:span text:style-name="T291">」，不需人工設定。</text:span><text:span text:style-name="T97">① </text:span><text:span text:style-name="T560">應用程式發 </text:span><text:span text:style-name="T572">UPnP </text:span><text:span text:style-name="T560">請求</text:span><text:span text:style-name="T97"> → ② </text:span><text:span text:style-name="T506">路由器</text:span><text:span text:style-name="T560">自動新增 </text:span><text:span text:style-name="T572">Port Forwarding </text:span><text:span text:style-name="T560">規則</text:span><text:span text:style-name="T97"> → ③</text:span><text:span text:style-name="T293"> 服務結束後自動清除</text:span><text:span text:style-name="T97">（理想情況）。</text:span></text:p>
            <text:p text:style-name="P8"><text:span text:style-name="T109">優點：</text:span><text:span text:style-name="T97">全自動、對一般用戶友善。</text:span><text:span text:style-name="T228">安全風險（重要）：</text:span><text:span text:style-name="T479">惡意程式也能透過 </text:span><text:span text:style-name="T495">UPnP </text:span><text:span text:style-name="T479">自動開 </text:span><text:span text:style-name="T495">Port</text:span><text:span text:style-name="T479">，可能讓攻擊者直接連入內網</text:span><text:span text:style-name="T97">。建議不需要時關閉 </text:span><text:span text:style-name="T155">UPnP</text:span><text:span text:style-name="T97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" loext:marker-style-name="T254"><text:span text:style-name="T251">方法三：</text:span><text:span text:style-name="T258">STUN</text:span><text:span text:style-name="T253">（打洞技術）</text:span></text:p>
            <text:p text:style-name="P8" loext:marker-style-name="T98"><text:span text:style-name="T110">使用情境</text:span><text:span text:style-name="T97">：</text:span><text:span text:style-name="T592">兩端都在各自 </text:span><text:span text:style-name="T596">NAT </text:span><text:span text:style-name="T592">後面，彼此都是私有 </text:span><text:span text:style-name="T596">IP</text:span><text:span text:style-name="T592">、互相找不到。</text:span><text:span text:style-name="T596">STUN </text:span><text:span text:style-name="T592">先幫每端「查清楚自己對外的公網 </text:span><text:span text:style-name="T596">IP + Port</text:span><text:span text:style-name="T592">」，再交換資訊</text:span><text:span text:style-name="T97">嘗試直接打通。</text:span></text:p>
            <text:p text:style-name="P8" loext:marker-style-name="T98"><text:span text:style-name="T155">① </text:span><text:span text:style-name="T599">問 </text:span><text:span text:style-name="T601">STUN </text:span><text:span text:style-name="T599">伺服器「我對外的 </text:span><text:span text:style-name="T601">IP </text:span><text:span text:style-name="T599">和 </text:span><text:span text:style-name="T601">Port </text:span><text:span text:style-name="T599">是什麼？」</text:span><text:span text:style-name="T97">② </text:span><text:span text:style-name="T601">STUN </text:span><text:span text:style-name="T599">回「你對外是 </text:span><text:span text:style-name="T601">220.x.x.x:12345</text:span><text:span text:style-name="T599">」</text:span><text:span text:style-name="T97">③ </text:span><text:span text:style-name="T264">朋友也做同樣的事</text:span><text:span text:style-name="T97"> → ④ </text:span><text:span text:style-name="T599">兩端透過第三方交換彼此公網位址</text:span><text:span text:style-name="T97"> → ⑤ </text:span><text:span text:style-name="T599">同時互相發送封包打洞（</text:span><text:span text:style-name="T601">Hole Punching</text:span><text:span text:style-name="T599">）</text:span><text:span text:style-name="T97">。</text:span></text:p>
            <text:p text:style-name="P8"><text:span text:style-name="T228">重要限制：</text:span><text:span text:style-name="T495">STUN </text:span><text:span text:style-name="T479">只對部分 </text:span><text:span text:style-name="T495">NAT </text:span><text:span text:style-name="T479">類型有效</text:span><text:span text:style-name="T97">；若兩端都是 </text:span><text:span text:style-name="T155">Symmetric NAT</text:span><text:span text:style-name="T97">，打洞會失敗，需改用 </text:span><text:span text:style-name="T155">TURN </text:span><text:span text:style-name="T97">伺服器作為中繼轉發。（</text:span><text:span text:style-name="T155">WebRTC </text:span><text:span text:style-name="T97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4" loext:marker-style-name="T67"><text:span text:style-name="T68">方法</text:span><text:span text:style-name="T67"/></text:p>
          </table:table-cell>
          <table:table-cell table:style-name="表格64.A4" office:value-type="string">
            <text:p text:style-name="P4" loext:marker-style-name="T67"><text:span text:style-name="T68">設定方式</text:span><text:span text:style-name="T67"/></text:p>
          </table:table-cell>
          <table:table-cell table:style-name="表格64.A4" office:value-type="string">
            <text:p text:style-name="P4" loext:marker-style-name="T67"><text:span text:style-name="T68">典型場景</text:span><text:span text:style-name="T67"/></text:p>
          </table:table-cell>
          <table:table-cell table:style-name="表格64.A4" office:value-type="string">
            <text:p text:style-name="P4" loext:marker-style-name="T67"><text:span text:style-name="T68">主要限制</text:span><text:span text:style-name="T67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1"><text:span text:style-name="T147">Port Forwarding</text:span><text:span text:style-name="T81"/></text:p>
          </table:table-cell>
          <table:table-cell table:style-name="表格64.A5" office:value-type="string">
            <text:p text:style-name="P29" loext:marker-style-name="T85"><text:span text:style-name="T84">手動設定路由器</text:span><text:span text:style-name="T85"/></text:p>
          </table:table-cell>
          <table:table-cell table:style-name="表格64.A5" office:value-type="string">
            <text:p text:style-name="P29" loext:marker-style-name="T81"><text:span text:style-name="T82">架設網頁／遊戲伺服器</text:span><text:span text:style-name="T81"/></text:p>
          </table:table-cell>
          <table:table-cell table:style-name="表格64.A5" office:value-type="string">
            <text:p text:style-name="P29" loext:marker-style-name="T81"><text:span text:style-name="T82">需要手動維護</text:span><text:span text:style-name="T81"/></text:p>
          </table:table-cell>
        </table:table-row>
        <table:table-row table:style-name="表格64.1">
          <table:table-cell table:style-name="表格64.A6" office:value-type="string">
            <text:p text:style-name="P29" loext:marker-style-name="T81"><text:span text:style-name="T147">UPnP</text:span><text:span text:style-name="T81"/></text:p>
          </table:table-cell>
          <table:table-cell table:style-name="表格64.A6" office:value-type="string">
            <text:p text:style-name="P29" loext:marker-style-name="T85"><text:span text:style-name="T84">應用程式自動設定</text:span><text:span text:style-name="T85"/></text:p>
          </table:table-cell>
          <table:table-cell table:style-name="表格64.A6" office:value-type="string">
            <text:p text:style-name="P29" loext:marker-style-name="T81"><text:span text:style-name="T82">一般遊戲、視訊軟體</text:span><text:span text:style-name="T81"/></text:p>
          </table:table-cell>
          <table:table-cell table:style-name="表格64.A6" office:value-type="string">
            <text:p text:style-name="P29" loext:marker-style-name="T81"><text:span text:style-name="T82">惡意程式可濫用</text:span><text:span text:style-name="T81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1"><text:span text:style-name="T147">STUN</text:span><text:span text:style-name="T81"/></text:p>
          </table:table-cell>
          <table:table-cell table:style-name="表格64.A5" office:value-type="string">
            <text:p text:style-name="P29" loext:marker-style-name="T85"><text:span text:style-name="T84">無需路由器設定</text:span><text:span text:style-name="T85"/></text:p>
          </table:table-cell>
          <table:table-cell table:style-name="表格64.A5" office:value-type="string">
            <text:p text:style-name="P29" loext:marker-style-name="T81"><text:span text:style-name="T147">WebRTC</text:span><text:span text:style-name="T82">、</text:span><text:span text:style-name="T147">P2P </text:span><text:span text:style-name="T82">通話</text:span></text:p>
          </table:table-cell>
          <table:table-cell table:style-name="表格64.A5" office:value-type="string">
            <text:p text:style-name="P29" loext:marker-style-name="T81"><text:span text:style-name="T147">Symmetric NAT </text:span><text:span text:style-name="T82">會失敗</text:span></text:p>
          </table:table-cell>
        </table:table-row>
      </table:table>
      <text:h text:style-name="P11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6"><text:span text:style-name="T196">🎯 <text:s/></text:span><text:span text:style-name="T250">最重要的核心觀念（先記住）</text:span></text:p>
            <text:p text:style-name="P7"><text:span text:style-name="T257">IP </text:span><text:span text:style-name="T251">位址＝</text:span><text:span text:style-name="T97">決定封包的最終目的地（整條路的終點），像信封上的收件地址。</text:span></text:p>
            <text:p text:style-name="P8"><text:span text:style-name="T257">MAC </text:span><text:span text:style-name="T251">位址＝</text:span><text:span text:style-name="T97">決定「下一站」要交給哪台機器，像快遞員每次只看下一站。</text:span></text:p>
            <text:p text:style-name="P8"><text:span text:style-name="T228">關鍵理解：</text:span><text:span text:style-name="T97">封包在傳送途中，</text:span><text:span text:style-name="T155">IP </text:span><text:span text:style-name="T97">不變（始終是 </text:span><text:span text:style-name="T155">Google </text:span><text:span text:style-name="T97">的 </text:span><text:span text:style-name="T155">IP</text:span><text:span text:style-name="T97">），但 </text:span><text:span text:style-name="T155">MAC </text:span><text:span text:style-name="T97">每一跳都會更換。</text:span></text:p>
          </table:table-cell>
        </table:table-row>
      </table:table>
      <text:p text:style-name="P35" loext:marker-style-name="T10"><text:span text:style-name="T12">場景</text:span><text:span text:style-name="T11">：</text:span><text:span text:style-name="T602">你電腦 </text:span><text:span text:style-name="T607">192.168.1.2</text:span><text:span text:style-name="T602">／路由器內網 </text:span><text:span text:style-name="T607">IP 192.168.1.1</text:span><text:span text:style-name="T602">／路由器公網 </text:span><text:span text:style-name="T607">IP 220.x.x.x</text:span><text:span text:style-name="T602">／目標 </text:span><text:span text:style-name="T607">google.com</text:span><text:span text:style-name="T11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" loext:marker-style-name="T73"><text:span text:style-name="T74">步驟</text:span><text:span text:style-name="T73"/></text:p>
            </table:table-cell>
            <table:table-cell table:style-name="表格66.A1" office:value-type="string">
              <text:p text:style-name="P4" loext:marker-style-name="T73"><text:span text:style-name="T74">動作</text:span><text:span text:style-name="T73"/></text:p>
            </table:table-cell>
            <table:table-cell table:style-name="表格66.A1" office:value-type="string">
              <text:p text:style-name="P4" loext:marker-style-name="T73"><text:span text:style-name="T74">使用技術</text:span><text:span text:style-name="T73"/></text:p>
            </table:table-cell>
            <table:table-cell table:style-name="表格66.A1" office:value-type="string">
              <text:p text:style-name="P4" loext:marker-style-name="T73"><text:span text:style-name="T74">關鍵重點</text:span><text:span text:style-name="T73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9" loext:marker-style-name="T126"><text:span text:style-name="T179">① DNS</text:span><text:span text:style-name="T126"/></text:p>
          </table:table-cell>
          <table:table-cell table:style-name="表格66.A2" office:value-type="string">
            <text:p text:style-name="P29" loext:marker-style-name="T126"><text:span text:style-name="T179">google.com → 142.250.xxx.xxx(</text:span><text:span text:style-name="T192">Google </text:span><text:span text:style-name="T143">的 </text:span><text:span text:style-name="T192">IP</text:span><text:span text:style-name="T179">)</text:span></text:p>
            <text:p text:style-name="P29" loext:marker-style-name="T126"><text:span text:style-name="T179">(</text:span><text:span text:style-name="T127">電腦必須知道目的地在哪</text:span><text:span text:style-name="T179">)</text:span></text:p>
          </table:table-cell>
          <table:table-cell table:style-name="表格66.A2" office:value-type="string">
            <text:p text:style-name="P29" loext:marker-style-name="T126"><text:span text:style-name="T179">DNS</text:span><text:span text:style-name="T126"/></text:p>
          </table:table-cell>
          <table:table-cell table:style-name="表格66.A2" office:value-type="string">
            <text:p text:style-name="P29" loext:marker-style-name="T126"><text:span text:style-name="T127">網路只認 </text:span><text:span text:style-name="T179">IP</text:span><text:span text:style-name="T127">，不認名字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26"><text:span text:style-name="T179">② ARP</text:span><text:span text:style-name="T126"/></text:p>
          </table:table-cell>
          <table:table-cell table:style-name="表格66.A3" office:value-type="string">
            <text:p text:style-name="P29" loext:marker-style-name="T126"><text:span text:style-name="T127">找路由器（</text:span><text:span text:style-name="T179">192.168.1.1</text:span><text:span text:style-name="T127">）的 </text:span><text:span text:style-name="T179">MAC(</text:span><text:span text:style-name="T380">發現 </text:span><text:span text:style-name="T404">Google </text:span><text:span text:style-name="T538">不在同一個區網</text:span><text:span text:style-name="T380">，必須交給路由器幫忙送</text:span><text:span text:style-name="T179">)(</text:span><text:span text:style-name="T563">查詢路由器的 </text:span><text:span text:style-name="T574">MAC</text:span><text:span text:style-name="T563">，下一站是路由器</text:span><text:span text:style-name="T179">)</text:span></text:p>
          </table:table-cell>
          <table:table-cell table:style-name="表格66.A3" office:value-type="string">
            <text:p text:style-name="P29" loext:marker-style-name="T126"><text:span text:style-name="T179">ARP</text:span><text:span text:style-name="T126"/></text:p>
          </table:table-cell>
          <table:table-cell table:style-name="表格66.A3" office:value-type="string">
            <text:p text:style-name="P29" loext:marker-style-name="T126"><text:span text:style-name="T127">找的是「路由器」，不是 </text:span><text:span text:style-name="T179">Google</text:span><text:span text:style-name="T127">！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26"><text:span text:style-name="T179">③ </text:span><text:span text:style-name="T464">送封包</text:span></text:p>
          </table:table-cell>
          <table:table-cell table:style-name="表格66.A2" office:value-type="string">
            <text:p text:style-name="P29" loext:marker-style-name="T126"><text:span text:style-name="T179">IP=Google</text:span><text:span text:style-name="T127">；</text:span><text:span text:style-name="T179">MAC=</text:span><text:span text:style-name="T127">路由器</text:span><text:span text:style-name="T179">(</text:span><text:span text:style-name="T324">IP </text:span><text:span text:style-name="T276">記</text:span><text:soft-page-break/><text:span text:style-name="T276">錄最終目的地；</text:span><text:span text:style-name="T324">MAC </text:span><text:span text:style-name="T276">記錄下一站</text:span><text:span text:style-name="T179">)</text:span></text:p>
          </table:table-cell>
          <table:table-cell table:style-name="表格66.A2" office:value-type="string">
            <text:p text:style-name="P29" loext:marker-style-name="T126"><text:span text:style-name="T179">L2 </text:span><text:span text:style-name="T127">傳輸</text:span></text:p>
          </table:table-cell>
          <table:table-cell table:style-name="表格66.A2" office:value-type="string">
            <text:p text:style-name="P29" loext:marker-style-name="T126"><text:span text:style-name="T179">IP=</text:span><text:span text:style-name="T127">終點；</text:span><text:span text:style-name="T179">MAC=</text:span><text:span text:style-name="T127">下一站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26"><text:span text:style-name="T179">④ NAT </text:span><text:span text:style-name="T127">去程</text:span></text:p>
          </table:table-cell>
          <table:table-cell table:style-name="表格66.A3" office:value-type="string">
            <text:p text:style-name="P29" loext:marker-style-name="T126"><text:span text:style-name="T500">192.168.1.2 → 220.x.x.x</text:span><text:span text:style-name="T179">(</text:span><text:span text:style-name="T565">路由器收到後往 </text:span><text:span text:style-name="T575">Internet </text:span><text:span text:style-name="T565">送</text:span><text:span text:style-name="T127">；路由器負責跨網路傳遞</text:span><text:span text:style-name="T179">)(</text:span><text:span text:style-name="T565">私有 </text:span><text:span text:style-name="T575">IP </text:span><text:span text:style-name="T565">換成公網 </text:span><text:span text:style-name="T575">IP</text:span><text:span text:style-name="T565">，因</text:span><text:span text:style-name="T575">Internet </text:span><text:span text:style-name="T565">不認私有 </text:span><text:span text:style-name="T575">IP</text:span><text:span text:style-name="T179">)</text:span></text:p>
          </table:table-cell>
          <table:table-cell table:style-name="表格66.A3" office:value-type="string">
            <text:p text:style-name="P29" loext:marker-style-name="T126"><text:span text:style-name="T179">NAT</text:span><text:span text:style-name="T126"/></text:p>
          </table:table-cell>
          <table:table-cell table:style-name="表格66.A3" office:value-type="string">
            <text:p text:style-name="P29" loext:marker-style-name="T126"><text:span text:style-name="T127">換身份才能上 </text:span><text:span text:style-name="T179">Internet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26"><text:span text:style-name="T179">⑤ </text:span><text:span text:style-name="T127">傳到 </text:span><text:span text:style-name="T179">Google</text:span></text:p>
          </table:table-cell>
          <table:table-cell table:style-name="表格66.A2" office:value-type="string">
            <text:p text:style-name="P29" loext:marker-style-name="T126"><text:span text:style-name="T356">封包抵達目的地</text:span><text:span text:style-name="T179">(</text:span><text:span text:style-name="T597">Google </text:span><text:span text:style-name="T593">看到公網 </text:span><text:span text:style-name="T597">IP</text:span><text:span text:style-name="T179">)</text:span></text:p>
          </table:table-cell>
          <table:table-cell table:style-name="表格66.A2" office:value-type="string">
            <text:p text:style-name="P29" loext:marker-style-name="T126"><text:span text:style-name="T179">Internet</text:span><text:span text:style-name="T126"/></text:p>
          </table:table-cell>
          <table:table-cell table:style-name="表格66.A2" office:value-type="string">
            <text:p text:style-name="P29" loext:marker-style-name="T126"><text:span text:style-name="T179">Google </text:span><text:span text:style-name="T127">只看到公網 </text:span><text:span text:style-name="T179">IP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26"><text:span text:style-name="T179">⑥ Google </text:span><text:span text:style-name="T127">回應</text:span></text:p>
          </table:table-cell>
          <table:table-cell table:style-name="表格66.A3" office:value-type="string">
            <text:p text:style-name="P29" loext:marker-style-name="T126"><text:span text:style-name="T465">回傳給 </text:span><text:span text:style-name="T501">220.x.x.x</text:span><text:span text:style-name="T179">(</text:span><text:span text:style-name="T600">回到路由器再回到你電腦</text:span><text:span text:style-name="T179">)</text:span></text:p>
          </table:table-cell>
          <table:table-cell table:style-name="表格66.A3" office:value-type="string">
            <text:p text:style-name="P29" loext:marker-style-name="T126"><text:span text:style-name="T179">Internet</text:span><text:span text:style-name="T126"/></text:p>
          </table:table-cell>
          <table:table-cell table:style-name="表格66.A3" office:value-type="string">
            <text:p text:style-name="P29" loext:marker-style-name="T126"><text:span text:style-name="T127">路由器收到回應</text:span><text:span text:style-name="T126"/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26"><text:span text:style-name="T179">⑦ NAT </text:span><text:span text:style-name="T127">回程</text:span></text:p>
          </table:table-cell>
          <table:table-cell table:style-name="表格66.A2" office:value-type="string">
            <text:p text:style-name="P29" loext:marker-style-name="T126"><text:span text:style-name="T500">220.x.x.x → 192.168.1.2</text:span><text:span text:style-name="T179">(</text:span><text:span text:style-name="T404">NAT </text:span><text:span text:style-name="T380">依記錄轉回正確主機</text:span><text:span text:style-name="T179">)</text:span></text:p>
          </table:table-cell>
          <table:table-cell table:style-name="表格66.A2" office:value-type="string">
            <text:p text:style-name="P29" loext:marker-style-name="T126"><text:span text:style-name="T179">NAT</text:span><text:span text:style-name="T126"/></text:p>
          </table:table-cell>
          <table:table-cell table:style-name="表格66.A2" office:value-type="string">
            <text:p text:style-name="P29" loext:marker-style-name="T126"><text:span text:style-name="T127">查記錄，換回真正目標</text:span><text:span text:style-name="T126"/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26"><text:span text:style-name="T179">⑧ </text:span><text:span text:style-name="T127">收到網頁</text:span></text:p>
          </table:table-cell>
          <table:table-cell table:style-name="表格66.A3" office:value-type="string">
            <text:p text:style-name="P29" loext:marker-style-name="T126"><text:span text:style-name="T127">瀏覽器顯示頁面</text:span><text:span text:style-name="T126"/></text:p>
          </table:table-cell>
          <table:table-cell table:style-name="表格66.A3" office:value-type="string">
            <text:p text:style-name="P29" loext:marker-style-name="T126"><text:span text:style-name="T179">—</text:span><text:span text:style-name="T126"/></text:p>
          </table:table-cell>
          <table:table-cell table:style-name="表格66.A3" office:value-type="string">
            <text:p text:style-name="P29" loext:marker-style-name="T126"><text:span text:style-name="T127">一次完整通信結束</text:span><text:span text:style-name="T12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6"><text:span text:style-name="T196">💣 <text:s/></text:span><text:span text:style-name="T218">三個最容易搞錯的地方（考試地雷）</text:span></text:p>
            <text:p text:style-name="P7"><text:span text:style-name="T235">✗ </text:span><text:span text:style-name="T229">以為 </text:span><text:span text:style-name="T235">ARP </text:span><text:span text:style-name="T229">是找 </text:span><text:span text:style-name="T235">Google </text:span><text:span text:style-name="T229">的 </text:span><text:span text:style-name="T235">MAC</text:span><text:span text:style-name="T228">　→　</text:span><text:span text:style-name="T583">✓ </text:span><text:span text:style-name="T585">ARP </text:span><text:span text:style-name="T583">找的是「路由器」的 </text:span><text:span text:style-name="T585">MAC</text:span><text:span text:style-name="T583">！</text:span><text:span text:style-name="T97">因為 </text:span><text:span text:style-name="T155">ARP </text:span><text:span text:style-name="T97">只能在同一個 </text:span><text:span text:style-name="T155">LAN </text:span><text:span text:style-name="T97">內使用。</text:span></text:p>
            <text:p text:style-name="P8"><text:span text:style-name="T235">✗ </text:span><text:span text:style-name="T229">以為封包直接送到 </text:span><text:span text:style-name="T235">Google</text:span><text:span text:style-name="T228">　→　</text:span><text:span text:style-name="T583">✓ 封包先送給路由器，路由器再轉到 </text:span><text:span text:style-name="T585">Internet</text:span><text:span text:style-name="T97">。</text:span></text:p>
            <text:p text:style-name="P8"><text:span text:style-name="T235">✗ </text:span><text:span text:style-name="T229">以為 </text:span><text:span text:style-name="T235">IP </text:span><text:span text:style-name="T229">在傳輸過程中一直不變</text:span><text:span text:style-name="T228">　→　</text:span><text:span text:style-name="T583">✓ </text:span><text:span text:style-name="T585">NAT </text:span><text:span text:style-name="T583">會在去程改掉來源 </text:span><text:span text:style-name="T585">IP</text:span><text:span text:style-name="T583">，回程再改回去</text:span><text:span text:style-name="T97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6"><text:span text:style-name="T196">📝 <text:s/></text:span><text:span text:style-name="T240">考試標準答案（直接背）</text:span></text:p>
            <text:p text:style-name="P7" loext:marker-style-name="T98"><text:span text:style-name="T112">使用者輸入網址後</text:span><text:span text:style-name="T97">，</text:span><text:span text:style-name="T433">先透過 </text:span><text:span text:style-name="T446">DNS </text:span><text:span text:style-name="T433">將網域名稱解析為 </text:span><text:span text:style-name="T446">IP</text:span><text:span text:style-name="T97">；</text:span><text:span text:style-name="T293">接著主機利用 </text:span><text:span text:style-name="T317">ARP </text:span><text:span text:style-name="T293">取得路由器（預設閘道）的 </text:span><text:span text:style-name="T317">MAC</text:span><text:span text:style-name="T97">，</text:span><text:span text:style-name="T293">將封包傳送至路由器</text:span><text:span text:style-name="T97">；</text:span><text:span text:style-name="T516">路由器透過 </text:span><text:span text:style-name="T511">NAT </text:span><text:span text:style-name="T516">將私有 </text:span><text:span text:style-name="T511">IP </text:span><text:span text:style-name="T516">轉換為公網 </text:span><text:span text:style-name="T511">IP </text:span><text:span text:style-name="T516">後送往 </text:span><text:span text:style-name="T511">Internet</text:span><text:span text:style-name="T97">；</text:span><text:span text:style-name="T264">目的主機回應後，路由器再透過 </text:span><text:span text:style-name="T265">NAT </text:span><text:span text:style-name="T264">將封包轉回原內部主機</text:span><text:span text:style-name="T97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4"/>
            </table:table-cell>
            <table:table-cell table:style-name="表格67.A1" office:value-type="string">
              <text:p text:style-name="P4" loext:marker-style-name="T67"><text:span text:style-name="T77">ARP</text:span><text:span text:style-name="T67"/></text:p>
            </table:table-cell>
            <table:table-cell table:style-name="表格67.A1" office:value-type="string">
              <text:p text:style-name="P4" loext:marker-style-name="T67"><text:span text:style-name="T77">NAT</text:span><text:span text:style-name="T67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9" loext:marker-style-name="T81"><text:span text:style-name="T82">目的</text:span><text:span text:style-name="T81"/></text:p>
          </table:table-cell>
          <table:table-cell table:style-name="表格67.A2" office:value-type="string">
            <text:p text:style-name="P29" loext:marker-style-name="T377"><text:span text:style-name="T378">用 </text:span><text:span text:style-name="T402">IP </text:span><text:span text:style-name="T378">找 </text:span><text:span text:style-name="T402">MAC</text:span></text:p>
          </table:table-cell>
          <table:table-cell table:style-name="表格67.A2" office:value-type="string">
            <text:p text:style-name="P29" loext:marker-style-name="T613"><text:span text:style-name="T614">私有 </text:span><text:span text:style-name="T615">IP </text:span><text:span text:style-name="T614">轉成公網 </text:span><text:span text:style-name="T615">IP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1"><text:span text:style-name="T82">使用範圍</text:span><text:span text:style-name="T81"/></text:p>
          </table:table-cell>
          <table:table-cell table:style-name="表格67.A3" office:value-type="string">
            <text:p text:style-name="P29" loext:marker-style-name="T89"><text:span text:style-name="T88">區域網路（</text:span><text:span text:style-name="T149">LAN</text:span><text:span text:style-name="T88">）內</text:span></text:p>
          </table:table-cell>
          <table:table-cell table:style-name="表格67.A3" office:value-type="string">
            <text:p text:style-name="P29" loext:marker-style-name="T85"><text:span text:style-name="T84">內網與 </text:span><text:span text:style-name="T151">Internet </text:span><text:span text:style-name="T84">之間</text:span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1"><text:span text:style-name="T82">運作層級</text:span><text:span text:style-name="T81"/></text:p>
          </table:table-cell>
          <table:table-cell table:style-name="表格67.A2" office:value-type="string">
            <text:p text:style-name="P29" loext:marker-style-name="T455"><text:span text:style-name="T451">L2 / L3 </text:span><text:span text:style-name="T456">交界</text:span></text:p>
          </table:table-cell>
          <table:table-cell table:style-name="表格67.A2" office:value-type="string">
            <text:p text:style-name="P29" loext:marker-style-name="T457"><text:span text:style-name="T452">L3</text:span><text:span text:style-name="T458">（網路層）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1"><text:span text:style-name="T82">誰執行</text:span><text:span text:style-name="T81"/></text:p>
          </table:table-cell>
          <table:table-cell table:style-name="表格67.A3" office:value-type="string">
            <text:p text:style-name="P29" loext:marker-style-name="T81"><text:span text:style-name="T82">端點裝置（電腦）</text:span><text:span text:style-name="T81"/></text:p>
          </table:table-cell>
          <table:table-cell table:style-name="表格67.A3" office:value-type="string">
            <text:p text:style-name="P29" loext:marker-style-name="T81"><text:span text:style-name="T82">路由器</text:span><text:span text:style-name="T81"/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1"><text:span text:style-name="T82">主要用途</text:span><text:span text:style-name="T81"/></text:p>
          </table:table-cell>
          <table:table-cell table:style-name="表格67.A2" office:value-type="string">
            <text:p text:style-name="P29" loext:marker-style-name="T81"><text:span text:style-name="T82">在區網內傳送封包</text:span><text:span text:style-name="T81"/></text:p>
          </table:table-cell>
          <table:table-cell table:style-name="表格67.A2" office:value-type="string">
            <text:p text:style-name="P29" loext:marker-style-name="T81"><text:span text:style-name="T82">讓內部主機能夠上網</text:span><text:span text:style-name="T81"/></text:p>
          </table:table-cell>
        </table:table-row>
      </table:table>
      <text:h text:style-name="P17" text:outline-level="1" loext:marker-style-name="T69"><text:span text:style-name="T70">第 五 篇　</text:span><text:span text:style-name="T69">TCP </text:span><text:span text:style-name="T70">傳輸控制深入：握手 </text:span><text:span text:style-name="T69">· SYN Flood · </text:span><text:span text:style-name="T70">視窗 </text:span><text:span text:style-name="T69">· </text:span><text:span text:style-name="T70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6"><text:span text:style-name="T196">🚦 <text:s/></text:span><text:span text:style-name="T50">本篇重點</text:span></text:p>
            <text:p text:style-name="P7" loext:marker-style-name="T98"><text:span text:style-name="T97">網路的本質是把資料從 </text:span><text:span text:style-name="T155">A </text:span><text:span text:style-name="T97">電腦送到 </text:span><text:span text:style-name="T155">B </text:span><text:span text:style-name="T97">電腦，但中間有四個麻煩，</text:span><text:span text:style-name="T155">TCP </text:span><text:span text:style-name="T97">各自有對策。</text:span></text:p>
          </table:table-cell>
        </table:table-row>
      </table:table>
      <text:h text:style-name="P11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4" loext:marker-style-name="T67"><text:span text:style-name="T68">問題</text:span><text:span text:style-name="T67"/></text:p>
            </table:table-cell>
            <table:table-cell table:style-name="表格69.A1" office:value-type="string">
              <text:p text:style-name="P4" loext:marker-style-name="T67"><text:span text:style-name="T68">說明</text:span><text:span text:style-name="T67"/></text:p>
            </table:table-cell>
            <table:table-cell table:style-name="表格69.A1" office:value-type="string">
              <text:p text:style-name="P4" loext:marker-style-name="T67"><text:span text:style-name="T77">TCP </text:span><text:span text:style-name="T68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9" loext:marker-style-name="T89"><text:span text:style-name="T88">資料可能丟失</text:span><text:span text:style-name="T89"/></text:p>
          </table:table-cell>
          <table:table-cell table:style-name="表格69.A2" office:value-type="string">
            <text:p text:style-name="P29" loext:marker-style-name="T81"><text:span text:style-name="T82">封包在網路中消失</text:span><text:span text:style-name="T81"/></text:p>
          </table:table-cell>
          <table:table-cell table:style-name="表格69.A2" office:value-type="string">
            <text:p text:style-name="P29" loext:marker-style-name="T81"><text:span text:style-name="T84">重傳</text:span><text:span text:style-name="T82">機制（</text:span><text:span text:style-name="T147">Retransmission</text:span><text:span text:style-name="T82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89"><text:span text:style-name="T88">順序可能亂掉</text:span><text:span text:style-name="T89"/></text:p>
          </table:table-cell>
          <table:table-cell table:style-name="表格69.A3" office:value-type="string">
            <text:p text:style-name="P29" loext:marker-style-name="T81"><text:span text:style-name="T82">封包走不同路徑先後到達</text:span><text:span text:style-name="T81"/></text:p>
          </table:table-cell>
          <table:table-cell table:style-name="表格69.A3" office:value-type="string">
            <text:p text:style-name="P29" loext:marker-style-name="T81"><text:span text:style-name="T84">序號</text:span><text:span text:style-name="T82">機制（</text:span><text:span text:style-name="T147">Sequence Number</text:span><text:span text:style-name="T82">）</text:span></text:p>
          </table:table-cell>
        </table:table-row>
        <table:table-row table:style-name="表格69.1">
          <table:table-cell table:style-name="表格69.A2" office:value-type="string">
            <text:p text:style-name="P29" loext:marker-style-name="T89"><text:span text:style-name="T88">對方來不及收</text:span><text:span text:style-name="T89"/></text:p>
          </table:table-cell>
          <table:table-cell table:style-name="表格69.A2" office:value-type="string">
            <text:p text:style-name="P29" loext:marker-style-name="T81"><text:span text:style-name="T82">接收端 </text:span><text:span text:style-name="T147">buffer </text:span><text:span text:style-name="T82">可能爆掉</text:span></text:p>
          </table:table-cell>
          <table:table-cell table:style-name="表格69.A2" office:value-type="string">
            <text:p text:style-name="P29" loext:marker-style-name="T81"><text:span text:style-name="T84">流量</text:span><text:span text:style-name="T82">控制（</text:span><text:span text:style-name="T147">Flow Control / rwnd</text:span><text:span text:style-name="T82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89"><text:span text:style-name="T88">網路可能塞車</text:span><text:span text:style-name="T89"/></text:p>
          </table:table-cell>
          <table:table-cell table:style-name="表格69.A3" office:value-type="string">
            <text:p text:style-name="P29" loext:marker-style-name="T81"><text:span text:style-name="T82">路由器排隊太長</text:span><text:span text:style-name="T81"/></text:p>
          </table:table-cell>
          <table:table-cell table:style-name="表格69.A3" office:value-type="string">
            <text:p text:style-name="P29" loext:marker-style-name="T81"><text:span text:style-name="T84">擁塞</text:span><text:span text:style-name="T82">控制（</text:span><text:span text:style-name="T147">Congestion Control / cwnd</text:span><text:span text:style-name="T82">）</text:span></text:p>
          </table:table-cell>
        </table:table-row>
      </table:table>
      <text:h text:style-name="P11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4" loext:marker-style-name="T67"><text:span text:style-name="T68">特性</text:span><text:span text:style-name="T67"/></text:p>
            </table:table-cell>
            <table:table-cell table:style-name="表格70.A1" office:value-type="string">
              <text:p text:style-name="P4" loext:marker-style-name="T67"><text:span text:style-name="T77">TCP</text:span><text:span text:style-name="T68">（可靠模式）</text:span></text:p>
            </table:table-cell>
            <table:table-cell table:style-name="表格70.A1" office:value-type="string">
              <text:p text:style-name="P4" loext:marker-style-name="T67"><text:span text:style-name="T77">UDP</text:span><text:span text:style-name="T68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9" loext:marker-style-name="T81"><text:span text:style-name="T82">連線方式</text:span><text:span text:style-name="T81"/></text:p>
          </table:table-cell>
          <table:table-cell table:style-name="表格70.A2" office:value-type="string">
            <text:p text:style-name="P29" loext:marker-style-name="T376"><text:span text:style-name="T375">需要先建立連線</text:span><text:span text:style-name="T376"/></text:p>
          </table:table-cell>
          <table:table-cell table:style-name="表格70.A2" office:value-type="string">
            <text:p text:style-name="P29" loext:marker-style-name="T273"><text:span text:style-name="T272">無連線，直接送</text:span><text:span text:style-name="T273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1"><text:span text:style-name="T82">可靠性</text:span><text:span text:style-name="T81"/></text:p>
          </table:table-cell>
          <table:table-cell table:style-name="表格70.A3" office:value-type="string">
            <text:p text:style-name="P29" loext:marker-style-name="T81"><text:span text:style-name="T82">保證送達（會重傳）</text:span><text:span text:style-name="T81"/></text:p>
          </table:table-cell>
          <table:table-cell table:style-name="表格70.A3" office:value-type="string">
            <text:p text:style-name="P29" loext:marker-style-name="T81"><text:span text:style-name="T82">不保證送達</text:span><text:span text:style-name="T81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1"><text:span text:style-name="T82">順序</text:span><text:span text:style-name="T81"/></text:p>
          </table:table-cell>
          <table:table-cell table:style-name="表格70.A2" office:value-type="string">
            <text:p text:style-name="P29" loext:marker-style-name="T81"><text:span text:style-name="T82">保證順序正確</text:span><text:span text:style-name="T81"/></text:p>
          </table:table-cell>
          <table:table-cell table:style-name="表格70.A2" office:value-type="string">
            <text:p text:style-name="P29" loext:marker-style-name="T81"><text:span text:style-name="T82">不保證順序</text:span><text:span text:style-name="T81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1"><text:span text:style-name="T82">速度</text:span><text:span text:style-name="T81"/></text:p>
          </table:table-cell>
          <table:table-cell table:style-name="表格70.A3" office:value-type="string">
            <text:p text:style-name="P29" loext:marker-style-name="T81"><text:span text:style-name="T82">較慢（有控制機制）</text:span><text:span text:style-name="T81"/></text:p>
          </table:table-cell>
          <table:table-cell table:style-name="表格70.A3" office:value-type="string">
            <text:p text:style-name="P29" loext:marker-style-name="T81"><text:span text:style-name="T82">較快（無額外開銷）</text:span><text:span text:style-name="T81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1"><text:span text:style-name="T82">適合場景</text:span><text:span text:style-name="T81"/></text:p>
          </table:table-cell>
          <table:table-cell table:style-name="表格70.A2" office:value-type="string">
            <text:p text:style-name="P29" loext:marker-style-name="T85"><text:span text:style-name="T84">網頁、檔案傳輸、</text:span><text:span text:style-name="T151">Email</text:span></text:p>
          </table:table-cell>
          <table:table-cell table:style-name="表格70.A2" office:value-type="string">
            <text:p text:style-name="P29" loext:marker-style-name="T81"><text:span text:style-name="T84">直播、遊戲</text:span><text:span text:style-name="T82">、</text:span><text:span text:style-name="T147">DNS </text:span><text:span text:style-name="T82">查詢</text:span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1"><text:span text:style-name="T82">比喻</text:span><text:span text:style-name="T81"/></text:p>
          </table:table-cell>
          <table:table-cell table:style-name="表格70.A3" office:value-type="string">
            <text:p text:style-name="P29" loext:marker-style-name="T89"><text:span text:style-name="T88">專業物流（簽收確認）</text:span><text:span text:style-name="T89"/></text:p>
          </table:table-cell>
          <table:table-cell table:style-name="表格70.A3" office:value-type="string">
            <text:p text:style-name="P29" loext:marker-style-name="T89"><text:span text:style-name="T88">亂丟紙飛機</text:span><text:span text:style-name="T89"/></text:p>
          </table:table-cell>
        </table:table-row>
      </table:table>
      <text:h text:style-name="P11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"><text:span text:style-name="T196">🤝 <text:s/></text:span><text:span text:style-name="T50">握手流程</text:span></text:p>
            <text:p text:style-name="P7"><text:span text:style-name="T63">① Client → Server</text:span><text:span text:style-name="T55">：</text:span><text:span text:style-name="T62">SYN</text:span><text:span text:style-name="T55">　</text:span><text:span text:style-name="T97">「我可以傳資料給你嗎？我準備好了。」（</text:span><text:span text:style-name="T155">Synchronize </text:span><text:span text:style-name="T97">同步請求）</text:span></text:p>
            <text:p text:style-name="P8"><text:span text:style-name="T63">② Server → Client</text:span><text:span text:style-name="T55">：</text:span><text:span text:style-name="T62">SYN + ACK</text:span><text:span text:style-name="T55">　</text:span><text:span text:style-name="T97">「可以！我收到你的請求了，我也準備好了。」（確認＋同步）</text:span></text:p>
            <text:p text:style-name="P8"><text:span text:style-name="T63">③ Client → Server</text:span><text:span text:style-name="T55">：</text:span><text:span text:style-name="T62">ACK</text:span><text:span text:style-name="T55">　</text:span><text:span text:style-name="T97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6"><text:span text:style-name="T196">🎯 <text:s/></text:span><text:span text:style-name="T250">三次握手真正目的（考試必考）</text:span></text:p>
            <text:p text:style-name="P7" loext:marker-style-name="T98"><text:span text:style-name="T97">確認雙向都能傳資料（</text:span><text:span text:style-name="T155">Client → Server </text:span><text:span text:style-name="T97">和 </text:span><text:span text:style-name="T155">Server → Client </text:span><text:span text:style-name="T97">各自驗證）。</text:span></text:p>
            <text:p text:style-name="P8" loext:marker-style-name="T98"><text:span text:style-name="T616">避免「</text:span><text:span text:style-name="T517">舊封包誤觸發新連線</text:span><text:span text:style-name="T616">」</text:span><text:span text:style-name="T97">：若少一次確認，</text:span><text:span text:style-name="T291">延遲的舊 </text:span><text:span text:style-name="T315">SYN </text:span><text:span text:style-name="T291">封包可能讓 </text:span><text:span text:style-name="T315">Server </text:span><text:span text:style-name="T291">誤以為要建立新連線</text:span><text:span text:style-name="T97">。</text:span></text:p>
          </table:table-cell>
        </table:table-row>
      </table:table>
      <text:h text:style-name="P11" text:outline-level="2" loext:marker-style-name="T27"><text:span text:style-name="T28">四、攻擊：</text:span><text:span text:style-name="T27">SYN Flood</text:span></text:h>
      <text:p text:style-name="P35" loext:marker-style-name="T98"><text:span text:style-name="T97">攻擊原理：攻擊者大量發送 </text:span><text:span text:style-name="T155">SYN </text:span><text:span text:style-name="T97">封包，但</text:span><text:span text:style-name="T354">故意不完成第三次握手（</text:span><text:span text:style-name="T286">不回 </text:span><text:span text:style-name="T308">ACK</text:span><text:span text:style-name="T354">）</text:span><text:span text:style-name="T97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6" loext:marker-style-name="T67"><text:span text:style-name="T68">步驟</text:span><text:span text:style-name="T67"/></text:p>
            </table:table-cell>
            <table:table-cell table:style-name="表格72.A1" office:value-type="string">
              <text:p text:style-name="P26" loext:marker-style-name="T67"><text:span text:style-name="T68">發生什麼</text:span><text:span text:style-name="T67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9" loext:marker-style-name="T81"><text:span text:style-name="T147">1</text:span><text:span text:style-name="T81"/></text:p>
          </table:table-cell>
          <table:table-cell table:style-name="表格72.A2" office:value-type="string">
            <text:p text:style-name="P29" loext:marker-style-name="T81"><text:span text:style-name="T82">攻擊者</text:span><text:span text:style-name="T88">送出大量 </text:span><text:span text:style-name="T149">SYN</text:span><text:span text:style-name="T82">，每個都</text:span><text:span text:style-name="T84">假冒不同來源 </text:span><text:span text:style-name="T151">IP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1"><text:span text:style-name="T147">2</text:span><text:span text:style-name="T81"/></text:p>
          </table:table-cell>
          <table:table-cell table:style-name="表格72.A3" office:value-type="string">
            <text:p text:style-name="P29" loext:marker-style-name="T81"><text:span text:style-name="T577">Server </text:span><text:span text:style-name="T567">建立「半連線（</text:span><text:span text:style-name="T577">Half-open Connection</text:span><text:span text:style-name="T567">）」</text:span><text:span text:style-name="T82">，</text:span><text:span text:style-name="T473">每個都佔記憶體等待 </text:span><text:span text:style-name="T490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9" loext:marker-style-name="T81"><text:span text:style-name="T147">3</text:span><text:span text:style-name="T81"/></text:p>
          </table:table-cell>
          <table:table-cell table:style-name="表格72.A2" office:value-type="string">
            <text:p text:style-name="P29" loext:marker-style-name="T81"><text:span text:style-name="T595">攻擊者永遠不回 </text:span><text:span text:style-name="T598">ACK</text:span><text:span text:style-name="T82">，</text:span><text:span text:style-name="T147">Server </text:span><text:span text:style-name="T82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1"><text:span text:style-name="T147">4</text:span><text:span text:style-name="T81"/></text:p>
          </table:table-cell>
          <table:table-cell table:style-name="表格72.A3" office:value-type="string">
            <text:p text:style-name="P29" loext:marker-style-name="T81"><text:span text:style-name="T88">正常用戶連線失敗</text:span><text:span text:style-name="T82">，</text:span><text:span text:style-name="T147">Server </text:span><text:span text:style-name="T82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6"><text:span text:style-name="T196">⚠️ <text:s/></text:span><text:span text:style-name="T218">本質</text:span></text:p>
            <text:p text:style-name="P7" loext:marker-style-name="T98"><text:span text:style-name="T97">這是一種 </text:span><text:span text:style-name="T167">DoS</text:span><text:span text:style-name="T112">（拒絕服務）攻擊</text:span><text:span text:style-name="T97">，利用 </text:span><text:span text:style-name="T155">TCP </text:span><text:span text:style-name="T97">三次握手機制的不對稱性。</text:span></text:p>
          </table:table-cell>
          <table:covered-table-cell/>
        </table:table-row>
      </table:table>
      <text:h text:style-name="P11" text:outline-level="2" loext:marker-style-name="T27"><text:span text:style-name="T28">五、傳送速度的兩個限制：</text:span><text:span text:style-name="T487">rwnd</text:span><text:span text:style-name="T27"> </text:span><text:span text:style-name="T28">與 </text:span><text:span text:style-name="T487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6" loext:marker-style-name="T67"><text:span text:style-name="T77">rwnd</text:span><text:span text:style-name="T68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6" loext:marker-style-name="T67"><text:span text:style-name="T77">cwnd</text:span><text:span text:style-name="T68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9" loext:marker-style-name="T81"><text:span text:style-name="T82">接收端的限制。</text:span><text:span text:style-name="T568">對方 </text:span><text:span text:style-name="T578">buffer</text:span><text:span text:style-name="T568">（暫存區）還剩多少空間</text:span><text:span text:style-name="T82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9" loext:marker-style-name="T81"><text:span text:style-name="T82">網路的限制。發送端根據網路狀況自行估計，</text:span><text:span text:style-name="T375">目前網路最多能承受多少資料量</text:span><text:span text:style-name="T82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7"><text:span text:style-name="T255">實際傳送量 ＝ </text:span><text:span text:style-name="T259">min(rwnd, cwnd)</text:span><text:span text:style-name="T251">　</text:span><text:span text:style-name="T110">取兩者最小值</text:span><text:span text:style-name="T97">。</text:span><text:span text:style-name="T119">對方吃不下就看 </text:span><text:span text:style-name="T173">rwnd</text:span><text:span text:style-name="T119">；網路塞就看 </text:span><text:span text:style-name="T173">cwnd</text:span><text:span text:style-name="T97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6" loext:marker-style-name="T67"><text:span text:style-name="T68">情境</text:span><text:span text:style-name="T67"/></text:p>
          </table:table-cell>
          <table:table-cell table:style-name="表格73.A1" office:value-type="string">
            <text:p text:style-name="P26" loext:marker-style-name="T67"><text:span text:style-name="T77">cwnd</text:span><text:span text:style-name="T67"/></text:p>
          </table:table-cell>
          <table:table-cell table:style-name="表格73.A1" table:number-columns-spanned="2" office:value-type="string">
            <text:p text:style-name="P26" loext:marker-style-name="T67"><text:span text:style-name="T77">rwnd</text:span><text:span text:style-name="T67"/></text:p>
          </table:table-cell>
          <table:covered-table-cell/>
          <table:table-cell table:style-name="表格73.A1" office:value-type="string">
            <text:p text:style-name="P26" loext:marker-style-name="T67"><text:span text:style-name="T68">實際傳送量</text:span><text:span text:style-name="T67"/></text:p>
          </table:table-cell>
          <table:table-cell table:style-name="表格73.A1" office:value-type="string">
            <text:p text:style-name="P26" loext:marker-style-name="T67"><text:span text:style-name="T68">瓶頸原因</text:span><text:span text:style-name="T67"/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1"><text:span text:style-name="T82">對方 </text:span><text:span text:style-name="T147">buffer </text:span><text:span text:style-name="T82">快滿了</text:span></text:p>
          </table:table-cell>
          <table:table-cell table:style-name="表格73.A2" office:value-type="string">
            <text:p text:style-name="P29" loext:marker-style-name="T81"><text:span text:style-name="T147">10</text:span><text:span text:style-name="T81"/></text:p>
          </table:table-cell>
          <table:table-cell table:style-name="表格73.A2" table:number-columns-spanned="2" office:value-type="string">
            <text:p text:style-name="P29" loext:marker-style-name="T81"><text:span text:style-name="T147">3</text:span><text:span text:style-name="T81"/></text:p>
          </table:table-cell>
          <table:covered-table-cell/>
          <table:table-cell table:style-name="表格73.A2" office:value-type="string">
            <text:p text:style-name="P29" loext:marker-style-name="T81"><text:span text:style-name="T147">3</text:span><text:span text:style-name="T81"/></text:p>
          </table:table-cell>
          <table:table-cell table:style-name="表格73.A2" office:value-type="string">
            <text:p text:style-name="P29" loext:marker-style-name="T81"><text:span text:style-name="T82">接收端限制（</text:span><text:span text:style-name="T147">rwnd</text:span><text:span text:style-name="T82">）</text:span></text:p>
          </table:table-cell>
        </table:table-row>
        <table:table-row table:style-name="表格73.1">
          <table:table-cell table:style-name="表格73.A6" office:value-type="string">
            <text:p text:style-name="P29" loext:marker-style-name="T81"><text:span text:style-name="T82">網路很塞</text:span><text:span text:style-name="T81"/></text:p>
          </table:table-cell>
          <table:table-cell table:style-name="表格73.A6" office:value-type="string">
            <text:p text:style-name="P29" loext:marker-style-name="T81"><text:span text:style-name="T147">2</text:span><text:span text:style-name="T81"/></text:p>
          </table:table-cell>
          <table:table-cell table:style-name="表格73.A6" table:number-columns-spanned="2" office:value-type="string">
            <text:p text:style-name="P29" loext:marker-style-name="T81"><text:span text:style-name="T147">10</text:span><text:span text:style-name="T81"/></text:p>
          </table:table-cell>
          <table:covered-table-cell/>
          <table:table-cell table:style-name="表格73.A6" office:value-type="string">
            <text:p text:style-name="P29" loext:marker-style-name="T81"><text:span text:style-name="T147">2</text:span><text:span text:style-name="T81"/></text:p>
          </table:table-cell>
          <table:table-cell table:style-name="表格73.A6" office:value-type="string">
            <text:p text:style-name="P29" loext:marker-style-name="T81"><text:span text:style-name="T82">網路限制（</text:span><text:span text:style-name="T147">cwnd</text:span><text:span text:style-name="T82">）</text:span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1"><text:span text:style-name="T82">兩者相近</text:span><text:span text:style-name="T81"/></text:p>
          </table:table-cell>
          <table:table-cell table:style-name="表格73.A2" office:value-type="string">
            <text:p text:style-name="P29" loext:marker-style-name="T81"><text:span text:style-name="T147">5</text:span><text:span text:style-name="T81"/></text:p>
          </table:table-cell>
          <table:table-cell table:style-name="表格73.A2" table:number-columns-spanned="2" office:value-type="string">
            <text:p text:style-name="P29" loext:marker-style-name="T81"><text:span text:style-name="T147">6</text:span><text:span text:style-name="T81"/></text:p>
          </table:table-cell>
          <table:covered-table-cell/>
          <table:table-cell table:style-name="表格73.A2" office:value-type="string">
            <text:p text:style-name="P29" loext:marker-style-name="T81"><text:span text:style-name="T147">5</text:span><text:span text:style-name="T81"/></text:p>
          </table:table-cell>
          <table:table-cell table:style-name="表格73.A2" office:value-type="string">
            <text:p text:style-name="P29" loext:marker-style-name="T81"><text:span text:style-name="T82">網路限制（</text:span><text:span text:style-name="T147">cwnd</text:span><text:span text:style-name="T82">）</text:span></text:p>
          </table:table-cell>
        </table:table-row>
      </table:table>
      <text:h text:style-name="P11" text:outline-level="2" loext:marker-style-name="T27"><text:span text:style-name="T28">六、滑動視窗（</text:span><text:span text:style-name="T27">Sliding Window</text:span><text:span text:style-name="T28">）</text:span></text:h>
      <text:p text:style-name="P35" loext:marker-style-name="T98"><text:span text:style-name="T99">最笨的方法：送 </text:span><text:span text:style-name="T156">1 </text:span><text:span text:style-name="T99">個封包 → 等 </text:span><text:span text:style-name="T156">ACK → </text:span><text:span text:style-name="T99">再送 </text:span><text:span text:style-name="T156">1 </text:span><text:span text:style-name="T99">個 → 等 </text:span><text:span text:style-name="T156">ACK</text:span><text:span text:style-name="T97">，</text:span><text:span text:style-name="T517">大部分時間在閒置，非常浪費</text:span><text:span text:style-name="T97">。</text:span><text:span text:style-name="T167">TCP </text:span><text:span text:style-name="T112">的改進</text:span><text:span text:style-name="T97">：</text:span><text:span text:style-name="T617">不用等 </text:span><text:span text:style-name="T621">ACK</text:span><text:span text:style-name="T617">，先連續送出多個封包讓封包都在網路上飛（</text:span><text:span text:style-name="T621">in-flight</text:span><text:span text:style-name="T617">），</text:span><text:span text:style-name="T621">ACK </text:span><text:span text:style-name="T617">再慢慢回來</text:span><text:span text:style-name="T97">，這就是 </text:span><text:span text:style-name="T155">pipeline</text:span><text:span text:style-name="T97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7"><text:span text:style-name="T236">✗ </text:span><text:span text:style-name="T228">常見錯誤：</text:span><text:span text:style-name="T97">視窗 </text:span><text:span text:style-name="T155">= cwnd</text:span><text:span text:style-name="T97">（擁塞視窗）。</text:span><text:span text:style-name="T241">✓ 正確：</text:span><text:span text:style-name="T291">視窗 </text:span><text:span text:style-name="T315">= min(cwnd, rwnd)</text:span><text:span text:style-name="T291">，</text:span><text:span text:style-name="T315">cwnd </text:span><text:span text:style-name="T291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4" loext:marker-style-name="T67"><text:span text:style-name="T68">時間點</text:span><text:span text:style-name="T67"/></text:p>
          </table:table-cell>
          <table:table-cell table:style-name="表格74.A2" office:value-type="string">
            <text:p text:style-name="P4" loext:marker-style-name="T67"><text:span text:style-name="T68">已確認</text:span><text:span text:style-name="T67"/></text:p>
          </table:table-cell>
          <table:table-cell table:style-name="表格74.A2" office:value-type="string">
            <text:p text:style-name="P4" loext:marker-style-name="T67"><text:span text:style-name="T68">視窗範圍（可送）</text:span><text:span text:style-name="T67"/></text:p>
          </table:table-cell>
          <table:table-cell table:style-name="表格74.A2" office:value-type="string">
            <text:p text:style-name="P4" loext:marker-style-name="T67"><text:span text:style-name="T68">等待中</text:span><text:span text:style-name="T67"/></text:p>
          </table:table-cell>
        </table:table-row>
        <table:table-row table:style-name="表格74.1">
          <table:table-cell table:style-name="表格74.A3" office:value-type="string">
            <text:p text:style-name="P29" loext:marker-style-name="T81"><text:span text:style-name="T82">初始狀態</text:span><text:span text:style-name="T81"/></text:p>
          </table:table-cell>
          <table:table-cell table:style-name="表格74.A3" office:value-type="string">
            <text:p text:style-name="P29" loext:marker-style-name="T81"><text:span text:style-name="T82">無</text:span><text:span text:style-name="T81"/></text:p>
          </table:table-cell>
          <table:table-cell table:style-name="表格74.A3" office:value-type="string">
            <text:p text:style-name="P29" loext:marker-style-name="T81"><text:span text:style-name="T82">封包 </text:span><text:span text:style-name="T147">1, 2, 3</text:span></text:p>
          </table:table-cell>
          <table:table-cell table:style-name="表格74.A3" office:value-type="string">
            <text:p text:style-name="P29" loext:marker-style-name="T81"><text:span text:style-name="T147">4, 5, 6 …</text:span><text:span text:style-name="T81"/></text:p>
          </table:table-cell>
        </table:table-row>
        <table:table-row table:style-name="表格74.1">
          <table:table-cell table:style-name="表格74.A4" office:value-type="string">
            <text:p text:style-name="P29" loext:marker-style-name="T90"><text:span text:style-name="T91">收到 </text:span><text:span text:style-name="T150">ACK 1</text:span></text:p>
          </table:table-cell>
          <table:table-cell table:style-name="表格74.A4" office:value-type="string">
            <text:p text:style-name="P29" loext:marker-style-name="T95"><text:span text:style-name="T96">封包 </text:span><text:span text:style-name="T154">1</text:span></text:p>
          </table:table-cell>
          <table:table-cell table:style-name="表格74.A4" office:value-type="string">
            <text:p text:style-name="P29" loext:marker-style-name="T81"><text:span text:style-name="T82">封包 </text:span><text:span text:style-name="T147">2, 3, 4</text:span></text:p>
          </table:table-cell>
          <table:table-cell table:style-name="表格74.A4" office:value-type="string">
            <text:p text:style-name="P29" loext:marker-style-name="T81"><text:span text:style-name="T147">5, 6 …</text:span><text:span text:style-name="T82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9" loext:marker-style-name="T90"><text:span text:style-name="T91">收到 </text:span><text:span text:style-name="T150">ACK 2</text:span></text:p>
          </table:table-cell>
          <table:table-cell table:style-name="表格74.A3" office:value-type="string">
            <text:p text:style-name="P29" loext:marker-style-name="T95"><text:span text:style-name="T96">封包 </text:span><text:span text:style-name="T154">1, 2</text:span></text:p>
          </table:table-cell>
          <table:table-cell table:style-name="表格74.A3" office:value-type="string">
            <text:p text:style-name="P29" loext:marker-style-name="T81"><text:span text:style-name="T82">封包 </text:span><text:span text:style-name="T147">3, 4, 5</text:span></text:p>
          </table:table-cell>
          <table:table-cell table:style-name="表格74.A3" office:value-type="string">
            <text:p text:style-name="P29" loext:marker-style-name="T81"><text:span text:style-name="T147">6, 7 …</text:span><text:span text:style-name="T82">（繼續往右滑）</text:span></text:p>
          </table:table-cell>
        </table:table-row>
      </table:table>
      <text:p text:style-name="P35" loext:marker-style-name="T10"><text:span text:style-name="T11">關鍵理解：視窗大小決定效率（越大越快），</text:span><text:span text:style-name="T601">ACK </text:span><text:span text:style-name="T599">的回傳決定視窗位置（往前滑）</text:span><text:span text:style-name="T11">，兩者合作讓傳輸保持流暢。</text:span></text:p>
      <text:h text:style-name="P11" text:outline-level="2" loext:marker-style-name="T27"><text:span text:style-name="T28">七、擁塞控制：怎麼調整速度</text:span><text:span text:style-name="T27"/></text:h>
      <text:h text:style-name="P12" text:outline-level="3"><text:span text:style-name="T198">▍</text:span><text:span text:style-name="T199"> </text:span><text:span text:style-name="T200">階段一：</text:span><text:span text:style-name="T199">Slow Start</text:span><text:span text:style-name="T200">（慢啟動）— 指數成長</text:span></text:h>
      <text:p text:style-name="P35" loext:marker-style-name="T98"><text:span text:style-name="T97">雖叫「慢」啟動，實際成長非常快。規則：</text:span><text:span text:style-name="T479">每收到一個 </text:span><text:span text:style-name="T495">ACK</text:span><text:span text:style-name="T479">，</text:span><text:span text:style-name="T495">cwnd </text:span><text:span text:style-name="T479">就 </text:span><text:span text:style-name="T495">+1</text:span><text:span text:style-name="T97">；</text:span><text:span text:style-name="T559">送出 </text:span><text:span text:style-name="T571">N </text:span><text:span text:style-name="T559">個封包 → 收回 </text:span><text:span text:style-name="T571">N </text:span><text:span text:style-name="T559">個 </text:span><text:span text:style-name="T571">ACK → cwnd </text:span><text:span text:style-name="T559">增加 </text:span><text:span text:style-name="T571">N</text:span><text:span text:style-name="T97">，所以每輪自然翻倍。</text:span><text:span text:style-name="T155">(</text:span><text:span text:style-name="T315">Slow Start = </text:span><text:span text:style-name="T291">每一輪變 </text:span><text:span text:style-name="T315">2 </text:span><text:span text:style-name="T291">倍，</text:span><text:span text:style-name="T315">Congestion Avoidance = </text:span><text:span text:style-name="T291">每一輪只加 </text:span><text:span text:style-name="T315">1</text:span><text:span text:style-name="T155">(</text:span><text:span text:style-name="T97">「</text:span><text:span text:style-name="T512">Slow Start</text:span><text:span text:style-name="T518">翻倍，壅塞避免加一</text:span><text:span text:style-name="T97">」</text:span><text:span text:style-name="T155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6" loext:marker-style-name="T67"><text:span text:style-name="T68">輪次（</text:span><text:span text:style-name="T77">RTT</text:span><text:span text:style-name="T68">）</text:span></text:p>
            </table:table-cell>
            <table:table-cell table:style-name="表格75.A1" office:value-type="string">
              <text:p text:style-name="P26" loext:marker-style-name="T67"><text:span text:style-name="T77">cwnd</text:span><text:span text:style-name="T67"/></text:p>
            </table:table-cell>
            <table:table-cell table:style-name="表格75.A1" office:value-type="string">
              <text:p text:style-name="P26" loext:marker-style-name="T67"><text:span text:style-name="T68">送出封包數</text:span><text:span text:style-name="T67"/></text:p>
            </table:table-cell>
            <table:table-cell table:style-name="表格75.A1" office:value-type="string">
              <text:p text:style-name="P26" loext:marker-style-name="T67"><text:span text:style-name="T68">收回 </text:span><text:span text:style-name="T77">ACK </text:span><text:span text:style-name="T68">數</text:span></text:p>
            </table:table-cell>
            <table:table-cell table:style-name="表格75.A1" office:value-type="string">
              <text:p text:style-name="P26" loext:marker-style-name="T67"><text:span text:style-name="T68">新 </text:span><text:span text:style-name="T77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9" loext:marker-style-name="T81"><text:span text:style-name="T82">第 </text:span><text:span text:style-name="T147">1 </text:span><text:span text:style-name="T82">輪</text:span></text:p>
          </table:table-cell>
          <table:table-cell table:style-name="表格75.A2" office:value-type="string">
            <text:p text:style-name="P29" loext:marker-style-name="T81"><text:span text:style-name="T147">1</text:span><text:span text:style-name="T81"/></text:p>
          </table:table-cell>
          <table:table-cell table:style-name="表格75.A2" office:value-type="string">
            <text:p text:style-name="P29" loext:marker-style-name="T81"><text:span text:style-name="T147">1</text:span><text:span text:style-name="T81"/></text:p>
          </table:table-cell>
          <table:table-cell table:style-name="表格75.A2" office:value-type="string">
            <text:p text:style-name="P29" loext:marker-style-name="T81"><text:span text:style-name="T147">1</text:span><text:span text:style-name="T81"/></text:p>
          </table:table-cell>
          <table:table-cell table:style-name="表格75.A2" office:value-type="string">
            <text:p text:style-name="P29" loext:marker-style-name="T81"><text:span text:style-name="T147">2</text:span><text:span text:style-name="T81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9" loext:marker-style-name="T81"><text:span text:style-name="T82">第 </text:span><text:span text:style-name="T147">2 </text:span><text:span text:style-name="T82">輪</text:span></text:p>
          </table:table-cell>
          <table:table-cell table:style-name="表格75.A3" office:value-type="string">
            <text:p text:style-name="P29" loext:marker-style-name="T81"><text:span text:style-name="T147">2</text:span><text:span text:style-name="T81"/></text:p>
          </table:table-cell>
          <table:table-cell table:style-name="表格75.A3" office:value-type="string">
            <text:p text:style-name="P29" loext:marker-style-name="T81"><text:span text:style-name="T147">2</text:span><text:span text:style-name="T81"/></text:p>
          </table:table-cell>
          <table:table-cell table:style-name="表格75.A3" office:value-type="string">
            <text:p text:style-name="P29" loext:marker-style-name="T81"><text:span text:style-name="T147">2</text:span><text:span text:style-name="T81"/></text:p>
          </table:table-cell>
          <table:table-cell table:style-name="表格75.A3" office:value-type="string">
            <text:p text:style-name="P29" loext:marker-style-name="T81"><text:span text:style-name="T147">4</text:span><text:span text:style-name="T81"/></text:p>
          </table:table-cell>
        </table:table-row>
        <table:table-row table:style-name="表格75.1">
          <table:table-cell table:style-name="表格75.A2" office:value-type="string">
            <text:p text:style-name="P29" loext:marker-style-name="T81"><text:span text:style-name="T82">第 </text:span><text:span text:style-name="T147">3 </text:span><text:span text:style-name="T82">輪</text:span></text:p>
          </table:table-cell>
          <table:table-cell table:style-name="表格75.A2" office:value-type="string">
            <text:p text:style-name="P29" loext:marker-style-name="T81"><text:span text:style-name="T147">4</text:span><text:span text:style-name="T81"/></text:p>
          </table:table-cell>
          <table:table-cell table:style-name="表格75.A2" office:value-type="string">
            <text:p text:style-name="P29" loext:marker-style-name="T81"><text:span text:style-name="T147">4</text:span><text:span text:style-name="T81"/></text:p>
          </table:table-cell>
          <table:table-cell table:style-name="表格75.A2" office:value-type="string">
            <text:p text:style-name="P29" loext:marker-style-name="T81"><text:span text:style-name="T147">4</text:span><text:span text:style-name="T81"/></text:p>
          </table:table-cell>
          <table:table-cell table:style-name="表格75.A2" office:value-type="string">
            <text:p text:style-name="P29" loext:marker-style-name="T81"><text:span text:style-name="T147">8</text:span><text:span text:style-name="T81"/></text:p>
          </table:table-cell>
        </table:table-row>
        <table:table-row table:style-name="表格75.1">
          <table:table-cell table:style-name="表格75.A3" office:value-type="string">
            <text:p text:style-name="P29" loext:marker-style-name="T81"><text:span text:style-name="T82">第 </text:span><text:span text:style-name="T147">4 </text:span><text:span text:style-name="T82">輪</text:span></text:p>
          </table:table-cell>
          <table:table-cell table:style-name="表格75.A3" office:value-type="string">
            <text:p text:style-name="P29" loext:marker-style-name="T81"><text:span text:style-name="T147">8</text:span><text:span text:style-name="T81"/></text:p>
          </table:table-cell>
          <table:table-cell table:style-name="表格75.A3" office:value-type="string">
            <text:p text:style-name="P29" loext:marker-style-name="T81"><text:span text:style-name="T147">8</text:span><text:span text:style-name="T81"/></text:p>
          </table:table-cell>
          <table:table-cell table:style-name="表格75.A3" office:value-type="string">
            <text:p text:style-name="P29" loext:marker-style-name="T81"><text:span text:style-name="T147">8</text:span><text:span text:style-name="T81"/></text:p>
          </table:table-cell>
          <table:table-cell table:style-name="表格75.A3" office:value-type="string">
            <text:p text:style-name="P29" loext:marker-style-name="T81"><text:span text:style-name="T147">16</text:span><text:span text:style-name="T81"/></text:p>
          </table:table-cell>
        </table:table-row>
      </table:table>
      <text:h text:style-name="P12" text:outline-level="3"><text:span text:style-name="T198">▍</text:span><text:span text:style-name="T199"> </text:span><text:span text:style-name="T200">階段二：</text:span><text:span text:style-name="T199">Congestion Avoidance</text:span><text:span text:style-name="T200">（擁塞避免）— 線性成長</text:span></text:h>
      <text:p text:style-name="P35" loext:marker-style-name="T98"><text:span text:style-name="T415">cwnd </text:span><text:span text:style-name="T394">成長到門檻值（</text:span><text:span text:style-name="T415">ssthresh</text:span><text:span text:style-name="T394">）後，改為線性成長</text:span><text:span text:style-name="T97">（</text:span><text:span text:style-name="T479">每個 </text:span><text:span text:style-name="T495">RTT </text:span><text:span text:style-name="T479">只 </text:span><text:span text:style-name="T495">+1</text:span><text:span text:style-name="T97">），</text:span><text:span text:style-name="T110">避免增長太快讓網路過載</text:span><text:span text:style-name="T97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4"/>
            </table:table-cell>
            <table:table-cell table:style-name="表格76.A1" office:value-type="string">
              <text:p text:style-name="P4" loext:marker-style-name="T67"><text:span text:style-name="T77">Slow Start</text:span><text:span text:style-name="T67"/></text:p>
            </table:table-cell>
            <table:table-cell table:style-name="表格76.A1" office:value-type="string">
              <text:p text:style-name="P4" loext:marker-style-name="T67"><text:span text:style-name="T77">Congestion Avoidance</text:span><text:span text:style-name="T67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9" loext:marker-style-name="T81"><text:span text:style-name="T82">觸發條件</text:span><text:span text:style-name="T81"/></text:p>
          </table:table-cell>
          <table:table-cell table:style-name="表格76.A2" office:value-type="string">
            <text:p text:style-name="P29" loext:marker-style-name="T90"><text:span text:style-name="T150">cwnd &lt; ssthresh</text:span><text:span text:style-name="T90"/></text:p>
          </table:table-cell>
          <table:table-cell table:style-name="表格76.A2" office:value-type="string">
            <text:p text:style-name="P29" loext:marker-style-name="T90"><text:span text:style-name="T150">cwnd ≥ ssthresh</text:span><text:span text:style-name="T90"/></text:p>
          </table:table-cell>
        </table:table-row>
        <table:table-row table:style-name="表格76.1">
          <table:table-cell table:style-name="表格76.A3" office:value-type="string">
            <text:p text:style-name="P29" loext:marker-style-name="T81"><text:span text:style-name="T82">成長方式</text:span><text:span text:style-name="T81"/></text:p>
          </table:table-cell>
          <table:table-cell table:style-name="表格76.A3" office:value-type="string">
            <text:p text:style-name="P29" loext:marker-style-name="T81"><text:span text:style-name="T569">指數成長</text:span><text:span text:style-name="T82">（</text:span><text:span text:style-name="T474">每個 </text:span><text:span text:style-name="T491">ACK +1</text:span><text:span text:style-name="T82">）</text:span></text:p>
          </table:table-cell>
          <table:table-cell table:style-name="表格76.A3" office:value-type="string">
            <text:p text:style-name="P29" loext:marker-style-name="T81"><text:span text:style-name="T595">線性成長</text:span><text:span text:style-name="T82">（</text:span><text:span text:style-name="T474">每個 </text:span><text:span text:style-name="T491">RTT +1</text:span><text:span text:style-name="T82">）</text:span><text:span text:style-name="T147">(</text:span><text:span text:style-name="T622">RTT </text:span><text:span text:style-name="T618">：</text:span><text:span text:style-name="T622">Round Trip Time</text:span><text:span text:style-name="T618">（往返時間）</text:span><text:span text:style-name="T622">= </text:span><text:span text:style-name="T618">封包出去 </text:span><text:span text:style-name="T622">+ ACK </text:span><text:span text:style-name="T618">回來的一個來回時間</text:span><text:span text:style-name="T147">)</text:span></text:p>
          </table:table-cell>
        </table:table-row>
        <table:table-row table:style-name="表格76.1">
          <table:table-cell table:style-name="表格76.A2" office:value-type="string">
            <text:p text:style-name="P29" loext:marker-style-name="T81"><text:span text:style-name="T82">特性</text:span><text:span text:style-name="T81"/></text:p>
          </table:table-cell>
          <table:table-cell table:style-name="表格76.A2" office:value-type="string">
            <text:p text:style-name="P29" loext:marker-style-name="T81"><text:span text:style-name="T82">快速試探網路上限</text:span><text:span text:style-name="T81"/></text:p>
          </table:table-cell>
          <table:table-cell table:style-name="表格76.A2" office:value-type="string">
            <text:p text:style-name="P29" loext:marker-style-name="T81"><text:span text:style-name="T82">保守維持穩定傳輸</text:span><text:span text:style-name="T81"/></text:p>
          </table:table-cell>
        </table:table-row>
      </table:table>
      <text:h text:style-name="P12" text:outline-level="3"><text:span text:style-name="T198">▍</text:span><text:span text:style-name="T199"> </text:span><text:span text:style-name="T200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" loext:marker-style-name="T73"><text:span text:style-name="T74">丟包偵測方式</text:span><text:span text:style-name="T73"/></text:p>
            </table:table-cell>
            <table:table-cell table:style-name="表格77.A1" office:value-type="string">
              <text:p text:style-name="P4" loext:marker-style-name="T73"><text:span text:style-name="T74">說明</text:span><text:span text:style-name="T73"/></text:p>
            </table:table-cell>
            <table:table-cell table:style-name="表格77.A1" office:value-type="string">
              <text:p text:style-name="P4" loext:marker-style-name="T73"><text:span text:style-name="T79">ssthresh</text:span><text:span text:style-name="T73"/></text:p>
            </table:table-cell>
            <table:table-cell table:style-name="表格77.A1" office:value-type="string">
              <text:p text:style-name="P4" loext:marker-style-name="T73"><text:span text:style-name="T79">cwnd</text:span><text:span text:style-name="T73"/></text:p>
            </table:table-cell>
            <table:table-cell table:style-name="表格77.A1" office:value-type="string">
              <text:p text:style-name="P4" loext:marker-style-name="T73"><text:span text:style-name="T74">下一階段</text:span><text:span text:style-name="T73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9" loext:marker-style-name="T142"><text:span text:style-name="T190">Timeout</text:span><text:span text:style-name="T140">（逾時）</text:span></text:p>
          </table:table-cell>
          <table:table-cell table:style-name="表格77.A2" office:value-type="string">
            <text:p text:style-name="P29" loext:marker-style-name="T126"><text:span text:style-name="T138">等太久沒 </text:span><text:span text:style-name="T189">ACK</text:span><text:span text:style-name="T127">，</text:span><text:span text:style-name="T279">網路嚴重擁塞</text:span></text:p>
          </table:table-cell>
          <table:table-cell table:style-name="表格77.A2" office:value-type="string">
            <text:p text:style-name="P29" loext:marker-style-name="T126"><text:span text:style-name="T179">= </text:span><text:span text:style-name="T326">cwnd / 2</text:span></text:p>
          </table:table-cell>
          <table:table-cell table:style-name="表格77.A2" office:value-type="string">
            <text:p text:style-name="P29" loext:marker-style-name="T223"><text:span text:style-name="T224">重設為 </text:span><text:span text:style-name="T232">1</text:span></text:p>
          </table:table-cell>
          <table:table-cell table:style-name="表格77.A2" office:value-type="string">
            <text:p text:style-name="P29" loext:marker-style-name="T335"><text:span text:style-name="T334">重新進入 </text:span><text:span text:style-name="T343">Slow Start</text:span></text:p>
          </table:table-cell>
        </table:table-row>
        <table:table-row table:style-name="表格77.1">
          <table:table-cell table:style-name="表格77.A3" office:value-type="string">
            <text:p text:style-name="P29" loext:marker-style-name="T142"><text:span text:style-name="T190">3 </text:span><text:span text:style-name="T140">個重複 </text:span><text:span text:style-name="T190">ACK (Fast Retransmit)</text:span></text:p>
          </table:table-cell>
          <table:table-cell table:style-name="表格77.A3" office:value-type="string">
            <text:p text:style-name="P29" loext:marker-style-name="T126"><text:span text:style-name="T138">連續收 </text:span><text:span text:style-name="T189">3 </text:span><text:span text:style-name="T138">個同樣 </text:span><text:span text:style-name="T189">ACK</text:span><text:span text:style-name="T127">，</text:span><text:span text:style-name="T383">單一封包丟失</text:span></text:p>
          </table:table-cell>
          <table:table-cell table:style-name="表格77.A3" office:value-type="string">
            <text:p text:style-name="P29" loext:marker-style-name="T126"><text:span text:style-name="T179">= </text:span><text:span text:style-name="T326">cwnd / 2</text:span></text:p>
          </table:table-cell>
          <table:table-cell table:style-name="表格77.A3" office:value-type="string">
            <text:p text:style-name="P29" loext:marker-style-name="T31"><text:span text:style-name="T39">= ssthresh</text:span><text:span text:style-name="T32">（直接減半）</text:span></text:p>
          </table:table-cell>
          <table:table-cell table:style-name="表格77.A3" office:value-type="string">
            <text:p text:style-name="P29" loext:marker-style-name="T335"><text:span text:style-name="T334">進入 </text:span><text:span text:style-name="T343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6"><text:span text:style-name="T196">⚠️ <text:s/></text:span><text:span text:style-name="T218">重要區別</text:span></text:p>
            <text:p text:style-name="P7" loext:marker-style-name="T98"><text:span text:style-name="T607">Timeout </text:span><text:span text:style-name="T602">代表網路嚴重問題</text:span><text:span text:style-name="T97">，</text:span><text:span text:style-name="T573">cwnd </text:span><text:span text:style-name="T561">重設回 </text:span><text:span text:style-name="T573">1 </text:span><text:span text:style-name="T561">從頭來</text:span><text:span text:style-name="T97">；</text:span><text:span text:style-name="T624">3 </text:span><text:span text:style-name="T625">個重複 </text:span><text:span text:style-name="T624">ACK </text:span><text:span text:style-name="T625">只是單一封包遺失</text:span><text:span text:style-name="T97">，</text:span><text:span text:style-name="T573">cwnd </text:span><text:span text:style-name="T561">直接減半後繼續 </text:span><text:span text:style-name="T573">Congestion Avoidance</text:span><text:span text:style-name="T561">，不用從頭重來</text:span><text:span text:style-name="T97">。</text:span><text:span text:style-name="T155">(</text:span><text:span text:style-name="T318">Timeout → cwnd = 1</text:span><text:span text:style-name="T294">；</text:span><text:span text:style-name="T318">3Dup ACK → cwnd ÷ 2</text:span><text:span text:style-name="T155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AIMD</text:span><text:span text:style-name="T200">（加法增長 </text:span><text:span text:style-name="T199">/ </text:span><text:span text:style-name="T200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6" loext:marker-style-name="T67"><text:span text:style-name="T77">AI</text:span><text:span text:style-name="T68">：加法增長 </text:span><text:span text:style-name="T77">Additive Increase</text:span></text:p>
            </table:table-cell>
            <table:table-cell table:style-name="表格78.A1" office:value-type="string">
              <text:p text:style-name="P26" loext:marker-style-name="T67"><text:span text:style-name="T77">MD</text:span><text:span text:style-name="T68">：乘法減少 </text:span><text:span text:style-name="T77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9" loext:marker-style-name="T81"><text:span text:style-name="T84">沒丟包 → 網路 </text:span><text:span text:style-name="T151">OK </text:span><text:span text:style-name="T147">→ CA </text:span><text:span text:style-name="T82">階段線性增加（</text:span><text:span text:style-name="T88">每 </text:span><text:span text:style-name="T149">RTT +1</text:span><text:span text:style-name="T82">），慢慢加速。</text:span></text:p>
          </table:table-cell>
          <table:table-cell table:style-name="表格78.A2" office:value-type="string">
            <text:p text:style-name="P29" loext:marker-style-name="T81"><text:span text:style-name="T84">偵測到丟包 → 網路塞了 </text:span><text:span text:style-name="T82">→ </text:span><text:span text:style-name="T149">cwnd ×0.5</text:span><text:span text:style-name="T88">（減半）</text:span><text:span text:style-name="T82">，快速降速避免繼續惡化。</text:span></text:p>
          </table:table-cell>
        </table:table-row>
      </table:table>
      <text:p text:style-name="P35" loext:marker-style-name="T10"><text:span text:style-name="T498">AIMD </text:span><text:span text:style-name="T482">本質：用 </text:span><text:span text:style-name="T498">ACK </text:span><text:span text:style-name="T482">當回饋，不斷探測網路的「最高速度」</text:span><text:span text:style-name="T11">——</text:span><text:span text:style-name="T336">慢慢加速找上限，遇到問題快速減速再重新找</text:span><text:span text:style-name="T11">，這個循環就是 </text:span><text:span text:style-name="T20">TCP </text:span><text:span text:style-name="T11">傳輸的節奏。</text:span></text:p>
      <text:h text:style-name="P11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6"><text:span text:style-name="T196">🔄 <text:s/></text:span><text:span text:style-name="T50">完整流程</text:span></text:p>
            <text:p text:style-name="P7" loext:marker-style-name="T98"><text:span text:style-name="T155">① </text:span><text:span text:style-name="T97">建立連線：三次握手（</text:span><text:span text:style-name="T155">SYN → SYN+ACK → ACK</text:span><text:span text:style-name="T97">）確認雙向通訊正常。</text:span></text:p>
            <text:p text:style-name="P8" loext:marker-style-name="T98"><text:span text:style-name="T155">② </text:span><text:span text:style-name="T97">開始傳資料 </text:span><text:span text:style-name="T155">Slow Start</text:span><text:span text:style-name="T97">：</text:span><text:span text:style-name="T155">cwnd </text:span><text:span text:style-name="T97">從 </text:span><text:span text:style-name="T155">1 </text:span><text:span text:style-name="T97">開始，每個 </text:span><text:span text:style-name="T155">ACK +1</text:span><text:span text:style-name="T97">，指數成長快速試探上限。</text:span></text:p>
            <text:p text:style-name="P8" loext:marker-style-name="T98"><text:span text:style-name="T155">③ </text:span><text:span text:style-name="T97">達到門檻切換 </text:span><text:span text:style-name="T155">CA</text:span><text:span text:style-name="T97">：</text:span><text:span text:style-name="T155">cwnd </text:span><text:span text:style-name="T97">到 </text:span><text:span text:style-name="T155">ssthresh </text:span><text:span text:style-name="T97">後改每 </text:span><text:span text:style-name="T155">RTT +1</text:span><text:span text:style-name="T97">，線性保守維持穩定。（</text:span><text:span text:style-name="T155">RTT</text:span><text:span text:style-name="T97">＝來回時間：送出一個封包到收到 </text:span><text:span text:style-name="T155">ACK </text:span><text:span text:style-name="T97">所花的時間）</text:span></text:p>
            <text:p text:style-name="P8" loext:marker-style-name="T98"><text:span text:style-name="T155">④ </text:span><text:span text:style-name="T97">每輪都考慮兩個限制：實際傳送量 </text:span><text:span text:style-name="T155">= min(rwnd, cwnd)</text:span><text:span text:style-name="T97">。</text:span></text:p>
            <text:p text:style-name="P8" loext:marker-style-name="T98"><text:span text:style-name="T155">⑤ </text:span><text:span text:style-name="T97">視窗持續滑動：每收到一個 </text:span><text:span text:style-name="T155">ACK </text:span><text:span text:style-name="T97">視窗往前移，保持 </text:span><text:span text:style-name="T155">pipeline </text:span><text:span text:style-name="T97">流暢。</text:span></text:p>
            <text:p text:style-name="P8" loext:marker-style-name="T98"><text:span text:style-name="T155">⑥ </text:span><text:span text:style-name="T97">偵測到丟包快速反應：</text:span><text:span text:style-name="T155">Timeout → cwnd=1 </text:span><text:span text:style-name="T97">重回 </text:span><text:span text:style-name="T155">Slow Start</text:span><text:span text:style-name="T97">；</text:span><text:span text:style-name="T155">3 </text:span><text:span text:style-name="T97">重複 </text:span><text:span text:style-name="T155">ACK → cwnd </text:span><text:span text:style-name="T97">減半續 </text:span><text:span text:style-name="T155">CA</text:span><text:span text:style-name="T97">。</text:span></text:p>
            <text:p text:style-name="P8" loext:marker-style-name="T98"><text:span text:style-name="T155">⑦ </text:span><text:span text:style-name="T97">持續循環調整：送 → 收 </text:span><text:span text:style-name="T155">ACK → </text:span><text:span text:style-name="T97">調整 </text:span><text:span text:style-name="T155">cwnd → </text:span><text:span text:style-name="T97">再送，</text:span><text:span text:style-name="T479">用 </text:span><text:span text:style-name="T495">ACK </text:span><text:span text:style-name="T479">當回饋不斷自我調節</text:span><text:span text:style-name="T97">。</text:span></text:p>
          </table:table-cell>
        </table:table-row>
      </table:table>
      <text:h text:style-name="P11" text:outline-level="2" loext:marker-style-name="T300"><text:soft-page-break/><text:span text:style-name="T300">TCP </text:span><text:span text:style-name="T301">七字口訣 <text:s text:c="2"/>握</text:span><text:span text:style-name="T300">(</text:span><text:span text:style-name="T301">三次握手</text:span><text:span text:style-name="T300">) → </text:span><text:span text:style-name="T301">衝</text:span><text:span text:style-name="T300">(Slow Start </text:span><text:span text:style-name="T301">指數成長</text:span><text:span text:style-name="T300">) → </text:span><text:span text:style-name="T301">穩</text:span><text:span text:style-name="T300">(CA </text:span><text:span text:style-name="T301">線性成長</text:span><text:span text:style-name="T300">) → </text:span><text:span text:style-name="T301">看</text:span><text:span text:style-name="T300">(min(rwnd,cwnd)) → </text:span><text:span text:style-name="T301">滑</text:span><text:span text:style-name="T300">(Sliding Window) → </text:span><text:span text:style-name="T301">救</text:span><text:span text:style-name="T300">(Timeout / 3 Dup ACK) → </text:span><text:span text:style-name="T301">循</text:span><text:span text:style-name="T300">(ACK </text:span><text:span text:style-name="T301">回饋循環</text:span><text:span text:style-name="T300">)</text:span></text:h>
      <text:h text:style-name="P19" text:outline-level="2" loext:marker-style-name="T27"/>
      <text:h text:style-name="P11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4" loext:marker-style-name="T67"><text:span text:style-name="T68">步驟</text:span><text:span text:style-name="T67"/></text:p>
            </table:table-cell>
            <table:table-cell table:style-name="表格80.A1" office:value-type="string">
              <text:p text:style-name="P4" loext:marker-style-name="T67"><text:span text:style-name="T68">發生什麼</text:span><text:span text:style-name="T67"/></text:p>
            </table:table-cell>
            <table:table-cell table:style-name="表格80.A1" office:value-type="string">
              <text:p text:style-name="P4" loext:marker-style-name="T67"><text:span text:style-name="T68">用到什麼</text:span><text:span text:style-name="T67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9" loext:marker-style-name="T81"><text:span text:style-name="T147">DNS </text:span><text:span text:style-name="T82">解析</text:span></text:p>
          </table:table-cell>
          <table:table-cell table:style-name="表格80.A2" office:value-type="string">
            <text:p text:style-name="P29" loext:marker-style-name="T81"><text:span text:style-name="T147">google.com → 142.250.x.x</text:span><text:span text:style-name="T81"/></text:p>
          </table:table-cell>
          <table:table-cell table:style-name="表格80.A2" office:value-type="string">
            <text:p text:style-name="P29" loext:marker-style-name="T81"><text:span text:style-name="T147">DNS</text:span><text:span text:style-name="T81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1"><text:span text:style-name="T147">ARP </text:span><text:span text:style-name="T82">找路由器</text:span></text:p>
          </table:table-cell>
          <table:table-cell table:style-name="表格80.A3" office:value-type="string">
            <text:p text:style-name="P29" loext:marker-style-name="T81"><text:span text:style-name="T82">找路由器的 </text:span><text:span text:style-name="T147">MAC </text:span><text:span text:style-name="T82">位址</text:span></text:p>
          </table:table-cell>
          <table:table-cell table:style-name="表格80.A3" office:value-type="string">
            <text:p text:style-name="P29" loext:marker-style-name="T81"><text:span text:style-name="T147">ARP</text:span><text:span text:style-name="T81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1"><text:span text:style-name="T147">NAT</text:span><text:span text:style-name="T81"/></text:p>
          </table:table-cell>
          <table:table-cell table:style-name="表格80.A2" office:value-type="string">
            <text:p text:style-name="P29" loext:marker-style-name="T81"><text:span text:style-name="T82">私有 </text:span><text:span text:style-name="T147">IP </text:span><text:span text:style-name="T82">換成公網 </text:span><text:span text:style-name="T147">IP</text:span></text:p>
          </table:table-cell>
          <table:table-cell table:style-name="表格80.A2" office:value-type="string">
            <text:p text:style-name="P29" loext:marker-style-name="T81"><text:span text:style-name="T147">NAT</text:span><text:span text:style-name="T81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1"><text:span text:style-name="T147">TCP </text:span><text:span text:style-name="T82">三次握手</text:span></text:p>
          </table:table-cell>
          <table:table-cell table:style-name="表格80.A3" office:value-type="string">
            <text:p text:style-name="P29" loext:marker-style-name="T81"><text:span text:style-name="T82">與 </text:span><text:span text:style-name="T147">Google </text:span><text:span text:style-name="T82">建立可靠連線</text:span></text:p>
          </table:table-cell>
          <table:table-cell table:style-name="表格80.A3" office:value-type="string">
            <text:p text:style-name="P29" loext:marker-style-name="T81"><text:span text:style-name="T147">TCP</text:span><text:span text:style-name="T81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1"><text:span text:style-name="T82">傳資料（</text:span><text:span text:style-name="T147">Slow Start → CA</text:span><text:span text:style-name="T82">）</text:span></text:p>
          </table:table-cell>
          <table:table-cell table:style-name="表格80.A2" office:value-type="string">
            <text:p text:style-name="P29" loext:marker-style-name="T81"><text:span text:style-name="T147">cwnd </text:span><text:span text:style-name="T82">慢慢加速，滑動視窗持續傳送</text:span></text:p>
          </table:table-cell>
          <table:table-cell table:style-name="表格80.A2" office:value-type="string">
            <text:p text:style-name="P29" loext:marker-style-name="T81"><text:span text:style-name="T147">TCP </text:span><text:span text:style-name="T82">擁塞控制</text:span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1"><text:span text:style-name="T147">Google </text:span><text:span text:style-name="T82">回應</text:span></text:p>
          </table:table-cell>
          <table:table-cell table:style-name="表格80.A3" office:value-type="string">
            <text:p text:style-name="P29" loext:marker-style-name="T81"><text:span text:style-name="T82">資料送回你的電腦</text:span><text:span text:style-name="T81"/></text:p>
          </table:table-cell>
          <table:table-cell table:style-name="表格80.A3" office:value-type="string">
            <text:p text:style-name="P29" loext:marker-style-name="T81"><text:span text:style-name="T147">TCP + NAT</text:span><text:span text:style-name="T82">（回程換 </text:span><text:span text:style-name="T147">IP</text:span><text:span text:style-name="T82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6"><text:span text:style-name="T196">⚡ <text:s/></text:span><text:span text:style-name="T200">層次關係</text:span></text:p>
            <text:p text:style-name="P7" loext:marker-style-name="T98"><text:span text:style-name="T155">ARP </text:span><text:span text:style-name="T97">在 </text:span><text:span text:style-name="T155">L2/L3 </text:span><text:span text:style-name="T97">交界處工作（找 </text:span><text:span text:style-name="T155">MAC</text:span><text:span text:style-name="T97">）；</text:span><text:span text:style-name="T155">NAT </text:span><text:span text:style-name="T97">在 </text:span><text:span text:style-name="T155">L3</text:span><text:span text:style-name="T97">（換 </text:span><text:span text:style-name="T155">IP</text:span><text:span text:style-name="T97">）；</text:span><text:span text:style-name="T155">TCP </text:span><text:span text:style-name="T97">在 </text:span><text:span text:style-name="T155">L4</text:span><text:span text:style-name="T97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><text:span text:style-name="T196">🧠 <text:s/></text:span><text:span text:style-name="T250">考試直接用</text:span></text:p>
            <text:p text:style-name="P7" loext:marker-style-name="T98"><text:span text:style-name="T155">TCP </text:span><text:span text:style-name="T97">用三次握手建立連線，</text:span><text:span text:style-name="T112">用 </text:span><text:span text:style-name="T167">rwnd</text:span><text:span text:style-name="T112">（接收端）和 </text:span><text:span text:style-name="T167">cwnd</text:span><text:span text:style-name="T112">（網路）雙重限制控制傳送速度</text:span><text:span text:style-name="T97">，透過 </text:span><text:span text:style-name="T155">Slow Start </text:span><text:span text:style-name="T97">指數試探、</text:span><text:span text:style-name="T155">Congestion Avoidance </text:span><text:span text:style-name="T97">線性增長、丟包後快速降速，</text:span><text:span text:style-name="T354">持續用 </text:span><text:span text:style-name="T359">ACK </text:span><text:span text:style-name="T354">當回饋調節</text:span><text:span text:style-name="T97">，確保資料可靠且高效地傳達。</text:span></text:p>
          </table:table-cell>
        </table:table-row>
      </table:table>
      <text:h text:style-name="P17" text:outline-level="1" loext:marker-style-name="T69"><text:span text:style-name="T70">第 六 篇　</text:span><text:span text:style-name="T69">DNS </text:span><text:span text:style-name="T70">與 </text:span><text:span text:style-name="T69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><text:span text:style-name="T196">💡 <text:s/></text:span><text:span text:style-name="T61">DNS </text:span><text:span text:style-name="T50">是什麼？</text:span></text:p>
            <text:p text:style-name="P7" loext:marker-style-name="T98"><text:span text:style-name="T155">DNS </text:span><text:span text:style-name="T97">就像「網路電話簿」。人類習慣記名字（</text:span><text:span text:style-name="T155">google.com</text:span><text:span text:style-name="T97">），但電腦只認識號碼（</text:span><text:span text:style-name="T155">IP </text:span><text:span text:style-name="T97">位址），</text:span><text:span text:style-name="T155">DNS </text:span><text:span text:style-name="T97">的工作就是幫你查出對應的號碼。全名 </text:span><text:span text:style-name="T155">Domain Name System</text:span><text:span text:style-name="T97">，是負責將「網域名稱」轉換為「</text:span><text:span text:style-name="T155">IP </text:span><text:span text:style-name="T97">位址」的分散式系統。</text:span></text:p>
          </table:table-cell>
        </table:table-row>
      </table:table>
      <text:h text:style-name="P11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4" loext:marker-style-name="T67"><text:span text:style-name="T68">類型</text:span><text:span text:style-name="T67"/></text:p>
            </table:table-cell>
            <table:table-cell table:style-name="表格83.A1" office:value-type="string">
              <text:p text:style-name="P4" loext:marker-style-name="T67"><text:span text:style-name="T68">全名</text:span><text:span text:style-name="T67"/></text:p>
            </table:table-cell>
            <table:table-cell table:style-name="表格83.A1" office:value-type="string">
              <text:p text:style-name="P4" loext:marker-style-name="T67"><text:span text:style-name="T68">用途</text:span><text:span text:style-name="T67"/></text:p>
            </table:table-cell>
            <table:table-cell table:style-name="表格83.A1" office:value-type="string">
              <text:p text:style-name="P4" loext:marker-style-name="T67"><text:span text:style-name="T68">範例</text:span><text:span text:style-name="T67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9" loext:marker-style-name="T85"><text:span text:style-name="T151">A</text:span><text:span text:style-name="T85"/></text:p>
          </table:table-cell>
          <table:table-cell table:style-name="表格83.A2" office:value-type="string">
            <text:p text:style-name="P29" loext:marker-style-name="T89"><text:span text:style-name="T149">Address Record</text:span><text:span text:style-name="T89"/></text:p>
          </table:table-cell>
          <table:table-cell table:style-name="表格83.A2" office:value-type="string">
            <text:p text:style-name="P29" loext:marker-style-name="T81"><text:span text:style-name="T82">網域名稱 → </text:span><text:span text:style-name="T401">IPv4 </text:span><text:span text:style-name="T375">位址</text:span></text:p>
          </table:table-cell>
          <table:table-cell table:style-name="表格83.A2" office:value-type="string">
            <text:p text:style-name="P29" loext:marker-style-name="T81"><text:span text:style-name="T147">google.com → 142.250.x.x</text:span><text:span text:style-name="T81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85"><text:span text:style-name="T151">NS</text:span><text:span text:style-name="T85"/></text:p>
          </table:table-cell>
          <table:table-cell table:style-name="表格83.A3" office:value-type="string">
            <text:p text:style-name="P29" loext:marker-style-name="T89"><text:span text:style-name="T149">Name Server</text:span><text:span text:style-name="T89"/></text:p>
          </table:table-cell>
          <table:table-cell table:style-name="表格83.A3" office:value-type="string">
            <text:p text:style-name="P29" loext:marker-style-name="T81"><text:span text:style-name="T82">指定</text:span><text:span text:style-name="T274">管理該網域的 </text:span><text:span text:style-name="T147">DNS </text:span><text:span text:style-name="T82">伺服器</text:span></text:p>
          </table:table-cell>
          <table:table-cell table:style-name="表格83.A3" office:value-type="string">
            <text:p text:style-name="P29" loext:marker-style-name="T81"><text:span text:style-name="T147">google.com → ns1.google.com</text:span><text:span text:style-name="T81"/></text:p>
          </table:table-cell>
        </table:table-row>
        <table:table-row table:style-name="表格83.1">
          <table:table-cell table:style-name="表格83.A2" office:value-type="string">
            <text:p text:style-name="P29" loext:marker-style-name="T85"><text:span text:style-name="T151">MX</text:span><text:span text:style-name="T85"/></text:p>
          </table:table-cell>
          <table:table-cell table:style-name="表格83.A2" office:value-type="string">
            <text:p text:style-name="P29" loext:marker-style-name="T89"><text:span text:style-name="T149">Mail Exchange</text:span><text:span text:style-name="T89"/></text:p>
          </table:table-cell>
          <table:table-cell table:style-name="表格83.A2" office:value-type="string">
            <text:p text:style-name="P29" loext:marker-style-name="T81"><text:span text:style-name="T82">指定</text:span><text:span text:style-name="T569">負責收發郵件的</text:span><text:span text:style-name="T82">伺服器</text:span></text:p>
          </table:table-cell>
          <table:table-cell table:style-name="表格83.A2" office:value-type="string">
            <text:p text:style-name="P29" loext:marker-style-name="T81"><text:span text:style-name="T147">google.com → mail.google.com</text:span><text:span text:style-name="T81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85"><text:span text:style-name="T151">CNAME</text:span><text:span text:style-name="T85"/></text:p>
          </table:table-cell>
          <table:table-cell table:style-name="表格83.A3" office:value-type="string">
            <text:p text:style-name="P29" loext:marker-style-name="T89"><text:span text:style-name="T149">Canonical Name</text:span><text:span text:style-name="T89"/></text:p>
          </table:table-cell>
          <table:table-cell table:style-name="表格83.A3" office:value-type="string">
            <text:p text:style-name="P29" loext:marker-style-name="T619"><text:span text:style-name="T618">設定網域別名，指向另一個網域</text:span><text:span text:style-name="T619"/></text:p>
          </table:table-cell>
          <table:table-cell table:style-name="表格83.A3" office:value-type="string">
            <text:p text:style-name="P29" loext:marker-style-name="T81"><text:span text:style-name="T147">www → google.com</text:span><text:span text:style-name="T81"/></text:p>
          </table:table-cell>
        </table:table-row>
      </table:table>
      <text:p text:style-name="P35" loext:marker-style-name="T6"><text:span text:style-name="T7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7">）</text:span></text:p>
      <text:h text:style-name="P11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6"><text:span text:style-name="T196">📚 <text:s/></text:span><text:span text:style-name="T50">圖書館找書比喻</text:span></text:p>
            <text:p text:style-name="P7" loext:marker-style-name="T98"><text:span text:style-name="T97">你要找一本書，書名叫「</text:span><text:span text:style-name="T155">google.com</text:span><text:span text:style-name="T97">」：</text:span></text:p>
            <text:p text:style-name="P8" loext:marker-style-name="T98"><text:span text:style-name="T155">① </text:span><text:span text:style-name="T97">先翻自己的筆記本（</text:span><text:span text:style-name="T155">Cache</text:span><text:span text:style-name="T97">）→ 記得放哪就直接去</text:span></text:p>
            <text:p text:style-name="P8" loext:marker-style-name="T98"><text:span text:style-name="T155">② </text:span><text:span text:style-name="T97">問圖書館員（</text:span><text:span text:style-name="T155">Local DNS</text:span><text:span text:style-name="T97">）→「你知道這本書嗎？」</text:span></text:p>
            <text:p text:style-name="P8" loext:marker-style-name="T98"><text:span text:style-name="T155">③ </text:span><text:span text:style-name="T97">館員問館長（</text:span><text:span text:style-name="T155">Root DNS</text:span><text:span text:style-name="T97">）→「這本是哪個分類？」→「外文區」</text:span></text:p>
            <text:p text:style-name="P8" loext:marker-style-name="T98"><text:span text:style-name="T155">④ </text:span><text:span text:style-name="T97">去外文區管理員（</text:span><text:span text:style-name="T155">TLD</text:span><text:span text:style-name="T97">：</text:span><text:span text:style-name="T155">.com</text:span><text:span text:style-name="T97">）→「</text:span><text:span text:style-name="T155">google </text:span><text:span text:style-name="T97">在哪個書架？」</text:span></text:p>
            <text:p text:style-name="P8" loext:marker-style-name="T98"><text:span text:style-name="T155">⑤ </text:span><text:span text:style-name="T97">書架管理員（</text:span><text:span text:style-name="T155">Authoritative DNS</text:span><text:span text:style-name="T97">）→ 直接給你確切位置（</text:span><text:span text:style-name="T155">IP</text:span><text:span text:style-name="T97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6" loext:marker-style-name="T73"><text:span text:style-name="T74">步驟</text:span><text:span text:style-name="T73"/></text:p>
          </table:table-cell>
          <table:table-cell table:style-name="表格84.A2" office:value-type="string">
            <text:p text:style-name="P26" loext:marker-style-name="T73"><text:span text:style-name="T74">層級</text:span><text:span text:style-name="T73"/></text:p>
          </table:table-cell>
          <table:table-cell table:style-name="表格84.A2" office:value-type="string">
            <text:p text:style-name="P26" loext:marker-style-name="T73"><text:span text:style-name="T74">說明</text:span><text:span text:style-name="T73"/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26"><text:span text:style-name="T179">1</text:span><text:span text:style-name="T126"/></text:p>
          </table:table-cell>
          <table:table-cell table:style-name="表格84.A3" office:value-type="string">
            <text:p text:style-name="P29" loext:marker-style-name="T463"><text:span text:style-name="T462">本機快取（</text:span><text:span text:style-name="T500">Cache</text:span><text:span text:style-name="T462">）</text:span></text:p>
          </table:table-cell>
          <table:table-cell table:style-name="表格84.A3" office:value-type="string">
            <text:p text:style-name="P29" loext:marker-style-name="T594"><text:span text:style-name="T593">先檢查電腦或瀏覽器有無記住此網址的 </text:span><text:span text:style-name="T597">IP</text:span><text:span text:style-name="T593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26"><text:span text:style-name="T179">2</text:span><text:span text:style-name="T126"/></text:p>
          </table:table-cell>
          <table:table-cell table:style-name="表格84.A4" office:value-type="string">
            <text:p text:style-name="P29" loext:marker-style-name="T278"><text:span text:style-name="T324">Local DNS </text:span><text:span text:style-name="T276">伺服器</text:span></text:p>
          </table:table-cell>
          <table:table-cell table:style-name="表格84.A4" office:value-type="string">
            <text:p text:style-name="P29" loext:marker-style-name="T126"><text:span text:style-name="T127">向 </text:span><text:span text:style-name="T189">ISP</text:span><text:span text:style-name="T138">（如中華電信）</text:span><text:span text:style-name="T127">或</text:span><text:span text:style-name="T138">自設 </text:span><text:span text:style-name="T189">DNS</text:span><text:span text:style-name="T138">（如 </text:span><text:span text:style-name="T189">8.8.8.8</text:span><text:span text:style-name="T138">）</text:span><text:span text:style-name="T127">查詢。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26"><text:span text:style-name="T179">3</text:span><text:span text:style-name="T126"/></text:p>
          </table:table-cell>
          <table:table-cell table:style-name="表格84.A3" office:value-type="string">
            <text:p text:style-name="P29" loext:marker-style-name="T564"><text:span text:style-name="T574">Root DNS </text:span><text:span text:style-name="T563">伺服器</text:span></text:p>
          </table:table-cell>
          <table:table-cell table:style-name="表格84.A3" office:value-type="string">
            <text:p text:style-name="P29" loext:marker-style-name="T126"><text:span text:style-name="T539">全球共 </text:span><text:span text:style-name="T553">13 </text:span><text:span text:style-name="T539">組根 </text:span><text:span text:style-name="T553">DNS</text:span><text:span text:style-name="T127">。不知道答案，但</text:span><text:span text:style-name="T140">會指向對應的 </text:span><text:span text:style-name="T190">TLD DNS</text:span><text:span text:style-name="T127">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26"><text:span text:style-name="T179">4</text:span><text:span text:style-name="T126"/></text:p>
          </table:table-cell>
          <table:table-cell table:style-name="表格84.A4" office:value-type="string">
            <text:p text:style-name="P29" loext:marker-style-name="T382"><text:span text:style-name="T404">TLD DNS </text:span><text:span text:style-name="T380">伺服器</text:span></text:p>
          </table:table-cell>
          <table:table-cell table:style-name="表格84.A4" office:value-type="string">
            <text:p text:style-name="P29" loext:marker-style-name="T126"><text:span text:style-name="T127">負責</text:span><text:span text:style-name="T620">管理頂層網域（</text:span><text:span text:style-name="T623">.com</text:span><text:span text:style-name="T620">、</text:span><text:span text:style-name="T623">.tw</text:span><text:span text:style-name="T620">）</text:span><text:span text:style-name="T127">。</text:span><text:span text:style-name="T140">回應 </text:span><text:span text:style-name="T190">Authoritative DNS </text:span><text:span text:style-name="T140">的位置。</text:span><text:span text:style-name="T275">「</text:span><text:span text:style-name="T326">TLD </text:span><text:span text:style-name="T275">是 </text:span><text:span text:style-name="T326">Top-Level Domain</text:span><text:span text:style-name="T275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26"><text:span text:style-name="T179">5</text:span><text:span text:style-name="T126"/></text:p>
          </table:table-cell>
          <table:table-cell table:style-name="表格84.A3" office:value-type="string">
            <text:p text:style-name="P29" loext:marker-style-name="T603"><text:span text:style-name="T609">Authoritative DNS</text:span><text:span text:style-name="T603"/></text:p>
          </table:table-cell>
          <table:table-cell table:style-name="表格84.A3" office:value-type="string">
            <text:p text:style-name="P29" loext:marker-style-name="T126"><text:span text:style-name="T138">真正儲存答案的伺服器</text:span><text:span text:style-name="T127">，直接回傳正確的 </text:span><text:span text:style-name="T179">IP </text:span><text:span text:style-name="T127">位址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26"><text:span text:style-name="T179">6</text:span><text:span text:style-name="T126"/></text:p>
          </table:table-cell>
          <table:table-cell table:style-name="表格84.A4" office:value-type="string">
            <text:p text:style-name="P29" loext:marker-style-name="T126"><text:span text:style-name="T127">回傳 </text:span><text:span text:style-name="T179">IP </text:span><text:span text:style-name="T127">位址 ✓</text:span></text:p>
          </table:table-cell>
          <table:table-cell table:style-name="表格84.A4" office:value-type="string">
            <text:p text:style-name="P29" loext:marker-style-name="T126"><text:span text:style-name="T127">瀏覽器取得 </text:span><text:span text:style-name="T179">IP </text:span><text:span text:style-name="T127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6"><text:span text:style-name="T196">📌 <text:s/></text:span><text:span text:style-name="T250">一句話總結</text:span></text:p>
            <text:p text:style-name="P7" loext:marker-style-name="T98"><text:span text:style-name="T155">DNS </text:span><text:span text:style-name="T97">解析為「由快取開始，經 </text:span><text:span text:style-name="T155">Local DNS</text:span><text:span text:style-name="T97">，逐層向 </text:span><text:span text:style-name="T155">Root</text:span><text:span text:style-name="T97">、</text:span><text:span text:style-name="T155">TLD</text:span><text:span text:style-name="T97">、</text:span><text:span text:style-name="T155">Authoritative DNS </text:span><text:span text:style-name="T97">查詢，最後取得 </text:span><text:span text:style-name="T155">IP </text:span><text:span text:style-name="T97">位址」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6"><text:span text:style-name="T196">⚠️ <text:s/></text:span><text:span text:style-name="T218">最關鍵的差別</text:span></text:p>
            <text:p text:style-name="P7" loext:marker-style-name="T98"><text:span text:style-name="T112">兩種方式的路徑相同</text:span><text:span text:style-name="T97">（</text:span><text:span text:style-name="T155">Cache → Local → Root → TLD → Auth</text:span><text:span text:style-name="T97">），</text:span><text:span text:style-name="T336">唯一差別只有一件事：「誰去問」</text:span><text:span text:style-name="T97">。</text:span></text:p>
            <text:p text:style-name="P8" loext:marker-style-name="T98"><text:span text:style-name="T155">→ </text:span><text:span text:style-name="T315">DNS </text:span><text:span text:style-name="T291">幫你問完 ＝ </text:span><text:span text:style-name="T315">Recursive</text:span><text:span text:style-name="T291">（遞迴）</text:span><text:span text:style-name="T97">；</text:span><text:span text:style-name="T394">你自己去問 ＝ </text:span><text:span text:style-name="T415">Iterative</text:span><text:span text:style-name="T394">（反覆）</text:span><text:span text:style-name="T97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4" loext:marker-style-name="T67"><text:span text:style-name="T68">比較項目</text:span><text:span text:style-name="T67"/></text:p>
          </table:table-cell>
          <table:table-cell table:style-name="表格85.A2" office:value-type="string">
            <text:p text:style-name="P4" loext:marker-style-name="T67"><text:span text:style-name="T77">Recursive</text:span><text:span text:style-name="T68">（遞迴）</text:span></text:p>
          </table:table-cell>
          <table:table-cell table:style-name="表格85.A2" office:value-type="string">
            <text:p text:style-name="P4" loext:marker-style-name="T67"><text:span text:style-name="T77">Iterative</text:span><text:span text:style-name="T68">（反覆）</text:span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1"><text:span text:style-name="T82">誰去問</text:span><text:span text:style-name="T81"/></text:p>
          </table:table-cell>
          <table:table-cell table:style-name="表格85.A3" office:value-type="string">
            <text:p text:style-name="P29" loext:marker-style-name="T89"><text:span text:style-name="T149">DNS </text:span><text:span text:style-name="T88">伺服器代替你問完</text:span></text:p>
          </table:table-cell>
          <table:table-cell table:style-name="表格85.A3" office:value-type="string">
            <text:p text:style-name="P29" loext:marker-style-name="T85"><text:span text:style-name="T84">你自己逐層查詢</text:span><text:span text:style-name="T85"/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1"><text:span text:style-name="T82">問幾次</text:span><text:span text:style-name="T81"/></text:p>
          </table:table-cell>
          <table:table-cell table:style-name="表格85.A4" office:value-type="string">
            <text:p text:style-name="P29" loext:marker-style-name="T89"><text:span text:style-name="T88">你只問 </text:span><text:span text:style-name="T149">1 </text:span><text:span text:style-name="T88">次</text:span></text:p>
          </table:table-cell>
          <table:table-cell table:style-name="表格85.A4" office:value-type="string">
            <text:p text:style-name="P29" loext:marker-style-name="T85"><text:span text:style-name="T84">每層各問一次，共多次</text:span><text:span text:style-name="T85"/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1"><text:span text:style-name="T82">常見場合</text:span><text:span text:style-name="T81"/></text:p>
          </table:table-cell>
          <table:table-cell table:style-name="表格85.A3" office:value-type="string">
            <text:p text:style-name="P29" loext:marker-style-name="T81"><text:span text:style-name="T82">一般使用者 → </text:span><text:span text:style-name="T147">Local DNS</text:span></text:p>
          </table:table-cell>
          <table:table-cell table:style-name="表格85.A3" office:value-type="string">
            <text:p text:style-name="P29" loext:marker-style-name="T81"><text:span text:style-name="T147">DNS </text:span><text:span text:style-name="T82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1"><text:span text:style-name="T82">記憶口訣</text:span><text:span text:style-name="T81"/></text:p>
          </table:table-cell>
          <table:table-cell table:style-name="表格85.A4" office:value-type="string">
            <text:p text:style-name="P29" loext:marker-style-name="T206"><text:span text:style-name="T207">代查到底</text:span><text:span text:style-name="T206"/></text:p>
          </table:table-cell>
          <table:table-cell table:style-name="表格85.A4" office:value-type="string">
            <text:p text:style-name="P29" loext:marker-style-name="T33"><text:span text:style-name="T34">逐層詢問</text:span><text:span text:style-name="T33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6"><text:span text:style-name="T196">🗣️ <text:s/></text:span><text:span text:style-name="T50">問路比喻</text:span></text:p>
            <text:p text:style-name="P7"><text:span text:style-name="T64">Recursive</text:span><text:span text:style-name="T56">（朋友幫你問完）</text:span><text:span text:style-name="T55">：</text:span><text:span text:style-name="T110">你只問朋友（</text:span><text:span text:style-name="T165">Local DNS</text:span><text:span text:style-name="T110">）一次</text:span><text:span text:style-name="T97">「台北</text:span><text:span text:style-name="T155">101</text:span><text:span text:style-name="T97">在哪？」朋友自己跑完 </text:span><text:span text:style-name="T155">Root→TLD→Auth</text:span><text:span text:style-name="T97">，回你 </text:span><text:span text:style-name="T155">IP</text:span><text:span text:style-name="T97">，你沒動過。</text:span></text:p>
            <text:p text:style-name="P8"><text:span text:style-name="T64">Iterative</text:span><text:span text:style-name="T56">（你自己跑全程）</text:span><text:span text:style-name="T55">：</text:span><text:span text:style-name="T97">你問 </text:span><text:span text:style-name="T155">Root</text:span><text:span text:style-name="T97">「我不知道，去問 </text:span><text:span text:style-name="T155">TLD</text:span><text:span text:style-name="T97">」→ 你問 </text:span><text:span text:style-name="T155">TLD</text:span><text:span text:style-name="T97">「去問 </text:span><text:span text:style-name="T155">Auth</text:span><text:span text:style-name="T97">」→ 你問 </text:span><text:span text:style-name="T155">Auth </text:span><text:span text:style-name="T97">拿到 </text:span><text:span text:style-name="T155">IP</text:span><text:span text:style-name="T97">，全程你自己跑。</text:span></text:p>
            <text:p text:style-name="P8"><text:span text:style-name="T24">為什麼有兩種？</text:span><text:span text:style-name="T293">一般使用者採 </text:span><text:span text:style-name="T317">Recursive</text:span><text:span text:style-name="T293">（簡單方便）</text:span><text:span text:style-name="T97">；</text:span><text:span text:style-name="T416">DNS </text:span><text:span text:style-name="T395">伺服器之間採 </text:span><text:span text:style-name="T416">Iterative</text:span><text:span text:style-name="T97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Open Resolver </text:span><text:span text:style-name="T28">風險</text:span></text:h>
      <text:p text:style-name="P35" loext:marker-style-name="T98"><text:span text:style-name="T167">Open Resolver </text:span><text:span text:style-name="T97">是</text:span><text:span text:style-name="T592">對外完全開放、任何人都可以使用的 </text:span><text:span text:style-name="T596">DNS </text:span><text:span text:style-name="T592">伺服器</text:span><text:span text:style-name="T97">；因為</text:span><text:span text:style-name="T110">沒有存取限制，容易成為攻擊目標</text:span><text:span text:style-name="T97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6" loext:marker-style-name="T67"><text:span text:style-name="T77">⚠️ Cache Poisoning</text:span><text:span text:style-name="T68">（快取污染）</text:span></text:p>
            </table:table-cell>
            <table:table-cell table:style-name="表格86.A1" office:value-type="string">
              <text:p text:style-name="P26" loext:marker-style-name="T67"><text:span text:style-name="T77">⚡ DDoS </text:span><text:span text:style-name="T68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9" loext:marker-style-name="T81"><text:span text:style-name="T475">攻擊者偽造 </text:span><text:span text:style-name="T492">DNS </text:span><text:span text:style-name="T475">回應</text:span><text:span text:style-name="T82">，</text:span><text:span text:style-name="T332">將惡意 </text:span><text:span text:style-name="T341">IP </text:span><text:span text:style-name="T332">植入 </text:span><text:span text:style-name="T341">DNS </text:span><text:span text:style-name="T332">快取，使用者被引導至釣魚網站</text:span><text:span text:style-name="T82">。流程：偽造回應 → </text:span><text:span text:style-name="T147">DNS </text:span><text:span text:style-name="T82">存假 </text:span><text:span text:style-name="T147">IP → </text:span><text:span text:style-name="T82">用戶連到釣魚網站。</text:span></text:p>
          </table:table-cell>
          <table:table-cell table:style-name="表格86.A2" office:value-type="string">
            <text:p text:style-name="P29" loext:marker-style-name="T81"><text:span text:style-name="T535">攻擊者偽造受害者 </text:span><text:span text:style-name="T552">IP </text:span><text:span text:style-name="T347">發送查詢</text:span><text:span text:style-name="T82">，</text:span><text:span text:style-name="T341">DNS </text:span><text:span text:style-name="T332">回傳大量資料給受害者，形成流量放大效果</text:span><text:span text:style-name="T82">。流程：小封包 → </text:span><text:span text:style-name="T147">DNS </text:span><text:span text:style-name="T82">回超大資料 → 灌爆受害者。</text:span></text:p>
          </table:table-cell>
        </table:table-row>
      </table:table>
      <text:h text:style-name="P11" text:outline-level="2" loext:marker-style-name="T27"><text:span text:style-name="T28">五、</text:span><text:span text:style-name="T27">DNSSEC — DNS </text:span><text:span text:style-name="T28">安全機制</text:span></text:h>
      <text:p text:style-name="P35" loext:marker-style-name="T98"><text:span text:style-name="T155">DNSSEC</text:span><text:span text:style-name="T97">（</text:span><text:span text:style-name="T155">DNS Security Extensions</text:span><text:span text:style-name="T97">）透過</text:span><text:span text:style-name="T483">數位簽章機制</text:span><text:span text:style-name="T97">，</text:span><text:span text:style-name="T426">讓接收方能驗證 </text:span><text:span text:style-name="T441">DNS </text:span><text:span text:style-name="T426">回應的真實性與完整性</text:span><text:span text:style-name="T97">，</text:span><text:span text:style-name="T112">防止資料被偽造或篡改</text:span><text:span text:style-name="T97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6" loext:marker-style-name="T67"><text:span text:style-name="T77">✅ DNSSEC </text:span><text:span text:style-name="T68">可以防禦</text:span></text:p>
            </table:table-cell>
            <table:table-cell table:style-name="表格87.A1" office:value-type="string">
              <text:p text:style-name="P26" loext:marker-style-name="T67"><text:span text:style-name="T77">❌ DNSSEC </text:span><text:span text:style-name="T68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9" loext:marker-style-name="T81"><text:span text:style-name="T82">防止 </text:span><text:span text:style-name="T147">DNS Spoofing</text:span><text:span text:style-name="T82">（假回應）／防止 </text:span><text:span text:style-name="T147">Cache Poisoning</text:span><text:span text:style-name="T82">（快取污染）／</text:span><text:span text:style-name="T476">驗證資料完整性與來源真實性</text:span></text:p>
          </table:table-cell>
          <table:table-cell table:style-name="表格87.A2" office:value-type="string">
            <text:p text:style-name="P29" loext:marker-style-name="T81"><text:span text:style-name="T82">不提供加密功能（非 </text:span><text:span text:style-name="T147">HTTPS</text:span><text:span text:style-name="T82">）／</text:span><text:span text:style-name="T274">無法防禦 </text:span><text:span text:style-name="T307">DoS / DDoS </text:span><text:span text:style-name="T274">攻擊</text:span><text:span text:style-name="T82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6"><text:span text:style-name="T196">⚠️ <text:s/></text:span><text:span text:style-name="T250">最重要的一句話</text:span></text:p>
            <text:p text:style-name="P7" loext:marker-style-name="T254"><text:span text:style-name="T258">DNSSEC</text:span><text:span text:style-name="T257"> = </text:span><text:span text:style-name="T255">驗證真偽，不是加密，不防 </text:span><text:span text:style-name="T259">DDoS</text:span></text:p>
          </table:table-cell>
          <table:covered-table-cell/>
        </table:table-row>
      </table:table>
      <text:h text:style-name="P11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6"><text:span text:style-name="T196">🔍 <text:s/></text:span><text:span text:style-name="T50">診斷結論</text:span></text:p>
            <text:p text:style-name="P7" loext:marker-style-name="T98"><text:span text:style-name="T97">能用 </text:span><text:span text:style-name="T155">IP </text:span><text:span text:style-name="T97">連線（</text:span><text:span text:style-name="T155">ping 142.250.1.1 </text:span><text:span text:style-name="T97">成功），但無法用網域名稱連線（</text:span><text:span text:style-name="T155">ping google.com </text:span><text:span text:style-name="T97">失敗）→ </text:span><text:span text:style-name="T155">DNS </text:span><text:span text:style-name="T97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6"><text:span text:style-name="T196">📝 <text:s/></text:span><text:span text:style-name="T240">申論題標準答案</text:span></text:p>
            <text:p text:style-name="P7"><text:span text:style-name="T241">一、</text:span><text:span text:style-name="T245">DNS </text:span><text:span text:style-name="T241">功能：</text:span><text:span text:style-name="T155">DNS </text:span><text:span text:style-name="T97">為網際網路中負責</text:span><text:span text:style-name="T290">將網域名稱轉換為 </text:span><text:span text:style-name="T314">IP </text:span><text:span text:style-name="T290">位址</text:span><text:span text:style-name="T97">的分散式系統。</text:span></text:p>
            <text:p text:style-name="P8"><text:span text:style-name="T241">二、查詢流程：</text:span><text:span text:style-name="T97">由</text:span><text:span text:style-name="T112">快取</text:span><text:span text:style-name="T97">開始，依序向 </text:span><text:span text:style-name="T167">Local DNS</text:span><text:span text:style-name="T97">、</text:span><text:span text:style-name="T167">Root DNS</text:span><text:span text:style-name="T97">、</text:span><text:span text:style-name="T167">TLD DNS</text:span><text:span text:style-name="T97">、</text:span><text:span text:style-name="T167">Authoritative DN</text:span><text:span text:style-name="T155">S </text:span><text:span text:style-name="T97">查詢，最終取得 </text:span><text:span text:style-name="T155">IP </text:span><text:span text:style-name="T97">位址。</text:span></text:p>
            <text:p text:style-name="P8"><text:span text:style-name="T241">三、</text:span><text:span text:style-name="T245">Recursive</text:span><text:span text:style-name="T241">：</text:span><text:span text:style-name="T97">由 </text:span><text:span text:style-name="T155">DNS </text:span><text:span text:style-name="T97">伺服器代替用戶端完整查詢並直接回傳最終 </text:span><text:span text:style-name="T155">IP</text:span><text:span text:style-name="T97">，用戶端只需等待結果。</text:span></text:p>
            <text:p text:style-name="P8"><text:span text:style-name="T241">四、</text:span><text:span text:style-name="T245">Iterative</text:span><text:span text:style-name="T241">：</text:span><text:span text:style-name="T155">DNS </text:span><text:span text:style-name="T97">伺服器僅回應下一步查詢位置，由用戶端自行逐層向各 </text:span><text:span text:style-name="T155">DNS </text:span><text:span text:style-name="T97">查詢，直到取得 </text:span><text:span text:style-name="T155">IP</text:span><text:span text:style-name="T97">。</text:span></text:p>
            <text:p text:style-name="P8"><text:span text:style-name="T241">五、</text:span><text:span text:style-name="T245">DNSSEC</text:span><text:span text:style-name="T241">：</text:span><text:span text:style-name="T97">透過</text:span><text:span text:style-name="T112">數位簽章</text:span><text:span text:style-name="T626">驗證 </text:span><text:span text:style-name="T627">DNS </text:span><text:span text:style-name="T626">回應真實性</text:span><text:span text:style-name="T97">，可防 </text:span><text:span text:style-name="T155">DNS Spoofing </text:span><text:span text:style-name="T97">及 </text:span><text:span text:style-name="T155">Cache Poisoning</text:span><text:span text:style-name="T97">，但不提供加密，也</text:span><text:span text:style-name="T294">無法防禦 </text:span><text:span text:style-name="T318">DDoS</text:span><text:span text:style-name="T97">。</text:span></text:p>
          </table:table-cell>
        </table:table-row>
      </table:table>
      <text:h text:style-name="P17" text:outline-level="1" loext:marker-style-name="T69"><text:span text:style-name="T70">第 七 篇　路由協定：</text:span><text:span text:style-name="T69">OSPF </text:span><text:span text:style-name="T70">與 </text:span><text:span text:style-name="T69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6"><text:span text:style-name="T196">🗺️ <text:s/></text:span><text:span text:style-name="T50">在解決什麼問題？</text:span></text:p>
            <text:p text:style-name="P7" loext:marker-style-name="T98"><text:span text:style-name="T97">網路上有無數個</text:span><text:span text:style-name="T112">路由器（</text:span><text:span text:style-name="T167">Router</text:span><text:span text:style-name="T112">）</text:span><text:span text:style-name="T97">，它們只有一個任務：「</text:span><text:span text:style-name="T286">資料要走哪條路才能抵達目的地？</text:span><text:span text:style-name="T97">」</text:span><text:span text:style-name="T336">它們需要一套共通的對話規則，這就是路由協定</text:span><text:span text:style-name="T97">。</text:span></text:p>
          </table:table-cell>
        </table:table-row>
      </table:table>
      <text:h text:style-name="P11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6" loext:marker-style-name="T67"><text:span text:style-name="T77">🏢 IGP — </text:span><text:span text:style-name="T68">內部用</text:span></text:p>
            </table:table-cell>
            <table:table-cell table:style-name="表格90.A1" office:value-type="string">
              <text:p text:style-name="P26" loext:marker-style-name="T67"><text:span text:style-name="T77">🌍 EGP — </text:span><text:span text:style-name="T68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9" loext:marker-style-name="T81"><text:span text:style-name="T149">Interior Gateway Protocol</text:span><text:span text:style-name="T82">，在</text:span><text:span text:style-name="T375">同一個組織內部使用</text:span><text:span text:style-name="T82">（公司內網、校園網路）。常見：</text:span><text:span text:style-name="T147">OSPF</text:span><text:span text:style-name="T82">（最主流）、</text:span><text:span text:style-name="T147">RIP</text:span><text:span text:style-name="T82">（較舊）。</text:span></text:p>
          </table:table-cell>
          <table:table-cell table:style-name="表格90.A2" office:value-type="string">
            <text:p text:style-name="P29" loext:marker-style-name="T81"><text:span text:style-name="T149">Exterior Gateway Protocol</text:span><text:span text:style-name="T82">，</text:span><text:span text:style-name="T274">在不同組織之間使用</text:span><text:span text:style-name="T82">（中華電信 ↔ </text:span><text:span text:style-name="T147">Google</text:span><text:span text:style-name="T82">、</text:span><text:span text:style-name="T147">ISP ↔ ISP</text:span><text:span text:style-name="T82">）。目前唯一在用：</text:span><text:span text:style-name="T147">BGP</text:span><text:span text:style-name="T82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6"><text:span text:style-name="T196">⚡ <text:s/></text:span><text:span text:style-name="T200">一句話記憶法</text:span></text:p>
            <text:p text:style-name="P7" loext:marker-style-name="T98"><text:span text:style-name="T529">公司／校園內 → 用 </text:span><text:span text:style-name="T547">IGP</text:span><text:span text:style-name="T97">（</text:span><text:span text:style-name="T308">OSPF</text:span><text:span text:style-name="T155"> </text:span><text:span text:style-name="T97">或 </text:span><text:span text:style-name="T155">RIP</text:span><text:span text:style-name="T97">）；</text:span><text:span text:style-name="T530">公司與公司間 → 用 </text:span><text:span text:style-name="T548">EGP</text:span><text:span text:style-name="T97">（</text:span><text:span text:style-name="T308">BGP</text:span><text:span text:style-name="T97">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OSPF </text:span><text:span text:style-name="T28">的核心概念</text:span></text:h>
      <text:p text:style-name="P35" loext:marker-style-name="T98"><text:span text:style-name="T308">OSPF</text:span><text:span text:style-name="T286">（</text:span><text:span text:style-name="T308">Open Shortest Path First</text:span><text:span text:style-name="T286">）</text:span><text:span text:style-name="T97">是 </text:span><text:span text:style-name="T167">IGP </text:span><text:span text:style-name="T112">裡最主流的協定</text:span><text:span text:style-name="T97">，最大特色是</text:span><text:span text:style-name="T484">把網路切成多個區域（</text:span><text:span text:style-name="T499">Area</text:span><text:span text:style-name="T484">）管理</text:span><text:span text:style-name="T97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6"><text:span text:style-name="T196">📌 <text:s/></text:span><text:span text:style-name="T250">最重要的規定</text:span></text:p>
            <text:p text:style-name="P7" loext:marker-style-name="T98"><text:span text:style-name="T395">所有 </text:span><text:span text:style-name="T416">Area </text:span><text:span text:style-name="T395">都必須連到 </text:span><text:span text:style-name="T416">Area 0</text:span><text:span text:style-name="T395">（骨幹區域）</text:span><text:span text:style-name="T97">。</text:span><text:span text:style-name="T549">Area 0 </text:span><text:span text:style-name="T531">就像高速公路主幹道，其他 </text:span><text:span text:style-name="T549">Area </text:span><text:span text:style-name="T531">是交流道</text:span><text:span text:style-name="T97">。</text:span></text:p>
          </table:table-cell>
        </table:table-row>
      </table:table>
      <text:h text:style-name="P11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35" loext:marker-style-name="T98"><text:span text:style-name="T97">把整個 </text:span><text:span text:style-name="T155">OSPF </text:span><text:span text:style-name="T97">網路想像成一座城市：</text:span><text:span text:style-name="T112">城市裡有很多「區（</text:span><text:span text:style-name="T167">Area</text:span><text:span text:style-name="T112">）」像大樓</text:span><text:span text:style-name="T97">；</text:span><text:span text:style-name="T628">中間一定有「主幹道」就是 </text:span><text:span text:style-name="T629">Area 0</text:span><text:span text:style-name="T628">；所有大樓要互通都必須先連到 </text:span><text:span text:style-name="T629">Area 0</text:span><text:span text:style-name="T97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" loext:marker-style-name="T73"><text:span text:style-name="T74">類型</text:span><text:span text:style-name="T73"/></text:p>
            </table:table-cell>
            <table:table-cell table:style-name="表格92.A1" office:value-type="string">
              <text:p text:style-name="P4" loext:marker-style-name="T73"><text:span text:style-name="T74">本質</text:span><text:span text:style-name="T73"/></text:p>
            </table:table-cell>
            <table:table-cell table:style-name="表格92.A1" office:value-type="string">
              <text:p text:style-name="P4" loext:marker-style-name="T73"><text:span text:style-name="T74">核心記憶點</text:span><text:span text:style-name="T73"/></text:p>
            </table:table-cell>
            <table:table-cell table:style-name="表格92.A1" office:value-type="string">
              <text:p text:style-name="P4" loext:marker-style-name="T73"><text:span text:style-name="T74">比喻</text:span><text:span text:style-name="T73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9" loext:marker-style-name="T126"><text:span text:style-name="T179">① Internal</text:span><text:span text:style-name="T126"/></text:p>
          </table:table-cell>
          <table:table-cell table:style-name="表格92.A2" office:value-type="string">
            <text:p text:style-name="P29" loext:marker-style-name="T126"><text:span text:style-name="T127">不出 </text:span><text:span text:style-name="T179">Area</text:span></text:p>
          </table:table-cell>
          <table:table-cell table:style-name="表格92.A2" office:value-type="string">
            <text:p text:style-name="P29" loext:marker-style-name="T126"><text:span text:style-name="T127">只在同一個 </text:span><text:span text:style-name="T179">Area </text:span><text:span text:style-name="T127">裡活動，對外一無所知</text:span></text:p>
          </table:table-cell>
          <table:table-cell table:style-name="表格92.A2" office:value-type="string">
            <text:p text:style-name="P29" loext:marker-style-name="T126"><text:span text:style-name="T127">只在一個辦公室活動的員工</text:span><text:span text:style-name="T126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26"><text:span text:style-name="T179">② </text:span><text:span text:style-name="T630">Backbone</text:span></text:p>
          </table:table-cell>
          <table:table-cell table:style-name="表格92.A3" office:value-type="string">
            <text:p text:style-name="P29" loext:marker-style-name="T631"><text:span text:style-name="T632">在 </text:span><text:span text:style-name="T630">Area 0</text:span></text:p>
          </table:table-cell>
          <table:table-cell table:style-name="表格92.A3" office:value-type="string">
            <text:p text:style-name="P29" loext:marker-style-name="T126"><text:span text:style-name="T632">核心骨幹節點</text:span><text:span text:style-name="T127">，所有跨區流量都經過這裡</text:span></text:p>
          </table:table-cell>
          <table:table-cell table:style-name="表格92.A3" office:value-type="string">
            <text:p text:style-name="P29" loext:marker-style-name="T466"><text:span text:style-name="T467">高速公路主幹上的節點</text:span><text:span text:style-name="T466"/></text:p>
          </table:table-cell>
        </table:table-row>
        <table:table-row table:style-name="表格92.1">
          <table:table-cell table:style-name="表格92.A2" office:value-type="string">
            <text:p text:style-name="P29" loext:marker-style-name="T126"><text:span text:style-name="T179">③ </text:span><text:span text:style-name="T554">ABR</text:span></text:p>
          </table:table-cell>
          <table:table-cell table:style-name="表格92.A2" office:value-type="string">
            <text:p text:style-name="P29" loext:marker-style-name="T540"><text:span text:style-name="T541">跨 </text:span><text:span text:style-name="T554">Area </text:span><text:span text:style-name="T541">橋樑</text:span></text:p>
          </table:table-cell>
          <table:table-cell table:style-name="表格92.A2" office:value-type="string">
            <text:p text:style-name="P29" loext:marker-style-name="T540"><text:span text:style-name="T541">同時連 </text:span><text:span text:style-name="T554">Area 0 </text:span><text:span text:style-name="T541">與其他 </text:span><text:span text:style-name="T554">Area</text:span><text:span text:style-name="T541">，是區域間唯一合法的橋</text:span></text:p>
          </table:table-cell>
          <table:table-cell table:style-name="表格92.A2" office:value-type="string">
            <text:p text:style-name="P29" loext:marker-style-name="T335"><text:span text:style-name="T334">不同部門之間的聯絡窗口</text:span><text:span text:style-name="T335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26"><text:span text:style-name="T179">④ </text:span><text:span text:style-name="T404">ASBR</text:span></text:p>
          </table:table-cell>
          <table:table-cell table:style-name="表格92.A3" office:value-type="string">
            <text:p text:style-name="P29" loext:marker-style-name="T126"><text:span text:style-name="T127">跨 </text:span><text:span text:style-name="T179">AS </text:span><text:span text:style-name="T127">入口</text:span></text:p>
          </table:table-cell>
          <table:table-cell table:style-name="表格92.A3" office:value-type="string">
            <text:p text:style-name="P29" loext:marker-style-name="T126"><text:span text:style-name="T127">把外部路由（</text:span><text:span text:style-name="T179">BGP/</text:span><text:span text:style-name="T127">靜態）引入 </text:span><text:span text:style-name="T179">OSPF</text:span><text:span text:style-name="T127">，</text:span><text:span text:style-name="T275">是對外入口</text:span></text:p>
          </table:table-cell>
          <table:table-cell table:style-name="表格92.A3" office:value-type="string">
            <text:p text:style-name="P29" loext:marker-style-name="T126"><text:span text:style-name="T127">公司對外的大門警衛室</text:span><text:span text:style-name="T12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6"><text:span text:style-name="T196">⚠️ <text:s/></text:span><text:span text:style-name="T218">考試最愛考的三個陷阱</text:span></text:p>
            <text:p text:style-name="P7"><text:span text:style-name="T236">✗ ABR </text:span><text:span text:style-name="T228">負責連接外部網路　→　</text:span><text:span text:style-name="T97">✓</text:span><text:span text:style-name="T110"> </text:span><text:span text:style-name="T165">ABR </text:span><text:span text:style-name="T110">只負責 </text:span><text:span text:style-name="T165">Area </text:span><text:span text:style-name="T110">之間的橋樑</text:span><text:span text:style-name="T97">，對外是 </text:span><text:span text:style-name="T155">ASBR </text:span><text:span text:style-name="T97">的工作。</text:span></text:p>
            <text:p text:style-name="P8"><text:span text:style-name="T236">✗ ASBR </text:span><text:span text:style-name="T228">是用來跨越不同 </text:span><text:span text:style-name="T236">Area</text:span><text:span text:style-name="T228">　→　</text:span><text:span text:style-name="T97">✓ </text:span><text:span text:style-name="T165">ASBR </text:span><text:span text:style-name="T110">是跨越不同 </text:span><text:span text:style-name="T165">AS</text:span><text:span text:style-name="T110">（整個系統）</text:span><text:span text:style-name="T97">，不是跨 </text:span><text:span text:style-name="T155">Area</text:span><text:span text:style-name="T97">。</text:span></text:p>
            <text:p text:style-name="P8"><text:span text:style-name="T236">✗ </text:span><text:span text:style-name="T228">任意兩個 </text:span><text:span text:style-name="T236">Area </text:span><text:span text:style-name="T228">可直接相連　→　</text:span><text:span text:style-name="T97">✓ </text:span><text:span text:style-name="T336">所有 </text:span><text:span text:style-name="T344">Area </text:span><text:span text:style-name="T336">一定要透過 </text:span><text:span text:style-name="T344">Area 0 </text:span><text:span text:style-name="T336">才能互通，不能繞過</text:span><text:span text:style-name="T97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6" loext:marker-style-name="T67"><text:span text:style-name="T77">📦 Route</text:span><text:span text:style-name="T68">（路由）</text:span></text:p>
            </table:table-cell>
            <table:table-cell table:style-name="表格93.A1" office:value-type="string">
              <text:p text:style-name="P26" loext:marker-style-name="T67"><text:span text:style-name="T77">📜 AS-PATH</text:span><text:span text:style-name="T67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9" loext:marker-style-name="T81"><text:span text:style-name="T82">回答「封包下一步要丟給誰？」。這是路由器最後做出</text:span><text:soft-page-break/><text:span text:style-name="T82">的轉送決定，對應到一個 </text:span><text:span text:style-name="T147">Next-Hop</text:span><text:span text:style-name="T82">（下一跳）。</text:span></text:p>
          </table:table-cell>
          <table:table-cell table:style-name="表格93.A2" office:value-type="string">
            <text:p text:style-name="P29" loext:marker-style-name="T81"><text:span text:style-name="T82">回答「這條路由消息一路經過了哪些 </text:span><text:span text:style-name="T147">AS</text:span><text:span text:style-name="T82">（自治系統）？」。它是一串 </text:span><text:span text:style-name="T147">AS </text:span><text:span text:style-name="T82">編號名單，也是 </text:span><text:span text:style-name="T302">BGP</text:span><text:span text:style-name="T147"> </text:span><text:span text:style-name="T82">用來判</text:span><text:soft-page-break/><text:span text:style-name="T82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9" loext:marker-style-name="T81"><text:span text:style-name="T82">是</text:span><text:span text:style-name="T375">「實際的轉送動作」——封包真的會照它走</text:span><text:span text:style-name="T82">。</text:span></text:p>
          </table:table-cell>
          <table:table-cell table:style-name="表格93.A2" office:value-type="string">
            <text:p text:style-name="P29" loext:marker-style-name="T81"><text:span text:style-name="T82">是</text:span><text:span text:style-name="T536">「這條路的來歷（履歷）」——封包根本看不到它</text:span><text:span text:style-name="T82">，</text:span><text:span text:style-name="T330">它只給 </text:span><text:span text:style-name="T339">BGP </text:span><text:span text:style-name="T330">參考</text:span><text:span text:style-name="T82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6"><text:span text:style-name="T196">🔎 <text:s/></text:span><text:span text:style-name="T50">看一個例子：兩條路由二選一</text:span></text:p>
            <text:p text:style-name="P7" loext:marker-style-name="T98"><text:span text:style-name="T165">Google </text:span><text:span text:style-name="T110">同時收到兩條到 </text:span><text:span text:style-name="T165">1.1.1.0/24 </text:span><text:span text:style-name="T110">的路由廣告</text:span><text:span text:style-name="T97">：</text:span><text:span text:style-name="T167">ISP A </text:span><text:span text:style-name="T112">的 </text:span><text:span text:style-name="T167">AS-PATH </text:span><text:span text:style-name="T112">是「</text:span><text:span text:style-name="T167">100 200 300</text:span><text:span text:style-name="T112">」（經過 </text:span><text:span text:style-name="T167">3 </text:span><text:span text:style-name="T112">個 </text:span><text:span text:style-name="T167">AS</text:span><text:span text:style-name="T112">）</text:span><text:span text:style-name="T97">，</text:span><text:span text:style-name="T167">ISP B </text:span><text:span text:style-name="T112">的 </text:span><text:span text:style-name="T167">AS-PATH </text:span><text:span text:style-name="T112">是「</text:span><text:span text:style-name="T167">400 300</text:span><text:span text:style-name="T112">」（只經過 </text:span><text:span text:style-name="T167">2 </text:span><text:span text:style-name="T112">個 </text:span><text:span text:style-name="T167">AS</text:span><text:span text:style-name="T112">）</text:span><text:span text:style-name="T97">。</text:span></text:p>
            <text:p text:style-name="P8"><text:span text:style-name="T109">在其他條件都相同時 →</text:span><text:span text:style-name="T286"> </text:span><text:span text:style-name="T308">BGP </text:span><text:span text:style-name="T286">會偏好較短的「</text:span><text:span text:style-name="T308">400 300</text:span><text:span text:style-name="T286">」</text:span><text:span text:style-name="T97">。</text:span></text:p>
            <text:p text:style-name="P8" loext:marker-style-name="T98"><text:span text:style-name="T97">小提醒：</text:span><text:span text:style-name="T344">AS-PATH </text:span><text:span text:style-name="T336">要從右邊讀起，最右邊的「</text:span><text:span text:style-name="T344">300</text:span><text:span text:style-name="T336">」才是這條路由的發源地（</text:span><text:span text:style-name="T344">Origin AS</text:span><text:span text:style-name="T336">）</text:span><text:span text:style-name="T97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6"><text:span text:style-name="T194">❁</text:span><text:span text:style-name="T97">假設你收到兩條路由：</text:span><text:span text:style-name="T159"><text:line-break/>Route A: AS-PATH = 100 200 300<text:line-break/>Route B: AS-PATH = 400 300<text:line-break/><text:line-break/></text:span><text:span text:style-name="T97">你先不要管 </text:span><text:span text:style-name="T159">Route </text:span><text:span text:style-name="T97">是什麼。</text:span><text:span text:style-name="T159"><text:line-break/><text:line-break/></text:span><text:span text:style-name="T97">只看 </text:span><text:span text:style-name="T159">AS-PATH</text:span><text:span text:style-name="T97">：</text:span><text:span text:style-name="T159">100 200 300 <text:s/></text:span><text:span text:style-name="T97">意思：我 ← </text:span><text:span text:style-name="T159">AS100 ← AS200 ← AS300<text:line-break/><text:line-break/></text:span><text:span text:style-name="T97">而</text:span><text:span text:style-name="T159">400 300 <text:s/></text:span><text:span text:style-name="T97">意思：我 ← </text:span><text:span text:style-name="T159">AS400 ← AS300<text:line-break/><text:line-break/></text:span><text:span text:style-name="T608">AS-PATH </text:span><text:span text:style-name="T602">就只是：這個路由消息經過了哪些 </text:span><text:span text:style-name="T608">AS </text:span><text:span text:style-name="T602">的名單。就這樣而已。</text:span><text:span text:style-name="T159"><text:line-break/><text:line-break/></text:span><text:span text:style-name="T97">然後 </text:span><text:span text:style-name="T309">BGP</text:span><text:span text:style-name="T159"> </text:span><text:span text:style-name="T97">看到：</text:span><text:span text:style-name="T159"><text:line-break/><text:line-break/>100 200 300 <text:s/></text:span><text:span text:style-name="T97">有 </text:span><text:span text:style-name="T159">3 </text:span><text:span text:style-name="T97">個 </text:span><text:span text:style-name="T159">AS</text:span><text:span text:style-name="T97">。</text:span><text:span text:style-name="T159"><text:line-break/><text:line-break/>400 300 <text:s/></text:span><text:span text:style-name="T97">有 </text:span><text:span text:style-name="T159">2 </text:span><text:span text:style-name="T97">個 </text:span><text:span text:style-name="T159">AS</text:span><text:span text:style-name="T97">。</text:span><text:span text:style-name="T159"><text:line-break/><text:line-break/></text:span><text:span text:style-name="T97">於是它想：</text:span><text:span text:style-name="T559">「嗯，看起來第二條比較短。」然後選第二條</text:span><text:span text:style-name="T97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6"><text:span text:style-name="T196">⚠️ <text:s/></text:span><text:span text:style-name="T50">新手最容易搞混的地方</text:span></text:p>
            <text:p text:style-name="P7" loext:marker-style-name="T98"><text:span text:style-name="T155">AS-PATH </text:span><text:span text:style-name="T97">不是寫在封包上的東西，也不是「下一跳」。封包只認 </text:span><text:span text:style-name="T155">Next-Hop</text:span><text:span text:style-name="T97">；</text:span><text:span text:style-name="T317">AS-PATH </text:span><text:span text:style-name="T293">純粹是 </text:span><text:span text:style-name="T317">BGP </text:span><text:span text:style-name="T293">拿來「比較哪條路由比較好」的參考資料</text:span><text:span text:style-name="T97">。</text:span></text:p>
            <text:p text:style-name="P6"><text:span text:style-name="T196">🎯 <text:s/></text:span><text:span text:style-name="T50">考點加碼：</text:span><text:span text:style-name="T61">AS-PATH </text:span><text:span text:style-name="T50">的另一個任務</text:span></text:p>
            <text:p text:style-name="P8" loext:marker-style-name="T98"><text:span text:style-name="T97">防迴圈！</text:span><text:span text:style-name="T110">當某個 </text:span><text:span text:style-name="T165">AS </text:span><text:span text:style-name="T110">發現一條路由的 </text:span><text:span text:style-name="T165">AS-PATH </text:span><text:span text:style-name="T110">裡「已經有自己的 </text:span><text:span text:style-name="T165">AS </text:span><text:span text:style-name="T110">編號」</text:span><text:span text:style-name="T97">，</text:span><text:span text:style-name="T336">就會直接丟棄這條路由，避免封包在 </text:span><text:span text:style-name="T344">AS </text:span><text:span text:style-name="T336">之間繞圈圈</text:span><text:span text:style-name="T97">。</text:span></text:p>
          </table:table-cell>
          <table:covered-table-cell/>
        </table:table-row>
      </table:table>
      <text:h text:style-name="P11" text:outline-level="2" loext:marker-style-name="T27"><text:span text:style-name="T28">五、</text:span><text:span text:style-name="T27">BGP </text:span><text:span text:style-name="T28">必背考點：高命中率一次搞懂</text:span></text:h>
      <text:p text:style-name="P36" loext:marker-style-name="T98"><text:span text:style-name="T308">BGP(Border Gateway Protocol) </text:span><text:span text:style-name="T97">不像 </text:span><text:span text:style-name="T155">OSPF </text:span><text:span text:style-name="T97">會自己算最短距離，它是在「</text:span><text:span text:style-name="T599">比條件、看政策</text:span><text:span text:style-name="T97">」。與其硬背排序表，不如先搞懂下面這 </text:span><text:span text:style-name="T159">9 </text:span><text:span text:style-name="T97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6" loext:marker-style-name="T73"><text:span text:style-name="T80">#</text:span><text:span text:style-name="T73"/></text:p>
            </table:table-cell>
            <table:table-cell table:style-name="表格94.A1" office:value-type="string">
              <text:p text:style-name="P26" loext:marker-style-name="T73"><text:span text:style-name="T74">考點</text:span><text:span text:style-name="T73"/></text:p>
            </table:table-cell>
            <table:table-cell table:style-name="表格94.A1" office:value-type="string">
              <text:p text:style-name="P26" loext:marker-style-name="T73"><text:span text:style-name="T74">一句話重點</text:span><text:span text:style-name="T73"/></text:p>
            </table:table-cell>
            <table:table-cell table:style-name="表格94.A1" office:value-type="string">
              <text:p text:style-name="P26" loext:marker-style-name="T73"><text:span text:style-name="T74">白話理解 </text:span><text:span text:style-name="T80">× </text:span><text:span text:style-name="T74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8" loext:marker-style-name="T81"><text:span text:style-name="T147">①</text:span><text:span text:style-name="T81"/></text:p>
          </table:table-cell>
          <table:table-cell table:style-name="表格94.A2" office:value-type="string">
            <text:p text:style-name="P37">TCP 179</text:p>
          </table:table-cell>
          <table:table-cell table:style-name="表格94.A2" office:value-type="string">
            <text:p text:style-name="P29" loext:marker-style-name="T126"><text:span text:style-name="T502">BGP </text:span><text:span text:style-name="T468">跑在 </text:span><text:span text:style-name="T502">TCP</text:span><text:span text:style-name="T127">，</text:span><text:span text:style-name="T468">埠號 </text:span><text:span text:style-name="T502">179</text:span><text:span text:style-name="T127">（不是 </text:span><text:span text:style-name="T180">UDP</text:span><text:span text:style-name="T127">）</text:span></text:p>
          </table:table-cell>
          <table:table-cell table:style-name="表格94.A2" office:value-type="string">
            <text:p text:style-name="P29" loext:marker-style-name="T126"><text:span text:style-name="T127">要傳「整個網際網路」的路由，丟包會大亂，所以需要 </text:span><text:span text:style-name="T180">TCP </text:span><text:span text:style-name="T127">的可靠重送與順序保證。考：</text:span><text:span text:style-name="T406">BGP </text:span><text:span text:style-name="T380">傳輸層協定 → </text:span><text:span text:style-name="T406">TCP</text:span><text:span text:style-name="T127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1"><text:span text:style-name="T147">②</text:span><text:span text:style-name="T81"/></text:p>
          </table:table-cell>
          <table:table-cell table:style-name="表格94.A3" office:value-type="string">
            <text:p text:style-name="P37">Path Vector</text:p>
          </table:table-cell>
          <table:table-cell table:style-name="表格94.A3" office:value-type="string">
            <text:p text:style-name="P29" loext:marker-style-name="T126"><text:span text:style-name="T180">BGP </text:span><text:span text:style-name="T127">屬於 </text:span><text:span text:style-name="T180">Path Vector </text:span><text:span text:style-name="T127">協定</text:span></text:p>
          </table:table-cell>
          <table:table-cell table:style-name="表格94.A3" office:value-type="string">
            <text:p text:style-name="P29" loext:marker-style-name="T126"><text:span text:style-name="T127">不只報「距離」，而是</text:span><text:span text:style-name="T280">把「整條 </text:span><text:span text:style-name="T327">AS </text:span><text:span text:style-name="T280">路徑」報給你</text:span><text:span text:style-name="T127">。</text:span><text:span text:style-name="T180">RIP</text:span><text:span text:style-name="T127">＝</text:span><text:span text:style-name="T180">Distance </text:span><text:soft-page-break/><text:span text:style-name="T180">Vector</text:span><text:span text:style-name="T127">、</text:span><text:span text:style-name="T180">OSPF</text:span><text:span text:style-name="T127">＝</text:span><text:span text:style-name="T180">Link State</text:span><text:span text:style-name="T127">、</text:span><text:span text:style-name="T180">BGP</text:span><text:span text:style-name="T127">＝</text:span><text:span text:style-name="T180">Path Vector</text:span><text:span text:style-name="T127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1"><text:span text:style-name="T147">③</text:span><text:span text:style-name="T81"/></text:p>
          </table:table-cell>
          <table:table-cell table:style-name="表格94.A2" office:value-type="string">
            <text:p text:style-name="P13"><text:span text:style-name="T193">AS-PATH</text:span><text:span text:style-name="T144">（</text:span><text:span text:style-name="T542">防迴圈</text:span><text:span text:style-name="T144">）</text:span></text:p>
          </table:table-cell>
          <table:table-cell table:style-name="表格94.A2" office:value-type="string">
            <text:p text:style-name="P29" loext:marker-style-name="T126"><text:span text:style-name="T39">✅ </text:span><text:span text:style-name="T127">最大用途＝</text:span><text:span text:style-name="T541">防 </text:span><text:span text:style-name="T555">Routing Loop</text:span></text:p>
          </table:table-cell>
          <table:table-cell table:style-name="表格94.A2" office:value-type="string">
            <text:p text:style-name="P29" loext:marker-style-name="T126"><text:span text:style-name="T406">AS </text:span><text:span text:style-name="T380">一看到 </text:span><text:span text:style-name="T406">AS-PATH </text:span><text:span text:style-name="T380">裡有「自己的 </text:span><text:span text:style-name="T406">AS </text:span><text:span text:style-name="T380">編號」就立刻丟棄，避免繞圈</text:span><text:span text:style-name="T127">。考「</text:span><text:span text:style-name="T180">AS-PATH </text:span><text:span text:style-name="T127">主要功能」→ </text:span><text:span text:style-name="T180">Loop Prevention</text:span><text:span text:style-name="T127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1"><text:span text:style-name="T147">④</text:span><text:span text:style-name="T81"/></text:p>
          </table:table-cell>
          <table:table-cell table:style-name="表格94.A3" office:value-type="string">
            <text:p text:style-name="P37">Local Preference</text:p>
          </table:table-cell>
          <table:table-cell table:style-name="表格94.A3" office:value-type="string">
            <text:p text:style-name="P38">數值越大越優先</text:p>
          </table:table-cell>
          <table:table-cell table:style-name="表格94.A3" office:value-type="string">
            <text:p text:style-name="P29" loext:marker-style-name="T126"><text:span text:style-name="T39">✅ </text:span><text:span text:style-name="T40">通用屬性中最重要！</text:span><text:span text:style-name="T127">是</text:span><text:span text:style-name="T280"> </text:span><text:span text:style-name="T327">AS </text:span><text:span text:style-name="T280">的「內部政策」：想走哪個出口就把它設高分</text:span><text:span text:style-name="T127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1"><text:span text:style-name="T147">⑤</text:span><text:span text:style-name="T81"/></text:p>
          </table:table-cell>
          <table:table-cell table:style-name="表格94.A2" office:value-type="string">
            <text:p text:style-name="P13"><text:span text:style-name="T193">AS-PATH</text:span><text:span text:style-name="T144">（</text:span><text:span text:style-name="T542">長度</text:span><text:span text:style-name="T144">）</text:span></text:p>
          </table:table-cell>
          <table:table-cell table:style-name="表格94.A2" office:value-type="string">
            <text:p text:style-name="P14"><text:span text:style-name="T633">路徑越短（經過 </text:span><text:span text:style-name="T634">AS </text:span><text:span text:style-name="T633">越少）越優先</text:span></text:p>
          </table:table-cell>
          <table:table-cell table:style-name="表格94.A2" office:value-type="string">
            <text:p text:style-name="P29" loext:marker-style-name="T126"><text:span text:style-name="T39">⚠️ </text:span><text:span text:style-name="T380">但要先比 </text:span><text:span text:style-name="T406">Weight</text:span><text:span text:style-name="T380">、</text:span><text:span text:style-name="T406">Local Pref</text:span><text:span text:style-name="T380">，前面平手才輪到它</text:span><text:span text:style-name="T127">——</text:span><text:span text:style-name="T356">別誤以為 </text:span><text:span text:style-name="T361">AS-PATH </text:span><text:span text:style-name="T356">最重要</text:span><text:span text:style-name="T127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1"><text:span text:style-name="T147">⑥</text:span><text:span text:style-name="T81"/></text:p>
          </table:table-cell>
          <table:table-cell table:style-name="表格94.A3" office:value-type="string">
            <text:p text:style-name="P37">MED</text:p>
          </table:table-cell>
          <table:table-cell table:style-name="表格94.A3" office:value-type="string">
            <text:p text:style-name="P39">數值越小越優先</text:p>
          </table:table-cell>
          <table:table-cell table:style-name="表格94.A3" office:value-type="string">
            <text:p text:style-name="P29" loext:marker-style-name="T126"><text:span text:style-name="T280">告訴鄰居「請從這個入口進來」，數字小的入口優先</text:span><text:span text:style-name="T127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1"><text:span text:style-name="T147">⑦</text:span><text:span text:style-name="T81"/></text:p>
          </table:table-cell>
          <table:table-cell table:style-name="表格94.A2" office:value-type="string">
            <text:p text:style-name="P37">eBGP vs iBGP</text:p>
          </table:table-cell>
          <table:table-cell table:style-name="表格94.A2" office:value-type="string">
            <text:p text:style-name="P15"><text:span text:style-name="T634">eBGP </text:span><text:span text:style-name="T633">優先於 </text:span><text:span text:style-name="T634">iBGP</text:span></text:p>
          </table:table-cell>
          <table:table-cell table:style-name="表格94.A2" office:value-type="string">
            <text:p text:style-name="P29" loext:marker-style-name="T126"><text:span text:style-name="T180">eBGP</text:span><text:span text:style-name="T127">＝外面直接告訴你；</text:span><text:span text:style-name="T180">iBGP</text:span><text:span text:style-name="T127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1"><text:span text:style-name="T147">⑧</text:span><text:span text:style-name="T81"/></text:p>
          </table:table-cell>
          <table:table-cell table:style-name="表格94.A3" office:value-type="string">
            <text:p text:style-name="P13"><text:span text:style-name="T193">MED</text:span><text:span text:style-name="T144">（比較範圍）</text:span></text:p>
          </table:table-cell>
          <table:table-cell table:style-name="表格94.A3" office:value-type="string">
            <text:p text:style-name="P16"><text:span text:style-name="T633">只比較同一個「來源 </text:span><text:span text:style-name="T634">AS</text:span><text:span text:style-name="T633">」</text:span></text:p>
          </table:table-cell>
          <table:table-cell table:style-name="表格94.A3" office:value-type="string">
            <text:p text:style-name="P29" loext:marker-style-name="T126"><text:span text:style-name="T39">⚠️</text:span><text:span text:style-name="T401"> </text:span><text:span text:style-name="T566">不同 </text:span><text:span text:style-name="T576">AS </text:span><text:span text:style-name="T566">的 </text:span><text:span text:style-name="T576">MED </text:span><text:span text:style-name="T566">不能互比；只在同一家公司的建議之間比大小</text:span><text:span text:style-name="T127">。最愛考！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1"><text:span text:style-name="T147">⑨</text:span><text:span text:style-name="T81"/></text:p>
          </table:table-cell>
          <table:table-cell table:style-name="表格94.A2" office:value-type="string">
            <text:p text:style-name="P37">Weight</text:p>
          </table:table-cell>
          <table:table-cell table:style-name="表格94.A2" office:value-type="string">
            <text:p text:style-name="P29" loext:marker-style-name="T126"><text:span text:style-name="T41">Cisco </text:span><text:span text:style-name="T42">私有</text:span><text:span text:style-name="T127">，</text:span><text:span text:style-name="T604">非 </text:span><text:span text:style-name="T611">BGP </text:span><text:span text:style-name="T604">標準</text:span></text:p>
          </table:table-cell>
          <table:table-cell table:style-name="表格94.A2" office:value-type="string">
            <text:p text:style-name="P29" loext:marker-style-name="T126"><text:span text:style-name="T39">⚠️ </text:span><text:span text:style-name="T127">看到「</text:span><text:span text:style-name="T180">BGP </text:span><text:span text:style-name="T127">標準屬性」選項別選 </text:span><text:span text:style-name="T180">Weight</text:span><text:span text:style-name="T127">（</text:span><text:span text:style-name="T180">Juniper</text:span><text:span text:style-name="T127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6"><text:span text:style-name="T196">🧠 <text:s/></text:span><text:span text:style-name="T250">白話理解（這句最重要）</text:span></text:p>
            <text:p text:style-name="P7" loext:marker-style-name="T98"><text:span text:style-name="T308">BGP </text:span><text:span text:style-name="T286">心裡在想：「哪條路比較值得信任？比較符合政策？」不是「哪條最短」</text:span><text:span text:style-name="T97">（</text:span><text:span text:style-name="T336">那是 </text:span><text:span text:style-name="T344">OSPF </text:span><text:span text:style-name="T336">在做的事</text:span><text:span text:style-name="T97">）。</text:span></text:p>
            <text:p text:style-name="P8"><text:span text:style-name="T251">一句話總結 → </text:span><text:span text:style-name="T155">BGP </text:span><text:span text:style-name="T97">是政策導向（</text:span><text:span text:style-name="T155">policy-based routing</text:span><text:span text:style-name="T97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6"><text:span text:style-name="T196">⚡ <text:s/></text:span><text:span text:style-name="T200">考前濃縮版（</text:span><text:span text:style-name="T210">10 </text:span><text:span text:style-name="T200">秒掃過）</text:span></text:p>
            <text:p text:style-name="P7" loext:marker-style-name="T98"><text:span text:style-name="T167">BGP</text:span><text:span text:style-name="T112">＝</text:span><text:span text:style-name="T167">TCP 179</text:span><text:span text:style-name="T97">、</text:span><text:span text:style-name="T546">Path Vector</text:span><text:span text:style-name="T97">｜</text:span><text:span text:style-name="T369">AS-PATH</text:span><text:span text:style-name="T368">：防迴圈＋越短越好</text:span><text:span text:style-name="T97">｜</text:span><text:span text:style-name="T369">Local Preference</text:span><text:span text:style-name="T368">：越大越好</text:span><text:span text:style-name="T97">｜</text:span><text:span text:style-name="T369">MED</text:span><text:span text:style-name="T368">：越小越好</text:span><text:span text:style-name="T97">＋</text:span><text:span text:style-name="T336">只比同 </text:span><text:span text:style-name="T344">AS</text:span><text:span text:style-name="T97">｜</text:span><text:span text:style-name="T167">eBGP &gt; iBGP</text:span><text:span text:style-name="T97">｜</text:span><text:span text:style-name="T174">Weight</text:span><text:span text:style-name="T120">：</text:span><text:span text:style-name="T174">Cisco </text:span><text:span text:style-name="T120">私有</text:span><text:span text:style-name="T97">。</text:span></text:p>
            <text:p text:style-name="P7" loext:marker-style-name="T98"><text:span text:style-name="T97">選路優先順序：</text:span><text:span text:style-name="T155">Weight &gt; Local Pref &gt; </text:span><text:span text:style-name="T97">自己產生 </text:span><text:span text:style-name="T155">&gt; AS-PATH &gt; Origin &gt; MED &gt; eBGP &gt; IGP cost &gt; Router ID</text:span><text:span text:style-name="T97">（</text:span><text:span text:style-name="T155">Weight </text:span><text:span text:style-name="T97">為 </text:span><text:span text:style-name="T155">Cisco </text:span><text:span text:style-name="T97">私有；</text:span><text:span text:style-name="T155">Local Pref </text:span><text:span text:style-name="T97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7"><text:span text:style-name="T236">✗ </text:span><text:span text:style-name="T235">AS-PATH </text:span><text:span text:style-name="T229">是 </text:span><text:span text:style-name="T235">BGP </text:span><text:span text:style-name="T229">選路最重要的屬性</text:span><text:span text:style-name="T228">　→　</text:span><text:span text:style-name="T97">✓ </text:span><text:span text:style-name="T415">Local Preference </text:span><text:span text:style-name="T394">才是最重要的通用屬性</text:span><text:span text:style-name="T97">（</text:span><text:span text:style-name="T155">Weight </text:span><text:span text:style-name="T97">是 </text:span><text:span text:style-name="T155">Cisco </text:span><text:span text:style-name="T97">私有）。</text:span></text:p>
            <text:p text:style-name="P8"><text:span text:style-name="T236">✗ </text:span><text:span text:style-name="T235">AS-PATH </text:span><text:span text:style-name="T229">越短就一定會選那條</text:span><text:span text:style-name="T228">　→　</text:span><text:span text:style-name="T97">✓ </text:span><text:span text:style-name="T293">只有前面的屬性（</text:span><text:span text:style-name="T317">Local Pref </text:span><text:span text:style-name="T293">等）完全相同時，才會比較 </text:span><text:span text:style-name="T317">AS-PATH</text:span><text:span text:style-name="T97">。</text:span></text:p>
            <text:p text:style-name="P8"><text:span text:style-name="T236">✗ </text:span><text:span text:style-name="T235">BGP </text:span><text:span text:style-name="T229">會自己計算最短路徑</text:span><text:span text:style-name="T228">　→　</text:span><text:span text:style-name="T97">✓ </text:span><text:span text:style-name="T155">BGP </text:span><text:span text:style-name="T97">不算距離，</text:span><text:span text:style-name="T547">OSPF </text:span><text:span text:style-name="T529">才做最短路徑計算</text:span><text:span text:style-name="T97">。</text:span></text:p>
            <text:p text:style-name="P8"><text:span text:style-name="T236">✗ </text:span><text:span text:style-name="T235">iBGP </text:span><text:span text:style-name="T229">比 </text:span><text:span text:style-name="T235">eBGP </text:span><text:span text:style-name="T229">優先</text:span><text:span text:style-name="T228">　→　</text:span><text:span text:style-name="T97">✓ </text:span><text:span text:style-name="T621">eBGP </text:span><text:span text:style-name="T617">優先於 </text:span><text:span text:style-name="T621">iBGP</text:span><text:span text:style-name="T97">（外部路由更可信）。</text:span></text:p>
            <text:p text:style-name="P8"><text:span text:style-name="T236">✗ </text:span><text:span text:style-name="T235">MED </text:span><text:span text:style-name="T229">可以跨不同 </text:span><text:span text:style-name="T235">AS </text:span><text:span text:style-name="T229">互相比較</text:span><text:span text:style-name="T228">　→　</text:span><text:span text:style-name="T97">✓</text:span><text:span text:style-name="T295"> </text:span><text:span text:style-name="T319">MED </text:span><text:span text:style-name="T295">只能比較來自同一個 </text:span><text:span text:style-name="T319">AS </text:span><text:span text:style-name="T295">的路由</text:span><text:span text:style-name="T97">。</text:span></text:p>
          </table:table-cell>
        </table:table-row>
      </table:table>
      <text:h text:style-name="P11" text:outline-level="2" loext:marker-style-name="T27"><text:soft-page-break/><text:span text:style-name="T28">七、</text:span><text:span text:style-name="T27">BGP + NAT + </text:span><text:span text:style-name="T28">防火牆 整合流程</text:span></text:h>
      <text:p text:style-name="P35" loext:marker-style-name="T98"><text:span text:style-name="T97">把三個概念串在一起，這才是實務上封包實際走的路。情境：</text:span><text:span text:style-name="T111">你的電腦要連到健保署</text:span><text:span text:style-name="T97">，</text:span><text:span text:style-name="T113">有兩條對外線路</text:span><text:span text:style-name="T97">（</text:span><text:span text:style-name="T427">中華電信 </text:span><text:span text:style-name="T442">AS-PATH </text:span><text:span text:style-name="T427">長度 </text:span><text:span text:style-name="T442">2</text:span><text:span text:style-name="T97">、</text:span><text:span text:style-name="T285">台灣固網 </text:span><text:span text:style-name="T313">AS-PATH </text:span><text:span text:style-name="T285">長度 </text:span><text:span text:style-name="T313">3</text:span><text:span text:style-name="T97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" loext:marker-style-name="T73"><text:span text:style-name="T74">步驟</text:span><text:span text:style-name="T73"/></text:p>
            </table:table-cell>
            <table:table-cell table:style-name="表格96.A1" office:value-type="string">
              <text:p text:style-name="P4" loext:marker-style-name="T73"><text:span text:style-name="T74">動作</text:span><text:span text:style-name="T73"/></text:p>
            </table:table-cell>
            <table:table-cell table:style-name="表格96.A1" office:value-type="string">
              <text:p text:style-name="P4" loext:marker-style-name="T73"><text:span text:style-name="T74">關鍵一句</text:span><text:span text:style-name="T73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9" loext:marker-style-name="T126"><text:span text:style-name="T179">1 </text:span><text:span text:style-name="T141">封包產生</text:span></text:p>
          </table:table-cell>
          <table:table-cell table:style-name="表格96.A2" office:value-type="string">
            <text:p text:style-name="P29" loext:marker-style-name="T126"><text:span text:style-name="T127">你的電腦說「我要去健保署 </text:span><text:span text:style-name="T179">IP</text:span><text:span text:style-name="T127">」</text:span></text:p>
          </table:table-cell>
          <table:table-cell table:style-name="表格96.A2" office:value-type="string">
            <text:p text:style-name="P29" loext:marker-style-name="T126"><text:span text:style-name="T127">封包準備出發</text:span><text:span text:style-name="T126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26"><text:span text:style-name="T179">2 </text:span><text:span text:style-name="T141">防火牆 </text:span><text:span text:style-name="T191">Firewall</text:span></text:p>
          </table:table-cell>
          <table:table-cell table:style-name="表格96.A3" office:value-type="string">
            <text:p text:style-name="P29" loext:marker-style-name="T126"><text:span text:style-name="T127">看來源</text:span><text:span text:style-name="T179">/</text:span><text:span text:style-name="T127">目的 </text:span><text:span text:style-name="T179">IP</text:span><text:span text:style-name="T127">、</text:span><text:span text:style-name="T179">Port</text:span><text:span text:style-name="T127">，不符就擋掉</text:span></text:p>
          </table:table-cell>
          <table:table-cell table:style-name="表格96.A3" office:value-type="string">
            <text:p text:style-name="P29" loext:marker-style-name="T126"><text:span text:style-name="T127">防火牆決定「能不能走」</text:span><text:span text:style-name="T126"/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26"><text:span text:style-name="T179">3 </text:span><text:span text:style-name="T191">NAT</text:span></text:p>
          </table:table-cell>
          <table:table-cell table:style-name="表格96.A2" office:value-type="string">
            <text:p text:style-name="P29" loext:marker-style-name="T126"><text:span text:style-name="T127">把</text:span><text:span text:style-name="T605">私有 </text:span><text:span text:style-name="T610">IP </text:span><text:span text:style-name="T605">換成公網 </text:span><text:span text:style-name="T610">IP</text:span><text:span text:style-name="T127">（</text:span><text:span text:style-name="T179">192.168.1.10 → 203.66.x.x</text:span><text:span text:style-name="T127">）</text:span></text:p>
          </table:table-cell>
          <table:table-cell table:style-name="表格96.A2" office:value-type="string">
            <text:p text:style-name="P29" loext:marker-style-name="T126"><text:span text:style-name="T179">NAT </text:span><text:span text:style-name="T127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26"><text:span text:style-name="T179">4 </text:span><text:span text:style-name="T191">BGP </text:span><text:span text:style-name="T141">選路</text:span></text:p>
          </table:table-cell>
          <table:table-cell table:style-name="表格96.A3" office:value-type="string">
            <text:p text:style-name="P29" loext:marker-style-name="T126"><text:span text:style-name="T127">比條件：</text:span><text:span text:style-name="T381">若相同選 </text:span><text:span text:style-name="T405">AS-PATH </text:span><text:span text:style-name="T381">較短路</text:span><text:span text:style-name="T405">1</text:span><text:span text:style-name="T127">；</text:span><text:span text:style-name="T520">若中華電信 </text:span><text:span text:style-name="T522">Local Pref </text:span><text:span text:style-name="T520">較高則不管長短走路</text:span><text:span text:style-name="T522">1</text:span></text:p>
          </table:table-cell>
          <table:table-cell table:style-name="表格96.A3" office:value-type="string">
            <text:p text:style-name="P29" loext:marker-style-name="T126"><text:span text:style-name="T179">BGP </text:span><text:span text:style-name="T127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26"><text:span text:style-name="T179">5 </text:span><text:span text:style-name="T141">出 </text:span><text:span text:style-name="T191">ISP </text:span><text:span text:style-name="T141">跨 </text:span><text:span text:style-name="T191">AS</text:span></text:p>
          </table:table-cell>
          <table:table-cell table:style-name="表格96.A2" office:value-type="string">
            <text:p text:style-name="P29" loext:marker-style-name="T126"><text:span text:style-name="T277">封包經過多個 </text:span><text:span text:style-name="T325">AS</text:span><text:span text:style-name="T127">（這就是 </text:span><text:span text:style-name="T179">AS-PATH </text:span><text:span text:style-name="T127">的來源）</text:span></text:p>
          </table:table-cell>
          <table:table-cell table:style-name="表格96.A2" office:value-type="string">
            <text:p text:style-name="P29" loext:marker-style-name="T126"><text:span text:style-name="T179">—</text:span><text:span text:style-name="T126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26"><text:span text:style-name="T179">6 </text:span><text:span text:style-name="T127">到達健保署</text:span></text:p>
          </table:table-cell>
          <table:table-cell table:style-name="表格96.A3" office:value-type="string">
            <text:p text:style-name="P29" loext:marker-style-name="T126"><text:span text:style-name="T127">健保署收到請求，完成連線</text:span><text:span text:style-name="T126"/></text:p>
          </table:table-cell>
          <table:table-cell table:style-name="表格96.A3" office:value-type="string">
            <text:p text:style-name="P29" loext:marker-style-name="T126"><text:span text:style-name="T179">—</text:span><text:span text:style-name="T12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6"><text:span text:style-name="T196">🎯 <text:s/></text:span><text:span text:style-name="T250">三層分工，一句話各自記</text:span></text:p>
            <text:p text:style-name="P7"><text:span text:style-name="T251">防火牆 → </text:span><text:span text:style-name="T97">決定「能不能走」｜</text:span><text:span text:style-name="T257">NAT → </text:span><text:span text:style-name="T97">解決「你是誰」｜</text:span><text:span text:style-name="T261">BGP → </text:span><text:span text:style-name="T104">決定「要怎麼走」</text:span></text:p>
            <text:p text:style-name="P8" loext:marker-style-name="T98"><text:span text:style-name="T97">生活比喻：</text:span><text:span text:style-name="T111">海關（防火牆）</text:span><text:span text:style-name="T97">→ </text:span><text:span text:style-name="T111">換護照</text:span><text:span text:style-name="T166">/</text:span><text:span text:style-name="T111">身份（</text:span><text:span text:style-name="T166">NAT</text:span><text:span text:style-name="T111">）</text:span><text:span text:style-name="T97">→ </text:span><text:span text:style-name="T117">選航班（</text:span><text:span text:style-name="T171">BGP</text:span><text:span text:style-name="T117">）</text:span><text:span text:style-name="T97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6"><text:span text:style-name="T196">⚠️ <text:s/></text:span><text:span text:style-name="T218">整合情境的考試陷阱</text:span></text:p>
            <text:p text:style-name="P7"><text:span text:style-name="T238">✗ </text:span><text:span text:style-name="T231">封包送不出去</text:span><text:span text:style-name="T228"> → 一定是 </text:span><text:span text:style-name="T236">BGP </text:span><text:span text:style-name="T228">問題　→　</text:span><text:span text:style-name="T97">✓ 應依序排查：</text:span><text:span text:style-name="T111">防火牆有沒有擋？</text:span><text:span text:style-name="T166">NAT </text:span><text:span text:style-name="T111">有沒有設？</text:span><text:span text:style-name="T166">BGP </text:span><text:span text:style-name="T111">有沒有路？</text:span></text:p>
            <text:p text:style-name="P8"><text:span text:style-name="T236">✗ </text:span><text:span text:style-name="T228">有路但連不到 → 是 </text:span><text:span text:style-name="T236">BGP </text:span><text:span text:style-name="T228">路由問題　→　</text:span><text:span text:style-name="T97">✓ 通常是防火牆或 </text:span><text:span text:style-name="T155">NAT </text:span><text:span text:style-name="T97">問題，不是 </text:span><text:span text:style-name="T155">BGP</text:span><text:span text:style-name="T97">。</text:span></text:p>
            <text:p text:style-name="P8"><text:span text:style-name="T236">✗ </text:span><text:span text:style-name="T231">走到錯誤的 </text:span><text:span text:style-name="T238">ISP </text:span><text:span text:style-name="T236">→ </text:span><text:span text:style-name="T228">是 </text:span><text:span text:style-name="T236">NAT </text:span><text:span text:style-name="T228">設定問題　→　</text:span><text:span text:style-name="T97">✓ </text:span><text:span text:style-name="T292">走到錯誤 </text:span><text:span text:style-name="T316">ISP </text:span><text:span text:style-name="T292">是 </text:span><text:span text:style-name="T316">BGP </text:span><text:span text:style-name="T292">選路問題（</text:span><text:span text:style-name="T316">Local Pref </text:span><text:span text:style-name="T292">或 </text:span><text:span text:style-name="T316">AS-PATH </text:span><text:span text:style-name="T292">設定不對）</text:span><text:span text:style-name="T97">。</text:span></text:p>
          </table:table-cell>
          <table:covered-table-cell/>
          <table:covered-table-cell/>
        </table:table-row>
      </table:table>
      <text:h text:style-name="P17" text:outline-level="1" loext:marker-style-name="T69"><text:span text:style-name="T70">第 八 篇　網路系統進階：</text:span><text:span text:style-name="T69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6"><text:span text:style-name="T196">🌐 <text:s/></text:span><text:span text:style-name="T50">本篇重點</text:span></text:p>
            <text:p text:style-name="P7" loext:marker-style-name="T98"><text:span text:style-name="T97">本篇涵蓋四大現代網路主題：</text:span><text:span text:style-name="T155">SDN</text:span><text:span text:style-name="T97">（網路如何被控制）、</text:span><text:span text:style-name="T155">Load Balancing</text:span><text:span text:style-name="T97">（流量如何分配）、</text:span><text:span text:style-name="T155">CDN</text:span><text:span text:style-name="T97">（網站如何加速）、</text:span><text:span text:style-name="T155">5G</text:span><text:span text:style-name="T97">（新世代行動網路特性）。</text:span></text:p>
          </table:table-cell>
        </table:table-row>
      </table:table>
      <text:h text:style-name="P11" text:outline-level="2" loext:marker-style-name="T27"><text:span text:style-name="T28">一、</text:span><text:span text:style-name="T27">SDN</text:span><text:span text:style-name="T28">（軟體定義網路）</text:span></text:h>
      <text:p text:style-name="P35" loext:marker-style-name="T98"><text:span text:style-name="T155">SDN</text:span><text:span text:style-name="T97">（</text:span><text:span text:style-name="T155">Software Defined Networking</text:span><text:span text:style-name="T97">）的核心概念是：將「控制平面」與「資料平面」分離。傳統網路中路由器和交換器同時負責「決定資料走哪條路」和「實際傳送資料」，</text:span><text:span text:style-name="T155">SDN </text:span><text:span text:style-name="T97">則把「決策」抽出來交給集中式的 </text:span><text:span text:style-name="T155">Controller </text:span><text:span text:style-name="T97">統一管理。（</text:span><text:span text:style-name="T155">Router</text:span><text:span text:style-name="T97">：負責「不同網路之間」傳資料；</text:span><text:span text:style-name="T155">Switch</text:span><text:span text:style-name="T97">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6"><text:span text:style-name="T196">🟦 <text:s/></text:span><text:span text:style-name="T250">核心概念（考試最常考）</text:span></text:p>
            <text:p text:style-name="P7"><text:span text:style-name="T251">控制平面（</text:span><text:span text:style-name="T257">Control Plane</text:span><text:span text:style-name="T251">）：</text:span><text:span text:style-name="T97">決定資料「怎麼走」——負責路由決策的大腦。</text:span></text:p>
            <text:p text:style-name="P8"><text:span text:style-name="T251">資料平面（</text:span><text:span text:style-name="T257">Data Plane</text:span><text:span text:style-name="T251">）：</text:span><text:span text:style-name="T97">負責資料「實際傳送」——執行指令的手腳。</text:span></text:p>
            <text:p text:style-name="P8"><text:span text:style-name="T257">🔑 </text:span><text:span text:style-name="T251">關鍵：</text:span><text:span text:style-name="T97">兩者分離，是 </text:span><text:span text:style-name="T155">SDN </text:span><text:span text:style-name="T97">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" loext:marker-style-name="T73"><text:span text:style-name="T74">三層架構</text:span><text:span text:style-name="T73"/></text:p>
          </table:table-cell>
          <table:table-cell table:style-name="表格98.A2" office:value-type="string">
            <text:p text:style-name="P4" loext:marker-style-name="T73"><text:span text:style-name="T74">說明</text:span><text:span text:style-name="T73"/></text:p>
          </table:table-cell>
          <table:table-cell table:style-name="表格98.A2" office:value-type="string">
            <text:p text:style-name="P4" loext:marker-style-name="T73"><text:span text:style-name="T74">白話</text:span><text:span text:style-name="T73"/></text:p>
          </table:table-cell>
        </table:table-row>
        <table:table-row table:style-name="表格98.1">
          <table:table-cell table:style-name="表格98.A3" office:value-type="string">
            <text:p text:style-name="P29" loext:marker-style-name="T126"><text:span text:style-name="T179">🟦 Application Layer </text:span><text:span text:style-name="T127">應用層</text:span></text:p>
          </table:table-cell>
          <table:table-cell table:style-name="表格98.A3" office:value-type="string">
            <text:p text:style-name="P29" loext:marker-style-name="T126"><text:span text:style-name="T127">使用者所使用的服務，如網頁、</text:span><text:span text:style-name="T179">API</text:span><text:span text:style-name="T127">、</text:span><text:span text:style-name="T179">App</text:span></text:p>
          </table:table-cell>
          <table:table-cell table:style-name="表格98.A3" office:value-type="string">
            <text:p text:style-name="P29" loext:marker-style-name="T126"><text:span text:style-name="T127">你真正在用的東西</text:span><text:span text:style-name="T126"/></text:p>
          </table:table-cell>
        </table:table-row>
        <table:table-row table:style-name="表格98.1">
          <table:table-cell table:style-name="表格98.A4" office:value-type="string">
            <text:p text:style-name="P29" loext:marker-style-name="T126"><text:span text:style-name="T179">🟨 Control Layer </text:span><text:span text:style-name="T127">控制層</text:span></text:p>
          </table:table-cell>
          <table:table-cell table:style-name="表格98.A4" office:value-type="string">
            <text:p text:style-name="P29" loext:marker-style-name="T126"><text:span text:style-name="T179">SDN Controller</text:span><text:span text:style-name="T127">（大腦），決定資料流向、集中管理</text:span></text:p>
          </table:table-cell>
          <table:table-cell table:style-name="表格98.A4" office:value-type="string">
            <text:p text:style-name="P29" loext:marker-style-name="T126"><text:span text:style-name="T127">交通指揮中心</text:span><text:span text:style-name="T126"/></text:p>
          </table:table-cell>
        </table:table-row>
        <table:table-row table:style-name="表格98.1">
          <table:table-cell table:style-name="表格98.A3" office:value-type="string">
            <text:p text:style-name="P29" loext:marker-style-name="T126"><text:span text:style-name="T179">🟩 Infrastructure Layer </text:span><text:span text:style-name="T127">基礎層</text:span></text:p>
          </table:table-cell>
          <table:table-cell table:style-name="表格98.A3" office:value-type="string">
            <text:p text:style-name="P29" loext:marker-style-name="T126"><text:span text:style-name="T127">真正傳送資料的設備，如 </text:span><text:span text:style-name="T179">Router</text:span><text:span text:style-name="T127">、</text:span><text:span text:style-name="T179">Switch</text:span></text:p>
          </table:table-cell>
          <table:table-cell table:style-name="表格98.A3" office:value-type="string">
            <text:p text:style-name="P29" loext:marker-style-name="T126"><text:span text:style-name="T127">路、車道和車子</text:span><text:span text:style-name="T12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6"><text:span text:style-name="T196">⚡ <text:s/></text:span><text:span text:style-name="T200">記憶口訣</text:span></text:p>
            <text:p text:style-name="P7" loext:marker-style-name="T98"><text:span text:style-name="T97">「</text:span><text:span text:style-name="T155">SDN </text:span><text:span text:style-name="T97">分平面、三層 </text:span><text:span text:style-name="T155">App-</text:span><text:span text:style-name="T97">控</text:span><text:span text:style-name="T155">-</text:span><text:span text:style-name="T97">基」→ 分平面＝控制／資料分離；三層＝</text:span><text:span text:style-name="T155">Application / Control / Infrastructure</text:span><text:span text:style-name="T97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Load Balancing</text:span><text:span text:style-name="T28">（負載平衡）</text:span></text:h>
      <text:p text:style-name="P35" loext:marker-style-name="T98"><text:span text:style-name="T97">當大量使用者同時存取同一網站，單一台伺服器會不堪負荷。負載平衡器把流量「智慧分配」到多台伺服器，確保每台都不過載。</text:span><text:span text:style-name="T98"/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" loext:marker-style-name="T73"><text:span text:style-name="T74">策略</text:span><text:span text:style-name="T73"/></text:p>
            </table:table-cell>
            <table:table-cell table:style-name="表格99.A1" office:value-type="string">
              <text:p text:style-name="P4" loext:marker-style-name="T73"><text:span text:style-name="T74">說明</text:span><text:span text:style-name="T73"/></text:p>
            </table:table-cell>
            <table:table-cell table:style-name="表格99.A1" office:value-type="string">
              <text:p text:style-name="P4" loext:marker-style-name="T73"><text:span text:style-name="T74">優 </text:span><text:span text:style-name="T79">/ </text:span><text:span text:style-name="T74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9" loext:marker-style-name="T126"><text:span text:style-name="T179">① Round Robin</text:span><text:span text:style-name="T127">（輪詢）</text:span></text:p>
          </table:table-cell>
          <table:table-cell table:style-name="表格99.A2" office:value-type="string">
            <text:p text:style-name="P29" loext:marker-style-name="T126"><text:span text:style-name="T127">依序輪流分配，不考慮伺服器效能或負載</text:span><text:span text:style-name="T126"/></text:p>
          </table:table-cell>
          <table:table-cell table:style-name="表格99.A2" office:value-type="string">
            <text:p text:style-name="P29" loext:marker-style-name="T126"><text:span text:style-name="T179">✓ </text:span><text:span text:style-name="T127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9" loext:marker-style-name="T126"><text:span text:style-name="T179">② Weighted Round Robin</text:span><text:span text:style-name="T127">（加權輪詢）</text:span></text:p>
          </table:table-cell>
          <table:table-cell table:style-name="表格99.A3" office:value-type="string">
            <text:p text:style-name="P29" loext:marker-style-name="T126"><text:span text:style-name="T127">依各伺服器處理能力設「權重」，能力強分到更多</text:span><text:span text:style-name="T126"/></text:p>
          </table:table-cell>
          <table:table-cell table:style-name="表格99.A3" office:value-type="string">
            <text:p text:style-name="P29" loext:marker-style-name="T126"><text:span text:style-name="T179">✓ </text:span><text:span text:style-name="T127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9" loext:marker-style-name="T126"><text:span text:style-name="T179">③ Session Stickiness</text:span><text:span text:style-name="T127">（會話黏著）</text:span></text:p>
          </table:table-cell>
          <table:table-cell table:style-name="表格99.A2" office:value-type="string">
            <text:p text:style-name="P29" loext:marker-style-name="T126"><text:span text:style-name="T127">同一使用者所有請求固定導向同一台，維持連線狀態</text:span><text:span text:style-name="T126"/></text:p>
          </table:table-cell>
          <table:table-cell table:style-name="表格99.A2" office:value-type="string">
            <text:p text:style-name="P29" loext:marker-style-name="T126"><text:span text:style-name="T179">✓ </text:span><text:span text:style-name="T127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6"><text:span text:style-name="T196">⚡ <text:s/></text:span><text:span text:style-name="T200">記憶口訣</text:span></text:p>
            <text:p text:style-name="P7" loext:marker-style-name="T98"><text:span text:style-name="T97">「</text:span><text:span text:style-name="T155">LB </text:span><text:span text:style-name="T97">輪、重、黏」→ 輪＝</text:span><text:span text:style-name="T155">Round Robin</text:span><text:span text:style-name="T97">（輪流）；重＝</text:span><text:span text:style-name="T155">Weighted RR</text:span><text:span text:style-name="T97">（加權）；黏＝</text:span><text:span text:style-name="T155">Stickiness</text:span><text:span text:style-name="T97">（固定同一台）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三、</text:span><text:span text:style-name="T27">CDN</text:span><text:span text:style-name="T28">（內容傳遞網路）</text:span></text:h>
      <text:p text:style-name="P35" loext:marker-style-name="T98"><text:span text:style-name="T155">CDN</text:span><text:span text:style-name="T97">（</text:span><text:span text:style-name="T155">Content Delivery Network</text:span><text:span text:style-name="T97">）透過在全球各地部署「邊緣伺服器（</text:span><text:span text:style-name="T155">Edge Server</text:span><text:span text:style-name="T97">）」加速內容傳</text:span><text:soft-page-break/><text:span text:style-name="T97">遞。當你開啟 </text:span><text:span text:style-name="T155">Google </text:span><text:span text:style-name="T97">或 </text:span><text:span text:style-name="T155">YouTube</text:span><text:span text:style-name="T97">，不需跨越太平洋連到美國總部，而是連到你附近的 </text:span><text:span text:style-name="T155">CDN </text:span><text:span text:style-name="T97">節點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6"><text:span text:style-name="T196">🌍 <text:s/></text:span><text:span text:style-name="T61">CDN </text:span><text:span text:style-name="T50">完整流程（一定要記）</text:span></text:p>
            <text:p text:style-name="P7" loext:marker-style-name="T98"><text:span text:style-name="T155">Step 1 </text:span><text:span text:style-name="T97">使用者輸入網址（</text:span><text:span text:style-name="T155">www.example.com</text:span><text:span text:style-name="T97">）</text:span></text:p>
            <text:p text:style-name="P8" loext:marker-style-name="T98"><text:span text:style-name="T155">Step 2 DNS </text:span><text:span text:style-name="T97">解析網址，找到對應 </text:span><text:span text:style-name="T155">CDN </text:span><text:span text:style-name="T97">的 </text:span><text:span text:style-name="T155">CNAME </text:span><text:span text:style-name="T97">記錄</text:span></text:p>
            <text:p text:style-name="P8" loext:marker-style-name="T98"><text:span text:style-name="T155">Step 3 CNAME </text:span><text:span text:style-name="T97">將請求轉向 </text:span><text:span text:style-name="T155">CDN </text:span><text:span text:style-name="T97">服務商（如 </text:span><text:span text:style-name="T155">cdn.example.net</text:span><text:span text:style-name="T97">）</text:span></text:p>
            <text:p text:style-name="P8" loext:marker-style-name="T98"><text:span text:style-name="T155">Step 4 CDN </text:span><text:span text:style-name="T97">根據使用者地理位置，選擇最近的 </text:span><text:span text:style-name="T155">Edge </text:span><text:span text:style-name="T97">伺服器</text:span></text:p>
            <text:p text:style-name="P8" loext:marker-style-name="T98"><text:span text:style-name="T155">Step 5 Edge </text:span><text:span text:style-name="T97">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4" loext:marker-style-name="T67"><text:span text:style-name="T68">關鍵名詞</text:span><text:span text:style-name="T67"/></text:p>
          </table:table-cell>
          <table:table-cell table:style-name="表格100.A2" office:value-type="string">
            <text:p text:style-name="P4" loext:marker-style-name="T67"><text:span text:style-name="T68">說明</text:span><text:span text:style-name="T67"/></text:p>
          </table:table-cell>
        </table:table-row>
        <table:table-row table:style-name="表格100.1">
          <table:table-cell table:style-name="表格100.A3" office:value-type="string">
            <text:p text:style-name="P29" loext:marker-style-name="T81"><text:span text:style-name="T147">CNAME</text:span><text:span text:style-name="T82">（別名記錄）</text:span></text:p>
          </table:table-cell>
          <table:table-cell table:style-name="表格100.A3" office:value-type="string">
            <text:p text:style-name="P29" loext:marker-style-name="T81"><text:span text:style-name="T147">DNS </text:span><text:span text:style-name="T82">的一種記錄，作用是「網址指向另一個網址」（不是 </text:span><text:span text:style-name="T147">IP</text:span><text:span text:style-name="T82">）。範例：</text:span><text:span text:style-name="T147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9" loext:marker-style-name="T81"><text:span text:style-name="T147">Edge Server</text:span><text:span text:style-name="T82">（邊緣伺服器）</text:span></text:p>
          </table:table-cell>
          <table:table-cell table:style-name="表格100.A4" office:value-type="string">
            <text:p text:style-name="P29" loext:marker-style-name="T81"><text:span text:style-name="T82">部署在全球各地靠近使用者的伺服器，負責快取並就近回應請求，大幅減少延遲。</text:span><text:span text:style-name="T81"/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6"><text:span text:style-name="T196">⚡ <text:s/></text:span><text:span text:style-name="T200">記憶口訣</text:span></text:p>
            <text:p text:style-name="P7" loext:marker-style-name="T98"><text:span text:style-name="T97">「</text:span><text:span text:style-name="T155">CDN</text:span><text:span text:style-name="T97">：網址轉轉轉，資料找最近」→ </text:span><text:span text:style-name="T155">CNAME</text:span><text:span text:style-name="T97">＝網址→網址（不是 </text:span><text:span text:style-name="T155">IP</text:span><text:span text:style-name="T97">！）；</text:span><text:span text:style-name="T155">Edge</text:span><text:span text:style-name="T97">＝就近服務，不用跑遠。</text:span></text:p>
          </table:table-cell>
          <table:covered-table-cell/>
        </table:table-row>
      </table:table>
      <text:h text:style-name="P11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" loext:marker-style-name="T73"><text:span text:style-name="T74">四大核心特性</text:span><text:span text:style-name="T73"/></text:p>
            </table:table-cell>
            <table:table-cell table:style-name="表格101.A1" office:value-type="string">
              <text:p text:style-name="P4" loext:marker-style-name="T73"><text:span text:style-name="T74">說明</text:span><text:span text:style-name="T73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9" loext:marker-style-name="T126"><text:span text:style-name="T179">① </text:span><text:span text:style-name="T127">高速傳輸（</text:span><text:span text:style-name="T179">eMBB</text:span><text:span text:style-name="T127">）</text:span></text:p>
          </table:table-cell>
          <table:table-cell table:style-name="表格101.A2" office:value-type="string">
            <text:p text:style-name="P29" loext:marker-style-name="T126"><text:span text:style-name="T179">Enhanced Mobile Broadband — </text:span><text:span text:style-name="T127">比 </text:span><text:span text:style-name="T179">4G </text:span><text:span text:style-name="T127">快數十倍，適合高畫質影音、</text:span><text:span text:style-name="T179">AR/VR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26"><text:span text:style-name="T179">② </text:span><text:span text:style-name="T127">超低延遲（</text:span><text:span text:style-name="T179">URLLC</text:span><text:span text:style-name="T127">）</text:span></text:p>
          </table:table-cell>
          <table:table-cell table:style-name="表格101.A3" office:value-type="string">
            <text:p text:style-name="P29" loext:marker-style-name="T126"><text:span text:style-name="T179">Ultra-Reliable Low Latency — </text:span><text:span text:style-name="T127">延遲低至 </text:span><text:span text:style-name="T179">1ms </text:span><text:span text:style-name="T127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9" loext:marker-style-name="T126"><text:span text:style-name="T179">③ </text:span><text:span text:style-name="T127">大量連線（</text:span><text:span text:style-name="T179">mMTC</text:span><text:span text:style-name="T127">）</text:span></text:p>
          </table:table-cell>
          <table:table-cell table:style-name="表格101.A2" office:value-type="string">
            <text:p text:style-name="P29" loext:marker-style-name="T126"><text:span text:style-name="T179">Massive Machine Type — </text:span><text:span text:style-name="T127">每平方公里可連數百萬台裝置，適合 </text:span><text:span text:style-name="T179">IoT </text:span><text:span text:style-name="T127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26"><text:span text:style-name="T179">④ </text:span><text:span text:style-name="T127">網路切片（</text:span><text:span text:style-name="T179">Network Slicing</text:span><text:span text:style-name="T127">）</text:span></text:p>
          </table:table-cell>
          <table:table-cell table:style-name="表格101.A3" office:value-type="string">
            <text:p text:style-name="P29" loext:marker-style-name="T126"><text:span text:style-name="T127">將同一物理網路虛擬化為多個獨立「切片」，各自不同 </text:span><text:span text:style-name="T179">QoS</text:span><text:span text:style-name="T127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6"><text:span text:style-name="T196">⚡ <text:s/></text:span><text:span text:style-name="T200">記憶口訣</text:span></text:p>
            <text:p text:style-name="P7" loext:marker-style-name="T98"><text:span text:style-name="T97">「</text:span><text:span text:style-name="T155">5G </text:span><text:span text:style-name="T97">快、低、多、切」→ 快（</text:span><text:span text:style-name="T155">eMBB</text:span><text:span text:style-name="T97">）＝高速；低（</text:span><text:span text:style-name="T155">URLLC</text:span><text:span text:style-name="T97">）＝超低延遲；多（</text:span><text:span text:style-name="T155">mMTC</text:span><text:span text:style-name="T97">）＝大量連線；切＝網路切片。</text:span></text:p>
          </table:table-cell>
          <table:covered-table-cell/>
        </table:table-row>
      </table:table>
      <text:h text:style-name="P11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" loext:marker-style-name="T73"><text:span text:style-name="T74">常見錯誤</text:span><text:span text:style-name="T73"/></text:p>
            </table:table-cell>
            <table:table-cell table:style-name="表格102.A1" office:value-type="string">
              <text:p text:style-name="P4" loext:marker-style-name="T73"><text:span text:style-name="T74">正確觀念</text:span><text:span text:style-name="T73"/></text:p>
            </table:table-cell>
            <table:table-cell table:style-name="表格102.A1" office:value-type="string">
              <text:p text:style-name="P4" loext:marker-style-name="T73"><text:span text:style-name="T74">主題</text:span><text:span text:style-name="T73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9" loext:marker-style-name="T126"><text:span text:style-name="T179">SDN </text:span><text:span text:style-name="T127">是把控制與資料整合</text:span></text:p>
          </table:table-cell>
          <table:table-cell table:style-name="表格102.A2" office:value-type="string">
            <text:p text:style-name="P29" loext:marker-style-name="T126"><text:span text:style-name="T179">SDN = </text:span><text:span text:style-name="T127">控制與資料「分離」</text:span></text:p>
          </table:table-cell>
          <table:table-cell table:style-name="表格102.A2" office:value-type="string">
            <text:p text:style-name="P29" loext:marker-style-name="T126"><text:span text:style-name="T179">SDN</text:span><text:span text:style-name="T126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26"><text:span text:style-name="T179">Round Robin </text:span><text:span text:style-name="T127">會考慮伺服器效能</text:span></text:p>
          </table:table-cell>
          <table:table-cell table:style-name="表格102.A3" office:value-type="string">
            <text:p text:style-name="P29" loext:marker-style-name="T126"><text:span text:style-name="T179">RR </text:span><text:span text:style-name="T127">不看效能，</text:span><text:span text:style-name="T179">Weighted RR </text:span><text:span text:style-name="T127">才看</text:span></text:p>
          </table:table-cell>
          <table:table-cell table:style-name="表格102.A3" office:value-type="string">
            <text:p text:style-name="P29" loext:marker-style-name="T126"><text:span text:style-name="T179">LB</text:span><text:span text:style-name="T126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26"><text:span text:style-name="T179">Stickiness </text:span><text:span text:style-name="T127">是平均分配流量</text:span></text:p>
          </table:table-cell>
          <table:table-cell table:style-name="表格102.A2" office:value-type="string">
            <text:p text:style-name="P29" loext:marker-style-name="T126"><text:span text:style-name="T179">Stickiness = </text:span><text:span text:style-name="T127">固定同一台 </text:span><text:span text:style-name="T179">Server</text:span></text:p>
          </table:table-cell>
          <table:table-cell table:style-name="表格102.A2" office:value-type="string">
            <text:p text:style-name="P29" loext:marker-style-name="T126"><text:span text:style-name="T179">LB</text:span><text:span text:style-name="T126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26"><text:span text:style-name="T179">CDN </text:span><text:span text:style-name="T127">是把資料放在中心機房</text:span></text:p>
          </table:table-cell>
          <table:table-cell table:style-name="表格102.A3" office:value-type="string">
            <text:p text:style-name="P29" loext:marker-style-name="T126"><text:span text:style-name="T179">CDN </text:span><text:span text:style-name="T127">放在靠近使用者的 </text:span><text:span text:style-name="T179">Edge </text:span><text:span text:style-name="T127">節點</text:span></text:p>
          </table:table-cell>
          <table:table-cell table:style-name="表格102.A3" office:value-type="string">
            <text:p text:style-name="P29" loext:marker-style-name="T126"><text:span text:style-name="T179">CDN</text:span><text:span text:style-name="T126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26"><text:span text:style-name="T179">CNAME </text:span><text:span text:style-name="T127">是 </text:span><text:span text:style-name="T179">IP </text:span><text:span text:style-name="T127">位址的對應</text:span></text:p>
          </table:table-cell>
          <table:table-cell table:style-name="表格102.A2" office:value-type="string">
            <text:p text:style-name="P29" loext:marker-style-name="T126"><text:span text:style-name="T179">CNAME = </text:span><text:span text:style-name="T127">網址 → 網址（非 </text:span><text:span text:style-name="T179">IP</text:span><text:span text:style-name="T127">）</text:span></text:p>
          </table:table-cell>
          <table:table-cell table:style-name="表格102.A2" office:value-type="string">
            <text:p text:style-name="P29" loext:marker-style-name="T126"><text:span text:style-name="T179">CDN</text:span><text:span text:style-name="T126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26"><text:span text:style-name="T179">WiFi </text:span><text:span text:style-name="T127">使用 </text:span><text:span text:style-name="T179">CSMA/CD</text:span></text:p>
          </table:table-cell>
          <table:table-cell table:style-name="表格102.A3" office:value-type="string">
            <text:p text:style-name="P29" loext:marker-style-name="T126"><text:span text:style-name="T179">WiFi </text:span><text:span text:style-name="T127">用 </text:span><text:span text:style-name="T179">CSMA/CA</text:span><text:span text:style-name="T127">（</text:span><text:span text:style-name="T179">CD </text:span><text:span text:style-name="T127">是有線網路）</text:span></text:p>
          </table:table-cell>
          <table:table-cell table:style-name="表格102.A3" office:value-type="string">
            <text:p text:style-name="P29" loext:marker-style-name="T126"><text:span text:style-name="T179">WiFi</text:span><text:span text:style-name="T126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26"><text:span text:style-name="T179">5G </text:span><text:span text:style-name="T127">只是速度變快</text:span></text:p>
          </table:table-cell>
          <table:table-cell table:style-name="表格102.A2" office:value-type="string">
            <text:p text:style-name="P29" loext:marker-style-name="T126"><text:span text:style-name="T179">5G </text:span><text:span text:style-name="T127">還有低延遲、大量連線、網路切片</text:span></text:p>
          </table:table-cell>
          <table:table-cell table:style-name="表格102.A2" office:value-type="string">
            <text:p text:style-name="P29" loext:marker-style-name="T126"><text:span text:style-name="T179">5G</text:span><text:span text:style-name="T12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6"><text:span text:style-name="T196">🔗 <text:s/></text:span><text:span text:style-name="T50">使用情境串連（理解記憶）</text:span><text:soft-page-break/></text:p>
            <text:p text:style-name="P7" loext:marker-style-name="T98"><text:span text:style-name="T97">想像你用手機打開 </text:span><text:span text:style-name="T155">App</text:span><text:span text:style-name="T97">：① 開啟 </text:span><text:span text:style-name="T155">App → Application Layer</text:span><text:span text:style-name="T97">；② </text:span><text:span text:style-name="T155">SDN Controller </text:span><text:span text:style-name="T97">決定資料怎麼走 → </text:span><text:span text:style-name="T155">Control Layer</text:span><text:span text:style-name="T97">；③ </text:span><text:span text:style-name="T155">Router/Switch </text:span><text:span text:style-name="T97">實際傳送 → </text:span><text:span text:style-name="T155">Infrastructure Layer</text:span><text:span text:style-name="T97">；④ </text:span><text:span text:style-name="T155">Load Balancer </text:span><text:span text:style-name="T97">把請求分配到空閒伺服器 → </text:span><text:span text:style-name="T155">Load Balancing</text:span><text:span text:style-name="T97">；⑤ </text:span><text:span text:style-name="T155">CDN </text:span><text:span text:style-name="T97">找最近節點傳回網頁 → </text:span><text:span text:style-name="T155">CDN Edge</text:span><text:span text:style-name="T97">；⑥ 資料透過 </text:span><text:span text:style-name="T155">WiFi </text:span><text:span text:style-name="T97">或 </text:span><text:span text:style-name="T155">5G </text:span><text:span text:style-name="T97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69"><text:span text:style-name="T70">第 九 篇　無線通訊：</text:span><text:span text:style-name="T69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"><text:span text:style-name="T196">💡 <text:s/></text:span><text:span text:style-name="T50">核心問題：大家同時說話會怎樣？</text:span></text:p>
            <text:p text:style-name="P7" loext:marker-style-name="T98"><text:span text:style-name="T97">很多裝置想用無線電波傳資料，若同時傳訊號會「撞在一起」。這個「決定誰先傳」的規則，就叫 </text:span><text:span text:style-name="T155">MAC </text:span><text:span text:style-name="T97">機制（</text:span><text:span text:style-name="T155">Media Access Control</text:span><text:span text:style-name="T97">）。⚠️ 注意：這裡的 </text:span><text:span text:style-name="T155">MAC </text:span><text:span text:style-name="T97">指「誰先傳資料的規則」，不是 </text:span><text:span text:style-name="T155">MAC </text:span><text:span text:style-name="T97">位址（硬體位址）！</text:span></text:p>
          </table:table-cell>
        </table:table-row>
      </table:table>
      <text:h text:style-name="P11" text:outline-level="2" loext:marker-style-name="T27"><text:span text:style-name="T28">一、</text:span><text:span text:style-name="T27">WiFi</text:span><text:span text:style-name="T28">：先聽再講（</text:span><text:span text:style-name="T27">CSMA/CA</text:span><text:span text:style-name="T28">）</text:span></text:h>
      <text:p text:style-name="P35" loext:marker-style-name="T98"><text:span text:style-name="T155">WiFi </text:span><text:span text:style-name="T97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4" loext:marker-style-name="T67"><text:span text:style-name="T77">CSMA/CA </text:span><text:span text:style-name="T68">拆解</text:span></text:p>
            </table:table-cell>
            <table:table-cell table:style-name="表格104.A1" office:value-type="string">
              <text:p text:style-name="P4" loext:marker-style-name="T67"><text:span text:style-name="T68">意義</text:span><text:span text:style-name="T67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9" loext:marker-style-name="T81"><text:span text:style-name="T147">Carrier Sense </text:span><text:span text:style-name="T82">載波感測</text:span></text:p>
          </table:table-cell>
          <table:table-cell table:style-name="表格104.A2" office:value-type="string">
            <text:p text:style-name="P29" loext:marker-style-name="T81"><text:span text:style-name="T82">先聽頻道有沒有人在用</text:span><text:span text:style-name="T81"/></text:p>
          </table:table-cell>
        </table:table-row>
        <table:table-row table:style-name="表格104.1">
          <table:table-cell table:style-name="表格104.A3" office:value-type="string">
            <text:p text:style-name="P29" loext:marker-style-name="T81"><text:span text:style-name="T147">Multiple Access </text:span><text:span text:style-name="T82">多重存取</text:span></text:p>
          </table:table-cell>
          <table:table-cell table:style-name="表格104.A3" office:value-type="string">
            <text:p text:style-name="P29" loext:marker-style-name="T81"><text:span text:style-name="T82">大家共用同一個頻道</text:span><text:span text:style-name="T81"/></text:p>
          </table:table-cell>
        </table:table-row>
        <table:table-row table:style-name="表格104.1">
          <table:table-cell table:style-name="表格104.A2" office:value-type="string">
            <text:p text:style-name="P29" loext:marker-style-name="T81"><text:span text:style-name="T147">Collision Avoidance </text:span><text:span text:style-name="T82">碰撞避免</text:span></text:p>
          </table:table-cell>
          <table:table-cell table:style-name="表格104.A2" office:value-type="string">
            <text:p text:style-name="P29" loext:marker-style-name="T81"><text:span text:style-name="T82">盡量「避免」訊號互撞（而非偵測後再處理）</text:span><text:span text:style-name="T81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6"><text:span text:style-name="T196">📶 <text:s/></text:span><text:span text:style-name="T65">WiFi </text:span><text:span text:style-name="T57">高速基礎</text:span></text:p>
            <text:p text:style-name="P7" loext:marker-style-name="T98"><text:span text:style-name="T97">另：</text:span><text:span text:style-name="T155">OFDM</text:span><text:span text:style-name="T97">（正交分頻多工）— 將資料分成多個子頻道同時傳輸，讓頻寬利用率大幅提升，是現代 </text:span><text:span text:style-name="T155">WiFi </text:span><text:span text:style-name="T97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6"><text:span text:style-name="T196">🚑 <text:s/></text:span><text:span text:style-name="T210">WiFi </text:span><text:span text:style-name="T200">的 </text:span><text:span text:style-name="T210">QoS</text:span><text:span text:style-name="T200">：</text:span><text:span text:style-name="T210">EDCA</text:span></text:p>
            <text:p text:style-name="P7" loext:marker-style-name="T98"><text:span text:style-name="T97">當很多人在搶頻道，某些資料（語音、視訊）需要優先通過，這就是 </text:span><text:span text:style-name="T155">EDCA</text:span><text:span text:style-name="T97">（</text:span><text:span text:style-name="T155">Enhanced Distributed Channel Access</text:span><text:span text:style-name="T97">）的功能。視訊通話</text:span><text:span text:style-name="T155">/</text:span><text:span text:style-name="T97">語音→少等、優先傳；網頁</text:span><text:span text:style-name="T155">/</text:span><text:span text:style-name="T97">大檔下載→稍微等一下也沒關係。</text:span></text:p>
            <text:p text:style-name="P8" loext:marker-style-name="T98"><text:span text:style-name="T97">記憶口訣：</text:span><text:span text:style-name="T155">WiFi = </text:span><text:span text:style-name="T97">急診室排隊制度（心臟病</text:span><text:span text:style-name="T155">/</text:span><text:span text:style-name="T97">語音視訊優先，小感冒</text:span><text:span text:style-name="T155">/</text:span><text:span text:style-name="T97">網頁下載等一下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Bluetooth</text:span><text:span text:style-name="T28">：老大排班（</text:span><text:span text:style-name="T27">Master-Slave</text:span><text:span text:style-name="T28">）</text:span></text:h>
      <text:p text:style-name="P35" loext:marker-style-name="T98"><text:span text:style-name="T155">Bluetooth </text:span><text:span text:style-name="T97">不靠「搶」，而是由 </text:span><text:span text:style-name="T155">Master </text:span><text:span text:style-name="T97">統一分配時間，</text:span><text:span text:style-name="T155">Slave </text:span><text:span text:style-name="T97">照順序傳資料（</text:span><text:span text:style-name="T155">0~1ms </text:span><text:span text:style-name="T97">耳機、</text:span><text:span text:style-name="T155">1~2ms </text:span><text:span text:style-name="T97">滑鼠、</text:span><text:span text:style-name="T155">2~3ms </text:span><text:span text:style-name="T97">鍵盤、</text:span><text:span text:style-name="T155">3~4ms </text:span><text:span text:style-name="T97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6"><text:span text:style-name="T196">🔵 <text:s/></text:span><text:span text:style-name="T57">為什麼要排班？</text:span></text:p>
            <text:p text:style-name="P7" loext:marker-style-name="T98"><text:span text:style-name="T97">因為藍牙裝置大多是「即時設備」，延遲太久就沒用了（耳機你說「你好」</text:span><text:span text:style-name="T155">2 </text:span><text:span text:style-name="T97">秒後才到→完蛋；滑鼠 </text:span><text:span text:style-name="T155">1 </text:span><text:span text:style-name="T97">秒後游標才動→無法使用）。因此 </text:span><text:span text:style-name="T155">Bluetooth </text:span><text:span text:style-name="T97">保留固定時槽（</text:span><text:span text:style-name="T155">Time Slot</text:span><text:span text:style-name="T97">），確保即時性與穩定性。</text:span></text:p>
            <text:p text:style-name="P8" loext:marker-style-name="T98"><text:span text:style-name="T97">記憶口訣：</text:span><text:span text:style-name="T155">WiFi = </text:span><text:span text:style-name="T97">菜市場（自由競爭，亂搶）；</text:span><text:span text:style-name="T155">Bluetooth = </text:span><text:span text:style-name="T97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4" loext:marker-style-name="T67"><text:span text:style-name="T68">即時語音</text:span><text:span text:style-name="T67"/></text:p>
          </table:table-cell>
          <table:table-cell table:style-name="表格105.A2" office:value-type="string">
            <text:p text:style-name="P4" loext:marker-style-name="T67"><text:span text:style-name="T68">全名</text:span><text:span text:style-name="T67"/></text:p>
          </table:table-cell>
          <table:table-cell table:style-name="表格105.A2" office:value-type="string">
            <text:p text:style-name="P4" loext:marker-style-name="T67"><text:span text:style-name="T68">說明</text:span><text:span text:style-name="T67"/></text:p>
          </table:table-cell>
          <table:table-cell table:style-name="表格105.A2" office:value-type="string">
            <text:p text:style-name="P4" loext:marker-style-name="T67"><text:span text:style-name="T68">用途</text:span><text:span text:style-name="T67"/></text:p>
          </table:table-cell>
        </table:table-row>
        <table:table-row table:style-name="表格105.1">
          <table:table-cell table:style-name="表格105.A3" office:value-type="string">
            <text:p text:style-name="P29" loext:marker-style-name="T81"><text:span text:style-name="T147">SCO</text:span><text:span text:style-name="T81"/></text:p>
          </table:table-cell>
          <table:table-cell table:style-name="表格105.A3" office:value-type="string">
            <text:p text:style-name="P29" loext:marker-style-name="T81"><text:span text:style-name="T147">Synchronous Connection-Oriented</text:span><text:span text:style-name="T81"/></text:p>
          </table:table-cell>
          <table:table-cell table:style-name="表格105.A3" office:value-type="string">
            <text:p text:style-name="P29" loext:marker-style-name="T81"><text:span text:style-name="T82">固定時槽、同步傳輸</text:span><text:span text:style-name="T81"/></text:p>
          </table:table-cell>
          <table:table-cell table:style-name="表格105.A3" office:value-type="string">
            <text:p text:style-name="P29" loext:marker-style-name="T81"><text:span text:style-name="T82">藍牙耳機通話</text:span><text:span text:style-name="T81"/></text:p>
          </table:table-cell>
        </table:table-row>
        <table:table-row table:style-name="表格105.1">
          <table:table-cell table:style-name="表格105.A4" office:value-type="string">
            <text:p text:style-name="P29" loext:marker-style-name="T81"><text:span text:style-name="T147">eSCO</text:span><text:span text:style-name="T81"/></text:p>
          </table:table-cell>
          <table:table-cell table:style-name="表格105.A4" office:value-type="string">
            <text:p text:style-name="P29" loext:marker-style-name="T81"><text:span text:style-name="T147">Enhanced SCO</text:span><text:span text:style-name="T81"/></text:p>
          </table:table-cell>
          <table:table-cell table:style-name="表格105.A4" office:value-type="string">
            <text:p text:style-name="P29" loext:marker-style-name="T81"><text:span text:style-name="T147">SCO </text:span><text:span text:style-name="T82">加強版、可重傳、品質更好</text:span></text:p>
          </table:table-cell>
          <table:table-cell table:style-name="表格105.A4" office:value-type="string">
            <text:p text:style-name="P29" loext:marker-style-name="T81"><text:span text:style-name="T82">高品質語音</text:span><text:span text:style-name="T81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6"><text:span text:style-name="T196">🔀 <text:s/></text:span><text:span text:style-name="T65">Bluetooth </text:span><text:span text:style-name="T57">抗干擾</text:span></text:p>
            <text:p text:style-name="P7" loext:marker-style-name="T98"><text:span text:style-name="T97">另：</text:span><text:span text:style-name="T155">FHSS</text:span><text:span text:style-name="T97">（跳頻展頻）— 在 </text:span><text:span text:style-name="T155">2.4GHz </text:span><text:span text:style-name="T97">頻段中每秒快速切換數百次（每秒約 </text:span><text:span text:style-name="T155">1600 </text:span><text:span text:style-name="T97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深入理解：時槽（</text:span><text:span text:style-name="T27">Time Slot</text:span><text:span text:style-name="T28">）</text:span></text:h>
      <text:p text:style-name="P35" loext:marker-style-name="T98"><text:span text:style-name="T97">時槽就是「切好的時間格子」。藍牙頻道像一條只有一個人能講話的走廊，如果大家同時講會混在一起亂掉。</text:span><text:span text:style-name="T155">Bluetooth </text:span><text:span text:style-name="T97">的解法：把時間先切成固定小格子，每個格子叫 </text:span><text:span text:style-name="T155">Time Slot</text:span><text:span text:style-name="T97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" loext:marker-style-name="T73"><text:span text:style-name="T74">三大好處</text:span><text:span text:style-name="T73"/></text:p>
            </table:table-cell>
            <table:table-cell table:style-name="表格106.A1" table:number-columns-spanned="2" office:value-type="string">
              <text:p text:style-name="P4" loext:marker-style-name="T73"><text:span text:style-name="T74">說明</text:span><text:span text:style-name="T73"/></text:p>
            </table:table-cell>
            <table:covered-table-cell/>
            <table:table-cell table:style-name="表格106.A1" office:value-type="string">
              <text:p text:style-name="P4" loext:marker-style-name="T73"><text:span text:style-name="T74">比喻</text:span><text:span text:style-name="T73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9" loext:marker-style-name="T126"><text:span text:style-name="T127">穩定不碰撞</text:span><text:span text:style-name="T126"/></text:p>
          </table:table-cell>
          <table:table-cell table:style-name="表格106.A2" table:number-columns-spanned="2" office:value-type="string">
            <text:p text:style-name="P29" loext:marker-style-name="T126"><text:span text:style-name="T127">每人有專屬時間，不會互相干擾</text:span><text:span text:style-name="T126"/></text:p>
          </table:table-cell>
          <table:covered-table-cell/>
          <table:table-cell table:style-name="表格106.A2" office:value-type="string">
            <text:p text:style-name="P29" loext:marker-style-name="T126"><text:span text:style-name="T127">公司會議室預約制</text:span><text:span text:style-name="T126"/></text:p>
          </table:table-cell>
        </table:table-row>
        <table:table-row table:style-name="表格106.1">
          <table:table-cell table:style-name="表格106.A3" office:value-type="string">
            <text:p text:style-name="P29" loext:marker-style-name="T126"><text:span text:style-name="T127">即時性保證</text:span><text:span text:style-name="T126"/></text:p>
          </table:table-cell>
          <table:table-cell table:style-name="表格106.A3" table:number-columns-spanned="2" office:value-type="string">
            <text:p text:style-name="P29" loext:marker-style-name="T126"><text:span text:style-name="T127">耳機每隔固定時間必定輪到，聲音不卡頓</text:span><text:span text:style-name="T126"/></text:p>
          </table:table-cell>
          <table:covered-table-cell/>
          <table:table-cell table:style-name="表格106.A3" office:value-type="string">
            <text:p text:style-name="P29" loext:marker-style-name="T126"><text:span text:style-name="T127">醫院預約制，準時看診</text:span><text:span text:style-name="T126"/></text:p>
          </table:table-cell>
        </table:table-row>
        <table:table-row table:style-name="表格106.1">
          <table:table-cell table:style-name="表格106.A2" office:value-type="string">
            <text:p text:style-name="P29" loext:marker-style-name="T126"><text:span text:style-name="T127">省電效果</text:span><text:span text:style-name="T126"/></text:p>
          </table:table-cell>
          <table:table-cell table:style-name="表格106.A2" table:number-columns-spanned="2" office:value-type="string">
            <text:p text:style-name="P29" loext:marker-style-name="T126"><text:span text:style-name="T127">裝置知道「還沒輪到我」，可先休眠等待</text:span><text:span text:style-name="T126"/></text:p>
          </table:table-cell>
          <table:covered-table-cell/>
          <table:table-cell table:style-name="表格106.A2" office:value-type="string">
            <text:p text:style-name="P29" loext:marker-style-name="T126"><text:span text:style-name="T127">等候室等叫號，先睡一下</text:span><text:span text:style-name="T12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6" loext:marker-style-name="T67"><text:span text:style-name="T77">WiFi </text:span><text:span text:style-name="T68">競爭制</text:span></text:p>
          </table:table-cell>
          <table:covered-table-cell/>
          <table:table-cell table:style-name="表格106.A1" table:number-columns-spanned="2" office:value-type="string">
            <text:p text:style-name="P26" loext:marker-style-name="T67"><text:span text:style-name="T77">BT </text:span><text:span text:style-name="T68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9" loext:marker-style-name="T81"><text:span text:style-name="T82">菜市場：大家自由搶。吞吐量高、速度快，但可能塞車、延遲不穩定。</text:span><text:span text:style-name="T81"/></text:p>
          </table:table-cell>
          <table:covered-table-cell/>
          <table:table-cell table:style-name="表格106.A2" table:number-columns-spanned="2" office:value-type="string">
            <text:p text:style-name="P29" loext:marker-style-name="T81"><text:span text:style-name="T82">醫院預約制：輪流看診。延遲固定、穩定省電，但速度不如 </text:span><text:span text:style-name="T147">WiFi </text:span><text:span text:style-name="T82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6"><text:span text:style-name="T196">🕐 <text:s/></text:span><text:span text:style-name="T250">考試定義（背起來）</text:span></text:p>
            <text:p text:style-name="P7" loext:marker-style-name="T98"><text:span text:style-name="T155">Time Slot</text:span><text:span text:style-name="T97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4" loext:marker-style-name="T67"><text:span text:style-name="T68">項目</text:span><text:span text:style-name="T67"/></text:p>
            </table:table-cell>
            <table:table-cell table:style-name="表格107.A1" office:value-type="string">
              <text:p text:style-name="P4" loext:marker-style-name="T67"><text:span text:style-name="T77">WiFi</text:span><text:span text:style-name="T67"/></text:p>
            </table:table-cell>
            <table:table-cell table:style-name="表格107.A1" office:value-type="string">
              <text:p text:style-name="P4" loext:marker-style-name="T67"><text:span text:style-name="T77">Bluetooth</text:span><text:span text:style-name="T67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9" loext:marker-style-name="T81"><text:span text:style-name="T82">核心機制</text:span><text:span text:style-name="T81"/></text:p>
          </table:table-cell>
          <table:table-cell table:style-name="表格107.A2" office:value-type="string">
            <text:p text:style-name="P29" loext:marker-style-name="T81"><text:span text:style-name="T147">CSMA/CA</text:span><text:span text:style-name="T82">（先偵聽再傳）</text:span></text:p>
          </table:table-cell>
          <table:table-cell table:style-name="表格107.A2" office:value-type="string">
            <text:p text:style-name="P29" loext:marker-style-name="T81"><text:span text:style-name="T147">Master-Slave</text:span><text:span text:style-name="T82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1"><text:span text:style-name="T82">即時語音 </text:span><text:span text:style-name="T147">/ QoS</text:span></text:p>
          </table:table-cell>
          <table:table-cell table:style-name="表格107.A3" office:value-type="string">
            <text:p text:style-name="P29" loext:marker-style-name="T81"><text:span text:style-name="T147">EDCA</text:span><text:span text:style-name="T82">（</text:span><text:span text:style-name="T147">QoS </text:span><text:span text:style-name="T82">優先）</text:span></text:p>
          </table:table-cell>
          <table:table-cell table:style-name="表格107.A3" office:value-type="string">
            <text:p text:style-name="P29" loext:marker-style-name="T81"><text:span text:style-name="T147">SCO / eSCO</text:span><text:span text:style-name="T82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1"><text:span text:style-name="T82">速度</text:span><text:span text:style-name="T81"/></text:p>
          </table:table-cell>
          <table:table-cell table:style-name="表格107.A2" office:value-type="string">
            <text:p text:style-name="P29" loext:marker-style-name="T81"><text:span text:style-name="T82">高速（快）</text:span><text:span text:style-name="T81"/></text:p>
          </table:table-cell>
          <table:table-cell table:style-name="表格107.A2" office:value-type="string">
            <text:p text:style-name="P29" loext:marker-style-name="T81"><text:span text:style-name="T82">較慢</text:span><text:span text:style-name="T81"/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1"><text:span text:style-name="T82">耗電量</text:span><text:span text:style-name="T81"/></text:p>
          </table:table-cell>
          <table:table-cell table:style-name="表格107.A3" office:value-type="string">
            <text:p text:style-name="P29" loext:marker-style-name="T81"><text:span text:style-name="T82">較高</text:span><text:span text:style-name="T81"/></text:p>
          </table:table-cell>
          <table:table-cell table:style-name="表格107.A3" office:value-type="string">
            <text:p text:style-name="P29" loext:marker-style-name="T81"><text:span text:style-name="T82">低功耗</text:span><text:span text:style-name="T81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1"><text:span text:style-name="T82">傳輸距離</text:span><text:span text:style-name="T81"/></text:p>
          </table:table-cell>
          <table:table-cell table:style-name="表格107.A2" office:value-type="string">
            <text:p text:style-name="P29" loext:marker-style-name="T81"><text:span text:style-name="T82">較遠（數十</text:span><text:span text:style-name="T147">~</text:span><text:span text:style-name="T82">百公尺）</text:span></text:p>
          </table:table-cell>
          <table:table-cell table:style-name="表格107.A2" office:value-type="string">
            <text:p text:style-name="P29" loext:marker-style-name="T81"><text:span text:style-name="T82">較短（約 </text:span><text:span text:style-name="T147">10 </text:span><text:span text:style-name="T82">公尺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1"><text:span text:style-name="T82">穩定性</text:span><text:span text:style-name="T81"/></text:p>
          </table:table-cell>
          <table:table-cell table:style-name="表格107.A3" office:value-type="string">
            <text:p text:style-name="P29" loext:marker-style-name="T81"><text:span text:style-name="T82">受干擾影響較大</text:span><text:span text:style-name="T81"/></text:p>
          </table:table-cell>
          <table:table-cell table:style-name="表格107.A3" office:value-type="string">
            <text:p text:style-name="P29" loext:marker-style-name="T81"><text:span text:style-name="T82">固定時槽非常穩定</text:span><text:span text:style-name="T81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1"><text:span text:style-name="T82">適用場景</text:span><text:span text:style-name="T81"/></text:p>
          </table:table-cell>
          <table:table-cell table:style-name="表格107.A2" office:value-type="string">
            <text:p text:style-name="P29" loext:marker-style-name="T81"><text:span text:style-name="T82">上網、看影片、大檔下載</text:span><text:span text:style-name="T81"/></text:p>
          </table:table-cell>
          <table:table-cell table:style-name="表格107.A2" office:value-type="string">
            <text:p text:style-name="P29" loext:marker-style-name="T81"><text:span text:style-name="T82">耳機、滑鼠、鍵盤、通話</text:span><text:span text:style-name="T81"/></text:p>
          </table:table-cell>
        </table:table-row>
      </table:table>
      <text:h text:style-name="P11" text:outline-level="2" loext:marker-style-name="T27"><text:span text:style-name="T28">五、</text:span><text:span text:style-name="T27">L2CAP</text:span><text:span text:style-name="T28">：藍牙的資料管理員</text:span></text:h>
      <text:p text:style-name="P35" loext:marker-style-name="T98"><text:span text:style-name="T155">L2CAP</text:span><text:span text:style-name="T97">（</text:span><text:span text:style-name="T155">Logical Link Control and Adaptation Protocol</text:span><text:span text:style-name="T97">）是藍牙協議的重要一層，負責：管理並分流不同類型的資料（語音、檔案、控制指令）；建立、管理、釋放「邏輯通道」；提供 </text:span><text:span text:style-name="T155">QoS </text:span><text:span text:style-name="T97">服務品質保證。一句話記憶：</text:span><text:span text:style-name="T155">L2CAP </text:span><text:span text:style-name="T97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" loext:marker-style-name="T73"><text:span text:style-name="T74">三種邏輯通道</text:span><text:span text:style-name="T73"/></text:p>
            </table:table-cell>
            <table:table-cell table:style-name="表格108.A1" table:number-columns-spanned="2" office:value-type="string">
              <text:p text:style-name="P4" loext:marker-style-name="T73"><text:span text:style-name="T74">特性</text:span><text:span text:style-name="T73"/></text:p>
            </table:table-cell>
            <table:covered-table-cell/>
            <table:table-cell table:style-name="表格108.A1" office:value-type="string">
              <text:p text:style-name="P4" loext:marker-style-name="T73"><text:span text:style-name="T74">用途</text:span><text:span text:style-name="T73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9" loext:marker-style-name="T126"><text:span text:style-name="T179">Connection-oriented</text:span><text:span text:style-name="T127">（連線導向）</text:span></text:p>
          </table:table-cell>
          <table:table-cell table:style-name="表格108.A2" table:number-columns-spanned="2" office:value-type="string">
            <text:p text:style-name="P29" loext:marker-style-name="T126"><text:span text:style-name="T127">有建立連線、雙方確認，可靠、確保收到</text:span><text:span text:style-name="T126"/></text:p>
          </table:table-cell>
          <table:covered-table-cell/>
          <table:table-cell table:style-name="表格108.A2" office:value-type="string">
            <text:p text:style-name="P29" loext:marker-style-name="T126"><text:span text:style-name="T127">重要資料傳輸、檔案（像打電話）</text:span><text:span text:style-name="T126"/></text:p>
          </table:table-cell>
        </table:table-row>
        <table:table-row table:style-name="表格108.1">
          <table:table-cell table:style-name="表格108.A3" office:value-type="string">
            <text:p text:style-name="P29" loext:marker-style-name="T126"><text:span text:style-name="T179">Connectionless</text:span><text:span text:style-name="T127">（非連線）</text:span></text:p>
          </table:table-cell>
          <table:table-cell table:style-name="表格108.A3" table:number-columns-spanned="2" office:value-type="string">
            <text:p text:style-name="P29" loext:marker-style-name="T126"><text:span text:style-name="T127">直接送出、不確認，快速但可能遺失</text:span><text:span text:style-name="T126"/></text:p>
          </table:table-cell>
          <table:covered-table-cell/>
          <table:table-cell table:style-name="表格108.A3" office:value-type="string">
            <text:p text:style-name="P29" loext:marker-style-name="T126"><text:span text:style-name="T127">廣播、串流（像廣播）</text:span><text:span text:style-name="T126"/></text:p>
          </table:table-cell>
        </table:table-row>
        <table:table-row table:style-name="表格108.1">
          <table:table-cell table:style-name="表格108.A2" office:value-type="string">
            <text:p text:style-name="P29" loext:marker-style-name="T126"><text:span text:style-name="T179">Signaling Channel</text:span><text:span text:style-name="T127">（信令通道）</text:span></text:p>
          </table:table-cell>
          <table:table-cell table:style-name="表格108.A2" table:number-columns-spanned="2" office:value-type="string">
            <text:p text:style-name="P29" loext:marker-style-name="T126"><text:span text:style-name="T127">控制管理用，不傳資料只管控制</text:span><text:span text:style-name="T126"/></text:p>
          </table:table-cell>
          <table:covered-table-cell/>
          <table:table-cell table:style-name="表格108.A2" office:value-type="string">
            <text:p text:style-name="P29" loext:marker-style-name="T126"><text:span text:style-name="T127">建立</text:span><text:span text:style-name="T179">/</text:span><text:span text:style-name="T127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4" loext:marker-style-name="T67"><text:span text:style-name="T77">OSI </text:span><text:span text:style-name="T68">層</text:span></text:p>
          </table:table-cell>
          <table:covered-table-cell/>
          <table:table-cell table:style-name="表格108.A1" table:number-columns-spanned="2" office:value-type="string">
            <text:p text:style-name="P4" loext:marker-style-name="T67"><text:span text:style-name="T68">藍牙對應</text:span><text:span text:style-name="T67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1"><text:span text:style-name="T82">應用層 </text:span><text:span text:style-name="T147">Application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1"><text:span text:style-name="T147">App / </text:span><text:span text:style-name="T82">語音 </text:span><text:span text:style-name="T147">/ </text:span><text:span text:style-name="T82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1"><text:span text:style-name="T82">傳輸層 </text:span><text:span text:style-name="T147">Transport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1"><text:span text:style-name="T82">部分功能在 </text:span><text:span text:style-name="T147">L2CAP</text:span><text:span text:style-name="T82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9" loext:marker-style-name="T81"><text:span text:style-name="T82">網路層 </text:span><text:span text:style-name="T147">Network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1"><text:span text:style-name="T82">（幾乎不對應，藍牙無路由概念）</text:span><text:span text:style-name="T81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1"><text:span text:style-name="T82">資料鏈結層 </text:span><text:span text:style-name="T147">Data Link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1"><text:span text:style-name="T147">L2CAP / MAC </text:span><text:span text:style-name="T82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1"><text:span text:style-name="T82">實體層 </text:span><text:span text:style-name="T147">Physical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1"><text:span text:style-name="T82">無線電波（</text:span><text:span text:style-name="T147">2.4GHz</text:span><text:span text:style-name="T82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6"><text:span text:style-name="T196">📐 <text:s/></text:span><text:span text:style-name="T218">重要</text:span></text:p>
            <text:p text:style-name="P7" loext:marker-style-name="T98"><text:span text:style-name="T155">L2CAP </text:span><text:span text:style-name="T97">主要位於「資料鏈結層（</text:span><text:span text:style-name="T155">Data Link Layer</text:span><text:span text:style-name="T97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"><text:span text:style-name="T164">WiFi </text:span><text:span text:style-name="T109">用什麼避免碰撞？　</text:span><text:span text:style-name="T97">✗ </text:span><text:span text:style-name="T155">CSMA/CD</text:span><text:span text:style-name="T97">（有線乙太網路機制）→ ✓ </text:span><text:span text:style-name="T155">CSMA/CA</text:span><text:span text:style-name="T97">（</text:span><text:span text:style-name="T155">WiFi </text:span><text:span text:style-name="T97">用「避免」碰撞，不是「偵測」）。口訣：有線 </text:span><text:span text:style-name="T155">Ethernet = CD</text:span><text:span text:style-name="T97">（</text:span><text:span text:style-name="T155">Detect</text:span><text:span text:style-name="T97">），無線 </text:span><text:span text:style-name="T155">WiFi = CA</text:span><text:span text:style-name="T97">（</text:span><text:span text:style-name="T155">Avoid</text:span><text:span text:style-name="T97">）。</text:span></text:p>
            <text:p text:style-name="P8"><text:span text:style-name="T164">Bluetooth </text:span><text:span text:style-name="T109">是競爭制還是排程制？　</text:span><text:span text:style-name="T97">✓ 排程制（</text:span><text:span text:style-name="T155">Master-Slave</text:span><text:span text:style-name="T97">，老大安排時槽），不是競爭制。</text:span></text:p>
            <text:p text:style-name="P8"><text:span text:style-name="T109">藍牙即時語音用什麼？　</text:span><text:span text:style-name="T97">✓ </text:span><text:span text:style-name="T155">SCO</text:span><text:span text:style-name="T97">（同步連線）或 </text:span><text:span text:style-name="T155">eSCO</text:span><text:span text:style-name="T97">（加強版，可重傳）。</text:span></text:p>
            <text:p text:style-name="P8"><text:span text:style-name="T164">L2CAP </text:span><text:span text:style-name="T109">控制管理用哪個通道？　</text:span><text:span text:style-name="T97">✓ </text:span><text:span text:style-name="T155">Signaling Channel</text:span><text:span text:style-name="T97">；最可靠＝</text:span><text:span text:style-name="T155">Connection-oriented</text:span><text:span text:style-name="T97">；最快速低延遲＝</text:span><text:span text:style-name="T155">Connectionless</text:span><text:span text:style-name="T97">。</text:span></text:p>
          </table:table-cell>
        </table:table-row>
        <table:table-row table:style-name="表格109.1">
          <table:table-cell table:style-name="表格109.A2" office:value-type="string">
            <text:p text:style-name="P6"><text:span text:style-name="T196">⏱ <text:s/></text:span><text:span text:style-name="T250">考前 </text:span><text:span text:style-name="T256">30 </text:span><text:span text:style-name="T250">秒濃縮</text:span></text:p>
            <text:p text:style-name="P7" loext:marker-style-name="T98"><text:span text:style-name="T155">WiFi</text:span><text:span text:style-name="T97">＝搶頻道 </text:span><text:span text:style-name="T155">· BT</text:span><text:span text:style-name="T97">＝排班 </text:span><text:span text:style-name="T155">· </text:span><text:span text:style-name="T97">時槽＝時間格子 </text:span><text:span text:style-name="T155">· SCO</text:span><text:span text:style-name="T97">＝語音 </text:span><text:span text:style-name="T155">· L2CAP</text:span><text:span text:style-name="T97">＝三通道（位於 </text:span><text:span text:style-name="T155">Data Link </text:span><text:span text:style-name="T97">層）。</text:span></text:p>
          </table:table-cell>
        </table:table-row>
      </table:table>
      <text:h text:style-name="P17" text:outline-level="1" loext:marker-style-name="T69"><text:span text:style-name="T70">第 十 篇　資訊安全：設備防護 </text:span><text:span text:style-name="T69">· </text:span><text:span text:style-name="T70">攻防解析 </text:span><text:span text:style-name="T69">· </text:span><text:span text:style-name="T70">企業資安 </text:span><text:span text:style-name="T69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6"><text:span text:style-name="T196">🛡️ <text:s/></text:span><text:span text:style-name="T50">本篇地圖</text:span></text:p>
            <text:p text:style-name="P7" loext:marker-style-name="T98"><text:span text:style-name="T97">本篇是全書最大主題，分六大部分：① 防護設備（</text:span><text:span text:style-name="T155">FW/WAF/NGFW/DMZ/IOC/Proxy</text:span><text:span text:style-name="T97">）；② </text:span><text:span text:style-name="T155">SQL Injection </text:span><text:span text:style-name="T97">與 </text:span><text:span text:style-name="T155">Zero-Day </text:span><text:span text:style-name="T97">攻防；③ </text:span><text:span text:style-name="T155">Firewall/IDS/IPS/SNMP/ICMP</text:span><text:span text:style-name="T97">；④ 企業資安三階段；⑤ </text:span><text:span text:style-name="T155">EDR/MDR/MITRE ATT&amp;CK/</text:span><text:span text:style-name="T97">數位韌性；⑥ </text:span><text:span text:style-name="T155">Zero Trust </text:span><text:span text:style-name="T97">零信任。</text:span></text:p>
          </table:table-cell>
        </table:table-row>
      </table:table>
      <text:h text:style-name="P11" text:outline-level="2" loext:marker-style-name="T27"><text:span text:style-name="T28">壹、資安與網路設備：</text:span><text:span text:style-name="T27">FW · WAF · NGFW · DMZ · IOC · Proxy</text:span></text:h>
      <text:p text:style-name="P35" loext:marker-style-name="T98"><text:span text:style-name="T97">想像你家是一間公司：外面是危險的 </text:span><text:span text:style-name="T155">Internet</text:span><text:span text:style-name="T97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4" loext:marker-style-name="T67"><text:span text:style-name="T68">名詞</text:span><text:span text:style-name="T67"/></text:p>
            </table:table-cell>
            <table:table-cell table:style-name="表格111.A1" office:value-type="string">
              <text:p text:style-name="P4" loext:marker-style-name="T67"><text:span text:style-name="T68">一行說明</text:span><text:span text:style-name="T67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9" loext:marker-style-name="T81"><text:span text:style-name="T147">FW</text:span><text:span text:style-name="T81"/></text:p>
          </table:table-cell>
          <table:table-cell table:style-name="表格111.A2" office:value-type="string">
            <text:p text:style-name="P29" loext:marker-style-name="T81"><text:span text:style-name="T82">傳統防火牆，只看封包「外面」的 </text:span><text:span text:style-name="T147">IP</text:span><text:span text:style-name="T82">、</text:span><text:span text:style-name="T147">Port</text:span><text:span text:style-name="T82">、</text:span><text:span text:style-name="T147">Protocol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1"><text:span text:style-name="T147">WAF</text:span><text:span text:style-name="T81"/></text:p>
          </table:table-cell>
          <table:table-cell table:style-name="表格111.A3" office:value-type="string">
            <text:p text:style-name="P29" loext:marker-style-name="T81"><text:span text:style-name="T82">網站應用防火牆，會打開封包「裡面」，防 </text:span><text:span text:style-name="T147">SQL Injection</text:span><text:span text:style-name="T82">、</text:span><text:span text:style-name="T147">XSS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1"><text:span text:style-name="T147">NGFW</text:span><text:span text:style-name="T81"/></text:p>
          </table:table-cell>
          <table:table-cell table:style-name="表格111.A2" office:value-type="string">
            <text:p text:style-name="P29" loext:marker-style-name="T81"><text:span text:style-name="T82">次世代防火牆，比 </text:span><text:span text:style-name="T147">FW </text:span><text:span text:style-name="T82">更聰明，有 </text:span><text:span text:style-name="T147">DPI </text:span><text:span text:style-name="T82">深度檢查、</text:span><text:span text:style-name="T147">IPS</text:span><text:span text:style-name="T82">、</text:span><text:span text:style-name="T147">App </text:span><text:span text:style-name="T82">識別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1"><text:span text:style-name="T147">DMZ</text:span><text:span text:style-name="T81"/></text:p>
          </table:table-cell>
          <table:table-cell table:style-name="表格111.A3" office:value-type="string">
            <text:p text:style-name="P29" loext:marker-style-name="T81"><text:span text:style-name="T82">隔離區，把對外服務（</text:span><text:span text:style-name="T147">Web</text:span><text:span text:style-name="T82">、</text:span><text:span text:style-name="T147">Mail</text:span><text:span text:style-name="T82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1"><text:span text:style-name="T147">IOC</text:span><text:span text:style-name="T81"/></text:p>
          </table:table-cell>
          <table:table-cell table:style-name="表格111.A2" office:value-type="string">
            <text:p text:style-name="P29" loext:marker-style-name="T81"><text:span text:style-name="T82">入侵指標（攻擊事後證據）：</text:span><text:span text:style-name="T147">Domain</text:span><text:span text:style-name="T82">（網）、</text:span><text:span text:style-name="T147">Hash</text:span><text:span text:style-name="T82">（檔）、</text:span><text:span text:style-name="T147">IP</text:span><text:span text:style-name="T82">（連）、</text:span><text:span text:style-name="T147">C2</text:span><text:span text:style-name="T82">（控）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1"><text:span text:style-name="T147">Proxy</text:span><text:span text:style-name="T81"/></text:p>
          </table:table-cell>
          <table:table-cell table:style-name="表格111.A3" office:value-type="string">
            <text:p text:style-name="P29" loext:marker-style-name="T81"><text:span text:style-name="T82">正向代理，幫「使用者（</text:span><text:span text:style-name="T147">Client</text:span><text:span text:style-name="T82">）」隱藏 </text:span><text:span text:style-name="T147">IP</text:span><text:span text:style-name="T82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1"><text:span text:style-name="T147">Reverse Proxy</text:span><text:span text:style-name="T81"/></text:p>
          </table:table-cell>
          <table:table-cell table:style-name="表格111.A2" office:value-type="string">
            <text:p text:style-name="P29" loext:marker-style-name="T81"><text:span text:style-name="T82">反向代理，幫「伺服器（</text:span><text:span text:style-name="T147">Server</text:span><text:span text:style-name="T82">）」負載平衡、隱藏主機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防火牆 </text:span><text:span text:style-name="T199">Firewall</text:span><text:span text:style-name="T200">（</text:span><text:span text:style-name="T199">FW</text:span><text:span text:style-name="T200">）</text:span></text:h>
      <text:p text:style-name="P35" loext:marker-style-name="T98"><text:span text:style-name="T97">最基本的網路防護設備，像公司門口的警衛。只看封包的「外部資訊」：</text:span><text:span text:style-name="T155">IP </text:span><text:span text:style-name="T97">位址（來者是誰）、</text:span><text:span text:style-name="T155">Port</text:span><text:span text:style-name="T97">（從哪個門進來）、</text:span><text:span text:style-name="T155">Protocol</text:span><text:span text:style-name="T97">（什麼類型）。主要運作在 </text:span><text:span text:style-name="T155">L3</text:span><text:span text:style-name="T97">（網路層）與 </text:span><text:span text:style-name="T155">L4</text:span><text:span text:style-name="T97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"><text:span text:style-name="T196">⚠️ <text:s/></text:span><text:span text:style-name="T218">缺點</text:span></text:p>
            <text:p text:style-name="P7" loext:marker-style-name="T98"><text:span text:style-name="T155">FW </text:span><text:span text:style-name="T97">只看外面，不看封包裡面的內容，無法防止應用層攻擊（如 </text:span><text:span text:style-name="T155">SQL Injection</text:span><text:span text:style-name="T97">）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網站應用防火牆 </text:span><text:span text:style-name="T199">WAF</text:span></text:h>
      <text:p text:style-name="P35" loext:marker-style-name="T98"><text:span text:style-name="T97">進階版防護，會「打開包包檢查內容」，專門防禦網站層面的攻擊：</text:span><text:span text:style-name="T155">SQL Injection</text:span><text:span text:style-name="T97">（注入惡意 </text:span><text:span text:style-name="T155">SQL </text:span><text:span text:style-name="T97">竊取資料庫）、</text:span><text:span text:style-name="T155">XSS</text:span><text:span text:style-name="T97">（插入惡意 </text:span><text:span text:style-name="T155">JavaScript</text:span><text:span text:style-name="T97">）、其他 </text:span><text:span text:style-name="T155">HTTP </text:span><text:span text:style-name="T97">層攻擊（</text:span><text:span text:style-name="T155">CSRF</text:span><text:span text:style-name="T97">、</text:span><text:span text:style-name="T155">Path Traversal</text:span><text:span text:style-name="T97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4" loext:marker-style-name="T67"><text:span text:style-name="T68">比較項目</text:span><text:span text:style-name="T67"/></text:p>
            </table:table-cell>
            <table:table-cell table:style-name="表格113.A1" office:value-type="string">
              <text:p text:style-name="P4" loext:marker-style-name="T67"><text:span text:style-name="T77">FW</text:span><text:span text:style-name="T67"/></text:p>
            </table:table-cell>
            <table:table-cell table:style-name="表格113.A1" office:value-type="string">
              <text:p text:style-name="P4" loext:marker-style-name="T67"><text:span text:style-name="T77">WAF</text:span><text:span text:style-name="T67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9" loext:marker-style-name="T81"><text:span text:style-name="T82">檢查範圍</text:span><text:span text:style-name="T81"/></text:p>
          </table:table-cell>
          <table:table-cell table:style-name="表格113.A2" office:value-type="string">
            <text:p text:style-name="P29" loext:marker-style-name="T81"><text:span text:style-name="T82">封包外面（</text:span><text:span text:style-name="T147">IP/Port</text:span><text:span text:style-name="T82">）</text:span></text:p>
          </table:table-cell>
          <table:table-cell table:style-name="表格113.A2" office:value-type="string">
            <text:p text:style-name="P29" loext:marker-style-name="T81"><text:span text:style-name="T82">封包裡面（</text:span><text:span text:style-name="T147">HTTP </text:span><text:span text:style-name="T82">內容）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1"><text:span text:style-name="T147">OSI </text:span><text:span text:style-name="T82">分層</text:span></text:p>
          </table:table-cell>
          <table:table-cell table:style-name="表格113.A3" office:value-type="string">
            <text:p text:style-name="P29" loext:marker-style-name="T81"><text:span text:style-name="T147">L3 / L4</text:span><text:span text:style-name="T81"/></text:p>
          </table:table-cell>
          <table:table-cell table:style-name="表格113.A3" office:value-type="string">
            <text:p text:style-name="P29" loext:marker-style-name="T81"><text:span text:style-name="T147">L7</text:span><text:span text:style-name="T82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9" loext:marker-style-name="T81"><text:span text:style-name="T82">防禦 </text:span><text:span text:style-name="T147">SQL Injection</text:span></text:p>
          </table:table-cell>
          <table:table-cell table:style-name="表格113.A2" office:value-type="string">
            <text:p text:style-name="P29" loext:marker-style-name="T81"><text:span text:style-name="T147">✗ </text:span><text:span text:style-name="T82">無法</text:span></text:p>
          </table:table-cell>
          <table:table-cell table:style-name="表格113.A2" office:value-type="string">
            <text:p text:style-name="P29" loext:marker-style-name="T81"><text:span text:style-name="T147">○ </text:span><text:span text:style-name="T82">可以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1"><text:span text:style-name="T82">防禦 </text:span><text:span text:style-name="T147">XSS</text:span></text:p>
          </table:table-cell>
          <table:table-cell table:style-name="表格113.A3" office:value-type="string">
            <text:p text:style-name="P29" loext:marker-style-name="T81"><text:span text:style-name="T147">✗ </text:span><text:span text:style-name="T82">無法</text:span></text:p>
          </table:table-cell>
          <table:table-cell table:style-name="表格113.A3" office:value-type="string">
            <text:p text:style-name="P29" loext:marker-style-name="T81"><text:span text:style-name="T147">○ </text:span><text:span text:style-name="T82">可以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次世代防火牆 </text:span><text:span text:style-name="T199">NGFW</text:span></text:h>
      <text:p text:style-name="P35" loext:marker-style-name="T98"><text:span text:style-name="T97">在傳統 </text:span><text:span text:style-name="T155">FW </text:span><text:span text:style-name="T97">基礎上大幅強化：</text:span><text:span text:style-name="T155">DPI</text:span><text:span text:style-name="T97">（深度封包檢測）、</text:span><text:span text:style-name="T155">IPS</text:span><text:span text:style-name="T97">（入侵防禦）、</text:span><text:span text:style-name="T155">App </text:span><text:span text:style-name="T97">識別（知道你在用 </text:span><text:span text:style-name="T155">LINE </text:span><text:span text:style-name="T97">還是 </text:span><text:span text:style-name="T155">YouTube</text:span><text:span text:style-name="T97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26" loext:marker-style-name="T67"><text:span text:style-name="T68">能力</text:span><text:span text:style-name="T67"/></text:p>
            </table:table-cell>
            <table:table-cell table:style-name="表格114.A1" office:value-type="string">
              <text:p text:style-name="P26" loext:marker-style-name="T67"><text:span text:style-name="T77">FW</text:span><text:span text:style-name="T67"/></text:p>
            </table:table-cell>
            <table:table-cell table:style-name="表格114.A1" office:value-type="string">
              <text:p text:style-name="P26" loext:marker-style-name="T67"><text:span text:style-name="T77">WAF</text:span><text:span text:style-name="T67"/></text:p>
            </table:table-cell>
            <table:table-cell table:style-name="表格114.A1" office:value-type="string">
              <text:p text:style-name="P26" loext:marker-style-name="T67"><text:span text:style-name="T77">NGFW</text:span><text:span text:style-name="T67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9" loext:marker-style-name="T81"><text:span text:style-name="T147">IP/Port </text:span><text:span text:style-name="T82">過濾</text:span></text:p>
          </table:table-cell>
          <table:table-cell table:style-name="表格114.A2" office:value-type="string">
            <text:p text:style-name="P28" loext:marker-style-name="T239"><text:span text:style-name="T244">○</text:span><text:span text:style-name="T239"/></text:p>
          </table:table-cell>
          <table:table-cell table:style-name="表格114.A2" office:value-type="string">
            <text:p text:style-name="P28" loext:marker-style-name="T239"><text:span text:style-name="T244">○</text:span><text:span text:style-name="T239"/></text:p>
          </table:table-cell>
          <table:table-cell table:style-name="表格114.A2" office:value-type="string">
            <text:p text:style-name="P28" loext:marker-style-name="T239"><text:span text:style-name="T244">○</text:span><text:span text:style-name="T239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9" loext:marker-style-name="T81"><text:span text:style-name="T147">HTTP </text:span><text:span text:style-name="T82">內容檢查</text:span></text:p>
          </table:table-cell>
          <table:table-cell table:style-name="表格114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3" office:value-type="string">
            <text:p text:style-name="P28" loext:marker-style-name="T239"><text:span text:style-name="T244">○</text:span><text:span text:style-name="T239"/></text:p>
          </table:table-cell>
          <table:table-cell table:style-name="表格114.A3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1"><text:span text:style-name="T147">DPI </text:span><text:span text:style-name="T82">深度檢查</text:span></text:p>
          </table:table-cell>
          <table:table-cell table:style-name="表格114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2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114.1">
          <table:table-cell table:style-name="表格114.A3" office:value-type="string">
            <text:p text:style-name="P29" loext:marker-style-name="T81"><text:span text:style-name="T147">App </text:span><text:span text:style-name="T82">識別</text:span></text:p>
          </table:table-cell>
          <table:table-cell table:style-name="表格114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3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3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1"><text:span text:style-name="T147">IPS </text:span><text:span text:style-name="T82">入侵防禦</text:span></text:p>
          </table:table-cell>
          <table:table-cell table:style-name="表格114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2" office:value-type="string">
            <text:p text:style-name="P28" loext:marker-style-name="T227"><text:span text:style-name="T234">✗</text:span><text:span text:style-name="T227"/></text:p>
          </table:table-cell>
          <table:table-cell table:style-name="表格114.A2" office:value-type="string">
            <text:p text:style-name="P28" loext:marker-style-name="T239"><text:span text:style-name="T244">○</text:span><text:span text:style-name="T239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6"><text:span text:style-name="T196">💡 <text:s/></text:span><text:span text:style-name="T200">實務說明</text:span></text:p>
            <text:p text:style-name="P7" loext:marker-style-name="T98"><text:span text:style-name="T155">NGFW </text:span><text:span text:style-name="T97">在現代企業通常用來「取代」傳統 </text:span><text:span text:style-name="T155">FW</text:span><text:span text:style-name="T97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DMZ</text:span><text:span text:style-name="T200">（非軍事區 </text:span><text:span text:style-name="T199">/ </text:span><text:span text:style-name="T200">隔離區）</text:span></text:h>
      <text:p text:style-name="P35" loext:marker-style-name="T98"><text:span text:style-name="T97">網路架構中的「隔離緩衝區」，專門放置需要對外公開的服務。生活比喻：</text:span><text:span text:style-name="T155">DMZ</text:span><text:span text:style-name="T97">＝大樓門口的接待室，訪客只能到接待室、無法進入辦公室；就算接待室被搗亂，也不影響裡面的員工與機密。通常放：</text:span><text:span text:style-name="T155">Web Server</text:span><text:span text:style-name="T97">、</text:span><text:span text:style-name="T155">Mail Server</text:span><text:span text:style-name="T97">、</text:span><text:span text:style-name="T155">DNS Server</text:span><text:span text:style-name="T97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6"><text:span text:style-name="T196">⚠️ <text:s/></text:span><text:span text:style-name="T218">考試陷阱</text:span></text:p>
            <text:p text:style-name="P7" loext:marker-style-name="T98"><text:span text:style-name="T155">DMZ </text:span><text:span text:style-name="T97">的用途是「隔離保護」（就算 </text:span><text:span text:style-name="T155">DMZ </text:span><text:span text:style-name="T97">內伺服器被駭，駭客也無法直接進入內部網路），不是提升速度，也不是加密資料！</text:span></text:p>
          </table:table-cell>
        </table:table-row>
      </table:table>
      <text:h text:style-name="P12" text:outline-level="3"><text:span text:style-name="T198">▍</text:span><text:span text:style-name="T199"> IOC</text:span><text:span text:style-name="T200">（入侵指標）</text:span></text:h>
      <text:p text:style-name="P35" loext:marker-style-name="T98"><text:span text:style-name="T155">IOC</text:span><text:span text:style-name="T97">（</text:span><text:span text:style-name="T155">Indicator of Compromise</text:span><text:span text:style-name="T97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6"><text:span text:style-name="T196">🎯 <text:s/></text:span><text:span text:style-name="T250">核心觀念</text:span></text:p>
            <text:p text:style-name="P7" loext:marker-style-name="T98"><text:span text:style-name="T155">IOC </text:span><text:span text:style-name="T97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6" loext:marker-style-name="T73"><text:span text:style-name="T74">口訣</text:span><text:span text:style-name="T73"/></text:p>
          </table:table-cell>
          <table:table-cell table:style-name="表格116.A2" office:value-type="string">
            <text:p text:style-name="P26" loext:marker-style-name="T73"><text:span text:style-name="T79">IOC </text:span><text:span text:style-name="T74">類型</text:span></text:p>
          </table:table-cell>
          <table:table-cell table:style-name="表格116.A2" office:value-type="string">
            <text:p text:style-name="P26" loext:marker-style-name="T73"><text:span text:style-name="T74">白話說明</text:span><text:span text:style-name="T73"/></text:p>
          </table:table-cell>
          <table:table-cell table:style-name="表格116.A2" office:value-type="string">
            <text:p text:style-name="P26" loext:marker-style-name="T73"><text:span text:style-name="T74">對應防禦工具</text:span><text:span text:style-name="T73"/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48"><text:span text:style-name="T249">網</text:span><text:span text:style-name="T248"/></text:p>
          </table:table-cell>
          <table:table-cell table:style-name="表格116.A3" office:value-type="string">
            <text:p text:style-name="P29" loext:marker-style-name="T126"><text:span text:style-name="T127">惡意 </text:span><text:span text:style-name="T179">Domain</text:span><text:span text:style-name="T127">（網域）</text:span></text:p>
          </table:table-cell>
          <table:table-cell table:style-name="表格116.A3" office:value-type="string">
            <text:p text:style-name="P29" loext:marker-style-name="T126"><text:span text:style-name="T127">釣魚網站網址，用來騙帳密、假冒正規網站</text:span><text:span text:style-name="T126"/></text:p>
          </table:table-cell>
          <table:table-cell table:style-name="表格116.A3" office:value-type="string">
            <text:p text:style-name="P29" loext:marker-style-name="T126"><text:span text:style-name="T179">DNS </text:span><text:span text:style-name="T127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48"><text:span text:style-name="T249">檔</text:span><text:span text:style-name="T248"/></text:p>
          </table:table-cell>
          <table:table-cell table:style-name="表格116.A4" office:value-type="string">
            <text:p text:style-name="P29" loext:marker-style-name="T126"><text:span text:style-name="T127">惡意 </text:span><text:span text:style-name="T179">Hash</text:span><text:span text:style-name="T127">（雜湊值）</text:span></text:p>
          </table:table-cell>
          <table:table-cell table:style-name="表格116.A4" office:value-type="string">
            <text:p text:style-name="P29" loext:marker-style-name="T126"><text:span text:style-name="T127">惡意程式的唯一特徵碼，改檔名也能識別</text:span><text:span text:style-name="T126"/></text:p>
          </table:table-cell>
          <table:table-cell table:style-name="表格116.A4" office:value-type="string">
            <text:p text:style-name="P29" loext:marker-style-name="T126"><text:span text:style-name="T127">防毒軟體 </text:span><text:span text:style-name="T179">AV</text:span><text:span text:style-name="T127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48"><text:span text:style-name="T249">連</text:span><text:span text:style-name="T248"/></text:p>
          </table:table-cell>
          <table:table-cell table:style-name="表格116.A3" office:value-type="string">
            <text:p text:style-name="P29" loext:marker-style-name="T126"><text:span text:style-name="T127">惡意 </text:span><text:span text:style-name="T179">IP </text:span><text:span text:style-name="T127">位址</text:span></text:p>
          </table:table-cell>
          <table:table-cell table:style-name="表格116.A3" office:value-type="string">
            <text:p text:style-name="P29" loext:marker-style-name="T126"><text:span text:style-name="T127">感染後電腦對外異常連線的目標</text:span><text:span text:style-name="T126"/></text:p>
          </table:table-cell>
          <table:table-cell table:style-name="表格116.A3" office:value-type="string">
            <text:p text:style-name="P29" loext:marker-style-name="T126"><text:span text:style-name="T127">防火牆 </text:span><text:span text:style-name="T179">FW / NGFW</text:span><text:span text:style-name="T127">（封鎖 </text:span><text:span text:style-name="T179">IP</text:span><text:span text:style-name="T127">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48"><text:span text:style-name="T249">控</text:span><text:span text:style-name="T248"/></text:p>
          </table:table-cell>
          <table:table-cell table:style-name="表格116.A4" office:value-type="string">
            <text:p text:style-name="P29" loext:marker-style-name="T126"><text:span text:style-name="T179">C2 Server</text:span><text:span text:style-name="T127">（指揮控制）</text:span></text:p>
          </table:table-cell>
          <table:table-cell table:style-name="表格116.A4" office:value-type="string">
            <text:p text:style-name="P29" loext:marker-style-name="T126"><text:span text:style-name="T127">駭客遠端操控被感染主機的總部</text:span><text:span text:style-name="T126"/></text:p>
          </table:table-cell>
          <table:table-cell table:style-name="表格116.A4" office:value-type="string">
            <text:p text:style-name="P29" loext:marker-style-name="T126"><text:span text:style-name="T179">SIEM / IDS</text:span><text:span text:style-name="T127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6"><text:span text:style-name="T196">▸ <text:s/></text:span><text:span text:style-name="T50">攻擊全流程（</text:span><text:span text:style-name="T61">IOC </text:span><text:span text:style-name="T50">出現在哪裡？）</text:span></text:p>
            <text:p text:style-name="P7" loext:marker-style-name="T98"><text:span text:style-name="T155">① </text:span><text:span text:style-name="T97">駭客準備：建立釣魚網站（</text:span><text:span text:style-name="T155">Domain</text:span><text:span text:style-name="T97">）、製作惡意程式（</text:span><text:span text:style-name="T155">Hash</text:span><text:span text:style-name="T97">）、架設控制中心（</text:span><text:span text:style-name="T155">C2</text:span><text:span text:style-name="T97">）→ ② 發動攻擊：受害者點釣魚網站 → 下載惡意程式 → ③ 主機感染：電腦自動連回駭客主機（</text:span><text:span text:style-name="T155">IP</text:span><text:span text:style-name="T97">）或 </text:span><text:span text:style-name="T155">C2 → ④ </text:span><text:span text:style-name="T97">駭客控制：下指令、偷資料、橫向移動 → ⑤ 資安系統偵測：比對異常 </text:span><text:span text:style-name="T155">IP</text:span><text:span text:style-name="T97">、惡意 </text:span><text:span text:style-name="T155">Domain</text:span><text:span text:style-name="T97">、已知 </text:span><text:span text:style-name="T155">Hash</text:span><text:span text:style-name="T97">、</text:span><text:span text:style-name="T155">C2 </text:span><text:span text:style-name="T97">行為 → ⑥ 判定中毒 → </text:span><text:span text:style-name="T155">IOC </text:span><text:span text:style-name="T97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6"><text:span text:style-name="T196">⚡ <text:s/></text:span><text:span text:style-name="T210">10 </text:span><text:span text:style-name="T200">秒口訣速記</text:span></text:p>
            <text:p text:style-name="P7" loext:marker-style-name="T98"><text:span text:style-name="T97">網騙你（</text:span><text:span text:style-name="T155">Domain</text:span><text:span text:style-name="T97">）→ 檔害你（</text:span><text:span text:style-name="T155">Hash</text:span><text:span text:style-name="T97">）→ 連出去（</text:span><text:span text:style-name="T155">IP</text:span><text:span text:style-name="T97">）→ 被控制（</text:span><text:span text:style-name="T155">C2</text:span><text:span text:style-name="T97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Proxy </text:span><text:span text:style-name="T200">與 </text:span><text:span text:style-name="T199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6" loext:marker-style-name="T67"><text:span text:style-name="T77">🧍 Proxy</text:span><text:span text:style-name="T68">（正向代理）— 幫 </text:span><text:span text:style-name="T77">Client</text:span></text:p>
            </table:table-cell>
            <table:table-cell table:style-name="表格117.A1" office:value-type="string">
              <text:p text:style-name="P26" loext:marker-style-name="T67"><text:span text:style-name="T77">🏢 Reverse Proxy</text:span><text:span text:style-name="T68">（反向代理）— 幫 </text:span><text:span text:style-name="T77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9" loext:marker-style-name="T81"><text:span text:style-name="T82">流程：你 → </text:span><text:span text:style-name="T147">Proxy → </text:span><text:span text:style-name="T82">網站。隱藏使用者真實 </text:span><text:span text:style-name="T147">IP</text:span><text:span text:style-name="T82">、</text:span><text:span text:style-name="T147">Cache </text:span><text:span text:style-name="T82">加速、企業控管員工能存取哪些網站。比</text:span><text:soft-page-break/><text:span text:style-name="T82">喻：你請朋友幫你買東西，店家不知道真正買家是你。</text:span></text:p>
          </table:table-cell>
          <table:table-cell table:style-name="表格117.A2" office:value-type="string">
            <text:p text:style-name="P29" loext:marker-style-name="T81"><text:span text:style-name="T82">流程：你 → </text:span><text:span text:style-name="T147">Reverse Proxy → </text:span><text:span text:style-name="T82">真正 </text:span><text:span text:style-name="T147">Server</text:span><text:span text:style-name="T82">。負載平衡、隱藏後端伺服器、</text:span><text:span text:style-name="T147">SSL </text:span><text:span text:style-name="T82">終止與安全防護。比喻：公</text:span><text:soft-page-break/><text:span text:style-name="T82">司大廳接待員分流訪客，客人不知道真正辦公室在哪層。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6"><text:span text:style-name="T196">🚧 <text:s/></text:span><text:span text:style-name="T50">封包闖關順序</text:span></text:p>
            <text:p text:style-name="P7" loext:marker-style-name="T98"><text:span text:style-name="T155">🧍 </text:span><text:span text:style-name="T97">使用者（</text:span><text:span text:style-name="T155">Client</text:span><text:span text:style-name="T97">）→ 🔵 </text:span><text:span text:style-name="T155">Proxy</text:span><text:span text:style-name="T97">（選用，隱藏 </text:span><text:span text:style-name="T155">IP/</text:span><text:span text:style-name="T97">上網控管）→ 🌍 </text:span><text:span text:style-name="T155">Internet → 🔥 FW/NGFW</text:span><text:span text:style-name="T97">（第一道防線，過濾 </text:span><text:span text:style-name="T155">IP/Port/</text:span><text:span text:style-name="T97">深度檢查）→ 🏝 </text:span><text:span text:style-name="T155">DMZ</text:span><text:span text:style-name="T97">（</text:span><text:span text:style-name="T155">Web/Mail/DNS </text:span><text:span text:style-name="T97">伺服器）→ 🛡 </text:span><text:span text:style-name="T155">WAF</text:span><text:span text:style-name="T97">（深度過濾 </text:span><text:span text:style-name="T155">HTTP</text:span><text:span text:style-name="T97">，防 </text:span><text:span text:style-name="T155">SQLi/XSS</text:span><text:span text:style-name="T97">）→ 🪞 </text:span><text:span text:style-name="T155">Reverse Proxy</text:span><text:span text:style-name="T97">（負載平衡</text:span><text:span text:style-name="T155">/</text:span><text:span text:style-name="T97">隱藏後端）→ 🏢 內部 </text:span><text:span text:style-name="T155">Server</text:span><text:span text:style-name="T97">（核心資產）。</text:span></text:p>
            <text:p text:style-name="P8" loext:marker-style-name="T98"><text:span text:style-name="T155">📌 </text:span><text:span text:style-name="T97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6"><text:span text:style-name="T196">🔑 <text:s/></text:span><text:span text:style-name="T250">萬用口訣</text:span></text:p>
            <text:p text:style-name="P7" loext:marker-style-name="T98"><text:span text:style-name="T155">FW </text:span><text:span text:style-name="T97">封外、</text:span><text:span text:style-name="T155">WAF </text:span><text:span text:style-name="T97">看內、</text:span><text:span text:style-name="T155">NGFW </text:span><text:span text:style-name="T97">最強、</text:span><text:span text:style-name="T155">DMZ </text:span><text:span text:style-name="T97">隔離、</text:span><text:span text:style-name="T155">IOC </text:span><text:span text:style-name="T97">壞人、</text:span><text:span text:style-name="T155">Proxy </text:span><text:span text:style-name="T97">幫客、</text:span><text:span text:style-name="T155">Reverse </text:span><text:span text:style-name="T97">幫服。</text:span></text:p>
          </table:table-cell>
        </table:table-row>
      </table:table>
      <text:h text:style-name="P11" text:outline-level="2" loext:marker-style-name="T27"><text:span text:style-name="T28">貳、</text:span><text:span text:style-name="T27">SQL Injection × Zero-Day × </text:span><text:span text:style-name="T28">防禦機制</text:span></text:h>
      <text:h text:style-name="P12" text:outline-level="3"><text:span text:style-name="T198">▍</text:span><text:span text:style-name="T199"> SQL Injection</text:span><text:span text:style-name="T200">（</text:span><text:span text:style-name="T199">SQL </text:span><text:span text:style-name="T200">注入攻擊）</text:span></text:h>
      <text:p text:style-name="P35" loext:marker-style-name="T98"><text:span text:style-name="T97">當你在登入頁輸入帳密，後端會把輸入組合成 </text:span><text:span text:style-name="T155">SQL </text:span><text:span text:style-name="T97">送到資料庫查詢，例如：</text:span><text:span text:style-name="T155">SELECT * FROM users WHERE account='john' AND password='1234'</text:span><text:span text:style-name="T97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6"><text:span text:style-name="T196">💉 <text:s/></text:span><text:span text:style-name="T218">什麼是 </text:span><text:span text:style-name="T222">SQL Injection</text:span><text:span text:style-name="T218">？</text:span></text:p>
            <text:p text:style-name="P7"><text:span text:style-name="T214">核心一句話：</text:span><text:span text:style-name="T97">把原本只是「資料」的輸入，惡意改造成可執行的「</text:span><text:span text:style-name="T155">SQL </text:span><text:span text:style-name="T97">指令」。</text:span></text:p>
            <text:p text:style-name="P8" loext:marker-style-name="T98"><text:span text:style-name="T97">駭客在帳號欄位輸入：</text:span><text:span text:style-name="T155">' OR 1=1 --</text:span><text:span text:style-name="T97">，拼入後變成：…</text:span><text:span text:style-name="T155">WHERE account='' OR 1=1 -- ' AND password='1234'</text:span><text:span text:style-name="T97">。</text:span></text:p>
            <text:p text:style-name="P8" loext:marker-style-name="T98"><text:span text:style-name="T155">OR 1=1 </text:span><text:span text:style-name="T97">永遠成立 → 查出所有使用者；</text:span><text:span text:style-name="T155">-- </text:span><text:span text:style-name="T97">是 </text:span><text:span text:style-name="T155">SQL </text:span><text:span text:style-name="T97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6" loext:marker-style-name="T67"><text:span text:style-name="T77">❌ </text:span><text:span text:style-name="T68">攻擊成功的原因</text:span></text:p>
          </table:table-cell>
          <table:covered-table-cell/>
          <table:table-cell table:style-name="表格119.A2" office:value-type="string">
            <text:p text:style-name="P26" loext:marker-style-name="T67"><text:span text:style-name="T77">✅ </text:span><text:span text:style-name="T68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9" loext:marker-style-name="T81"><text:span text:style-name="T147">① OR 1=1 </text:span><text:span text:style-name="T82">永遠成立，回傳全部使用者 ② </text:span><text:span text:style-name="T147">-- </text:span><text:span text:style-name="T82">把密碼驗證段註解掉 ③ 工程師直接用字串拼接組 </text:span><text:span text:style-name="T147">SQL</text:span><text:span text:style-name="T82">，沒有驗證輸入</text:span></text:p>
          </table:table-cell>
          <table:covered-table-cell/>
          <table:table-cell table:style-name="表格119.A3" office:value-type="string">
            <text:p text:style-name="P29" loext:marker-style-name="T81"><text:span text:style-name="T82">把使用者輸入視為「純資料」，不允許改變 </text:span><text:span text:style-name="T147">SQL </text:span><text:span text:style-name="T82">結構；</text:span><text:span text:style-name="T147">SQL </text:span><text:span text:style-name="T82">骨架固定，不因任何輸入而改變；使用 </text:span><text:span text:style-name="T147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6"><text:span text:style-name="T196">🛡️ <text:s/></text:span><text:span text:style-name="T240">防禦核心：</text:span><text:span text:style-name="T247">Prepared Statement</text:span><text:span text:style-name="T240">（預備語句）</text:span></text:p>
            <text:p text:style-name="P7"><text:span text:style-name="T241">概念：</text:span><text:span text:style-name="T97">先把 </text:span><text:span text:style-name="T155">SQL </text:span><text:span text:style-name="T97">骨架「鎖死」，使用者只能填入資料，完全無法修改 </text:span><text:span text:style-name="T155">SQL </text:span><text:span text:style-name="T97">結構。</text:span></text:p>
            <text:p text:style-name="P8" loext:marker-style-name="T98"><text:span text:style-name="T155">❌ </text:span><text:span text:style-name="T97">危險寫法（字串拼接）：</text:span><text:span text:style-name="T155">sql = "SELECT * FROM users WHERE id='" + input + "'"</text:span><text:span text:style-name="T97">；輸入 </text:span><text:span text:style-name="T155">' OR 1=1 -- → </text:span><text:span text:style-name="T97">結構被竄改。</text:span></text:p>
            <text:p text:style-name="P8" loext:marker-style-name="T98"><text:span text:style-name="T155">✅ </text:span><text:span text:style-name="T97">安全寫法：</text:span><text:span text:style-name="T155">String sql = "SELECT * FROM users WHERE id=?"</text:span><text:span text:style-name="T97">；</text:span><text:span text:style-name="T155">? </text:span><text:span text:style-name="T97">是佔位符，</text:span><text:span text:style-name="T155">input </text:span><text:span text:style-name="T97">被視為純文字，</text:span><text:span text:style-name="T155">' OR 1=1 -- </text:span><text:span text:style-name="T97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" loext:marker-style-name="T73"><text:span text:style-name="T74">輔助防禦手段</text:span><text:span text:style-name="T73"/></text:p>
          </table:table-cell>
          <table:table-cell table:style-name="表格119.A2" table:number-columns-spanned="2" office:value-type="string">
            <text:p text:style-name="P4" loext:marker-style-name="T73"><text:span text:style-name="T74">說明</text:span><text:span text:style-name="T73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26"><text:span text:style-name="T179">Prepared Statement</text:span><text:span text:style-name="T126"/></text:p>
          </table:table-cell>
          <table:table-cell table:style-name="表格119.A3" table:number-columns-spanned="2" office:value-type="string">
            <text:p text:style-name="P29" loext:marker-style-name="T126"><text:span text:style-name="T179">✅ </text:span><text:span text:style-name="T127">根本解決方案。</text:span><text:span text:style-name="T179">SQL </text:span><text:span text:style-name="T127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26"><text:span text:style-name="T127">輸入驗證 </text:span><text:span text:style-name="T179">(Input Validation)</text:span></text:p>
          </table:table-cell>
          <table:table-cell table:style-name="表格119.A7" table:number-columns-spanned="2" office:value-type="string">
            <text:p text:style-name="P29" loext:marker-style-name="T126"><text:span text:style-name="T127">過濾或拒絕特殊字元（如單引號），輔助手段，但單靠此法仍可能被繞過。</text:span><text:span text:style-name="T126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26"><text:span text:style-name="T179">WAF</text:span><text:span text:style-name="T127">（網站應用防火牆）</text:span></text:p>
          </table:table-cell>
          <table:table-cell table:style-name="表格119.A3" table:number-columns-spanned="2" office:value-type="string">
            <text:p text:style-name="P29" loext:marker-style-name="T126"><text:span text:style-name="T127">偵測 </text:span><text:span text:style-name="T179">OR 1=1</text:span><text:span text:style-name="T127">、</text:span><text:span text:style-name="T179">UNION SELECT </text:span><text:span text:style-name="T127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26"><text:span text:style-name="T127">最小權限原則</text:span><text:span text:style-name="T126"/></text:p>
          </table:table-cell>
          <table:table-cell table:style-name="表格119.A7" table:number-columns-spanned="2" office:value-type="string">
            <text:p text:style-name="P29" loext:marker-style-name="T126"><text:span text:style-name="T127">資料庫帳號只給應用程式必要的權限，避免帳號被拿下後資料全失。</text:span><text:span text:style-name="T126"/></text:p>
          </table:table-cell>
          <table:covered-table-cell/>
        </table:table-row>
      </table:table>
      <text:h text:style-name="P12" text:outline-level="3"><text:span text:style-name="T198">▍</text:span><text:span text:style-name="T199"> Zero-Day Attack</text:span><text:span text:style-name="T200">（零時差攻擊）</text:span></text:h>
      <text:p text:style-name="P35" loext:marker-style-name="T98"><text:span text:style-name="T155">Zero-Day </text:span><text:span text:style-name="T97">指一個「尚未被開發商發現或公開」的安全漏洞，在廠商來得及發布修補程式（</text:span><text:span text:style-name="T155">Patch</text:span><text:span text:style-name="T97">）之前，駭客就已利用它展開攻擊。命名由來：「</text:span><text:span text:style-name="T155">Day Zero</text:span><text:span text:style-name="T97">」代表廠商只有 </text:span><text:span text:style-name="T155">0 </text:span><text:span text:style-name="T97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26" loext:marker-style-name="T67"><text:span text:style-name="T77">😱 </text:span><text:span text:style-name="T68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26" loext:marker-style-name="T67"><text:span text:style-name="T77">🏠 </text:span><text:span text:style-name="T68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9" loext:marker-style-name="T81"><text:span text:style-name="T82">傳統防毒靠「特徵碼（</text:span><text:span text:style-name="T147">Signature</text:span><text:span text:style-name="T82">）」辨識病毒，像通緝名單。但 </text:span><text:span text:style-name="T147">Zero-Day </text:span><text:span text:style-name="T82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9" loext:marker-style-name="T81"><text:span text:style-name="T82">你家大門有個秘密漏洞，你不知道、鎖廠不知道、所有人都不知道——只有小偷知道。小偷可以天天進你家，直到漏洞被發現並修補為止。</text:span><text:span text:style-name="T81"/></text:p>
          </table:table-cell>
        </table:table-row>
        <table:table-row table:style-name="表格120.1">
          <table:table-cell table:style-name="表格120.A1" office:value-type="string">
            <text:p text:style-name="P4" loext:marker-style-name="T73"><text:span text:style-name="T74">防禦層</text:span><text:span text:style-name="T73"/></text:p>
          </table:table-cell>
          <table:table-cell table:style-name="表格120.A1" office:value-type="string">
            <text:p text:style-name="P4" loext:marker-style-name="T73"><text:span text:style-name="T74">手段</text:span><text:span text:style-name="T73"/></text:p>
          </table:table-cell>
          <table:table-cell table:style-name="表格120.A1" table:number-columns-spanned="2" office:value-type="string">
            <text:p text:style-name="P4" loext:marker-style-name="T73"><text:span text:style-name="T74">說明</text:span><text:span text:style-name="T73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26"><text:span text:style-name="T127">修補</text:span><text:span text:style-name="T126"/></text:p>
          </table:table-cell>
          <table:table-cell table:style-name="表格120.A2" office:value-type="string">
            <text:p text:style-name="P29" loext:marker-style-name="T126"><text:span text:style-name="T179">Patch </text:span><text:span text:style-name="T127">更新</text:span></text:p>
          </table:table-cell>
          <table:table-cell table:style-name="表格120.A2" table:number-columns-spanned="2" office:value-type="string">
            <text:p text:style-name="P29" loext:marker-style-name="T126"><text:span text:style-name="T127">漏洞公開後立即套用廠商安全更新（這是最重要的行動）</text:span><text:span text:style-name="T12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26"><text:span text:style-name="T127">偵測</text:span><text:span text:style-name="T126"/></text:p>
          </table:table-cell>
          <table:table-cell table:style-name="表格120.A5" office:value-type="string">
            <text:p text:style-name="P29" loext:marker-style-name="T126"><text:span text:style-name="T179">IDS / IPS</text:span><text:span text:style-name="T126"/></text:p>
          </table:table-cell>
          <table:table-cell table:style-name="表格120.A5" table:number-columns-spanned="2" office:value-type="string">
            <text:p text:style-name="P29" loext:marker-style-name="T126"><text:span text:style-name="T179">IDS </text:span><text:span text:style-name="T127">發現異常後發警報；</text:span><text:span text:style-name="T179">IPS </text:span><text:span text:style-name="T127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26"><text:span text:style-name="T127">深度檢查</text:span><text:span text:style-name="T126"/></text:p>
          </table:table-cell>
          <table:table-cell table:style-name="表格120.A2" office:value-type="string">
            <text:p text:style-name="P29" loext:marker-style-name="T126"><text:span text:style-name="T179">DPI</text:span><text:span text:style-name="T127">（深度封包檢查）</text:span></text:p>
          </table:table-cell>
          <table:table-cell table:style-name="表格120.A2" table:number-columns-spanned="2" office:value-type="string">
            <text:p text:style-name="P29" loext:marker-style-name="T126"><text:span text:style-name="T127">拆開檢查封包內容，偵測隱藏其中的攻擊指令</text:span><text:span text:style-name="T12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26"><text:span text:style-name="T127">隔離</text:span><text:span text:style-name="T126"/></text:p>
          </table:table-cell>
          <table:table-cell table:style-name="表格120.A5" office:value-type="string">
            <text:p text:style-name="P29" loext:marker-style-name="T126"><text:span text:style-name="T127">網路分段</text:span><text:span text:style-name="T126"/></text:p>
          </table:table-cell>
          <table:table-cell table:style-name="表格120.A5" table:number-columns-spanned="2" office:value-type="string">
            <text:p text:style-name="P29" loext:marker-style-name="T126"><text:span text:style-name="T127">把網路切成多區，即使入侵一區也難橫向擴散</text:span><text:span text:style-name="T12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26"><text:span text:style-name="T127">降低風險</text:span><text:span text:style-name="T126"/></text:p>
          </table:table-cell>
          <table:table-cell table:style-name="表格120.A2" office:value-type="string">
            <text:p text:style-name="P29" loext:marker-style-name="T126"><text:span text:style-name="T127">最小權限原則</text:span><text:span text:style-name="T126"/></text:p>
          </table:table-cell>
          <table:table-cell table:style-name="表格120.A2" table:number-columns-spanned="2" office:value-type="string">
            <text:p text:style-name="P29" loext:marker-style-name="T126"><text:span text:style-name="T127">每個帳號只給必要的最低權限，減少淪陷後的損害</text:span><text:span text:style-name="T126"/></text:p>
          </table:table-cell>
          <table:covered-table-cell/>
        </table:table-row>
      </table:table>
      <text:h text:style-name="P12" text:outline-level="3"><text:span text:style-name="T198">▍</text:span><text:span text:style-name="T199"> </text:span><text:span text:style-name="T200">防禦機制速查：</text:span><text:span text:style-name="T199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" loext:marker-style-name="T73"><text:span text:style-name="T74">機制</text:span><text:span text:style-name="T73"/></text:p>
            </table:table-cell>
            <table:table-cell table:style-name="表格121.A1" office:value-type="string">
              <text:p text:style-name="P4" loext:marker-style-name="T73"><text:span text:style-name="T74">白話比喻</text:span><text:span text:style-name="T73"/></text:p>
            </table:table-cell>
            <table:table-cell table:style-name="表格121.A1" office:value-type="string">
              <text:p text:style-name="P4" loext:marker-style-name="T73"><text:span text:style-name="T74">主要功能</text:span><text:span text:style-name="T73"/></text:p>
            </table:table-cell>
            <table:table-cell table:style-name="表格121.A1" office:value-type="string">
              <text:p text:style-name="P4" loext:marker-style-name="T73"><text:span text:style-name="T74">備註</text:span><text:span text:style-name="T73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9" loext:marker-style-name="T126"><text:span text:style-name="T179">Firewall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社區大門保全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依 </text:span><text:span text:style-name="T179">IP</text:span><text:span text:style-name="T127">、</text:span><text:span text:style-name="T179">Port</text:span><text:span text:style-name="T127">、協定決定允許或拒絕流量</text:span></text:p>
          </table:table-cell>
          <table:table-cell table:style-name="表格121.A2" office:value-type="string">
            <text:p text:style-name="P29" loext:marker-style-name="T126"><text:span text:style-name="T127">基礎但必要</text:span><text:span text:style-name="T126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26"><text:span text:style-name="T179">IDS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監視器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偵測到異常流量後產生警報，不主動攔截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只警告</text:span><text:span text:style-name="T126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26"><text:span text:style-name="T179">IPS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警衛直接攔人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自動阻斷偵測到的攻擊流量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直接阻擋</text:span><text:span text:style-name="T126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26"><text:span text:style-name="T179">DPI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海關拆包裹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不只看封包表頭，深入檢查封包內容</text:span><text:span text:style-name="T126"/></text:p>
          </table:table-cell>
          <table:table-cell table:style-name="表格121.A3" office:value-type="string">
            <text:p text:style-name="P29" loext:marker-style-name="T126"><text:span text:style-name="T127">最深層檢查</text:span><text:span text:style-name="T126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26"><text:span text:style-name="T179">WAF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網站門口掃描機</text:span><text:span text:style-name="T126"/></text:p>
          </table:table-cell>
          <table:table-cell table:style-name="表格121.A2" office:value-type="string">
            <text:p text:style-name="P29" loext:marker-style-name="T126"><text:span text:style-name="T127">專門針對 </text:span><text:span text:style-name="T179">Web </text:span><text:span text:style-name="T127">攻擊（</text:span><text:span text:style-name="T179">SQLi</text:span><text:span text:style-name="T127">、</text:span><text:span text:style-name="T179">XSS</text:span><text:span text:style-name="T127">）過濾</text:span></text:p>
          </table:table-cell>
          <table:table-cell table:style-name="表格121.A2" office:value-type="string">
            <text:p text:style-name="P29" loext:marker-style-name="T126"><text:span text:style-name="T127">網站專用</text:span><text:span text:style-name="T12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6"><text:span text:style-name="T196">⚠️ <text:s/></text:span><text:span text:style-name="T218">考試常考</text:span></text:p>
            <text:p text:style-name="P7" loext:marker-style-name="T98"><text:span text:style-name="T155">IDS </text:span><text:span text:style-name="T97">只發警報（不攔截）；</text:span><text:span text:style-name="T155">IPS </text:span><text:span text:style-name="T97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</text:span><text:span text:style-name="T200">駭客如何一步一步入侵網站（典型 </text:span><text:span text:style-name="T199">7 </text:span><text:span text:style-name="T200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6" loext:marker-style-name="T73"><text:span text:style-name="T79">Step</text:span><text:span text:style-name="T73"/></text:p>
            </table:table-cell>
            <table:table-cell table:style-name="表格122.A1" office:value-type="string">
              <text:p text:style-name="P26" loext:marker-style-name="T73"><text:span text:style-name="T74">階段</text:span><text:span text:style-name="T73"/></text:p>
            </table:table-cell>
            <table:table-cell table:style-name="表格122.A1" office:value-type="string">
              <text:p text:style-name="P26" loext:marker-style-name="T73"><text:span text:style-name="T74">做什麼</text:span><text:span text:style-name="T73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9" loext:marker-style-name="T126"><text:span text:style-name="T179">1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偵察 </text:span><text:span text:style-name="T179">Reconnaissance</text:span></text:p>
          </table:table-cell>
          <table:table-cell table:style-name="表格122.A2" office:value-type="string">
            <text:p text:style-name="P29" loext:marker-style-name="T126"><text:span text:style-name="T127">掃描目標網站，找漏洞：</text:span><text:span text:style-name="T179">SQL Injection</text:span><text:span text:style-name="T127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26"><text:span text:style-name="T179">2</text:span><text:span text:style-name="T126"/></text:p>
          </table:table-cell>
          <table:table-cell table:style-name="表格122.A3" office:value-type="string">
            <text:p text:style-name="P29" loext:marker-style-name="T126"><text:span text:style-name="T127">試探 </text:span><text:span text:style-name="T179">Probing</text:span></text:p>
          </table:table-cell>
          <table:table-cell table:style-name="表格122.A3" office:value-type="string">
            <text:p text:style-name="P29" loext:marker-style-name="T126"><text:span text:style-name="T127">嘗試輸入 </text:span><text:span text:style-name="T179">' OR 1=1 -- </text:span><text:span text:style-name="T127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26"><text:span text:style-name="T179">3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取得初步權限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成功繞過驗證或取得資料庫讀取權，可能拿到帳密清單</text:span><text:span text:style-name="T126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26"><text:span text:style-name="T179">4</text:span><text:span text:style-name="T126"/></text:p>
          </table:table-cell>
          <table:table-cell table:style-name="表格122.A3" office:value-type="string">
            <text:p text:style-name="P29" loext:marker-style-name="T126"><text:span text:style-name="T127">橫向移動 </text:span><text:span text:style-name="T179">Lateral Movement</text:span></text:p>
          </table:table-cell>
          <table:table-cell table:style-name="表格122.A3" office:value-type="string">
            <text:p text:style-name="P29" loext:marker-style-name="T126"><text:span text:style-name="T127">從網站主機延伸進資料庫，再滲透內網其他系統</text:span><text:span text:style-name="T126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26"><text:span text:style-name="T179">5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竊取資料 </text:span><text:span text:style-name="T179">Exfiltration</text:span></text:p>
          </table:table-cell>
          <table:table-cell table:style-name="表格122.A2" office:value-type="string">
            <text:p text:style-name="P29" loext:marker-style-name="T126"><text:span text:style-name="T127">偷取個資、信用卡資料、機密文件</text:span><text:span text:style-name="T126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26"><text:span text:style-name="T179">6</text:span><text:span text:style-name="T126"/></text:p>
          </table:table-cell>
          <table:table-cell table:style-name="表格122.A3" office:value-type="string">
            <text:p text:style-name="P29" loext:marker-style-name="T126"><text:span text:style-name="T127">植入後門 </text:span><text:span text:style-name="T179">Backdoor</text:span></text:p>
          </table:table-cell>
          <table:table-cell table:style-name="表格122.A3" office:value-type="string">
            <text:p text:style-name="P29" loext:marker-style-name="T126"><text:span text:style-name="T127">埋下後門程式，確保下次還能輕鬆進入</text:span><text:span text:style-name="T126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26"><text:span text:style-name="T179">7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勒索或變現</text:span><text:span text:style-name="T126"/></text:p>
          </table:table-cell>
          <table:table-cell table:style-name="表格122.A2" office:value-type="string">
            <text:p text:style-name="P29" loext:marker-style-name="T126"><text:span text:style-name="T127">加密資料索取贖金，或在暗網販售竊取的資料</text:span><text:span text:style-name="T12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6"><text:span text:style-name="T196">⚠️ <text:s/></text:span><text:span text:style-name="T218">公職考試常見陷阱</text:span></text:p>
            <text:p text:style-name="P7"><text:span text:style-name="T109">「輸入驗證」就足夠防 </text:span><text:span text:style-name="T164">SQLi</text:span><text:span text:style-name="T109">？　</text:span><text:span text:style-name="T97">❌ 不夠，過濾特殊字元有被繞過風險。✅ 真正防禦是 </text:span><text:span text:style-name="T155">Prepared Statement</text:span><text:span text:style-name="T97">。</text:span></text:p>
            <text:p text:style-name="P8"><text:span text:style-name="T164">WAF </text:span><text:span text:style-name="T109">可以完全防止所有攻擊？　</text:span><text:span text:style-name="T97">❌ 不能，</text:span><text:span text:style-name="T155">WAF </text:span><text:span text:style-name="T97">是輔助防禦，新型攻擊可能繞過。✅ </text:span><text:span text:style-name="T155">WAF + Prepared Statement </text:span><text:span text:style-name="T97">才是正道。</text:span></text:p>
            <text:p text:style-name="P8"><text:span text:style-name="T164">Zero-Day </text:span><text:span text:style-name="T109">最危險是它「很強大」？　</text:span><text:span text:style-name="T97">❌ 不是，最危險的是「還沒人知道」，防毒無法識別。</text:span></text:p>
            <text:p text:style-name="P8"><text:span text:style-name="T164">IDS </text:span><text:span text:style-name="T109">可以阻擋攻擊？　</text:span><text:span text:style-name="T97">❌ 不行，</text:span><text:span text:style-name="T155">IDS </text:span><text:span text:style-name="T97">只能偵測警報，能阻擋的是 </text:span><text:span text:style-name="T155">IPS</text:span><text:span text:style-name="T97">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4" loext:marker-style-name="T67"><text:span text:style-name="T68">工具</text:span><text:span text:style-name="T67"/></text:p>
            </table:table-cell>
            <table:table-cell table:style-name="表格123.A1" office:value-type="string">
              <text:p text:style-name="P4" loext:marker-style-name="T67"><text:span text:style-name="T68">角色</text:span><text:span text:style-name="T67"/></text:p>
            </table:table-cell>
            <table:table-cell table:style-name="表格123.A1" office:value-type="string">
              <text:p text:style-name="P4" loext:marker-style-name="T67"><text:span text:style-name="T68">功能</text:span><text:span text:style-name="T67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9" loext:marker-style-name="T81"><text:span text:style-name="T147">🚪 Firewall</text:span><text:span text:style-name="T81"/></text:p>
          </table:table-cell>
          <table:table-cell table:style-name="表格123.A2" office:value-type="string">
            <text:p text:style-name="P29" loext:marker-style-name="T81"><text:span text:style-name="T82">大門警衛</text:span><text:span text:style-name="T81"/></text:p>
          </table:table-cell>
          <table:table-cell table:style-name="表格123.A2" office:value-type="string">
            <text:p text:style-name="P29" loext:marker-style-name="T81"><text:span text:style-name="T82">過濾進出流量（擋或放）</text:span><text:span text:style-name="T81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1"><text:span text:style-name="T147">👀 IDS</text:span><text:span text:style-name="T81"/></text:p>
          </table:table-cell>
          <table:table-cell table:style-name="表格123.A3" office:value-type="string">
            <text:p text:style-name="P29" loext:marker-style-name="T81"><text:span text:style-name="T82">監視器（只看）</text:span><text:span text:style-name="T81"/></text:p>
          </table:table-cell>
          <table:table-cell table:style-name="表格123.A3" office:value-type="string">
            <text:p text:style-name="P29" loext:marker-style-name="T81"><text:span text:style-name="T82">偵測異常、發出警報，不主動阻擋</text:span><text:span text:style-name="T81"/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1"><text:span text:style-name="T147">🚨 IPS</text:span><text:span text:style-name="T81"/></text:p>
          </table:table-cell>
          <table:table-cell table:style-name="表格123.A2" office:value-type="string">
            <text:p text:style-name="P29" loext:marker-style-name="T81"><text:span text:style-name="T82">監視器＋警衛</text:span><text:span text:style-name="T81"/></text:p>
          </table:table-cell>
          <table:table-cell table:style-name="表格123.A2" office:value-type="string">
            <text:p text:style-name="P29" loext:marker-style-name="T81"><text:span text:style-name="T82">偵測異常並自動阻擋攻擊</text:span><text:span text:style-name="T81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1"><text:span text:style-name="T147">📊 SNMP</text:span><text:span text:style-name="T81"/></text:p>
          </table:table-cell>
          <table:table-cell table:style-name="表格123.A3" office:value-type="string">
            <text:p text:style-name="P29" loext:marker-style-name="T81"><text:span text:style-name="T82">管理室</text:span><text:span text:style-name="T81"/></text:p>
          </table:table-cell>
          <table:table-cell table:style-name="表格123.A3" office:value-type="string">
            <text:p text:style-name="P29" loext:marker-style-name="T81"><text:span text:style-name="T82">監控網路設備狀態（</text:span><text:span text:style-name="T147">CPU</text:span><text:span text:style-name="T82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1"><text:span text:style-name="T147">📶 ICMP</text:span><text:span text:style-name="T81"/></text:p>
          </table:table-cell>
          <table:table-cell table:style-name="表格123.A2" office:value-type="string">
            <text:p text:style-name="P29" loext:marker-style-name="T81"><text:span text:style-name="T82">網路測試員</text:span><text:span text:style-name="T81"/></text:p>
          </table:table-cell>
          <table:table-cell table:style-name="表格123.A2" office:value-type="string">
            <text:p text:style-name="P29" loext:marker-style-name="T81"><text:span text:style-name="T82">診斷網路連線（</text:span><text:span text:style-name="T147">Ping / Traceroute</text:span><text:span text:style-name="T82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6"><text:span text:style-name="T196">⚡ <text:s/></text:span><text:span text:style-name="T200">核心記憶口訣</text:span></text:p>
            <text:p text:style-name="P7" loext:marker-style-name="T98"><text:span text:style-name="T155">Firewall </text:span><text:span text:style-name="T97">擋入口 </text:span><text:span text:style-name="T155">· IDS </text:span><text:span text:style-name="T97">只看 </text:span><text:span text:style-name="T155">· IPS </text:span><text:span text:style-name="T97">看＋擋。</text:span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HIDS vs NIDS</text:span><text:span text:style-name="T200">（</text:span><text:span text:style-name="T199">IDS </text:span><text:span text:style-name="T200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4"/>
            </table:table-cell>
            <table:table-cell table:style-name="表格124.A1" office:value-type="string">
              <text:p text:style-name="P4" loext:marker-style-name="T67"><text:span text:style-name="T77">HIDS</text:span><text:span text:style-name="T67"/></text:p>
            </table:table-cell>
            <table:table-cell table:style-name="表格124.A1" office:value-type="string">
              <text:p text:style-name="P4" loext:marker-style-name="T67"><text:span text:style-name="T77">NIDS</text:span><text:span text:style-name="T67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9" loext:marker-style-name="T81"><text:span text:style-name="T82">安裝位置</text:span><text:span text:style-name="T81"/></text:p>
          </table:table-cell>
          <table:table-cell table:style-name="表格124.A2" office:value-type="string">
            <text:p text:style-name="P29" loext:marker-style-name="T81"><text:span text:style-name="T82">裝在主機（電腦）內部</text:span><text:span text:style-name="T81"/></text:p>
          </table:table-cell>
          <table:table-cell table:style-name="表格124.A2" office:value-type="string">
            <text:p text:style-name="P29" loext:marker-style-name="T81"><text:span text:style-name="T82">裝在網路節點（交換器旁）</text:span><text:span text:style-name="T81"/></text:p>
          </table:table-cell>
        </table:table-row>
        <table:table-row table:style-name="表格124.1">
          <table:table-cell table:style-name="表格124.A3" office:value-type="string">
            <text:p text:style-name="P29" loext:marker-style-name="T81"><text:span text:style-name="T82">監控內容</text:span><text:span text:style-name="T81"/></text:p>
          </table:table-cell>
          <table:table-cell table:style-name="表格124.A3" office:value-type="string">
            <text:p text:style-name="P29" loext:marker-style-name="T81"><text:span text:style-name="T82">系統 </text:span><text:span text:style-name="T147">Log</text:span><text:span text:style-name="T82">、使用者行為</text:span></text:p>
          </table:table-cell>
          <table:table-cell table:style-name="表格124.A3" office:value-type="string">
            <text:p text:style-name="P29" loext:marker-style-name="T81"><text:span text:style-name="T82">網路封包與流量</text:span><text:span text:style-name="T81"/></text:p>
          </table:table-cell>
        </table:table-row>
        <table:table-row table:style-name="表格124.1">
          <table:table-cell table:style-name="表格124.A2" office:value-type="string">
            <text:p text:style-name="P29" loext:marker-style-name="T81"><text:span text:style-name="T82">比喻</text:span><text:span text:style-name="T81"/></text:p>
          </table:table-cell>
          <table:table-cell table:style-name="表格124.A2" office:value-type="string">
            <text:p text:style-name="P29" loext:marker-style-name="T81"><text:span text:style-name="T82">電腦裡的監視器</text:span><text:span text:style-name="T81"/></text:p>
          </table:table-cell>
          <table:table-cell table:style-name="表格124.A2" office:value-type="string">
            <text:p text:style-name="P29" loext:marker-style-name="T81"><text:span text:style-name="T82">路口的交通監視器</text:span><text:span text:style-name="T81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6"><text:span text:style-name="T196">⚡ <text:s/></text:span><text:span text:style-name="T200">一句話秒懂</text:span></text:p>
            <text:p text:style-name="P7" loext:marker-style-name="T98"><text:span text:style-name="T155">HIDS </text:span><text:span text:style-name="T97">看主機（</text:span><text:span text:style-name="T155">Log</text:span><text:span text:style-name="T97">）</text:span><text:span text:style-name="T155">· NIDS </text:span><text:span text:style-name="T97">看網路（封包）。</text:span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SNMP vs ICMP</text:span><text:span text:style-name="T200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4"/>
            </table:table-cell>
            <table:table-cell table:style-name="表格125.A1" office:value-type="string">
              <text:p text:style-name="P4" loext:marker-style-name="T67"><text:span text:style-name="T77">SNMP</text:span><text:span text:style-name="T67"/></text:p>
            </table:table-cell>
            <table:table-cell table:style-name="表格125.A1" office:value-type="string">
              <text:p text:style-name="P4" loext:marker-style-name="T67"><text:span text:style-name="T77">ICMP</text:span><text:span text:style-name="T67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9" loext:marker-style-name="T81"><text:span text:style-name="T82">用途</text:span><text:span text:style-name="T81"/></text:p>
          </table:table-cell>
          <table:table-cell table:style-name="表格125.A2" office:value-type="string">
            <text:p text:style-name="P29" loext:marker-style-name="T81"><text:span text:style-name="T82">管理與監控網路設備</text:span><text:span text:style-name="T81"/></text:p>
          </table:table-cell>
          <table:table-cell table:style-name="表格125.A2" office:value-type="string">
            <text:p text:style-name="P29" loext:marker-style-name="T81"><text:span text:style-name="T82">測試網路是否連通</text:span><text:span text:style-name="T81"/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1"><text:span text:style-name="T147">OSI </text:span><text:span text:style-name="T82">層</text:span></text:p>
          </table:table-cell>
          <table:table-cell table:style-name="表格125.A3" office:value-type="string">
            <text:p text:style-name="P29" loext:marker-style-name="T81"><text:span text:style-name="T147">Application Layer</text:span><text:span text:style-name="T82">（應用層）</text:span></text:p>
          </table:table-cell>
          <table:table-cell table:style-name="表格125.A3" office:value-type="string">
            <text:p text:style-name="P29" loext:marker-style-name="T81"><text:span text:style-name="T147">Network Layer</text:span><text:span text:style-name="T82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1"><text:span text:style-name="T82">傳輸協定</text:span><text:span text:style-name="T81"/></text:p>
          </table:table-cell>
          <table:table-cell table:style-name="表格125.A2" office:value-type="string">
            <text:p text:style-name="P29" loext:marker-style-name="T81"><text:span text:style-name="T147">UDP</text:span><text:span text:style-name="T81"/></text:p>
          </table:table-cell>
          <table:table-cell table:style-name="表格125.A2" office:value-type="string">
            <text:p text:style-name="P29" loext:marker-style-name="T81"><text:span text:style-name="T147">IP </text:span><text:span text:style-name="T82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1"><text:span text:style-name="T82">常見功能</text:span><text:span text:style-name="T81"/></text:p>
          </table:table-cell>
          <table:table-cell table:style-name="表格125.A3" office:value-type="string">
            <text:p text:style-name="P29" loext:marker-style-name="T81"><text:span text:style-name="T82">看 </text:span><text:span text:style-name="T147">CPU </text:span><text:span text:style-name="T82">使用率、設備狀態、</text:span><text:span text:style-name="T147">Trap </text:span><text:span text:style-name="T82">警報</text:span></text:p>
          </table:table-cell>
          <table:table-cell table:style-name="表格125.A3" office:value-type="string">
            <text:p text:style-name="P29" loext:marker-style-name="T81"><text:span text:style-name="T147">Ping</text:span><text:span text:style-name="T82">、</text:span><text:span text:style-name="T147">Traceroute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1"><text:span text:style-name="T82">比喻</text:span><text:span text:style-name="T81"/></text:p>
          </table:table-cell>
          <table:table-cell table:style-name="表格125.A2" office:value-type="string">
            <text:p text:style-name="P29" loext:marker-style-name="T81"><text:span text:style-name="T82">大樓管理室的監控系統</text:span><text:span text:style-name="T81"/></text:p>
          </table:table-cell>
          <table:table-cell table:style-name="表格125.A2" office:value-type="string">
            <text:p text:style-name="P29" loext:marker-style-name="T81"><text:span text:style-name="T82">網路連線的體溫計</text:span><text:span text:style-name="T81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6"><text:span text:style-name="T196">⚡ <text:s/></text:span><text:span text:style-name="T200">核心差異</text:span></text:p>
            <text:p text:style-name="P7" loext:marker-style-name="T98"><text:span text:style-name="T155">SNMP </text:span><text:span text:style-name="T97">管理設備（應用層 </text:span><text:span text:style-name="T155">/ UDP</text:span><text:span text:style-name="T97">）</text:span><text:span text:style-name="T155">· ICMP </text:span><text:span text:style-name="T97">診斷網路（網路層）。</text:span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</text:span><text:span text:style-name="T200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6"><text:span text:style-name="T196">🗺 <text:s/></text:span><text:span text:style-name="T50">工具各自負責的位置</text:span></text:p>
            <text:p text:style-name="P7" loext:marker-style-name="T98"><text:span text:style-name="T155">🌐 </text:span><text:span text:style-name="T97">外部攻擊者 → 🚪 </text:span><text:span text:style-name="T155">Firewall</text:span><text:span text:style-name="T97">（第一道防線，依 </text:span><text:span text:style-name="T155">IP/Port </text:span><text:span text:style-name="T97">規則過濾）→ 📡 </text:span><text:span text:style-name="T155">NIDS / IPS</text:span><text:span text:style-name="T97">（網路中間監控：</text:span><text:span text:style-name="T155">IDS </text:span><text:span text:style-name="T97">分析封包發現異常只發警報；</text:span><text:span text:style-name="T155">IPS </text:span><text:span text:style-name="T97">分析封包發現異常直接阻擋）→ 🖥 主機 </text:span><text:span text:style-name="T155">/ Server → 👀 HIDS</text:span><text:span text:style-name="T97">（主機內部最後防線，監控系統 </text:span><text:span text:style-name="T155">Log </text:span><text:span text:style-name="T97">與使用者行為）。旁側：📊 </text:span><text:span text:style-name="T155">SNMP </text:span><text:span text:style-name="T97">監控全域設備狀態；📶 </text:span><text:span text:style-name="T155">ICMP</text:span><text:span text:style-name="T97">（</text:span><text:span text:style-name="T155">Ping/Traceroute</text:span><text:span text:style-name="T97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6"><text:span text:style-name="T196">⚠️ <text:s/></text:span><text:span text:style-name="T218">考試陷阱整理</text:span></text:p>
            <text:p text:style-name="P7"><text:span text:style-name="T236">① IDS </text:span><text:span text:style-name="T228">可以自動阻擋攻擊　→　</text:span><text:span text:style-name="T97">✓ </text:span><text:span text:style-name="T155">IDS </text:span><text:span text:style-name="T97">只偵測＋發警報，</text:span><text:span text:style-name="T155">IPS </text:span><text:span text:style-name="T97">才會阻擋。</text:span></text:p>
            <text:p text:style-name="P8"><text:span text:style-name="T236">② Firewall </text:span><text:span text:style-name="T228">可以偵測異常行為　→　</text:span><text:span text:style-name="T97">✓ </text:span><text:span text:style-name="T155">Firewall </text:span><text:span text:style-name="T97">依規則（</text:span><text:span text:style-name="T155">IP/Port</text:span><text:span text:style-name="T97">）過濾，不做行為分析。</text:span></text:p>
            <text:p text:style-name="P8"><text:soft-page-break/><text:span text:style-name="T236">③ HIDS </text:span><text:span text:style-name="T228">用來監控網路封包　→　</text:span><text:span text:style-name="T97">✓ </text:span><text:span text:style-name="T155">HIDS </text:span><text:span text:style-name="T97">監控主機 </text:span><text:span text:style-name="T155">Log </text:span><text:span text:style-name="T97">與系統行為，封包是 </text:span><text:span text:style-name="T155">NIDS </text:span><text:span text:style-name="T97">的工作。</text:span></text:p>
            <text:p text:style-name="P8"><text:span text:style-name="T236">④ ICMP </text:span><text:span text:style-name="T228">用來監控設備狀態　→　</text:span><text:span text:style-name="T97">✓ </text:span><text:span text:style-name="T155">ICMP </text:span><text:span text:style-name="T97">只診斷網路（</text:span><text:span text:style-name="T155">Ping</text:span><text:span text:style-name="T97">），監控設備是 </text:span><text:span text:style-name="T155">SNMP</text:span><text:span text:style-name="T97">。</text:span></text:p>
            <text:p text:style-name="P8"><text:span text:style-name="T236">⑤ ICMP </text:span><text:span text:style-name="T228">屬於 </text:span><text:span text:style-name="T236">Application Layer</text:span><text:span text:style-name="T228">　→　</text:span><text:span text:style-name="T97">✓ </text:span><text:span text:style-name="T155">ICMP </text:span><text:span text:style-name="T97">屬 </text:span><text:span text:style-name="T155">Network Layer</text:span><text:span text:style-name="T97">，</text:span><text:span text:style-name="T155">SNMP </text:span><text:span text:style-name="T97">才是 </text:span><text:span text:style-name="T155">Application Layer</text:span><text:span text:style-name="T97">。</text:span></text:p>
            <text:p text:style-name="P8"><text:span text:style-name="T236">⑥ IPS </text:span><text:span text:style-name="T228">就是防火牆　→　</text:span><text:span text:style-name="T97">✓ </text:span><text:span text:style-name="T155">Firewall </text:span><text:span text:style-name="T97">靜態過濾（規則），</text:span><text:span text:style-name="T155">IPS </text:span><text:span text:style-name="T97">動態偵測行為後阻擋，兩者不同。</text:span></text:p>
          </table:table-cell>
        </table:table-row>
      </table:table>
      <text:h text:style-name="P12" text:outline-level="3"><text:span text:style-name="T198">▍</text:span><text:span text:style-name="T199"> 10 </text:span><text:span text:style-name="T200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" loext:marker-style-name="T75"><text:span text:style-name="T76">題目</text:span><text:span text:style-name="T75"/></text:p>
            </table:table-cell>
            <table:table-cell table:style-name="表格127.A1" office:value-type="string">
              <text:p text:style-name="P4" loext:marker-style-name="T75"><text:span text:style-name="T76">答案</text:span><text:span text:style-name="T75"/></text:p>
            </table:table-cell>
            <table:table-cell table:style-name="表格127.A1" office:value-type="string">
              <text:p text:style-name="P4" loext:marker-style-name="T75"><text:span text:style-name="T76">解析</text:span><text:span text:style-name="T75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9" loext:marker-style-name="T145"><text:span text:style-name="T195">Q1 </text:span><text:span text:style-name="T146">何者負責「過濾進出網路流量」？</text:span></text:p>
          </table:table-cell>
          <table:table-cell table:style-name="表格127.A2" office:value-type="string">
            <text:p text:style-name="P29" loext:marker-style-name="T145"><text:span text:style-name="T195">Firewall</text:span><text:span text:style-name="T145"/></text:p>
          </table:table-cell>
          <table:table-cell table:style-name="表格127.A2" office:value-type="string">
            <text:p text:style-name="P29" loext:marker-style-name="T145"><text:span text:style-name="T195">Firewall </text:span><text:span text:style-name="T146">是網路入口過濾工具，依規則決定放行。</text:span><text:span text:style-name="T195">IDS/IPS </text:span><text:span text:style-name="T146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45"><text:span text:style-name="T195">Q2 IDS </text:span><text:span text:style-name="T146">的主要功能為何？</text:span></text:p>
          </table:table-cell>
          <table:table-cell table:style-name="表格127.A3" office:value-type="string">
            <text:p text:style-name="P29" loext:marker-style-name="T145"><text:span text:style-name="T146">偵測並發出警報</text:span><text:span text:style-name="T145"/></text:p>
          </table:table-cell>
          <table:table-cell table:style-name="表格127.A3" office:value-type="string">
            <text:p text:style-name="P29" loext:marker-style-name="T145"><text:span text:style-name="T195">IDS </text:span><text:span text:style-name="T146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45"><text:span text:style-name="T195">Q3 IPS </text:span><text:span text:style-name="T146">與 </text:span><text:span text:style-name="T195">IDS </text:span><text:span text:style-name="T146">最大差別？</text:span></text:p>
          </table:table-cell>
          <table:table-cell table:style-name="表格127.A2" office:value-type="string">
            <text:p text:style-name="P29" loext:marker-style-name="T145"><text:span text:style-name="T195">IPS </text:span><text:span text:style-name="T146">會阻擋，</text:span><text:span text:style-name="T195">IDS </text:span><text:span text:style-name="T146">不會</text:span></text:p>
          </table:table-cell>
          <table:table-cell table:style-name="表格127.A2" office:value-type="string">
            <text:p text:style-name="P29" loext:marker-style-name="T145"><text:span text:style-name="T195">IPS = IDS </text:span><text:span text:style-name="T146">全功能 </text:span><text:span text:style-name="T195">+ </text:span><text:span text:style-name="T146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45"><text:span text:style-name="T195">Q4 </text:span><text:span text:style-name="T146">何者屬「主機型入侵偵測」？</text:span></text:p>
          </table:table-cell>
          <table:table-cell table:style-name="表格127.A3" office:value-type="string">
            <text:p text:style-name="P29" loext:marker-style-name="T145"><text:span text:style-name="T195">HIDS</text:span><text:span text:style-name="T145"/></text:p>
          </table:table-cell>
          <table:table-cell table:style-name="表格127.A3" office:value-type="string">
            <text:p text:style-name="P29" loext:marker-style-name="T145"><text:span text:style-name="T195">HIDS </text:span><text:span text:style-name="T146">安裝於主機內部，監控 </text:span><text:span text:style-name="T195">Log </text:span><text:span text:style-name="T146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45"><text:span text:style-name="T195">Q5 NIDS </text:span><text:span text:style-name="T146">主要監控什麼？</text:span></text:p>
          </table:table-cell>
          <table:table-cell table:style-name="表格127.A2" office:value-type="string">
            <text:p text:style-name="P29" loext:marker-style-name="T145"><text:span text:style-name="T146">網路封包</text:span><text:span text:style-name="T145"/></text:p>
          </table:table-cell>
          <table:table-cell table:style-name="表格127.A2" office:value-type="string">
            <text:p text:style-name="P29" loext:marker-style-name="T145"><text:span text:style-name="T195">NIDS </text:span><text:span text:style-name="T146">部署在網路節點，分析封包流量；</text:span><text:span text:style-name="T195">HIDS </text:span><text:span text:style-name="T146">才看 </text:span><text:span text:style-name="T195">Log</text:span><text:span text:style-name="T146">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45"><text:span text:style-name="T195">Q6 SNMP </text:span><text:span text:style-name="T146">的主要用途？</text:span></text:p>
          </table:table-cell>
          <table:table-cell table:style-name="表格127.A3" office:value-type="string">
            <text:p text:style-name="P29" loext:marker-style-name="T145"><text:span text:style-name="T146">管理網路設備</text:span><text:span text:style-name="T145"/></text:p>
          </table:table-cell>
          <table:table-cell table:style-name="表格127.A3" office:value-type="string">
            <text:p text:style-name="P29" loext:marker-style-name="T145"><text:span text:style-name="T195">SNMP </text:span><text:span text:style-name="T146">監控與管理路由器、交換器狀態（</text:span><text:span text:style-name="T195">CPU</text:span><text:span text:style-name="T146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45"><text:span text:style-name="T195">Q7 ICMP </text:span><text:span text:style-name="T146">常用於哪種工具？</text:span></text:p>
          </table:table-cell>
          <table:table-cell table:style-name="表格127.A2" office:value-type="string">
            <text:p text:style-name="P29" loext:marker-style-name="T145"><text:span text:style-name="T195">Ping</text:span><text:span text:style-name="T145"/></text:p>
          </table:table-cell>
          <table:table-cell table:style-name="表格127.A2" office:value-type="string">
            <text:p text:style-name="P29" loext:marker-style-name="T145"><text:span text:style-name="T195">Ping </text:span><text:span text:style-name="T146">與 </text:span><text:span text:style-name="T195">Traceroute </text:span><text:span text:style-name="T146">都用 </text:span><text:span text:style-name="T195">ICMP </text:span><text:span text:style-name="T146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45"><text:span text:style-name="T195">Q8 ICMP </text:span><text:span text:style-name="T146">屬 </text:span><text:span text:style-name="T195">OSI </text:span><text:span text:style-name="T146">哪一層？</text:span></text:p>
          </table:table-cell>
          <table:table-cell table:style-name="表格127.A3" office:value-type="string">
            <text:p text:style-name="P29" loext:marker-style-name="T145"><text:span text:style-name="T195">Network Layer</text:span><text:span text:style-name="T145"/></text:p>
          </table:table-cell>
          <table:table-cell table:style-name="表格127.A3" office:value-type="string">
            <text:p text:style-name="P29" loext:marker-style-name="T145"><text:span text:style-name="T195">ICMP </text:span><text:span text:style-name="T146">是 </text:span><text:span text:style-name="T195">IP </text:span><text:span text:style-name="T146">的附屬協定，屬網路層；</text:span><text:span text:style-name="T195">SNMP </text:span><text:span text:style-name="T146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45"><text:span text:style-name="T195">Q9 </text:span><text:span text:style-name="T146">何者用 </text:span><text:span text:style-name="T195">UDP </text:span><text:span text:style-name="T146">且屬應用層？</text:span></text:p>
          </table:table-cell>
          <table:table-cell table:style-name="表格127.A2" office:value-type="string">
            <text:p text:style-name="P29" loext:marker-style-name="T145"><text:span text:style-name="T195">SNMP</text:span><text:span text:style-name="T145"/></text:p>
          </table:table-cell>
          <table:table-cell table:style-name="表格127.A2" office:value-type="string">
            <text:p text:style-name="P29" loext:marker-style-name="T145"><text:span text:style-name="T195">SNMP </text:span><text:span text:style-name="T146">用 </text:span><text:span text:style-name="T195">UDP</text:span><text:span text:style-name="T146">、屬應用層；</text:span><text:span text:style-name="T195">ICMP </text:span><text:span text:style-name="T146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45"><text:span text:style-name="T195">Q10 </text:span><text:span text:style-name="T146">下列何者正確？</text:span></text:p>
          </table:table-cell>
          <table:table-cell table:style-name="表格127.A3" office:value-type="string">
            <text:p text:style-name="P29" loext:marker-style-name="T145"><text:span text:style-name="T195">SNMP </text:span><text:span text:style-name="T146">用於設備管理</text:span></text:p>
          </table:table-cell>
          <table:table-cell table:style-name="表格127.A3" office:value-type="string">
            <text:p text:style-name="P29" loext:marker-style-name="T145"><text:span text:style-name="T195">IDS </text:span><text:span text:style-name="T146">不阻擋；</text:span><text:span text:style-name="T195">Firewall </text:span><text:span text:style-name="T146">不做行為分析；</text:span><text:span text:style-name="T195">ICMP </text:span><text:span text:style-name="T146">只做網路診斷。</text:span></text:p>
          </table:table-cell>
        </table:table-row>
      </table:table>
      <text:h text:style-name="P11" text:outline-level="2" loext:marker-style-name="T27"><text:span text:style-name="T28">肆、企業資訊安全：預防 → 偵測 → 復原</text:span><text:span text:style-name="T27"/></text:h>
      <text:p text:style-name="P35" loext:marker-style-name="T98"><text:span text:style-name="T97">企業資訊系統（官網、資料庫、公文</text:span><text:span text:style-name="T155">/</text:span><text:span text:style-name="T97">健保</text:span><text:span text:style-name="T155">/</text:span><text:span text:style-name="T97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" loext:marker-style-name="T73"><text:span text:style-name="T74">三大核心</text:span><text:span text:style-name="T73"/></text:p>
            </table:table-cell>
            <table:table-cell table:style-name="表格128.A1" office:value-type="string">
              <text:p text:style-name="P4" loext:marker-style-name="T73"><text:span text:style-name="T74">目標</text:span><text:span text:style-name="T73"/></text:p>
            </table:table-cell>
            <table:table-cell table:style-name="表格128.A1" office:value-type="string">
              <text:p text:style-name="P4" loext:marker-style-name="T73"><text:span text:style-name="T74">做法</text:span><text:span text:style-name="T73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9" loext:marker-style-name="T126"><text:span text:style-name="T179">① </text:span><text:span text:style-name="T127">事前預防</text:span></text:p>
          </table:table-cell>
          <table:table-cell table:style-name="表格128.A2" office:value-type="string">
            <text:p text:style-name="P29" loext:marker-style-name="T126"><text:span text:style-name="T127">讓壞事不要發生</text:span><text:span text:style-name="T126"/></text:p>
          </table:table-cell>
          <table:table-cell table:style-name="表格128.A2" office:value-type="string">
            <text:p text:style-name="P29" loext:marker-style-name="T126"><text:span text:style-name="T127">設密碼、</text:span><text:span text:style-name="T179">MFA</text:span><text:span text:style-name="T127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9" loext:marker-style-name="T126"><text:span text:style-name="T179">② </text:span><text:span text:style-name="T127">事中偵測</text:span></text:p>
          </table:table-cell>
          <table:table-cell table:style-name="表格128.A3" office:value-type="string">
            <text:p text:style-name="P29" loext:marker-style-name="T126"><text:span text:style-name="T127">出事時盡快發現</text:span><text:span text:style-name="T126"/></text:p>
          </table:table-cell>
          <table:table-cell table:style-name="表格128.A3" office:value-type="string">
            <text:p text:style-name="P29" loext:marker-style-name="T126"><text:span text:style-name="T127">偵測異常登入、流量、病毒警報（</text:span><text:span text:style-name="T179">IDS/IPS/NGFW/EDR/MDR</text:span><text:span text:style-name="T127">）</text:span></text:p>
          </table:table-cell>
        </table:table-row>
        <table:table-row table:style-name="表格128.1">
          <table:table-cell table:style-name="表格128.A2" office:value-type="string">
            <text:p text:style-name="P29" loext:marker-style-name="T126"><text:span text:style-name="T179">③ </text:span><text:span text:style-name="T127">事後復原</text:span></text:p>
          </table:table-cell>
          <table:table-cell table:style-name="表格128.A2" office:value-type="string">
            <text:p text:style-name="P29" loext:marker-style-name="T126"><text:span text:style-name="T127">壞掉後快速救回來</text:span><text:span text:style-name="T126"/></text:p>
          </table:table-cell>
          <table:table-cell table:style-name="表格128.A2" office:value-type="string">
            <text:p text:style-name="P29" loext:marker-style-name="T126"><text:span text:style-name="T127">備份還原、啟動備援系統、災難復原（</text:span><text:span text:style-name="T179">BCP</text:span><text:span text:style-name="T127">、</text:span><text:span text:style-name="T179">RTO/RPO</text:span><text:span text:style-name="T127">）</text:span></text:p>
          </table:table-cell>
        </table:table-row>
      </table:table>
      <text:h text:style-name="P12" text:outline-level="3"><text:span text:style-name="T198">▍</text:span><text:span text:style-name="T199"> </text:span><text:span text:style-name="T200">事前預防：</text:span><text:span text:style-name="T199">MFA</text:span><text:span text:style-name="T200">（多因素驗證）</text:span></text:h>
      <text:p text:style-name="P35" loext:marker-style-name="T98"><text:span text:style-name="T155">MFA = Multi-Factor Authentication</text:span><text:span text:style-name="T97">。登入帳號時不只輸入密碼，還要再驗證一次身份：手機簡訊驗證碼、</text:span><text:span text:style-name="T155">Google Authenticator </text:span><text:span text:style-name="T97">動態碼、指紋或臉部辨識。為什麼要 </text:span><text:span text:style-name="T155">MFA</text:span><text:span text:style-name="T97">？即使駭客知道你的密碼，沒有你的手機或指紋，也無法登入。</text:span></text:p>
      <text:h text:style-name="P12" text:outline-level="3"><text:span text:style-name="T198">▍</text:span><text:span text:style-name="T199"> </text:span><text:span text:style-name="T200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" loext:marker-style-name="T73"><text:span text:style-name="T74">工具</text:span><text:span text:style-name="T73"/></text:p>
            </table:table-cell>
            <table:table-cell table:style-name="表格129.A1" office:value-type="string">
              <text:p text:style-name="P4" loext:marker-style-name="T73"><text:span text:style-name="T74">全名 </text:span><text:span text:style-name="T79">/ </text:span><text:span text:style-name="T74">說明</text:span></text:p>
            </table:table-cell>
            <table:table-cell table:style-name="表格129.A1" office:value-type="string">
              <text:p text:style-name="P4" loext:marker-style-name="T73"><text:span text:style-name="T74">會阻擋？</text:span><text:span text:style-name="T73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9" loext:marker-style-name="T126"><text:span text:style-name="T179">Firewall</text:span><text:span text:style-name="T126"/></text:p>
          </table:table-cell>
          <table:table-cell table:style-name="表格129.A2" office:value-type="string">
            <text:p text:style-name="P29" loext:marker-style-name="T126"><text:span text:style-name="T127">控制誰能進出網路</text:span><text:span text:style-name="T126"/></text:p>
          </table:table-cell>
          <table:table-cell table:style-name="表格129.A2" office:value-type="string">
            <text:p text:style-name="P29" loext:marker-style-name="T126"><text:span text:style-name="T179">✔ </text:span><text:span text:style-name="T127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9" loext:marker-style-name="T126"><text:span text:style-name="T179">NGFW</text:span><text:span text:style-name="T126"/></text:p>
          </table:table-cell>
          <table:table-cell table:style-name="表格129.A3" office:value-type="string">
            <text:p text:style-name="P29" loext:marker-style-name="T126"><text:span text:style-name="T127">次世代防火牆，能辨識應用層威脅</text:span><text:span text:style-name="T126"/></text:p>
          </table:table-cell>
          <table:table-cell table:style-name="表格129.A3" office:value-type="string">
            <text:p text:style-name="P29" loext:marker-style-name="T126"><text:span text:style-name="T179">✔ </text:span><text:span text:style-name="T127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26"><text:span text:style-name="T179">IDS</text:span><text:span text:style-name="T126"/></text:p>
          </table:table-cell>
          <table:table-cell table:style-name="表格129.A2" office:value-type="string">
            <text:p text:style-name="P29" loext:marker-style-name="T126"><text:span text:style-name="T127">入侵偵測系統，發現異常就發警報</text:span><text:span text:style-name="T126"/></text:p>
          </table:table-cell>
          <table:table-cell table:style-name="表格129.A2" office:value-type="string">
            <text:p text:style-name="P29" loext:marker-style-name="T126"><text:span text:style-name="T179">✘ </text:span><text:span text:style-name="T127">不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26"><text:span text:style-name="T179">IPS</text:span><text:span text:style-name="T126"/></text:p>
          </table:table-cell>
          <table:table-cell table:style-name="表格129.A3" office:value-type="string">
            <text:p text:style-name="P29" loext:marker-style-name="T126"><text:span text:style-name="T127">入侵防禦系統，發現異常直接阻擋</text:span><text:span text:style-name="T126"/></text:p>
          </table:table-cell>
          <table:table-cell table:style-name="表格129.A3" office:value-type="string">
            <text:p text:style-name="P29" loext:marker-style-name="T126"><text:span text:style-name="T179">✔ </text:span><text:span text:style-name="T127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26"><text:span text:style-name="T179">EDR</text:span><text:span text:style-name="T126"/></text:p>
          </table:table-cell>
          <table:table-cell table:style-name="表格129.A2" office:value-type="string">
            <text:p text:style-name="P29" loext:marker-style-name="T126"><text:span text:style-name="T179">Endpoint Detection &amp; Response</text:span><text:span text:style-name="T127">，監控每台電腦行為</text:span></text:p>
          </table:table-cell>
          <table:table-cell table:style-name="表格129.A2" office:value-type="string">
            <text:p text:style-name="P29" loext:marker-style-name="T126"><text:span text:style-name="T179">✔ </text:span><text:span text:style-name="T127">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26"><text:span text:style-name="T179">MDR</text:span><text:span text:style-name="T126"/></text:p>
          </table:table-cell>
          <table:table-cell table:style-name="表格129.A3" office:value-type="string">
            <text:p text:style-name="P29" loext:marker-style-name="T126"><text:span text:style-name="T179">Managed D&amp;R</text:span><text:span text:style-name="T127">，委外資安監控服務（</text:span><text:span text:style-name="T179">24 </text:span><text:span text:style-name="T127">小時）</text:span></text:p>
          </table:table-cell>
          <table:table-cell table:style-name="表格129.A3" office:value-type="string">
            <text:p text:style-name="P29" loext:marker-style-name="T126"><text:span text:style-name="T179">✔ </text:span><text:span text:style-name="T127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6"><text:span text:style-name="T196">🏠 <text:s/></text:span><text:span text:style-name="T50">比喻幫你秒懂（公司＝大樓）</text:span></text:p>
            <text:p text:style-name="P7" loext:marker-style-name="T98"><text:span text:style-name="T97">防火牆＝社區大門警衛；</text:span><text:span text:style-name="T155">NGFW</text:span><text:span text:style-name="T97">＝更聰明的警衛（還會看你帶什麼東西進來）；</text:span><text:span text:style-name="T155">IDS</text:span><text:span text:style-name="T97">＝監視器警報（只會叫，不會阻止）；</text:span><text:span text:style-name="T155">IPS</text:span><text:span text:style-name="T97">＝保全（直接壓制壞人）；</text:span><text:span text:style-name="T155">EDR</text:span><text:span text:style-name="T97">＝每個房間都裝攝影機（監控每台電腦</text:span><text:span text:style-name="T155">/</text:span><text:span text:style-name="T97">程式）；</text:span><text:span text:style-name="T155">MDR</text:span><text:span text:style-name="T97">＝把保全工作委外給專業公司 </text:span><text:span text:style-name="T155">24 </text:span><text:span text:style-name="T97">小時監控。</text:span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</text:span><text:span text:style-name="T200">事後復原：備份、</text:span><text:span text:style-name="T199">RTO / RPO</text:span><text:span text:style-name="T200">、</text:span><text:span text:style-name="T199">BCP</text:span></text:h>
      <text:p text:style-name="P35" loext:marker-style-name="T98"><text:span text:style-name="T97">當資料損毀或遭加密（如勒索病毒），可透過備份救回。最佳實踐：本地備份 </text:span><text:span text:style-name="T155">+ </text:span><text:span text:style-name="T97">異地備份（台北機房同步到高雄機房）；定期測試「備份能否真的還原」；雲端備份（</text:span><text:span text:style-name="T155">AWS/Azure/GCP</text:span><text:span text:style-name="T97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" loext:marker-style-name="T73"><text:span text:style-name="T74">指標</text:span><text:span text:style-name="T73"/></text:p>
            </table:table-cell>
            <table:table-cell table:style-name="表格130.A1" office:value-type="string">
              <text:p text:style-name="P4" loext:marker-style-name="T73"><text:span text:style-name="T74">全名</text:span><text:span text:style-name="T73"/></text:p>
            </table:table-cell>
            <table:table-cell table:style-name="表格130.A1" office:value-type="string">
              <text:p text:style-name="P4" loext:marker-style-name="T73"><text:span text:style-name="T74">問什麼</text:span><text:span text:style-name="T73"/></text:p>
            </table:table-cell>
            <table:table-cell table:style-name="表格130.A1" office:value-type="string">
              <text:p text:style-name="P4" loext:marker-style-name="T73"><text:span text:style-name="T74">範例</text:span><text:span text:style-name="T73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9" loext:marker-style-name="T126"><text:span text:style-name="T179">RTO</text:span><text:span text:style-name="T126"/></text:p>
          </table:table-cell>
          <table:table-cell table:style-name="表格130.A2" office:value-type="string">
            <text:p text:style-name="P29" loext:marker-style-name="T126"><text:span text:style-name="T179">Recovery Time Objective </text:span><text:span text:style-name="T127">復原時間目標</text:span></text:p>
          </table:table-cell>
          <table:table-cell table:style-name="表格130.A2" office:value-type="string">
            <text:p text:style-name="P29" loext:marker-style-name="T126"><text:span text:style-name="T127">系統出問題後，最多能停多久？</text:span><text:span text:style-name="T126"/></text:p>
          </table:table-cell>
          <table:table-cell table:style-name="表格130.A2" office:value-type="string">
            <text:p text:style-name="P29" loext:marker-style-name="T126"><text:span text:style-name="T127">銀行 </text:span><text:span text:style-name="T179">RTO 10 </text:span><text:span text:style-name="T127">分鐘；學校網站 </text:span><text:span text:style-name="T179">RTO </text:span><text:span text:style-name="T127">半天</text:span></text:p>
          </table:table-cell>
        </table:table-row>
        <table:table-row table:style-name="表格130.1">
          <table:table-cell table:style-name="表格130.A3" office:value-type="string">
            <text:p text:style-name="P29" loext:marker-style-name="T126"><text:span text:style-name="T179">RPO</text:span><text:span text:style-name="T126"/></text:p>
          </table:table-cell>
          <table:table-cell table:style-name="表格130.A3" office:value-type="string">
            <text:p text:style-name="P29" loext:marker-style-name="T126"><text:span text:style-name="T179">Recovery Point Objective </text:span><text:span text:style-name="T127">復原點目標</text:span></text:p>
          </table:table-cell>
          <table:table-cell table:style-name="表格130.A3" office:value-type="string">
            <text:p text:style-name="P29" loext:marker-style-name="T126"><text:span text:style-name="T127">最多能接受丟失幾小時的資料？</text:span><text:span text:style-name="T126"/></text:p>
          </table:table-cell>
          <table:table-cell table:style-name="表格130.A3" office:value-type="string">
            <text:p text:style-name="P29" loext:marker-style-name="T126"><text:span text:style-name="T127">銀行 </text:span><text:span text:style-name="T179">RPO </text:span><text:span text:style-name="T127">接近 </text:span><text:span text:style-name="T179">0</text:span><text:span text:style-name="T127">；一般公司 </text:span><text:span text:style-name="T179">RPO 24 </text:span><text:span text:style-name="T127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6"><text:span text:style-name="T196">⏱ <text:s/></text:span><text:span text:style-name="T250">一句話記憶法</text:span></text:p>
            <text:p text:style-name="P7"><text:span text:style-name="T257">RTO = </text:span><text:span text:style-name="T251">停機時間</text:span><text:span text:style-name="T97">（能停多久？）　</text:span><text:span text:style-name="T257">RPO = </text:span><text:span text:style-name="T251">資料損失量</text:span><text:span text:style-name="T97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6"><text:span text:style-name="T196">🏢 <text:s/></text:span><text:span text:style-name="T61">BCP</text:span><text:span text:style-name="T50">：公司炸掉了還能繼續運作嗎？</text:span></text:p>
            <text:p text:style-name="P7" loext:marker-style-name="T98"><text:span text:style-name="T155">BCP = Business Continuity Planning</text:span><text:span text:style-name="T97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SSDLC</text:span><text:span text:style-name="T200">：軟體開發的每個階段都加入資安</text:span></text:h>
      <text:p text:style-name="P35" loext:marker-style-name="T98"><text:span text:style-name="T155">SSDLC = Security Software Development Life Cycle</text:span><text:span text:style-name="T97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" loext:marker-style-name="T73"><text:span text:style-name="T74">階段</text:span><text:span text:style-name="T73"/></text:p>
            </table:table-cell>
            <table:table-cell table:style-name="表格131.A1" office:value-type="string">
              <text:p text:style-name="P4" loext:marker-style-name="T73"><text:span text:style-name="T74">英文</text:span><text:span text:style-name="T73"/></text:p>
            </table:table-cell>
            <table:table-cell table:style-name="表格131.A1" office:value-type="string">
              <text:p text:style-name="P4" loext:marker-style-name="T73"><text:span text:style-name="T74">做什麼</text:span><text:span text:style-name="T73"/></text:p>
            </table:table-cell>
            <table:table-cell table:style-name="表格131.A1" office:value-type="string">
              <text:p text:style-name="P4" loext:marker-style-name="T73"><text:span text:style-name="T74">資安重點</text:span><text:span text:style-name="T73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9" loext:marker-style-name="T126"><text:span text:style-name="T179">① </text:span><text:span text:style-name="T127">定義</text:span></text:p>
          </table:table-cell>
          <table:table-cell table:style-name="表格131.A2" office:value-type="string">
            <text:p text:style-name="P29" loext:marker-style-name="T126"><text:span text:style-name="T179">Define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確認需求與範圍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列出安全需求（需要登入驗證嗎？）</text:span><text:span text:style-name="T126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26"><text:span text:style-name="T179">② </text:span><text:span text:style-name="T127">設計</text:span></text:p>
          </table:table-cell>
          <table:table-cell table:style-name="表格131.A3" office:value-type="string">
            <text:p text:style-name="P29" loext:marker-style-name="T126"><text:span text:style-name="T179">Design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設計系統架構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規劃權限控管、密碼加密、防 </text:span><text:span text:style-name="T179">SQL Injection</text:span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26"><text:span text:style-name="T179">③ </text:span><text:span text:style-name="T127">開發</text:span></text:p>
          </table:table-cell>
          <table:table-cell table:style-name="表格131.A2" office:value-type="string">
            <text:p text:style-name="P29" loext:marker-style-name="T126"><text:span text:style-name="T179">Develop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工程師寫程式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遵守安全編碼規範，不寫危險程式碼</text:span><text:span text:style-name="T126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26"><text:span text:style-name="T179">④ </text:span><text:span text:style-name="T127">測試</text:span></text:p>
          </table:table-cell>
          <table:table-cell table:style-name="表格131.A3" office:value-type="string">
            <text:p text:style-name="P29" loext:marker-style-name="T126"><text:span text:style-name="T179">Test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測試功能與安全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弱點掃描、滲透測試，找出漏洞</text:span><text:span text:style-name="T126"/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26"><text:span text:style-name="T179">⑤ </text:span><text:span text:style-name="T127">上線</text:span></text:p>
          </table:table-cell>
          <table:table-cell table:style-name="表格131.A2" office:value-type="string">
            <text:p text:style-name="P29" loext:marker-style-name="T126"><text:span text:style-name="T179">Deploy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正式發布系統</text:span><text:span text:style-name="T126"/></text:p>
          </table:table-cell>
          <table:table-cell table:style-name="表格131.A2" office:value-type="string">
            <text:p text:style-name="P29" loext:marker-style-name="T126"><text:span text:style-name="T127">確認設定沒疏漏，最小權限原則</text:span><text:span text:style-name="T126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26"><text:span text:style-name="T179">⑥ </text:span><text:span text:style-name="T127">維護</text:span></text:p>
          </table:table-cell>
          <table:table-cell table:style-name="表格131.A3" office:value-type="string">
            <text:p text:style-name="P29" loext:marker-style-name="T126"><text:span text:style-name="T179">Maintain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持續監控與更新</text:span><text:span text:style-name="T126"/></text:p>
          </table:table-cell>
          <table:table-cell table:style-name="表格131.A3" office:value-type="string">
            <text:p text:style-name="P29" loext:marker-style-name="T126"><text:span text:style-name="T127">定期更新修補，監控異常行為</text:span><text:span text:style-name="T12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6"><text:span text:style-name="T196">🔑 <text:s/></text:span><text:span text:style-name="T210">SSDLC </text:span><text:span text:style-name="T200">核心</text:span></text:p>
            <text:p text:style-name="P7" loext:marker-style-name="T98"><text:span text:style-name="T97">核心精神「左移（</text:span><text:span text:style-name="T155">Shift Left</text:span><text:span text:style-name="T97">）」——把資安工作從最後一步，往前移到設計和開發階段。越早發現</text:span><text:soft-page-break/><text:span text:style-name="T97">漏洞，修復成本越低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198">▍</text:span><text:span text:style-name="T199"> ISO 27001</text:span><text:span text:style-name="T200">：用制度管理資安</text:span></text:h>
      <text:p text:style-name="P35" loext:marker-style-name="T98"><text:span text:style-name="T155">ISO 27001 </text:span><text:span text:style-name="T97">是國際公認的資安管理制度標準，建立的制度稱為 </text:span><text:span text:style-name="T155">ISMS</text:span><text:span text:style-name="T97">（</text:span><text:span text:style-name="T155">Information Security Management System</text:span><text:span text:style-name="T97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" loext:marker-style-name="T73"><text:span text:style-name="T74">四個面向</text:span><text:span text:style-name="T73"/></text:p>
            </table:table-cell>
            <table:table-cell table:style-name="表格132.A1" office:value-type="string">
              <text:p text:style-name="P4" loext:marker-style-name="T73"><text:span text:style-name="T74">管什麼</text:span><text:span text:style-name="T73"/></text:p>
            </table:table-cell>
            <table:table-cell table:style-name="表格132.A1" office:value-type="string">
              <text:p text:style-name="P4" loext:marker-style-name="T73"><text:span text:style-name="T74">例子</text:span><text:span text:style-name="T73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9" loext:marker-style-name="T126"><text:span text:style-name="T127">人（</text:span><text:span text:style-name="T179">People</text:span><text:span text:style-name="T127">）</text:span></text:p>
          </table:table-cell>
          <table:table-cell table:style-name="表格132.A2" office:value-type="string">
            <text:p text:style-name="P29" loext:marker-style-name="T126"><text:span text:style-name="T127">管理人員的行為與責任</text:span><text:span text:style-name="T126"/></text:p>
          </table:table-cell>
          <table:table-cell table:style-name="表格132.A2" office:value-type="string">
            <text:p text:style-name="P29" loext:marker-style-name="T126"><text:span text:style-name="T127">員工教育訓練、離職員工帳號立即停用、權限最小化</text:span><text:span text:style-name="T126"/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26"><text:span text:style-name="T127">技術（</text:span><text:span text:style-name="T179">Technology</text:span><text:span text:style-name="T127">）</text:span></text:p>
          </table:table-cell>
          <table:table-cell table:style-name="表格132.A3" office:value-type="string">
            <text:p text:style-name="P29" loext:marker-style-name="T126"><text:span text:style-name="T127">使用適當的安全技術</text:span><text:span text:style-name="T126"/></text:p>
          </table:table-cell>
          <table:table-cell table:style-name="表格132.A3" office:value-type="string">
            <text:p text:style-name="P29" loext:marker-style-name="T126"><text:span text:style-name="T127">防火牆、</text:span><text:span text:style-name="T179">MFA</text:span><text:span text:style-name="T127">、資料加密、</text:span><text:span text:style-name="T179">EDR</text:span></text:p>
          </table:table-cell>
        </table:table-row>
        <table:table-row table:style-name="表格132.1">
          <table:table-cell table:style-name="表格132.A2" office:value-type="string">
            <text:p text:style-name="P29" loext:marker-style-name="T126"><text:span text:style-name="T127">組織（</text:span><text:span text:style-name="T179">Organization</text:span><text:span text:style-name="T127">）</text:span></text:p>
          </table:table-cell>
          <table:table-cell table:style-name="表格132.A2" office:value-type="string">
            <text:p text:style-name="P29" loext:marker-style-name="T126"><text:span text:style-name="T127">建立流程與管理制度</text:span><text:span text:style-name="T126"/></text:p>
          </table:table-cell>
          <table:table-cell table:style-name="表格132.A2" office:value-type="string">
            <text:p text:style-name="P29" loext:marker-style-name="T126"><text:span text:style-name="T127">資安政策、</text:span><text:span text:style-name="T179">SOP</text:span><text:span text:style-name="T127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26"><text:span text:style-name="T127">實體（</text:span><text:span text:style-name="T179">Physical</text:span><text:span text:style-name="T127">）</text:span></text:p>
          </table:table-cell>
          <table:table-cell table:style-name="表格132.A3" office:value-type="string">
            <text:p text:style-name="P29" loext:marker-style-name="T126"><text:span text:style-name="T127">保護實體環境</text:span><text:span text:style-name="T126"/></text:p>
          </table:table-cell>
          <table:table-cell table:style-name="表格132.A3" office:value-type="string">
            <text:p text:style-name="P29" loext:marker-style-name="T126"><text:span text:style-name="T127">機房門禁、監視器、防止未授權人員進入</text:span><text:span text:style-name="T12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6"><text:span text:style-name="T196">🌟 <text:s/></text:span><text:span text:style-name="T250">考試必背三句話</text:span></text:p>
            <text:p text:style-name="P7" loext:marker-style-name="T98"><text:span text:style-name="T155">1. </text:span><text:span text:style-name="T97">資安三階段：事前預防 → 事中偵測 → 事後復原。</text:span></text:p>
            <text:p text:style-name="P8" loext:marker-style-name="T98"><text:span text:style-name="T155">2. SSDLC</text:span><text:span text:style-name="T97">：六階段（</text:span><text:span text:style-name="T155">Define→Design→Develop→Test→Deploy→Maintain</text:span><text:span text:style-name="T97">）都加入資安。</text:span></text:p>
            <text:p text:style-name="P8" loext:marker-style-name="T98"><text:span text:style-name="T155">3. ISO 27001</text:span><text:span text:style-name="T97">：用 </text:span><text:span text:style-name="T155">ISMS </text:span><text:span text:style-name="T97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35" loext:marker-style-name="T98"><text:span text:style-name="T97">現代駭客不一定放病毒，而是偷登入帳號偽裝成正常使用者、長期潛伏、利用合法工具發動攻擊。因此資安核心已從「防毒」轉向「持續監控電腦行為，即時偵測並快速應變」。</text:span><text:span text:style-name="T98"/></text:p>
      <text:h text:style-name="P12" text:outline-level="3"><text:span text:style-name="T198">▍</text:span><text:span text:style-name="T199"> EDR — </text:span><text:span text:style-name="T200">自己監控的資安工具</text:span></text:h>
      <text:p text:style-name="P35" loext:marker-style-name="T98"><text:span text:style-name="T155">EDR = Endpoint Detection and Response</text:span><text:span text:style-name="T97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6" loext:marker-style-name="T67"><text:span text:style-name="T68">三大偵測範圍</text:span><text:span text:style-name="T67"/></text:p>
            </table:table-cell>
            <table:table-cell table:style-name="表格133.A1" office:value-type="string">
              <text:p text:style-name="P26" loext:marker-style-name="T67"><text:span text:style-name="T68">三大回應動作</text:span><text:span text:style-name="T67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9" loext:marker-style-name="T81"><text:span text:style-name="T82">檔案行為：大量加密</text:span><text:span text:style-name="T147">/</text:span><text:span text:style-name="T82">修改系統檔案 → 可能勒索病毒｜程式行為：</text:span><text:span text:style-name="T147">Office </text:span><text:span text:style-name="T82">偷偷開命令列 → 明顯異常｜網路行為：突然連線境外 </text:span><text:span text:style-name="T147">IP → </text:span><text:span text:style-name="T82">可能已遭入侵</text:span></text:p>
          </table:table-cell>
          <table:table-cell table:style-name="表格133.A2" office:value-type="string">
            <text:p text:style-name="P29" loext:marker-style-name="T81"><text:span text:style-name="T82">中斷程序：立即殺掉可疑惡意程式｜隔離主機：切斷該電腦與內網連線，防擴散｜封鎖連線：禁止與駭客伺服器通訊</text:span><text:span text:style-name="T81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6"><text:span text:style-name="T196">💡 <text:s/></text:span><text:span text:style-name="T200">核心觀念</text:span></text:p>
            <text:p text:style-name="P7" loext:marker-style-name="T98"><text:span text:style-name="T155">EDR </text:span><text:span text:style-name="T97">是「買工具、自己守」。企業需要有內部資安人員負責查看警報並處理事件。</text:span></text:p>
          </table:table-cell>
          <table:covered-table-cell/>
        </table:table-row>
      </table:table>
      <text:h text:style-name="P12" text:outline-level="3"><text:span text:style-name="T198">▍</text:span><text:span text:style-name="T199"> MDR — </text:span><text:span text:style-name="T200">委外的資安託管服務</text:span></text:h>
      <text:p text:style-name="P35" loext:marker-style-name="T98"><text:span text:style-name="T155">MDR = Managed Detection and Response</text:span><text:span text:style-name="T97">。重點在「</text:span><text:span text:style-name="T155">Managed</text:span><text:span text:style-name="T97">（託管）」——你不需要自己有資安團隊，直接花錢請外部資安公司 </text:span><text:span text:style-name="T155">24 </text:span><text:span text:style-name="T97">小時幫你守。服務包含 </text:span><text:span text:style-name="T155">SOC</text:span><text:span text:style-name="T97">（資安監控中心，專業人員 </text:span><text:span text:style-name="T155">24 </text:span><text:span text:style-name="T97">小時盯著）、</text:span><text:span text:style-name="T155">IDS</text:span><text:span text:style-name="T97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4" loext:marker-style-name="T67"><text:span text:style-name="T68">比較項目</text:span><text:span text:style-name="T67"/></text:p>
            </table:table-cell>
            <table:table-cell table:style-name="表格134.A1" office:value-type="string">
              <text:p text:style-name="P4" loext:marker-style-name="T67"><text:span text:style-name="T77">EDR</text:span><text:span text:style-name="T67"/></text:p>
            </table:table-cell>
            <table:table-cell table:style-name="表格134.A1" office:value-type="string">
              <text:p text:style-name="P4" loext:marker-style-name="T67"><text:span text:style-name="T77">MDR</text:span><text:span text:style-name="T67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9" loext:marker-style-name="T81"><text:span text:style-name="T82">管理方式</text:span><text:span text:style-name="T81"/></text:p>
          </table:table-cell>
          <table:table-cell table:style-name="表格134.A2" office:value-type="string">
            <text:p text:style-name="P29" loext:marker-style-name="T81"><text:span text:style-name="T82">自行管理</text:span><text:span text:style-name="T81"/></text:p>
          </table:table-cell>
          <table:table-cell table:style-name="表格134.A2" office:value-type="string">
            <text:p text:style-name="P29" loext:marker-style-name="T81"><text:span text:style-name="T82">委外管理</text:span><text:span text:style-name="T81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1"><text:span text:style-name="T82">監控時間</text:span><text:span text:style-name="T81"/></text:p>
          </table:table-cell>
          <table:table-cell table:style-name="表格134.A3" office:value-type="string">
            <text:p text:style-name="P29" loext:marker-style-name="T81"><text:span text:style-name="T82">視團隊而定</text:span><text:span text:style-name="T81"/></text:p>
          </table:table-cell>
          <table:table-cell table:style-name="表格134.A3" office:value-type="string">
            <text:p text:style-name="P29" loext:marker-style-name="T81"><text:span text:style-name="T147">24 / 7 </text:span><text:span text:style-name="T82">全天</text:span></text:p>
          </table:table-cell>
        </table:table-row>
        <table:table-row table:style-name="表格134.1">
          <table:table-cell table:style-name="表格134.A2" office:value-type="string">
            <text:p text:style-name="P29" loext:marker-style-name="T81"><text:span text:style-name="T82">所需能力</text:span><text:span text:style-name="T81"/></text:p>
          </table:table-cell>
          <table:table-cell table:style-name="表格134.A2" office:value-type="string">
            <text:p text:style-name="P29" loext:marker-style-name="T81"><text:span text:style-name="T82">需內部資安人員</text:span><text:span text:style-name="T81"/></text:p>
          </table:table-cell>
          <table:table-cell table:style-name="表格134.A2" office:value-type="string">
            <text:p text:style-name="P29" loext:marker-style-name="T81"><text:span text:style-name="T82">無須自建團隊</text:span><text:span text:style-name="T81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1"><text:span text:style-name="T82">適合對象</text:span><text:span text:style-name="T81"/></text:p>
          </table:table-cell>
          <table:table-cell table:style-name="表格134.A3" office:value-type="string">
            <text:p text:style-name="P29" loext:marker-style-name="T81"><text:span text:style-name="T82">大型企業</text:span><text:span text:style-name="T81"/></text:p>
          </table:table-cell>
          <table:table-cell table:style-name="表格134.A3" office:value-type="string">
            <text:p text:style-name="P29" loext:marker-style-name="T81"><text:span text:style-name="T82">中小企業</text:span><text:span text:style-name="T81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9" loext:marker-style-name="T81"><text:span text:style-name="T82">成本模式</text:span><text:span text:style-name="T81"/></text:p>
          </table:table-cell>
          <table:table-cell table:style-name="表格134.A2" office:value-type="string">
            <text:p text:style-name="P29" loext:marker-style-name="T81"><text:span text:style-name="T82">工具費 </text:span><text:span text:style-name="T147">+ </text:span><text:span text:style-name="T82">人力</text:span></text:p>
          </table:table-cell>
          <table:table-cell table:style-name="表格134.A2" office:value-type="string">
            <text:p text:style-name="P29" loext:marker-style-name="T81"><text:span text:style-name="T82">月費 </text:span><text:span text:style-name="T147">/ </text:span><text:span text:style-name="T82">年費訂閱</text:span></text:p>
          </table:table-cell>
        </table:table-row>
      </table:table>
      <text:h text:style-name="P12" text:outline-level="3"><text:span text:style-name="T198">▍</text:span><text:span text:style-name="T199"> MITRE ATT&amp;CK — </text:span><text:span text:style-name="T200">駭客招式大全</text:span></text:h>
      <text:p text:style-name="P35" loext:marker-style-name="T98"><text:span text:style-name="T97">資安界發現駭客攻擊模式相當固定（寄釣魚信→偷帳號→開後門→橫向移動→竊取資料）。</text:span><text:span text:style-name="T155">MITRE </text:span><text:span text:style-name="T97">公司將所有已知駭客手法整理成全球通用的知識庫，稱為 </text:span><text:span text:style-name="T155">MITRE ATT&amp;CK</text:span><text:span text:style-name="T97">（</text:span><text:span text:style-name="T155">Adversarial Tactics, Techniques, and Common Knowledge</text:span><text:span text:style-name="T97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" loext:marker-style-name="T73"><text:span text:style-name="T79">TTP</text:span><text:span text:style-name="T73"/></text:p>
            </table:table-cell>
            <table:table-cell table:style-name="表格135.A1" office:value-type="string">
              <text:p text:style-name="P4" loext:marker-style-name="T73"><text:span text:style-name="T74">意義</text:span><text:span text:style-name="T73"/></text:p>
            </table:table-cell>
            <table:table-cell table:style-name="表格135.A1" office:value-type="string">
              <text:p text:style-name="P4" loext:marker-style-name="T73"><text:span text:style-name="T79">ATT&amp;CK </text:span><text:span text:style-name="T74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9" loext:marker-style-name="T126"><text:span text:style-name="T179">T - Tactics</text:span><text:span text:style-name="T126"/></text:p>
          </table:table-cell>
          <table:table-cell table:style-name="表格135.A2" office:value-type="string">
            <text:p text:style-name="P29" loext:marker-style-name="T126"><text:span text:style-name="T127">戰術（攻擊目的）</text:span><text:span text:style-name="T126"/></text:p>
          </table:table-cell>
          <table:table-cell table:style-name="表格135.A2" office:value-type="string">
            <text:p text:style-name="P29" loext:marker-style-name="T126"><text:span text:style-name="T127">威脅分析：快速定性事件性質</text:span><text:span text:style-name="T126"/></text:p>
          </table:table-cell>
        </table:table-row>
        <table:table-row table:style-name="表格135.1">
          <table:table-cell table:style-name="表格135.A3" office:value-type="string">
            <text:p text:style-name="P29" loext:marker-style-name="T126"><text:span text:style-name="T179">T - Techniques</text:span><text:span text:style-name="T126"/></text:p>
          </table:table-cell>
          <table:table-cell table:style-name="表格135.A3" office:value-type="string">
            <text:p text:style-name="P29" loext:marker-style-name="T126"><text:span text:style-name="T127">技術（使用方法）</text:span><text:span text:style-name="T126"/></text:p>
          </table:table-cell>
          <table:table-cell table:style-name="表格135.A3" office:value-type="string">
            <text:p text:style-name="P29" loext:marker-style-name="T126"><text:span text:style-name="T127">防禦對應：針對常見手法加強監控</text:span><text:span text:style-name="T126"/></text:p>
          </table:table-cell>
        </table:table-row>
        <table:table-row table:style-name="表格135.1">
          <table:table-cell table:style-name="表格135.A2" office:value-type="string">
            <text:p text:style-name="P29" loext:marker-style-name="T126"><text:span text:style-name="T179">P - Procedures</text:span><text:span text:style-name="T126"/></text:p>
          </table:table-cell>
          <table:table-cell table:style-name="表格135.A2" office:value-type="string">
            <text:p text:style-name="P29" loext:marker-style-name="T126"><text:span text:style-name="T127">流程（實際操作步驟）</text:span><text:span text:style-name="T126"/></text:p>
          </table:table-cell>
          <table:table-cell table:style-name="表格135.A2" office:value-type="string">
            <text:p text:style-name="P29" loext:marker-style-name="T126"><text:span text:style-name="T127">主動防禦：預測下一步，提前部署</text:span><text:span text:style-name="T12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6"><text:span text:style-name="T196">💡 <text:s/></text:span><text:span text:style-name="T200">核心觀念</text:span></text:p>
            <text:p text:style-name="P7" loext:marker-style-name="T98"><text:span text:style-name="T155">ATT&amp;CK </text:span><text:span text:style-name="T97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</text:span><text:span text:style-name="T200">數位韌性（</text:span><text:span text:style-name="T199">Digital Resilience</text:span><text:span text:style-name="T200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6" loext:marker-style-name="T67"><text:span text:style-name="T77">❌ </text:span><text:span text:style-name="T68">以前的想法</text:span></text:p>
            </table:table-cell>
            <table:table-cell table:style-name="表格136.A1" office:value-type="string">
              <text:p text:style-name="P26" loext:marker-style-name="T67"><text:span text:style-name="T77">✅ </text:span><text:span text:style-name="T68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9" loext:marker-style-name="T81"><text:span text:style-name="T82">「不能被攻擊」——重點：阻止所有入侵。</text:span><text:span text:style-name="T81"/></text:p>
          </table:table-cell>
          <table:table-cell table:style-name="表格136.A2" office:value-type="string">
            <text:p text:style-name="P29" loext:marker-style-name="T81"><text:span text:style-name="T82">「被打了還能撐住並快速恢復」——重點：強化復原能力。</text:span><text:span text:style-name="T81"/></text:p>
          </table:table-cell>
        </table:table-row>
      </table:table>
      <text:p text:style-name="P35" loext:marker-style-name="T10"><text:span text:style-name="T11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0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6"><text:span text:style-name="T196">📝 <text:s/></text:span><text:span text:style-name="T250">一行記憶法</text:span></text:p>
            <text:p text:style-name="P7"><text:span text:style-name="T257">🛡 EDR → </text:span><text:span text:style-name="T97">自己買工具守　</text:span><text:span text:style-name="T251">👥 </text:span><text:span text:style-name="T257">MDR → </text:span><text:span text:style-name="T97">請公司幫你守</text:span></text:p>
            <text:p text:style-name="P8"><text:span text:style-name="T257">📖 ATT&amp;CK → </text:span><text:span text:style-name="T97">駭客招式教材　</text:span><text:span text:style-name="T251">💪 韌性 → </text:span><text:span text:style-name="T97">撐住、快速復原</text:span></text:p>
          </table:table-cell>
        </table:table-row>
      </table:table>
      <text:h text:style-name="P11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6"><text:span text:style-name="T196">📋 <text:s/></text:span><text:span text:style-name="T218">內容審查說明</text:span></text:p>
            <text:p text:style-name="P7" loext:marker-style-name="T98"><text:span text:style-name="T97">文中「三要素（身份</text:span><text:span text:style-name="T155">/</text:span><text:span text:style-name="T97">設備</text:span><text:span text:style-name="T155">/</text:span><text:span text:style-name="T97">情境）」源自 </text:span><text:span text:style-name="T155">Microsoft </text:span><text:span text:style-name="T97">的 </text:span><text:span text:style-name="T155">Zero Trust </text:span><text:span text:style-name="T97">簡化說法；</text:span><text:span text:style-name="T155">NIST SP 800-207 </text:span><text:span text:style-name="T97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35" loext:marker-style-name="T98"><text:span text:style-name="T97">傳統企業網路以「邊界防護」為核心，邊界之內的人員與設備幾乎被預設為可信任（城堡思維）。</text:span><text:span text:style-name="T155">Zero Trust </text:span><text:span text:style-name="T97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4"/>
            </table:table-cell>
            <table:table-cell table:style-name="表格139.A1" office:value-type="string">
              <text:p text:style-name="P4" loext:marker-style-name="T67"><text:span text:style-name="T68">傳統（城堡思維）</text:span><text:span text:style-name="T67"/></text:p>
            </table:table-cell>
            <table:table-cell table:style-name="表格139.A1" office:value-type="string">
              <text:p text:style-name="P4" loext:marker-style-name="T67"><text:span text:style-name="T77">Zero Trust</text:span><text:span text:style-name="T67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9" loext:marker-style-name="T81"><text:span text:style-name="T82">核心假設</text:span><text:span text:style-name="T81"/></text:p>
          </table:table-cell>
          <table:table-cell table:style-name="表格139.A2" office:value-type="string">
            <text:p text:style-name="P29" loext:marker-style-name="T81"><text:span text:style-name="T82">內網 </text:span><text:span text:style-name="T147">= </text:span><text:span text:style-name="T82">可信任</text:span></text:p>
          </table:table-cell>
          <table:table-cell table:style-name="表格139.A2" office:value-type="string">
            <text:p text:style-name="P29" loext:marker-style-name="T81"><text:span text:style-name="T82">任何人都需持續驗證</text:span><text:span text:style-name="T81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1"><text:span text:style-name="T82">防護重點</text:span><text:span text:style-name="T81"/></text:p>
          </table:table-cell>
          <table:table-cell table:style-name="表格139.A3" office:value-type="string">
            <text:p text:style-name="P29" loext:marker-style-name="T81"><text:span text:style-name="T82">網路邊界 </text:span><text:span text:style-name="T147">/ </text:span><text:span text:style-name="T82">防火牆</text:span></text:p>
          </table:table-cell>
          <table:table-cell table:style-name="表格139.A3" office:value-type="string">
            <text:p text:style-name="P29" loext:marker-style-name="T81"><text:span text:style-name="T82">身份 </text:span><text:span text:style-name="T147">× </text:span><text:span text:style-name="T82">設備 </text:span><text:span text:style-name="T147">× </text:span><text:span text:style-name="T82">情境</text:span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1"><text:span text:style-name="T82">登入之後</text:span><text:span text:style-name="T81"/></text:p>
          </table:table-cell>
          <table:table-cell table:style-name="表格139.A2" office:value-type="string">
            <text:p text:style-name="P29" loext:marker-style-name="T81"><text:span text:style-name="T82">幾乎不再驗證</text:span><text:span text:style-name="T81"/></text:p>
          </table:table-cell>
          <table:table-cell table:style-name="表格139.A2" office:value-type="string">
            <text:p text:style-name="P29" loext:marker-style-name="T81"><text:span text:style-name="T82">每個操作持續驗證</text:span><text:span text:style-name="T81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1"><text:span text:style-name="T82">駭客入侵後</text:span><text:span text:style-name="T81"/></text:p>
          </table:table-cell>
          <table:table-cell table:style-name="表格139.A3" office:value-type="string">
            <text:p text:style-name="P29" loext:marker-style-name="T81"><text:span text:style-name="T82">可橫向移動整個內網</text:span><text:span text:style-name="T81"/></text:p>
          </table:table-cell>
          <table:table-cell table:style-name="表格139.A3" office:value-type="string">
            <text:p text:style-name="P29" loext:marker-style-name="T81"><text:span text:style-name="T82">被微分段限制，難以擴散</text:span><text:span text:style-name="T81"/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1"><text:span text:style-name="T82">適合時代</text:span><text:span text:style-name="T81"/></text:p>
          </table:table-cell>
          <table:table-cell table:style-name="表格139.A2" office:value-type="string">
            <text:p text:style-name="P29" loext:marker-style-name="T81"><text:span text:style-name="T82">固定辦公室 </text:span><text:span text:style-name="T147">/ </text:span><text:span text:style-name="T82">單一內網</text:span></text:p>
          </table:table-cell>
          <table:table-cell table:style-name="表格139.A2" office:value-type="string">
            <text:p text:style-name="P29" loext:marker-style-name="T81"><text:span text:style-name="T147">Cloud / </text:span><text:span text:style-name="T82">遠端 </text:span><text:span text:style-name="T147">/ </text:span><text:span text:style-name="T82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6"><text:span text:style-name="T196">🔑 <text:s/></text:span><text:span text:style-name="T250">核心一句話</text:span></text:p>
            <text:p text:style-name="P7" loext:marker-style-name="T254"><text:soft-page-break/><text:span text:style-name="T257">❝ </text:span><text:span text:style-name="T251">永不信任，始終驗證 ❞（</text:span><text:span text:style-name="T257">Never Trust, Always Verify</text:span><text:span text:style-name="T251">）</text:span></text:p>
            <text:p text:style-name="P8" loext:marker-style-name="T98"><text:span text:style-name="T97">無論使用者身處公司內網或外部網路，無論設備是否為公司配發，系統都不會因為「位置」就直接信任，而是透過多重機制持續確認安全性。</text:span><text:span text:style-name="T98"/></text:p>
          </table:table-cell>
          <table:covered-table-cell/>
          <table:covered-table-cell/>
        </table:table-row>
      </table:table>
      <text:h text:style-name="P12" text:outline-level="3"><text:span text:style-name="T198">▍</text:span><text:span text:style-name="T199"> </text:span><text:span text:style-name="T200">三大核心支柱：人 </text:span><text:span text:style-name="T199">· </text:span><text:span text:style-name="T200">機 </text:span><text:span text:style-name="T199">· </text:span><text:span text:style-name="T200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" loext:marker-style-name="T73"><text:span text:style-name="T74">支柱</text:span><text:span text:style-name="T73"/></text:p>
            </table:table-cell>
            <table:table-cell table:style-name="表格140.A1" office:value-type="string">
              <text:p text:style-name="P4" loext:marker-style-name="T73"><text:span text:style-name="T74">口訣</text:span><text:span text:style-name="T73"/></text:p>
            </table:table-cell>
            <table:table-cell table:style-name="表格140.A1" office:value-type="string">
              <text:p text:style-name="P4" loext:marker-style-name="T73"><text:span text:style-name="T74">具體內容</text:span><text:span text:style-name="T73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9" loext:marker-style-name="T126"><text:span text:style-name="T179">🔑 Identity</text:span><text:span text:style-name="T127">（身份驗證）</text:span></text:p>
          </table:table-cell>
          <table:table-cell table:style-name="表格140.A2" office:value-type="string">
            <text:p text:style-name="P29" loext:marker-style-name="T126"><text:span text:style-name="T127">人</text:span><text:span text:style-name="T126"/></text:p>
          </table:table-cell>
          <table:table-cell table:style-name="表格140.A2" office:value-type="string">
            <text:p text:style-name="P29" loext:marker-style-name="T126"><text:span text:style-name="T127">確認使用者是本人：帳密、</text:span><text:span text:style-name="T179">MFA</text:span><text:span text:style-name="T127">（手機 </text:span><text:span text:style-name="T179">OTP</text:span><text:span text:style-name="T127">、指紋）、</text:span><text:span text:style-name="T179">IAM </text:span><text:span text:style-name="T127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9" loext:marker-style-name="T126"><text:span text:style-name="T179">💻 Device</text:span><text:span text:style-name="T127">（設備健康）</text:span></text:p>
          </table:table-cell>
          <table:table-cell table:style-name="表格140.A3" office:value-type="string">
            <text:p text:style-name="P29" loext:marker-style-name="T126"><text:span text:style-name="T127">機</text:span><text:span text:style-name="T126"/></text:p>
          </table:table-cell>
          <table:table-cell table:style-name="表格140.A3" office:value-type="string">
            <text:p text:style-name="P29" loext:marker-style-name="T126"><text:span text:style-name="T127">確認設備是否安全：防毒更新、系統版本、是否為授權設備（</text:span><text:span text:style-name="T179">Device Posture</text:span><text:span text:style-name="T127">）</text:span></text:p>
          </table:table-cell>
        </table:table-row>
        <table:table-row table:style-name="表格140.1">
          <table:table-cell table:style-name="表格140.A2" office:value-type="string">
            <text:p text:style-name="P29" loext:marker-style-name="T126"><text:span text:style-name="T179">🌐 Context</text:span><text:span text:style-name="T127">（存取情境）</text:span></text:p>
          </table:table-cell>
          <table:table-cell table:style-name="表格140.A2" office:value-type="string">
            <text:p text:style-name="P29" loext:marker-style-name="T126"><text:span text:style-name="T127">境</text:span><text:span text:style-name="T126"/></text:p>
          </table:table-cell>
          <table:table-cell table:style-name="表格140.A2" office:value-type="string">
            <text:p text:style-name="P29" loext:marker-style-name="T126"><text:span text:style-name="T127">評估環境是否異常：登入時間、地點、行為模式；凌晨從境外登入會觸發額外驗證</text:span><text:span text:style-name="T126"/></text:p>
          </table:table-cell>
        </table:table-row>
      </table:table>
      <text:h text:style-name="P12" text:outline-level="3"><text:span text:style-name="T198">▍</text:span><text:span text:style-name="T199"> </text:span><text:span text:style-name="T200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" loext:marker-style-name="T73"><text:span text:style-name="T74">機制</text:span><text:span text:style-name="T73"/></text:p>
            </table:table-cell>
            <table:table-cell table:style-name="表格141.A1" office:value-type="string">
              <text:p text:style-name="P4" loext:marker-style-name="T73"><text:span text:style-name="T74">說明</text:span><text:span text:style-name="T73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9" loext:marker-style-name="T126"><text:span text:style-name="T179">① MFA </text:span><text:span text:style-name="T127">多因素驗證</text:span></text:p>
          </table:table-cell>
          <table:table-cell table:style-name="表格141.A2" office:value-type="string">
            <text:p text:style-name="P29" loext:marker-style-name="T126"><text:span text:style-name="T127">登入不只密碼，還需第二層驗證（手機驗證碼、指紋、硬體金鑰），密碼外洩也難入侵</text:span><text:span text:style-name="T126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26"><text:span text:style-name="T179">② Least Privilege </text:span><text:span text:style-name="T127">最小權限</text:span></text:p>
          </table:table-cell>
          <table:table-cell table:style-name="表格141.A3" office:value-type="string">
            <text:p text:style-name="P29" loext:marker-style-name="T126"><text:span text:style-name="T127">每位使用者只獲得完成工作所需的最低權限。權限愈小，風險愈低</text:span><text:span text:style-name="T126"/></text:p>
          </table:table-cell>
        </table:table-row>
        <table:table-row table:style-name="表格141.1">
          <table:table-cell table:style-name="表格141.A2" office:value-type="string">
            <text:p text:style-name="P29" loext:marker-style-name="T126"><text:span text:style-name="T179">③ Micro-Segmentation </text:span><text:span text:style-name="T127">微分段</text:span></text:p>
          </table:table-cell>
          <table:table-cell table:style-name="表格141.A2" office:value-type="string">
            <text:p text:style-name="P29" loext:marker-style-name="T126"><text:span text:style-name="T127">將內網切成多個獨立小區段，各區設存取控制；攻破一段也無法橫向擴散</text:span><text:span text:style-name="T126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26"><text:span text:style-name="T179">④ Continuous Monitoring </text:span><text:span text:style-name="T127">持續監控</text:span></text:p>
          </table:table-cell>
          <table:table-cell table:style-name="表格141.A3" office:value-type="string">
            <text:p text:style-name="P29" loext:marker-style-name="T126"><text:span text:style-name="T127">全天候分析行為，異常立即警示（如半夜大量下載、短時間多國登入、刪大量日誌）</text:span><text:span text:style-name="T12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6"><text:span text:style-name="T196">🔥 <text:s/></text:span><text:span text:style-name="T200">考前 </text:span><text:span text:style-name="T210">10 </text:span><text:span text:style-name="T200">秒超濃縮</text:span></text:p>
            <text:p text:style-name="P7" loext:marker-style-name="T98"><text:span text:style-name="T155">ZT </text:span><text:span text:style-name="T97">核心：不信任任何人（含內網）；檢查三件事——人（</text:span><text:span text:style-name="T155">Identity</text:span><text:span text:style-name="T97">）、機（</text:span><text:span text:style-name="T155">Device</text:span><text:span text:style-name="T97">）、境（</text:span><text:span text:style-name="T155">Context</text:span><text:span text:style-name="T97">）；搭配四招——</text:span><text:span text:style-name="T155">MFA </text:span><text:span text:style-name="T97">＋ 最小權限 ＋ 微分段 ＋ 持續監控。</text:span></text:p>
            <text:p text:style-name="P8" loext:marker-style-name="T98"><text:span text:style-name="T97">口訣：人機境，多驗、少給、切塊、一直看。</text:span><text:span text:style-name="T98"/></text:p>
          </table:table-cell>
          <table:covered-table-cell/>
        </table:table-row>
      </table:table>
      <text:h text:style-name="P12" text:outline-level="3"><text:span text:style-name="T198">▍</text:span><text:span text:style-name="T199"> Zero Trust </text:span><text:span text:style-name="T200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" loext:marker-style-name="T73"><text:span text:style-name="T79">Step</text:span><text:span text:style-name="T73"/></text:p>
            </table:table-cell>
            <table:table-cell table:style-name="表格142.A1" office:value-type="string">
              <text:p text:style-name="P4" loext:marker-style-name="T73"><text:span text:style-name="T74">動作</text:span><text:span text:style-name="T73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9" loext:marker-style-name="T126"><text:span text:style-name="T179">1 </text:span><text:span text:style-name="T127">發出存取請求</text:span></text:p>
          </table:table-cell>
          <table:table-cell table:style-name="表格142.A2" office:value-type="string">
            <text:p text:style-name="P29" loext:marker-style-name="T126"><text:span text:style-name="T127">使用者或設備嘗試存取某資源（系統 </text:span><text:span text:style-name="T179">/ </text:span><text:span text:style-name="T127">檔案 </text:span><text:span text:style-name="T179">/ </text:span><text:span text:style-name="T127">資料庫）</text:span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26"><text:span text:style-name="T179">2 </text:span><text:span text:style-name="T127">身份驗證 </text:span><text:span text:style-name="T179">Identity</text:span></text:p>
          </table:table-cell>
          <table:table-cell table:style-name="表格142.A3" office:value-type="string">
            <text:p text:style-name="P29" loext:marker-style-name="T126"><text:span text:style-name="T127">確認身份：帳密 </text:span><text:span text:style-name="T179">+ MFA </text:span><text:span text:style-name="T127">驗證通過</text:span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26"><text:span text:style-name="T179">3 </text:span><text:span text:style-name="T127">設備驗證 </text:span><text:span text:style-name="T179">Device</text:span></text:p>
          </table:table-cell>
          <table:table-cell table:style-name="表格142.A2" office:value-type="string">
            <text:p text:style-name="P29" loext:marker-style-name="T126"><text:span text:style-name="T127">檢查設備健康：防毒、更新、合規性符合要求</text:span><text:span text:style-name="T126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26"><text:span text:style-name="T179">4 </text:span><text:span text:style-name="T127">情境評估 </text:span><text:span text:style-name="T179">Context</text:span></text:p>
          </table:table-cell>
          <table:table-cell table:style-name="表格142.A3" office:value-type="string">
            <text:p text:style-name="P29" loext:marker-style-name="T126"><text:span text:style-name="T127">分析存取時間、地點、行為模式，計算風險分數</text:span><text:span text:style-name="T126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26"><text:span text:style-name="T179">5 </text:span><text:span text:style-name="T127">權限比對</text:span></text:p>
          </table:table-cell>
          <table:table-cell table:style-name="表格142.A2" office:value-type="string">
            <text:p text:style-name="P29" loext:marker-style-name="T126"><text:span text:style-name="T127">依最小權限原則，確認是否有權存取該資源</text:span><text:span text:style-name="T126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26"><text:span text:style-name="T179">6 </text:span><text:span text:style-name="T127">授權或拒絕</text:span></text:p>
          </table:table-cell>
          <table:table-cell table:style-name="表格142.A3" office:value-type="string">
            <text:p text:style-name="P29" loext:marker-style-name="T126"><text:span text:style-name="T127">風險低且權限符合 → 授權；否則 → 要求補充驗證或拒絕</text:span><text:span text:style-name="T126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26"><text:span text:style-name="T179">7 </text:span><text:span text:style-name="T127">持續監控</text:span></text:p>
          </table:table-cell>
          <table:table-cell table:style-name="表格142.A2" office:value-type="string">
            <text:p text:style-name="P29" loext:marker-style-name="T126"><text:span text:style-name="T127">授權後全程監控行為，發現異常立即告警或中斷連線</text:span><text:span text:style-name="T12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6"><text:span text:style-name="T196">⚠️ <text:s/></text:span><text:span text:style-name="T218">公職考試陷阱整理</text:span></text:p>
            <text:p text:style-name="P7"><text:span text:style-name="T164">ZT = </text:span><text:span text:style-name="T109">完全不相信員工？　</text:span><text:span text:style-name="T97">✗ 重點是「每次都驗證」，驗證通過員工仍可正常使用，只是不再預設信任。</text:span></text:p>
            <text:p text:style-name="P8"><text:soft-page-break/><text:span text:style-name="T109">只有外網才危險？　</text:span><text:span text:style-name="T97">✗ 內網也可能：帳號被盜、設備中毒、內部人員惡意操作，故內網也須驗證。</text:span></text:p>
            <text:p text:style-name="P8"><text:span text:style-name="T109">登入一次後就永久可信？　</text:span><text:span text:style-name="T97">✗ 持續驗證，單次登入不代表長期信任，高風險行為會觸發重新驗證。</text:span></text:p>
            <text:p text:style-name="P8"><text:span text:style-name="T164">Zero Trust </text:span><text:span text:style-name="T109">重視網路位置？（超常考）　</text:span><text:span text:style-name="T97">✗ 完全相反！重點從「位置」轉移到「身份 </text:span><text:span text:style-name="T155">/ </text:span><text:span text:style-name="T97">設備 </text:span><text:span text:style-name="T155">/ </text:span><text:span text:style-name="T97">情境」。</text:span></text:p>
          </table:table-cell>
          <table:covered-table-cell/>
        </table:table-row>
      </table:table>
      <text:h text:style-name="P17" text:outline-level="1" loext:marker-style-name="T69"><text:span text:style-name="T70">結語　</text:span><text:span text:style-name="T69">·</text:span><text:span text:style-name="T70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6"><text:span text:style-name="T196">✅ <text:s/></text:span><text:span text:style-name="T200">你已經完成一輪</text:span></text:p>
            <text:p text:style-name="P7" loext:marker-style-name="T98"><text:span text:style-name="T97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98"/></text:p>
          </table:table-cell>
        </table:table-row>
        <table:table-row table:style-name="表格143.1">
          <table:table-cell table:style-name="表格143.A2" office:value-type="string">
            <text:p text:style-name="P6"><text:span text:style-name="T196">🎯 <text:s/></text:span><text:span text:style-name="T250">五個高頻拿分重點</text:span></text:p>
            <text:p text:style-name="P7" loext:marker-style-name="T98"><text:span text:style-name="T155">① </text:span><text:span text:style-name="T97">分層先記責任：應用給人用、傳輸怎麼送、網路走哪條、連結同區網。</text:span></text:p>
            <text:p text:style-name="P8" loext:marker-style-name="T98"><text:span text:style-name="T155">② </text:span><text:span text:style-name="T97">計算題動手練：</text:span><text:span text:style-name="T155">VLSM</text:span><text:span text:style-name="T97">「需求</text:span><text:span text:style-name="T155">+2→</text:span><text:span text:style-name="T97">最小 </text:span><text:span text:style-name="T155">2ⁿ→/(32−n)</text:span><text:span text:style-name="T97">」、可用主機「</text:span><text:span text:style-name="T155">2^</text:span><text:span text:style-name="T97">主機</text:span><text:span text:style-name="T155">bit −2</text:span><text:span text:style-name="T97">」。</text:span></text:p>
            <text:p text:style-name="P8" loext:marker-style-name="T98"><text:span text:style-name="T155">③ </text:span><text:span text:style-name="T97">流程要會串：上網＝</text:span><text:span text:style-name="T155">DNS→ARP→NAT</text:span><text:span text:style-name="T97">；</text:span><text:span text:style-name="T155">TCP</text:span><text:span text:style-name="T97">＝握手→</text:span><text:span text:style-name="T155">Slow Start→CA→</text:span><text:span text:style-name="T97">丟包降速。</text:span></text:p>
            <text:p text:style-name="P8" loext:marker-style-name="T98"><text:span text:style-name="T155">④ </text:span><text:span text:style-name="T97">易混成對背：</text:span><text:span text:style-name="T155">FW/WAF/NGFW</text:span><text:span text:style-name="T97">、</text:span><text:span text:style-name="T155">IDS/IPS</text:span><text:span text:style-name="T97">、</text:span><text:span text:style-name="T155">HIDS/NIDS</text:span><text:span text:style-name="T97">、</text:span><text:span text:style-name="T155">SNMP/ICMP</text:span><text:span text:style-name="T97">、</text:span><text:span text:style-name="T155">EDR/MDR</text:span><text:span text:style-name="T97">、</text:span><text:span text:style-name="T155">RTO/RPO</text:span><text:span text:style-name="T97">、</text:span><text:span text:style-name="T155">Recursive/Iterative</text:span><text:span text:style-name="T97">。</text:span></text:p>
            <text:p text:style-name="P8" loext:marker-style-name="T98"><text:span text:style-name="T155">⑤ </text:span><text:span text:style-name="T97">陷阱反著記：</text:span><text:span text:style-name="T155">ARP </text:span><text:span text:style-name="T97">找路由器不是 </text:span><text:span text:style-name="T155">Google</text:span><text:span text:style-name="T97">、</text:span><text:span text:style-name="T155">BGP </text:span><text:span text:style-name="T97">政策不是距離、</text:span><text:span text:style-name="T155">WiFi </text:span><text:span text:style-name="T97">是 </text:span><text:span text:style-name="T155">CA </text:span><text:span text:style-name="T97">不是 </text:span><text:span text:style-name="T155">CD</text:span><text:span text:style-name="T97">、</text:span><text:span text:style-name="T155">IOC </text:span><text:span text:style-name="T97">是事後不是預測、</text:span><text:span text:style-name="T155">Zero Trust </text:span><text:span text:style-name="T97">看身份不看位置。</text:span></text:p>
          </table:table-cell>
        </table:table-row>
      </table:table>
      <text:p text:style-name="P25" loext:marker-style-name="T58"><text:span text:style-name="T59">祝　金榜題名　</text:span><text:span text:style-name="T66">·</text:span><text:span text:style-name="T59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36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7T08:07:12.817000000</dc:date>
    <meta:editing-cycles>370</meta:editing-cycles>
    <dc:title>網路概論與資訊安全 完整整合筆記</dc:title>
    <meta:editing-duration>P2DT8H57M</meta:editing-duration>
    <meta:generator>MODA_ODF_Application_Tools/3.8.4.2$Windows_X86_64 LibreOffice_project/4fb77107d5af14329e08085efe4fa19b5633383a</meta:generator>
    <meta:document-statistic meta:table-count="143" meta:image-count="0" meta:object-count="0" meta:page-count="52" meta:paragraph-count="2302" meta:word-count="30573" meta:character-count="48380" meta:non-whitespace-character-count="43629"/>
    <meta:user-defined meta:name="AppVersion">15.0000</meta:user-defined>
  </office:meta>
</office:document-meta>
</file>