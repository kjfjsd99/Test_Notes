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4" style:family="paragraph" style:parent-style-name="Standard">
      <style:paragraph-properties fo:margin-top="2.822cm" fo:margin-bottom="0cm" style:contextual-spacing="false"/>
    </style:style>
    <style:style style:name="P5" style:family="paragraph" style:parent-style-name="Standard">
      <style:paragraph-properties fo:margin-top="0cm" fo:margin-bottom="0.388cm" style:contextual-spacing="false"/>
    </style:style>
    <style:style style:name="P6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7" style:family="paragraph" style:parent-style-name="Standard">
      <style:paragraph-properties fo:margin-top="0cm" fo:margin-bottom="0.353cm" style:contextual-spacing="false"/>
    </style:style>
    <style:style style:name="P8" style:family="paragraph" style:parent-style-name="Standard">
      <style:paragraph-properties fo:margin-top="0.035cm" fo:margin-bottom="0.106cm" style:contextual-spacing="false" fo:line-height="0.459cm"/>
    </style:style>
    <style:style style:name="P9" style:family="paragraph" style:parent-style-name="Standard">
      <style:paragraph-properties fo:margin-top="0cm" fo:margin-bottom="0.042cm" style:contextual-spacing="false" fo:line-height="0.455cm"/>
    </style:style>
    <style:style style:name="P10" style:family="paragraph" style:parent-style-name="Standard">
      <style:paragraph-properties fo:margin-top="0.042cm" fo:margin-bottom="0.042cm" style:contextual-spacing="false" fo:line-height="0.455cm"/>
    </style:style>
    <style:style style:name="P11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4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6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P17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18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19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20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P22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23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25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26" style:family="paragraph" style:parent-style-name="Standard">
      <style:paragraph-properties fo:margin-top="0.042cm" fo:margin-bottom="0.042cm" style:contextual-spacing="false" fo:line-height="0.455cm"/>
    </style:style>
    <style:style style:name="P27" style:family="paragraph" style:parent-style-name="Standard">
      <style:paragraph-properties fo:margin-top="0cm" fo:margin-bottom="0.042cm" style:contextual-spacing="false" fo:line-height="0.455cm"/>
    </style:style>
    <style:style style:name="P28" style:family="paragraph" style:parent-style-name="Standard">
      <style:paragraph-properties fo:margin-top="0cm" fo:margin-bottom="0.212cm" style:contextual-spacing="false" fo:break-before="page"/>
    </style:style>
    <style:style style:name="P29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0" style:family="paragraph" style:parent-style-name="Standard">
      <style:paragraph-properties fo:margin-top="0.035cm" fo:margin-bottom="0.106cm" style:contextual-spacing="false" fo:line-height="0.459cm"/>
    </style:style>
    <style:style style:name="P31" style:family="paragraph" style:parent-style-name="Standard">
      <style:paragraph-properties fo:margin-top="0.071cm" fo:margin-bottom="0.106cm" style:contextual-spacing="false" fo:line-height="0.466cm" fo:text-align="start" style:justify-single-word="false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T3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4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5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6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7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8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9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10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style style:name="T14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16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7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8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1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20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22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3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4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8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29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0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1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4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5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6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7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38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43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44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45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46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47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48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4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6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57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5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59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60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1f3a5c" loext:opacity="100%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64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5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68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6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0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1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2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3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74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75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7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8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9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0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1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2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3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4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6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6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7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8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9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2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3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4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5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6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7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08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09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10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11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12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3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4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20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21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22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23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4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5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6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7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8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9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0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1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2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3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4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7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8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0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1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42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3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44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45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46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47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48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49" style:family="text">
      <style:text-properties fo:color="#2b2b2b" loext:opacity="100%" style:font-name="OpenSymbol" fo:font-size="10.5pt" fo:font-style="normal" fo:font-weight="normal" style:font-name-asian="OpenSymbol1" style:font-size-asian="10.5pt" style:font-style-asian="normal" style:font-weight-asian="normal" style:font-name-complex="OpenSymbol1" style:font-size-complex="10.5pt" style:font-style-complex="normal" style:font-weight-complex="normal"/>
    </style:style>
    <style:style style:name="T150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51" style:family="text">
      <style:text-properties fo:font-size="11pt" style:font-name-asian="Microsoft JhengHei2" style:font-size-asian="11pt" style:font-name-complex="Microsoft JhengHei2" style:font-size-complex="11pt"/>
    </style:style>
    <style:style style:name="T152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153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154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5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56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157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158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62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63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64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65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7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3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74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5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79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0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1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2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83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6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7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88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0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91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92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3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4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95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96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7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98" style:family="text">
      <style:text-properties fo:color="#2f7a4d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99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00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01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02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3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08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12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13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4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16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17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18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19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0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1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2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3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4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5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6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7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8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29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30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31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32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33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34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35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36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1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246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247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8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6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57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5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9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0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1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2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4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5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66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67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6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71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72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73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4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5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9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0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1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2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85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8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7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8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9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2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3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4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5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7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8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2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4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5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6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7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8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9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0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2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3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4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5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16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17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8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9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0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5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6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27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8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9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3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4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5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8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39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4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0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1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2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3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4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5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6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7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2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4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5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6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7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8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9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0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1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6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2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3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4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5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6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7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8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9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0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1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2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3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4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5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398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399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00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1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2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3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4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6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7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8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9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0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1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2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13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14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5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6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7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1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2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3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4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5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6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7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5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6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7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8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0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45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6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0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7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8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9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0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1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2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3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4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5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6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7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68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2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3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4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5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9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8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3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5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6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7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0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1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2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97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98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9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2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3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5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6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8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9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0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1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2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3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4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5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6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7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9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0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1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2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3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4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5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6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7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8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7" loext:marker-style-name="T22"><text:span text:style-name="T21">公職考試 </text:span><text:span text:style-name="T37">· </text:span><text:span text:style-name="T21">資訊類</text:span></text:p>
      <text:p text:style-name="P18" loext:marker-style-name="T43"><text:span text:style-name="T42">網路概論 與 資訊安全</text:span><text:span text:style-name="T43"/></text:p>
      <text:p text:style-name="P19" loext:marker-style-name="T45"><text:span text:style-name="T44">完整整合筆記 </text:span><text:span text:style-name="T58">· </text:span><text:span text:style-name="T44">最終版</text:span></text:p>
      <text:p text:style-name="P20" loext:marker-style-name="T4"><text:span text:style-name="T14">OSI / TCP/IP ‧ IP </text:span><text:span text:style-name="T3">子網 ‧ </text:span><text:span text:style-name="T14">IPv6 ‧ ARP/NAT ‧ TCP ‧ DNS ‧ </text:span><text:span text:style-name="T3">路由 ‧ </text:span><text:span text:style-name="T14">SDN/CDN/5G ‧ </text:span><text:span text:style-name="T3">無線 ‧ 資安全攻防</text:span></text:p>
      <text:p text:style-name="P5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22" loext:marker-style-name="T66"><text:span text:style-name="T65">涵蓋十大主題</text:span><text:span text:style-name="T66"/></text:p>
            </table:table-cell>
            <table:table-cell table:style-name="表格1.A1" office:value-type="string">
              <text:p text:style-name="P22" loext:marker-style-name="T66"><text:span text:style-name="T65">前置速記</text:span><text:span text:style-name="T66"/></text:p>
            </table:table-cell>
            <table:table-cell table:style-name="表格1.A1" office:value-type="string">
              <text:p text:style-name="P22" loext:marker-style-name="T66"><text:span text:style-name="T65">全程對照</text:span><text:span text:style-name="T66"/></text:p>
            </table:table-cell>
            <table:table-cell table:style-name="表格1.A1" office:value-type="string">
              <text:p text:style-name="P22" loext:marker-style-name="T66"><text:span text:style-name="T65">考試導向</text:span><text:span text:style-name="T66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24" loext:marker-style-name="T80"><text:span text:style-name="T79">十篇章節</text:span><text:span text:style-name="T80"/></text:p>
          </table:table-cell>
          <table:table-cell table:style-name="表格1.A2" office:value-type="string">
            <text:p text:style-name="P24" loext:marker-style-name="T80"><text:span text:style-name="T79">口訣 </text:span><text:span text:style-name="T121">+ </text:span><text:span text:style-name="T79">表格</text:span></text:p>
          </table:table-cell>
          <table:table-cell table:style-name="表格1.A2" office:value-type="string">
            <text:p text:style-name="P24" loext:marker-style-name="T80"><text:span text:style-name="T79">陷阱 </text:span><text:span text:style-name="T121">+ </text:span><text:span text:style-name="T79">正解</text:span></text:p>
          </table:table-cell>
          <table:table-cell table:style-name="表格1.A2" office:value-type="string">
            <text:p text:style-name="P24" loext:marker-style-name="T80"><text:span text:style-name="T79">申論 </text:span><text:span text:style-name="T121">+ </text:span><text:span text:style-name="T79">選擇</text:span></text:p>
          </table:table-cell>
        </table:table-row>
      </table:table>
      <text:p text:style-name="P7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8"><text:span text:style-name="T151">📖 <text:s/></text:span><text:span text:style-name="T23">讀這份筆記的方法</text:span></text:p>
            <text:p text:style-name="P9"><text:span text:style-name="T24">使用方式：</text:span><text:span text:style-name="T95">第〇篇「考前速記總表」收錄全書所有口訣與必背表格，考前衝刺只看這篇即可；</text:span></text:p>
            <text:p text:style-name="P10" loext:marker-style-name="T96"><text:span text:style-name="T95">第一～十篇為完整詳解，建立觀念與申論寫法時閱讀。每篇皆附「常見陷阱」與「考試標準答案」。</text:span><text:span text:style-name="T96"/></text:p>
          </table:table-cell>
        </table:table-row>
      </table:table>
      <text:p text:style-name="P28" loext:marker-style-name="T47"><text:span text:style-name="T46">目　錄</text:span><text:span text:style-name="T47"/></text:p>
      <text:p text:style-name="P29" loext:marker-style-name="T5"><text:span text:style-name="T15">Table of Contents</text:span><text:span text:style-name="T5"/></text:p>
      <text:p text:style-name="P11"><text:span text:style-name="T23">第 〇 篇　考前速記總表 — 口訣 </text:span><text:span text:style-name="T38">× </text:span><text:span text:style-name="T23">必背表格</text:span><text:span text:style-name="T18"><text:tab/>3</text:span></text:p>
      <text:p text:style-name="P11"><text:span text:style-name="T9">　　</text:span><text:span text:style-name="T19">Part A</text:span><text:span text:style-name="T9">　口訣大全（依主題分類）</text:span><text:span text:style-name="T18"><text:tab/>3</text:span></text:p>
      <text:p text:style-name="P11"><text:span text:style-name="T9">　　</text:span><text:span text:style-name="T19">Part B</text:span><text:span text:style-name="T9">　必背表格精選</text:span><text:span text:style-name="T18"><text:tab/>5</text:span></text:p>
      <text:p text:style-name="P12"><text:span text:style-name="T48">第 一 篇　網路基礎架構：</text:span><text:span text:style-name="T59">OSI / TCP-IP · </text:span><text:span text:style-name="T48">協定 </text:span><text:span text:style-name="T59">· ARP · Traceroute</text:span><text:span text:style-name="T18"><text:tab/>9</text:span></text:p>
      <text:p text:style-name="P11"><text:span text:style-name="T48">第 二 篇　</text:span><text:span text:style-name="T59">IP </text:span><text:span text:style-name="T48">位址與封包處理：分類 </text:span><text:span text:style-name="T59">· CIDR · VLSM · Fragmentation</text:span><text:span text:style-name="T18"><text:tab/>13</text:span></text:p>
      <text:p text:style-name="P11"><text:span text:style-name="T48">第 三 篇　</text:span><text:span text:style-name="T59">IPv4 → IPv6 </text:span><text:span text:style-name="T48">過渡技術</text:span><text:span text:style-name="T18"><text:tab/>19</text:span></text:p>
      <text:p text:style-name="P11"><text:span text:style-name="T48">第 四 篇　</text:span><text:span text:style-name="T59">ARP</text:span><text:span text:style-name="T48">、</text:span><text:span text:style-name="T59">NAT </text:span><text:span text:style-name="T48">與完整上網流程</text:span><text:span text:style-name="T18"><text:tab/>21</text:span></text:p>
      <text:p text:style-name="P11"><text:span text:style-name="T48">第 五 篇　</text:span><text:span text:style-name="T59">TCP </text:span><text:span text:style-name="T48">傳輸控制深入</text:span><text:span text:style-name="T18"><text:tab/>24</text:span></text:p>
      <text:p text:style-name="P11"><text:span text:style-name="T48">第 六 篇　</text:span><text:span text:style-name="T59">DNS </text:span><text:span text:style-name="T48">與 </text:span><text:span text:style-name="T59">DNSSEC</text:span><text:span text:style-name="T18"><text:tab/>28</text:span></text:p>
      <text:p text:style-name="P11"><text:span text:style-name="T48">第 七 篇　路由協定：</text:span><text:span text:style-name="T59">OSPF </text:span><text:span text:style-name="T48">與 </text:span><text:span text:style-name="T59">BGP</text:span><text:span text:style-name="T18"><text:tab/>31</text:span></text:p>
      <text:p text:style-name="P11"><text:span text:style-name="T48">第 八 篇　網路系統進階：</text:span><text:span text:style-name="T59">SDN · LB · CDN · 5G</text:span><text:span text:style-name="T18"><text:tab/>34</text:span></text:p>
      <text:p text:style-name="P11"><text:span text:style-name="T48">第 九 篇　無線通訊：</text:span><text:span text:style-name="T59">WiFi vs Bluetooth</text:span><text:span text:style-name="T18"><text:tab/>37</text:span></text:p>
      <text:p text:style-name="P11"><text:span text:style-name="T48">第 十 篇　資訊安全：設備 </text:span><text:span text:style-name="T59">· </text:span><text:span text:style-name="T48">攻防 </text:span><text:span text:style-name="T59">· </text:span><text:span text:style-name="T48">企業資安 </text:span><text:span text:style-name="T59">· Zero Trust</text:span><text:span text:style-name="T18"><text:tab/>40</text:span></text:p>
      <text:p text:style-name="P12"><text:span text:style-name="T23">結　語　考前最後叮嚀</text:span><text:span text:style-name="T18"><text:tab/>51</text:span></text:p>
      <text:h text:style-name="P13" text:outline-level="1" loext:marker-style-name="T68"><text:span text:style-name="T67">第 〇 篇　考前速記總表 — 口訣 </text:span><text:span text:style-name="T68">× </text:span><text:span text:style-name="T67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"><text:span text:style-name="T151">⚡ <text:s/></text:span><text:span text:style-name="T48">本篇用途</text:span></text:p>
            <text:p text:style-name="P9" loext:marker-style-name="T96"><text:span text:style-name="T95">這一篇把全書最關鍵的「記憶口訣」與「必背表格」依主題集中，方便考前快速複習；每一條後方括號為對應的詳解篇章。</text:span><text:span text:style-name="T96"/></text:p>
          </table:table-cell>
        </table:table-row>
      </table:table>
      <text:h text:style-name="P3" text:outline-level="2" loext:marker-style-name="T27"><text:span text:style-name="T27">Part A</text:span><text:span text:style-name="T28">　口訣大全（依主題分類）</text:span></text:h>
      <text:h text:style-name="P2" text:outline-level="3"><text:span text:style-name="T153">▍</text:span><text:span text:style-name="T154"> </text:span><text:span text:style-name="T155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8" loext:marker-style-name="T154"><text:span text:style-name="T165">🔑 </text:span><text:span text:style-name="T155">口訣</text:span></text:p>
            <text:p text:style-name="P9"><text:span text:style-name="T166">TCP/IP </text:span><text:span text:style-name="T158">四層心法：</text:span><text:span text:style-name="T95">應用層→給人用（</text:span><text:span text:style-name="T129">HTTP/DNS/DHCP/SSH/MQTT</text:span><text:span text:style-name="T95">）｜傳輸層→怎麼送（</text:span><text:span text:style-name="T129">TCP </text:span><text:span text:style-name="T95">穩、</text:span><text:span text:style-name="T129">UDP </text:span><text:span text:style-name="T95">快）｜網路層→走哪條路（</text:span><text:span text:style-name="T129">IP/ICMP</text:span><text:span text:style-name="T95">）｜連結層→同一區網怎麼接（</text:span><text:span text:style-name="T129">Ethernet/ARP</text:span><text:span text:style-name="T95">）</text:span></text:p>
            <text:p text:style-name="P10"><text:span text:style-name="T166">OSI vs TCP/IP</text:span><text:span text:style-name="T158">：</text:span><text:span text:style-name="T129">OSI 7 </text:span><text:span text:style-name="T95">層（理論）、</text:span><text:span text:style-name="T129">TCP/IP 4 </text:span><text:span text:style-name="T95">層（實際）；差別在 </text:span><text:span text:style-name="T129">TCP/IP </text:span><text:span text:style-name="T95">把 </text:span><text:span text:style-name="T129">Session</text:span><text:span text:style-name="T95">＋</text:span><text:span text:style-name="T129">Presentation </text:span><text:span text:style-name="T95">併入 </text:span><text:span text:style-name="T129">Application</text:span><text:span text:style-name="T95">。</text:span></text:p>
            <text:p text:style-name="P10"><text:span text:style-name="T166">TCP vs UDP</text:span><text:span text:style-name="T158">：</text:span><text:span text:style-name="T129">TCP</text:span><text:span text:style-name="T95">「穩定優先」（保證送達、會重傳）；</text:span><text:span text:style-name="T129">UDP</text:span><text:span text:style-name="T95">「速度優先」（不保證、不重傳）。</text:span></text:p>
            <text:p text:style-name="P10"><text:span text:style-name="T158">三件事：</text:span><text:span text:style-name="T129">IP→</text:span><text:span text:style-name="T95">定位（目的地是誰）｜</text:span><text:span text:style-name="T129">Routing→</text:span><text:span text:style-name="T95">選路（怎麼走最快）｜</text:span><text:span text:style-name="T129">ICMP→</text:span><text:span text:style-name="T95">回報（出錯通知你）。</text:span></text:p>
            <text:p text:style-name="P10"><text:span text:style-name="T166">Traceroute</text:span><text:span text:style-name="T158">＝</text:span><text:span text:style-name="T129">TTL </text:span><text:span text:style-name="T95">遞增 ＋ </text:span><text:span text:style-name="T129">ICMP </text:span><text:span text:style-name="T95">回報，逐步「炸出」完整路徑。</text:span></text:p>
            <text:p text:style-name="P10"><text:span text:style-name="T166">ARP</text:span><text:span text:style-name="T158">＝</text:span><text:span text:style-name="T95">用 </text:span><text:span text:style-name="T129">IP </text:span><text:span text:style-name="T95">找 </text:span><text:span text:style-name="T129">MAC</text:span><text:span text:style-name="T95">，只在同一個 </text:span><text:span text:style-name="T129">LAN </text:span><text:span text:style-name="T95">內使用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二、</text:span><text:span text:style-name="T154">IP </text:span><text:span text:style-name="T155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8" loext:marker-style-name="T154"><text:span text:style-name="T165">🔑 </text:span><text:span text:style-name="T155">口訣</text:span></text:p>
            <text:p text:style-name="P9"><text:span text:style-name="T166">VLSM </text:span><text:span text:style-name="T158">黃金公式：</text:span><text:span text:style-name="T95">需求 ＋</text:span><text:span text:style-name="T129">2 → </text:span><text:span text:style-name="T95">找最小 </text:span><text:span text:style-name="T129">2ⁿ → </text:span><text:span text:style-name="T95">前綴 </text:span><text:span text:style-name="T129">/(32−n)</text:span><text:span text:style-name="T95">。</text:span></text:p>
            <text:p text:style-name="P10"><text:span text:style-name="T158">可用主機數：</text:span><text:span text:style-name="T129">2^(</text:span><text:span text:style-name="T95">主機 </text:span><text:span text:style-name="T129">bit) − 2</text:span><text:span text:style-name="T95">（扣掉網路位址與廣播位址）。</text:span></text:p>
            <text:p text:style-name="P10"><text:span text:style-name="T166">CIDR </text:span><text:span text:style-name="T158">合併：</text:span><text:span text:style-name="T95">連續 ＋ 數量 </text:span><text:span text:style-name="T129">2ⁿ </text:span><text:span text:style-name="T95">＋ 起點對齊 → 合併 </text:span><text:span text:style-name="T129">2ⁿ </text:span><text:span text:style-name="T95">個子網則「前綴減 </text:span><text:span text:style-name="T129">n</text:span><text:span text:style-name="T95">」。</text:span></text:p>
            <text:p text:style-name="P10"><text:span text:style-name="T158">前綴速背：</text:span><text:span text:style-name="T129">/25=126</text:span><text:span text:style-name="T95">、</text:span><text:span text:style-name="T129">/26=62</text:span><text:span text:style-name="T95">、</text:span><text:span text:style-name="T129">/27=30</text:span><text:span text:style-name="T95">、</text:span><text:span text:style-name="T129">/28=14</text:span><text:span text:style-name="T95">、</text:span><text:span text:style-name="T129">/29=6</text:span><text:span text:style-name="T95">、</text:span><text:span text:style-name="T129">/30=2</text:span><text:span text:style-name="T95">。</text:span></text:p>
            <text:p text:style-name="P10"><text:span text:style-name="T158">封包切割：</text:span><text:span text:style-name="T95">封包 </text:span><text:span text:style-name="T129">&gt; MTU </text:span><text:span text:style-name="T95">就切（</text:span><text:span text:style-name="T129">Fragmentation</text:span><text:span text:style-name="T95">）；</text:span><text:span text:style-name="T129">Fragment Offset </text:span><text:span text:style-name="T95">＝ 起始位置 </text:span><text:span text:style-name="T129">÷ 8</text:span><text:span text:style-name="T95">。</text:span></text:p>
            <text:p text:style-name="P10"><text:span text:style-name="T158">誰能切：</text:span><text:span text:style-name="T129">IPv4</text:span><text:span text:style-name="T95">＝</text:span><text:span text:style-name="T129">Router </text:span><text:span text:style-name="T95">或 </text:span><text:span text:style-name="T129">Source </text:span><text:span text:style-name="T95">可切；</text:span><text:span text:style-name="T129">IPv6</text:span><text:span text:style-name="T95">＝只有 </text:span><text:span text:style-name="T129">Source </text:span><text:span text:style-name="T95">切，必搭 </text:span><text:span text:style-name="T129">PMTUD</text:span><text:span text:style-name="T95">。</text:span></text:p>
            <text:p text:style-name="P10"><text:span text:style-name="T166">Protocol </text:span><text:span text:style-name="T158">值：</text:span><text:span text:style-name="T129">ICMP=1</text:span><text:span text:style-name="T95">、</text:span><text:span text:style-name="T129">TCP=6</text:span><text:span text:style-name="T95">、</text:span><text:span text:style-name="T129">UDP=17</text:span><text:span text:style-name="T95">｜</text:span><text:span text:style-name="T129">DF=1 </text:span><text:span text:style-name="T95">禁止切、</text:span><text:span text:style-name="T129">MF=1 </text:span><text:span text:style-name="T95">後面還有分段｜</text:span><text:span text:style-name="T129">MSS</text:span><text:span text:style-name="T95">＝</text:span><text:span text:style-name="T129">MTU−20−20</text:span><text:span text:style-name="T95">＝</text:span><text:span text:style-name="T129">1460</text:span><text:span text:style-name="T95">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三、</text:span><text:span text:style-name="T154">IPv4 → IPv6</text:span><text:span text:style-name="T155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8" loext:marker-style-name="T154"><text:span text:style-name="T165">🔑 </text:span><text:span text:style-name="T155">口訣</text:span></text:p>
            <text:p text:style-name="P9"><text:span text:style-name="T166">IPv6 </text:span><text:span text:style-name="T158">特點：</text:span><text:span text:style-name="T95">大（</text:span><text:span text:style-name="T129">128 bit</text:span><text:span text:style-name="T95">）＋ 安全（</text:span><text:span text:style-name="T129">IPsec</text:span><text:span text:style-name="T95">）＋ 快（固定 </text:span><text:span text:style-name="T129">Header</text:span><text:span text:style-name="T95">）＋ 自動（</text:span><text:span text:style-name="T129">SLAAC</text:span><text:span text:style-name="T95">）＋ 乾淨（無 </text:span><text:span text:style-name="T129">Broadcast</text:span><text:span text:style-name="T95">）。</text:span></text:p>
            <text:p text:style-name="P10"><text:span text:style-name="T158">三種過渡技術：</text:span><text:span text:style-name="T95">雙語（</text:span><text:span text:style-name="T129">Dual Stack</text:span><text:span text:style-name="T95">）＋ 偽裝（</text:span><text:span text:style-name="T129">Tunneling</text:span><text:span text:style-name="T95">）＋ 翻譯（</text:span><text:span text:style-name="T129">Translation</text:span><text:span text:style-name="T95">）。</text:span></text:p>
            <text:p text:style-name="P10"><text:span text:style-name="T158">生活比喻：</text:span><text:span text:style-name="T129">Dual Stack</text:span><text:span text:style-name="T95">＝同時會中英文；</text:span><text:span text:style-name="T129">Tunneling</text:span><text:span text:style-name="T95">＝英文信裝進中文信封偷渡；</text:span><text:span text:style-name="T129">Translation</text:span><text:span text:style-name="T95">＝現場請翻譯口譯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四、</text:span><text:span text:style-name="T154">ARP</text:span><text:span text:style-name="T155">、</text:span><text:span text:style-name="T154">NAT </text:span><text:span text:style-name="T155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 loext:marker-style-name="T154"><text:span text:style-name="T165">🔑 </text:span><text:span text:style-name="T155">口訣</text:span></text:p>
            <text:p text:style-name="P9"><text:span text:style-name="T158">上網流程：</text:span><text:span text:style-name="T129">DNS → ARP → L2 </text:span><text:span text:style-name="T95">封包 → </text:span><text:span text:style-name="T129">NAT</text:span><text:span text:style-name="T95">（去程）→ </text:span><text:span text:style-name="T129">Internet → NAT</text:span><text:span text:style-name="T95">（回程）→ 你。</text:span></text:p>
            <text:p text:style-name="P10"><text:span text:style-name="T158">核心觀念：</text:span><text:span text:style-name="T129">IP</text:span><text:span text:style-name="T95">＝最終目的地（全程不變）；</text:span><text:span text:style-name="T129">MAC</text:span><text:span text:style-name="T95">＝下一站（每跳更換）。</text:span></text:p>
            <text:p text:style-name="P10"><text:span text:style-name="T158">最大地雷：</text:span><text:span text:style-name="T129">ARP </text:span><text:span text:style-name="T95">找的是「路由器（預設閘道）」的 </text:span><text:span text:style-name="T129">MAC</text:span><text:span text:style-name="T95">，不是 </text:span><text:span text:style-name="T129">Google </text:span><text:span text:style-name="T95">的 </text:span><text:span text:style-name="T129">MAC</text:span><text:span text:style-name="T95">。</text:span></text:p>
            <text:p text:style-name="P10"><text:span text:style-name="T166">PAT</text:span><text:span text:style-name="T158">：</text:span><text:span text:style-name="T95">多台共用一個公網 </text:span><text:span text:style-name="T129">IP</text:span><text:span text:style-name="T95">，靠 </text:span><text:span text:style-name="T129">Port </text:span><text:span text:style-name="T95">號碼區分（最重要）。</text:span></text:p>
          </table:table-cell>
        </table:table-row>
      </table:table>
      <text:h text:style-name="P2" text:outline-level="3"><text:soft-page-break/><text:span text:style-name="T153">▍</text:span><text:span text:style-name="T154"> </text:span><text:span text:style-name="T155">五、</text:span><text:span text:style-name="T154">TCP </text:span><text:span text:style-name="T155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" loext:marker-style-name="T154"><text:span text:style-name="T165">🔑 </text:span><text:span text:style-name="T155">口訣</text:span></text:p>
            <text:p text:style-name="P9"><text:span text:style-name="T158">三次握手：</text:span><text:span text:style-name="T129">SYN → SYN</text:span><text:span text:style-name="T95">＋</text:span><text:span text:style-name="T129">ACK → ACK</text:span><text:span text:style-name="T95">，確認雙向都能通訊。</text:span></text:p>
            <text:p text:style-name="P10"><text:span text:style-name="T158">傳送量公式：</text:span><text:span text:style-name="T95">實際傳送量 ＝ </text:span><text:span text:style-name="T129">min(rwnd, cwnd)</text:span><text:span text:style-name="T95">。</text:span><text:span text:style-name="T129">rwnd</text:span><text:span text:style-name="T95">＝接收端限制、</text:span><text:span text:style-name="T129">cwnd</text:span><text:span text:style-name="T95">＝網路限制。</text:span></text:p>
            <text:p text:style-name="P10"><text:span text:style-name="T158">擁塞控制節奏：</text:span><text:span text:style-name="T129">Slow Start</text:span><text:span text:style-name="T95">（指數成長）→ </text:span><text:span text:style-name="T129">Congestion Avoidance</text:span><text:span text:style-name="T95">（線性成長）→ 丟包（減速）。</text:span></text:p>
            <text:p text:style-name="P10"><text:span text:style-name="T158">丟包處理：</text:span><text:span text:style-name="T129">Timeout → cwnd </text:span><text:span text:style-name="T95">重設為 </text:span><text:span text:style-name="T129">1 </text:span><text:span text:style-name="T95">回 </text:span><text:span text:style-name="T129">Slow Start</text:span><text:span text:style-name="T95">；</text:span><text:span text:style-name="T129">3 </text:span><text:span text:style-name="T95">個重複 </text:span><text:span text:style-name="T129">ACK → cwnd </text:span><text:span text:style-name="T95">減半續 </text:span><text:span text:style-name="T129">CA</text:span><text:span text:style-name="T95">。</text:span></text:p>
            <text:p text:style-name="P10"><text:span text:style-name="T166">AIMD</text:span><text:span text:style-name="T158">：</text:span><text:span text:style-name="T95">沒丟包 每 </text:span><text:span text:style-name="T129">RTT</text:span><text:span text:style-name="T95">＋</text:span><text:span text:style-name="T129">1</text:span><text:span text:style-name="T95">（加法增長）；丟包 </text:span><text:span text:style-name="T129">×0.5</text:span><text:span text:style-name="T95">（乘法減少）。</text:span></text:p>
            <text:p text:style-name="P10"><text:span text:style-name="T166">SYN Flood</text:span><text:span text:style-name="T158">：</text:span><text:span text:style-name="T95">大量半連線（</text:span><text:span text:style-name="T129">Half-open</text:span><text:span text:style-name="T95">）耗盡 </text:span><text:span text:style-name="T129">Server </text:span><text:span text:style-name="T95">資源 → </text:span><text:span text:style-name="T129">DoS</text:span><text:span text:style-name="T95">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六、</text:span><text:span text:style-name="T154">DNS </text:span><text:span text:style-name="T155">與 </text:span><text:span text:style-name="T154">DNSSEC</text:span><text:span text:style-name="T155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8" loext:marker-style-name="T154"><text:span text:style-name="T165">🔑 </text:span><text:span text:style-name="T155">口訣</text:span></text:p>
            <text:p text:style-name="P9"><text:span text:style-name="T158">查詢流程：</text:span><text:span text:style-name="T129">Cache → Local → Root → TLD → Authoritative → </text:span><text:span text:style-name="T95">取得 </text:span><text:span text:style-name="T129">IP</text:span><text:span text:style-name="T95">。</text:span></text:p>
            <text:p text:style-name="P10"><text:span text:style-name="T166">Recursive</text:span><text:span text:style-name="T158">：</text:span><text:span text:style-name="T95">「代查到底」（</text:span><text:span text:style-name="T129">DNS </text:span><text:span text:style-name="T95">幫你問完，你只問一次）。</text:span></text:p>
            <text:p text:style-name="P10"><text:span text:style-name="T166">Iterative</text:span><text:span text:style-name="T158">：</text:span><text:span text:style-name="T95">「逐層詢問」（你自己一層一層問）。</text:span></text:p>
            <text:p text:style-name="P10"><text:span text:style-name="T166">DNSSEC</text:span><text:span text:style-name="T158">：</text:span><text:span text:style-name="T95">驗證真偽，不是加密、不防 </text:span><text:span text:style-name="T129">DDoS</text:span><text:span text:style-name="T95">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七、路由協定 </text:span><text:span text:style-name="T154">OSPF / BGP</text:span><text:span text:style-name="T155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" loext:marker-style-name="T154"><text:span text:style-name="T165">🔑 </text:span><text:span text:style-name="T155">口訣</text:span></text:p>
            <text:p text:style-name="P9"><text:span text:style-name="T158">範圍分類：</text:span><text:span text:style-name="T95">公司／校園內 → </text:span><text:span text:style-name="T129">IGP</text:span><text:span text:style-name="T95">（</text:span><text:span text:style-name="T129">OSPF</text:span><text:span text:style-name="T95">、</text:span><text:span text:style-name="T129">RIP</text:span><text:span text:style-name="T95">）；公司與公司間 → </text:span><text:span text:style-name="T129">EGP</text:span><text:span text:style-name="T95">（</text:span><text:span text:style-name="T129">BGP</text:span><text:span text:style-name="T95">）。</text:span></text:p>
            <text:p text:style-name="P10"><text:span text:style-name="T166">OSPF </text:span><text:span text:style-name="T158">規定：</text:span><text:span text:style-name="T95">所有 </text:span><text:span text:style-name="T129">Area </text:span><text:span text:style-name="T95">一定要連到 </text:span><text:span text:style-name="T129">Area 0</text:span><text:span text:style-name="T95">（骨幹）才能互通。</text:span></text:p>
            <text:p text:style-name="P10"><text:span text:style-name="T166">OSPF </text:span><text:span text:style-name="T158">四種 </text:span><text:span text:style-name="T166">Router</text:span><text:span text:style-name="T158">：</text:span><text:span text:style-name="T129">Internal</text:span><text:span text:style-name="T95">（不出 </text:span><text:span text:style-name="T129">Area</text:span><text:span text:style-name="T95">）／</text:span><text:span text:style-name="T129">Backbone</text:span><text:span text:style-name="T95">（在 </text:span><text:span text:style-name="T129">Area 0</text:span><text:span text:style-name="T95">）／</text:span><text:span text:style-name="T129">ABR</text:span><text:span text:style-name="T95">（跨 </text:span><text:span text:style-name="T129">Area </text:span><text:span text:style-name="T95">橋樑）／</text:span><text:span text:style-name="T129">ASBR</text:span><text:span text:style-name="T95">（跨 </text:span><text:span text:style-name="T129">AS </text:span><text:span text:style-name="T95">入口）。</text:span></text:p>
            <text:p text:style-name="P10"><text:span text:style-name="T166">BGP </text:span><text:span text:style-name="T158">選路順序：</text:span><text:span text:style-name="T129">Weight &gt; Local Pref &gt; </text:span><text:span text:style-name="T95">自己產生 </text:span><text:span text:style-name="T129">&gt; AS-PATH &gt; Origin &gt; MED &gt; eBGP &gt; IGP cost &gt; Router ID</text:span><text:span text:style-name="T95">。</text:span></text:p>
            <text:p text:style-name="P10"><text:span text:style-name="T166">BGP </text:span><text:span text:style-name="T158">本質：</text:span><text:span text:style-name="T95">政策導向（不是距離導向）；</text:span><text:span text:style-name="T129">Local Preference </text:span><text:span text:style-name="T95">才是最重要的「通用」屬性（</text:span><text:span text:style-name="T129">Weight </text:span><text:span text:style-name="T95">為 </text:span><text:span text:style-name="T129">Cisco </text:span><text:span text:style-name="T95">私有）。</text:span></text:p>
            <text:p text:style-name="P10"><text:span text:style-name="T158">三層分工：</text:span><text:span text:style-name="T95">防火牆→「能不能走」｜</text:span><text:span text:style-name="T129">NAT→</text:span><text:span text:style-name="T95">「你是誰」｜</text:span><text:span text:style-name="T129">BGP→</text:span><text:span text:style-name="T95">「怎麼走」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八、網路系統進階 </text:span><text:span text:style-name="T154">SDN / LB / CDN / 5G</text:span><text:span text:style-name="T155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8" loext:marker-style-name="T154"><text:span text:style-name="T165">🔑 </text:span><text:span text:style-name="T155">口訣</text:span></text:p>
            <text:p text:style-name="P9"><text:span text:style-name="T166">SDN</text:span><text:span text:style-name="T158">：</text:span><text:span text:style-name="T95">「分平面、三層 </text:span><text:span text:style-name="T129">App-</text:span><text:span text:style-name="T95">控</text:span><text:span text:style-name="T129">-</text:span><text:span text:style-name="T95">基」＝控制／資料分離；</text:span><text:span text:style-name="T129">Application → Control → Infrastructure</text:span><text:span text:style-name="T95">。</text:span></text:p>
            <text:p text:style-name="P10"><text:span text:style-name="T166">Load Balancing</text:span><text:span text:style-name="T158">：</text:span><text:span text:style-name="T95">「</text:span><text:span text:style-name="T129">LB </text:span><text:span text:style-name="T95">輪、重、黏」＝</text:span><text:span text:style-name="T129">Round Robin</text:span><text:span text:style-name="T95">（輪流）／</text:span><text:span text:style-name="T129">Weighted RR</text:span><text:span text:style-name="T95">（加權）／</text:span><text:span text:style-name="T129">Stickiness</text:span><text:span text:style-name="T95">（同人同台）。</text:span></text:p>
            <text:p text:style-name="P10"><text:span text:style-name="T166">CDN</text:span><text:span text:style-name="T158">：</text:span><text:span text:style-name="T95">「網址轉轉轉（</text:span><text:span text:style-name="T129">CNAME</text:span><text:span text:style-name="T95">），資料找最近（</text:span><text:span text:style-name="T129">Edge</text:span><text:span text:style-name="T95">）」；</text:span><text:span text:style-name="T129">CNAME</text:span><text:span text:style-name="T95">＝網址→網址（非 </text:span><text:span text:style-name="T129">IP</text:span><text:span text:style-name="T95">）。</text:span></text:p>
            <text:p text:style-name="P10"><text:span text:style-name="T166">5G</text:span><text:span text:style-name="T158">：</text:span><text:span text:style-name="T95">「快、低、多、切」＝</text:span><text:span text:style-name="T129">eMBB</text:span><text:span text:style-name="T95">（高速）／</text:span><text:span text:style-name="T129">URLLC</text:span><text:span text:style-name="T95">（超低延遲）／</text:span><text:span text:style-name="T129">mMTC</text:span><text:span text:style-name="T95">（大量連線）／</text:span><text:span text:style-name="T129">Network Slicing</text:span><text:span text:style-name="T95">（切片）。</text:span></text:p>
            <text:p text:style-name="P10"><text:span text:style-name="T166">10 </text:span><text:span text:style-name="T158">秒總背：</text:span><text:span text:style-name="T129">SDN </text:span><text:span text:style-name="T95">分離三層、</text:span><text:span text:style-name="T129">LB </text:span><text:span text:style-name="T95">輪重黏、</text:span><text:span text:style-name="T129">CDN CNAME→</text:span><text:span text:style-name="T95">最近、</text:span><text:span text:style-name="T129">5G </text:span><text:span text:style-name="T95">快低多切、</text:span><text:span text:style-name="T129">WiFi </text:span><text:span text:style-name="T95">聽、</text:span><text:span text:style-name="T129">BT </text:span><text:span text:style-name="T95">跳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九、無線通訊 </text:span><text:span text:style-name="T154">WiFi vs Bluetooth</text:span><text:span text:style-name="T155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8" loext:marker-style-name="T154"><text:span text:style-name="T165">🔑 </text:span><text:span text:style-name="T155">口訣</text:span></text:p>
            <text:p text:style-name="P9"><text:span text:style-name="T158">一句總綱：</text:span><text:span text:style-name="T95">「</text:span><text:span text:style-name="T129">WiFi </text:span><text:span text:style-name="T95">先聽再說（</text:span><text:span text:style-name="T129">CSMA/CA</text:span><text:span text:style-name="T95">），</text:span><text:span text:style-name="T129">Bluetooth </text:span><text:span text:style-name="T95">一直換頻道（</text:span><text:span text:style-name="T129">FHSS</text:span><text:span text:style-name="T95">）」。</text:span></text:p>
            <text:p text:style-name="P10"><text:span text:style-name="T158">本質對比：</text:span><text:span text:style-name="T129">WiFi</text:span><text:span text:style-name="T95">＝搶頻道（菜市場）；</text:span><text:span text:style-name="T129">BT</text:span><text:span text:style-name="T95">＝排班（會議室預約）；時槽＝時間格子；</text:span><text:span text:style-name="T129">SCO</text:span><text:span text:style-name="T95">＝語音；</text:span><text:span text:style-name="T129">L2CAP</text:span><text:span text:style-name="T95">＝三通道。</text:span></text:p>
            <text:p text:style-name="P10"><text:span text:style-name="T158">最大陷阱：</text:span><text:span text:style-name="T95">有線 </text:span><text:span text:style-name="T129">Ethernet</text:span><text:span text:style-name="T95">＝</text:span><text:span text:style-name="T129">CD</text:span><text:span text:style-name="T95">（</text:span><text:span text:style-name="T129">Detect </text:span><text:span text:style-name="T95">偵測）；無線 </text:span><text:span text:style-name="T129">WiFi</text:span><text:span text:style-name="T95">＝</text:span><text:span text:style-name="T129">CA</text:span><text:span text:style-name="T95">（</text:span><text:span text:style-name="T129">Avoid </text:span><text:span text:style-name="T95">避免）。</text:span></text:p>
            <text:p text:style-name="P10"><text:span text:style-name="T166">QoS</text:span><text:span text:style-name="T158">／語音：</text:span><text:span text:style-name="T129">WiFi QoS</text:span><text:span text:style-name="T95">＝</text:span><text:span text:style-name="T129">EDCA</text:span><text:span text:style-name="T95">（急診室分級）；藍牙即時語音＝</text:span><text:span text:style-name="T129">SCO</text:span><text:span text:style-name="T95">／</text:span><text:span text:style-name="T129">eSCO</text:span><text:span text:style-name="T95">；</text:span><text:span text:style-name="T129">L2CAP </text:span><text:span text:style-name="T95">位於 </text:span><text:span text:style-name="T129">Data </text:span><text:soft-page-break/><text:span text:style-name="T129">Link </text:span><text:span text:style-name="T95">層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" loext:marker-style-name="T154"><text:span text:style-name="T165">🔑 </text:span><text:span text:style-name="T155">口訣</text:span></text:p>
            <text:p text:style-name="P9"><text:span text:style-name="T158">設備萬用口訣：</text:span><text:span text:style-name="T129">FW </text:span><text:span text:style-name="T95">封外、</text:span><text:span text:style-name="T129">WAF </text:span><text:span text:style-name="T95">看內、</text:span><text:span text:style-name="T129">NGFW </text:span><text:span text:style-name="T95">最強、</text:span><text:span text:style-name="T129">DMZ </text:span><text:span text:style-name="T95">隔離、</text:span><text:span text:style-name="T129">IOC </text:span><text:span text:style-name="T95">壞人、</text:span><text:span text:style-name="T129">Proxy </text:span><text:span text:style-name="T95">幫客、</text:span><text:span text:style-name="T129">Reverse </text:span><text:span text:style-name="T95">幫服。</text:span></text:p>
            <text:p text:style-name="P10"><text:span text:style-name="T166">IOC </text:span><text:span text:style-name="T158">四線索：</text:span><text:span text:style-name="T95">網（</text:span><text:span text:style-name="T129">Domain</text:span><text:span text:style-name="T95">）→ 檔（</text:span><text:span text:style-name="T129">Hash</text:span><text:span text:style-name="T95">）→ 連（</text:span><text:span text:style-name="T129">IP</text:span><text:span text:style-name="T95">）→ 控（</text:span><text:span text:style-name="T129">C2</text:span><text:span text:style-name="T95">）。</text:span></text:p>
            <text:p text:style-name="P10"><text:span text:style-name="T158">封包闖關順序：</text:span><text:span text:style-name="T129">Client → Proxy → Internet → FW/NGFW → DMZ → WAF → Reverse Proxy → </text:span><text:span text:style-name="T95">內部 </text:span><text:span text:style-name="T129">Server</text:span><text:span text:style-name="T95">。</text:span></text:p>
            <text:p text:style-name="P10"><text:span text:style-name="T158">三防分工：</text:span><text:span text:style-name="T129">Firewall </text:span><text:span text:style-name="T95">擋入口、</text:span><text:span text:style-name="T129">IDS </text:span><text:span text:style-name="T95">只看、</text:span><text:span text:style-name="T129">IPS </text:span><text:span text:style-name="T95">看＋擋；</text:span><text:span text:style-name="T129">HIDS </text:span><text:span text:style-name="T95">看主機（</text:span><text:span text:style-name="T129">Log</text:span><text:span text:style-name="T95">）、</text:span><text:span text:style-name="T129">NIDS </text:span><text:span text:style-name="T95">看網路（封包）。</text:span></text:p>
            <text:p text:style-name="P10"><text:span text:style-name="T158">易混兩協定：</text:span><text:span text:style-name="T129">SNMP </text:span><text:span text:style-name="T95">管理設備（應用層／</text:span><text:span text:style-name="T129">UDP</text:span><text:span text:style-name="T95">）、</text:span><text:span text:style-name="T129">ICMP </text:span><text:span text:style-name="T95">診斷網路（網路層）。</text:span></text:p>
            <text:p text:style-name="P10"><text:span text:style-name="T166">SQL Injection</text:span><text:span text:style-name="T158">：</text:span><text:span text:style-name="T95">攻擊＝</text:span><text:span text:style-name="T129">' OR 1=1 --</text:span><text:span text:style-name="T95">；防禦核心＝</text:span><text:span text:style-name="T129">Prepared Statement</text:span><text:span text:style-name="T95">（預備語句）。</text:span></text:p>
            <text:p text:style-name="P10"><text:span text:style-name="T166">Zero-Day</text:span><text:span text:style-name="T158">：</text:span><text:span text:style-name="T95">最怕「沒有 </text:span><text:span text:style-name="T129">Signature</text:span><text:span text:style-name="T95">」；防禦＝</text:span><text:span text:style-name="T129">Patch </text:span><text:span text:style-name="T95">更新 ＋ </text:span><text:span text:style-name="T129">IDS/IPS </text:span><text:span text:style-name="T95">＋ 網路分段。</text:span></text:p>
            <text:p text:style-name="P10"><text:span text:style-name="T158">企業資安三階段：</text:span><text:span text:style-name="T95">事前預防 → 事中偵測 → 事後復原。</text:span><text:span text:style-name="T129">RTO</text:span><text:span text:style-name="T95">＝停機時間、</text:span><text:span text:style-name="T129">RPO</text:span><text:span text:style-name="T95">＝資料損失量。</text:span></text:p>
            <text:p text:style-name="P10"><text:span text:style-name="T166">EDR/MDR</text:span><text:span text:style-name="T158">：</text:span><text:span text:style-name="T129">EDR</text:span><text:span text:style-name="T95">＝自己買工具守、</text:span><text:span text:style-name="T129">MDR</text:span><text:span text:style-name="T95">＝請公司幫你守、</text:span><text:span text:style-name="T129">ATT&amp;CK</text:span><text:span text:style-name="T95">＝駭客招式教材、數位韌性＝撐住快速復原。</text:span></text:p>
            <text:p text:style-name="P10"><text:span text:style-name="T166">SSDLC</text:span><text:span text:style-name="T158">：</text:span><text:span text:style-name="T129">Define→Design→Develop→Test→Deploy→Maintain</text:span><text:span text:style-name="T95">，精神是「左移（</text:span><text:span text:style-name="T129">Shift Left</text:span><text:span text:style-name="T95">）」。</text:span></text:p>
            <text:p text:style-name="P10"><text:span text:style-name="T166">Zero Trust</text:span><text:span text:style-name="T158">：</text:span><text:span text:style-name="T95">永不信任，始終驗證；查「人（</text:span><text:span text:style-name="T129">Identity</text:span><text:span text:style-name="T95">）機（</text:span><text:span text:style-name="T129">Device</text:span><text:span text:style-name="T95">）境（</text:span><text:span text:style-name="T129">Context</text:span><text:span text:style-name="T95">）」；配 </text:span><text:span text:style-name="T129">MFA</text:span><text:span text:style-name="T95">＋最小權限＋微分段＋持續監控。</text:span></text:p>
          </table:table-cell>
        </table:table-row>
      </table:table>
      <text:h text:style-name="P3" text:outline-level="2" loext:marker-style-name="T27"><text:span text:style-name="T27">Part B</text:span><text:span text:style-name="T28">　必背表格精選（考前掃一遍）</text:span></text:h>
      <text:h text:style-name="P2" text:outline-level="3"><text:span text:style-name="T153">▍</text:span><text:span text:style-name="T154"> ① </text:span><text:span text:style-name="T155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22" loext:marker-style-name="T66"><text:span text:style-name="T65">前綴</text:span><text:span text:style-name="T66"/></text:p>
            </table:table-cell>
            <table:table-cell table:style-name="表格14.A1" office:value-type="string">
              <text:p text:style-name="P22" loext:marker-style-name="T66"><text:span text:style-name="T65">主機 </text:span><text:span text:style-name="T75">bit</text:span></text:p>
            </table:table-cell>
            <table:table-cell table:style-name="表格14.A1" office:value-type="string">
              <text:p text:style-name="P22" loext:marker-style-name="T66"><text:span text:style-name="T75">IP </text:span><text:span text:style-name="T65">總數</text:span></text:p>
            </table:table-cell>
            <table:table-cell table:style-name="表格14.A1" office:value-type="string">
              <text:p text:style-name="P22" loext:marker-style-name="T66"><text:span text:style-name="T65">可用主機</text:span><text:span text:style-name="T66"/></text:p>
            </table:table-cell>
            <table:table-cell table:style-name="表格14.A1" office:value-type="string">
              <text:p text:style-name="P22" loext:marker-style-name="T66"><text:span text:style-name="T65">區塊步長</text:span><text:span text:style-name="T66"/></text:p>
            </table:table-cell>
            <table:table-cell table:style-name="表格14.A1" office:value-type="string">
              <text:p text:style-name="P22" loext:marker-style-name="T66"><text:span text:style-name="T65">廣播尾數範例</text:span><text:span text:style-name="T66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5" loext:marker-style-name="T80"><text:span text:style-name="T121">/24</text:span><text:span text:style-name="T80"/></text:p>
          </table:table-cell>
          <table:table-cell table:style-name="表格14.A2" office:value-type="string">
            <text:p text:style-name="P24" loext:marker-style-name="T80"><text:span text:style-name="T121">8</text:span><text:span text:style-name="T80"/></text:p>
          </table:table-cell>
          <table:table-cell table:style-name="表格14.A2" office:value-type="string">
            <text:p text:style-name="P25" loext:marker-style-name="T80"><text:span text:style-name="T121">256</text:span><text:span text:style-name="T80"/></text:p>
          </table:table-cell>
          <table:table-cell table:style-name="表格14.A2" office:value-type="string">
            <text:p text:style-name="P24" loext:marker-style-name="T31"><text:span text:style-name="T39">254</text:span><text:span text:style-name="T31"/></text:p>
          </table:table-cell>
          <table:table-cell table:style-name="表格14.A2" office:value-type="string">
            <text:p text:style-name="P25" loext:marker-style-name="T80"><text:span text:style-name="T121">+256</text:span><text:span text:style-name="T80"/></text:p>
          </table:table-cell>
          <table:table-cell table:style-name="表格14.A2" office:value-type="string">
            <text:p text:style-name="P25" loext:marker-style-name="T80"><text:span text:style-name="T121">255</text:span><text:span text:style-name="T80"/></text:p>
          </table:table-cell>
        </table:table-row>
        <table:table-row table:style-name="表格14.1">
          <table:table-cell table:style-name="表格14.A3" office:value-type="string">
            <text:p text:style-name="P25" loext:marker-style-name="T80"><text:span text:style-name="T121">/25</text:span><text:span text:style-name="T80"/></text:p>
          </table:table-cell>
          <table:table-cell table:style-name="表格14.A3" office:value-type="string">
            <text:p text:style-name="P24" loext:marker-style-name="T80"><text:span text:style-name="T121">7</text:span><text:span text:style-name="T80"/></text:p>
          </table:table-cell>
          <table:table-cell table:style-name="表格14.A3" office:value-type="string">
            <text:p text:style-name="P25" loext:marker-style-name="T80"><text:span text:style-name="T121">128</text:span><text:span text:style-name="T80"/></text:p>
          </table:table-cell>
          <table:table-cell table:style-name="表格14.A3" office:value-type="string">
            <text:p text:style-name="P24" loext:marker-style-name="T31"><text:span text:style-name="T39">126</text:span><text:span text:style-name="T31"/></text:p>
          </table:table-cell>
          <table:table-cell table:style-name="表格14.A3" office:value-type="string">
            <text:p text:style-name="P25" loext:marker-style-name="T80"><text:span text:style-name="T121">+128</text:span><text:span text:style-name="T80"/></text:p>
          </table:table-cell>
          <table:table-cell table:style-name="表格14.A3" office:value-type="string">
            <text:p text:style-name="P25" loext:marker-style-name="T80"><text:span text:style-name="T121">127, 255</text:span><text:span text:style-name="T80"/></text:p>
          </table:table-cell>
        </table:table-row>
        <table:table-row table:style-name="表格14.1">
          <table:table-cell table:style-name="表格14.A2" office:value-type="string">
            <text:p text:style-name="P25" loext:marker-style-name="T80"><text:span text:style-name="T121">/26</text:span><text:span text:style-name="T80"/></text:p>
          </table:table-cell>
          <table:table-cell table:style-name="表格14.A2" office:value-type="string">
            <text:p text:style-name="P24" loext:marker-style-name="T80"><text:span text:style-name="T121">6</text:span><text:span text:style-name="T80"/></text:p>
          </table:table-cell>
          <table:table-cell table:style-name="表格14.A2" office:value-type="string">
            <text:p text:style-name="P25" loext:marker-style-name="T80"><text:span text:style-name="T121">64</text:span><text:span text:style-name="T80"/></text:p>
          </table:table-cell>
          <table:table-cell table:style-name="表格14.A2" office:value-type="string">
            <text:p text:style-name="P24" loext:marker-style-name="T31"><text:span text:style-name="T39">62</text:span><text:span text:style-name="T31"/></text:p>
          </table:table-cell>
          <table:table-cell table:style-name="表格14.A2" office:value-type="string">
            <text:p text:style-name="P25" loext:marker-style-name="T80"><text:span text:style-name="T121">+64</text:span><text:span text:style-name="T80"/></text:p>
          </table:table-cell>
          <table:table-cell table:style-name="表格14.A2" office:value-type="string">
            <text:p text:style-name="P25" loext:marker-style-name="T80"><text:span text:style-name="T121">63, 127, 191, 255</text:span><text:span text:style-name="T80"/></text:p>
          </table:table-cell>
        </table:table-row>
        <table:table-row table:style-name="表格14.1">
          <table:table-cell table:style-name="表格14.A3" office:value-type="string">
            <text:p text:style-name="P25" loext:marker-style-name="T80"><text:span text:style-name="T121">/27</text:span><text:span text:style-name="T80"/></text:p>
          </table:table-cell>
          <table:table-cell table:style-name="表格14.A3" office:value-type="string">
            <text:p text:style-name="P24" loext:marker-style-name="T80"><text:span text:style-name="T121">5</text:span><text:span text:style-name="T80"/></text:p>
          </table:table-cell>
          <table:table-cell table:style-name="表格14.A3" office:value-type="string">
            <text:p text:style-name="P25" loext:marker-style-name="T80"><text:span text:style-name="T121">32</text:span><text:span text:style-name="T80"/></text:p>
          </table:table-cell>
          <table:table-cell table:style-name="表格14.A3" office:value-type="string">
            <text:p text:style-name="P24" loext:marker-style-name="T31"><text:span text:style-name="T39">30</text:span><text:span text:style-name="T31"/></text:p>
          </table:table-cell>
          <table:table-cell table:style-name="表格14.A3" office:value-type="string">
            <text:p text:style-name="P25" loext:marker-style-name="T80"><text:span text:style-name="T121">+32</text:span><text:span text:style-name="T80"/></text:p>
          </table:table-cell>
          <table:table-cell table:style-name="表格14.A3" office:value-type="string">
            <text:p text:style-name="P25" loext:marker-style-name="T80"><text:span text:style-name="T121">31, 63, 95 …</text:span><text:span text:style-name="T80"/></text:p>
          </table:table-cell>
        </table:table-row>
        <table:table-row table:style-name="表格14.1">
          <table:table-cell table:style-name="表格14.A2" office:value-type="string">
            <text:p text:style-name="P25" loext:marker-style-name="T80"><text:span text:style-name="T121">/28</text:span><text:span text:style-name="T80"/></text:p>
          </table:table-cell>
          <table:table-cell table:style-name="表格14.A2" office:value-type="string">
            <text:p text:style-name="P24" loext:marker-style-name="T80"><text:span text:style-name="T121">4</text:span><text:span text:style-name="T80"/></text:p>
          </table:table-cell>
          <table:table-cell table:style-name="表格14.A2" office:value-type="string">
            <text:p text:style-name="P25" loext:marker-style-name="T80"><text:span text:style-name="T121">16</text:span><text:span text:style-name="T80"/></text:p>
          </table:table-cell>
          <table:table-cell table:style-name="表格14.A2" office:value-type="string">
            <text:p text:style-name="P24" loext:marker-style-name="T31"><text:span text:style-name="T39">14</text:span><text:span text:style-name="T31"/></text:p>
          </table:table-cell>
          <table:table-cell table:style-name="表格14.A2" office:value-type="string">
            <text:p text:style-name="P25" loext:marker-style-name="T80"><text:span text:style-name="T121">+16</text:span><text:span text:style-name="T80"/></text:p>
          </table:table-cell>
          <table:table-cell table:style-name="表格14.A2" office:value-type="string">
            <text:p text:style-name="P25" loext:marker-style-name="T80"><text:span text:style-name="T121">15, 31, 47 …</text:span><text:span text:style-name="T80"/></text:p>
          </table:table-cell>
        </table:table-row>
        <table:table-row table:style-name="表格14.1">
          <table:table-cell table:style-name="表格14.A3" office:value-type="string">
            <text:p text:style-name="P25" loext:marker-style-name="T80"><text:span text:style-name="T121">/29</text:span><text:span text:style-name="T80"/></text:p>
          </table:table-cell>
          <table:table-cell table:style-name="表格14.A3" office:value-type="string">
            <text:p text:style-name="P24" loext:marker-style-name="T80"><text:span text:style-name="T121">3</text:span><text:span text:style-name="T80"/></text:p>
          </table:table-cell>
          <table:table-cell table:style-name="表格14.A3" office:value-type="string">
            <text:p text:style-name="P25" loext:marker-style-name="T80"><text:span text:style-name="T121">8</text:span><text:span text:style-name="T80"/></text:p>
          </table:table-cell>
          <table:table-cell table:style-name="表格14.A3" office:value-type="string">
            <text:p text:style-name="P24" loext:marker-style-name="T31"><text:span text:style-name="T39">6</text:span><text:span text:style-name="T31"/></text:p>
          </table:table-cell>
          <table:table-cell table:style-name="表格14.A3" office:value-type="string">
            <text:p text:style-name="P25" loext:marker-style-name="T80"><text:span text:style-name="T121">+8</text:span><text:span text:style-name="T80"/></text:p>
          </table:table-cell>
          <table:table-cell table:style-name="表格14.A3" office:value-type="string">
            <text:p text:style-name="P25" loext:marker-style-name="T80"><text:span text:style-name="T121">7, 15, 23 …</text:span><text:span text:style-name="T80"/></text:p>
          </table:table-cell>
        </table:table-row>
        <table:table-row table:style-name="表格14.1">
          <table:table-cell table:style-name="表格14.A2" office:value-type="string">
            <text:p text:style-name="P25" loext:marker-style-name="T80"><text:span text:style-name="T121">/30</text:span><text:span text:style-name="T80"/></text:p>
          </table:table-cell>
          <table:table-cell table:style-name="表格14.A2" office:value-type="string">
            <text:p text:style-name="P24" loext:marker-style-name="T80"><text:span text:style-name="T121">2</text:span><text:span text:style-name="T80"/></text:p>
          </table:table-cell>
          <table:table-cell table:style-name="表格14.A2" office:value-type="string">
            <text:p text:style-name="P25" loext:marker-style-name="T80"><text:span text:style-name="T121">4</text:span><text:span text:style-name="T80"/></text:p>
          </table:table-cell>
          <table:table-cell table:style-name="表格14.A2" office:value-type="string">
            <text:p text:style-name="P24" loext:marker-style-name="T31"><text:span text:style-name="T39">2</text:span><text:span text:style-name="T31"/></text:p>
          </table:table-cell>
          <table:table-cell table:style-name="表格14.A2" office:value-type="string">
            <text:p text:style-name="P25" loext:marker-style-name="T80"><text:span text:style-name="T121">+4</text:span><text:span text:style-name="T80"/></text:p>
          </table:table-cell>
          <table:table-cell table:style-name="表格14.A2" office:value-type="string">
            <text:p text:style-name="P25" loext:marker-style-name="T80"><text:span text:style-name="T121">3, 7, 11 …</text:span><text:span text:style-name="T80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9"><text:span text:style-name="T169">例外 </text:span><text:span text:style-name="T174">/31</text:span><text:span text:style-name="T169">：</text:span><text:span text:style-name="T95">點對點連線（</text:span><text:span text:style-name="T129">RFC 3021</text:span><text:span text:style-name="T95">），</text:span><text:span text:style-name="T129">2 </text:span><text:span text:style-name="T95">個 </text:span><text:span text:style-name="T129">IP </text:span><text:span text:style-name="T95">全部可用，無網路位址與廣播位址。</text:span><text:span text:style-name="T129">/32 </text:span><text:span text:style-name="T95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" text:outline-level="3"><text:span text:style-name="T153">▍</text:span><text:span text:style-name="T154"> ② TCP vs UDP</text:span><text:span text:style-name="T155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6" loext:marker-style-name="T70"><text:span text:style-name="T69">比較項目</text:span><text:span text:style-name="T70"/></text:p>
            </table:table-cell>
            <table:table-cell table:style-name="表格15.A1" office:value-type="string">
              <text:p text:style-name="P6" loext:marker-style-name="T70"><text:span text:style-name="T76">TCP</text:span><text:span text:style-name="T69">（穩定）</text:span></text:p>
            </table:table-cell>
            <table:table-cell table:style-name="表格15.A1" office:value-type="string">
              <text:p text:style-name="P6" loext:marker-style-name="T70"><text:span text:style-name="T76">UDP</text:span><text:span text:style-name="T6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5" loext:marker-style-name="T108"><text:span text:style-name="T107">連線方式</text:span><text:span text:style-name="T108"/></text:p>
          </table:table-cell>
          <table:table-cell table:style-name="表格15.A2" office:value-type="string">
            <text:p text:style-name="P25" loext:marker-style-name="T108"><text:span text:style-name="T107">三次握手才開始</text:span><text:span text:style-name="T108"/></text:p>
          </table:table-cell>
          <table:table-cell table:style-name="表格15.A2" office:value-type="string">
            <text:p text:style-name="P25" loext:marker-style-name="T108"><text:span text:style-name="T107">無連線，直接送</text:span><text:span text:style-name="T108"/></text:p>
          </table:table-cell>
        </table:table-row>
        <table:table-row table:style-name="表格15.1">
          <table:table-cell table:style-name="表格15.A3" office:value-type="string">
            <text:p text:style-name="P25" loext:marker-style-name="T108"><text:span text:style-name="T107">可靠性</text:span><text:span text:style-name="T108"/></text:p>
          </table:table-cell>
          <table:table-cell table:style-name="表格15.A3" office:value-type="string">
            <text:p text:style-name="P25" loext:marker-style-name="T108"><text:span text:style-name="T107">保證送達、會重傳</text:span><text:span text:style-name="T108"/></text:p>
          </table:table-cell>
          <table:table-cell table:style-name="表格15.A3" office:value-type="string">
            <text:p text:style-name="P25" loext:marker-style-name="T108"><text:span text:style-name="T107">不保證、不重傳</text:span><text:span text:style-name="T108"/></text:p>
          </table:table-cell>
        </table:table-row>
        <table:table-row table:style-name="表格15.1">
          <table:table-cell table:style-name="表格15.A2" office:value-type="string">
            <text:p text:style-name="P25" loext:marker-style-name="T108"><text:span text:style-name="T107">順序</text:span><text:span text:style-name="T108"/></text:p>
          </table:table-cell>
          <table:table-cell table:style-name="表格15.A2" office:value-type="string">
            <text:p text:style-name="P25" loext:marker-style-name="T108"><text:span text:style-name="T107">保證順序</text:span><text:span text:style-name="T108"/></text:p>
          </table:table-cell>
          <table:table-cell table:style-name="表格15.A2" office:value-type="string">
            <text:p text:style-name="P25" loext:marker-style-name="T108"><text:span text:style-name="T107">不保證順序</text:span><text:span text:style-name="T108"/></text:p>
          </table:table-cell>
        </table:table-row>
        <table:table-row table:style-name="表格15.1">
          <table:table-cell table:style-name="表格15.A3" office:value-type="string">
            <text:p text:style-name="P25" loext:marker-style-name="T108"><text:span text:style-name="T107">速度</text:span><text:span text:style-name="T108"/></text:p>
          </table:table-cell>
          <table:table-cell table:style-name="表格15.A3" office:value-type="string">
            <text:p text:style-name="P25" loext:marker-style-name="T108"><text:span text:style-name="T107">較慢（有控制機制）</text:span><text:span text:style-name="T108"/></text:p>
          </table:table-cell>
          <table:table-cell table:style-name="表格15.A3" office:value-type="string">
            <text:p text:style-name="P25" loext:marker-style-name="T108"><text:span text:style-name="T107">較快（無額外開銷）</text:span><text:span text:style-name="T108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5" loext:marker-style-name="T108"><text:span text:style-name="T107">適用</text:span><text:span text:style-name="T108"/></text:p>
          </table:table-cell>
          <table:table-cell table:style-name="表格15.A2" office:value-type="string">
            <text:p text:style-name="P25" loext:marker-style-name="T108"><text:span text:style-name="T107">網頁、</text:span><text:span text:style-name="T141">Email</text:span><text:span text:style-name="T107">、</text:span><text:span text:style-name="T141">FTP</text:span><text:span text:style-name="T107">、檔案</text:span></text:p>
          </table:table-cell>
          <table:table-cell table:style-name="表格15.A2" office:value-type="string">
            <text:p text:style-name="P25" loext:marker-style-name="T108"><text:span text:style-name="T107">串流、遊戲、</text:span><text:span text:style-name="T141">VoIP</text:span><text:span text:style-name="T107">、</text:span><text:span text:style-name="T141">DNS</text:span></text:p>
          </table:table-cell>
        </table:table-row>
        <table:table-row table:style-name="表格15.1">
          <table:table-cell table:style-name="表格15.A3" office:value-type="string">
            <text:p text:style-name="P25" loext:marker-style-name="T108"><text:span text:style-name="T107">一句話</text:span><text:span text:style-name="T108"/></text:p>
          </table:table-cell>
          <table:table-cell table:style-name="表格15.A3" office:value-type="string">
            <text:p text:style-name="P25" loext:marker-style-name="T162"><text:span text:style-name="T161">「穩定優先」</text:span><text:span text:style-name="T162"/></text:p>
          </table:table-cell>
          <table:table-cell table:style-name="表格15.A3" office:value-type="string">
            <text:p text:style-name="P25" loext:marker-style-name="T34"><text:span text:style-name="T33">「速度優先」</text:span><text:span text:style-name="T34"/></text:p>
          </table:table-cell>
        </table:table-row>
      </table:table>
      <text:h text:style-name="P2" text:outline-level="3"><text:span text:style-name="T153">▍</text:span><text:span text:style-name="T154"> ③ IPv4 vs IPv6 </text:span><text:span text:style-name="T155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6" loext:marker-style-name="T66"><text:span text:style-name="T65">比較項目</text:span><text:span text:style-name="T66"/></text:p>
            </table:table-cell>
            <table:table-cell table:style-name="表格16.A1" office:value-type="string">
              <text:p text:style-name="P6" loext:marker-style-name="T66"><text:span text:style-name="T75">✗ IPv4 </text:span><text:span text:style-name="T65">問題</text:span></text:p>
            </table:table-cell>
            <table:table-cell table:style-name="表格16.A1" office:value-type="string">
              <text:p text:style-name="P6" loext:marker-style-name="T66"><text:span text:style-name="T75">✓ IPv6 </text:span><text:span text:style-name="T65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5" loext:marker-style-name="T80"><text:span text:style-name="T79">位址長度</text:span><text:span text:style-name="T80"/></text:p>
          </table:table-cell>
          <table:table-cell table:style-name="表格16.A2" office:value-type="string">
            <text:p text:style-name="P25" loext:marker-style-name="T80"><text:span text:style-name="T121">32 bit</text:span><text:span text:style-name="T79">，約 </text:span><text:span text:style-name="T121">43 </text:span><text:span text:style-name="T79">億個，已不足</text:span></text:p>
          </table:table-cell>
          <table:table-cell table:style-name="表格16.A2" office:value-type="string">
            <text:p text:style-name="P25" loext:marker-style-name="T80"><text:span text:style-name="T121">128 bit</text:span><text:span text:style-name="T79">，約 </text:span><text:span text:style-name="T121">3.4×10³⁸</text:span><text:span text:style-name="T79">，近乎無限</text:span></text:p>
          </table:table-cell>
        </table:table-row>
        <table:table-row table:style-name="表格16.1">
          <table:table-cell table:style-name="表格16.A3" office:value-type="string">
            <text:p text:style-name="P25" loext:marker-style-name="T80"><text:span text:style-name="T121">NAT</text:span><text:span text:style-name="T80"/></text:p>
          </table:table-cell>
          <table:table-cell table:style-name="表格16.A3" office:value-type="string">
            <text:p text:style-name="P25" loext:marker-style-name="T80"><text:span text:style-name="T79">需 </text:span><text:span text:style-name="T121">NAT </text:span><text:span text:style-name="T79">共用 </text:span><text:span text:style-name="T121">IP</text:span><text:span text:style-name="T79">，破壞 </text:span><text:span text:style-name="T121">E2E</text:span></text:p>
          </table:table-cell>
          <table:table-cell table:style-name="表格16.A3" office:value-type="string">
            <text:p text:style-name="P25" loext:marker-style-name="T80"><text:span text:style-name="T79">每裝置獨立公開 </text:span><text:span text:style-name="T121">IP</text:span><text:span text:style-name="T79">，恢復 </text:span><text:span text:style-name="T121">E2E</text:span></text:p>
          </table:table-cell>
        </table:table-row>
        <table:table-row table:style-name="表格16.1">
          <table:table-cell table:style-name="表格16.A2" office:value-type="string">
            <text:p text:style-name="P25" loext:marker-style-name="T80"><text:span text:style-name="T79">安全性</text:span><text:span text:style-name="T80"/></text:p>
          </table:table-cell>
          <table:table-cell table:style-name="表格16.A2" office:value-type="string">
            <text:p text:style-name="P25" loext:marker-style-name="T80"><text:span text:style-name="T79">無內建加密／驗證</text:span><text:span text:style-name="T80"/></text:p>
          </table:table-cell>
          <table:table-cell table:style-name="表格16.A2" office:value-type="string">
            <text:p text:style-name="P25" loext:marker-style-name="T80"><text:span text:style-name="T79">支援 </text:span><text:span text:style-name="T121">IPsec</text:span><text:span text:style-name="T79">（</text:span><text:span text:style-name="T121">RFC 6434 </text:span><text:span text:style-name="T79">後改建議）</text:span></text:p>
          </table:table-cell>
        </table:table-row>
        <table:table-row table:style-name="表格16.1">
          <table:table-cell table:style-name="表格16.A3" office:value-type="string">
            <text:p text:style-name="P25" loext:marker-style-name="T80"><text:span text:style-name="T121">Header</text:span><text:span text:style-name="T80"/></text:p>
          </table:table-cell>
          <table:table-cell table:style-name="表格16.A3" office:value-type="string">
            <text:p text:style-name="P25" loext:marker-style-name="T80"><text:span text:style-name="T79">可變長度含 </text:span><text:span text:style-name="T121">Options</text:span><text:span text:style-name="T79">，效率低</text:span></text:p>
          </table:table-cell>
          <table:table-cell table:style-name="表格16.A3" office:value-type="string">
            <text:p text:style-name="P25" loext:marker-style-name="T80"><text:span text:style-name="T79">固定 </text:span><text:span text:style-name="T121">40 bytes</text:span><text:span text:style-name="T79">，轉送更快</text:span></text:p>
          </table:table-cell>
        </table:table-row>
        <table:table-row table:style-name="表格16.1">
          <table:table-cell table:style-name="表格16.A2" office:value-type="string">
            <text:p text:style-name="P25" loext:marker-style-name="T80"><text:span text:style-name="T121">QoS</text:span><text:span text:style-name="T80"/></text:p>
          </table:table-cell>
          <table:table-cell table:style-name="表格16.A2" office:value-type="string">
            <text:p text:style-name="P25" loext:marker-style-name="T80"><text:span text:style-name="T79">無法標記優先權</text:span><text:span text:style-name="T80"/></text:p>
          </table:table-cell>
          <table:table-cell table:style-name="表格16.A2" office:value-type="string">
            <text:p text:style-name="P25" loext:marker-style-name="T80"><text:span text:style-name="T121">Flow Label </text:span><text:span text:style-name="T79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5" loext:marker-style-name="T80"><text:span text:style-name="T79">廣播</text:span><text:span text:style-name="T80"/></text:p>
          </table:table-cell>
          <table:table-cell table:style-name="表格16.A3" office:value-type="string">
            <text:p text:style-name="P25" loext:marker-style-name="T80"><text:span text:style-name="T121">Broadcast </text:span><text:span text:style-name="T79">發給所有人</text:span></text:p>
          </table:table-cell>
          <table:table-cell table:style-name="表格16.A3" office:value-type="string">
            <text:p text:style-name="P25" loext:marker-style-name="T80"><text:span text:style-name="T79">改用 </text:span><text:span text:style-name="T121">Multicast</text:span><text:span text:style-name="T79">／</text:span><text:span text:style-name="T121">Anycast</text:span></text:p>
          </table:table-cell>
        </table:table-row>
        <table:table-row table:style-name="表格16.1">
          <table:table-cell table:style-name="表格16.A2" office:value-type="string">
            <text:p text:style-name="P25" loext:marker-style-name="T80"><text:span text:style-name="T121">IP </text:span><text:span text:style-name="T79">配置</text:span></text:p>
          </table:table-cell>
          <table:table-cell table:style-name="表格16.A2" office:value-type="string">
            <text:p text:style-name="P25" loext:marker-style-name="T80"><text:span text:style-name="T79">手動或 </text:span><text:span text:style-name="T121">DHCP</text:span><text:span text:style-name="T79">，繁瑣</text:span></text:p>
          </table:table-cell>
          <table:table-cell table:style-name="表格16.A2" office:value-type="string">
            <text:p text:style-name="P25" loext:marker-style-name="T80"><text:span text:style-name="T121">SLAAC </text:span><text:span text:style-name="T79">無狀態自動配置</text:span></text:p>
          </table:table-cell>
        </table:table-row>
      </table:table>
      <text:h text:style-name="P2" text:outline-level="3"><text:span text:style-name="T153">▍</text:span><text:span text:style-name="T154"> ④ TCP </text:span><text:span text:style-name="T155">丟包處理（第五篇 </text:span><text:span text:style-name="T154">· </text:span><text:span text:style-name="T155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6" loext:marker-style-name="T66"><text:span text:style-name="T65">丟包偵測</text:span><text:span text:style-name="T66"/></text:p>
            </table:table-cell>
            <table:table-cell table:style-name="表格17.A1" office:value-type="string">
              <text:p text:style-name="P6" loext:marker-style-name="T66"><text:span text:style-name="T65">代表意義</text:span><text:span text:style-name="T66"/></text:p>
            </table:table-cell>
            <table:table-cell table:style-name="表格17.A1" office:value-type="string">
              <text:p text:style-name="P6" loext:marker-style-name="T66"><text:span text:style-name="T75">ssthresh</text:span><text:span text:style-name="T66"/></text:p>
            </table:table-cell>
            <table:table-cell table:style-name="表格17.A1" office:value-type="string">
              <text:p text:style-name="P6" loext:marker-style-name="T66"><text:span text:style-name="T75">cwnd</text:span><text:span text:style-name="T66"/></text:p>
            </table:table-cell>
            <table:table-cell table:style-name="表格17.A1" office:value-type="string">
              <text:p text:style-name="P6" loext:marker-style-name="T66"><text:span text:style-name="T65">下一階段</text:span><text:span text:style-name="T66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5" loext:marker-style-name="T80"><text:span text:style-name="T121">Timeout</text:span><text:span text:style-name="T79">（逾時）</text:span></text:p>
          </table:table-cell>
          <table:table-cell table:style-name="表格17.A2" office:value-type="string">
            <text:p text:style-name="P25" loext:marker-style-name="T80"><text:span text:style-name="T79">網路嚴重擁塞</text:span><text:span text:style-name="T80"/></text:p>
          </table:table-cell>
          <table:table-cell table:style-name="表格17.A2" office:value-type="string">
            <text:p text:style-name="P25" loext:marker-style-name="T80"><text:span text:style-name="T121">= cwnd / 2</text:span><text:span text:style-name="T80"/></text:p>
          </table:table-cell>
          <table:table-cell table:style-name="表格17.A2" office:value-type="string">
            <text:p text:style-name="P25" loext:marker-style-name="T179"><text:span text:style-name="T178">重設為 </text:span><text:span text:style-name="T185">1</text:span></text:p>
          </table:table-cell>
          <table:table-cell table:style-name="表格17.A2" office:value-type="string">
            <text:p text:style-name="P25" loext:marker-style-name="T80"><text:span text:style-name="T79">重回 </text:span><text:span text:style-name="T121">Slow Start</text:span></text:p>
          </table:table-cell>
        </table:table-row>
        <table:table-row table:style-name="表格17.1">
          <table:table-cell table:style-name="表格17.A3" office:value-type="string">
            <text:p text:style-name="P25" loext:marker-style-name="T80"><text:span text:style-name="T121">3 </text:span><text:span text:style-name="T79">個重複 </text:span><text:span text:style-name="T121">ACK</text:span></text:p>
          </table:table-cell>
          <table:table-cell table:style-name="表格17.A3" office:value-type="string">
            <text:p text:style-name="P25" loext:marker-style-name="T80"><text:span text:style-name="T79">單一封包遺失</text:span><text:span text:style-name="T80"/></text:p>
          </table:table-cell>
          <table:table-cell table:style-name="表格17.A3" office:value-type="string">
            <text:p text:style-name="P25" loext:marker-style-name="T80"><text:span text:style-name="T121">= cwnd / 2</text:span><text:span text:style-name="T80"/></text:p>
          </table:table-cell>
          <table:table-cell table:style-name="表格17.A3" office:value-type="string">
            <text:p text:style-name="P25" loext:marker-style-name="T31"><text:span text:style-name="T39">= ssthresh</text:span><text:span text:style-name="T32">（減半）</text:span></text:p>
          </table:table-cell>
          <table:table-cell table:style-name="表格17.A3" office:value-type="string">
            <text:p text:style-name="P25" loext:marker-style-name="T80"><text:span text:style-name="T79">續 </text:span><text:span text:style-name="T121">Congestion Avoidance</text:span></text:p>
          </table:table-cell>
        </table:table-row>
      </table:table>
      <text:h text:style-name="P2" text:outline-level="3"><text:span text:style-name="T153">▍</text:span><text:span text:style-name="T154"> ⑤ BGP </text:span><text:span text:style-name="T155">選路九步（前面贏就停 </text:span><text:span text:style-name="T154">· </text:span><text:span text:style-name="T155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2" loext:marker-style-name="T66"><text:span text:style-name="T65">順序</text:span><text:span text:style-name="T66"/></text:p>
            </table:table-cell>
            <table:table-cell table:style-name="表格18.A1" office:value-type="string">
              <text:p text:style-name="P22" loext:marker-style-name="T66"><text:span text:style-name="T65">屬性</text:span><text:span text:style-name="T66"/></text:p>
            </table:table-cell>
            <table:table-cell table:style-name="表格18.A1" office:value-type="string">
              <text:p text:style-name="P22" loext:marker-style-name="T66"><text:span text:style-name="T65">規則／備註</text:span><text:span text:style-name="T66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4" loext:marker-style-name="T80"><text:span text:style-name="T121">①</text:span><text:span text:style-name="T80"/></text:p>
          </table:table-cell>
          <table:table-cell table:style-name="表格18.A2" office:value-type="string">
            <text:p text:style-name="P25" loext:marker-style-name="T80"><text:span text:style-name="T121">Weight</text:span><text:span text:style-name="T80"/></text:p>
          </table:table-cell>
          <table:table-cell table:style-name="表格18.A2" office:value-type="string">
            <text:p text:style-name="P25" loext:marker-style-name="T80"><text:span text:style-name="T79">數值越高越優先 ⚠️ </text:span><text:span text:style-name="T121">Cisco </text:span><text:span text:style-name="T79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24" loext:marker-style-name="T80"><text:span text:style-name="T121">②</text:span><text:span text:style-name="T80"/></text:p>
          </table:table-cell>
          <table:table-cell table:style-name="表格18.A3" office:value-type="string">
            <text:p text:style-name="P25" loext:marker-style-name="T31"><text:span text:style-name="T39">Local Preference</text:span><text:span text:style-name="T31"/></text:p>
          </table:table-cell>
          <table:table-cell table:style-name="表格18.A3" office:value-type="string">
            <text:p text:style-name="P25" loext:marker-style-name="T31"><text:span text:style-name="T32">數值越高越優先 ✅ 最重要的「通用」屬性</text:span><text:span text:style-name="T31"/></text:p>
          </table:table-cell>
        </table:table-row>
        <table:table-row table:style-name="表格18.1">
          <table:table-cell table:style-name="表格18.A2" office:value-type="string">
            <text:p text:style-name="P24" loext:marker-style-name="T80"><text:span text:style-name="T121">③</text:span><text:span text:style-name="T80"/></text:p>
          </table:table-cell>
          <table:table-cell table:style-name="表格18.A2" office:value-type="string">
            <text:p text:style-name="P25" loext:marker-style-name="T80"><text:span text:style-name="T79">本地產生</text:span><text:span text:style-name="T80"/></text:p>
          </table:table-cell>
          <table:table-cell table:style-name="表格18.A2" office:value-type="string">
            <text:p text:style-name="P25" loext:marker-style-name="T80"><text:span text:style-name="T121">network / aggregate </text:span><text:span text:style-name="T79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24" loext:marker-style-name="T80"><text:span text:style-name="T121">④</text:span><text:span text:style-name="T80"/></text:p>
          </table:table-cell>
          <table:table-cell table:style-name="表格18.A3" office:value-type="string">
            <text:p text:style-name="P25" loext:marker-style-name="T80"><text:span text:style-name="T121">AS-PATH</text:span><text:span text:style-name="T80"/></text:p>
          </table:table-cell>
          <table:table-cell table:style-name="表格18.A3" office:value-type="string">
            <text:p text:style-name="P25" loext:marker-style-name="T80"><text:span text:style-name="T79">路徑越短（經過 </text:span><text:span text:style-name="T121">AS </text:span><text:span text:style-name="T79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24" loext:marker-style-name="T80"><text:span text:style-name="T121">⑤</text:span><text:span text:style-name="T80"/></text:p>
          </table:table-cell>
          <table:table-cell table:style-name="表格18.A2" office:value-type="string">
            <text:p text:style-name="P25" loext:marker-style-name="T80"><text:span text:style-name="T121">Origin</text:span><text:span text:style-name="T80"/></text:p>
          </table:table-cell>
          <table:table-cell table:style-name="表格18.A2" office:value-type="string">
            <text:p text:style-name="P25" loext:marker-style-name="T80"><text:span text:style-name="T121">IGP &gt; EGP &gt; Incomplete</text:span><text:span text:style-name="T80"/></text:p>
          </table:table-cell>
        </table:table-row>
        <table:table-row table:style-name="表格18.1">
          <table:table-cell table:style-name="表格18.A3" office:value-type="string">
            <text:p text:style-name="P24" loext:marker-style-name="T80"><text:span text:style-name="T121">⑥</text:span><text:span text:style-name="T80"/></text:p>
          </table:table-cell>
          <table:table-cell table:style-name="表格18.A3" office:value-type="string">
            <text:p text:style-name="P25" loext:marker-style-name="T80"><text:span text:style-name="T121">MED</text:span><text:span text:style-name="T80"/></text:p>
          </table:table-cell>
          <table:table-cell table:style-name="表格18.A3" office:value-type="string">
            <text:p text:style-name="P25" loext:marker-style-name="T80"><text:span text:style-name="T79">數值越小越優先（只比同一 </text:span><text:span text:style-name="T121">AS </text:span><text:span text:style-name="T79">來的路由）</text:span></text:p>
          </table:table-cell>
        </table:table-row>
        <table:table-row table:style-name="表格18.1">
          <table:table-cell table:style-name="表格18.A2" office:value-type="string">
            <text:p text:style-name="P24" loext:marker-style-name="T80"><text:span text:style-name="T121">⑦</text:span><text:span text:style-name="T80"/></text:p>
          </table:table-cell>
          <table:table-cell table:style-name="表格18.A2" office:value-type="string">
            <text:p text:style-name="P25" loext:marker-style-name="T80"><text:span text:style-name="T121">eBGP vs iBGP</text:span><text:span text:style-name="T80"/></text:p>
          </table:table-cell>
          <table:table-cell table:style-name="表格18.A2" office:value-type="string">
            <text:p text:style-name="P25" loext:marker-style-name="T80"><text:span text:style-name="T121">eBGP </text:span><text:span text:style-name="T79">優先於 </text:span><text:span text:style-name="T121">iBGP</text:span></text:p>
          </table:table-cell>
        </table:table-row>
        <table:table-row table:style-name="表格18.1">
          <table:table-cell table:style-name="表格18.A3" office:value-type="string">
            <text:p text:style-name="P24" loext:marker-style-name="T80"><text:span text:style-name="T121">⑧</text:span><text:span text:style-name="T80"/></text:p>
          </table:table-cell>
          <table:table-cell table:style-name="表格18.A3" office:value-type="string">
            <text:p text:style-name="P25" loext:marker-style-name="T80"><text:span text:style-name="T121">IGP cost</text:span><text:span text:style-name="T80"/></text:p>
          </table:table-cell>
          <table:table-cell table:style-name="表格18.A3" office:value-type="string">
            <text:p text:style-name="P25" loext:marker-style-name="T80"><text:span text:style-name="T79">到 </text:span><text:span text:style-name="T121">next-hop </text:span><text:span text:style-name="T79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24" loext:marker-style-name="T80"><text:span text:style-name="T121">⑨</text:span><text:span text:style-name="T80"/></text:p>
          </table:table-cell>
          <table:table-cell table:style-name="表格18.A2" office:value-type="string">
            <text:p text:style-name="P25" loext:marker-style-name="T80"><text:span text:style-name="T121">Router ID</text:span><text:span text:style-name="T80"/></text:p>
          </table:table-cell>
          <table:table-cell table:style-name="表格18.A2" office:value-type="string">
            <text:p text:style-name="P25" loext:marker-style-name="T80"><text:span text:style-name="T121">Router ID </text:span><text:span text:style-name="T79">最小者優先（最後決勝點）</text:span></text:p>
          </table:table-cell>
        </table:table-row>
      </table:table>
      <text:h text:style-name="P2" text:outline-level="3"><text:span text:style-name="T153">▍</text:span><text:span text:style-name="T154"> ⑥ OSPF </text:span><text:span text:style-name="T155">四種 </text:span><text:span text:style-name="T154">Router</text:span><text:span text:style-name="T155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6" loext:marker-style-name="T66"><text:span text:style-name="T65">類型</text:span><text:span text:style-name="T66"/></text:p>
            </table:table-cell>
            <table:table-cell table:style-name="表格19.A1" office:value-type="string">
              <text:p text:style-name="P6" loext:marker-style-name="T66"><text:span text:style-name="T65">本質</text:span><text:span text:style-name="T66"/></text:p>
            </table:table-cell>
            <table:table-cell table:style-name="表格19.A1" office:value-type="string">
              <text:p text:style-name="P6" loext:marker-style-name="T66"><text:span text:style-name="T65">核心記憶點</text:span><text:span text:style-name="T66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5" loext:marker-style-name="T80"><text:span text:style-name="T121">Internal</text:span><text:span text:style-name="T80"/></text:p>
          </table:table-cell>
          <table:table-cell table:style-name="表格19.A2" office:value-type="string">
            <text:p text:style-name="P25" loext:marker-style-name="T80"><text:span text:style-name="T79">不出 </text:span><text:span text:style-name="T121">Area</text:span></text:p>
          </table:table-cell>
          <table:table-cell table:style-name="表格19.A2" office:value-type="string">
            <text:p text:style-name="P25" loext:marker-style-name="T80"><text:span text:style-name="T79">只負責自己這一區，對外一無所知</text:span><text:span text:style-name="T80"/></text:p>
          </table:table-cell>
        </table:table-row>
        <table:table-row table:style-name="表格19.1">
          <table:table-cell table:style-name="表格19.A3" office:value-type="string">
            <text:p text:style-name="P25" loext:marker-style-name="T80"><text:span text:style-name="T121">Backbone</text:span><text:span text:style-name="T80"/></text:p>
          </table:table-cell>
          <table:table-cell table:style-name="表格19.A3" office:value-type="string">
            <text:p text:style-name="P25" loext:marker-style-name="T80"><text:span text:style-name="T79">在 </text:span><text:span text:style-name="T121">Area 0</text:span></text:p>
          </table:table-cell>
          <table:table-cell table:style-name="表格19.A3" office:value-type="string">
            <text:p text:style-name="P25" loext:marker-style-name="T80"><text:span text:style-name="T79">城市主幹道節點，跨區流量必經</text:span><text:span text:style-name="T80"/></text:p>
          </table:table-cell>
        </table:table-row>
        <table:table-row table:style-name="表格19.1">
          <table:table-cell table:style-name="表格19.A2" office:value-type="string">
            <text:p text:style-name="P25" loext:marker-style-name="T80"><text:span text:style-name="T121">ABR</text:span><text:span text:style-name="T80"/></text:p>
          </table:table-cell>
          <table:table-cell table:style-name="表格19.A2" office:value-type="string">
            <text:p text:style-name="P25" loext:marker-style-name="T80"><text:span text:style-name="T79">跨 </text:span><text:span text:style-name="T121">Area </text:span><text:span text:style-name="T79">橋樑</text:span></text:p>
          </table:table-cell>
          <table:table-cell table:style-name="表格19.A2" office:value-type="string">
            <text:p text:style-name="P25" loext:marker-style-name="T80"><text:span text:style-name="T79">一端連 </text:span><text:span text:style-name="T121">Area 0</text:span><text:span text:style-name="T79">、一端連其他 </text:span><text:span text:style-name="T121">Area</text:span><text:span text:style-name="T79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5" loext:marker-style-name="T80"><text:span text:style-name="T121">ASBR</text:span><text:span text:style-name="T80"/></text:p>
          </table:table-cell>
          <table:table-cell table:style-name="表格19.A3" office:value-type="string">
            <text:p text:style-name="P25" loext:marker-style-name="T80"><text:span text:style-name="T79">跨 </text:span><text:span text:style-name="T121">AS </text:span><text:span text:style-name="T79">入口</text:span></text:p>
          </table:table-cell>
          <table:table-cell table:style-name="表格19.A3" office:value-type="string">
            <text:p text:style-name="P25" loext:marker-style-name="T80"><text:span text:style-name="T79">把外部路由（</text:span><text:span text:style-name="T121">BGP </text:span><text:span text:style-name="T79">等）帶進 </text:span><text:span text:style-name="T121">OSPF</text:span><text:span text:style-name="T79">，是對外的大門</text:span></text:p>
          </table:table-cell>
        </table:table-row>
      </table:table>
      <text:h text:style-name="P2" text:outline-level="3"><text:span text:style-name="T153">▍</text:span><text:span text:style-name="T154"> ⑦ </text:span><text:span text:style-name="T155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2" loext:marker-style-name="T66"><text:span text:style-name="T65">能力</text:span><text:span text:style-name="T66"/></text:p>
            </table:table-cell>
            <table:table-cell table:style-name="表格20.A1" office:value-type="string">
              <text:p text:style-name="P22" loext:marker-style-name="T66"><text:span text:style-name="T75">FW</text:span><text:span text:style-name="T66"/></text:p>
            </table:table-cell>
            <table:table-cell table:style-name="表格20.A1" office:value-type="string">
              <text:p text:style-name="P22" loext:marker-style-name="T66"><text:span text:style-name="T75">WAF</text:span><text:span text:style-name="T66"/></text:p>
            </table:table-cell>
            <table:table-cell table:style-name="表格20.A1" office:value-type="string">
              <text:p text:style-name="P22" loext:marker-style-name="T66"><text:span text:style-name="T75">NGFW</text:span><text:span text:style-name="T66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5" loext:marker-style-name="T80"><text:span text:style-name="T121">IP / Port </text:span><text:span text:style-name="T79">過濾</text:span></text:p>
          </table:table-cell>
          <table:table-cell table:style-name="表格20.A2" office:value-type="string">
            <text:p text:style-name="P24" loext:marker-style-name="T191"><text:span text:style-name="T190">○</text:span><text:span text:style-name="T191"/></text:p>
          </table:table-cell>
          <table:table-cell table:style-name="表格20.A2" office:value-type="string">
            <text:p text:style-name="P24" loext:marker-style-name="T191"><text:span text:style-name="T190">○</text:span><text:span text:style-name="T191"/></text:p>
          </table:table-cell>
          <table:table-cell table:style-name="表格20.A2" office:value-type="string">
            <text:p text:style-name="P24" loext:marker-style-name="T191"><text:span text:style-name="T190">○</text:span><text:span text:style-name="T191"/></text:p>
          </table:table-cell>
        </table:table-row>
        <table:table-row table:style-name="表格20.1">
          <table:table-cell table:style-name="表格20.A3" office:value-type="string">
            <text:p text:style-name="P25" loext:marker-style-name="T80"><text:span text:style-name="T121">HTTP </text:span><text:span text:style-name="T79">內容檢查</text:span></text:p>
          </table:table-cell>
          <table:table-cell table:style-name="表格20.A3" office:value-type="string">
            <text:p text:style-name="P24" loext:marker-style-name="T182"><text:span text:style-name="T187">✗</text:span><text:span text:style-name="T182"/></text:p>
          </table:table-cell>
          <table:table-cell table:style-name="表格20.A3" office:value-type="string">
            <text:p text:style-name="P24" loext:marker-style-name="T191"><text:span text:style-name="T190">○</text:span><text:span text:style-name="T191"/></text:p>
          </table:table-cell>
          <table:table-cell table:style-name="表格20.A3" office:value-type="string">
            <text:p text:style-name="P24" loext:marker-style-name="T191"><text:span text:style-name="T190">○</text:span><text:span text:style-name="T191"/></text:p>
          </table:table-cell>
        </table:table-row>
        <table:table-row table:style-name="表格20.1">
          <table:table-cell table:style-name="表格20.A2" office:value-type="string">
            <text:p text:style-name="P25" loext:marker-style-name="T80"><text:span text:style-name="T121">DPI </text:span><text:span text:style-name="T79">深度檢查</text:span></text:p>
          </table:table-cell>
          <table:table-cell table:style-name="表格20.A2" office:value-type="string">
            <text:p text:style-name="P24" loext:marker-style-name="T182"><text:span text:style-name="T187">✗</text:span><text:span text:style-name="T182"/></text:p>
          </table:table-cell>
          <table:table-cell table:style-name="表格20.A2" office:value-type="string">
            <text:p text:style-name="P24" loext:marker-style-name="T182"><text:span text:style-name="T187">✗</text:span><text:span text:style-name="T182"/></text:p>
          </table:table-cell>
          <table:table-cell table:style-name="表格20.A2" office:value-type="string">
            <text:p text:style-name="P24" loext:marker-style-name="T191"><text:span text:style-name="T190">○</text:span><text:span text:style-name="T191"/></text:p>
          </table:table-cell>
        </table:table-row>
        <table:table-row table:style-name="表格20.1">
          <table:table-cell table:style-name="表格20.A3" office:value-type="string">
            <text:p text:style-name="P25" loext:marker-style-name="T80"><text:span text:style-name="T121">App </text:span><text:span text:style-name="T79">識別 </text:span><text:span text:style-name="T121">/ IPS</text:span></text:p>
          </table:table-cell>
          <table:table-cell table:style-name="表格20.A3" office:value-type="string">
            <text:p text:style-name="P24" loext:marker-style-name="T182"><text:span text:style-name="T187">✗</text:span><text:span text:style-name="T182"/></text:p>
          </table:table-cell>
          <table:table-cell table:style-name="表格20.A3" office:value-type="string">
            <text:p text:style-name="P24" loext:marker-style-name="T182"><text:span text:style-name="T187">✗</text:span><text:span text:style-name="T182"/></text:p>
          </table:table-cell>
          <table:table-cell table:style-name="表格20.A3" office:value-type="string">
            <text:p text:style-name="P24" loext:marker-style-name="T191"><text:span text:style-name="T190">○</text:span><text:span text:style-name="T191"/></text:p>
          </table:table-cell>
        </table:table-row>
        <table:table-row table:style-name="表格20.1">
          <table:table-cell table:style-name="表格20.A2" office:value-type="string">
            <text:p text:style-name="P25" loext:marker-style-name="T80"><text:span text:style-name="T121">OSI </text:span><text:span text:style-name="T79">層</text:span></text:p>
          </table:table-cell>
          <table:table-cell table:style-name="表格20.A2" office:value-type="string">
            <text:p text:style-name="P24" loext:marker-style-name="T80"><text:span text:style-name="T121">L3 / L4</text:span><text:span text:style-name="T80"/></text:p>
          </table:table-cell>
          <table:table-cell table:style-name="表格20.A2" office:value-type="string">
            <text:p text:style-name="P24" loext:marker-style-name="T31"><text:span text:style-name="T39">L7</text:span><text:span text:style-name="T31"/></text:p>
          </table:table-cell>
          <table:table-cell table:style-name="表格20.A2" office:value-type="string">
            <text:p text:style-name="P24" loext:marker-style-name="T80"><text:span text:style-name="T121">L3–L7</text:span><text:span text:style-name="T80"/></text:p>
          </table:table-cell>
        </table:table-row>
      </table:table>
      <text:h text:style-name="P2" text:outline-level="3"><text:span text:style-name="T153">▍</text:span><text:span text:style-name="T154"> ⑧ </text:span><text:span text:style-name="T155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6" loext:marker-style-name="T66"><text:span text:style-name="T65">工具</text:span><text:span text:style-name="T66"/></text:p>
            </table:table-cell>
            <table:table-cell table:style-name="表格21.A1" office:value-type="string">
              <text:p text:style-name="P6" loext:marker-style-name="T66"><text:span text:style-name="T65">角色</text:span><text:span text:style-name="T66"/></text:p>
            </table:table-cell>
            <table:table-cell table:style-name="表格21.A1" office:value-type="string">
              <text:p text:style-name="P6" loext:marker-style-name="T66"><text:span text:style-name="T65">關鍵差異</text:span><text:span text:style-name="T66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5" loext:marker-style-name="T80"><text:span text:style-name="T121">Firewall</text:span><text:span text:style-name="T80"/></text:p>
          </table:table-cell>
          <table:table-cell table:style-name="表格21.A2" office:value-type="string">
            <text:p text:style-name="P25" loext:marker-style-name="T80"><text:span text:style-name="T79">大門警衛</text:span><text:span text:style-name="T80"/></text:p>
          </table:table-cell>
          <table:table-cell table:style-name="表格21.A2" office:value-type="string">
            <text:p text:style-name="P25" loext:marker-style-name="T80"><text:span text:style-name="T79">依 </text:span><text:span text:style-name="T121">IP / Port / </text:span><text:span text:style-name="T79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5" loext:marker-style-name="T80"><text:span text:style-name="T121">IDS</text:span><text:span text:style-name="T80"/></text:p>
          </table:table-cell>
          <table:table-cell table:style-name="表格21.A3" office:value-type="string">
            <text:p text:style-name="P25" loext:marker-style-name="T80"><text:span text:style-name="T79">監視器（只看）</text:span><text:span text:style-name="T80"/></text:p>
          </table:table-cell>
          <table:table-cell table:style-name="表格21.A3" office:value-type="string">
            <text:p text:style-name="P25" loext:marker-style-name="T80"><text:span text:style-name="T79">偵測異常 → 只發警報，不阻擋</text:span><text:span text:style-name="T80"/></text:p>
          </table:table-cell>
        </table:table-row>
        <table:table-row table:style-name="表格21.1">
          <table:table-cell table:style-name="表格21.A2" office:value-type="string">
            <text:p text:style-name="P25" loext:marker-style-name="T80"><text:span text:style-name="T121">IPS</text:span><text:span text:style-name="T80"/></text:p>
          </table:table-cell>
          <table:table-cell table:style-name="表格21.A2" office:value-type="string">
            <text:p text:style-name="P25" loext:marker-style-name="T80"><text:span text:style-name="T79">監視器＋警衛</text:span><text:span text:style-name="T80"/></text:p>
          </table:table-cell>
          <table:table-cell table:style-name="表格21.A2" office:value-type="string">
            <text:p text:style-name="P25" loext:marker-style-name="T80"><text:span text:style-name="T79">偵測異常 → 自動阻擋（</text:span><text:span text:style-name="T121">IDS </text:span><text:span text:style-name="T79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5" loext:marker-style-name="T80"><text:span text:style-name="T121">HIDS</text:span><text:span text:style-name="T80"/></text:p>
          </table:table-cell>
          <table:table-cell table:style-name="表格21.A3" office:value-type="string">
            <text:p text:style-name="P25" loext:marker-style-name="T80"><text:span text:style-name="T79">主機型</text:span><text:span text:style-name="T80"/></text:p>
          </table:table-cell>
          <table:table-cell table:style-name="表格21.A3" office:value-type="string">
            <text:p text:style-name="P25" loext:marker-style-name="T80"><text:span text:style-name="T79">看主機 </text:span><text:span text:style-name="T121">Log</text:span><text:span text:style-name="T79">／系統行為</text:span></text:p>
          </table:table-cell>
        </table:table-row>
        <table:table-row table:style-name="表格21.1">
          <table:table-cell table:style-name="表格21.A2" office:value-type="string">
            <text:p text:style-name="P25" loext:marker-style-name="T80"><text:span text:style-name="T121">NIDS</text:span><text:span text:style-name="T80"/></text:p>
          </table:table-cell>
          <table:table-cell table:style-name="表格21.A2" office:value-type="string">
            <text:p text:style-name="P25" loext:marker-style-name="T80"><text:span text:style-name="T79">網路型</text:span><text:span text:style-name="T80"/></text:p>
          </table:table-cell>
          <table:table-cell table:style-name="表格21.A2" office:value-type="string">
            <text:p text:style-name="P25" loext:marker-style-name="T80"><text:span text:style-name="T79">看網路封包／流量</text:span><text:span text:style-name="T80"/></text:p>
          </table:table-cell>
        </table:table-row>
        <table:table-row table:style-name="表格21.1">
          <table:table-cell table:style-name="表格21.A3" office:value-type="string">
            <text:p text:style-name="P25" loext:marker-style-name="T80"><text:span text:style-name="T121">SNMP</text:span><text:span text:style-name="T80"/></text:p>
          </table:table-cell>
          <table:table-cell table:style-name="表格21.A3" office:value-type="string">
            <text:p text:style-name="P25" loext:marker-style-name="T80"><text:span text:style-name="T79">管理室</text:span><text:span text:style-name="T80"/></text:p>
          </table:table-cell>
          <table:table-cell table:style-name="表格21.A3" office:value-type="string">
            <text:p text:style-name="P25" loext:marker-style-name="T80"><text:span text:style-name="T79">管理設備狀態（應用層／</text:span><text:span text:style-name="T121">UDP</text:span><text:span text:style-name="T79">）</text:span></text:p>
          </table:table-cell>
        </table:table-row>
        <table:table-row table:style-name="表格21.1">
          <table:table-cell table:style-name="表格21.A2" office:value-type="string">
            <text:p text:style-name="P25" loext:marker-style-name="T80"><text:span text:style-name="T121">ICMP</text:span><text:span text:style-name="T80"/></text:p>
          </table:table-cell>
          <table:table-cell table:style-name="表格21.A2" office:value-type="string">
            <text:p text:style-name="P25" loext:marker-style-name="T80"><text:span text:style-name="T79">網路測試員</text:span><text:span text:style-name="T80"/></text:p>
          </table:table-cell>
          <table:table-cell table:style-name="表格21.A2" office:value-type="string">
            <text:p text:style-name="P25" loext:marker-style-name="T80"><text:span text:style-name="T79">診斷網路連線（網路層／</text:span><text:span text:style-name="T121">Ping</text:span><text:span text:style-name="T79">）</text:span></text:p>
          </table:table-cell>
        </table:table-row>
      </table:table>
      <text:h text:style-name="P2" text:outline-level="3"><text:span text:style-name="T153">▍</text:span><text:span text:style-name="T154"> ⑨ IOC </text:span><text:span text:style-name="T155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2" loext:marker-style-name="T66"><text:span text:style-name="T65">口訣</text:span><text:span text:style-name="T66"/></text:p>
            </table:table-cell>
            <table:table-cell table:style-name="表格22.A1" office:value-type="string">
              <text:p text:style-name="P22" loext:marker-style-name="T66"><text:span text:style-name="T75">IOC </text:span><text:span text:style-name="T65">類型</text:span></text:p>
            </table:table-cell>
            <table:table-cell table:style-name="表格22.A1" office:value-type="string">
              <text:p text:style-name="P22" loext:marker-style-name="T66"><text:span text:style-name="T65">白話</text:span><text:span text:style-name="T66"/></text:p>
            </table:table-cell>
            <table:table-cell table:style-name="表格22.A1" office:value-type="string">
              <text:p text:style-name="P22" loext:marker-style-name="T66"><text:span text:style-name="T65">對應防禦</text:span><text:span text:style-name="T66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4" loext:marker-style-name="T200"><text:span text:style-name="T199">網</text:span><text:span text:style-name="T200"/></text:p>
          </table:table-cell>
          <table:table-cell table:style-name="表格22.A2" office:value-type="string">
            <text:p text:style-name="P25" loext:marker-style-name="T80"><text:span text:style-name="T79">惡意 </text:span><text:span text:style-name="T121">Domain</text:span></text:p>
          </table:table-cell>
          <table:table-cell table:style-name="表格22.A2" office:value-type="string">
            <text:p text:style-name="P25" loext:marker-style-name="T80"><text:span text:style-name="T79">釣魚網站網址</text:span><text:span text:style-name="T80"/></text:p>
          </table:table-cell>
          <table:table-cell table:style-name="表格22.A2" office:value-type="string">
            <text:p text:style-name="P25" loext:marker-style-name="T80"><text:span text:style-name="T121">DNS </text:span><text:span text:style-name="T79">封鎖網域</text:span></text:p>
          </table:table-cell>
        </table:table-row>
        <table:table-row table:style-name="表格22.1">
          <table:table-cell table:style-name="表格22.A3" office:value-type="string">
            <text:p text:style-name="P24" loext:marker-style-name="T200"><text:span text:style-name="T199">檔</text:span><text:span text:style-name="T200"/></text:p>
          </table:table-cell>
          <table:table-cell table:style-name="表格22.A3" office:value-type="string">
            <text:p text:style-name="P25" loext:marker-style-name="T80"><text:span text:style-name="T79">惡意 </text:span><text:span text:style-name="T121">Hash</text:span></text:p>
          </table:table-cell>
          <table:table-cell table:style-name="表格22.A3" office:value-type="string">
            <text:p text:style-name="P25" loext:marker-style-name="T80"><text:span text:style-name="T79">惡意程式特徵碼（改名也認得）</text:span><text:span text:style-name="T80"/></text:p>
          </table:table-cell>
          <table:table-cell table:style-name="表格22.A3" office:value-type="string">
            <text:p text:style-name="P25" loext:marker-style-name="T80"><text:span text:style-name="T79">防毒比對特徵</text:span><text:span text:style-name="T80"/></text:p>
          </table:table-cell>
        </table:table-row>
        <table:table-row table:style-name="表格22.1">
          <table:table-cell table:style-name="表格22.A2" office:value-type="string">
            <text:p text:style-name="P24" loext:marker-style-name="T200"><text:span text:style-name="T199">連</text:span><text:span text:style-name="T200"/></text:p>
          </table:table-cell>
          <table:table-cell table:style-name="表格22.A2" office:value-type="string">
            <text:p text:style-name="P25" loext:marker-style-name="T80"><text:span text:style-name="T79">惡意 </text:span><text:span text:style-name="T121">IP</text:span></text:p>
          </table:table-cell>
          <table:table-cell table:style-name="表格22.A2" office:value-type="string">
            <text:p text:style-name="P25" loext:marker-style-name="T80"><text:span text:style-name="T79">感染後對外異常連線目標</text:span><text:span text:style-name="T80"/></text:p>
          </table:table-cell>
          <table:table-cell table:style-name="表格22.A2" office:value-type="string">
            <text:p text:style-name="P25" loext:marker-style-name="T80"><text:span text:style-name="T121">FW / NGFW </text:span><text:span text:style-name="T79">封鎖</text:span></text:p>
          </table:table-cell>
        </table:table-row>
        <table:table-row table:style-name="表格22.1">
          <table:table-cell table:style-name="表格22.A3" office:value-type="string">
            <text:p text:style-name="P24" loext:marker-style-name="T200"><text:span text:style-name="T199">控</text:span><text:span text:style-name="T200"/></text:p>
          </table:table-cell>
          <table:table-cell table:style-name="表格22.A3" office:value-type="string">
            <text:p text:style-name="P25" loext:marker-style-name="T80"><text:span text:style-name="T121">C2 Server</text:span><text:span text:style-name="T80"/></text:p>
          </table:table-cell>
          <table:table-cell table:style-name="表格22.A3" office:value-type="string">
            <text:p text:style-name="P25" loext:marker-style-name="T80"><text:span text:style-name="T79">駭客遠端操控總部</text:span><text:span text:style-name="T80"/></text:p>
          </table:table-cell>
          <table:table-cell table:style-name="表格22.A3" office:value-type="string">
            <text:p text:style-name="P25" loext:marker-style-name="T80"><text:span text:style-name="T121">SIEM / IDS </text:span><text:span text:style-name="T79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9"><text:span text:style-name="T169">必記：</text:span><text:span text:style-name="T129">IOC </text:span><text:span text:style-name="T95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" text:outline-level="3"><text:span text:style-name="T153">▍</text:span><text:span text:style-name="T154"> ⑩ DNS </text:span><text:span text:style-name="T155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6" loext:marker-style-name="T70"><text:span text:style-name="T69">項目</text:span><text:span text:style-name="T70"/></text:p>
            </table:table-cell>
            <table:table-cell table:style-name="表格23.A1" office:value-type="string">
              <text:p text:style-name="P6" loext:marker-style-name="T70"><text:span text:style-name="T76">Recursive </text:span><text:span text:style-name="T69">遞迴</text:span></text:p>
            </table:table-cell>
            <table:table-cell table:style-name="表格23.A1" office:value-type="string">
              <text:p text:style-name="P6" loext:marker-style-name="T70"><text:span text:style-name="T76">Iterative </text:span><text:span text:style-name="T6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5" loext:marker-style-name="T108"><text:span text:style-name="T107">口訣</text:span><text:span text:style-name="T108"/></text:p>
          </table:table-cell>
          <table:table-cell table:style-name="表格23.A2" office:value-type="string">
            <text:p text:style-name="P25" loext:marker-style-name="T162"><text:span text:style-name="T161">代查到底</text:span><text:span text:style-name="T162"/></text:p>
          </table:table-cell>
          <table:table-cell table:style-name="表格23.A2" office:value-type="string">
            <text:p text:style-name="P25" loext:marker-style-name="T34"><text:span text:style-name="T33">逐層詢問</text:span><text:span text:style-name="T34"/></text:p>
          </table:table-cell>
        </table:table-row>
        <table:table-row table:style-name="表格23.1">
          <table:table-cell table:style-name="表格23.A3" office:value-type="string">
            <text:p text:style-name="P25" loext:marker-style-name="T108"><text:span text:style-name="T107">誰去問</text:span><text:span text:style-name="T108"/></text:p>
          </table:table-cell>
          <table:table-cell table:style-name="表格23.A3" office:value-type="string">
            <text:p text:style-name="P25" loext:marker-style-name="T108"><text:span text:style-name="T141">DNS </text:span><text:span text:style-name="T107">伺服器代你問完</text:span></text:p>
          </table:table-cell>
          <table:table-cell table:style-name="表格23.A3" office:value-type="string">
            <text:p text:style-name="P25" loext:marker-style-name="T108"><text:span text:style-name="T107">你自己逐層查詢</text:span><text:span text:style-name="T108"/></text:p>
          </table:table-cell>
        </table:table-row>
        <table:table-row table:style-name="表格23.1">
          <table:table-cell table:style-name="表格23.A2" office:value-type="string">
            <text:p text:style-name="P25" loext:marker-style-name="T108"><text:span text:style-name="T107">問幾次</text:span><text:span text:style-name="T108"/></text:p>
          </table:table-cell>
          <table:table-cell table:style-name="表格23.A2" office:value-type="string">
            <text:p text:style-name="P25" loext:marker-style-name="T108"><text:span text:style-name="T107">只問 </text:span><text:span text:style-name="T141">1 </text:span><text:span text:style-name="T107">次</text:span></text:p>
          </table:table-cell>
          <table:table-cell table:style-name="表格23.A2" office:value-type="string">
            <text:p text:style-name="P25" loext:marker-style-name="T108"><text:span text:style-name="T107">每層各問一次，共多次</text:span><text:span text:style-name="T108"/></text:p>
          </table:table-cell>
        </table:table-row>
        <table:table-row table:style-name="表格23.1">
          <table:table-cell table:style-name="表格23.A3" office:value-type="string">
            <text:p text:style-name="P25" loext:marker-style-name="T108"><text:span text:style-name="T107">常見場合</text:span><text:span text:style-name="T108"/></text:p>
          </table:table-cell>
          <table:table-cell table:style-name="表格23.A3" office:value-type="string">
            <text:p text:style-name="P25" loext:marker-style-name="T108"><text:span text:style-name="T107">一般使用者 → </text:span><text:span text:style-name="T141">Local DNS</text:span></text:p>
          </table:table-cell>
          <table:table-cell table:style-name="表格23.A3" office:value-type="string">
            <text:p text:style-name="P25" loext:marker-style-name="T108"><text:span text:style-name="T141">DNS </text:span><text:span text:style-name="T107">伺服器之間互查</text:span></text:p>
          </table:table-cell>
        </table:table-row>
      </table:table>
      <text:h text:style-name="P2" text:outline-level="3"><text:soft-page-break/><text:span text:style-name="T153">▍</text:span><text:span text:style-name="T154"> ⑪ </text:span><text:span text:style-name="T155">企業資安關鍵對：</text:span><text:span text:style-name="T154">RTO/RPO</text:span><text:span text:style-name="T155">、</text:span><text:span text:style-name="T154">EDR/MDR</text:span><text:span text:style-name="T155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6" loext:marker-style-name="T66"><text:span text:style-name="T65">指標 </text:span><text:span text:style-name="T75">/ </text:span><text:span text:style-name="T65">名詞</text:span></text:p>
            </table:table-cell>
            <table:table-cell table:style-name="表格24.A1" office:value-type="string">
              <text:p text:style-name="P6" loext:marker-style-name="T66"><text:span text:style-name="T65">意義</text:span><text:span text:style-name="T66"/></text:p>
            </table:table-cell>
            <table:table-cell table:style-name="表格24.A1" office:value-type="string">
              <text:p text:style-name="P6" loext:marker-style-name="T66"><text:span text:style-name="T65">一句話記憶</text:span><text:span text:style-name="T66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5" loext:marker-style-name="T80"><text:span text:style-name="T121">RTO</text:span><text:span text:style-name="T80"/></text:p>
          </table:table-cell>
          <table:table-cell table:style-name="表格24.A2" office:value-type="string">
            <text:p text:style-name="P25" loext:marker-style-name="T80"><text:span text:style-name="T121">Recovery Time Objective </text:span><text:span text:style-name="T79">復原時間目標</text:span></text:p>
          </table:table-cell>
          <table:table-cell table:style-name="表格24.A2" office:value-type="string">
            <text:p text:style-name="P25" loext:marker-style-name="T50"><text:span text:style-name="T49">停機時間（能停多久）</text:span><text:span text:style-name="T50"/></text:p>
          </table:table-cell>
        </table:table-row>
        <table:table-row table:style-name="表格24.1">
          <table:table-cell table:style-name="表格24.A3" office:value-type="string">
            <text:p text:style-name="P25" loext:marker-style-name="T80"><text:span text:style-name="T121">RPO</text:span><text:span text:style-name="T80"/></text:p>
          </table:table-cell>
          <table:table-cell table:style-name="表格24.A3" office:value-type="string">
            <text:p text:style-name="P25" loext:marker-style-name="T80"><text:span text:style-name="T121">Recovery Point Objective </text:span><text:span text:style-name="T79">復原點目標</text:span></text:p>
          </table:table-cell>
          <table:table-cell table:style-name="表格24.A3" office:value-type="string">
            <text:p text:style-name="P25" loext:marker-style-name="T50"><text:span text:style-name="T49">資料損失量（能丟幾小時）</text:span><text:span text:style-name="T50"/></text:p>
          </table:table-cell>
        </table:table-row>
        <table:table-row table:style-name="表格24.1">
          <table:table-cell table:style-name="表格24.A2" office:value-type="string">
            <text:p text:style-name="P25" loext:marker-style-name="T80"><text:span text:style-name="T121">EDR</text:span><text:span text:style-name="T80"/></text:p>
          </table:table-cell>
          <table:table-cell table:style-name="表格24.A2" office:value-type="string">
            <text:p text:style-name="P25" loext:marker-style-name="T80"><text:span text:style-name="T121">Endpoint Detection &amp; Response</text:span><text:span text:style-name="T80"/></text:p>
          </table:table-cell>
          <table:table-cell table:style-name="表格24.A2" office:value-type="string">
            <text:p text:style-name="P25" loext:marker-style-name="T80"><text:span text:style-name="T79">自己買工具守（需內部資安人員）</text:span><text:span text:style-name="T80"/></text:p>
          </table:table-cell>
        </table:table-row>
        <table:table-row table:style-name="表格24.1">
          <table:table-cell table:style-name="表格24.A3" office:value-type="string">
            <text:p text:style-name="P25" loext:marker-style-name="T80"><text:span text:style-name="T121">MDR</text:span><text:span text:style-name="T80"/></text:p>
          </table:table-cell>
          <table:table-cell table:style-name="表格24.A3" office:value-type="string">
            <text:p text:style-name="P25" loext:marker-style-name="T80"><text:span text:style-name="T121">Managed Detection &amp; Response</text:span><text:span text:style-name="T80"/></text:p>
          </table:table-cell>
          <table:table-cell table:style-name="表格24.A3" office:value-type="string">
            <text:p text:style-name="P25" loext:marker-style-name="T80"><text:span text:style-name="T79">請資安公司委外守（</text:span><text:span text:style-name="T121">24</text:span><text:span text:style-name="T79">／</text:span><text:span text:style-name="T121">7</text:span><text:span text:style-name="T79">，適合中小企業）</text:span></text:p>
          </table:table-cell>
        </table:table-row>
      </table:table>
      <text:h text:style-name="P2" text:outline-level="3"><text:span text:style-name="T153">▍</text:span><text:span text:style-name="T154"> ⑫ </text:span><text:span text:style-name="T155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22" loext:marker-style-name="T66"><text:span text:style-name="T75">Protocol </text:span><text:span text:style-name="T65">值</text:span></text:p>
            </table:table-cell>
            <table:table-cell table:style-name="表格25.A1" office:value-type="string">
              <text:p text:style-name="P22" loext:marker-style-name="T66"><text:span text:style-name="T75">DF Flag</text:span><text:span text:style-name="T66"/></text:p>
            </table:table-cell>
            <table:table-cell table:style-name="表格25.A1" office:value-type="string">
              <text:p text:style-name="P22" loext:marker-style-name="T66"><text:span text:style-name="T75">MF Flag</text:span><text:span text:style-name="T66"/></text:p>
            </table:table-cell>
            <table:table-cell table:style-name="表格25.A1" office:value-type="string">
              <text:p text:style-name="P22" loext:marker-style-name="T66"><text:span text:style-name="T65">關鍵公式</text:span><text:span text:style-name="T66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5" loext:marker-style-name="T80"><text:span text:style-name="T121">ICMP=1 / TCP=6 / UDP=17</text:span><text:span text:style-name="T80"/></text:p>
          </table:table-cell>
          <table:table-cell table:style-name="表格25.A2" office:value-type="string">
            <text:p text:style-name="P25" loext:marker-style-name="T80"><text:span text:style-name="T121">DF=1</text:span><text:span text:style-name="T79">：禁止切，太大就丟＋</text:span><text:span text:style-name="T121">ICMP</text:span></text:p>
          </table:table-cell>
          <table:table-cell table:style-name="表格25.A2" office:value-type="string">
            <text:p text:style-name="P25" loext:marker-style-name="T80"><text:span text:style-name="T121">MF=1</text:span><text:span text:style-name="T79">：後面還有分段（最後段</text:span><text:span text:style-name="T121">=0</text:span><text:span text:style-name="T79">）</text:span></text:p>
          </table:table-cell>
          <table:table-cell table:style-name="表格25.A2" office:value-type="string">
            <text:p text:style-name="P25" loext:marker-style-name="T31"><text:span text:style-name="T39">Offset=</text:span><text:span text:style-name="T32">起始</text:span><text:span text:style-name="T39">÷8</text:span><text:span text:style-name="T32">；</text:span><text:span text:style-name="T39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8"><text:span text:style-name="T151">✅ <text:s/></text:span><text:span text:style-name="T48">提醒</text:span></text:p>
            <text:p text:style-name="P9" loext:marker-style-name="T96"><text:span text:style-name="T95">以上即全書精華。接下來各篇為完整觀念詳解、生活比喻、申論寫法與考試陷阱，務必至少讀過一遍以建立理解，再用本篇反覆速記。</text:span><text:span text:style-name="T96"/></text:p>
          </table:table-cell>
          <table:covered-table-cell/>
          <table:covered-table-cell/>
          <table:covered-table-cell/>
        </table:table-row>
      </table:table>
      <text:h text:style-name="P13" text:outline-level="1" loext:marker-style-name="T68"><text:span text:style-name="T67">第 一 篇　網路基礎架構：</text:span><text:span text:style-name="T68">OSI / TCP-IP · </text:span><text:span text:style-name="T67">協定 </text:span><text:span text:style-name="T68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8"><text:span text:style-name="T151">🌐 <text:s/></text:span><text:span text:style-name="T48">本篇重點</text:span></text:p>
            <text:p text:style-name="P9" loext:marker-style-name="T96"><text:span text:style-name="T95">本篇先建立整個網路的「分層」骨架，再逐層認識常見協定，最後切入網路層三大工作與兩個必考工具（</text:span><text:span text:style-name="T129">ARP</text:span><text:span text:style-name="T95">、</text:span><text:span text:style-name="T129">Traceroute</text:span><text:span text:style-name="T95">）。理解每一層的「責任」，比死背名詞更重要。</text:span></text:p>
          </table:table-cell>
        </table:table-row>
      </table:table>
      <text:h text:style-name="P3" text:outline-level="2" loext:marker-style-name="T27"><text:span text:style-name="T28">一、用「寄信」理解分層（修正版）</text:span><text:span text:style-name="T27"/></text:h>
      <text:p text:style-name="P31" loext:marker-style-name="T96"><text:span text:style-name="T95">每一層就像寄信流程中各自獨立的環節，各司其職、互不干涉：</text:span><text:span text:style-name="T96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6" loext:marker-style-name="T66"><text:span text:style-name="T75">TCP/IP </text:span><text:span text:style-name="T65">層</text:span></text:p>
            </table:table-cell>
            <table:table-cell table:style-name="表格27.A1" office:value-type="string">
              <text:p text:style-name="P6" loext:marker-style-name="T66"><text:span text:style-name="T65">郵寄比喻</text:span><text:span text:style-name="T66"/></text:p>
            </table:table-cell>
            <table:table-cell table:style-name="表格27.A1" office:value-type="string">
              <text:p text:style-name="P6" loext:marker-style-name="T66"><text:span text:style-name="T65">實際負責的事</text:span><text:span text:style-name="T66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5" loext:marker-style-name="T80"><text:span text:style-name="T121">🟢 </text:span><text:span text:style-name="T79">應用層 </text:span><text:span text:style-name="T121">Application</text:span></text:p>
          </table:table-cell>
          <table:table-cell table:style-name="表格27.A2" office:value-type="string">
            <text:p text:style-name="P25" loext:marker-style-name="T80"><text:span text:style-name="T79">決定「</text:span><text:span text:style-name="T82">寄什麼內容</text:span><text:span text:style-name="T79">」（信的內容與格式）</text:span></text:p>
          </table:table-cell>
          <table:table-cell table:style-name="表格27.A2" office:value-type="string">
            <text:p text:style-name="P25" loext:marker-style-name="T80"><text:span text:style-name="T121">HTTP</text:span><text:span text:style-name="T79">、</text:span><text:span text:style-name="T121">DNS</text:span><text:span text:style-name="T79">、</text:span><text:span text:style-name="T121">DHCP</text:span><text:span text:style-name="T79">、</text:span><text:span text:style-name="T121">SSH …</text:span><text:span text:style-name="T79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5" loext:marker-style-name="T80"><text:span text:style-name="T121">🟡 </text:span><text:span text:style-name="T79">傳輸層 </text:span><text:span text:style-name="T121">Transport</text:span></text:p>
          </table:table-cell>
          <table:table-cell table:style-name="表格27.A3" office:value-type="string">
            <text:p text:style-name="P25" loext:marker-style-name="T212"><text:span text:style-name="T211">切分、編頁碼、確認收件</text:span><text:span text:style-name="T212"/></text:p>
          </table:table-cell>
          <table:table-cell table:style-name="表格27.A3" office:value-type="string">
            <text:p text:style-name="P25" loext:marker-style-name="T80"><text:span text:style-name="T121">TCP / UDP</text:span><text:span text:style-name="T79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5" loext:marker-style-name="T80"><text:span text:style-name="T121">🔵 </text:span><text:span text:style-name="T79">網路層 </text:span><text:span text:style-name="T121">Network</text:span></text:p>
          </table:table-cell>
          <table:table-cell table:style-name="表格27.A2" office:value-type="string">
            <text:p text:style-name="P25" loext:marker-style-name="T80"><text:span text:style-name="T215">寫地址＋規劃路線</text:span><text:span text:style-name="T79">（郵遞區號＋郵局選路）</text:span></text:p>
          </table:table-cell>
          <table:table-cell table:style-name="表格27.A2" office:value-type="string">
            <text:p text:style-name="P25" loext:marker-style-name="T223"><text:span text:style-name="T216">IP </text:span><text:span text:style-name="T222">路由、</text:span><text:span text:style-name="T216">ICMP</text:span><text:span text:style-name="T222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5" loext:marker-style-name="T80"><text:span text:style-name="T121">🟠 </text:span><text:span text:style-name="T79">連結層 </text:span><text:span text:style-name="T121">Link</text:span></text:p>
          </table:table-cell>
          <table:table-cell table:style-name="表格27.A3" office:value-type="string">
            <text:p text:style-name="P25" loext:marker-style-name="T80"><text:span text:style-name="T79">當前路段的區域配送</text:span><text:span text:style-name="T80"/></text:p>
          </table:table-cell>
          <table:table-cell table:style-name="表格27.A3" office:value-type="string">
            <text:p text:style-name="P25" loext:marker-style-name="T262"><text:span text:style-name="T258">Ethernet</text:span><text:span text:style-name="T261">、</text:span><text:span text:style-name="T258">ARP</text:span><text:span text:style-name="T261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8"><text:span text:style-name="T151">⚠️ <text:s/></text:span><text:span text:style-name="T173">舊版三大比喻的錯誤</text:span></text:p>
            <text:p text:style-name="P9"><text:span text:style-name="T133">❌ </text:span><text:span text:style-name="T99">舊：「寫地址 → 應用層」　</text:span><text:span text:style-name="T129">IP </text:span><text:span text:style-name="T95">位址屬於網路層；應用層負責的是「內容與格式」，不是地址。</text:span></text:p>
            <text:p text:style-name="P10"><text:span text:style-name="T133">❌ </text:span><text:span text:style-name="T99">舊：「打包 → 傳輸層」　</text:span><text:span text:style-name="T95">傳輸層還負責切割、編號、重傳、流量控制，遠不只「打包」。</text:span></text:p>
            <text:p text:style-name="P10"><text:span text:style-name="T133">❌ </text:span><text:span text:style-name="T99">舊：「實際搬運 → 連結層」　</text:span><text:span text:style-name="T95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3" text:outline-level="2" loext:marker-style-name="T27"><text:span text:style-name="T28">二、</text:span><text:span text:style-name="T27">OSI 7 </text:span><text:span text:style-name="T28">層 </text:span><text:span text:style-name="T27">vs TCP/IP 4 </text:span><text:span text:style-name="T28">層（完整對照）</text:span></text:h>
      <text:p text:style-name="P31" loext:marker-style-name="T96"><text:span text:style-name="T134">OSI </text:span><text:span text:style-name="T100">是理論模型（</text:span><text:span text:style-name="T134">7 </text:span><text:span text:style-name="T100">層）</text:span><text:span text:style-name="T95">；</text:span><text:span text:style-name="T135">TCP/IP </text:span><text:span text:style-name="T101">是實際使用的模型（</text:span><text:span text:style-name="T135">4 </text:span><text:span text:style-name="T101">層）</text:span><text:span text:style-name="T95">。</text:span><text:span text:style-name="T129">TCP/IP </text:span><text:span text:style-name="T95">將 </text:span><text:span text:style-name="T129">OSI </text:span><text:span text:style-name="T95">的 </text:span><text:span text:style-name="T129">Session </text:span><text:span text:style-name="T95">層與 </text:span><text:span text:style-name="T129">Presentation </text:span><text:span text:style-name="T95">層併入 </text:span><text:span text:style-name="T129">Application </text:span><text:span text:style-name="T95">層，並把 </text:span><text:span text:style-name="T129">Physical </text:span><text:span text:style-name="T95">併入 </text:span><text:span text:style-name="T129">Link</text:span><text:span text:style-name="T95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2" loext:marker-style-name="T66"><text:span text:style-name="T65">層號</text:span><text:span text:style-name="T66"/></text:p>
            </table:table-cell>
            <table:table-cell table:style-name="表格28.A1" office:value-type="string">
              <text:p text:style-name="P22" loext:marker-style-name="T66"><text:span text:style-name="T75">OSI </text:span><text:span text:style-name="T65">層名</text:span></text:p>
            </table:table-cell>
            <table:table-cell table:style-name="表格28.A1" office:value-type="string">
              <text:p text:style-name="P22" loext:marker-style-name="T66"><text:span text:style-name="T65">主要功能</text:span><text:span text:style-name="T66"/></text:p>
            </table:table-cell>
            <table:table-cell table:style-name="表格28.A1" office:value-type="string">
              <text:p text:style-name="P22" loext:marker-style-name="T66"><text:span text:style-name="T75">TCP/IP </text:span><text:span text:style-name="T65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4" loext:marker-style-name="T80"><text:span text:style-name="T121">7</text:span><text:span text:style-name="T80"/></text:p>
          </table:table-cell>
          <table:table-cell table:style-name="表格28.A2" office:value-type="string">
            <text:p text:style-name="P25" loext:marker-style-name="T80"><text:span text:style-name="T121">Application </text:span><text:span text:style-name="T84">應</text:span><text:span text:style-name="T79">用層</text:span></text:p>
          </table:table-cell>
          <table:table-cell table:style-name="表格28.A2" office:value-type="string">
            <text:p text:style-name="P25" loext:marker-style-name="T80"><text:span text:style-name="T79">使用者直接操作：</text:span><text:span text:style-name="T121">HTTP</text:span><text:span text:style-name="T79">、</text:span><text:span text:style-name="T121">DNS</text:span><text:span text:style-name="T79">、</text:span><text:span text:style-name="T121">DHCP</text:span></text:p>
          </table:table-cell>
          <table:table-cell table:style-name="表格28.A2" office:value-type="string">
            <text:p text:style-name="P25" loext:marker-style-name="T80"><text:span text:style-name="T121">Application</text:span><text:span text:style-name="T80"/></text:p>
          </table:table-cell>
        </table:table-row>
        <table:table-row table:style-name="表格28.1">
          <table:table-cell table:style-name="表格28.A3" office:value-type="string">
            <text:p text:style-name="P24" loext:marker-style-name="T80"><text:span text:style-name="T121">6</text:span><text:span text:style-name="T80"/></text:p>
          </table:table-cell>
          <table:table-cell table:style-name="表格28.A3" office:value-type="string">
            <text:p text:style-name="P25" loext:marker-style-name="T80"><text:span text:style-name="T121">Presentation </text:span><text:span text:style-name="T84">表</text:span><text:span text:style-name="T79">示層</text:span></text:p>
          </table:table-cell>
          <table:table-cell table:style-name="表格28.A3" office:value-type="string">
            <text:p text:style-name="P25" loext:marker-style-name="T276"><text:span text:style-name="T275">資料格式轉換、加解密、壓縮</text:span><text:span text:style-name="T276"/></text:p>
          </table:table-cell>
          <table:table-cell table:style-name="表格28.A3" office:value-type="string">
            <text:p text:style-name="P25" loext:marker-style-name="T80"><text:span text:style-name="T121">↑ </text:span><text:span text:style-name="T79">併入 </text:span><text:span text:style-name="T121">Application</text:span></text:p>
          </table:table-cell>
        </table:table-row>
        <table:table-row table:style-name="表格28.1">
          <table:table-cell table:style-name="表格28.A2" office:value-type="string">
            <text:p text:style-name="P24" loext:marker-style-name="T80"><text:span text:style-name="T121">5</text:span><text:span text:style-name="T80"/></text:p>
          </table:table-cell>
          <table:table-cell table:style-name="表格28.A2" office:value-type="string">
            <text:p text:style-name="P25" loext:marker-style-name="T80"><text:span text:style-name="T121">Session </text:span><text:span text:style-name="T84">會</text:span><text:span text:style-name="T79">話層</text:span></text:p>
          </table:table-cell>
          <table:table-cell table:style-name="表格28.A2" office:value-type="string">
            <text:p text:style-name="P25" loext:marker-style-name="T291"><text:span text:style-name="T290">連線的建立、維持與終止</text:span><text:span text:style-name="T291"/></text:p>
          </table:table-cell>
          <table:table-cell table:style-name="表格28.A2" office:value-type="string">
            <text:p text:style-name="P25" loext:marker-style-name="T80"><text:span text:style-name="T121">↑ </text:span><text:span text:style-name="T79">併入 </text:span><text:span text:style-name="T121">Application</text:span></text:p>
          </table:table-cell>
        </table:table-row>
        <table:table-row table:style-name="表格28.1">
          <table:table-cell table:style-name="表格28.A3" office:value-type="string">
            <text:p text:style-name="P24" loext:marker-style-name="T80"><text:span text:style-name="T121">4</text:span><text:span text:style-name="T80"/></text:p>
          </table:table-cell>
          <table:table-cell table:style-name="表格28.A3" office:value-type="string">
            <text:p text:style-name="P25" loext:marker-style-name="T80"><text:span text:style-name="T121">Transport </text:span><text:span text:style-name="T84">傳</text:span><text:span text:style-name="T79">輸層</text:span></text:p>
          </table:table-cell>
          <table:table-cell table:style-name="表格28.A3" office:value-type="string">
            <text:p text:style-name="P25" loext:marker-style-name="T80"><text:span text:style-name="T79">端對端傳輸控制（</text:span><text:span text:style-name="T121">TCP / UDP</text:span><text:span text:style-name="T79">）</text:span></text:p>
          </table:table-cell>
          <table:table-cell table:style-name="表格28.A3" office:value-type="string">
            <text:p text:style-name="P25" loext:marker-style-name="T80"><text:span text:style-name="T121">Transport</text:span><text:span text:style-name="T80"/></text:p>
          </table:table-cell>
        </table:table-row>
        <table:table-row table:style-name="表格28.1">
          <table:table-cell table:style-name="表格28.A2" office:value-type="string">
            <text:p text:style-name="P24" loext:marker-style-name="T80"><text:span text:style-name="T121">3</text:span><text:span text:style-name="T80"/></text:p>
          </table:table-cell>
          <table:table-cell table:style-name="表格28.A2" office:value-type="string">
            <text:p text:style-name="P25" loext:marker-style-name="T80"><text:span text:style-name="T121">Network </text:span><text:span text:style-name="T84">網</text:span><text:span text:style-name="T79">路層</text:span></text:p>
          </table:table-cell>
          <table:table-cell table:style-name="表格28.A2" office:value-type="string">
            <text:p text:style-name="P25" loext:marker-style-name="T262"><text:span text:style-name="T258">IP </text:span><text:span text:style-name="T261">路由、</text:span><text:span text:style-name="T258">ICMP </text:span><text:span text:style-name="T261">錯誤回報</text:span></text:p>
          </table:table-cell>
          <table:table-cell table:style-name="表格28.A2" office:value-type="string">
            <text:p text:style-name="P25" loext:marker-style-name="T80"><text:span text:style-name="T121">Internet</text:span><text:span text:style-name="T80"/></text:p>
          </table:table-cell>
        </table:table-row>
        <table:table-row table:style-name="表格28.1">
          <table:table-cell table:style-name="表格28.A3" office:value-type="string">
            <text:p text:style-name="P24" loext:marker-style-name="T80"><text:span text:style-name="T121">2</text:span><text:span text:style-name="T80"/></text:p>
          </table:table-cell>
          <table:table-cell table:style-name="表格28.A3" office:value-type="string">
            <text:p text:style-name="P25" loext:marker-style-name="T80"><text:span text:style-name="T121">Data Link </text:span><text:span text:style-name="T294">資</text:span><text:span text:style-name="T79">料鏈結層</text:span></text:p>
          </table:table-cell>
          <table:table-cell table:style-name="表格28.A3" office:value-type="string">
            <text:p text:style-name="P25" loext:marker-style-name="T303"><text:span text:style-name="T296">MAC </text:span><text:span text:style-name="T302">位址、區域網路傳輸（</text:span><text:span text:style-name="T296">ARP</text:span><text:span text:style-name="T302">）</text:span></text:p>
          </table:table-cell>
          <table:table-cell table:style-name="表格28.A3" office:value-type="string">
            <text:p text:style-name="P25" loext:marker-style-name="T80"><text:span text:style-name="T121">Link</text:span><text:span text:style-name="T80"/></text:p>
          </table:table-cell>
        </table:table-row>
        <table:table-row table:style-name="表格28.1">
          <table:table-cell table:style-name="表格28.A2" office:value-type="string">
            <text:p text:style-name="P24" loext:marker-style-name="T80"><text:span text:style-name="T121">1</text:span><text:span text:style-name="T80"/></text:p>
          </table:table-cell>
          <table:table-cell table:style-name="表格28.A2" office:value-type="string">
            <text:p text:style-name="P25" loext:marker-style-name="T80"><text:span text:style-name="T121">Physical </text:span><text:span text:style-name="T84">實</text:span><text:span text:style-name="T79">體層</text:span></text:p>
          </table:table-cell>
          <table:table-cell table:style-name="表格28.A2" office:value-type="string">
            <text:p text:style-name="P25" loext:marker-style-name="T80"><text:span text:style-name="T79">電訊號、光訊號、無線電波</text:span><text:span text:style-name="T80"/></text:p>
          </table:table-cell>
          <table:table-cell table:style-name="表格28.A2" office:value-type="string">
            <text:p text:style-name="P25" loext:marker-style-name="T80"><text:span text:style-name="T121">↑ </text:span><text:span text:style-name="T79">併入 </text:span><text:span text:style-name="T121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8"><text:span text:style-name="T151">⚡ <text:s/></text:span><text:span text:style-name="T155">速記</text:span></text:p>
            <text:p text:style-name="P9" loext:marker-style-name="T96"><text:span text:style-name="T134">OSI → 7 </text:span><text:span text:style-name="T100">層（理論）</text:span><text:span text:style-name="T95">，</text:span><text:span text:style-name="T135">TCP/IP → 4 </text:span><text:span text:style-name="T101">層（實際）</text:span><text:span text:style-name="T95">；差別在於 </text:span><text:span text:style-name="T129">TCP/IP </text:span><text:span text:style-name="T95">少了獨立的 </text:span><text:span text:style-name="T129">Session </text:span><text:span text:style-name="T95">與 </text:span><text:span text:style-name="T129">Presentation </text:span><text:span text:style-name="T95">兩層。</text:span></text:p>
          </table:table-cell>
          <table:covered-table-cell/>
          <table:covered-table-cell/>
          <table:covered-table-cell/>
        </table:table-row>
      </table:table>
      <text:h text:style-name="P3" text:outline-level="2"><text:soft-page-break/><text:span text:style-name="T2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22" loext:marker-style-name="T66"><text:span text:style-name="T75">🟢 Application </text:span><text:span text:style-name="T65">應用層</text:span></text:p>
            </table:table-cell>
            <table:table-cell table:style-name="表格29.A1" office:value-type="string">
              <text:p text:style-name="P22" loext:marker-style-name="T66"><text:span text:style-name="T75">🟡 Transport </text:span><text:span text:style-name="T65">傳輸層</text:span></text:p>
            </table:table-cell>
            <table:table-cell table:style-name="表格29.A1" office:value-type="string">
              <text:p text:style-name="P22" loext:marker-style-name="T66"><text:span text:style-name="T75">🔵 Network </text:span><text:span text:style-name="T65">網路層</text:span></text:p>
            </table:table-cell>
            <table:table-cell table:style-name="表格29.A1" office:value-type="string">
              <text:p text:style-name="P22" loext:marker-style-name="T66"><text:span text:style-name="T75">🟠 Link </text:span><text:span text:style-name="T65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5" loext:marker-style-name="T80"><text:span text:style-name="T121">HTTP / HTTPS</text:span><text:span text:style-name="T79">、</text:span><text:span text:style-name="T121">DNS</text:span><text:span text:style-name="T79">、</text:span><text:span text:style-name="T121">DHCP</text:span><text:span text:style-name="T79">、</text:span><text:span text:style-name="T121">SSH</text:span><text:span text:style-name="T79">、</text:span><text:span text:style-name="T121">MQTT</text:span><text:span text:style-name="T79">、</text:span><text:span text:style-name="T122">OSPF*</text:span></text:p>
          </table:table-cell>
          <table:table-cell table:style-name="表格29.A2" office:value-type="string">
            <text:p text:style-name="P25" loext:marker-style-name="T343"><text:span text:style-name="T339">TCP</text:span><text:span text:style-name="T342">（可靠傳輸）、</text:span><text:span text:style-name="T339">UDP</text:span><text:span text:style-name="T342">（高速傳輸）</text:span></text:p>
          </table:table-cell>
          <table:table-cell table:style-name="表格29.A2" office:value-type="string">
            <text:p text:style-name="P25" loext:marker-style-name="T80"><text:span text:style-name="T121">IP</text:span><text:span text:style-name="T79">（路由定址）、</text:span><text:span text:style-name="T363">ICMP</text:span><text:span text:style-name="T366">（錯誤回報 </text:span><text:span text:style-name="T363">/ ping</text:span><text:span text:style-name="T366">）</text:span></text:p>
          </table:table-cell>
          <table:table-cell table:style-name="表格29.A2" office:value-type="string">
            <text:p text:style-name="P25" loext:marker-style-name="T80"><text:span text:style-name="T121">Ethernet</text:span><text:span text:style-name="T79">（有線網路）、</text:span><text:span text:style-name="T259">ARP</text:span><text:span text:style-name="T263">（</text:span><text:span text:style-name="T259">IP → MAC</text:span><text:span text:style-name="T26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9"><text:span text:style-name="T174">OSPF </text:span><text:span text:style-name="T169">分層備註：</text:span><text:span text:style-name="T129">OSPF </text:span><text:span text:style-name="T95">在 </text:span><text:span text:style-name="T129">OSI </text:span><text:span text:style-name="T95">模型屬第 </text:span><text:span text:style-name="T129">3 </text:span><text:span text:style-name="T95">層（</text:span><text:span text:style-name="T129">Network</text:span><text:span text:style-name="T95">）；但在 </text:span><text:span text:style-name="T129">TCP/IP </text:span><text:span text:style-name="T95">模型中，因為它直接跑在 </text:span><text:span text:style-name="T129">IP </text:span><text:span text:style-name="T95">上（不透過 </text:span><text:span text:style-name="T129">TCP/UDP</text:span><text:span text:style-name="T95">），通常歸為 </text:span><text:span text:style-name="T129">Application </text:span><text:span text:style-name="T95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四、常見協定詳解：</text:span><text:span text:style-name="T27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6" loext:marker-style-name="T72"><text:span text:style-name="T71">協定</text:span><text:span text:style-name="T72"/></text:p>
            </table:table-cell>
            <table:table-cell table:style-name="表格30.A1" office:value-type="string">
              <text:p text:style-name="P6" loext:marker-style-name="T72"><text:span text:style-name="T71">層級</text:span><text:span text:style-name="T72"/></text:p>
            </table:table-cell>
            <table:table-cell table:style-name="表格30.A1" office:value-type="string">
              <text:p text:style-name="P6" loext:marker-style-name="T72"><text:span text:style-name="T71">做什麼（白話）</text:span><text:span text:style-name="T72"/></text:p>
            </table:table-cell>
            <table:table-cell table:style-name="表格30.A1" office:value-type="string">
              <text:p text:style-name="P6" loext:marker-style-name="T72"><text:span text:style-name="T71">生活比喻</text:span><text:span text:style-name="T72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5" loext:marker-style-name="T112"><text:span text:style-name="T143">DHCP</text:span><text:span text:style-name="T144"> Dynamic Host Configuration Protocol</text:span></text:p>
          </table:table-cell>
          <table:table-cell table:style-name="表格30.A2" office:value-type="string">
            <text:p text:style-name="P25" loext:marker-style-name="T112"><text:span text:style-name="T113">應用層</text:span><text:span text:style-name="T112"/></text:p>
          </table:table-cell>
          <table:table-cell table:style-name="表格30.A2" office:value-type="string">
            <text:p text:style-name="P25" loext:marker-style-name="T112"><text:span text:style-name="T114">連上 </text:span><text:span text:style-name="T146">WiFi </text:span><text:span text:style-name="T114">時不必手動設定 </text:span><text:span text:style-name="T146">IP</text:span><text:span text:style-name="T113">，</text:span><text:span text:style-name="T144">DHCP </text:span><text:span text:style-name="T113">伺服器</text:span><text:span text:style-name="T265">自動分配一個 </text:span><text:span text:style-name="T271">IP </text:span><text:span text:style-name="T265">給你</text:span><text:span text:style-name="T113">。</text:span></text:p>
          </table:table-cell>
          <table:table-cell table:style-name="表格30.A2" office:value-type="string">
            <text:p text:style-name="P25" loext:marker-style-name="T112"><text:span text:style-name="T113">進飯店前台自動安排房號</text:span><text:span text:style-name="T112"/></text:p>
          </table:table-cell>
        </table:table-row>
        <table:table-row table:style-name="表格30.1">
          <table:table-cell table:style-name="表格30.A3" office:value-type="string">
            <text:p text:style-name="P25" loext:marker-style-name="T112"><text:span text:style-name="T143">SSH</text:span><text:span text:style-name="T144"> Secure Shell</text:span></text:p>
          </table:table-cell>
          <table:table-cell table:style-name="表格30.A3" office:value-type="string">
            <text:p text:style-name="P25" loext:marker-style-name="T112"><text:span text:style-name="T113">應用層</text:span><text:span text:style-name="T112"/></text:p>
          </table:table-cell>
          <table:table-cell table:style-name="表格30.A3" office:value-type="string">
            <text:p text:style-name="P25" loext:marker-style-name="T112"><text:span text:style-name="T348">透過加密通道遠端操控</text:span><text:span text:style-name="T113">另一台 </text:span><text:span text:style-name="T144">Linux</text:span><text:span text:style-name="T113">／伺服器的終端機。</text:span></text:p>
          </table:table-cell>
          <table:table-cell table:style-name="表格30.A3" office:value-type="string">
            <text:p text:style-name="P25" loext:marker-style-name="T112"><text:span text:style-name="T113">加密版的遠端遙控器</text:span><text:span text:style-name="T112"/></text:p>
          </table:table-cell>
        </table:table-row>
        <table:table-row table:style-name="表格30.1">
          <table:table-cell table:style-name="表格30.A2" office:value-type="string">
            <text:p text:style-name="P25" loext:marker-style-name="T112"><text:span text:style-name="T143">MQTT</text:span><text:span text:style-name="T144"> Message Queuing Telemetry Transport</text:span></text:p>
          </table:table-cell>
          <table:table-cell table:style-name="表格30.A2" office:value-type="string">
            <text:p text:style-name="P25" loext:marker-style-name="T112"><text:span text:style-name="T113">應用層</text:span><text:span text:style-name="T112"/></text:p>
          </table:table-cell>
          <table:table-cell table:style-name="表格30.A2" office:value-type="string">
            <text:p text:style-name="P25" loext:marker-style-name="T112"><text:span text:style-name="T327">IoT </text:span><text:span text:style-name="T311">裝置常用的輕量傳訊協定</text:span><text:span text:style-name="T113">，採</text:span><text:span text:style-name="T375">「發布／訂閱」模式</text:span><text:span text:style-name="T113">，非常省流量。</text:span></text:p>
          </table:table-cell>
          <table:table-cell table:style-name="表格30.A2" office:value-type="string">
            <text:p text:style-name="P25" loext:marker-style-name="T112"><text:span text:style-name="T113">溫度感測器發布「</text:span><text:span text:style-name="T144">30°C</text:span><text:span text:style-name="T113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5" loext:marker-style-name="T112"><text:span text:style-name="T143">OSPF</text:span><text:span text:style-name="T144"> Open Shortest Path First</text:span></text:p>
          </table:table-cell>
          <table:table-cell table:style-name="表格30.A3" office:value-type="string">
            <text:p text:style-name="P25" loext:marker-style-name="T112"><text:span text:style-name="T113">視模型而定 ⚠️</text:span><text:span text:style-name="T112"/></text:p>
          </table:table-cell>
          <table:table-cell table:style-name="表格30.A3" office:value-type="string">
            <text:p text:style-name="P25" loext:marker-style-name="T112"><text:span text:style-name="T230">路由器之間使用</text:span><text:span text:style-name="T113">，</text:span><text:span text:style-name="T266">自動計算封包走哪條路徑最短、最快</text:span><text:span text:style-name="T113">。</text:span></text:p>
          </table:table-cell>
          <table:table-cell table:style-name="表格30.A3" office:value-type="string">
            <text:p text:style-name="P25" loext:marker-style-name="T112"><text:span text:style-name="T144">Google Maps </text:span><text:span text:style-name="T113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8"><text:span text:style-name="T151">💡 <text:s/></text:span><text:span text:style-name="T155">快速判斷層級的技巧</text:span></text:p>
            <text:p text:style-name="P9"><text:span text:style-name="T158">使用者／應用服務</text:span><text:span text:style-name="T95">（</text:span><text:span text:style-name="T129">SSH</text:span><text:span text:style-name="T95">、</text:span><text:span text:style-name="T129">DHCP</text:span><text:span text:style-name="T95">、</text:span><text:span text:style-name="T129">MQTT</text:span><text:span text:style-name="T95">、</text:span><text:span text:style-name="T129">HTTP</text:span><text:span text:style-name="T95">）→ 幾乎都是應用層。</text:span></text:p>
            <text:p text:style-name="P10"><text:span text:style-name="T158">幫路由器決定走哪條路</text:span><text:span text:style-name="T95">（</text:span><text:span text:style-name="T129">OSPF</text:span><text:span text:style-name="T95">、</text:span><text:span text:style-name="T129">RIP</text:span><text:span text:style-name="T95">、</text:span><text:span text:style-name="T129">BGP</text:span><text:span text:style-name="T95">）→ 在 </text:span><text:span text:style-name="T129">OSI </text:span><text:span text:style-name="T95">屬網路層，</text:span><text:span text:style-name="T129">TCP/IP </text:span><text:span text:style-name="T95">多歸應用層。</text:span></text:p>
          </table:table-cell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五、網路層深度解析：</text:span><text:span text:style-name="T27">IP · Routing · ICMP</text:span></text:h>
      <text:p text:style-name="P31" loext:marker-style-name="T96"><text:span text:style-name="T95">網路層（第 </text:span><text:span text:style-name="T129">3 </text:span><text:span text:style-name="T95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22" loext:marker-style-name="T66"><text:span text:style-name="T75">📍 IP</text:span><text:span text:style-name="T65">（位址）</text:span></text:p>
            </table:table-cell>
            <table:table-cell table:style-name="表格31.A1" office:value-type="string">
              <text:p text:style-name="P22" loext:marker-style-name="T66"><text:span text:style-name="T75">🗺️ Routing</text:span><text:span text:style-name="T65">（路由）</text:span></text:p>
            </table:table-cell>
            <table:table-cell table:style-name="表格31.A1" office:value-type="string">
              <text:p text:style-name="P22" loext:marker-style-name="T66"><text:span text:style-name="T75">🚨 ICMP</text:span><text:span text:style-name="T65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5" loext:marker-style-name="T80"><text:span text:style-name="T82">決定「目的地在哪」</text:span><text:span text:style-name="T79">。每台設備都有 </text:span><text:span text:style-name="T121">IP</text:span><text:span text:style-name="T79">，就像門牌；</text:span><text:span text:style-name="T121">IP </text:span><text:span text:style-name="T79">負責標記「我要送去哪裡」。</text:span></text:p>
          </table:table-cell>
          <table:table-cell table:style-name="表格31.A2" office:value-type="string">
            <text:p text:style-name="P25" loext:marker-style-name="T80"><text:span text:style-name="T82">決定「怎麼走最快」</text:span><text:span text:style-name="T79">。</text:span><text:span text:style-name="T86">封包經過很多路由器</text:span><text:span text:style-name="T79">，</text:span><text:span text:style-name="T342">每台都問「下一站往哪送？」</text:span><text:span text:style-name="T216">OSPF </text:span><text:span text:style-name="T222">等協定算出最短路徑。</text:span></text:p>
          </table:table-cell>
          <table:table-cell table:style-name="表格31.A2" office:value-type="string">
            <text:p text:style-name="P25" loext:marker-style-name="T80"><text:span text:style-name="T82">回報「出了什麼問題」</text:span><text:span text:style-name="T79">。找不到主機、路不通、</text:span><text:span text:style-name="T121">TTL </text:span><text:span text:style-name="T79">歸零 → </text:span><text:span text:style-name="T261">各自回傳對應 </text:span><text:span text:style-name="T258">ICMP </text:span><text:span text:style-name="T261">訊息</text:span><text:span text:style-name="T79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8"><text:span text:style-name="T151">🔍 <text:s/></text:span><text:span text:style-name="T59">ping </text:span><text:span text:style-name="T48">是什麼？為什麼跟 </text:span><text:span text:style-name="T59">ICMP </text:span><text:span text:style-name="T48">有關？</text:span></text:p>
            <text:p text:style-name="P9" loext:marker-style-name="T53"><text:span text:style-name="T60">ping google.com </text:span><text:span text:style-name="T51">的運作</text:span><text:span text:style-name="T52">：</text:span></text:p>
            <text:p text:style-name="P10" loext:marker-style-name="T96"><text:span text:style-name="T129">① </text:span><text:span text:style-name="T95">你的電腦發出 </text:span><text:span text:style-name="T134">ICMP Echo Request</text:span><text:span text:style-name="T95">（「你在嗎？」）</text:span></text:p>
            <text:p text:style-name="P10" loext:marker-style-name="T96"><text:span text:style-name="T129">② </text:span><text:span text:style-name="T95">目標主機回傳 </text:span><text:span text:style-name="T134">ICMP Echo Reply</text:span><text:span text:style-name="T95">（「我在！」）</text:span></text:p>
            <text:p text:style-name="P10" loext:marker-style-name="T96"><text:span text:style-name="T129">③ </text:span><text:span text:style-name="T279">顯示來回時間（</text:span><text:span text:style-name="T286">ms</text:span><text:span text:style-name="T279">），數字越小代表網路越暢通</text:span></text:p>
            <text:p text:style-name="P10"><text:span text:style-name="T174">⚠️ </text:span><text:span text:style-name="T169">重點：</text:span><text:span text:style-name="T273">ping </text:span><text:span text:style-name="T268">完全使用 </text:span><text:span text:style-name="T273">ICMP</text:span><text:span text:style-name="T268">，不走 </text:span><text:span text:style-name="T273">TCP </text:span><text:span text:style-name="T268">也不走 </text:span><text:span text:style-name="T273">UDP</text:span><text:span text:style-name="T95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8"><text:span text:style-name="T151">⚡ <text:s/></text:span><text:span text:style-name="T155">三個概念一次記清楚</text:span></text:p>
            <text:p text:style-name="P9"><text:span text:style-name="T166">📍 IP → </text:span><text:span text:style-name="T95">定位（目的地是誰）　</text:span><text:span text:style-name="T158">🗺️ </text:span><text:span text:style-name="T166">Routing → </text:span><text:span text:style-name="T349">選路（怎麼走最快）</text:span><text:span text:style-name="T95">　</text:span><text:span text:style-name="T158">🚨 </text:span><text:span text:style-name="T167">ICMP → </text:span><text:span text:style-name="T268">回報（出錯了通知你）</text:span></text:p>
          </table:table-cell>
          <table:covered-table-cell/>
          <table:covered-table-cell/>
        </table:table-row>
      </table:table>
      <text:h text:style-name="P3" text:outline-level="2"><text:soft-page-break/><text:span text:style-name="T28">六、</text:span><text:span text:style-name="T27">TCP vs UDP </text:span><text:span text:style-name="T28">差異比較</text:span></text:h>
      <text:p text:style-name="P31" loext:marker-style-name="T96"><text:span text:style-name="T95">傳輸層最核心的兩個協定，差異在於「是否保證送達」（更深入的擁塞控制見第五篇）。</text:span><text:span text:style-name="T96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6" loext:marker-style-name="T70"><text:span text:style-name="T69">比較項目</text:span><text:span text:style-name="T70"/></text:p>
            </table:table-cell>
            <table:table-cell table:style-name="表格32.A1" office:value-type="string">
              <text:p text:style-name="P6" loext:marker-style-name="T70"><text:span text:style-name="T76">TCP</text:span><text:span text:style-name="T70"/></text:p>
            </table:table-cell>
            <table:table-cell table:style-name="表格32.A1" office:value-type="string">
              <text:p text:style-name="P6" loext:marker-style-name="T70"><text:span text:style-name="T76">UDP</text:span><text:span text:style-name="T70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5" loext:marker-style-name="T108"><text:span text:style-name="T107">連線方式</text:span><text:span text:style-name="T108"/></text:p>
          </table:table-cell>
          <table:table-cell table:style-name="表格32.A2" office:value-type="string">
            <text:p text:style-name="P25" loext:marker-style-name="T108"><text:span text:style-name="T107">需要握手（三向交握）</text:span><text:span text:style-name="T108"/></text:p>
          </table:table-cell>
          <table:table-cell table:style-name="表格32.A2" office:value-type="string">
            <text:p text:style-name="P25" loext:marker-style-name="T108"><text:span text:style-name="T107">無連線，直接送出</text:span><text:span text:style-name="T108"/></text:p>
          </table:table-cell>
        </table:table-row>
        <table:table-row table:style-name="表格32.1">
          <table:table-cell table:style-name="表格32.A3" office:value-type="string">
            <text:p text:style-name="P25" loext:marker-style-name="T108"><text:span text:style-name="T107">可靠性</text:span><text:span text:style-name="T108"/></text:p>
          </table:table-cell>
          <table:table-cell table:style-name="表格32.A3" office:value-type="string">
            <text:p text:style-name="P25" loext:marker-style-name="T235"><text:span text:style-name="T234">保證送達，遺失會重傳</text:span><text:span text:style-name="T235"/></text:p>
          </table:table-cell>
          <table:table-cell table:style-name="表格32.A3" office:value-type="string">
            <text:p text:style-name="P25" loext:marker-style-name="T316"><text:span text:style-name="T315">不保證，遺失不補</text:span><text:span text:style-name="T316"/></text:p>
          </table:table-cell>
        </table:table-row>
        <table:table-row table:style-name="表格32.1">
          <table:table-cell table:style-name="表格32.A2" office:value-type="string">
            <text:p text:style-name="P25" loext:marker-style-name="T108"><text:span text:style-name="T107">速度</text:span><text:span text:style-name="T108"/></text:p>
          </table:table-cell>
          <table:table-cell table:style-name="表格32.A2" office:value-type="string">
            <text:p text:style-name="P25" loext:marker-style-name="T110"><text:span text:style-name="T109">較慢（有確認機制）</text:span><text:span text:style-name="T110"/></text:p>
          </table:table-cell>
          <table:table-cell table:style-name="表格32.A2" office:value-type="string">
            <text:p text:style-name="P25" loext:marker-style-name="T110"><text:span text:style-name="T109">較快（無確認機制）</text:span><text:span text:style-name="T110"/></text:p>
          </table:table-cell>
        </table:table-row>
        <table:table-row table:style-name="表格32.1">
          <table:table-cell table:style-name="表格32.A3" office:value-type="string">
            <text:p text:style-name="P25" loext:marker-style-name="T108"><text:span text:style-name="T107">使用情境</text:span><text:span text:style-name="T108"/></text:p>
          </table:table-cell>
          <table:table-cell table:style-name="表格32.A3" office:value-type="string">
            <text:p text:style-name="P25" loext:marker-style-name="T108"><text:span text:style-name="T141">HTTP</text:span><text:span text:style-name="T107">、</text:span><text:span text:style-name="T141">Email</text:span><text:span text:style-name="T107">、</text:span><text:span text:style-name="T141">FTP</text:span></text:p>
          </table:table-cell>
          <table:table-cell table:style-name="表格32.A3" office:value-type="string">
            <text:p text:style-name="P25" loext:marker-style-name="T108"><text:span text:style-name="T107">串流影音、</text:span><text:span text:style-name="T141">VoIP</text:span><text:span text:style-name="T107">、</text:span><text:span text:style-name="T141">DNS</text:span></text:p>
          </table:table-cell>
        </table:table-row>
        <table:table-row table:style-name="表格32.1">
          <table:table-cell table:style-name="表格32.A2" office:value-type="string">
            <text:p text:style-name="P25" loext:marker-style-name="T108"><text:span text:style-name="T107">一句話</text:span><text:span text:style-name="T108"/></text:p>
          </table:table-cell>
          <table:table-cell table:style-name="表格32.A2" office:value-type="string">
            <text:p text:style-name="P25" loext:marker-style-name="T164"><text:span text:style-name="T163">「穩定優先」</text:span><text:span text:style-name="T164"/></text:p>
          </table:table-cell>
          <table:table-cell table:style-name="表格32.A2" office:value-type="string">
            <text:p text:style-name="P25" loext:marker-style-name="T36"><text:span text:style-name="T35">「速度優先」</text:span><text:span text:style-name="T36"/></text:p>
          </table:table-cell>
        </table:table-row>
      </table:table>
      <text:h text:style-name="P3" text:outline-level="2" loext:marker-style-name="T27"><text:span text:style-name="T28">七、</text:span><text:span text:style-name="T27">ARP — </text:span><text:span text:style-name="T28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8"><text:span text:style-name="T151">🔗 <text:s/></text:span><text:span text:style-name="T59">ARP </text:span><text:span text:style-name="T48">重點</text:span></text:p>
            <text:p text:style-name="P9"><text:span text:style-name="T61">ARP </text:span><text:span text:style-name="T52">做什麼？　</text:span><text:span text:style-name="T100">在</text:span><text:span text:style-name="T372">同一個</text:span><text:span text:style-name="T100">區域網路（</text:span><text:span text:style-name="T134">LAN</text:span><text:span text:style-name="T100">）中</text:span><text:span text:style-name="T95">，</text:span><text:span text:style-name="T280">將「</text:span><text:span text:style-name="T287">IP </text:span><text:span text:style-name="T280">位址（邏輯位址）」轉換成「</text:span><text:span text:style-name="T287">MAC </text:span><text:span text:style-name="T280">位址（實體位址）」</text:span><text:span text:style-name="T95">。</text:span></text:p>
            <text:p text:style-name="P10"><text:span text:style-name="T52">為何屬於 </text:span><text:span text:style-name="T61">Link </text:span><text:span text:style-name="T52">層？　</text:span><text:span text:style-name="T273">ARP </text:span><text:span text:style-name="T268">的作用範圍僅限於同一區域網路內，</text:span><text:span text:style-name="T373">無法跨越路由器</text:span><text:span text:style-name="T95">，因此歸屬 </text:span><text:span text:style-name="T129">Link</text:span><text:span text:style-name="T95">（連結）層。</text:span></text:p>
            <text:p text:style-name="P10" loext:marker-style-name="T53"><text:span text:style-name="T52">運作流程：</text:span><text:span text:style-name="T53"/></text:p>
            <text:p text:style-name="P10" loext:marker-style-name="T96"><text:span text:style-name="T129">① </text:span><text:span text:style-name="T102">裝置 </text:span><text:span text:style-name="T136">A </text:span><text:span text:style-name="T102">廣播詢問：</text:span><text:span text:style-name="T95">「</text:span><text:span text:style-name="T100">誰的 </text:span><text:span text:style-name="T134">IP</text:span><text:span text:style-name="T129"> </text:span><text:span text:style-name="T95">是 </text:span><text:span text:style-name="T129">192.168.1.5</text:span><text:span text:style-name="T95">？」</text:span></text:p>
            <text:p text:style-name="P10" loext:marker-style-name="T96"><text:span text:style-name="T129">② </text:span><text:span text:style-name="T103">裝置 </text:span><text:span text:style-name="T137">B </text:span><text:span text:style-name="T103">回應：</text:span><text:span text:style-name="T95">「</text:span><text:span text:style-name="T101">是我！</text:span><text:span text:style-name="T135">MAC </text:span><text:span text:style-name="T101">是</text:span><text:span text:style-name="T95"> </text:span><text:span text:style-name="T129">AA:BB:CC:DD:EE:FF</text:span><text:span text:style-name="T95">」</text:span></text:p>
            <text:p text:style-name="P10" loext:marker-style-name="T96"><text:span text:style-name="T129">③ </text:span><text:span text:style-name="T95">裝置 </text:span><text:span text:style-name="T129">A </text:span><text:span text:style-name="T95">記錄此對應至 </text:span><text:span text:style-name="T129">ARP </text:span><text:span text:style-name="T95">快取，下次直接使用</text:span></text:p>
          </table:table-cell>
        </table:table-row>
      </table:table>
      <text:p text:style-name="P31" loext:marker-style-name="T7"><text:span text:style-name="T6">（</text:span><text:span text:style-name="T16">ARP </text:span><text:span text:style-name="T6">完整流程、</text:span><text:span text:style-name="T16">ARP Spoofing </text:span><text:span text:style-name="T6">與完整上網流程，詳見第四篇。）</text:span></text:p>
      <text:h text:style-name="P3" text:outline-level="2" loext:marker-style-name="T27"><text:span text:style-name="T28">八、</text:span><text:span text:style-name="T27">Traceroute </text:span><text:span text:style-name="T28">原理詳解（</text:span><text:span text:style-name="T27">TTL </text:span><text:span text:style-name="T28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9"><text:span text:style-name="T24">目的：</text:span><text:span text:style-name="T414">找出封包從來源到目的地</text:span><text:span text:style-name="T213">，</text:span><text:span text:style-name="T418">中間經過哪些路由器</text:span><text:span text:style-name="T95">（完整路徑偵測）。</text:span></text:p>
            <text:p text:style-name="P10"><text:span text:style-name="T419">TTL</text:span><text:span text:style-name="T424">（</text:span><text:span text:style-name="T419">Time To Live</text:span><text:span text:style-name="T424">）</text:span><text:span text:style-name="T24">：</text:span><text:span text:style-name="T279">封包的「存活計數器」。每經過一個路由器就減 </text:span><text:span text:style-name="T286">1</text:span><text:span text:style-name="T95">；</text:span><text:span text:style-name="T236">歸零時路由器丟棄封包</text:span><text:span text:style-name="T95">，並</text:span><text:span text:style-name="T317">回傳 </text:span><text:span text:style-name="T329">ICMP Time Exceeded </text:span><text:span text:style-name="T317">給發送方</text:span><text:span text:style-name="T95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6" loext:marker-style-name="T72"><text:span text:style-name="T71">封包次數</text:span><text:span text:style-name="T72"/></text:p>
          </table:table-cell>
          <table:table-cell table:style-name="表格34.A2" office:value-type="string">
            <text:p text:style-name="P6" loext:marker-style-name="T72"><text:span text:style-name="T77">TTL </text:span><text:span text:style-name="T71">值</text:span></text:p>
          </table:table-cell>
          <table:table-cell table:style-name="表格34.A2" office:value-type="string">
            <text:p text:style-name="P6" loext:marker-style-name="T72"><text:span text:style-name="T71">發生什麼事</text:span><text:span text:style-name="T72"/></text:p>
          </table:table-cell>
          <table:table-cell table:style-name="表格34.A2" office:value-type="string">
            <text:p text:style-name="P6" loext:marker-style-name="T72"><text:span text:style-name="T71">取得資訊</text:span><text:span text:style-name="T72"/></text:p>
          </table:table-cell>
        </table:table-row>
        <table:table-row table:style-name="表格34.1">
          <table:table-cell table:style-name="表格34.A3" office:value-type="string">
            <text:p text:style-name="P25" loext:marker-style-name="T112"><text:span text:style-name="T113">第 </text:span><text:span text:style-name="T144">1 </text:span><text:span text:style-name="T113">次</text:span></text:p>
          </table:table-cell>
          <table:table-cell table:style-name="表格34.A3" office:value-type="string">
            <text:p text:style-name="P25" loext:marker-style-name="T112"><text:span text:style-name="T144">TTL = 1</text:span><text:span text:style-name="T112"/></text:p>
          </table:table-cell>
          <table:table-cell table:style-name="表格34.A3" office:value-type="string">
            <text:p text:style-name="P25" loext:marker-style-name="T112"><text:span text:style-name="T116">抵達第 </text:span><text:span text:style-name="T147">1 </text:span><text:span text:style-name="T116">個 </text:span><text:span text:style-name="T147">Router </text:span><text:span text:style-name="T144">→ TTL </text:span><text:span text:style-name="T113">歸零 → 回傳 </text:span><text:span text:style-name="T144">ICMP Time Exceeded</text:span></text:p>
          </table:table-cell>
          <table:table-cell table:style-name="表格34.A3" office:value-type="string">
            <text:p text:style-name="P25" loext:marker-style-name="T115"><text:span text:style-name="T114">得知第 </text:span><text:span text:style-name="T146">1 </text:span><text:span text:style-name="T114">站位置</text:span></text:p>
          </table:table-cell>
        </table:table-row>
        <table:table-row table:style-name="表格34.1">
          <table:table-cell table:style-name="表格34.A4" office:value-type="string">
            <text:p text:style-name="P25" loext:marker-style-name="T112"><text:span text:style-name="T113">第 </text:span><text:span text:style-name="T144">2 </text:span><text:span text:style-name="T113">次</text:span></text:p>
          </table:table-cell>
          <table:table-cell table:style-name="表格34.A4" office:value-type="string">
            <text:p text:style-name="P25" loext:marker-style-name="T112"><text:span text:style-name="T144">TTL = 2</text:span><text:span text:style-name="T112"/></text:p>
          </table:table-cell>
          <table:table-cell table:style-name="表格34.A4" office:value-type="string">
            <text:p text:style-name="P25" loext:marker-style-name="T112"><text:span text:style-name="T116">通過第 </text:span><text:span text:style-name="T147">1 </text:span><text:span text:style-name="T116">站 → 抵達第 </text:span><text:span text:style-name="T147">2 </text:span><text:span text:style-name="T116">個 </text:span><text:span text:style-name="T147">Router</text:span><text:span text:style-name="T144"> → TTL </text:span><text:span text:style-name="T113">歸零 → 回傳 </text:span><text:span text:style-name="T144">ICMP</text:span></text:p>
          </table:table-cell>
          <table:table-cell table:style-name="表格34.A4" office:value-type="string">
            <text:p text:style-name="P25" loext:marker-style-name="T115"><text:span text:style-name="T114">得知第 </text:span><text:span text:style-name="T146">2 </text:span><text:span text:style-name="T114">站位置</text:span></text:p>
          </table:table-cell>
        </table:table-row>
        <table:table-row table:style-name="表格34.1">
          <table:table-cell table:style-name="表格34.A3" office:value-type="string">
            <text:p text:style-name="P25" loext:marker-style-name="T112"><text:span text:style-name="T113">第 </text:span><text:span text:style-name="T144">N </text:span><text:span text:style-name="T113">次</text:span></text:p>
          </table:table-cell>
          <table:table-cell table:style-name="表格34.A3" office:value-type="string">
            <text:p text:style-name="P25" loext:marker-style-name="T112"><text:span text:style-name="T144">TTL = N</text:span><text:span text:style-name="T112"/></text:p>
          </table:table-cell>
          <table:table-cell table:style-name="表格34.A3" office:value-type="string">
            <text:p text:style-name="P25" loext:marker-style-name="T112"><text:span text:style-name="T113">以此類推，每次多走一站</text:span><text:span text:style-name="T112"/></text:p>
          </table:table-cell>
          <table:table-cell table:style-name="表格34.A3" office:value-type="string">
            <text:p text:style-name="P25" loext:marker-style-name="T112"><text:span text:style-name="T113">逐步還原完整路徑</text:span><text:span text:style-name="T112"/></text:p>
          </table:table-cell>
        </table:table-row>
        <table:table-row table:style-name="表格34.1">
          <table:table-cell table:style-name="表格34.A4" office:value-type="string">
            <text:p text:style-name="P25" loext:marker-style-name="T112"><text:span text:style-name="T113">最後</text:span><text:span text:style-name="T112"/></text:p>
          </table:table-cell>
          <table:table-cell table:style-name="表格34.A4" office:value-type="string">
            <text:p text:style-name="P25" loext:marker-style-name="T112"><text:span text:style-name="T144">TTL = </text:span><text:span text:style-name="T113">距離</text:span></text:p>
          </table:table-cell>
          <table:table-cell table:style-name="表格34.A4" office:value-type="string">
            <text:p text:style-name="P25" loext:marker-style-name="T112"><text:span text:style-name="T113">封包抵達目的地，回傳正常應答</text:span><text:span text:style-name="T112"/></text:p>
          </table:table-cell>
          <table:table-cell table:style-name="表格34.A4" office:value-type="string">
            <text:p text:style-name="P25" loext:marker-style-name="T112"><text:span text:style-name="T113">路徑偵測完成 ✓</text:span><text:span text:style-name="T112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8"><text:span text:style-name="T151">⚡ <text:s/></text:span><text:span text:style-name="T155">一句話記憶</text:span></text:p>
            <text:p text:style-name="P9" loext:marker-style-name="T96"><text:span text:style-name="T273">Traceroute = TTL </text:span><text:span text:style-name="T268">遞增 ＋ </text:span><text:span text:style-name="T273">ICMP </text:span><text:span text:style-name="T268">回報</text:span><text:span text:style-name="T95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九、本篇考試必背心法</text:span><text:span text:style-name="T27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8"><text:span text:style-name="T151">🔥 <text:s/></text:span><text:span text:style-name="T207">TCP/IP </text:span><text:span text:style-name="T201">四層心法（背這個就夠）</text:span></text:p>
            <text:p text:style-name="P9"><text:span text:style-name="T208">🟢 Application</text:span><text:span text:style-name="T202">（應用層） → </text:span><text:span text:style-name="T95">給人用（</text:span><text:span text:style-name="T129">HTTP</text:span><text:span text:style-name="T95">、</text:span><text:span text:style-name="T129">DNS</text:span><text:span text:style-name="T95">、</text:span><text:span text:style-name="T129">DHCP</text:span><text:span text:style-name="T95">、</text:span><text:span text:style-name="T129">SSH</text:span><text:span text:style-name="T95">、</text:span><text:span text:style-name="T129">MQTT</text:span><text:span text:style-name="T95">）</text:span></text:p>
            <text:p text:style-name="P10"><text:soft-page-break/><text:span text:style-name="T208">🟡 Transport</text:span><text:span text:style-name="T202">（傳輸層） → </text:span><text:span text:style-name="T95">怎麼送（</text:span><text:span text:style-name="T129">TCP</text:span><text:span text:style-name="T95">＝穩定 </text:span><text:span text:style-name="T129">/ UDP</text:span><text:span text:style-name="T95">＝快速）</text:span><text:span text:style-name="T129">(</text:span><text:span text:style-name="T211">切分、編頁碼、確認收件</text:span><text:span text:style-name="T129">)</text:span></text:p>
            <text:p text:style-name="P10"><text:span text:style-name="T208">🔵 Network</text:span><text:span text:style-name="T202">（網路層） → </text:span><text:span text:style-name="T95">走哪條路（</text:span><text:span text:style-name="T129">IP</text:span><text:span text:style-name="T95">、</text:span><text:span text:style-name="T129">ICMP</text:span><text:span text:style-name="T95">）</text:span></text:p>
            <text:p text:style-name="P10"><text:span text:style-name="T208">🟠 Link</text:span><text:span text:style-name="T202">（連結層） → </text:span><text:span text:style-name="T95">同一區網怎麼接（</text:span><text:span text:style-name="T129">Ethernet</text:span><text:span text:style-name="T95">、</text:span><text:span text:style-name="T129">ARP</text:span><text:span text:style-name="T95">）</text:span><text:span text:style-name="T129">(</text:span><text:span text:style-name="T60">ARP</text:span><text:span text:style-name="T61"> </text:span><text:span text:style-name="T52">：</text:span><text:span text:style-name="T100">在</text:span><text:span text:style-name="T372">同一個</text:span><text:span text:style-name="T100">區域網路（</text:span><text:span text:style-name="T134">LAN</text:span><text:span text:style-name="T100">）中</text:span><text:span text:style-name="T95">，</text:span><text:span text:style-name="T280">將「</text:span><text:span text:style-name="T287">IP </text:span><text:span text:style-name="T280">位址（邏輯位址）」轉換成「</text:span><text:span text:style-name="T287">MAC </text:span><text:span text:style-name="T280">位址（實體位址）」</text:span><text:span text:style-name="T129">)</text:span></text:p>
          </table:table-cell>
        </table:table-row>
      </table:table>
      <text:h text:style-name="P13" text:outline-level="1" loext:marker-style-name="T68"><text:span text:style-name="T67">第 二 篇　</text:span><text:span text:style-name="T68">IP </text:span><text:span text:style-name="T67">位址與封包處理：分類 </text:span><text:span text:style-name="T68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8"><text:span text:style-name="T151">📐 <text:s/></text:span><text:span text:style-name="T48">本篇重點</text:span></text:p>
            <text:p text:style-name="P9" loext:marker-style-name="T96"><text:span text:style-name="T95">本篇分兩大主軸：前半談「</text:span><text:span text:style-name="T135">IP </text:span><text:span text:style-name="T101">位址如何劃分</text:span><text:span text:style-name="T95">」（分類、</text:span><text:span text:style-name="T129">CIDR</text:span><text:span text:style-name="T95">、子網計算、</text:span><text:span text:style-name="T129">VLSM</text:span><text:span text:style-name="T95">、</text:span><text:span text:style-name="T129">CIDR </text:span><text:span text:style-name="T95">合併）；後半談「</text:span><text:span text:style-name="T101">封包如何被切割傳送</text:span><text:span text:style-name="T95">」（</text:span><text:span text:style-name="T129">MTU</text:span><text:span text:style-name="T95">、</text:span><text:span text:style-name="T129">Fragmentation</text:span><text:span text:style-name="T95">、</text:span><text:span text:style-name="T129">IP Header</text:span><text:span text:style-name="T95">、</text:span><text:span text:style-name="T129">DF/MF</text:span><text:span text:style-name="T95">、</text:span><text:span text:style-name="T129">PMTUD</text:span><text:span text:style-name="T95">、</text:span><text:span text:style-name="T129">MSS</text:span><text:span text:style-name="T95">、</text:span><text:span text:style-name="T129">Frag DoS</text:span><text:span text:style-name="T95">）。子網計算是計算題必考，務必動手練。</text:span></text:p>
          </table:table-cell>
        </table:table-row>
      </table:table>
      <text:h text:style-name="P3" text:outline-level="2" loext:marker-style-name="T27"><text:span text:style-name="T28">壹、</text:span><text:span text:style-name="T27">IP </text:span><text:span text:style-name="T28">位址基礎</text:span></text:h>
      <text:p text:style-name="P31" loext:marker-style-name="T96"><text:span text:style-name="T134">IP </text:span><text:span text:style-name="T100">位址（</text:span><text:span text:style-name="T134">IPv4</text:span><text:span text:style-name="T100">）是</text:span><text:span text:style-name="T237">一組 </text:span><text:span text:style-name="T247">32 </text:span><text:span text:style-name="T237">個 </text:span><text:span text:style-name="T247">bit</text:span><text:span text:style-name="T95">，用來</text:span><text:span text:style-name="T350">識別網路上每一台設備的「地址」</text:span><text:span text:style-name="T95">。</text:span><text:span text:style-name="T100">為了人類方便閱讀</text:span><text:span text:style-name="T95">，</text:span><text:span text:style-name="T101">這 </text:span><text:span text:style-name="T135">32 </text:span><text:span text:style-name="T101">個 </text:span><text:span text:style-name="T135">bit </text:span><text:span text:style-name="T101">被分成 </text:span><text:span text:style-name="T135">4 </text:span><text:span text:style-name="T101">組</text:span><text:span text:style-name="T95">、</text:span><text:span text:style-name="T268">每組 </text:span><text:span text:style-name="T273">8 </text:span><text:span text:style-name="T268">個 </text:span><text:span text:style-name="T273">bit</text:span><text:span text:style-name="T268">（一個 </text:span><text:span text:style-name="T273">Octet</text:span><text:span text:style-name="T268">），再轉成十進位</text:span><text:span text:style-name="T95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22" loext:marker-style-name="T70"><text:span text:style-name="T76">Octet 1</text:span><text:span text:style-name="T70"/></text:p>
            </table:table-cell>
            <table:table-cell table:style-name="表格37.A1" office:value-type="string">
              <text:p text:style-name="P22" loext:marker-style-name="T70"><text:span text:style-name="T76">Octet 2</text:span><text:span text:style-name="T70"/></text:p>
            </table:table-cell>
            <table:table-cell table:style-name="表格37.A1" office:value-type="string">
              <text:p text:style-name="P22" loext:marker-style-name="T70"><text:span text:style-name="T76">Octet 3</text:span><text:span text:style-name="T70"/></text:p>
            </table:table-cell>
            <table:table-cell table:style-name="表格37.A1" office:value-type="string">
              <text:p text:style-name="P22" loext:marker-style-name="T70"><text:span text:style-name="T76">Octet 4</text:span><text:span text:style-name="T70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5" loext:marker-style-name="T108"><text:span text:style-name="T141">192</text:span><text:span text:style-name="T108"/></text:p>
          </table:table-cell>
          <table:table-cell table:style-name="表格37.A2" office:value-type="string">
            <text:p text:style-name="P25" loext:marker-style-name="T108"><text:span text:style-name="T141">168</text:span><text:span text:style-name="T108"/></text:p>
          </table:table-cell>
          <table:table-cell table:style-name="表格37.A2" office:value-type="string">
            <text:p text:style-name="P25" loext:marker-style-name="T108"><text:span text:style-name="T141">1</text:span><text:span text:style-name="T108"/></text:p>
          </table:table-cell>
          <table:table-cell table:style-name="表格37.A2" office:value-type="string">
            <text:p text:style-name="P25" loext:marker-style-name="T108"><text:span text:style-name="T141">0</text:span><text:span text:style-name="T108"/></text:p>
          </table:table-cell>
        </table:table-row>
      </table:table>
      <text:p text:style-name="P31" loext:marker-style-name="T11"><text:span text:style-name="T20">→ </text:span><text:span text:style-name="T237">總共 </text:span><text:span text:style-name="T247">4 × 8 = 32 </text:span><text:span text:style-name="T237">個 </text:span><text:span text:style-name="T247">bit</text:span><text:span text:style-name="T10">，</text:span><text:span text:style-name="T430">每組數字範圍 </text:span><text:span text:style-name="T431">0</text:span><text:span text:style-name="T430">～</text:span><text:span text:style-name="T431">255</text:span><text:span text:style-name="T10">（因為 </text:span><text:span text:style-name="T431">2⁸ = 256 </text:span><text:span text:style-name="T430">種組合</text:span><text:span text:style-name="T10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"><text:span text:style-name="T151">💡 <text:s/></text:span><text:span text:style-name="T173">為什麼 </text:span><text:span text:style-name="T177">IP </text:span><text:span text:style-name="T173">數量一定是 </text:span><text:span text:style-name="T177">2 </text:span><text:span text:style-name="T173">的次方？</text:span></text:p>
            <text:p text:style-name="P9" loext:marker-style-name="T96"><text:span text:style-name="T101">每一個 </text:span><text:span text:style-name="T135">bit </text:span><text:span text:style-name="T101">只有 </text:span><text:span text:style-name="T135">0 </text:span><text:span text:style-name="T101">或 </text:span><text:span text:style-name="T135">1 </text:span><text:span text:style-name="T101">兩種狀態</text:span><text:span text:style-name="T95">。若有 </text:span><text:span text:style-name="T129">n </text:span><text:span text:style-name="T95">個 </text:span><text:span text:style-name="T129">bit </text:span><text:span text:style-name="T95">可自由變化，可能的組合數 ＝ </text:span><text:span text:style-name="T129">2ⁿ</text:span><text:span text:style-name="T95">。</text:span></text:p>
            <text:p text:style-name="P10" loext:marker-style-name="T96"><text:span text:style-name="T95">因此</text:span><text:span text:style-name="T213">子網路的 </text:span><text:span text:style-name="T214">IP </text:span><text:span text:style-name="T213">總數一定是 </text:span><text:span text:style-name="T214">2</text:span><text:span text:style-name="T213">、</text:span><text:span text:style-name="T214">4</text:span><text:span text:style-name="T213">、</text:span><text:span text:style-name="T214">8</text:span><text:span text:style-name="T213">、</text:span><text:span text:style-name="T214">16</text:span><text:span text:style-name="T213">、</text:span><text:span text:style-name="T214">32</text:span><text:span text:style-name="T213">、</text:span><text:span text:style-name="T214">64</text:span><text:span text:style-name="T213">、</text:span><text:span text:style-name="T214">128</text:span><text:span text:style-name="T213">、</text:span><text:span text:style-name="T214">256… </text:span><text:span text:style-name="T213">等 </text:span><text:span text:style-name="T214">2 </text:span><text:span text:style-name="T213">的次方</text:span><text:span text:style-name="T95">，不可能是 </text:span><text:span text:style-name="T129">100 </text:span><text:span text:style-name="T95">或 </text:span><text:span text:style-name="T129">50</text:span><text:span text:style-name="T95">。這就是</text:span><text:span text:style-name="T432">計算子網時必須「找最接近的 </text:span><text:span text:style-name="T449">2ⁿ</text:span><text:span text:style-name="T432">」</text:span><text:span text:style-name="T95">的根本原因。</text:span></text:p>
          </table:table-cell>
        </table:table-row>
      </table:table>
      <text:h text:style-name="P3" text:outline-level="2" loext:marker-style-name="T27"><text:span text:style-name="T28">貳、</text:span><text:span text:style-name="T27">IP </text:span><text:span text:style-name="T28">分類（</text:span><text:span text:style-name="T27">A / B / C </text:span><text:span text:style-name="T28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6" loext:marker-style-name="T66"><text:span text:style-name="T65">類別</text:span><text:span text:style-name="T66"/></text:p>
            </table:table-cell>
            <table:table-cell table:style-name="表格39.A1" office:value-type="string">
              <text:p text:style-name="P6" loext:marker-style-name="T66"><text:span text:style-name="T65">第一組數字範圍</text:span><text:span text:style-name="T66"/></text:p>
            </table:table-cell>
            <table:table-cell table:style-name="表格39.A1" office:value-type="string">
              <text:p text:style-name="P6" loext:marker-style-name="T66"><text:span text:style-name="T65">預設遮罩</text:span><text:span text:style-name="T66"/></text:p>
            </table:table-cell>
            <table:table-cell table:style-name="表格39.A1" office:value-type="string">
              <text:p text:style-name="P6" loext:marker-style-name="T66"><text:span text:style-name="T65">用途</text:span><text:span text:style-name="T66"/></text:p>
            </table:table-cell>
            <table:table-cell table:style-name="表格39.A1" office:value-type="string">
              <text:p text:style-name="P6" loext:marker-style-name="T66"><text:span text:style-name="T65">每網路主機數</text:span><text:span text:style-name="T66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5" loext:marker-style-name="T80"><text:span text:style-name="T121">A </text:span><text:span text:style-name="T79">類</text:span></text:p>
          </table:table-cell>
          <table:table-cell table:style-name="表格39.A2" office:value-type="string">
            <text:p text:style-name="P25" loext:marker-style-name="T262"><text:span text:style-name="T258">1 </text:span><text:span text:style-name="T261">～ </text:span><text:span text:style-name="T258">126</text:span></text:p>
          </table:table-cell>
          <table:table-cell table:style-name="表格39.A2" office:value-type="string">
            <text:p text:style-name="P25" loext:marker-style-name="T292"><text:span text:style-name="T293">/8</text:span><text:span text:style-name="T292"/></text:p>
          </table:table-cell>
          <table:table-cell table:style-name="表格39.A2" office:value-type="string">
            <text:p text:style-name="P25" loext:marker-style-name="T80"><text:span text:style-name="T79">超大型網路</text:span><text:span text:style-name="T80"/></text:p>
          </table:table-cell>
          <table:table-cell table:style-name="表格39.A2" office:value-type="string">
            <text:p text:style-name="P25" loext:marker-style-name="T80"><text:span text:style-name="T79">約 </text:span><text:span text:style-name="T121">1,677 </text:span><text:span text:style-name="T79">萬</text:span></text:p>
          </table:table-cell>
        </table:table-row>
        <table:table-row table:style-name="表格39.1">
          <table:table-cell table:style-name="表格39.A3" office:value-type="string">
            <text:p text:style-name="P25" loext:marker-style-name="T80"><text:span text:style-name="T121">B </text:span><text:span text:style-name="T79">類</text:span></text:p>
          </table:table-cell>
          <table:table-cell table:style-name="表格39.A3" office:value-type="string">
            <text:p text:style-name="P25" loext:marker-style-name="T262"><text:span text:style-name="T258">128 </text:span><text:span text:style-name="T261">～ </text:span><text:span text:style-name="T258">191</text:span></text:p>
          </table:table-cell>
          <table:table-cell table:style-name="表格39.A3" office:value-type="string">
            <text:p text:style-name="P25" loext:marker-style-name="T292"><text:span text:style-name="T293">/16</text:span><text:span text:style-name="T292"/></text:p>
          </table:table-cell>
          <table:table-cell table:style-name="表格39.A3" office:value-type="string">
            <text:p text:style-name="P25" loext:marker-style-name="T80"><text:span text:style-name="T79">中型網路</text:span><text:span text:style-name="T80"/></text:p>
          </table:table-cell>
          <table:table-cell table:style-name="表格39.A3" office:value-type="string">
            <text:p text:style-name="P25" loext:marker-style-name="T80"><text:span text:style-name="T79">約 </text:span><text:span text:style-name="T121">6.5 </text:span><text:span text:style-name="T79">萬</text:span></text:p>
          </table:table-cell>
        </table:table-row>
        <table:table-row table:style-name="表格39.1">
          <table:table-cell table:style-name="表格39.A2" office:value-type="string">
            <text:p text:style-name="P25" loext:marker-style-name="T80"><text:span text:style-name="T121">C </text:span><text:span text:style-name="T79">類</text:span></text:p>
          </table:table-cell>
          <table:table-cell table:style-name="表格39.A2" office:value-type="string">
            <text:p text:style-name="P25" loext:marker-style-name="T262"><text:span text:style-name="T258">192 </text:span><text:span text:style-name="T261">～ </text:span><text:span text:style-name="T258">223</text:span></text:p>
          </table:table-cell>
          <table:table-cell table:style-name="表格39.A2" office:value-type="string">
            <text:p text:style-name="P25" loext:marker-style-name="T292"><text:span text:style-name="T293">/24</text:span><text:span text:style-name="T292"/></text:p>
          </table:table-cell>
          <table:table-cell table:style-name="表格39.A2" office:value-type="string">
            <text:p text:style-name="P25" loext:marker-style-name="T80"><text:span text:style-name="T79">小型網路</text:span><text:span text:style-name="T80"/></text:p>
          </table:table-cell>
          <table:table-cell table:style-name="表格39.A2" office:value-type="string">
            <text:p text:style-name="P25" loext:marker-style-name="T80"><text:span text:style-name="T121">254</text:span><text:span text:style-name="T80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9"><text:span text:style-name="T175">127.x.x.x </text:span><text:span text:style-name="T170">為何不在 </text:span><text:span text:style-name="T175">A </text:span><text:span text:style-name="T170">類？　</text:span><text:span text:style-name="T130">127.0.0.1 </text:span><text:span text:style-name="T97">是回送位址（</text:span><text:span text:style-name="T130">Loopback</text:span><text:span text:style-name="T97">），保留給本機自我測試</text:span><text:span text:style-name="T95">；</text:span><text:span text:style-name="T449">ping 127.0.0.1 </text:span><text:span text:style-name="T432">可測本機協定是否正常，故 </text:span><text:span text:style-name="T449">A </text:span><text:span text:style-name="T432">類跳過 </text:span><text:span text:style-name="T449">127</text:span><text:span text:style-name="T95">，只到 </text:span><text:span text:style-name="T129">126</text:span><text:span text:style-name="T95">。</text:span></text:p>
            <text:p text:style-name="P10"><text:span text:style-name="T169">其他保留位址：</text:span><text:span text:style-name="T138">0.x.x.x</text:span><text:span text:style-name="T104">＝代表「這個網路本身」</text:span><text:span text:style-name="T95">；</text:span><text:span text:style-name="T137">224</text:span><text:span text:style-name="T103">～</text:span><text:span text:style-name="T137">239</text:span><text:span text:style-name="T103">＝</text:span><text:span text:style-name="T137">D </text:span><text:span text:style-name="T103">類（群播 </text:span><text:span text:style-name="T137">Multicast</text:span><text:span text:style-name="T103">）</text:span><text:span text:style-name="T95">；</text:span><text:span text:style-name="T135">240</text:span><text:span text:style-name="T101">～</text:span><text:span text:style-name="T135">255</text:span><text:span text:style-name="T101">＝</text:span><text:span text:style-name="T135">E </text:span><text:span text:style-name="T101">類（實驗用）</text:span><text:span text:style-name="T95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參、</text:span><text:span text:style-name="T27">CIDR </text:span><text:span text:style-name="T28">表示法（斜線 </text:span><text:span text:style-name="T27">/</text:span><text:span text:style-name="T28">幾）</text:span></text:h>
      <text:p text:style-name="P31" loext:marker-style-name="T96"><text:span text:style-name="T134">CIDR</text:span><text:span text:style-name="T100">（無類別網域間路由）</text:span><text:span text:style-name="T95">以</text:span><text:span text:style-name="T237">「</text:span><text:span text:style-name="T247">IP + / + </text:span><text:span text:style-name="T237">數字」精確表示網路大小</text:span><text:span text:style-name="T95">，例如 </text:span><text:span text:style-name="T129">192.168.1.0/24</text:span><text:span text:style-name="T95">。</text:span><text:span text:style-name="T273">/ </text:span><text:span text:style-name="T268">後面的數字 ＝ 前幾個 </text:span><text:span text:style-name="T273">bit </text:span><text:span text:style-name="T268">是「網路部分」（固定不變）</text:span><text:span text:style-name="T95">，</text:span><text:span text:style-name="T213">剩下的才是「主機部分」（可變）</text:span><text:span text:style-name="T95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6" loext:marker-style-name="T66"><text:span text:style-name="T65">表示法</text:span><text:span text:style-name="T66"/></text:p>
            </table:table-cell>
            <table:table-cell table:style-name="表格40.A1" office:value-type="string">
              <text:p text:style-name="P6" loext:marker-style-name="T66"><text:span text:style-name="T65">網路 </text:span><text:span text:style-name="T75">bit</text:span></text:p>
            </table:table-cell>
            <table:table-cell table:style-name="表格40.A1" office:value-type="string">
              <text:p text:style-name="P6" loext:marker-style-name="T66"><text:span text:style-name="T65">主機 </text:span><text:span text:style-name="T75">bit</text:span></text:p>
            </table:table-cell>
            <table:table-cell table:style-name="表格40.A1" office:value-type="string">
              <text:p text:style-name="P6" loext:marker-style-name="T66"><text:span text:style-name="T75">IP </text:span><text:span text:style-name="T65">總數</text:span></text:p>
            </table:table-cell>
            <table:table-cell table:style-name="表格40.A1" office:value-type="string">
              <text:p text:style-name="P6" loext:marker-style-name="T66"><text:span text:style-name="T65">對應哪段固定</text:span><text:span text:style-name="T66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5" loext:marker-style-name="T292"><text:span text:style-name="T293">/8</text:span><text:span text:style-name="T292"/></text:p>
          </table:table-cell>
          <table:table-cell table:style-name="表格40.A2" office:value-type="string">
            <text:p text:style-name="P25" loext:marker-style-name="T304"><text:span text:style-name="T297">8</text:span><text:span text:style-name="T304"/></text:p>
          </table:table-cell>
          <table:table-cell table:style-name="表格40.A2" office:value-type="string">
            <text:p text:style-name="P25" loext:marker-style-name="T224"><text:span text:style-name="T217">24</text:span><text:span text:style-name="T224"/></text:p>
          </table:table-cell>
          <table:table-cell table:style-name="表格40.A2" office:value-type="string">
            <text:p text:style-name="P25" loext:marker-style-name="T367"><text:span text:style-name="T363">16,777,216</text:span><text:span text:style-name="T367"/></text:p>
          </table:table-cell>
          <table:table-cell table:style-name="表格40.A2" office:value-type="string">
            <text:p text:style-name="P25" loext:marker-style-name="T80"><text:span text:style-name="T79">第 </text:span><text:span text:style-name="T121">1 </text:span><text:span text:style-name="T79">組（</text:span><text:span text:style-name="T121">A </text:span><text:span text:style-name="T79">類）</text:span></text:p>
          </table:table-cell>
        </table:table-row>
        <table:table-row table:style-name="表格40.1">
          <table:table-cell table:style-name="表格40.A3" office:value-type="string">
            <text:p text:style-name="P25" loext:marker-style-name="T292"><text:span text:style-name="T293">/16</text:span><text:span text:style-name="T292"/></text:p>
          </table:table-cell>
          <table:table-cell table:style-name="表格40.A3" office:value-type="string">
            <text:p text:style-name="P25" loext:marker-style-name="T304"><text:span text:style-name="T297">16</text:span><text:span text:style-name="T304"/></text:p>
          </table:table-cell>
          <table:table-cell table:style-name="表格40.A3" office:value-type="string">
            <text:p text:style-name="P25" loext:marker-style-name="T224"><text:span text:style-name="T217">16</text:span><text:span text:style-name="T224"/></text:p>
          </table:table-cell>
          <table:table-cell table:style-name="表格40.A3" office:value-type="string">
            <text:p text:style-name="P25" loext:marker-style-name="T367"><text:span text:style-name="T363">65,536</text:span><text:span text:style-name="T367"/></text:p>
          </table:table-cell>
          <table:table-cell table:style-name="表格40.A3" office:value-type="string">
            <text:p text:style-name="P25" loext:marker-style-name="T80"><text:span text:style-name="T79">第 </text:span><text:span text:style-name="T121">1-2 </text:span><text:span text:style-name="T79">組（</text:span><text:span text:style-name="T121">B </text:span><text:span text:style-name="T79">類）</text:span></text:p>
          </table:table-cell>
        </table:table-row>
        <table:table-row table:style-name="表格40.1">
          <table:table-cell table:style-name="表格40.A2" office:value-type="string">
            <text:p text:style-name="P25" loext:marker-style-name="T292"><text:span text:style-name="T293">/24</text:span><text:span text:style-name="T292"/></text:p>
          </table:table-cell>
          <table:table-cell table:style-name="表格40.A2" office:value-type="string">
            <text:p text:style-name="P25" loext:marker-style-name="T304"><text:span text:style-name="T297">24</text:span><text:span text:style-name="T304"/></text:p>
          </table:table-cell>
          <table:table-cell table:style-name="表格40.A2" office:value-type="string">
            <text:p text:style-name="P25" loext:marker-style-name="T224"><text:span text:style-name="T217">8</text:span><text:span text:style-name="T224"/></text:p>
          </table:table-cell>
          <table:table-cell table:style-name="表格40.A2" office:value-type="string">
            <text:p text:style-name="P25" loext:marker-style-name="T367"><text:span text:style-name="T363">256</text:span><text:span text:style-name="T367"/></text:p>
          </table:table-cell>
          <table:table-cell table:style-name="表格40.A2" office:value-type="string">
            <text:p text:style-name="P25" loext:marker-style-name="T80"><text:span text:style-name="T79">第 </text:span><text:span text:style-name="T121">1-3 </text:span><text:span text:style-name="T79">組（</text:span><text:span text:style-name="T121">C </text:span><text:span text:style-name="T79">類）</text:span></text:p>
          </table:table-cell>
        </table:table-row>
        <table:table-row table:style-name="表格40.1">
          <table:table-cell table:style-name="表格40.A3" office:value-type="string">
            <text:p text:style-name="P25" loext:marker-style-name="T292"><text:span text:style-name="T293">/25</text:span><text:span text:style-name="T292"/></text:p>
          </table:table-cell>
          <table:table-cell table:style-name="表格40.A3" office:value-type="string">
            <text:p text:style-name="P25" loext:marker-style-name="T304"><text:span text:style-name="T297">25</text:span><text:span text:style-name="T304"/></text:p>
          </table:table-cell>
          <table:table-cell table:style-name="表格40.A3" office:value-type="string">
            <text:p text:style-name="P25" loext:marker-style-name="T224"><text:span text:style-name="T217">7</text:span><text:span text:style-name="T224"/></text:p>
          </table:table-cell>
          <table:table-cell table:style-name="表格40.A3" office:value-type="string">
            <text:p text:style-name="P25" loext:marker-style-name="T367"><text:span text:style-name="T363">128</text:span><text:span text:style-name="T367"/></text:p>
          </table:table-cell>
          <table:table-cell table:style-name="表格40.A3" office:value-type="string">
            <text:p text:style-name="P25" loext:marker-style-name="T80"><text:span text:style-name="T79">第 </text:span><text:span text:style-name="T121">1-3 </text:span><text:span text:style-name="T79">組 </text:span><text:span text:style-name="T121">+ </text:span><text:span text:style-name="T79">第 </text:span><text:span text:style-name="T121">4 </text:span><text:span text:style-name="T79">組前 </text:span><text:span text:style-name="T121">1 bit</text:span></text:p>
          </table:table-cell>
        </table:table-row>
        <table:table-row table:style-name="表格40.1">
          <table:table-cell table:style-name="表格40.A2" office:value-type="string">
            <text:p text:style-name="P25" loext:marker-style-name="T292"><text:span text:style-name="T293">/26</text:span><text:span text:style-name="T292"/></text:p>
          </table:table-cell>
          <table:table-cell table:style-name="表格40.A2" office:value-type="string">
            <text:p text:style-name="P25" loext:marker-style-name="T305"><text:span text:style-name="T298">26</text:span><text:span text:style-name="T305"/></text:p>
          </table:table-cell>
          <table:table-cell table:style-name="表格40.A2" office:value-type="string">
            <text:p text:style-name="P25" loext:marker-style-name="T225"><text:span text:style-name="T218">6</text:span><text:span text:style-name="T225"/></text:p>
          </table:table-cell>
          <table:table-cell table:style-name="表格40.A2" office:value-type="string">
            <text:p text:style-name="P25" loext:marker-style-name="T367"><text:span text:style-name="T363">64</text:span><text:span text:style-name="T367"/></text:p>
          </table:table-cell>
          <table:table-cell table:style-name="表格40.A2" office:value-type="string">
            <text:p text:style-name="P25" loext:marker-style-name="T80"><text:span text:style-name="T79">第 </text:span><text:span text:style-name="T121">1-3 </text:span><text:span text:style-name="T79">組 </text:span><text:span text:style-name="T121">+ </text:span><text:span text:style-name="T79">第 </text:span><text:span text:style-name="T121">4 </text:span><text:span text:style-name="T79">組前 </text:span><text:span text:style-name="T121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5" loext:marker-style-name="T292"><text:span text:style-name="T293">/27</text:span><text:span text:style-name="T292"/></text:p>
          </table:table-cell>
          <table:table-cell table:style-name="表格40.A3" office:value-type="string">
            <text:p text:style-name="P25" loext:marker-style-name="T305"><text:span text:style-name="T298">27</text:span><text:span text:style-name="T305"/></text:p>
          </table:table-cell>
          <table:table-cell table:style-name="表格40.A3" office:value-type="string">
            <text:p text:style-name="P25" loext:marker-style-name="T225"><text:span text:style-name="T218">5</text:span><text:span text:style-name="T225"/></text:p>
          </table:table-cell>
          <table:table-cell table:style-name="表格40.A3" office:value-type="string">
            <text:p text:style-name="P25" loext:marker-style-name="T367"><text:span text:style-name="T363">32</text:span><text:span text:style-name="T367"/></text:p>
          </table:table-cell>
          <table:table-cell table:style-name="表格40.A3" office:value-type="string">
            <text:p text:style-name="P25" loext:marker-style-name="T80"><text:span text:style-name="T79">第 </text:span><text:span text:style-name="T121">1-3 </text:span><text:span text:style-name="T79">組 </text:span><text:span text:style-name="T121">+ </text:span><text:span text:style-name="T79">第 </text:span><text:span text:style-name="T121">4 </text:span><text:span text:style-name="T79">組前 </text:span><text:span text:style-name="T121">3 bit</text:span></text:p>
          </table:table-cell>
        </table:table-row>
        <table:table-row table:style-name="表格40.1">
          <table:table-cell table:style-name="表格40.A2" office:value-type="string">
            <text:p text:style-name="P25" loext:marker-style-name="T292"><text:span text:style-name="T293">/28</text:span><text:span text:style-name="T292"/></text:p>
          </table:table-cell>
          <table:table-cell table:style-name="表格40.A2" office:value-type="string">
            <text:p text:style-name="P25" loext:marker-style-name="T305"><text:span text:style-name="T298">28</text:span><text:span text:style-name="T305"/></text:p>
          </table:table-cell>
          <table:table-cell table:style-name="表格40.A2" office:value-type="string">
            <text:p text:style-name="P25" loext:marker-style-name="T225"><text:span text:style-name="T218">4</text:span><text:span text:style-name="T225"/></text:p>
          </table:table-cell>
          <table:table-cell table:style-name="表格40.A2" office:value-type="string">
            <text:p text:style-name="P25" loext:marker-style-name="T367"><text:span text:style-name="T363">16</text:span><text:span text:style-name="T367"/></text:p>
          </table:table-cell>
          <table:table-cell table:style-name="表格40.A2" office:value-type="string">
            <text:p text:style-name="P25" loext:marker-style-name="T80"><text:span text:style-name="T79">第 </text:span><text:span text:style-name="T121">1-3 </text:span><text:span text:style-name="T79">組 </text:span><text:span text:style-name="T121">+ </text:span><text:span text:style-name="T79">第 </text:span><text:span text:style-name="T121">4 </text:span><text:span text:style-name="T79">組前 </text:span><text:span text:style-name="T121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8"><text:span text:style-name="T151">▸ <text:s/></text:span><text:span text:style-name="T48">用 </text:span><text:span text:style-name="T59">bit </text:span><text:span text:style-name="T48">切割理解 </text:span><text:span text:style-name="T59">/26</text:span></text:p>
            <text:p text:style-name="P9" loext:marker-style-name="T96"><text:span text:style-name="T95">以 </text:span><text:span text:style-name="T129">192.168.1.0</text:span><text:span text:style-name="T130">/26</text:span><text:span text:style-name="T129"> </text:span><text:span text:style-name="T95">為例：</text:span></text:p>
            <text:p text:style-name="P10"><text:span text:style-name="T61">11000000 . 10101000 . 00000001 . 00</text:span><text:span text:style-name="T41">|000000</text:span></text:p>
            <text:p text:style-name="P10" loext:marker-style-name="T96"><text:span text:style-name="T129">└── </text:span><text:span text:style-name="T101">前 </text:span><text:span text:style-name="T135">26 bit</text:span><text:span text:style-name="T101">（固定＝網路）</text:span><text:span text:style-name="T95">──┘ └ </text:span><text:span text:style-name="T237">後 </text:span><text:span text:style-name="T247">6 bit</text:span><text:span text:style-name="T237">（可變＝主機）</text:span><text:span text:style-name="T95">┘</text:span></text:p>
            <text:p text:style-name="P10" loext:marker-style-name="T96"><text:span text:style-name="T129">→ </text:span><text:span text:style-name="T461">主機 </text:span><text:span text:style-name="T462">bit </text:span><text:span text:style-name="T461">有 </text:span><text:span text:style-name="T462">6 </text:span><text:span text:style-name="T461">個 → </text:span><text:span text:style-name="T462">2⁶ = 64 </text:span><text:span text:style-name="T461">個 </text:span><text:span text:style-name="T462">IP</text:span><text:span text:style-name="T95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肆、為什麼可用主機數要「−</text:span><text:span text:style-name="T27">2</text:span><text:span text:style-name="T28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6" loext:marker-style-name="T66"><text:span text:style-name="T65">名稱</text:span><text:span text:style-name="T66"/></text:p>
            </table:table-cell>
            <table:table-cell table:style-name="表格41.A1" office:value-type="string">
              <text:p text:style-name="P6" loext:marker-style-name="T66"><text:span text:style-name="T65">位置</text:span><text:span text:style-name="T66"/></text:p>
            </table:table-cell>
            <table:table-cell table:style-name="表格41.A1" office:value-type="string">
              <text:p text:style-name="P6" loext:marker-style-name="T66"><text:span text:style-name="T65">用途</text:span><text:span text:style-name="T66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5" loext:marker-style-name="T382"><text:span text:style-name="T381">網路位址 </text:span><text:span text:style-name="T400">Network Address</text:span></text:p>
          </table:table-cell>
          <table:table-cell table:style-name="表格41.A2" office:value-type="string">
            <text:p text:style-name="P25" loext:marker-style-name="T262"><text:span text:style-name="T261">第一個 </text:span><text:span text:style-name="T258">IP</text:span><text:span text:style-name="T261">（最小）</text:span></text:p>
          </table:table-cell>
          <table:table-cell table:style-name="表格41.A2" office:value-type="string">
            <text:p text:style-name="P25" loext:marker-style-name="T80"><text:span text:style-name="T79">代表這整個子網路本身，不能分配給設備</text:span><text:span text:style-name="T80"/></text:p>
          </table:table-cell>
        </table:table-row>
        <table:table-row table:style-name="表格41.1">
          <table:table-cell table:style-name="表格41.A3" office:value-type="string">
            <text:p text:style-name="P25" loext:marker-style-name="T382"><text:span text:style-name="T381">廣播位址 </text:span><text:span text:style-name="T400">Broadcast Address</text:span></text:p>
          </table:table-cell>
          <table:table-cell table:style-name="表格41.A3" office:value-type="string">
            <text:p text:style-name="P25" loext:marker-style-name="T262"><text:span text:style-name="T261">最後一個 </text:span><text:span text:style-name="T258">IP</text:span><text:span text:style-name="T261">（最大）</text:span></text:p>
          </table:table-cell>
          <table:table-cell table:style-name="表格41.A3" office:value-type="string">
            <text:p text:style-name="P25" loext:marker-style-name="T80"><text:span text:style-name="T275">送到此位址＝網路內所有設備都收到</text:span><text:span text:style-name="T79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9" loext:marker-style-name="T204"><text:span text:style-name="T203">可用主機數 ＝ </text:span><text:span text:style-name="T209">IP </text:span><text:span text:style-name="T203">總數 − </text:span><text:span text:style-name="T209">2</text:span></text:p>
            <text:p text:style-name="P10" loext:marker-style-name="T96"><text:span text:style-name="T95">【</text:span><text:span text:style-name="T129">/24 </text:span><text:span text:style-name="T95">示範】</text:span><text:span text:style-name="T134">192.168.1.0</text:span><text:span text:style-name="T100">＝網路位址（不能用）</text:span><text:span text:style-name="T95">… </text:span><text:span text:style-name="T137">192.168.1.255</text:span><text:span text:style-name="T103">＝廣播位址（不能用）</text:span><text:span text:style-name="T95">→ </text:span><text:span text:style-name="T425">共 </text:span><text:span text:style-name="T420">256 </text:span><text:span text:style-name="T425">個，可用 </text:span><text:span text:style-name="T420">254 </text:span><text:span text:style-name="T425">個</text:span><text:span text:style-name="T95">。</text:span></text:p>
            <text:p text:style-name="P10" loext:marker-style-name="T96"><text:span text:style-name="T95">【</text:span><text:span text:style-name="T129">/26 </text:span><text:span text:style-name="T95">示範</text:span><text:span text:style-name="T129">·</text:span><text:span text:style-name="T95">最常考】</text:span><text:span text:style-name="T134">192.168.1.0</text:span><text:span text:style-name="T100">＝網路位址</text:span><text:span text:style-name="T95"> … </text:span><text:span text:style-name="T137">192.168.1.63</text:span><text:span text:style-name="T103">＝廣播位址</text:span><text:span text:style-name="T95"> → </text:span><text:span text:style-name="T425">共 </text:span><text:span text:style-name="T420">64 </text:span><text:span text:style-name="T425">個（</text:span><text:span text:style-name="T420">2⁶</text:span><text:span text:style-name="T425">），可用 </text:span><text:span text:style-name="T420">62 </text:span><text:span text:style-name="T425">個</text:span><text:span text:style-name="T95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9"><text:span text:style-name="T171">唯一例外 </text:span><text:span text:style-name="T176">/31</text:span><text:span text:style-name="T171">（點對點，</text:span><text:span text:style-name="T176">RFC 3021</text:span><text:span text:style-name="T171">）：</text:span><text:span text:style-name="T318">只有 </text:span><text:span text:style-name="T330">2 </text:span><text:span text:style-name="T318">個 </text:span><text:span text:style-name="T330">IP</text:span><text:span text:style-name="T326">，</text:span><text:span text:style-name="T318">兩個都可用作主機</text:span><text:span text:style-name="T237">，沒有網路位址和廣播位址</text:span><text:span text:style-name="T95">。考試若未特別提到，預設仍要 −</text:span><text:span text:style-name="T129">2</text:span><text:span text:style-name="T95">。</text:span></text:p>
          </table:table-cell>
          <table:covered-table-cell/>
          <table:covered-table-cell/>
        </table:table-row>
      </table:table>
      <text:h text:style-name="P3" text:outline-level="2" loext:marker-style-name="T27"><text:span text:style-name="T28">伍、</text:span><text:span text:style-name="T27">VLSM</text:span><text:span text:style-name="T28">（可變長度子網路遮罩）</text:span></text:h>
      <text:p text:style-name="P31" loext:marker-style-name="T96"><text:span text:style-name="T129">VLSM </text:span><text:span text:style-name="T95">的做法：</text:span><text:span text:style-name="T100">依各部門「實際需求」分配</text:span><text:span text:style-name="T351">剛剛好大小</text:span><text:span text:style-name="T100">的子網路，</text:span><text:span text:style-name="T389">不多給、不浪費</text:span><text:span text:style-name="T95">。例如 </text:span><text:span text:style-name="T129">A </text:span><text:span text:style-name="T95">部門 </text:span><text:span text:style-name="T129">100 </text:span><text:span text:style-name="T95">台、</text:span><text:span text:style-name="T129">B </text:span><text:span text:style-name="T95">部門 </text:span><text:span text:style-name="T129">50 </text:span><text:span text:style-name="T95">台、</text:span><text:span text:style-name="T129">C </text:span><text:span text:style-name="T95">部門 </text:span><text:span text:style-name="T129">10 </text:span><text:span text:style-name="T95">台，</text:span><text:span text:style-name="T319">若全用 </text:span><text:span text:style-name="T331">/24 </text:span><text:span text:style-name="T319">會浪費大量 </text:span><text:span text:style-name="T331">IP</text:span><text:span text:style-name="T95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"><text:span text:style-name="T151">📋 <text:s/></text:span><text:span text:style-name="T165">VLSM </text:span><text:span text:style-name="T155">標準流程（三步驟）</text:span></text:p>
            <text:p text:style-name="P9" loext:marker-style-name="T160"><text:span text:style-name="T166">①</text:span><text:span text:style-name="T168"> </text:span><text:span text:style-name="T159">將需求由大到小排序</text:span></text:p>
            <text:p text:style-name="P10"><text:span text:style-name="T166">② </text:span><text:span text:style-name="T159">計算每個需求所需前綴</text:span><text:span text:style-name="T158">：</text:span><text:span text:style-name="T372">需求 </text:span><text:span text:style-name="T374">+ 2 → </text:span><text:span text:style-name="T372">找最小 </text:span><text:span text:style-name="T374">2ⁿ → </text:span><text:span text:style-name="T372">前綴 </text:span><text:span text:style-name="T374">= 32 − n</text:span></text:p>
            <text:p text:style-name="P10" loext:marker-style-name="T160"><text:span text:style-name="T166">③ </text:span><text:span text:style-name="T158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9"><text:span text:style-name="T169">為什麼要「由大到小」？　</text:span><text:span text:style-name="T95">因為「對齊（</text:span><text:span text:style-name="T129">Alignment</text:span><text:span text:style-name="T95">）」：</text:span><text:span text:style-name="T237">子網路的起始位址必須是其大小的整數倍</text:span><text:span text:style-name="T95">。</text:span><text:span text:style-name="T463">大小 </text:span><text:span text:style-name="T474">128 </text:span><text:span text:style-name="T463">的子網只能從 </text:span><text:span text:style-name="T474">0</text:span><text:span text:style-name="T463">、</text:span><text:span text:style-name="T474">128… </text:span><text:span text:style-name="T463">開始；大小 </text:span><text:span text:style-name="T474">64 </text:span><text:span text:style-name="T463">的只能從 </text:span><text:span text:style-name="T474">0</text:span><text:span text:style-name="T463">、</text:span><text:span text:style-name="T474">64</text:span><text:span text:style-name="T463">、</text:span><text:span text:style-name="T474">128… </text:span><text:span text:style-name="T463">開始</text:span><text:span text:style-name="T95">。</text:span></text:p>
            <text:p text:style-name="P10"><text:span text:style-name="T169">反面示範：</text:span><text:span text:style-name="T95">若先切小的 </text:span><text:span text:style-name="T129">C</text:span><text:span text:style-name="T95">（</text:span><text:span text:style-name="T129">/28</text:span><text:span text:style-name="T95">，</text:span><text:span text:style-name="T129">0</text:span><text:span text:style-name="T95">～</text:span><text:span text:style-name="T129">15</text:span><text:span text:style-name="T95">），</text:span><text:span text:style-name="T352">再切大的 </text:span><text:span text:style-name="T357">A</text:span><text:span text:style-name="T352">（</text:span><text:span text:style-name="T357">/25</text:span><text:span text:style-name="T352">，</text:span><text:span text:style-name="T357">128 </text:span><text:span text:style-name="T352">個），最近可用對齊位址是 </text:span><text:span text:style-name="T357">128</text:span><text:span text:style-name="T129"> → </text:span><text:span text:style-name="T238">中間 </text:span><text:span text:style-name="T249">16</text:span><text:span text:style-name="T238">～</text:span><text:span text:style-name="T249">127 </text:span><text:span text:style-name="T238">共 </text:span><text:span text:style-name="T249">112 </text:span><text:span text:style-name="T238">個 </text:span><text:span text:style-name="T249">IP </text:span><text:span text:style-name="T238">全浪費！</text:span><text:span text:style-name="T95">正解：</text:span><text:span text:style-name="T268">先切大的，大的天然對齊，小的再從後面切</text:span><text:span text:style-name="T95">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6">前綴計算公式詳解</text:span><text:span text:style-name="T155">（以</text:span><text:span text:style-name="T397">需要 </text:span><text:span text:style-name="T398">100 </text:span><text:span text:style-name="T397">台主機為例</text:span><text:span text:style-name="T155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9" loext:marker-style-name="T96"><text:span text:style-name="T129">① </text:span><text:span text:style-name="T101">加 </text:span><text:span text:style-name="T135">2</text:span><text:span text:style-name="T101">（預留網路 </text:span><text:span text:style-name="T135">+ </text:span><text:span text:style-name="T101">廣播）</text:span><text:span text:style-name="T95">：</text:span><text:span text:style-name="T130">100 + 2 = 102</text:span></text:p>
            <text:p text:style-name="P10" loext:marker-style-name="T96"><text:span text:style-name="T129">② </text:span><text:span text:style-name="T98">找「大於等於 </text:span><text:span text:style-name="T131">102</text:span><text:span text:style-name="T98">」的最小 </text:span><text:span text:style-name="T131">2ⁿ</text:span><text:span text:style-name="T95">：</text:span><text:span text:style-name="T129">2⁶ = 64</text:span><text:span text:style-name="T95">（太小）、</text:span><text:span text:style-name="T247">2⁷ = 128</text:span><text:span text:style-name="T237">（夠）→ </text:span><text:span text:style-name="T247">n = 7</text:span></text:p>
            <text:p text:style-name="P10" loext:marker-style-name="T96"><text:span text:style-name="T129">③ </text:span><text:span text:style-name="T268">前綴 </text:span><text:span text:style-name="T273">= 32 − n = 32 − 7 = 25</text:span><text:span text:style-name="T129"> →</text:span><text:span text:style-name="T338"> </text:span><text:span text:style-name="T320">使用 </text:span><text:span text:style-name="T332">/25</text:span><text:span text:style-name="T320">（驗證：</text:span><text:span text:style-name="T332">2⁷ = 128</text:span><text:span text:style-name="T320">，可用 </text:span><text:span text:style-name="T332">126 ≥ 100 ✔</text:span><text:span text:style-name="T320">）</text:span></text:p>
            <text:p text:style-name="P10" loext:marker-style-name="T26"><text:span text:style-name="T25">公式一句話</text:span><text:span text:style-name="T24">：</text:span><text:span text:style-name="T426">需求 </text:span><text:span text:style-name="T421">+2 → </text:span><text:span text:style-name="T426">找最小 </text:span><text:span text:style-name="T421">2ⁿ</text:span><text:span text:style-name="T41"> → </text:span><text:span text:style-name="T247">/(32−n)</text:span></text:p>
          </table:table-cell>
        </table:table-row>
      </table:table>
      <text:h text:style-name="P2" text:outline-level="3"><text:soft-page-break/><text:span text:style-name="T153">▍</text:span><text:span text:style-name="T154"> </text:span><text:span text:style-name="T155">完整範例：起始 </text:span><text:span text:style-name="T154">192.168.1.0/24</text:span><text:span text:style-name="T155">，需求 </text:span><text:span text:style-name="T154">A=100</text:span><text:span text:style-name="T155">、</text:span><text:span text:style-name="T154">B=50</text:span><text:span text:style-name="T155">、</text:span><text:span text:style-name="T154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6" loext:marker-style-name="T72"><text:span text:style-name="T71">部門</text:span><text:span text:style-name="T72"/></text:p>
            </table:table-cell>
            <table:table-cell table:style-name="表格44.A1" office:value-type="string">
              <text:p text:style-name="P6" loext:marker-style-name="T72"><text:span text:style-name="T71">需求</text:span><text:span text:style-name="T72"/></text:p>
            </table:table-cell>
            <table:table-cell table:style-name="表格44.A1" office:value-type="string">
              <text:p text:style-name="P6" loext:marker-style-name="T72"><text:span text:style-name="T77">+2</text:span><text:span text:style-name="T72"/></text:p>
            </table:table-cell>
            <table:table-cell table:style-name="表格44.A1" office:value-type="string">
              <text:p text:style-name="P6" loext:marker-style-name="T72"><text:span text:style-name="T77">2ⁿ</text:span><text:span text:style-name="T72"/></text:p>
            </table:table-cell>
            <table:table-cell table:style-name="表格44.A1" office:value-type="string">
              <text:p text:style-name="P6" loext:marker-style-name="T72"><text:span text:style-name="T71">前綴</text:span><text:span text:style-name="T72"/></text:p>
            </table:table-cell>
            <table:table-cell table:style-name="表格44.A1" office:value-type="string">
              <text:p text:style-name="P6" loext:marker-style-name="T72"><text:span text:style-name="T71">切割結果（範圍）</text:span><text:span text:style-name="T72"/></text:p>
            </table:table-cell>
            <table:table-cell table:style-name="表格44.A1" office:value-type="string">
              <text:p text:style-name="P6" loext:marker-style-name="T72"><text:span text:style-name="T71">可用 </text:span><text:span text:style-name="T77">/ </text:span><text:span text:style-name="T71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5" loext:marker-style-name="T112"><text:span text:style-name="T144">A</text:span><text:span text:style-name="T112"/></text:p>
          </table:table-cell>
          <table:table-cell table:style-name="表格44.A2" office:value-type="string">
            <text:p text:style-name="P25" loext:marker-style-name="T112"><text:span text:style-name="T144">100</text:span><text:span text:style-name="T112"/></text:p>
          </table:table-cell>
          <table:table-cell table:style-name="表格44.A2" office:value-type="string">
            <text:p text:style-name="P25" loext:marker-style-name="T112"><text:span text:style-name="T144">102</text:span><text:span text:style-name="T112"/></text:p>
          </table:table-cell>
          <table:table-cell table:style-name="表格44.A2" office:value-type="string">
            <text:p text:style-name="P25" loext:marker-style-name="T112"><text:span text:style-name="T144">128</text:span><text:span text:style-name="T113">（</text:span><text:span text:style-name="T144">2</text:span><text:span text:style-name="T146">⁷</text:span><text:span text:style-name="T113">）</text:span></text:p>
          </table:table-cell>
          <table:table-cell table:style-name="表格44.A2" office:value-type="string">
            <text:p text:style-name="P25" loext:marker-style-name="T117"><text:span text:style-name="T147">/25</text:span><text:span text:style-name="T117"/></text:p>
          </table:table-cell>
          <table:table-cell table:style-name="表格44.A2" office:value-type="string">
            <text:p text:style-name="P25" loext:marker-style-name="T112"><text:span text:style-name="T144">192.168.1.0</text:span><text:span text:style-name="T147">/25</text:span><text:span text:style-name="T113">（</text:span><text:span text:style-name="T144">0</text:span><text:span text:style-name="T113">～</text:span><text:span text:style-name="T327">127</text:span><text:span text:style-name="T113">）</text:span></text:p>
          </table:table-cell>
          <table:table-cell table:style-name="表格44.A2" office:value-type="string">
            <text:p text:style-name="P25" loext:marker-style-name="T112"><text:span text:style-name="T144">126 ≥ 100 ✔</text:span><text:span text:style-name="T112"/></text:p>
          </table:table-cell>
        </table:table-row>
        <table:table-row table:style-name="表格44.1">
          <table:table-cell table:style-name="表格44.A3" office:value-type="string">
            <text:p text:style-name="P25" loext:marker-style-name="T112"><text:span text:style-name="T144">B</text:span><text:span text:style-name="T112"/></text:p>
          </table:table-cell>
          <table:table-cell table:style-name="表格44.A3" office:value-type="string">
            <text:p text:style-name="P25" loext:marker-style-name="T112"><text:span text:style-name="T144">50</text:span><text:span text:style-name="T112"/></text:p>
          </table:table-cell>
          <table:table-cell table:style-name="表格44.A3" office:value-type="string">
            <text:p text:style-name="P25" loext:marker-style-name="T112"><text:span text:style-name="T144">52</text:span><text:span text:style-name="T112"/></text:p>
          </table:table-cell>
          <table:table-cell table:style-name="表格44.A3" office:value-type="string">
            <text:p text:style-name="P25" loext:marker-style-name="T112"><text:span text:style-name="T144">64</text:span><text:span text:style-name="T113">（</text:span><text:span text:style-name="T144">2</text:span><text:span text:style-name="T146">⁶</text:span><text:span text:style-name="T113">）</text:span></text:p>
          </table:table-cell>
          <table:table-cell table:style-name="表格44.A3" office:value-type="string">
            <text:p text:style-name="P25" loext:marker-style-name="T117"><text:span text:style-name="T147">/26</text:span><text:span text:style-name="T117"/></text:p>
          </table:table-cell>
          <table:table-cell table:style-name="表格44.A3" office:value-type="string">
            <text:p text:style-name="P25" loext:marker-style-name="T112"><text:span text:style-name="T144">192.168.1.128</text:span><text:span text:style-name="T147">/26</text:span><text:span text:style-name="T113">（</text:span><text:span text:style-name="T144">128</text:span><text:span text:style-name="T113">～</text:span><text:span text:style-name="T327">191</text:span><text:span text:style-name="T113">）</text:span></text:p>
          </table:table-cell>
          <table:table-cell table:style-name="表格44.A3" office:value-type="string">
            <text:p text:style-name="P25" loext:marker-style-name="T112"><text:span text:style-name="T144">62 ≥ 50 ✔</text:span><text:span text:style-name="T112"/></text:p>
          </table:table-cell>
        </table:table-row>
        <table:table-row table:style-name="表格44.1">
          <table:table-cell table:style-name="表格44.A2" office:value-type="string">
            <text:p text:style-name="P25" loext:marker-style-name="T112"><text:span text:style-name="T144">C</text:span><text:span text:style-name="T112"/></text:p>
          </table:table-cell>
          <table:table-cell table:style-name="表格44.A2" office:value-type="string">
            <text:p text:style-name="P25" loext:marker-style-name="T112"><text:span text:style-name="T144">10</text:span><text:span text:style-name="T112"/></text:p>
          </table:table-cell>
          <table:table-cell table:style-name="表格44.A2" office:value-type="string">
            <text:p text:style-name="P25" loext:marker-style-name="T112"><text:span text:style-name="T144">12</text:span><text:span text:style-name="T112"/></text:p>
          </table:table-cell>
          <table:table-cell table:style-name="表格44.A2" office:value-type="string">
            <text:p text:style-name="P25" loext:marker-style-name="T112"><text:span text:style-name="T144">16</text:span><text:span text:style-name="T113">（</text:span><text:span text:style-name="T144">2</text:span><text:span text:style-name="T146">⁴</text:span><text:span text:style-name="T113">）</text:span></text:p>
          </table:table-cell>
          <table:table-cell table:style-name="表格44.A2" office:value-type="string">
            <text:p text:style-name="P25" loext:marker-style-name="T117"><text:span text:style-name="T147">/28</text:span><text:span text:style-name="T117"/></text:p>
          </table:table-cell>
          <table:table-cell table:style-name="表格44.A2" office:value-type="string">
            <text:p text:style-name="P25" loext:marker-style-name="T112"><text:span text:style-name="T144">192.168.1.192</text:span><text:span text:style-name="T147">/28</text:span><text:span text:style-name="T113">（</text:span><text:span text:style-name="T144">192</text:span><text:span text:style-name="T113">～</text:span><text:span text:style-name="T327">207</text:span><text:span text:style-name="T113">）</text:span></text:p>
          </table:table-cell>
          <table:table-cell table:style-name="表格44.A2" office:value-type="string">
            <text:p text:style-name="P25" loext:marker-style-name="T112"><text:span text:style-name="T144">14 ≥ 10 ✔</text:span><text:span text:style-name="T112"/></text:p>
          </table:table-cell>
        </table:table-row>
      </table:table>
      <text:p text:style-name="P31" loext:marker-style-name="T11"><text:span text:style-name="T10">剩餘 </text:span><text:span text:style-name="T20">192.168.1.208 </text:span><text:span text:style-name="T10">～ </text:span><text:span text:style-name="T20">.255</text:span><text:span text:style-name="T10">（</text:span><text:span text:style-name="T20">48 </text:span><text:span text:style-name="T10">個 </text:span><text:span text:style-name="T20">IP</text:span><text:span text:style-name="T10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8"><text:span text:style-name="T151">💡 <text:s/></text:span><text:span text:style-name="T201">考試技巧</text:span></text:p>
            <text:p text:style-name="P9" loext:marker-style-name="T96"><text:span text:style-name="T321">快速判斷一個 </text:span><text:span text:style-name="T333">IP </text:span><text:span text:style-name="T321">屬於哪個 </text:span><text:span text:style-name="T333">/26 </text:span><text:span text:style-name="T321">子網</text:span><text:span text:style-name="T95">（</text:span><text:span text:style-name="T237">每段 </text:span><text:span text:style-name="T247">64 </text:span><text:span text:style-name="T237">個，起點 </text:span><text:span text:style-name="T247">0</text:span><text:span text:style-name="T237">、</text:span><text:span text:style-name="T247">64</text:span><text:span text:style-name="T237">、</text:span><text:span text:style-name="T247">128</text:span><text:span text:style-name="T237">、</text:span><text:span text:style-name="T247">192</text:span><text:span text:style-name="T95">）：</text:span><text:span text:style-name="T100">看最後一個 </text:span><text:span text:style-name="T134">Octet </text:span><text:span text:style-name="T100">落在哪個區間 </text:span><text:span text:style-name="T95">→</text:span></text:p>
            <text:p text:style-name="P10" loext:marker-style-name="T96"><text:span text:style-name="T135">0</text:span><text:span text:style-name="T101">～</text:span><text:span text:style-name="T135">63</text:span><text:span text:style-name="T129"> → x.0/26</text:span><text:span text:style-name="T95">　｜　</text:span><text:span text:style-name="T135">64</text:span><text:span text:style-name="T101">～</text:span><text:span text:style-name="T135">127</text:span><text:span text:style-name="T129"> → x.64/26</text:span><text:span text:style-name="T95">　｜　</text:span><text:span text:style-name="T135">128</text:span><text:span text:style-name="T101">～</text:span><text:span text:style-name="T135">191</text:span><text:span text:style-name="T129"> → x.128/26</text:span><text:span text:style-name="T95">　｜　</text:span><text:span text:style-name="T135">192</text:span><text:span text:style-name="T101">～</text:span><text:span text:style-name="T135">255</text:span><text:span text:style-name="T129"> → x.192/26</text:span></text:p>
          </table:table-cell>
        </table:table-row>
      </table:table>
      <text:h text:style-name="P3" text:outline-level="2" loext:marker-style-name="T27"><text:span text:style-name="T28">陸、</text:span><text:span text:style-name="T27">CIDR</text:span><text:span text:style-name="T28">（路由聚合 </text:span><text:span text:style-name="T27">/ </text:span><text:span text:style-name="T28">超網合併）</text:span></text:h>
      <text:p text:style-name="P31" loext:marker-style-name="T96"><text:span text:style-name="T129">CIDR </text:span><text:span text:style-name="T95">的合併功能是 </text:span><text:span text:style-name="T129">VLSM </text:span><text:span text:style-name="T95">的「反向操作」：</text:span><text:span text:style-name="T358">VLSM </text:span><text:span text:style-name="T350">把大網路切小</text:span><text:span text:style-name="T95">；</text:span><text:span text:style-name="T334">CIDR </text:span><text:span text:style-name="T322">合併把小網路合成一個大網路表示</text:span><text:span text:style-name="T95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8"><text:span text:style-name="T151">🔑 </text:span><text:span text:style-name="T152"><text:s/></text:span><text:span text:style-name="T157">合併三條件（缺一不可）</text:span></text:p>
            <text:p text:style-name="P9"><text:span text:style-name="T166">① </text:span><text:span text:style-name="T159">連續（</text:span><text:span text:style-name="T168">Contiguous</text:span><text:span text:style-name="T159">）</text:span><text:span text:style-name="T158">：</text:span><text:span text:style-name="T247">IP </text:span><text:span text:style-name="T237">範圍必須緊鄰</text:span><text:span text:style-name="T95">，</text:span><text:span text:style-name="T268">中間不能有空缺</text:span><text:span text:style-name="T95">。</text:span></text:p>
            <text:p text:style-name="P10"><text:span text:style-name="T166">② </text:span><text:span text:style-name="T159">數量是 </text:span><text:span text:style-name="T168">2ⁿ</text:span><text:span text:style-name="T158">：</text:span><text:span text:style-name="T129">2</text:span><text:span text:style-name="T95">、</text:span><text:span text:style-name="T129">4</text:span><text:span text:style-name="T95">、</text:span><text:span text:style-name="T129">8…</text:span><text:span text:style-name="T95">。</text:span></text:p>
            <text:p text:style-name="P10"><text:span text:style-name="T166">③ </text:span><text:span text:style-name="T159">起始位址對齊</text:span><text:span text:style-name="T158">：</text:span><text:span text:style-name="T95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8"><text:span text:style-name="T151">▸ <text:s/></text:span><text:span text:style-name="T48">合併範例與反例</text:span></text:p>
            <text:p text:style-name="P9"><text:span text:style-name="T99">範例：</text:span><text:span text:style-name="T335">2 </text:span><text:span text:style-name="T323">個 </text:span><text:span text:style-name="T335">/25 → 1 </text:span><text:span text:style-name="T323">個 </text:span><text:span text:style-name="T335">/24</text:span><text:span text:style-name="T99">　</text:span><text:span text:style-name="T129">192.168.1</text:span><text:span text:style-name="T134">.0</text:span><text:span text:style-name="T129">/25 </text:span><text:span text:style-name="T95">＋ </text:span><text:span text:style-name="T129">192.168.1</text:span><text:span text:style-name="T134">.128</text:span><text:span text:style-name="T129">/25 → ① </text:span><text:span text:style-name="T95">緊鄰✔ ② </text:span><text:span text:style-name="T129">2 </text:span><text:span text:style-name="T95">個（</text:span><text:span text:style-name="T129">2¹</text:span><text:span text:style-name="T95">）✔ ③ 起點 </text:span><text:span text:style-name="T129">.0</text:span><text:span text:style-name="T95">，</text:span><text:span text:style-name="T129">0÷256=0✔ → </text:span><text:span text:style-name="T95">合併為 </text:span><text:span text:style-name="T129">192.168.1</text:span><text:span text:style-name="T134">.0</text:span><text:span text:style-name="T129">/24</text:span><text:span text:style-name="T95">。</text:span></text:p>
            <text:p text:style-name="P10"><text:span text:style-name="T99">範例：</text:span><text:span text:style-name="T335">4 </text:span><text:span text:style-name="T323">個 </text:span><text:span text:style-name="T335">/24 → 1 </text:span><text:span text:style-name="T323">個 </text:span><text:span text:style-name="T335">/22</text:span><text:span text:style-name="T99">　</text:span><text:span text:style-name="T129">192.168</text:span><text:span text:style-name="T135">.0/1/2/3</text:span><text:span text:style-name="T129">.0/</text:span><text:span text:style-name="T130">24</text:span><text:span text:style-name="T129"> → </text:span><text:span text:style-name="T95">連續✔、</text:span><text:span text:style-name="T129">4 </text:span><text:span text:style-name="T95">個（</text:span><text:span text:style-name="T129">2²</text:span><text:span text:style-name="T95">）✔、對齊✔ → 合併為 </text:span><text:span text:style-name="T129">192.168</text:span><text:span text:style-name="T131">.0</text:span><text:span text:style-name="T129">.0/</text:span><text:span text:style-name="T130">22</text:span><text:span text:style-name="T95">。</text:span></text:p>
            <text:p text:style-name="P10"><text:span text:style-name="T183">反例（無法合併）：</text:span><text:span text:style-name="T405">192.168.1.0/24 </text:span><text:span text:style-name="T390">＋ </text:span><text:span text:style-name="T405">192.168.2.0/24 → </text:span><text:span text:style-name="T390">雖數量為 </text:span><text:span text:style-name="T405">2</text:span><text:span text:style-name="T390">，但起點 </text:span><text:span text:style-name="T405">.1 </text:span><text:span text:style-name="T390">不對齊</text:span><text:span text:style-name="T95">（</text:span><text:span text:style-name="T129">/23 </text:span><text:span text:style-name="T95">起點只能是偶數倍 </text:span><text:span text:style-name="T129">.0 </text:span><text:span text:style-name="T95">或 </text:span><text:span text:style-name="T129">.2</text:span><text:span text:style-name="T95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9"><text:span text:style-name="T202">合併後前綴公式：</text:span><text:span text:style-name="T95">合併 </text:span><text:span text:style-name="T129">2ⁿ </text:span><text:span text:style-name="T95">個子網 → 前綴減 </text:span><text:span text:style-name="T129">n</text:span><text:span text:style-name="T95">（</text:span><text:span text:style-name="T268">每合併一倍，</text:span><text:span text:style-name="T273">/ </text:span><text:span text:style-name="T268">的數字減 </text:span><text:span text:style-name="T273">1</text:span><text:span text:style-name="T95">）。</text:span></text:p>
            <text:p text:style-name="P10" loext:marker-style-name="T96"><text:span text:style-name="T450">2 </text:span><text:span text:style-name="T433">個 </text:span><text:span text:style-name="T450">/26 → /25</text:span><text:span text:style-name="T433">；</text:span><text:span text:style-name="T450">4 </text:span><text:span text:style-name="T433">個 </text:span><text:span text:style-name="T450">/26 → /24</text:span><text:span text:style-name="T433">；</text:span><text:span text:style-name="T450">2 </text:span><text:span text:style-name="T433">個 </text:span><text:span text:style-name="T450">/24 → /23</text:span><text:span text:style-name="T95">。</text:span></text:p>
          </table:table-cell>
        </table:table-row>
      </table:table>
      <text:h text:style-name="P3" text:outline-level="2" loext:marker-style-name="T27"><text:span text:style-name="T28">柒、子網路三大概念與解題流程</text:span><text:span text:style-name="T27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6" loext:marker-style-name="T66"><text:span text:style-name="T65">概念</text:span><text:span text:style-name="T66"/></text:p>
            </table:table-cell>
            <table:table-cell table:style-name="表格47.A1" office:value-type="string">
              <text:p text:style-name="P6" loext:marker-style-name="T66"><text:span text:style-name="T65">關鍵字</text:span><text:span text:style-name="T66"/></text:p>
            </table:table-cell>
            <table:table-cell table:style-name="表格47.A1" office:value-type="string">
              <text:p text:style-name="P6" loext:marker-style-name="T66"><text:span text:style-name="T65">核心規則</text:span><text:span text:style-name="T66"/></text:p>
            </table:table-cell>
            <table:table-cell table:style-name="表格47.A1" office:value-type="string">
              <text:p text:style-name="P6" loext:marker-style-name="T66"><text:span text:style-name="T65">比喻</text:span><text:span text:style-name="T66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5" loext:marker-style-name="T80"><text:span text:style-name="T121">IP </text:span><text:span text:style-name="T79">分類</text:span></text:p>
          </table:table-cell>
          <table:table-cell table:style-name="表格47.A2" office:value-type="string">
            <text:p text:style-name="P25" loext:marker-style-name="T80"><text:span text:style-name="T121">A/B/C </text:span><text:span text:style-name="T79">類</text:span></text:p>
          </table:table-cell>
          <table:table-cell table:style-name="表格47.A2" office:value-type="string">
            <text:p text:style-name="P25" loext:marker-style-name="T262"><text:span text:style-name="T261">看第一組數字判斷類別</text:span><text:span text:style-name="T262"/></text:p>
          </table:table-cell>
          <table:table-cell table:style-name="表格47.A2" office:value-type="string">
            <text:p text:style-name="P25" loext:marker-style-name="T80"><text:span text:style-name="T79">土地大小分類</text:span><text:span text:style-name="T80"/></text:p>
          </table:table-cell>
        </table:table-row>
        <table:table-row table:style-name="表格47.1">
          <table:table-cell table:style-name="表格47.A3" office:value-type="string">
            <text:p text:style-name="P25" loext:marker-style-name="T80"><text:span text:style-name="T121">VLSM</text:span><text:span text:style-name="T80"/></text:p>
          </table:table-cell>
          <table:table-cell table:style-name="表格47.A3" office:value-type="string">
            <text:p text:style-name="P25" loext:marker-style-name="T80"><text:span text:style-name="T79">切子網路</text:span><text:span text:style-name="T80"/></text:p>
          </table:table-cell>
          <table:table-cell table:style-name="表格47.A3" office:value-type="string">
            <text:p text:style-name="P25" loext:marker-style-name="T80"><text:span text:style-name="T82">由大到小</text:span><text:span text:style-name="T79">；</text:span><text:span text:style-name="T222">需求</text:span><text:span text:style-name="T216">+2→2ⁿ→/(32−n)</text:span></text:p>
          </table:table-cell>
          <table:table-cell table:style-name="表格47.A3" office:value-type="string">
            <text:p text:style-name="P25" loext:marker-style-name="T80"><text:span text:style-name="T79">把大地切成不同大小的小塊</text:span><text:span text:style-name="T80"/></text:p>
          </table:table-cell>
        </table:table-row>
        <table:table-row table:style-name="表格47.1">
          <table:table-cell table:style-name="表格47.A2" office:value-type="string">
            <text:p text:style-name="P25" loext:marker-style-name="T80"><text:span text:style-name="T121">CIDR </text:span><text:span text:style-name="T79">合併</text:span></text:p>
          </table:table-cell>
          <table:table-cell table:style-name="表格47.A2" office:value-type="string">
            <text:p text:style-name="P25" loext:marker-style-name="T80"><text:span text:style-name="T79">聚合路由</text:span><text:span text:style-name="T80"/></text:p>
          </table:table-cell>
          <table:table-cell table:style-name="表格47.A2" office:value-type="string">
            <text:p text:style-name="P25" loext:marker-style-name="T80"><text:span text:style-name="T261">連續</text:span><text:span text:style-name="T79"> </text:span><text:span text:style-name="T121">+ </text:span><text:span text:style-name="T79">數量 </text:span><text:span text:style-name="T121">2ⁿ + </text:span><text:span text:style-name="T79">對齊；</text:span><text:span text:style-name="T86">前綴減 </text:span><text:span text:style-name="T123">n</text:span></text:p>
          </table:table-cell>
          <table:table-cell table:style-name="表格47.A2" office:value-type="string">
            <text:p text:style-name="P25" loext:marker-style-name="T80"><text:span text:style-name="T79">把相鄰小地合成大地</text:span><text:span text:style-name="T80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8"><text:span text:style-name="T151">🎯 <text:s/></text:span><text:span text:style-name="T192">考試標準解題流程</text:span></text:p>
            <text:p text:style-name="P9"><text:span text:style-name="T193">遇到 </text:span><text:span text:style-name="T196">VLSM </text:span><text:span text:style-name="T193">題：</text:span><text:span text:style-name="T425">確認起始網路</text:span><text:span text:style-name="T95"> → </text:span><text:span text:style-name="T415">需求由大到小</text:span><text:span text:style-name="T95"> → </text:span><text:span text:style-name="T239">各需求 </text:span><text:span text:style-name="T250">+2 </text:span><text:span text:style-name="T239">找 </text:span><text:span text:style-name="T250">2ⁿ </text:span><text:span text:style-name="T239">算前綴</text:span><text:span text:style-name="T95"> → </text:span><text:span text:style-name="T319">大的先切</text:span><text:span text:style-name="T95">依序往後 → </text:span><text:span text:style-name="T389">驗證網路位址</text:span><text:span text:style-name="T406">/</text:span><text:span text:style-name="T389">廣播位址</text:span><text:span text:style-name="T406">/</text:span><text:span text:style-name="T389">可用範圍</text:span><text:span text:style-name="T95">。</text:span></text:p>
            <text:p text:style-name="P10"><text:span text:style-name="T193">遇到 </text:span><text:span text:style-name="T196">CIDR </text:span><text:span text:style-name="T193">合併題：</text:span><text:span text:style-name="T95">列出網路確認連續 → 確認數量 </text:span><text:span text:style-name="T129">2ⁿ → </text:span><text:span text:style-name="T95">確認起點對齊（起點</text:span><text:span text:style-name="T129">÷</text:span><text:span text:style-name="T95">合併後大小</text:span><text:span text:style-name="T129">=</text:span><text:span text:style-name="T95">整數）→ 前綴 </text:span><text:span text:style-name="T129">= </text:span><text:span text:style-name="T95">原前綴 − </text:span><text:span text:style-name="T129">n</text:span><text:span text:style-name="T95">。</text:span></text:p>
          </table:table-cell>
          <table:covered-table-cell/>
          <table:covered-table-cell/>
          <table:covered-table-cell/>
        </table:table-row>
      </table:table>
      <text:h text:style-name="P3" text:outline-level="2"><text:soft-page-break/><text:span text:style-name="T28">捌、</text:span><text:span text:style-name="T27">MTU</text:span><text:span text:style-name="T28">（最大傳輸單位）</text:span><text:span text:style-name="T27">(</text:span><text:span text:style-name="T284">一條網路，一次最多</text:span><text:span text:style-name="T27">)</text:span></text:h>
      <text:p text:style-name="P31" loext:marker-style-name="T96"><text:span text:style-name="T134">MTU</text:span><text:span text:style-name="T129"> </text:span><text:span text:style-name="T95">＝ </text:span><text:span text:style-name="T407">Maximum Transmission Unit</text:span><text:span text:style-name="T391">，</text:span><text:span text:style-name="T240">一條網路</text:span><text:span text:style-name="T391">「</text:span><text:span text:style-name="T353">一次最多</text:span><text:span text:style-name="T391">能傳送的</text:span><text:span text:style-name="T282">封包大小</text:span><text:span text:style-name="T391">」</text:span><text:span text:style-name="T95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6" loext:marker-style-name="T66"><text:span text:style-name="T65">網路類型</text:span><text:span text:style-name="T66"/></text:p>
            </table:table-cell>
            <table:table-cell table:style-name="表格48.A1" office:value-type="string">
              <text:p text:style-name="P6" loext:marker-style-name="T66"><text:span text:style-name="T75">MTU </text:span><text:span text:style-name="T65">值</text:span></text:p>
            </table:table-cell>
            <table:table-cell table:style-name="表格48.A1" office:value-type="string">
              <text:p text:style-name="P6" loext:marker-style-name="T66"><text:span text:style-name="T65">說明</text:span><text:span text:style-name="T66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5" loext:marker-style-name="T80"><text:span text:style-name="T121">Ethernet</text:span><text:span text:style-name="T79">（乙太網）</text:span></text:p>
          </table:table-cell>
          <table:table-cell table:style-name="表格48.A2" office:value-type="string">
            <text:p text:style-name="P25" loext:marker-style-name="T80"><text:span text:style-name="T121">1500 bytes</text:span><text:span text:style-name="T80"/></text:p>
          </table:table-cell>
          <table:table-cell table:style-name="表格48.A2" office:value-type="string">
            <text:p text:style-name="P25" loext:marker-style-name="T80"><text:span text:style-name="T79">最常見，</text:span><text:span text:style-name="T121">99% </text:span><text:span text:style-name="T79">環境</text:span></text:p>
          </table:table-cell>
        </table:table-row>
        <table:table-row table:style-name="表格48.1">
          <table:table-cell table:style-name="表格48.A3" office:value-type="string">
            <text:p text:style-name="P25" loext:marker-style-name="T80"><text:span text:style-name="T121">Wi-Fi (802.11)</text:span><text:span text:style-name="T80"/></text:p>
          </table:table-cell>
          <table:table-cell table:style-name="表格48.A3" office:value-type="string">
            <text:p text:style-name="P25" loext:marker-style-name="T80"><text:span text:style-name="T121">2304 bytes</text:span><text:span text:style-name="T80"/></text:p>
          </table:table-cell>
          <table:table-cell table:style-name="表格48.A3" office:value-type="string">
            <text:p text:style-name="P25" loext:marker-style-name="T80"><text:span text:style-name="T79">無線區域網路</text:span><text:span text:style-name="T80"/></text:p>
          </table:table-cell>
        </table:table-row>
        <table:table-row table:style-name="表格48.1">
          <table:table-cell table:style-name="表格48.A2" office:value-type="string">
            <text:p text:style-name="P25" loext:marker-style-name="T80"><text:span text:style-name="T121">PPPoE</text:span><text:span text:style-name="T79">（</text:span><text:span text:style-name="T121">ADSL</text:span><text:span text:style-name="T79">）</text:span></text:p>
          </table:table-cell>
          <table:table-cell table:style-name="表格48.A2" office:value-type="string">
            <text:p text:style-name="P25" loext:marker-style-name="T80"><text:span text:style-name="T121">1492 bytes</text:span><text:span text:style-name="T80"/></text:p>
          </table:table-cell>
          <table:table-cell table:style-name="表格48.A2" office:value-type="string">
            <text:p text:style-name="P25" loext:marker-style-name="T80"><text:span text:style-name="T79">需扣掉 </text:span><text:span text:style-name="T121">PPPoE header</text:span></text:p>
          </table:table-cell>
        </table:table-row>
        <table:table-row table:style-name="表格48.1">
          <table:table-cell table:style-name="表格48.A3" office:value-type="string">
            <text:p text:style-name="P25" loext:marker-style-name="T80"><text:span text:style-name="T121">Loopback</text:span><text:span text:style-name="T79">（本機）</text:span></text:p>
          </table:table-cell>
          <table:table-cell table:style-name="表格48.A3" office:value-type="string">
            <text:p text:style-name="P25" loext:marker-style-name="T80"><text:span text:style-name="T121">65536 bytes</text:span><text:span text:style-name="T80"/></text:p>
          </table:table-cell>
          <table:table-cell table:style-name="表格48.A3" office:value-type="string">
            <text:p text:style-name="P25" loext:marker-style-name="T80"><text:span text:style-name="T79">本機內部通訊</text:span><text:span text:style-name="T80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8"><text:span text:style-name="T151">❗ <text:s/></text:span><text:span text:style-name="T173">重點</text:span></text:p>
            <text:p text:style-name="P9" loext:marker-style-name="T96"><text:span text:style-name="T268">若封包大小 </text:span><text:span text:style-name="T273">&gt; MTU</text:span><text:span text:style-name="T268">，就必須「切開」才能傳送</text:span><text:span text:style-name="T95">，這個動作就叫 </text:span><text:span text:style-name="T420">Fragmentation</text:span><text:span text:style-name="T425">（分段）</text:span><text:span text:style-name="T95">。</text:span></text:p>
          </table:table-cell>
          <table:covered-table-cell/>
          <table:covered-table-cell/>
        </table:table-row>
      </table:table>
      <text:h text:style-name="P3" text:outline-level="2" loext:marker-style-name="T27"><text:span text:style-name="T28">玖、</text:span><text:span text:style-name="T27">Fragmentation</text:span><text:span text:style-name="T28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8"><text:span text:style-name="T151">📦 <text:s/></text:span><text:span text:style-name="T48">怎麼切？</text:span></text:p>
            <text:p text:style-name="P9" loext:marker-style-name="T96"><text:span text:style-name="T95">範例：送出 </text:span><text:span text:style-name="T129">4000 bytes</text:span><text:span text:style-name="T95">、</text:span><text:span text:style-name="T135">MTU = 1500</text:span><text:span text:style-name="T95">（</text:span><text:span text:style-name="T237">每段扣掉 </text:span><text:span text:style-name="T247">20 bytes IP Header</text:span><text:span text:style-name="T95">，</text:span><text:span text:style-name="T100">剩 </text:span><text:span text:style-name="T134">1480 </text:span><text:span text:style-name="T100">可放資料</text:span><text:span text:style-name="T95">）</text:span></text:p>
            <text:p text:style-name="P10" loext:marker-style-name="T281"><text:span text:style-name="T280">第 </text:span><text:span text:style-name="T287">1 </text:span><text:span text:style-name="T280">段：</text:span><text:span text:style-name="T287">1480 bytes</text:span><text:span text:style-name="T280">｜第 </text:span><text:span text:style-name="T287">2 </text:span><text:span text:style-name="T280">段：</text:span><text:span text:style-name="T287">1480 bytes</text:span><text:span text:style-name="T280">｜第 </text:span><text:span text:style-name="T287">3 </text:span><text:span text:style-name="T280">段：</text:span><text:span text:style-name="T287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6" loext:marker-style-name="T66"><text:span text:style-name="T65">版本</text:span><text:span text:style-name="T66"/></text:p>
          </table:table-cell>
          <table:table-cell table:style-name="表格49.A2" office:value-type="string">
            <text:p text:style-name="P6" loext:marker-style-name="T66"><text:span text:style-name="T65">誰負責分段</text:span><text:span text:style-name="T66"/></text:p>
          </table:table-cell>
          <table:table-cell table:style-name="表格49.A2" office:value-type="string">
            <text:p text:style-name="P6" loext:marker-style-name="T66"><text:span text:style-name="T75">Router </text:span><text:span text:style-name="T65">可切？</text:span></text:p>
          </table:table-cell>
          <table:table-cell table:style-name="表格49.A2" office:value-type="string">
            <text:p text:style-name="P6" loext:marker-style-name="T66"><text:span text:style-name="T65">說明</text:span><text:span text:style-name="T66"/></text:p>
          </table:table-cell>
        </table:table-row>
        <table:table-row table:style-name="表格49.1">
          <table:table-cell table:style-name="表格49.A3" office:value-type="string">
            <text:p text:style-name="P25" loext:marker-style-name="T81"><text:span text:style-name="T122">IPv4</text:span><text:span text:style-name="T81"/></text:p>
          </table:table-cell>
          <table:table-cell table:style-name="表格49.A3" office:value-type="string">
            <text:p text:style-name="P25" loext:marker-style-name="T80"><text:span text:style-name="T121">Router </text:span><text:span text:style-name="T79">或 </text:span><text:span text:style-name="T121">Source</text:span></text:p>
          </table:table-cell>
          <table:table-cell table:style-name="表格49.A3" office:value-type="string">
            <text:p text:style-name="P25" loext:marker-style-name="T195"><text:span text:style-name="T197">✅ </text:span><text:span text:style-name="T194">可以</text:span></text:p>
          </table:table-cell>
          <table:table-cell table:style-name="表格49.A3" office:value-type="string">
            <text:p text:style-name="P25" loext:marker-style-name="T345"><text:span text:style-name="T344">封包到 </text:span><text:span text:style-name="T340">Router </text:span><text:span text:style-name="T344">太大時，</text:span><text:span text:style-name="T340">Router </text:span><text:span text:style-name="T344">直接幫你切</text:span></text:p>
          </table:table-cell>
        </table:table-row>
        <table:table-row table:style-name="表格49.1">
          <table:table-cell table:style-name="表格49.A4" office:value-type="string">
            <text:p text:style-name="P25" loext:marker-style-name="T81"><text:span text:style-name="T122">IPv6</text:span><text:span text:style-name="T81"/></text:p>
          </table:table-cell>
          <table:table-cell table:style-name="表格49.A4" office:value-type="string">
            <text:p text:style-name="P25" loext:marker-style-name="T80"><text:span text:style-name="T79">僅 </text:span><text:span text:style-name="T121">Source</text:span><text:span text:style-name="T79">（送端）</text:span></text:p>
          </table:table-cell>
          <table:table-cell table:style-name="表格49.A4" office:value-type="string">
            <text:p text:style-name="P25" loext:marker-style-name="T181"><text:span text:style-name="T186">❌ </text:span><text:span text:style-name="T180">不行</text:span></text:p>
          </table:table-cell>
          <table:table-cell table:style-name="表格49.A4" office:value-type="string">
            <text:p text:style-name="P25" loext:marker-style-name="T80"><text:span text:style-name="T456">Router </text:span><text:span text:style-name="T439">不分段</text:span><text:span text:style-name="T79">，</text:span><text:span text:style-name="T342">由送端自行處理</text:span><text:span text:style-name="T79">，搭配 </text:span><text:span text:style-name="T121">PMTUD</text:span></text:p>
          </table:table-cell>
        </table:table-row>
      </table:table>
      <text:h text:style-name="P3" text:outline-level="2" loext:marker-style-name="T27"><text:span text:style-name="T28">拾、</text:span><text:span text:style-name="T27">IP Header </text:span><text:span text:style-name="T28">關鍵欄位</text:span></text:h>
      <text:p text:style-name="P31" loext:marker-style-name="T96"><text:span text:style-name="T95">每個封包都有一個「說明書」（</text:span><text:span text:style-name="T129">IP Header</text:span><text:span text:style-name="T95">），無選項時長度固定 </text:span><text:span text:style-name="T129">20 bytes</text:span><text:span text:style-name="T95">。最重要的 </text:span><text:span text:style-name="T129">5 </text:span><text:span text:style-name="T95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9"><text:span text:style-name="T61">(1) </text:span><text:span text:style-name="T60">Total Length</text:span><text:span text:style-name="T52">：</text:span><text:span text:style-name="T95">封包總大小（</text:span><text:span text:style-name="T129">Header + Data</text:span><text:span text:style-name="T95">），最大 </text:span><text:span text:style-name="T129">65535 bytes</text:span><text:span text:style-name="T95">（</text:span><text:span text:style-name="T129">16 bits</text:span><text:span text:style-name="T95">）。</text:span></text:p>
            <text:p text:style-name="P10"><text:span text:style-name="T61">(2) </text:span><text:span text:style-name="T60">Identification</text:span><text:span text:style-name="T52">：</text:span><text:span text:style-name="T237">同一原始封包的所有分段共用同一 </text:span><text:span text:style-name="T247">ID</text:span><text:span text:style-name="T95">；</text:span><text:span text:style-name="T324">接收端靠此 </text:span><text:span text:style-name="T336">ID </text:span><text:span text:style-name="T324">判斷哪些 </text:span><text:span text:style-name="T336">fragment </text:span><text:span text:style-name="T324">要拼在一起</text:span><text:span text:style-name="T95">。</text:span></text:p>
            <text:p text:style-name="P10"><text:span text:style-name="T61">(3) </text:span><text:span text:style-name="T60">Fragment Offset</text:span><text:span text:style-name="T52">：</text:span><text:span text:style-name="T268">這段資料在原始封包中的「起始位置」</text:span><text:span text:style-name="T95">。⚠️ 單位是 </text:span><text:span text:style-name="T129">8 bytes</text:span><text:span text:style-name="T95">（欄位僅 </text:span><text:span text:style-name="T129">13 bits</text:span><text:span text:style-name="T95">）→ </text:span><text:span text:style-name="T273">Offset = </text:span><text:span text:style-name="T268">起始位置 </text:span><text:span text:style-name="T273">÷ 8</text:span><text:span text:style-name="T95">。</text:span></text:p>
            <text:p text:style-name="P10"><text:span text:style-name="T61">(4) </text:span><text:span text:style-name="T60">TTL</text:span><text:span text:style-name="T52">：</text:span><text:span text:style-name="T434">最多可經過幾個 </text:span><text:span text:style-name="T451">Router</text:span><text:span text:style-name="T434">；每經過一個 −</text:span><text:span text:style-name="T451">1</text:span><text:span text:style-name="T95">，</text:span><text:span text:style-name="T389">歸零時 </text:span><text:span text:style-name="T406">Router </text:span><text:span text:style-name="T389">丟棄並回 </text:span><text:span text:style-name="T406">ICMP</text:span><text:span text:style-name="T389">「</text:span><text:span text:style-name="T406">Time Exceeded</text:span><text:span text:style-name="T389">」</text:span><text:span text:style-name="T95">。常見初始值 </text:span><text:span text:style-name="T129">Linux=64</text:span><text:span text:style-name="T95">、</text:span><text:span text:style-name="T129">Windows=128</text:span><text:span text:style-name="T95">。</text:span><text:span text:style-name="T129">traceroute </text:span><text:span text:style-name="T95">即利用 </text:span><text:span text:style-name="T129">TTL</text:span><text:span text:style-name="T95">。</text:span></text:p>
            <text:p text:style-name="P10"><text:span text:style-name="T61">(5) </text:span><text:span text:style-name="T60">Protocol</text:span><text:span text:style-name="T52">：</text:span><text:span text:style-name="T95">告訴 </text:span><text:span text:style-name="T129">OS </text:span><text:span text:style-name="T95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6" loext:marker-style-name="T66"><text:span text:style-name="T65">計算範例（</text:span><text:span text:style-name="T75">MTU=1500, Header=20, </text:span><text:span text:style-name="T65">資料</text:span><text:span text:style-name="T75">=4000</text:span><text:span text:style-name="T65">）</text:span></text:p>
          </table:table-cell>
          <table:covered-table-cell/>
          <table:covered-table-cell/>
          <table:table-cell table:style-name="表格50.A2" office:value-type="string">
            <text:p text:style-name="P6" loext:marker-style-name="T66"><text:span text:style-name="T75">Offset </text:span><text:span text:style-name="T65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5" loext:marker-style-name="T80"><text:span text:style-name="T79">第 </text:span><text:span text:style-name="T121">1 </text:span><text:span text:style-name="T79">段：資料 </text:span><text:span text:style-name="T121">1480 bytes</text:span></text:p>
          </table:table-cell>
          <table:covered-table-cell/>
          <table:covered-table-cell/>
          <table:table-cell table:style-name="表格50.A3" office:value-type="string">
            <text:p text:style-name="P25" loext:marker-style-name="T81"><text:span text:style-name="T122">0 ÷ 8 = 0</text:span><text:span text:style-name="T81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5" loext:marker-style-name="T80"><text:span text:style-name="T79">第 </text:span><text:span text:style-name="T121">2 </text:span><text:span text:style-name="T79">段：資料 </text:span><text:span text:style-name="T121">1480 bytes</text:span></text:p>
          </table:table-cell>
          <table:covered-table-cell/>
          <table:covered-table-cell/>
          <table:table-cell table:style-name="表格50.A4" office:value-type="string">
            <text:p text:style-name="P25" loext:marker-style-name="T80"><text:span text:style-name="T122">1480 ÷ 8 </text:span><text:span text:style-name="T121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5" loext:marker-style-name="T80"><text:span text:style-name="T79">第 </text:span><text:span text:style-name="T121">3 </text:span><text:span text:style-name="T79">段：資料 </text:span><text:span text:style-name="T121">1040 bytes</text:span></text:p>
          </table:table-cell>
          <table:covered-table-cell/>
          <table:covered-table-cell/>
          <table:table-cell table:style-name="表格50.A3" office:value-type="string">
            <text:p text:style-name="P25" loext:marker-style-name="T80"><text:span text:style-name="T122">2960 ÷ 8</text:span><text:span text:style-name="T121"> = 370</text:span></text:p>
          </table:table-cell>
        </table:table-row>
        <table:table-row table:style-name="表格50.1">
          <table:table-cell table:style-name="表格50.A2" office:value-type="string">
            <text:p text:style-name="P22" loext:marker-style-name="T66"><text:span text:style-name="T75">Protocol </text:span><text:span text:style-name="T65">值</text:span></text:p>
          </table:table-cell>
          <table:table-cell table:style-name="表格50.A2" office:value-type="string">
            <text:p text:style-name="P22" loext:marker-style-name="T66"><text:span text:style-name="T65">對應協定</text:span><text:span text:style-name="T66"/></text:p>
          </table:table-cell>
          <table:table-cell table:style-name="表格50.A2" table:number-columns-spanned="2" office:value-type="string">
            <text:p text:style-name="P22" loext:marker-style-name="T66"><text:span text:style-name="T65">常見用途</text:span><text:span text:style-name="T66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5" loext:marker-style-name="T80"><text:span text:style-name="T121">1</text:span><text:span text:style-name="T80"/></text:p>
          </table:table-cell>
          <table:table-cell table:style-name="表格50.A3" office:value-type="string">
            <text:p text:style-name="P25" loext:marker-style-name="T88"><text:span text:style-name="T124">ICMP</text:span><text:span text:style-name="T88"/></text:p>
          </table:table-cell>
          <table:table-cell table:style-name="表格50.A3" table:number-columns-spanned="2" office:value-type="string">
            <text:p text:style-name="P25" loext:marker-style-name="T278"><text:span text:style-name="T289">ping</text:span><text:span text:style-name="T277">、</text:span><text:span text:style-name="T289">TTL </text:span><text:span text:style-name="T277">超時通知、</text:span><text:span text:style-name="T289">Fragmentation </text:span><text:span text:style-name="T277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5" loext:marker-style-name="T80"><text:span text:style-name="T121">6</text:span><text:span text:style-name="T80"/></text:p>
          </table:table-cell>
          <table:table-cell table:style-name="表格50.A4" office:value-type="string">
            <text:p text:style-name="P25" loext:marker-style-name="T80"><text:span text:style-name="T121">TCP</text:span><text:span text:style-name="T80"/></text:p>
          </table:table-cell>
          <table:table-cell table:style-name="表格50.A4" table:number-columns-spanned="2" office:value-type="string">
            <text:p text:style-name="P25" loext:marker-style-name="T80"><text:span text:style-name="T121">HTTP</text:span><text:span text:style-name="T79">、</text:span><text:span text:style-name="T121">HTTPS</text:span><text:span text:style-name="T79">、</text:span><text:span text:style-name="T121">SSH</text:span><text:span text:style-name="T79">、</text:span><text:span text:style-name="T121">FTP </text:span><text:span text:style-name="T79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5" loext:marker-style-name="T80"><text:span text:style-name="T121">17</text:span><text:span text:style-name="T80"/></text:p>
          </table:table-cell>
          <table:table-cell table:style-name="表格50.A3" office:value-type="string">
            <text:p text:style-name="P25" loext:marker-style-name="T80"><text:span text:style-name="T121">UDP</text:span><text:span text:style-name="T80"/></text:p>
          </table:table-cell>
          <table:table-cell table:style-name="表格50.A3" table:number-columns-spanned="2" office:value-type="string">
            <text:p text:style-name="P25" loext:marker-style-name="T80"><text:span text:style-name="T121">DNS</text:span><text:span text:style-name="T79">、</text:span><text:span text:style-name="T121">DHCP</text:span><text:span text:style-name="T79">、影音串流等速度優先</text:span></text:p>
          </table:table-cell>
          <table:covered-table-cell/>
        </table:table-row>
      </table:table>
      <text:h text:style-name="P3" text:outline-level="2"><text:soft-page-break/><text:span text:style-name="T28">拾壹、</text:span><text:span text:style-name="T27">Fragmentation Flags</text:span><text:span text:style-name="T28">（</text:span><text:span text:style-name="T27">DF / MF</text:span><text:span text:style-name="T28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6" loext:marker-style-name="T66"><text:span text:style-name="T75">Flag</text:span><text:span text:style-name="T66"/></text:p>
            </table:table-cell>
            <table:table-cell table:style-name="表格51.A1" office:value-type="string">
              <text:p text:style-name="P6" loext:marker-style-name="T66"><text:span text:style-name="T65">全名</text:span><text:span text:style-name="T66"/></text:p>
            </table:table-cell>
            <table:table-cell table:style-name="表格51.A1" office:value-type="string">
              <text:p text:style-name="P6" loext:marker-style-name="T66"><text:span text:style-name="T65">值 </text:span><text:span text:style-name="T75">= 1 </text:span><text:span text:style-name="T65">代表</text:span></text:p>
            </table:table-cell>
            <table:table-cell table:style-name="表格51.A1" office:value-type="string">
              <text:p text:style-name="P6" loext:marker-style-name="T66"><text:span text:style-name="T65">值 </text:span><text:span text:style-name="T75">= 0 </text:span><text:span text:style-name="T65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5" loext:marker-style-name="T262"><text:span text:style-name="T258">DF</text:span><text:span text:style-name="T262"/></text:p>
          </table:table-cell>
          <table:table-cell table:style-name="表格51.A2" office:value-type="string">
            <text:p text:style-name="P25" loext:marker-style-name="T262"><text:span text:style-name="T258">Don't Fragment</text:span><text:span text:style-name="T262"/></text:p>
          </table:table-cell>
          <table:table-cell table:style-name="表格51.A2" office:value-type="string">
            <text:p text:style-name="P25" loext:marker-style-name="T80"><text:span text:style-name="T121">❌ </text:span><text:span text:style-name="T79">不准切！超大就丟並回 </text:span><text:span text:style-name="T121">ICMP</text:span></text:p>
          </table:table-cell>
          <table:table-cell table:style-name="表格51.A2" office:value-type="string">
            <text:p text:style-name="P25" loext:marker-style-name="T80"><text:span text:style-name="T79">允許分段（一般封包）</text:span><text:span text:style-name="T80"/></text:p>
          </table:table-cell>
        </table:table-row>
        <table:table-row table:style-name="表格51.1">
          <table:table-cell table:style-name="表格51.A3" office:value-type="string">
            <text:p text:style-name="P25" loext:marker-style-name="T223"><text:span text:style-name="T216">MF</text:span><text:span text:style-name="T223"/></text:p>
          </table:table-cell>
          <table:table-cell table:style-name="表格51.A3" office:value-type="string">
            <text:p text:style-name="P25" loext:marker-style-name="T223"><text:span text:style-name="T216">More Fragments</text:span><text:span text:style-name="T223"/></text:p>
          </table:table-cell>
          <table:table-cell table:style-name="表格51.A3" office:value-type="string">
            <text:p text:style-name="P25" loext:marker-style-name="T80"><text:span text:style-name="T79">後面還有更多分段</text:span><text:span text:style-name="T80"/></text:p>
          </table:table-cell>
          <table:table-cell table:style-name="表格51.A3" office:value-type="string">
            <text:p text:style-name="P25" loext:marker-style-name="T80"><text:span text:style-name="T79">這是最後一段（或未分段）</text:span><text:span text:style-name="T80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8"><text:span text:style-name="T151">▸ <text:s/></text:span><text:span text:style-name="T59">DF = 1 </text:span><text:span text:style-name="T48">的完整流程</text:span></text:p>
            <text:p text:style-name="P9" loext:marker-style-name="T96"><text:span text:style-name="T129">① </text:span><text:span text:style-name="T95">送出封包（</text:span><text:span text:style-name="T134">DF=1</text:span><text:span text:style-name="T100">，不准切</text:span><text:span text:style-name="T95">）→ ② 到某 </text:span><text:span text:style-name="T129">Router</text:span><text:span text:style-name="T95">，發現</text:span><text:span text:style-name="T236">封包 </text:span><text:span text:style-name="T251">&gt; </text:span><text:span text:style-name="T236">該路段 </text:span><text:span text:style-name="T251">MTU</text:span><text:span text:style-name="T129"> → ③ </text:span><text:span text:style-name="T359">Router </text:span><text:span text:style-name="T349">不能切，直接丟棄 </text:span><text:span text:style-name="T95">→ ④ </text:span><text:span text:style-name="T451">Router </text:span><text:span text:style-name="T434">回傳 </text:span><text:span text:style-name="T451">ICMP</text:span><text:span text:style-name="T434">「</text:span><text:span text:style-name="T451">Fragmentation Needed</text:span><text:span text:style-name="T434">」（含可用 </text:span><text:span text:style-name="T451">MTU </text:span><text:span text:style-name="T434">大小）</text:span><text:span text:style-name="T95">→ ⑤ </text:span><text:span text:style-name="T237">送端調整封包大小後</text:span><text:span text:style-name="T392">重送</text:span><text:span text:style-name="T95">。這就是 </text:span><text:span text:style-name="T135">PMTUD </text:span><text:span text:style-name="T101">的核心機制</text:span><text:span text:style-name="T95">。</text:span></text:p>
          </table:table-cell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拾貳、</text:span><text:span text:style-name="T27">PMTUD</text:span><text:span text:style-name="T28">（路徑 </text:span><text:span text:style-name="T27">MTU </text:span><text:span text:style-name="T28">探測）</text:span></text:h>
      <text:p text:style-name="P31" loext:marker-style-name="T96"><text:span text:style-name="T134">PMTUD </text:span><text:span text:style-name="T95">＝</text:span><text:span text:style-name="T392"> </text:span><text:span text:style-name="T408">Path MTU Discovery</text:span><text:span text:style-name="T392">，自動找出</text:span><text:span text:style-name="T482">來源到目的地</text:span><text:span text:style-name="T392">整條路徑中</text:span><text:span text:style-name="T435">最小的 </text:span><text:span text:style-name="T452">MTU </text:span><text:span text:style-name="T435">值</text:span><text:span text:style-name="T95">。</text:span><text:span text:style-name="T103">網路路徑可能途經不同網路</text:span><text:span text:style-name="T95">（</text:span><text:span text:style-name="T129">Ethernet → PPPoE → Wi-Fi</text:span><text:span text:style-name="T95">），封包必須符合「最小的那個 </text:span><text:span text:style-name="T129">MTU</text:span><text:span text:style-name="T95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6" loext:marker-style-name="T66"><text:span text:style-name="T65">版本</text:span><text:span text:style-name="T66"/></text:p>
            </table:table-cell>
            <table:table-cell table:style-name="表格52.A1" office:value-type="string">
              <text:p text:style-name="P6" loext:marker-style-name="T66"><text:span text:style-name="T75">Router </text:span><text:span text:style-name="T65">可分段？</text:span></text:p>
            </table:table-cell>
            <table:table-cell table:style-name="表格52.A1" office:value-type="string">
              <text:p text:style-name="P6" loext:marker-style-name="T66"><text:span text:style-name="T75">PMTUD </text:span><text:span text:style-name="T65">必要性</text:span></text:p>
            </table:table-cell>
            <table:table-cell table:style-name="表格52.A1" office:value-type="string">
              <text:p text:style-name="P6" loext:marker-style-name="T66"><text:span text:style-name="T75">Router </text:span><text:span text:style-name="T65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5" loext:marker-style-name="T87"><text:span text:style-name="T123">IPv4</text:span><text:span text:style-name="T87"/></text:p>
          </table:table-cell>
          <table:table-cell table:style-name="表格52.A2" office:value-type="string">
            <text:p text:style-name="P25" loext:marker-style-name="T83"><text:span text:style-name="T125">✅ </text:span><text:span text:style-name="T82">可以（但不推薦）</text:span></text:p>
          </table:table-cell>
          <table:table-cell table:style-name="表格52.A2" office:value-type="string">
            <text:p text:style-name="P25" loext:marker-style-name="T80"><text:span text:style-name="T79">可選，但建議使用</text:span><text:span text:style-name="T80"/></text:p>
          </table:table-cell>
          <table:table-cell table:style-name="表格52.A2" office:value-type="string">
            <text:p text:style-name="P25" loext:marker-style-name="T80"><text:span text:style-name="T121">ICMP Fragmentation Needed</text:span><text:span text:style-name="T80"/></text:p>
          </table:table-cell>
        </table:table-row>
        <table:table-row table:style-name="表格52.1">
          <table:table-cell table:style-name="表格52.A3" office:value-type="string">
            <text:p text:style-name="P25" loext:marker-style-name="T87"><text:span text:style-name="T123">IPv6</text:span><text:span text:style-name="T87"/></text:p>
          </table:table-cell>
          <table:table-cell table:style-name="表格52.A3" office:value-type="string">
            <text:p text:style-name="P25" loext:marker-style-name="T83"><text:span text:style-name="T125">❌ </text:span><text:span text:style-name="T82">不行</text:span></text:p>
          </table:table-cell>
          <table:table-cell table:style-name="表格52.A3" office:value-type="string">
            <text:p text:style-name="P25" loext:marker-style-name="T80"><text:span text:style-name="T121">⚠️ </text:span><text:span text:style-name="T79">必須使用</text:span></text:p>
          </table:table-cell>
          <table:table-cell table:style-name="表格52.A3" office:value-type="string">
            <text:p text:style-name="P25" loext:marker-style-name="T80"><text:span text:style-name="T121">ICMPv6 Packet Too Big</text:span><text:span text:style-name="T80"/></text:p>
          </table:table-cell>
        </table:table-row>
      </table:table>
      <text:h text:style-name="P3" text:outline-level="2" loext:marker-style-name="T27"><text:span text:style-name="T28">拾參、</text:span><text:span text:style-name="T27">TCP </text:span><text:span text:style-name="T28">如何避免 </text:span><text:span text:style-name="T27">Fragmentation</text:span><text:span text:style-name="T28">？</text:span></text:h>
      <text:p text:style-name="P31" loext:marker-style-name="T96"><text:span text:style-name="T273">TCP </text:span><text:span text:style-name="T268">不依賴 </text:span><text:span text:style-name="T273">IP </text:span><text:span text:style-name="T268">層切封包，而是「自己先控制好大小」</text:span><text:span text:style-name="T95">，</text:span><text:span text:style-name="T100">讓 </text:span><text:span text:style-name="T134">IP </text:span><text:span text:style-name="T100">層根本不需要切</text:span><text:span text:style-name="T95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"><text:span text:style-name="T61">MSS</text:span><text:span text:style-name="T52">（</text:span><text:span text:style-name="T61">Maximum Segment Size</text:span><text:span text:style-name="T52">）：</text:span><text:span text:style-name="T252">MSS = MTU − IP Header − TCP Header </text:span><text:span text:style-name="T129">= </text:span><text:span text:style-name="T134">1500 − 20 − 20 = 1460 bytes</text:span><text:span text:style-name="T95">。</text:span><text:span text:style-name="T354">三向交握時雙方各自宣告 </text:span><text:span text:style-name="T360">MSS</text:span><text:span text:style-name="T354">，之後每段 ≤ </text:span><text:span text:style-name="T360">MSS</text:span><text:span text:style-name="T95">，</text:span><text:span text:style-name="T100">讓 </text:span><text:span text:style-name="T134">IP </text:span><text:span text:style-name="T100">層不需分段</text:span><text:span text:style-name="T95">。</text:span></text:p>
            <text:p text:style-name="P10"><text:span text:style-name="T52">搭配 </text:span><text:span text:style-name="T61">DF=1 + PMTUD</text:span><text:span text:style-name="T52">：</text:span><text:span text:style-name="T129">TCP </text:span><text:span text:style-name="T95">連線設 </text:span><text:span text:style-name="T129">DF=1 </text:span><text:span text:style-name="T95">禁止 </text:span><text:span text:style-name="T129">Router </text:span><text:span text:style-name="T95">分段；</text:span><text:span text:style-name="T237">若收到 </text:span><text:span text:style-name="T247">ICMP</text:span><text:span text:style-name="T237">「</text:span><text:span text:style-name="T247">Fragmentation Needed</text:span><text:span text:style-name="T237">」，自動調低 </text:span><text:span text:style-name="T247">MSS </text:span><text:span text:style-name="T237">重試</text:span><text:span text:style-name="T95">，最終找到整條路徑都能通過的最佳 </text:span><text:span text:style-name="T129">MSS</text:span><text:span text:style-name="T95">。</text:span></text:p>
          </table:table-cell>
        </table:table-row>
        <table:table-row table:style-name="表格53.1">
          <table:table-cell table:style-name="表格53.A2" office:value-type="string">
            <text:p text:style-name="P8"><text:span text:style-name="T151">✅ <text:s/></text:span><text:span text:style-name="T192">結論</text:span></text:p>
            <text:p text:style-name="P9" loext:marker-style-name="T96"><text:span text:style-name="T420">TCP = </text:span><text:span text:style-name="T425">主動控制大小（</text:span><text:span text:style-name="T420">MSS</text:span><text:span text:style-name="T425">）＋ </text:span><text:span text:style-name="T420">DF=1 </text:span><text:span text:style-name="T425">＋ </text:span><text:span text:style-name="T420">PMTUD</text:span><text:span text:style-name="T95">，</text:span><text:span text:style-name="T241">從源頭就避免 </text:span><text:span text:style-name="T252">Fragmentation </text:span><text:span text:style-name="T241">發生</text:span><text:span text:style-name="T95">。</text:span><text:span text:style-name="T336">TCP </text:span><text:span text:style-name="T324">做 </text:span><text:span text:style-name="T336">Segmentation </text:span><text:span text:style-name="T324">的主要目的之一，就是讓每個封包符合 </text:span><text:span text:style-name="T336">MTU</text:span><text:span text:style-name="T95">，從而避免 </text:span><text:span text:style-name="T129">IP </text:span><text:span text:style-name="T95">再做 </text:span><text:span text:style-name="T129">Fragmentation</text:span><text:span text:style-name="T95">。</text:span></text:p>
          </table:table-cell>
        </table:table-row>
      </table:table>
      <text:h text:style-name="P3" text:outline-level="2" loext:marker-style-name="T27"><text:span text:style-name="T28">拾肆、</text:span><text:span text:style-name="T27">Fragmentation DoS </text:span><text:span text:style-name="T28">攻擊</text:span></text:h>
      <text:p text:style-name="P31" loext:marker-style-name="T96"><text:span text:style-name="T237">攻擊者利用「接收端重組封包很耗資源」這個特性</text:span><text:span text:style-name="T95">，</text:span><text:span text:style-name="T268">刻意製造大量異常 </text:span><text:span text:style-name="T273">Fragment</text:span><text:span text:style-name="T95">。正常重組流程：收到 </text:span><text:span text:style-name="T129">Fragment </text:span><text:span text:style-name="T391">放入緩衝區 </text:span><text:span text:style-name="T95">→ </text:span><text:span text:style-name="T434">等同一 </text:span><text:span text:style-name="T451">ID </text:span><text:span text:style-name="T434">的所有 </text:span><text:span text:style-name="T451">Fragment </text:span><text:span text:style-name="T434">到齊 → 依</text:span><text:span text:style-name="T269"> </text:span><text:span text:style-name="T274">Offset </text:span><text:span text:style-name="T434">排序 → 拼回原始封包</text:span><text:span text:style-name="T95">；每步都消耗 </text:span><text:span text:style-name="T129">RAM </text:span><text:span text:style-name="T95">與 </text:span><text:span text:style-name="T129">CPU</text:span><text:span text:style-name="T95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6" loext:marker-style-name="T72"><text:span text:style-name="T71">攻擊手法</text:span><text:span text:style-name="T72"/></text:p>
            </table:table-cell>
            <table:table-cell table:style-name="表格54.A1" office:value-type="string">
              <text:p text:style-name="P6" loext:marker-style-name="T72"><text:span text:style-name="T71">做法</text:span><text:span text:style-name="T72"/></text:p>
            </table:table-cell>
            <table:table-cell table:style-name="表格54.A1" office:value-type="string">
              <text:p text:style-name="P6" loext:marker-style-name="T72"><text:span text:style-name="T71">後果</text:span><text:span text:style-name="T72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5" loext:marker-style-name="T115"><text:span text:style-name="T146">1 </text:span><text:span text:style-name="T114">不完整 </text:span><text:span text:style-name="T146">Fragment</text:span></text:p>
          </table:table-cell>
          <table:table-cell table:style-name="表格54.A2" office:value-type="string">
            <text:p text:style-name="P25" loext:marker-style-name="T112"><text:span text:style-name="T113">只送部分分段（缺其中一段）</text:span><text:span text:style-name="T112"/></text:p>
          </table:table-cell>
          <table:table-cell table:style-name="表格54.A2" office:value-type="string">
            <text:p text:style-name="P25" loext:marker-style-name="T112"><text:span text:style-name="T113">接收端一直等待不敢丟棄 → </text:span><text:span text:style-name="T144">RAM </text:span><text:span text:style-name="T113">持續被占用</text:span></text:p>
          </table:table-cell>
        </table:table-row>
        <table:table-row table:style-name="表格54.1">
          <table:table-cell table:style-name="表格54.A3" office:value-type="string">
            <text:p text:style-name="P25" loext:marker-style-name="T115"><text:span text:style-name="T146">2 Offset </text:span><text:span text:style-name="T114">重疊</text:span></text:p>
          </table:table-cell>
          <table:table-cell table:style-name="表格54.A3" office:value-type="string">
            <text:p text:style-name="P25" loext:marker-style-name="T112"><text:span text:style-name="T113">送出 </text:span><text:span text:style-name="T144">Offset </text:span><text:span text:style-name="T113">互相重疊的 </text:span><text:span text:style-name="T144">Fragment</text:span></text:p>
          </table:table-cell>
          <table:table-cell table:style-name="表格54.A3" office:value-type="string">
            <text:p text:style-name="P25" loext:marker-style-name="T112"><text:span text:style-name="T116">接收端須判斷哪個才是正確資料 </text:span><text:span text:style-name="T113">→ </text:span><text:span text:style-name="T144">CPU </text:span><text:span text:style-name="T113">暴增</text:span></text:p>
          </table:table-cell>
        </table:table-row>
        <table:table-row table:style-name="表格54.1">
          <table:table-cell table:style-name="表格54.A2" office:value-type="string">
            <text:p text:style-name="P25" loext:marker-style-name="T115"><text:span text:style-name="T146">3 </text:span><text:span text:style-name="T114">大量碎片</text:span></text:p>
          </table:table-cell>
          <table:table-cell table:style-name="表格54.A2" office:value-type="string">
            <text:p text:style-name="P25" loext:marker-style-name="T112"><text:span text:style-name="T113">送出數萬個 </text:span><text:span text:style-name="T144">Fragment</text:span><text:span text:style-name="T113">（同一 </text:span><text:span text:style-name="T144">ID</text:span><text:span text:style-name="T113">）</text:span></text:p>
          </table:table-cell>
          <table:table-cell table:style-name="表格54.A2" office:value-type="string">
            <text:p text:style-name="P25" loext:marker-style-name="T112"><text:span text:style-name="T113">開大量 </text:span><text:span text:style-name="T144">buffer</text:span><text:span text:style-name="T113">、持續重組 → </text:span><text:span text:style-name="T144">RAM </text:span><text:span text:style-name="T113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8"><text:span text:style-name="T151">🛡️ <text:s/></text:span><text:span text:style-name="T192">防禦方式</text:span></text:p>
            <text:p text:style-name="P9" loext:marker-style-name="T96"><text:span text:style-name="T95">防禦：</text:span><text:span text:style-name="T105">設定重組 </text:span><text:span text:style-name="T139">buffer </text:span><text:span text:style-name="T105">上限</text:span><text:span text:style-name="T95">避免無限占用記憶體；</text:span><text:span text:style-name="T104">丟棄等待過久或異常的 </text:span><text:span text:style-name="T138">Fragment</text:span><text:span text:style-name="T95">；</text:span><text:span text:style-name="T103">部署 </text:span><text:span text:style-name="T137">IDS / Firewall </text:span><text:span text:style-name="T103">偵測異常分段</text:span><text:span text:style-name="T95">模式。</text:span></text:p>
          </table:table-cell>
          <table:covered-table-cell/>
          <table:covered-table-cell/>
        </table:table-row>
      </table:table>
      <text:h text:style-name="P3" text:outline-level="2"><text:soft-page-break/><text:span text:style-name="T2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6" loext:marker-style-name="T66"><text:span text:style-name="T65">技術概念</text:span><text:span text:style-name="T66"/></text:p>
            </table:table-cell>
            <table:table-cell table:style-name="表格55.A1" office:value-type="string">
              <text:p text:style-name="P6" loext:marker-style-name="T66"><text:span text:style-name="T65">白話比喻</text:span><text:span text:style-name="T66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5" loext:marker-style-name="T80"><text:span text:style-name="T121">MTU</text:span><text:span text:style-name="T80"/></text:p>
          </table:table-cell>
          <table:table-cell table:style-name="表格55.A2" office:value-type="string">
            <text:p text:style-name="P25" loext:marker-style-name="T80"><text:span text:style-name="T79">一個貨運箱子最多裝 </text:span><text:span text:style-name="T121">1500g</text:span></text:p>
          </table:table-cell>
        </table:table-row>
        <table:table-row table:style-name="表格55.1">
          <table:table-cell table:style-name="表格55.A3" office:value-type="string">
            <text:p text:style-name="P25" loext:marker-style-name="T80"><text:span text:style-name="T121">Fragmentation</text:span><text:span text:style-name="T80"/></text:p>
          </table:table-cell>
          <table:table-cell table:style-name="表格55.A3" office:value-type="string">
            <text:p text:style-name="P25" loext:marker-style-name="T80"><text:span text:style-name="T79">東西太重 → 分成好幾箱</text:span><text:span text:style-name="T80"/></text:p>
          </table:table-cell>
        </table:table-row>
        <table:table-row table:style-name="表格55.1">
          <table:table-cell table:style-name="表格55.A2" office:value-type="string">
            <text:p text:style-name="P25" loext:marker-style-name="T83"><text:span text:style-name="T125">Identification</text:span><text:span text:style-name="T83"/></text:p>
          </table:table-cell>
          <table:table-cell table:style-name="表格55.A2" office:value-type="string">
            <text:p text:style-name="P25" loext:marker-style-name="T87"><text:span text:style-name="T86">每箱貼上同一個「訂單號碼」</text:span><text:span text:style-name="T87"/></text:p>
          </table:table-cell>
        </table:table-row>
        <table:table-row table:style-name="表格55.1">
          <table:table-cell table:style-name="表格55.A3" office:value-type="string">
            <text:p text:style-name="P25" loext:marker-style-name="T83"><text:span text:style-name="T125">Fragment Offset</text:span><text:span text:style-name="T83"/></text:p>
          </table:table-cell>
          <table:table-cell table:style-name="表格55.A3" office:value-type="string">
            <text:p text:style-name="P25" loext:marker-style-name="T80"><text:span text:style-name="T79">每箱寫上「我是第幾克開始的貨」</text:span><text:span text:style-name="T80"/></text:p>
          </table:table-cell>
        </table:table-row>
        <table:table-row table:style-name="表格55.1">
          <table:table-cell table:style-name="表格55.A2" office:value-type="string">
            <text:p text:style-name="P25" loext:marker-style-name="T80"><text:span text:style-name="T121">IPv4 / IPv6</text:span><text:span text:style-name="T80"/></text:p>
          </table:table-cell>
          <table:table-cell table:style-name="表格55.A2" office:value-type="string">
            <text:p text:style-name="P25" loext:marker-style-name="T80"><text:span text:style-name="T121">IPv4</text:span><text:span text:style-name="T79">：郵局可幫你分箱（但最好自己分）／ </text:span><text:span text:style-name="T121">IPv6</text:span><text:span text:style-name="T79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5" loext:marker-style-name="T80"><text:span text:style-name="T121">DF = 1</text:span><text:span text:style-name="T80"/></text:p>
          </table:table-cell>
          <table:table-cell table:style-name="表格55.A3" office:value-type="string">
            <text:p text:style-name="P25" loext:marker-style-name="T80"><text:span text:style-name="T79">貼上「禁止拆箱」標籤 → 太重就退件</text:span><text:span text:style-name="T80"/></text:p>
          </table:table-cell>
        </table:table-row>
        <table:table-row table:style-name="表格55.1">
          <table:table-cell table:style-name="表格55.A2" office:value-type="string">
            <text:p text:style-name="P25" loext:marker-style-name="T306"><text:span text:style-name="T299">PMTUD</text:span><text:span text:style-name="T306"/></text:p>
          </table:table-cell>
          <table:table-cell table:style-name="表格55.A2" office:value-type="string">
            <text:p text:style-name="P25" loext:marker-style-name="T91"><text:span text:style-name="T90">先試寄 → 被退 → 知道上限 → 調整大小再寄</text:span><text:span text:style-name="T91"/></text:p>
          </table:table-cell>
        </table:table-row>
        <table:table-row table:style-name="表格55.1">
          <table:table-cell table:style-name="表格55.A3" office:value-type="string">
            <text:p text:style-name="P25" loext:marker-style-name="T226"><text:span text:style-name="T219">TTL</text:span><text:span text:style-name="T226"/></text:p>
          </table:table-cell>
          <table:table-cell table:style-name="表格55.A3" office:value-type="string">
            <text:p text:style-name="P25" loext:marker-style-name="T85"><text:span text:style-name="T84">貨物限轉 </text:span><text:span text:style-name="T126">64 </text:span><text:span text:style-name="T84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5" loext:marker-style-name="T83"><text:span text:style-name="T125">MSS</text:span><text:span text:style-name="T83"/></text:p>
          </table:table-cell>
          <table:table-cell table:style-name="表格55.A2" office:value-type="string">
            <text:p text:style-name="P25" loext:marker-style-name="T87"><text:span text:style-name="T86">你自己量好每箱重量，確保不超重</text:span><text:span text:style-name="T87"/></text:p>
          </table:table-cell>
        </table:table-row>
      </table:table>
      <text:h text:style-name="P13" text:outline-level="1" loext:marker-style-name="T68"><text:span text:style-name="T67">第 三 篇　</text:span><text:span text:style-name="T68">IPv4 → IPv6 </text:span><text:span text:style-name="T67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8"><text:span text:style-name="T151">💡 <text:s/></text:span><text:span text:style-name="T48">為什麼要從 </text:span><text:span text:style-name="T59">IPv4 </text:span><text:span text:style-name="T48">換到 </text:span><text:span text:style-name="T59">IPv6</text:span><text:span text:style-name="T48">？</text:span></text:p>
            <text:p text:style-name="P9" loext:marker-style-name="T96"><text:span text:style-name="T129">IPv4 </text:span><text:span text:style-name="T95">在設計之初無法預料網路規模的爆炸性成長。隨著智慧型手機、</text:span><text:span text:style-name="T129">IoT </text:span><text:span text:style-name="T95">裝置大量普及，</text:span><text:span text:style-name="T129">IPv4 </text:span><text:span text:style-name="T95">位址已幾近耗盡，並衍生多項架構缺陷，因此 </text:span><text:span text:style-name="T129">IPv6 </text:span><text:span text:style-name="T95">誕生以從根本解決這些問題。但 </text:span><text:span text:style-name="T129">IPv4 </text:span><text:span text:style-name="T95">不會一夕消失，兩種協定長期並存，因此需要過渡技術。</text:span></text:p>
          </table:table-cell>
        </table:table-row>
      </table:table>
      <text:h text:style-name="P3" text:outline-level="2" loext:marker-style-name="T27"><text:span text:style-name="T28">一、</text:span><text:span text:style-name="T27">IPv4 vs IPv6 </text:span><text:span text:style-name="T28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6" loext:marker-style-name="T66"><text:span text:style-name="T65">比較項目</text:span><text:span text:style-name="T66"/></text:p>
            </table:table-cell>
            <table:table-cell table:style-name="表格57.A1" office:value-type="string">
              <text:p text:style-name="P6" loext:marker-style-name="T66"><text:span text:style-name="T75">✗ IPv4 </text:span><text:span text:style-name="T65">問題</text:span></text:p>
            </table:table-cell>
            <table:table-cell table:style-name="表格57.A1" office:value-type="string">
              <text:p text:style-name="P6" loext:marker-style-name="T66"><text:span text:style-name="T75">✓ IPv6 </text:span><text:span text:style-name="T65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5" loext:marker-style-name="T80"><text:span text:style-name="T79">位址長度</text:span><text:span text:style-name="T80"/></text:p>
          </table:table-cell>
          <table:table-cell table:style-name="表格57.A2" office:value-type="string">
            <text:p text:style-name="P25" loext:marker-style-name="T80"><text:span text:style-name="T216">32 bit</text:span><text:span text:style-name="T79">，約 </text:span><text:span text:style-name="T121">43 </text:span><text:span text:style-name="T79">億個 </text:span><text:span text:style-name="T121">IP</text:span><text:span text:style-name="T79">，已嚴重不足</text:span></text:p>
          </table:table-cell>
          <table:table-cell table:style-name="表格57.A2" office:value-type="string">
            <text:p text:style-name="P25" loext:marker-style-name="T80"><text:span text:style-name="T300">128 bit</text:span><text:span text:style-name="T79">，約 </text:span><text:span text:style-name="T121">3.4×10³⁸ </text:span><text:span text:style-name="T79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5" loext:marker-style-name="T80"><text:span text:style-name="T121">NAT </text:span><text:span text:style-name="T79">位址轉換</text:span></text:p>
          </table:table-cell>
          <table:table-cell table:style-name="表格57.A3" office:value-type="string">
            <text:p text:style-name="P25" loext:marker-style-name="T80"><text:span text:style-name="T86">需 </text:span><text:span text:style-name="T123">NAT </text:span><text:span text:style-name="T86">共用 </text:span><text:span text:style-name="T123">IP</text:span><text:span text:style-name="T79">，破壞 </text:span><text:span text:style-name="T121">End-to-End</text:span></text:p>
          </table:table-cell>
          <table:table-cell table:style-name="表格57.A3" office:value-type="string">
            <text:p text:style-name="P25" loext:marker-style-name="T80"><text:span text:style-name="T82">每裝置獨立公開 </text:span><text:span text:style-name="T125">IP</text:span><text:span text:style-name="T82">，不需 </text:span><text:span text:style-name="T125">NAT</text:span><text:span text:style-name="T79">，恢復 </text:span><text:span text:style-name="T121">E2E</text:span></text:p>
          </table:table-cell>
        </table:table-row>
        <table:table-row table:style-name="表格57.1">
          <table:table-cell table:style-name="表格57.A2" office:value-type="string">
            <text:p text:style-name="P25" loext:marker-style-name="T80"><text:span text:style-name="T79">安全性</text:span><text:span text:style-name="T80"/></text:p>
          </table:table-cell>
          <table:table-cell table:style-name="表格57.A2" office:value-type="string">
            <text:p text:style-name="P25" loext:marker-style-name="T80"><text:span text:style-name="T79">無內建加密／驗證，</text:span><text:span text:style-name="T86">須另裝 </text:span><text:span text:style-name="T123">VPN</text:span></text:p>
          </table:table-cell>
          <table:table-cell table:style-name="表格57.A2" office:value-type="string">
            <text:p text:style-name="P25" loext:marker-style-name="T80"><text:span text:style-name="T227">支援 </text:span><text:span text:style-name="T220">IPsec</text:span><text:span text:style-name="T82">（加密＋驗證）</text:span><text:span text:style-name="T79">※ </text:span><text:span text:style-name="T121">RFC 6434 </text:span><text:span text:style-name="T79">後改建議</text:span></text:p>
          </table:table-cell>
        </table:table-row>
        <table:table-row table:style-name="表格57.1">
          <table:table-cell table:style-name="表格57.A3" office:value-type="string">
            <text:p text:style-name="P25" loext:marker-style-name="T80"><text:span text:style-name="T121">Header </text:span><text:span text:style-name="T79">結構</text:span></text:p>
          </table:table-cell>
          <table:table-cell table:style-name="表格57.A3" office:value-type="string">
            <text:p text:style-name="P25" loext:marker-style-name="T80"><text:span text:style-name="T86">可變長度</text:span><text:span text:style-name="T79">含 </text:span><text:span text:style-name="T121">Options</text:span><text:span text:style-name="T79">，</text:span><text:span text:style-name="T121">Router </text:span><text:span text:style-name="T79">效率低</text:span></text:p>
          </table:table-cell>
          <table:table-cell table:style-name="表格57.A3" office:value-type="string">
            <text:p text:style-name="P25" loext:marker-style-name="T80"><text:span text:style-name="T82">固定 </text:span><text:span text:style-name="T125">40 bytes </text:span><text:span text:style-name="T79">基本 </text:span><text:span text:style-name="T121">Header</text:span><text:span text:style-name="T79">，轉送更快</text:span></text:p>
          </table:table-cell>
        </table:table-row>
        <table:table-row table:style-name="表格57.1">
          <table:table-cell table:style-name="表格57.A2" office:value-type="string">
            <text:p text:style-name="P25" loext:marker-style-name="T80"><text:span text:style-name="T79">服務品質 </text:span><text:span text:style-name="T121">QoS</text:span></text:p>
          </table:table-cell>
          <table:table-cell table:style-name="表格57.A2" office:value-type="string">
            <text:p text:style-name="P25" loext:marker-style-name="T87"><text:span text:style-name="T86">無法有效標記流量優先權</text:span><text:span text:style-name="T87"/></text:p>
          </table:table-cell>
          <table:table-cell table:style-name="表格57.A2" office:value-type="string">
            <text:p text:style-name="P25" loext:marker-style-name="T80"><text:span text:style-name="T125">Flow Label </text:span><text:span text:style-name="T82">欄位</text:span><text:span text:style-name="T79">，</text:span><text:span text:style-name="T275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5" loext:marker-style-name="T80"><text:span text:style-name="T79">廣播方式</text:span><text:span text:style-name="T80"/></text:p>
          </table:table-cell>
          <table:table-cell table:style-name="表格57.A3" office:value-type="string">
            <text:p text:style-name="P25" loext:marker-style-name="T80"><text:span text:style-name="T123">Broadcast</text:span><text:span text:style-name="T79">：一次發給所有人，浪費頻寬</text:span></text:p>
          </table:table-cell>
          <table:table-cell table:style-name="表格57.A3" office:value-type="string">
            <text:p text:style-name="P25" loext:marker-style-name="T80"><text:span text:style-name="T79">改用</text:span><text:span text:style-name="T82"> </text:span><text:span text:style-name="T125">Multicast</text:span><text:span text:style-name="T82">（群播）／ </text:span><text:span text:style-name="T125">Anycast</text:span><text:span text:style-name="T82">（任播）</text:span></text:p>
          </table:table-cell>
        </table:table-row>
        <table:table-row table:style-name="表格57.1">
          <table:table-cell table:style-name="表格57.A2" office:value-type="string">
            <text:p text:style-name="P25" loext:marker-style-name="T80"><text:span text:style-name="T121">IP </text:span><text:span text:style-name="T79">配置方式</text:span></text:p>
          </table:table-cell>
          <table:table-cell table:style-name="表格57.A2" office:value-type="string">
            <text:p text:style-name="P25" loext:marker-style-name="T80"><text:span text:style-name="T84">需手動設定或 </text:span><text:span text:style-name="T126">DHCP</text:span><text:span text:style-name="T79">，管理繁瑣</text:span></text:p>
          </table:table-cell>
          <table:table-cell table:style-name="表格57.A2" office:value-type="string">
            <text:p text:style-name="P25" loext:marker-style-name="T80"><text:span text:style-name="T121">SLAAC </text:span><text:span text:style-name="T79">無狀態自動配置，</text:span><text:span text:style-name="T261">插網路即取得 </text:span><text:span text:style-name="T25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8"><text:span text:style-name="T151">📌 <text:s/></text:span><text:span text:style-name="T173">補充：</text:span><text:span text:style-name="T177">IPsec </text:span><text:span text:style-name="T173">強制 </text:span><text:span text:style-name="T177">vs </text:span><text:span text:style-name="T173">建議</text:span></text:p>
            <text:p text:style-name="P9" loext:marker-style-name="T96"><text:span text:style-name="T129">IPv6 </text:span><text:span text:style-name="T95">早期規範（</text:span><text:span text:style-name="T129">RFC 2460</text:span><text:span text:style-name="T95">）將 </text:span><text:span text:style-name="T129">IPsec </text:span><text:span text:style-name="T95">列為「強制」；</text:span><text:span text:style-name="T129">2011 </text:span><text:span text:style-name="T95">年 </text:span><text:span text:style-name="T129">RFC 6434 </text:span><text:span text:style-name="T95">修訂後改為「建議（</text:span><text:span text:style-name="T129">SHOULD</text:span><text:span text:style-name="T95">）」。考試普遍仍以「原生支援 </text:span><text:span text:style-name="T129">IPsec</text:span><text:span text:style-name="T95">」作為 </text:span><text:span text:style-name="T129">IPv6 </text:span><text:span text:style-name="T95">改進特色，此處標注供參考。</text:span></text:p>
          </table:table-cell>
          <table:covered-table-cell/>
          <table:covered-table-cell/>
        </table:table-row>
      </table:table>
      <text:h text:style-name="P3" text:outline-level="2" loext:marker-style-name="T27"><text:span text:style-name="T28">二、三種 </text:span><text:span text:style-name="T27">IPv4 → IPv6 </text:span><text:span text:style-name="T28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9" loext:marker-style-name="T160"><text:span text:style-name="T166">① </text:span><text:span text:style-name="T168">Dual Stack</text:span><text:span text:style-name="T159">（雙協定堆疊）</text:span><text:span text:style-name="T158">— 最常用、最推薦</text:span></text:p>
            <text:p text:style-name="P10" loext:marker-style-name="T96"><text:span text:style-name="T355">裝置同時具備 </text:span><text:span text:style-name="T361">IPv4 </text:span><text:span text:style-name="T355">與 </text:span><text:span text:style-name="T361">IPv6 </text:span><text:span text:style-name="T355">兩套協定堆疊</text:span><text:span text:style-name="T95">。</text:span><text:span text:style-name="T134">DNS A record → </text:span><text:span text:style-name="T100">回傳 </text:span><text:span text:style-name="T134">IPv4</text:span><text:span text:style-name="T100">；</text:span><text:span text:style-name="T134">DNS AAAA record → </text:span><text:span text:style-name="T100">回傳 </text:span><text:span text:style-name="T134">IPv6</text:span><text:span text:style-name="T95">。連線時優先選用 </text:span><text:span text:style-name="T129">IPv6</text:span><text:span text:style-name="T95">，對端不支援則自動退回 </text:span><text:span text:style-name="T129">IPv4</text:span><text:span text:style-name="T95">。不需任何封包轉換，效能損耗最低。</text:span></text:p>
            <text:p text:style-name="P10" loext:marker-style-name="T96"><text:span text:style-name="T95">流程：輸入 </text:span><text:span text:style-name="T129">google.com → DNS </text:span><text:span text:style-name="T95">回傳 </text:span><text:span text:style-name="T129">A</text:span><text:span text:style-name="T95">＋</text:span><text:span text:style-name="T129">AAAA → </text:span><text:span text:style-name="T95">優先選 </text:span><text:span text:style-name="T129">IPv6 → </text:span><text:span text:style-name="T95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9" loext:marker-style-name="T172"><text:span text:style-name="T174">②</text:span><text:span text:style-name="T176"> Tunneling</text:span><text:span text:style-name="T171">（隧道技術）</text:span><text:span text:style-name="T169">— 過渡期橋接方案</text:span></text:p>
            <text:p text:style-name="P10" loext:marker-style-name="T96"><text:span text:style-name="T95">中間網路只支援 </text:span><text:span text:style-name="T129">IPv4</text:span><text:span text:style-name="T95">，無法直接傳送 </text:span><text:span text:style-name="T129">IPv6 </text:span><text:span text:style-name="T95">封包。解法：</text:span><text:span text:style-name="T355">將 </text:span><text:span text:style-name="T361">IPv6 </text:span><text:span text:style-name="T355">封包完整封裝進 </text:span><text:span text:style-name="T361">IPv4 </text:span><text:span text:style-name="T355">外殼，抵達目的地後拆除外層 </text:span><text:span text:style-name="T361">IPv4</text:span><text:span text:style-name="T355">、還原 </text:span><text:span text:style-name="T361">IPv6 </text:span><text:span text:style-name="T355">封包</text:span><text:span text:style-name="T95">。常見技術：</text:span><text:span text:style-name="T129">6in4</text:span><text:span text:style-name="T95">、</text:span><text:span text:style-name="T129">6to4</text:span><text:span text:style-name="T95">、</text:span><text:span text:style-name="T129">Teredo</text:span><text:span text:style-name="T95">、</text:span><text:span text:style-name="T129">ISATAP</text:span><text:span text:style-name="T95">。</text:span></text:p>
            <text:p text:style-name="P10" loext:marker-style-name="T96"><text:span text:style-name="T95">示意：</text:span><text:span text:style-name="T129">[ IPv4 </text:span><text:span text:style-name="T95">外層 </text:span><text:span text:style-name="T129">Header ][ IPv6 </text:span><text:span text:style-name="T95">封包（完整保留）</text:span><text:span text:style-name="T129">] → </text:span><text:span text:style-name="T95">目的地拆除外殼 → 還原 </text:span><text:span text:style-name="T129">IPv6</text:span><text:span text:style-name="T95">。</text:span></text:p>
          </table:table-cell>
        </table:table-row>
        <table:table-row table:style-name="表格58.1">
          <table:table-cell table:style-name="表格58.A3" office:value-type="string">
            <text:p text:style-name="P9" loext:marker-style-name="T205"><text:span text:style-name="T208">③ </text:span><text:span text:style-name="T209">Translation</text:span><text:span text:style-name="T203">（</text:span><text:span text:style-name="T209">NAT64</text:span><text:span text:style-name="T203">）</text:span><text:span text:style-name="T202">— 協定轉換、互通最後手段</text:span></text:p>
            <text:p text:style-name="P10" loext:marker-style-name="T96"><text:span text:style-name="T95">適用場景：</text:span><text:span text:style-name="T129">IPv6-only </text:span><text:span text:style-name="T95">裝置需與 </text:span><text:span text:style-name="T129">IPv4-only </text:span><text:span text:style-name="T95">裝置直接通訊。</text:span><text:span text:style-name="T241">透過轉換閘道器即時將封包表頭轉換為對方格式</text:span><text:span text:style-name="T95">。代表技術：</text:span><text:span text:style-name="T129">NAT64 + DNS64</text:span><text:span text:style-name="T95">。</text:span><text:span text:style-name="T236">複雜度最高，有額外效能損耗</text:span><text:span text:style-name="T95">。</text:span></text:p>
            <text:p text:style-name="P10" loext:marker-style-name="T96"><text:span text:style-name="T95">示意：</text:span><text:span text:style-name="T129">IPv6 </text:span><text:span text:style-name="T95">裝置 → </text:span><text:span text:style-name="T129">[ NAT64 </text:span><text:span text:style-name="T391">轉換閘道</text:span><text:span text:style-name="T95"> </text:span><text:span text:style-name="T129">] → IPv4 </text:span><text:span text:style-name="T95">裝置（雙向互轉）。</text:span></text:p>
          </table:table-cell>
        </table:table-row>
      </table:table>
      <text:h text:style-name="P3" text:outline-level="2" loext:marker-style-name="T27"><text:span text:style-name="T28">三、生活比喻（一次記住）</text:span><text:span text:style-name="T27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6" loext:marker-style-name="T70"><text:span text:style-name="T69">技術</text:span><text:span text:style-name="T70"/></text:p>
            </table:table-cell>
            <table:table-cell table:style-name="表格59.A1" office:value-type="string">
              <text:p text:style-name="P6" loext:marker-style-name="T70"><text:span text:style-name="T69">生活比喻</text:span><text:span text:style-name="T70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5" loext:marker-style-name="T108"><text:span text:style-name="T141">Dual Stack</text:span><text:span text:style-name="T108"/></text:p>
          </table:table-cell>
          <table:table-cell table:style-name="表格59.A2" office:value-type="string">
            <text:p text:style-name="P25" loext:marker-style-name="T108"><text:span text:style-name="T107">你</text:span><text:span text:style-name="T111">同時會中文 </text:span><text:span text:style-name="T142">+ </text:span><text:span text:style-name="T111">英文</text:span><text:span text:style-name="T107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5" loext:marker-style-name="T108"><text:span text:style-name="T141">Tunneling</text:span><text:span text:style-name="T108"/></text:p>
          </table:table-cell>
          <table:table-cell table:style-name="表格59.A3" office:value-type="string">
            <text:p text:style-name="P25" loext:marker-style-name="T108"><text:span text:style-name="T270">把英文信裝進中文信封偷渡過去</text:span><text:span text:style-name="T107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5" loext:marker-style-name="T108"><text:span text:style-name="T141">Translation</text:span><text:span text:style-name="T108"/></text:p>
          </table:table-cell>
          <table:table-cell table:style-name="表格59.A2" office:value-type="string">
            <text:p text:style-name="P25" loext:marker-style-name="T108"><text:span text:style-name="T444">現場請翻譯員</text:span><text:span text:style-name="T107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8"><text:span text:style-name="T151">🏠 <text:s/></text:span><text:span text:style-name="T48">用「寄信</text:span><text:span text:style-name="T59">/</text:span><text:span text:style-name="T48">門牌」理解</text:span></text:p>
            <text:p text:style-name="P9"><text:span text:style-name="T286">IPv4 </text:span><text:span text:style-name="T279">的困境：整棟公寓共用一個門牌</text:span><text:span text:style-name="T393">（</text:span><text:span text:style-name="T409">NAT</text:span><text:span text:style-name="T393">）</text:span><text:span text:style-name="T95">，郵差只送到大門，裡面誰是誰要另外猜；地址快用光還在借號碼。</text:span></text:p>
            <text:p text:style-name="P10"><text:span text:style-name="T247">IPv6 </text:span><text:span text:style-name="T237">的世界：每個人都有獨立門牌（公開 </text:span><text:span text:style-name="T247">IP</text:span><text:span text:style-name="T237">）</text:span><text:span text:style-name="T95">，地址多到用不完，郵件直接送到本人手上，不需中間人轉達。</text:span></text:p>
          </table:table-cell>
          <table:covered-table-cell/>
        </table:table-row>
      </table:table>
      <text:h text:style-name="P3" text:outline-level="2" loext:marker-style-name="T27"><text:span text:style-name="T28">四、考試速記版</text:span><text:span text:style-name="T27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8"><text:span text:style-name="T151">🧠 <text:s/></text:span><text:span text:style-name="T201">一句話記憶法</text:span></text:p>
            <text:p text:style-name="P9"><text:span text:style-name="T208">IPv6 </text:span><text:span text:style-name="T202">特點：</text:span><text:span text:style-name="T95">大（</text:span><text:span text:style-name="T129">128 bit</text:span><text:span text:style-name="T95">）＋ </text:span><text:span text:style-name="T325">安全（</text:span><text:span text:style-name="T337">IPsec</text:span><text:span text:style-name="T325">）</text:span><text:span text:style-name="T95">＋ </text:span><text:span text:style-name="T389">快（固定 </text:span><text:span text:style-name="T406">Header</text:span><text:span text:style-name="T389">）</text:span><text:span text:style-name="T95">＋ 自動（</text:span><text:span text:style-name="T129">SLAAC</text:span><text:span text:style-name="T95">）＋ 乾淨（無 </text:span><text:span text:style-name="T129">Broadcast</text:span><text:span text:style-name="T95">）。</text:span></text:p>
            <text:p text:style-name="P10"><text:span text:style-name="T203">過渡技術</text:span><text:span text:style-name="T202">：</text:span><text:span text:style-name="T95">雙語（</text:span><text:span text:style-name="T134">Dual Stack</text:span><text:span text:style-name="T95">）＋ 偽裝（</text:span><text:span text:style-name="T134">Tunneling</text:span><text:span text:style-name="T95">）＋ 翻譯（</text:span><text:span text:style-name="T134">Translation</text:span><text:span text:style-name="T95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22" loext:marker-style-name="T66"><text:span text:style-name="T75">IPv4 </text:span><text:span text:style-name="T65">七大問題</text:span></text:p>
          </table:table-cell>
          <table:table-cell table:style-name="表格60.A2" office:value-type="string">
            <text:p text:style-name="P22" loext:marker-style-name="T66"><text:span text:style-name="T75">IPv6 </text:span><text:span text:style-name="T65">七大改進</text:span></text:p>
          </table:table-cell>
        </table:table-row>
        <table:table-row table:style-name="表格60.1">
          <table:table-cell table:style-name="表格60.A3" office:value-type="string">
            <text:p text:style-name="P25" loext:marker-style-name="T80"><text:span text:style-name="T79">位址不足（</text:span><text:span text:style-name="T121">32 bit</text:span><text:span text:style-name="T79">）／需 </text:span><text:span text:style-name="T121">NAT </text:span><text:span text:style-name="T79">破壞 </text:span><text:span text:style-name="T121">E2E</text:span><text:span text:style-name="T79">／無加密驗證／</text:span><text:span text:style-name="T401">Header </text:span><text:span text:style-name="T383">可變效率低</text:span><text:span text:style-name="T79">／缺 </text:span><text:span text:style-name="T121">QoS</text:span><text:span text:style-name="T79">／用 </text:span><text:span text:style-name="T121">Broadcast </text:span><text:span text:style-name="T79">浪費／</text:span><text:span text:style-name="T121">IP </text:span><text:span text:style-name="T79">需手動設定</text:span></text:p>
          </table:table-cell>
          <table:table-cell table:style-name="表格60.A3" office:value-type="string">
            <text:p text:style-name="P25" loext:marker-style-name="T80"><text:span text:style-name="T121">128 bit </text:span><text:span text:style-name="T79">近乎無限／不需 </text:span><text:span text:style-name="T121">NAT </text:span><text:span text:style-name="T79">恢復 </text:span><text:span text:style-name="T121">E2E</text:span><text:span text:style-name="T79">／</text:span><text:span text:style-name="T227">支援 </text:span><text:span text:style-name="T220">IPsec</text:span><text:span text:style-name="T79">／</text:span><text:span text:style-name="T227">固定 </text:span><text:span text:style-name="T220">40 bytes </text:span><text:span text:style-name="T227">轉送快</text:span><text:span text:style-name="T79">／</text:span><text:span text:style-name="T121">Flow Label </text:span><text:span text:style-name="T79">支援 </text:span><text:span text:style-name="T121">QoS</text:span><text:span text:style-name="T79">／改用 </text:span><text:span text:style-name="T121">Multicast/Anycast</text:span><text:span text:style-name="T79">／</text:span><text:span text:style-name="T121">SLAAC </text:span><text:span text:style-name="T79">自動配置</text:span></text:p>
          </table:table-cell>
        </table:table-row>
      </table:table>
      <text:h text:style-name="P13" text:outline-level="1" loext:marker-style-name="T68"><text:span text:style-name="T67">第 四 篇　</text:span><text:span text:style-name="T68">ARP</text:span><text:span text:style-name="T67">、</text:span><text:span text:style-name="T68">NAT </text:span><text:span text:style-name="T67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8"><text:span text:style-name="T151">🔑 <text:s/></text:span><text:span text:style-name="T48">最基礎的比喻，先懂這個</text:span></text:p>
            <text:p text:style-name="P9" loext:marker-style-name="T96"><text:span text:style-name="T129">IP </text:span><text:span text:style-name="T95">位址決定「最終送到哪台電腦」；</text:span><text:span text:style-name="T129">MAC </text:span><text:span text:style-name="T95">位址決定「目前這一跳要交給哪個網路設備」。</text:span></text:p>
            <text:p text:style-name="P10" loext:marker-style-name="T96"><text:span text:style-name="T435">資料在網路中「實際傳送」靠 </text:span><text:span text:style-name="T452">MAC</text:span><text:span text:style-name="T95">，</text:span><text:span text:style-name="T324">但我們只知道對方的 </text:span><text:span text:style-name="T336">IP</text:span><text:span text:style-name="T129">——</text:span><text:span text:style-name="T95">所以</text:span><text:span text:style-name="T279">需要一個轉換機制</text:span><text:span text:style-name="T95">，這就是 </text:span><text:span text:style-name="T129">ARP </text:span><text:span text:style-name="T95">的工作。</text:span></text:p>
          </table:table-cell>
        </table:table-row>
      </table:table>
      <text:h text:style-name="P3" text:outline-level="2" loext:marker-style-name="T27"><text:span text:style-name="T28">一、</text:span><text:span text:style-name="T27">ARP</text:span><text:span text:style-name="T28">（</text:span><text:span text:style-name="T27">Address Resolution Protocol</text:span><text:span text:style-name="T28">）：</text:span><text:span text:style-name="T29">IP → MAC</text:span></text:h>
      <text:p text:style-name="P31" loext:marker-style-name="T96"><text:span text:style-name="T95">一句話定義：</text:span><text:span text:style-name="T135">ARP</text:span><text:span text:style-name="T129"> </text:span><text:span text:style-name="T95">＝ </text:span><text:span text:style-name="T268">用 </text:span><text:span text:style-name="T273">IP </text:span><text:span text:style-name="T268">找 </text:span><text:span text:style-name="T273">MAC</text:span><text:span text:style-name="T95">，</text:span><text:span text:style-name="T237">只在同一個區域網路（</text:span><text:span text:style-name="T247">LAN</text:span><text:span text:style-name="T237">）內使用</text:span><text:span text:style-name="T95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8"><text:span text:style-name="T151">📋 <text:s/></text:span><text:span text:style-name="T59">ARP </text:span><text:span text:style-name="T48">運作流程（考試必考）</text:span></text:p>
            <text:p text:style-name="P9"><text:span text:style-name="T61">① </text:span><text:span text:style-name="T51">查 </text:span><text:span text:style-name="T60">ARP Cache</text:span><text:span text:style-name="T51">（筆記本）</text:span><text:span text:style-name="T52">：</text:span><text:span text:style-name="T95">先查自己的記錄「</text:span><text:span text:style-name="T464">我之前有沒有問過這個 </text:span><text:span text:style-name="T475">IP</text:span><text:span text:style-name="T464">？</text:span><text:span text:style-name="T95">」有 → 直接用。</text:span></text:p>
            <text:p text:style-name="P10"><text:span text:style-name="T61">② </text:span><text:span text:style-name="T51">發出 </text:span><text:span text:style-name="T60">ARP Request</text:span><text:span text:style-name="T51">（廣播）</text:span><text:span text:style-name="T52">：</text:span><text:span text:style-name="T95">沒記錄 →</text:span><text:span text:style-name="T434"> 對整個區網廣播</text:span><text:span text:style-name="T95">「誰是 </text:span><text:span text:style-name="T129">192.168.1.5</text:span><text:span text:style-name="T95">？</text:span><text:span text:style-name="T434">請告訴我你的 </text:span><text:span text:style-name="T451">MAC</text:span><text:span text:style-name="T434">！</text:span><text:span text:style-name="T95">」所有機器都收到。</text:span></text:p>
            <text:p text:style-name="P10"><text:span text:style-name="T61">③ </text:span><text:span text:style-name="T51">收到 </text:span><text:span text:style-name="T60">ARP Reply</text:span><text:span text:style-name="T51">（單播回應）</text:span><text:span text:style-name="T52">：</text:span><text:span text:style-name="T214">IP </text:span><text:span text:style-name="T213">是 </text:span><text:span text:style-name="T214">192.168.1.5 </text:span><text:span text:style-name="T213">的機器回應「我是！</text:span><text:span text:style-name="T214">MAC </text:span><text:span text:style-name="T213">是 </text:span><text:span text:style-name="T214">AA:BB:CC</text:span><text:span text:style-name="T213">」</text:span><text:span text:style-name="T95">，其餘機器靜默忽略。</text:span></text:p>
            <text:p text:style-name="P10"><text:span text:style-name="T61">④ </text:span><text:span text:style-name="T51">存進 </text:span><text:span text:style-name="T60">ARP Cache</text:span><text:span text:style-name="T52">：</text:span><text:span text:style-name="T323">把「</text:span><text:span text:style-name="T335">IP ↔ MAC</text:span><text:span text:style-name="T323">」對應記下</text:span><text:span text:style-name="T95">，</text:span><text:span text:style-name="T237">下次直接用</text:span><text:span text:style-name="T95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6" loext:marker-style-name="T66"><text:span text:style-name="T65">項目</text:span><text:span text:style-name="T66"/></text:p>
          </table:table-cell>
          <table:table-cell table:style-name="表格62.A2" office:value-type="string">
            <text:p text:style-name="P6" loext:marker-style-name="T66"><text:span text:style-name="T65">內容</text:span><text:span text:style-name="T66"/></text:p>
          </table:table-cell>
        </table:table-row>
        <table:table-row table:style-name="表格62.1">
          <table:table-cell table:style-name="表格62.A3" office:value-type="string">
            <text:p text:style-name="P25" loext:marker-style-name="T385"><text:span text:style-name="T402">ARP Spoofing</text:span><text:span text:style-name="T384">（</text:span><text:span text:style-name="T402">ARP </text:span><text:span text:style-name="T384">欺騙）</text:span></text:p>
          </table:table-cell>
          <table:table-cell table:style-name="表格62.A3" office:value-type="string">
            <text:p text:style-name="P25" loext:marker-style-name="T80"><text:span text:style-name="T307">攻擊者</text:span><text:span text:style-name="T440">假冒他人</text:span><text:span text:style-name="T307">的 </text:span><text:span text:style-name="T300">MAC</text:span><text:span text:style-name="T307">，讓封包被送到錯的地方</text:span><text:span text:style-name="T79"> → 中間人攻擊（</text:span><text:span text:style-name="T121">MITM</text:span><text:span text:style-name="T79">）</text:span></text:p>
          </table:table-cell>
        </table:table-row>
        <table:table-row table:style-name="表格62.1">
          <table:table-cell table:style-name="表格62.A4" office:value-type="string">
            <text:p text:style-name="P25" loext:marker-style-name="T87"><text:span text:style-name="T123">arp -a</text:span><text:span text:style-name="T87"/></text:p>
          </table:table-cell>
          <table:table-cell table:style-name="表格62.A4" office:value-type="string">
            <text:p text:style-name="P25" loext:marker-style-name="T80"><text:span text:style-name="T441">查看本機的 </text:span><text:span text:style-name="T457">ARP </text:span><text:span text:style-name="T441">對應表</text:span><text:span text:style-name="T79">（</text:span><text:span text:style-name="T127">IP ↔ MAC </text:span><text:span text:style-name="T92">清單</text:span><text:span text:style-name="T79">）</text:span></text:p>
          </table:table-cell>
        </table:table-row>
        <table:table-row table:style-name="表格62.1">
          <table:table-cell table:style-name="表格62.A3" office:value-type="string">
            <text:p text:style-name="P25" loext:marker-style-name="T228"><text:span text:style-name="T220">ping [IP]</text:span><text:span text:style-name="T228"/></text:p>
          </table:table-cell>
          <table:table-cell table:style-name="表格62.A3" office:value-type="string">
            <text:p text:style-name="P25" loext:marker-style-name="T80"><text:span text:style-name="T261">觸發 </text:span><text:span text:style-name="T258">ARP </text:span><text:span text:style-name="T261">運作</text:span><text:span text:style-name="T79">，</text:span><text:span text:style-name="T222">讓電腦主動查詢對應 </text:span><text:span text:style-name="T216">MAC</text:span></text:p>
          </table:table-cell>
        </table:table-row>
      </table:table>
      <text:h text:style-name="P3" text:outline-level="2" loext:marker-style-name="T27"><text:span text:style-name="T28">二、</text:span><text:span text:style-name="T27">NAT</text:span><text:span text:style-name="T28">（</text:span><text:span text:style-name="T27">Network Address Translation</text:span><text:span text:style-name="T28">）：私網 → 公網</text:span></text:h>
      <text:p text:style-name="P31" loext:marker-style-name="T96"><text:span text:style-name="T95">一句話定義：</text:span><text:span text:style-name="T134">NAT</text:span><text:span text:style-name="T129"> </text:span><text:span text:style-name="T95">＝ </text:span><text:span text:style-name="T464">路由器幫你把「私有 </text:span><text:span text:style-name="T475">IP</text:span><text:span text:style-name="T464">」改成「公網 </text:span><text:span text:style-name="T475">IP</text:span><text:span text:style-name="T464">」</text:span><text:span text:style-name="T95">，讓內部機器能夠上網。</text:span><text:span text:style-name="T213">私有 </text:span><text:span text:style-name="T214">IP</text:span><text:span text:style-name="T213">（如 </text:span><text:span text:style-name="T214">192.168.1.2</text:span><text:span text:style-name="T213">）外網看不到，只在家裡用</text:span><text:span text:style-name="T95">；路由器的公網 </text:span><text:span text:style-name="T129">IP</text:span><text:span text:style-name="T95">（</text:span><text:span text:style-name="T129">220.x.x.x</text:span><text:span text:style-name="T95">，</text:span><text:span text:style-name="T129">ISP </text:span><text:span text:style-name="T95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8"><text:span text:style-name="T151">▸ <text:s/></text:span><text:span text:style-name="T59">NAT </text:span><text:span text:style-name="T48">運作流程</text:span></text:p>
            <text:p text:style-name="P9" loext:marker-style-name="T96"><text:span text:style-name="T129">① </text:span><text:span text:style-name="T95">你的電腦（</text:span><text:span text:style-name="T129">192.168.1.2</text:span><text:span text:style-name="T95">）發送資料給 </text:span><text:span text:style-name="T129">Google → ② </text:span><text:span text:style-name="T279">封包抵達路由器</text:span><text:span text:style-name="T95">，</text:span><text:span text:style-name="T247">NAT </text:span><text:span text:style-name="T237">把來源 </text:span><text:span text:style-name="T247">IP </text:span><text:span text:style-name="T237">改成公網 </text:span><text:span text:style-name="T247">IP</text:span><text:span text:style-name="T237">（</text:span><text:span text:style-name="T247">220.x.x.x</text:span><text:span text:style-name="T237">）</text:span><text:span text:style-name="T389">對外偽裝身份</text:span><text:span text:style-name="T95"> → ③ </text:span><text:span text:style-name="T129">Google </text:span><text:span text:style-name="T95">收到，回應給公網 </text:span><text:span text:style-name="T129">IP</text:span><text:span text:style-name="T95">（</text:span><text:span text:style-name="T129">220.x.x.x</text:span><text:span text:style-name="T95">）→ ④ 路由器把目的地 </text:span><text:span text:style-name="T129">IP </text:span><text:span text:style-name="T95">換回 </text:span><text:span text:style-name="T129">192.168.1.2</text:span><text:span text:style-name="T95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6" loext:marker-style-name="T66"><text:span text:style-name="T65">類型</text:span><text:span text:style-name="T66"/></text:p>
          </table:table-cell>
          <table:table-cell table:style-name="表格63.A2" office:value-type="string">
            <text:p text:style-name="P6" loext:marker-style-name="T66"><text:span text:style-name="T65">中文</text:span><text:span text:style-name="T66"/></text:p>
          </table:table-cell>
          <table:table-cell table:style-name="表格63.A2" office:value-type="string">
            <text:p text:style-name="P6" loext:marker-style-name="T66"><text:span text:style-name="T65">說明</text:span><text:span text:style-name="T66"/></text:p>
          </table:table-cell>
          <table:table-cell table:style-name="表格63.A2" office:value-type="string">
            <text:p text:style-name="P6" loext:marker-style-name="T66"><text:span text:style-name="T65">特點</text:span><text:span text:style-name="T66"/></text:p>
          </table:table-cell>
        </table:table-row>
        <table:table-row table:style-name="表格63.1">
          <table:table-cell table:style-name="表格63.A3" office:value-type="string">
            <text:p text:style-name="P25" loext:marker-style-name="T83"><text:span text:style-name="T125">Static NAT</text:span><text:span text:style-name="T83"/></text:p>
          </table:table-cell>
          <table:table-cell table:style-name="表格63.A3" office:value-type="string">
            <text:p text:style-name="P25" loext:marker-style-name="T80"><text:span text:style-name="T79">靜態 </text:span><text:span text:style-name="T121">NAT</text:span></text:p>
          </table:table-cell>
          <table:table-cell table:style-name="表格63.A3" office:value-type="string">
            <text:p text:style-name="P25" loext:marker-style-name="T347"><text:span text:style-name="T346">一個私有 </text:span><text:span text:style-name="T341">IP ↔ </text:span><text:span text:style-name="T346">一個公網 </text:span><text:span text:style-name="T341">IP</text:span></text:p>
          </table:table-cell>
          <table:table-cell table:style-name="表格63.A3" office:value-type="string">
            <text:p text:style-name="P25" loext:marker-style-name="T347"><text:span text:style-name="T346">固定對應</text:span><text:span text:style-name="T347"/></text:p>
          </table:table-cell>
        </table:table-row>
        <table:table-row table:style-name="表格63.1">
          <table:table-cell table:style-name="表格63.A4" office:value-type="string">
            <text:p text:style-name="P25" loext:marker-style-name="T83"><text:span text:style-name="T125">Dynamic NAT</text:span><text:span text:style-name="T83"/></text:p>
          </table:table-cell>
          <table:table-cell table:style-name="表格63.A4" office:value-type="string">
            <text:p text:style-name="P25" loext:marker-style-name="T80"><text:span text:style-name="T79">動態 </text:span><text:span text:style-name="T121">NAT</text:span></text:p>
          </table:table-cell>
          <table:table-cell table:style-name="表格63.A4" office:value-type="string">
            <text:p text:style-name="P25" loext:marker-style-name="T484"><text:span text:style-name="T483">多個私有 </text:span><text:span text:style-name="T487">IP </text:span><text:span text:style-name="T483">對應 </text:span><text:span text:style-name="T487">IP </text:span><text:span text:style-name="T483">池（</text:span><text:span text:style-name="T487">pool</text:span><text:span text:style-name="T483">）</text:span></text:p>
          </table:table-cell>
          <table:table-cell table:style-name="表格63.A4" office:value-type="string">
            <text:p text:style-name="P25" loext:marker-style-name="T484"><text:span text:style-name="T483">動態分配</text:span><text:span text:style-name="T484"/></text:p>
          </table:table-cell>
        </table:table-row>
        <table:table-row table:style-name="表格63.1">
          <table:table-cell table:style-name="表格63.A3" office:value-type="string">
            <text:p text:style-name="P25" loext:marker-style-name="T385"><text:span text:style-name="T402">PAT</text:span><text:span text:style-name="T385"/></text:p>
          </table:table-cell>
          <table:table-cell table:style-name="表格63.A3" office:value-type="string">
            <text:p text:style-name="P25" loext:marker-style-name="T80"><text:span text:style-name="T79">連接埠位址轉換</text:span><text:span text:style-name="T80"/></text:p>
          </table:table-cell>
          <table:table-cell table:style-name="表格63.A3" office:value-type="string">
            <text:p text:style-name="P25" loext:marker-style-name="T490"><text:span text:style-name="T489">多台共用一個公網 </text:span><text:span text:style-name="T491">IP</text:span></text:p>
          </table:table-cell>
          <table:table-cell table:style-name="表格63.A3" office:value-type="string">
            <text:p text:style-name="P25" loext:marker-style-name="T490"><text:span text:style-name="T489">靠 </text:span><text:span text:style-name="T491">Port </text:span><text:span text:style-name="T489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8"><text:span text:style-name="T151">⚠️ <text:s/></text:span><text:span text:style-name="T177">NAT </text:span><text:span text:style-name="T173">的缺點（考試超愛）</text:span></text:p>
            <text:p text:style-name="P9"><text:span text:style-name="T435">破壞 </text:span><text:span text:style-name="T452">End-to-End </text:span><text:span text:style-name="T435">連線</text:span><text:span text:style-name="T169">（最重要）：</text:span><text:span text:style-name="T95">原本你↔對方是真正點對點；</text:span><text:span text:style-name="T100">有 </text:span><text:span text:style-name="T134">NAT </text:span><text:span text:style-name="T100">後變成你→</text:span><text:span text:style-name="T134">NAT→</text:span><text:span text:style-name="T100">對方，多一層轉換，不再是端對端</text:span><text:span text:style-name="T95">。</text:span></text:p>
            <text:p text:style-name="P10"><text:span text:style-name="T452">P2P / VoIP </text:span><text:span text:style-name="T435">難以運作</text:span><text:span text:style-name="T169">：</text:span><text:span text:style-name="T237">外部機器找不到你（被藏在 </text:span><text:span text:style-name="T247">NAT </text:span><text:span text:style-name="T237">後）</text:span><text:span text:style-name="T95">，</text:span><text:span text:style-name="T129">P2P </text:span><text:span text:style-name="T95">下載、</text:span><text:span text:style-name="T129">VoIP </text:span><text:span text:style-name="T95">通話等</text:span><text:span text:style-name="T485">直連功能受限</text:span><text:span text:style-name="T95">。</text:span></text:p>
            <text:p text:style-name="P10"><text:span text:style-name="T435">增加延遲</text:span><text:span text:style-name="T169">：</text:span><text:span text:style-name="T295">每個封包都需要</text:span><text:span text:style-name="T492">多一道 </text:span><text:span text:style-name="T493">IP </text:span><text:span text:style-name="T492">轉換處理</text:span><text:span text:style-name="T95">。</text:span></text:p>
          </table:table-cell>
          <table:covered-table-cell/>
          <table:covered-table-cell/>
          <table:covered-table-cell/>
        </table:table-row>
      </table:table>
      <text:h text:style-name="P3" text:outline-level="2" loext:marker-style-name="T27"><text:soft-page-break/><text:span text:style-name="T28">三、解決 </text:span><text:span text:style-name="T27">NAT </text:span><text:span text:style-name="T28">限制的三種方法</text:span></text:h>
      <text:p text:style-name="P31" loext:marker-style-name="T96"><text:span text:style-name="T100">核心問題</text:span><text:span text:style-name="T95">：</text:span><text:span text:style-name="T279">外面的人只看到一個公網 </text:span><text:span text:style-name="T286">IP</text:span><text:span text:style-name="T95">，但</text:span><text:span text:style-name="T494">內部有多台機器，路由器不知道要轉給哪一台</text:span><text:span text:style-name="T95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9" loext:marker-style-name="T53"><text:span text:style-name="T52">方法一：</text:span><text:span text:style-name="T60">Port Forwarding</text:span><text:span text:style-name="T51">（手動指定轉發）</text:span></text:p>
            <text:p text:style-name="P10" loext:marker-style-name="T96"><text:span text:style-name="T95">比喻：</text:span><text:span text:style-name="T336">Port</text:span><text:span text:style-name="T324">＝房間號碼</text:span><text:span text:style-name="T95">；</text:span><text:span text:style-name="T475">NAT </text:span><text:span text:style-name="T464">路由器＝大樓</text:span><text:span text:style-name="T95">；</text:span><text:span text:style-name="T336">Port Forwarding</text:span><text:span text:style-name="T324">＝門口指示牌「</text:span><text:span text:style-name="T336">80 </text:span><text:span text:style-name="T324">號房 → </text:span><text:span text:style-name="T336">192.168.1.2</text:span><text:span text:style-name="T324">」</text:span><text:span text:style-name="T95">。例：</text:span><text:span text:style-name="T129">220.x.x.x:80 → 192.168.1.2:80</text:span><text:span text:style-name="T95">（</text:span><text:span text:style-name="T467">網頁</text:span><text:span text:style-name="T95">）；</text:span><text:span text:style-name="T129">220.x.x.x:25565 → 192.168.1.2:25565</text:span><text:span text:style-name="T95">（</text:span><text:span text:style-name="T129">Minecraft</text:span><text:span text:style-name="T95">）。</text:span></text:p>
            <text:p text:style-name="P10"><text:span text:style-name="T99">優點：</text:span><text:span text:style-name="T95">設定直接、穩定，可精確控制。</text:span><text:span text:style-name="T99">缺點：</text:span><text:span text:style-name="T391">每個服務都要手動設定，</text:span><text:span text:style-name="T407">IP </text:span><text:span text:style-name="T391">改變要重設</text:span><text:span text:style-name="T95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9" loext:marker-style-name="T160"><text:span text:style-name="T158">方法二：</text:span><text:span text:style-name="T168">UPnP</text:span><text:span text:style-name="T159">（自動版 </text:span><text:span text:style-name="T168">Port Forwarding</text:span><text:span text:style-name="T159">）</text:span></text:p>
            <text:p text:style-name="P10" loext:marker-style-name="T96"><text:span text:style-name="T242">讓裝置自動跟</text:span><text:span text:style-name="T416">路由器</text:span><text:span text:style-name="T242">要求「幫我開一個 </text:span><text:span text:style-name="T253">Port</text:span><text:span text:style-name="T242">」，不需人工設定。</text:span><text:span text:style-name="T95">① </text:span><text:span text:style-name="T465">應用程式發 </text:span><text:span text:style-name="T476">UPnP </text:span><text:span text:style-name="T465">請求</text:span><text:span text:style-name="T95"> → ② </text:span><text:span text:style-name="T417">路由器</text:span><text:span text:style-name="T465">自動新增 </text:span><text:span text:style-name="T476">Port Forwarding </text:span><text:span text:style-name="T465">規則</text:span><text:span text:style-name="T95"> → ③</text:span><text:span text:style-name="T243"> 服務結束後自動清除</text:span><text:span text:style-name="T95">（理想情況）。</text:span></text:p>
            <text:p text:style-name="P10"><text:span text:style-name="T99">優點：</text:span><text:span text:style-name="T95">全自動、對一般用戶友善。</text:span><text:span text:style-name="T183">安全風險（重要）：</text:span><text:span text:style-name="T391">惡意程式也能透過 </text:span><text:span text:style-name="T407">UPnP </text:span><text:span text:style-name="T391">自動開 </text:span><text:span text:style-name="T407">Port</text:span><text:span text:style-name="T391">，可能讓攻擊者直接連入內網</text:span><text:span text:style-name="T95">。建議不需要時關閉 </text:span><text:span text:style-name="T129">UPnP</text:span><text:span text:style-name="T95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9" loext:marker-style-name="T205"><text:span text:style-name="T202">方法三：</text:span><text:span text:style-name="T209">STUN</text:span><text:span text:style-name="T203">（打洞技術）</text:span></text:p>
            <text:p text:style-name="P10" loext:marker-style-name="T96"><text:span text:style-name="T100">使用情境</text:span><text:span text:style-name="T95">：</text:span><text:span text:style-name="T495">兩端都在各自 </text:span><text:span text:style-name="T499">NAT </text:span><text:span text:style-name="T495">後面，彼此都是私有 </text:span><text:span text:style-name="T499">IP</text:span><text:span text:style-name="T495">、互相找不到。</text:span><text:span text:style-name="T499">STUN </text:span><text:span text:style-name="T495">先幫每端「查清楚自己對外的公網 </text:span><text:span text:style-name="T499">IP + Port</text:span><text:span text:style-name="T495">」，再交換資訊</text:span><text:span text:style-name="T95">嘗試直接打通。</text:span></text:p>
            <text:p text:style-name="P10" loext:marker-style-name="T96"><text:span text:style-name="T129">① </text:span><text:span text:style-name="T502">問 </text:span><text:span text:style-name="T504">STUN </text:span><text:span text:style-name="T502">伺服器「我對外的 </text:span><text:span text:style-name="T504">IP </text:span><text:span text:style-name="T502">和 </text:span><text:span text:style-name="T504">Port </text:span><text:span text:style-name="T502">是什麼？」</text:span><text:span text:style-name="T95">② </text:span><text:span text:style-name="T504">STUN </text:span><text:span text:style-name="T502">回「你對外是 </text:span><text:span text:style-name="T504">220.x.x.x:12345</text:span><text:span text:style-name="T502">」</text:span><text:span text:style-name="T95">③ </text:span><text:span text:style-name="T213">朋友也做同樣的事</text:span><text:span text:style-name="T95"> → ④ </text:span><text:span text:style-name="T502">兩端透過第三方交換彼此公網位址</text:span><text:span text:style-name="T95"> → ⑤ </text:span><text:span text:style-name="T502">同時互相發送封包打洞（</text:span><text:span text:style-name="T504">Hole Punching</text:span><text:span text:style-name="T502">）</text:span><text:span text:style-name="T95">。</text:span></text:p>
            <text:p text:style-name="P10"><text:span text:style-name="T183">重要限制：</text:span><text:span text:style-name="T407">STUN </text:span><text:span text:style-name="T391">只對部分 </text:span><text:span text:style-name="T407">NAT </text:span><text:span text:style-name="T391">類型有效</text:span><text:span text:style-name="T95">；若兩端都是 </text:span><text:span text:style-name="T129">Symmetric NAT</text:span><text:span text:style-name="T95">，打洞會失敗，需改用 </text:span><text:span text:style-name="T129">TURN </text:span><text:span text:style-name="T95">伺服器作為中繼轉發。（</text:span><text:span text:style-name="T129">WebRTC </text:span><text:span text:style-name="T95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6" loext:marker-style-name="T66"><text:span text:style-name="T65">方法</text:span><text:span text:style-name="T66"/></text:p>
          </table:table-cell>
          <table:table-cell table:style-name="表格64.A4" office:value-type="string">
            <text:p text:style-name="P6" loext:marker-style-name="T66"><text:span text:style-name="T65">設定方式</text:span><text:span text:style-name="T66"/></text:p>
          </table:table-cell>
          <table:table-cell table:style-name="表格64.A4" office:value-type="string">
            <text:p text:style-name="P6" loext:marker-style-name="T66"><text:span text:style-name="T65">典型場景</text:span><text:span text:style-name="T66"/></text:p>
          </table:table-cell>
          <table:table-cell table:style-name="表格64.A4" office:value-type="string">
            <text:p text:style-name="P6" loext:marker-style-name="T66"><text:span text:style-name="T65">主要限制</text:span><text:span text:style-name="T66"/></text:p>
          </table:table-cell>
        </table:table-row>
        <table:table-row table:style-name="表格64.1">
          <table:table-cell table:style-name="表格64.A5" office:value-type="string">
            <text:p text:style-name="P25" loext:marker-style-name="T80"><text:span text:style-name="T121">Port Forwarding</text:span><text:span text:style-name="T80"/></text:p>
          </table:table-cell>
          <table:table-cell table:style-name="表格64.A5" office:value-type="string">
            <text:p text:style-name="P25" loext:marker-style-name="T83"><text:span text:style-name="T82">手動設定路由器</text:span><text:span text:style-name="T83"/></text:p>
          </table:table-cell>
          <table:table-cell table:style-name="表格64.A5" office:value-type="string">
            <text:p text:style-name="P25" loext:marker-style-name="T80"><text:span text:style-name="T79">架設網頁／遊戲伺服器</text:span><text:span text:style-name="T80"/></text:p>
          </table:table-cell>
          <table:table-cell table:style-name="表格64.A5" office:value-type="string">
            <text:p text:style-name="P25" loext:marker-style-name="T80"><text:span text:style-name="T79">需要手動維護</text:span><text:span text:style-name="T80"/></text:p>
          </table:table-cell>
        </table:table-row>
        <table:table-row table:style-name="表格64.1">
          <table:table-cell table:style-name="表格64.A6" office:value-type="string">
            <text:p text:style-name="P25" loext:marker-style-name="T80"><text:span text:style-name="T121">UPnP</text:span><text:span text:style-name="T80"/></text:p>
          </table:table-cell>
          <table:table-cell table:style-name="表格64.A6" office:value-type="string">
            <text:p text:style-name="P25" loext:marker-style-name="T83"><text:span text:style-name="T82">應用程式自動設定</text:span><text:span text:style-name="T83"/></text:p>
          </table:table-cell>
          <table:table-cell table:style-name="表格64.A6" office:value-type="string">
            <text:p text:style-name="P25" loext:marker-style-name="T80"><text:span text:style-name="T79">一般遊戲、視訊軟體</text:span><text:span text:style-name="T80"/></text:p>
          </table:table-cell>
          <table:table-cell table:style-name="表格64.A6" office:value-type="string">
            <text:p text:style-name="P25" loext:marker-style-name="T80"><text:span text:style-name="T79">惡意程式可濫用</text:span><text:span text:style-name="T80"/></text:p>
          </table:table-cell>
        </table:table-row>
        <table:table-row table:style-name="表格64.1">
          <table:table-cell table:style-name="表格64.A5" office:value-type="string">
            <text:p text:style-name="P25" loext:marker-style-name="T80"><text:span text:style-name="T121">STUN</text:span><text:span text:style-name="T80"/></text:p>
          </table:table-cell>
          <table:table-cell table:style-name="表格64.A5" office:value-type="string">
            <text:p text:style-name="P25" loext:marker-style-name="T83"><text:span text:style-name="T82">無需路由器設定</text:span><text:span text:style-name="T83"/></text:p>
          </table:table-cell>
          <table:table-cell table:style-name="表格64.A5" office:value-type="string">
            <text:p text:style-name="P25" loext:marker-style-name="T80"><text:span text:style-name="T121">WebRTC</text:span><text:span text:style-name="T79">、</text:span><text:span text:style-name="T121">P2P </text:span><text:span text:style-name="T79">通話</text:span></text:p>
          </table:table-cell>
          <table:table-cell table:style-name="表格64.A5" office:value-type="string">
            <text:p text:style-name="P25" loext:marker-style-name="T80"><text:span text:style-name="T121">Symmetric NAT </text:span><text:span text:style-name="T79">會失敗</text:span></text:p>
          </table:table-cell>
        </table:table-row>
      </table:table>
      <text:h text:style-name="P3" text:outline-level="2" loext:marker-style-name="T27"><text:span text:style-name="T28">四、完整上網流程（</text:span><text:span text:style-name="T27">ARP + NAT </text:span><text:span text:style-name="T28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8"><text:span text:style-name="T151">🎯 <text:s/></text:span><text:span text:style-name="T201">最重要的核心觀念（先記住）</text:span></text:p>
            <text:p text:style-name="P9"><text:span text:style-name="T208">IP </text:span><text:span text:style-name="T202">位址＝</text:span><text:span text:style-name="T95">決定封包的最終目的地（整條路的終點），像信封上的收件地址。</text:span></text:p>
            <text:p text:style-name="P10"><text:span text:style-name="T208">MAC </text:span><text:span text:style-name="T202">位址＝</text:span><text:span text:style-name="T95">決定「下一站」要交給哪台機器，像快遞員每次只看下一站。</text:span></text:p>
            <text:p text:style-name="P10"><text:span text:style-name="T183">關鍵理解：</text:span><text:span text:style-name="T95">封包在傳送途中，</text:span><text:span text:style-name="T129">IP </text:span><text:span text:style-name="T95">不變（始終是 </text:span><text:span text:style-name="T129">Google </text:span><text:span text:style-name="T95">的 </text:span><text:span text:style-name="T129">IP</text:span><text:span text:style-name="T95">），但 </text:span><text:span text:style-name="T129">MAC </text:span><text:span text:style-name="T95">每一跳都會更換。</text:span></text:p>
          </table:table-cell>
        </table:table-row>
      </table:table>
      <text:p text:style-name="P31" loext:marker-style-name="T11"><text:span text:style-name="T12">場景</text:span><text:span text:style-name="T10">：</text:span><text:span text:style-name="T505">你電腦 </text:span><text:span text:style-name="T507">192.168.1.2</text:span><text:span text:style-name="T505">／路由器內網 </text:span><text:span text:style-name="T507">IP 192.168.1.1</text:span><text:span text:style-name="T505">／路由器公網 </text:span><text:span text:style-name="T507">IP 220.x.x.x</text:span><text:span text:style-name="T505">／目標 </text:span><text:span text:style-name="T507">google.com</text:span><text:span text:style-name="T10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6" loext:marker-style-name="T72"><text:span text:style-name="T71">步驟</text:span><text:span text:style-name="T72"/></text:p>
            </table:table-cell>
            <table:table-cell table:style-name="表格66.A1" office:value-type="string">
              <text:p text:style-name="P6" loext:marker-style-name="T72"><text:span text:style-name="T71">動作</text:span><text:span text:style-name="T72"/></text:p>
            </table:table-cell>
            <table:table-cell table:style-name="表格66.A1" office:value-type="string">
              <text:p text:style-name="P6" loext:marker-style-name="T72"><text:span text:style-name="T71">使用技術</text:span><text:span text:style-name="T72"/></text:p>
            </table:table-cell>
            <table:table-cell table:style-name="表格66.A1" office:value-type="string">
              <text:p text:style-name="P6" loext:marker-style-name="T72"><text:span text:style-name="T71">關鍵重點</text:span><text:span text:style-name="T72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5" loext:marker-style-name="T112"><text:span text:style-name="T144">① DNS</text:span><text:span text:style-name="T112"/></text:p>
          </table:table-cell>
          <table:table-cell table:style-name="表格66.A2" office:value-type="string">
            <text:p text:style-name="P25" loext:marker-style-name="T112"><text:span text:style-name="T144">google.com → 142.250.xxx.xxx(</text:span><text:span text:style-name="T148">Google </text:span><text:span text:style-name="T118">的 </text:span><text:span text:style-name="T148">IP</text:span><text:span text:style-name="T144">)</text:span></text:p>
            <text:p text:style-name="P25" loext:marker-style-name="T112"><text:span text:style-name="T144">(</text:span><text:span text:style-name="T113">電腦必須知道目的地在哪</text:span><text:span text:style-name="T144">)</text:span></text:p>
          </table:table-cell>
          <table:table-cell table:style-name="表格66.A2" office:value-type="string">
            <text:p text:style-name="P25" loext:marker-style-name="T112"><text:span text:style-name="T144">DNS</text:span><text:span text:style-name="T112"/></text:p>
          </table:table-cell>
          <table:table-cell table:style-name="表格66.A2" office:value-type="string">
            <text:p text:style-name="P25" loext:marker-style-name="T112"><text:span text:style-name="T113">網路只認 </text:span><text:span text:style-name="T144">IP</text:span><text:span text:style-name="T113">，不認名字</text:span></text:p>
          </table:table-cell>
        </table:table-row>
        <table:table-row table:style-name="表格66.1">
          <table:table-cell table:style-name="表格66.A3" office:value-type="string">
            <text:p text:style-name="P25" loext:marker-style-name="T112"><text:span text:style-name="T144">② ARP</text:span><text:span text:style-name="T112"/></text:p>
          </table:table-cell>
          <table:table-cell table:style-name="表格66.A3" office:value-type="string">
            <text:p text:style-name="P25" loext:marker-style-name="T112"><text:span text:style-name="T113">找路由器（</text:span><text:span text:style-name="T144">192.168.1.1</text:span><text:span text:style-name="T113">）的 </text:span><text:span text:style-name="T144">MAC(</text:span><text:span text:style-name="T312">發現 </text:span><text:span text:style-name="T328">Google </text:span><text:span text:style-name="T445">不在同一個區網</text:span><text:span text:style-name="T312">，必須交給路由器幫忙送</text:span><text:span text:style-name="T144">)(</text:span><text:span text:style-name="T468">查詢路由器的 </text:span><text:span text:style-name="T478">MAC</text:span><text:span text:style-name="T468">，下一站是路由器</text:span><text:span text:style-name="T144">)</text:span></text:p>
          </table:table-cell>
          <table:table-cell table:style-name="表格66.A3" office:value-type="string">
            <text:p text:style-name="P25" loext:marker-style-name="T112"><text:span text:style-name="T144">ARP</text:span><text:span text:style-name="T112"/></text:p>
          </table:table-cell>
          <table:table-cell table:style-name="表格66.A3" office:value-type="string">
            <text:p text:style-name="P25" loext:marker-style-name="T112"><text:span text:style-name="T113">找的是「路由器」，不是 </text:span><text:span text:style-name="T144">Google</text:span><text:span text:style-name="T113">！</text:span></text:p>
          </table:table-cell>
        </table:table-row>
        <table:table-row table:style-name="表格66.1">
          <table:table-cell table:style-name="表格66.A2" office:value-type="string">
            <text:p text:style-name="P25" loext:marker-style-name="T112"><text:span text:style-name="T144">③ </text:span><text:span text:style-name="T377">送封包</text:span></text:p>
          </table:table-cell>
          <table:table-cell table:style-name="表格66.A2" office:value-type="string">
            <text:p text:style-name="P25" loext:marker-style-name="T112"><text:span text:style-name="T144">IP=Google</text:span><text:span text:style-name="T113">；</text:span><text:span text:style-name="T144">MAC=</text:span><text:span text:style-name="T113">路由器</text:span><text:span text:style-name="T144">(</text:span><text:span text:style-name="T256">IP </text:span><text:span text:style-name="T231">記</text:span><text:soft-page-break/><text:span text:style-name="T231">錄最終目的地；</text:span><text:span text:style-name="T256">MAC </text:span><text:span text:style-name="T231">記錄下一站</text:span><text:span text:style-name="T144">)</text:span></text:p>
          </table:table-cell>
          <table:table-cell table:style-name="表格66.A2" office:value-type="string">
            <text:p text:style-name="P25" loext:marker-style-name="T112"><text:span text:style-name="T144">L2 </text:span><text:span text:style-name="T113">傳輸</text:span></text:p>
          </table:table-cell>
          <table:table-cell table:style-name="表格66.A2" office:value-type="string">
            <text:p text:style-name="P25" loext:marker-style-name="T112"><text:span text:style-name="T144">IP=</text:span><text:span text:style-name="T113">終點；</text:span><text:span text:style-name="T144">MAC=</text:span><text:span text:style-name="T113">下一站</text:span></text:p>
          </table:table-cell>
        </table:table-row>
        <table:table-row table:style-name="表格66.1">
          <table:table-cell table:style-name="表格66.A3" office:value-type="string">
            <text:p text:style-name="P25" loext:marker-style-name="T112"><text:span text:style-name="T144">④ NAT </text:span><text:span text:style-name="T113">去程</text:span></text:p>
          </table:table-cell>
          <table:table-cell table:style-name="表格66.A3" office:value-type="string">
            <text:p text:style-name="P25" loext:marker-style-name="T112"><text:span text:style-name="T412">192.168.1.2 → 220.x.x.x</text:span><text:span text:style-name="T144">(</text:span><text:span text:style-name="T470">路由器收到後往 </text:span><text:span text:style-name="T479">Internet </text:span><text:span text:style-name="T470">送</text:span><text:span text:style-name="T113">；路由器負責跨網路傳遞</text:span><text:span text:style-name="T144">)(</text:span><text:span text:style-name="T470">私有 </text:span><text:span text:style-name="T479">IP </text:span><text:span text:style-name="T470">換成公網 </text:span><text:span text:style-name="T479">IP</text:span><text:span text:style-name="T470">，因</text:span><text:span text:style-name="T479">Internet </text:span><text:span text:style-name="T470">不認私有 </text:span><text:span text:style-name="T479">IP</text:span><text:span text:style-name="T144">)</text:span></text:p>
          </table:table-cell>
          <table:table-cell table:style-name="表格66.A3" office:value-type="string">
            <text:p text:style-name="P25" loext:marker-style-name="T112"><text:span text:style-name="T144">NAT</text:span><text:span text:style-name="T112"/></text:p>
          </table:table-cell>
          <table:table-cell table:style-name="表格66.A3" office:value-type="string">
            <text:p text:style-name="P25" loext:marker-style-name="T112"><text:span text:style-name="T113">換身份才能上 </text:span><text:span text:style-name="T144">Internet</text:span></text:p>
          </table:table-cell>
        </table:table-row>
        <table:table-row table:style-name="表格66.1">
          <table:table-cell table:style-name="表格66.A2" office:value-type="string">
            <text:p text:style-name="P25" loext:marker-style-name="T112"><text:span text:style-name="T144">⑤ </text:span><text:span text:style-name="T113">傳到 </text:span><text:span text:style-name="T144">Google</text:span></text:p>
          </table:table-cell>
          <table:table-cell table:style-name="表格66.A2" office:value-type="string">
            <text:p text:style-name="P25" loext:marker-style-name="T112"><text:span text:style-name="T285">封包抵達目的地</text:span><text:span text:style-name="T144">(</text:span><text:span text:style-name="T500">Google </text:span><text:span text:style-name="T496">看到公網 </text:span><text:span text:style-name="T500">IP</text:span><text:span text:style-name="T144">)</text:span></text:p>
          </table:table-cell>
          <table:table-cell table:style-name="表格66.A2" office:value-type="string">
            <text:p text:style-name="P25" loext:marker-style-name="T112"><text:span text:style-name="T144">Internet</text:span><text:span text:style-name="T112"/></text:p>
          </table:table-cell>
          <table:table-cell table:style-name="表格66.A2" office:value-type="string">
            <text:p text:style-name="P25" loext:marker-style-name="T112"><text:span text:style-name="T144">Google </text:span><text:span text:style-name="T113">只看到公網 </text:span><text:span text:style-name="T144">IP</text:span></text:p>
          </table:table-cell>
        </table:table-row>
        <table:table-row table:style-name="表格66.1">
          <table:table-cell table:style-name="表格66.A3" office:value-type="string">
            <text:p text:style-name="P25" loext:marker-style-name="T112"><text:span text:style-name="T144">⑥ Google </text:span><text:span text:style-name="T113">回應</text:span></text:p>
          </table:table-cell>
          <table:table-cell table:style-name="表格66.A3" office:value-type="string">
            <text:p text:style-name="P25" loext:marker-style-name="T112"><text:span text:style-name="T378">回傳給 </text:span><text:span text:style-name="T413">220.x.x.x</text:span><text:span text:style-name="T144">(</text:span><text:span text:style-name="T503">回到路由器再回到你電腦</text:span><text:span text:style-name="T144">)</text:span></text:p>
          </table:table-cell>
          <table:table-cell table:style-name="表格66.A3" office:value-type="string">
            <text:p text:style-name="P25" loext:marker-style-name="T112"><text:span text:style-name="T144">Internet</text:span><text:span text:style-name="T112"/></text:p>
          </table:table-cell>
          <table:table-cell table:style-name="表格66.A3" office:value-type="string">
            <text:p text:style-name="P25" loext:marker-style-name="T112"><text:span text:style-name="T113">路由器收到回應</text:span><text:span text:style-name="T112"/></text:p>
          </table:table-cell>
        </table:table-row>
        <table:table-row table:style-name="表格66.1">
          <table:table-cell table:style-name="表格66.A2" office:value-type="string">
            <text:p text:style-name="P25" loext:marker-style-name="T112"><text:span text:style-name="T144">⑦ NAT </text:span><text:span text:style-name="T113">回程</text:span></text:p>
          </table:table-cell>
          <table:table-cell table:style-name="表格66.A2" office:value-type="string">
            <text:p text:style-name="P25" loext:marker-style-name="T112"><text:span text:style-name="T412">220.x.x.x → 192.168.1.2</text:span><text:span text:style-name="T144">(</text:span><text:span text:style-name="T328">NAT </text:span><text:span text:style-name="T312">依記錄轉回正確主機</text:span><text:span text:style-name="T144">)</text:span></text:p>
          </table:table-cell>
          <table:table-cell table:style-name="表格66.A2" office:value-type="string">
            <text:p text:style-name="P25" loext:marker-style-name="T112"><text:span text:style-name="T144">NAT</text:span><text:span text:style-name="T112"/></text:p>
          </table:table-cell>
          <table:table-cell table:style-name="表格66.A2" office:value-type="string">
            <text:p text:style-name="P25" loext:marker-style-name="T112"><text:span text:style-name="T113">查記錄，換回真正目標</text:span><text:span text:style-name="T112"/></text:p>
          </table:table-cell>
        </table:table-row>
        <table:table-row table:style-name="表格66.1">
          <table:table-cell table:style-name="表格66.A3" office:value-type="string">
            <text:p text:style-name="P25" loext:marker-style-name="T112"><text:span text:style-name="T144">⑧ </text:span><text:span text:style-name="T113">收到網頁</text:span></text:p>
          </table:table-cell>
          <table:table-cell table:style-name="表格66.A3" office:value-type="string">
            <text:p text:style-name="P25" loext:marker-style-name="T112"><text:span text:style-name="T113">瀏覽器顯示頁面</text:span><text:span text:style-name="T112"/></text:p>
          </table:table-cell>
          <table:table-cell table:style-name="表格66.A3" office:value-type="string">
            <text:p text:style-name="P25" loext:marker-style-name="T112"><text:span text:style-name="T144">—</text:span><text:span text:style-name="T112"/></text:p>
          </table:table-cell>
          <table:table-cell table:style-name="表格66.A3" office:value-type="string">
            <text:p text:style-name="P25" loext:marker-style-name="T112"><text:span text:style-name="T113">一次完整通信結束</text:span><text:span text:style-name="T112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8"><text:span text:style-name="T151">💣 <text:s/></text:span><text:span text:style-name="T173">三個最容易搞錯的地方（考試地雷）</text:span></text:p>
            <text:p text:style-name="P9"><text:span text:style-name="T188">✗ </text:span><text:span text:style-name="T184">以為 </text:span><text:span text:style-name="T188">ARP </text:span><text:span text:style-name="T184">是找 </text:span><text:span text:style-name="T188">Google </text:span><text:span text:style-name="T184">的 </text:span><text:span text:style-name="T188">MAC</text:span><text:span text:style-name="T183">　→　</text:span><text:span text:style-name="T486">✓ </text:span><text:span text:style-name="T488">ARP </text:span><text:span text:style-name="T486">找的是「路由器」的 </text:span><text:span text:style-name="T488">MAC</text:span><text:span text:style-name="T486">！</text:span><text:span text:style-name="T95">因為 </text:span><text:span text:style-name="T129">ARP </text:span><text:span text:style-name="T95">只能在同一個 </text:span><text:span text:style-name="T129">LAN </text:span><text:span text:style-name="T95">內使用。</text:span></text:p>
            <text:p text:style-name="P10"><text:span text:style-name="T188">✗ </text:span><text:span text:style-name="T184">以為封包直接送到 </text:span><text:span text:style-name="T188">Google</text:span><text:span text:style-name="T183">　→　</text:span><text:span text:style-name="T486">✓ 封包先送給路由器，路由器再轉到 </text:span><text:span text:style-name="T488">Internet</text:span><text:span text:style-name="T95">。</text:span></text:p>
            <text:p text:style-name="P10"><text:span text:style-name="T188">✗ </text:span><text:span text:style-name="T184">以為 </text:span><text:span text:style-name="T188">IP </text:span><text:span text:style-name="T184">在傳輸過程中一直不變</text:span><text:span text:style-name="T183">　→　</text:span><text:span text:style-name="T486">✓ </text:span><text:span text:style-name="T488">NAT </text:span><text:span text:style-name="T486">會在去程改掉來源 </text:span><text:span text:style-name="T488">IP</text:span><text:span text:style-name="T486">，回程再改回去</text:span><text:span text:style-name="T95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8"><text:span text:style-name="T151">📝 <text:s/></text:span><text:span text:style-name="T192">考試標準答案（直接背）</text:span></text:p>
            <text:p text:style-name="P9" loext:marker-style-name="T96"><text:span text:style-name="T101">使用者輸入網址後</text:span><text:span text:style-name="T95">，</text:span><text:span text:style-name="T356">先透過 </text:span><text:span text:style-name="T362">DNS </text:span><text:span text:style-name="T356">將網域名稱解析為 </text:span><text:span text:style-name="T362">IP</text:span><text:span text:style-name="T95">；</text:span><text:span text:style-name="T243">接著主機利用 </text:span><text:span text:style-name="T254">ARP </text:span><text:span text:style-name="T243">取得路由器（預設閘道）的 </text:span><text:span text:style-name="T254">MAC</text:span><text:span text:style-name="T95">，</text:span><text:span text:style-name="T243">將封包傳送至路由器</text:span><text:span text:style-name="T95">；</text:span><text:span text:style-name="T427">路由器透過 </text:span><text:span text:style-name="T422">NAT </text:span><text:span text:style-name="T427">將私有 </text:span><text:span text:style-name="T422">IP </text:span><text:span text:style-name="T427">轉換為公網 </text:span><text:span text:style-name="T422">IP </text:span><text:span text:style-name="T427">後送往 </text:span><text:span text:style-name="T422">Internet</text:span><text:span text:style-name="T95">；</text:span><text:span text:style-name="T213">目的主機回應後，路由器再透過 </text:span><text:span text:style-name="T214">NAT </text:span><text:span text:style-name="T213">將封包轉回原內部主機</text:span><text:span text:style-name="T95">。</text:span></text:p>
          </table:table-cell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五、</text:span><text:span text:style-name="T27">ARP vs NAT </text:span><text:span text:style-name="T28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6"/>
            </table:table-cell>
            <table:table-cell table:style-name="表格67.A1" office:value-type="string">
              <text:p text:style-name="P6" loext:marker-style-name="T66"><text:span text:style-name="T75">ARP</text:span><text:span text:style-name="T66"/></text:p>
            </table:table-cell>
            <table:table-cell table:style-name="表格67.A1" office:value-type="string">
              <text:p text:style-name="P6" loext:marker-style-name="T66"><text:span text:style-name="T75">NAT</text:span><text:span text:style-name="T66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5" loext:marker-style-name="T80"><text:span text:style-name="T79">目的</text:span><text:span text:style-name="T80"/></text:p>
          </table:table-cell>
          <table:table-cell table:style-name="表格67.A2" office:value-type="string">
            <text:p text:style-name="P25" loext:marker-style-name="T310"><text:span text:style-name="T309">用 </text:span><text:span text:style-name="T301">IP </text:span><text:span text:style-name="T309">找 </text:span><text:span text:style-name="T301">MAC</text:span></text:p>
          </table:table-cell>
          <table:table-cell table:style-name="表格67.A2" office:value-type="string">
            <text:p text:style-name="P25" loext:marker-style-name="T511"><text:span text:style-name="T510">私有 </text:span><text:span text:style-name="T512">IP </text:span><text:span text:style-name="T510">轉成公網 </text:span><text:span text:style-name="T512">IP</text:span></text:p>
          </table:table-cell>
        </table:table-row>
        <table:table-row table:style-name="表格67.1">
          <table:table-cell table:style-name="表格67.A3" office:value-type="string">
            <text:p text:style-name="P25" loext:marker-style-name="T80"><text:span text:style-name="T79">使用範圍</text:span><text:span text:style-name="T80"/></text:p>
          </table:table-cell>
          <table:table-cell table:style-name="表格67.A3" office:value-type="string">
            <text:p text:style-name="P25" loext:marker-style-name="T87"><text:span text:style-name="T86">區域網路（</text:span><text:span text:style-name="T123">LAN</text:span><text:span text:style-name="T86">）內</text:span></text:p>
          </table:table-cell>
          <table:table-cell table:style-name="表格67.A3" office:value-type="string">
            <text:p text:style-name="P25" loext:marker-style-name="T83"><text:span text:style-name="T82">內網與 </text:span><text:span text:style-name="T125">Internet </text:span><text:span text:style-name="T82">之間</text:span></text:p>
          </table:table-cell>
        </table:table-row>
        <table:table-row table:style-name="表格67.1">
          <table:table-cell table:style-name="表格67.A2" office:value-type="string">
            <text:p text:style-name="P25" loext:marker-style-name="T80"><text:span text:style-name="T79">運作層級</text:span><text:span text:style-name="T80"/></text:p>
          </table:table-cell>
          <table:table-cell table:style-name="表格67.A2" office:value-type="string">
            <text:p text:style-name="P25" loext:marker-style-name="T369"><text:span text:style-name="T364">L2 / L3 </text:span><text:span text:style-name="T368">交界</text:span></text:p>
          </table:table-cell>
          <table:table-cell table:style-name="表格67.A2" office:value-type="string">
            <text:p text:style-name="P25" loext:marker-style-name="T371"><text:span text:style-name="T365">L3</text:span><text:span text:style-name="T370">（網路層）</text:span></text:p>
          </table:table-cell>
        </table:table-row>
        <table:table-row table:style-name="表格67.1">
          <table:table-cell table:style-name="表格67.A3" office:value-type="string">
            <text:p text:style-name="P25" loext:marker-style-name="T80"><text:span text:style-name="T79">誰執行</text:span><text:span text:style-name="T80"/></text:p>
          </table:table-cell>
          <table:table-cell table:style-name="表格67.A3" office:value-type="string">
            <text:p text:style-name="P25" loext:marker-style-name="T80"><text:span text:style-name="T79">端點裝置（電腦）</text:span><text:span text:style-name="T80"/></text:p>
          </table:table-cell>
          <table:table-cell table:style-name="表格67.A3" office:value-type="string">
            <text:p text:style-name="P25" loext:marker-style-name="T80"><text:span text:style-name="T79">路由器</text:span><text:span text:style-name="T80"/></text:p>
          </table:table-cell>
        </table:table-row>
        <table:table-row table:style-name="表格67.1">
          <table:table-cell table:style-name="表格67.A2" office:value-type="string">
            <text:p text:style-name="P25" loext:marker-style-name="T80"><text:span text:style-name="T79">主要用途</text:span><text:span text:style-name="T80"/></text:p>
          </table:table-cell>
          <table:table-cell table:style-name="表格67.A2" office:value-type="string">
            <text:p text:style-name="P25" loext:marker-style-name="T80"><text:span text:style-name="T79">在區網內傳送封包</text:span><text:span text:style-name="T80"/></text:p>
          </table:table-cell>
          <table:table-cell table:style-name="表格67.A2" office:value-type="string">
            <text:p text:style-name="P25" loext:marker-style-name="T80"><text:span text:style-name="T79">讓內部主機能夠上網</text:span><text:span text:style-name="T80"/></text:p>
          </table:table-cell>
        </table:table-row>
      </table:table>
      <text:h text:style-name="P13" text:outline-level="1" loext:marker-style-name="T68"><text:span text:style-name="T67">第 五 篇　</text:span><text:span text:style-name="T68">TCP </text:span><text:span text:style-name="T67">傳輸控制深入：握手 </text:span><text:span text:style-name="T68">· SYN Flood · </text:span><text:span text:style-name="T67">視窗 </text:span><text:span text:style-name="T68">· </text:span><text:span text:style-name="T67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8"><text:span text:style-name="T151">🚦 <text:s/></text:span><text:span text:style-name="T48">本篇重點</text:span></text:p>
            <text:p text:style-name="P9" loext:marker-style-name="T96"><text:span text:style-name="T95">網路的本質是把資料從 </text:span><text:span text:style-name="T129">A </text:span><text:span text:style-name="T95">電腦送到 </text:span><text:span text:style-name="T129">B </text:span><text:span text:style-name="T95">電腦，但中間有四個麻煩，</text:span><text:span text:style-name="T129">TCP </text:span><text:span text:style-name="T95">各自有對策。</text:span></text:p>
          </table:table-cell>
        </table:table-row>
      </table:table>
      <text:h text:style-name="P3" text:outline-level="2" loext:marker-style-name="T27"><text:span text:style-name="T28">一、網路的四個麻煩，</text:span><text:span text:style-name="T27">TCP </text:span><text:span text:style-name="T28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6" loext:marker-style-name="T66"><text:span text:style-name="T65">問題</text:span><text:span text:style-name="T66"/></text:p>
            </table:table-cell>
            <table:table-cell table:style-name="表格69.A1" office:value-type="string">
              <text:p text:style-name="P6" loext:marker-style-name="T66"><text:span text:style-name="T65">說明</text:span><text:span text:style-name="T66"/></text:p>
            </table:table-cell>
            <table:table-cell table:style-name="表格69.A1" office:value-type="string">
              <text:p text:style-name="P6" loext:marker-style-name="T66"><text:span text:style-name="T75">TCP </text:span><text:span text:style-name="T65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5" loext:marker-style-name="T87"><text:span text:style-name="T86">資料可能丟失</text:span><text:span text:style-name="T87"/></text:p>
          </table:table-cell>
          <table:table-cell table:style-name="表格69.A2" office:value-type="string">
            <text:p text:style-name="P25" loext:marker-style-name="T80"><text:span text:style-name="T79">封包在網路中消失</text:span><text:span text:style-name="T80"/></text:p>
          </table:table-cell>
          <table:table-cell table:style-name="表格69.A2" office:value-type="string">
            <text:p text:style-name="P25" loext:marker-style-name="T80"><text:span text:style-name="T82">重傳</text:span><text:span text:style-name="T79">機制（</text:span><text:span text:style-name="T121">Retransmission</text:span><text:span text:style-name="T79">）</text:span></text:p>
          </table:table-cell>
        </table:table-row>
        <table:table-row table:style-name="表格69.1">
          <table:table-cell table:style-name="表格69.A3" office:value-type="string">
            <text:p text:style-name="P25" loext:marker-style-name="T87"><text:span text:style-name="T86">順序可能亂掉</text:span><text:span text:style-name="T87"/></text:p>
          </table:table-cell>
          <table:table-cell table:style-name="表格69.A3" office:value-type="string">
            <text:p text:style-name="P25" loext:marker-style-name="T80"><text:span text:style-name="T79">封包走不同路徑先後到達</text:span><text:span text:style-name="T80"/></text:p>
          </table:table-cell>
          <table:table-cell table:style-name="表格69.A3" office:value-type="string">
            <text:p text:style-name="P25" loext:marker-style-name="T80"><text:span text:style-name="T82">序號</text:span><text:span text:style-name="T79">機制（</text:span><text:span text:style-name="T121">Sequence Number</text:span><text:span text:style-name="T79">）</text:span></text:p>
          </table:table-cell>
        </table:table-row>
        <table:table-row table:style-name="表格69.1">
          <table:table-cell table:style-name="表格69.A2" office:value-type="string">
            <text:p text:style-name="P25" loext:marker-style-name="T87"><text:span text:style-name="T86">對方來不及收</text:span><text:span text:style-name="T87"/></text:p>
          </table:table-cell>
          <table:table-cell table:style-name="表格69.A2" office:value-type="string">
            <text:p text:style-name="P25" loext:marker-style-name="T80"><text:span text:style-name="T79">接收端 </text:span><text:span text:style-name="T121">buffer </text:span><text:span text:style-name="T79">可能爆掉</text:span></text:p>
          </table:table-cell>
          <table:table-cell table:style-name="表格69.A2" office:value-type="string">
            <text:p text:style-name="P25" loext:marker-style-name="T80"><text:span text:style-name="T82">流量</text:span><text:span text:style-name="T79">控制（</text:span><text:span text:style-name="T121">Flow Control / rwnd</text:span><text:span text:style-name="T79">）</text:span></text:p>
          </table:table-cell>
        </table:table-row>
        <table:table-row table:style-name="表格69.1">
          <table:table-cell table:style-name="表格69.A3" office:value-type="string">
            <text:p text:style-name="P25" loext:marker-style-name="T87"><text:span text:style-name="T86">網路可能塞車</text:span><text:span text:style-name="T87"/></text:p>
          </table:table-cell>
          <table:table-cell table:style-name="表格69.A3" office:value-type="string">
            <text:p text:style-name="P25" loext:marker-style-name="T80"><text:span text:style-name="T79">路由器排隊太長</text:span><text:span text:style-name="T80"/></text:p>
          </table:table-cell>
          <table:table-cell table:style-name="表格69.A3" office:value-type="string">
            <text:p text:style-name="P25" loext:marker-style-name="T80"><text:span text:style-name="T82">擁塞</text:span><text:span text:style-name="T79">控制（</text:span><text:span text:style-name="T121">Congestion Control / cwnd</text:span><text:span text:style-name="T79">）</text:span></text:p>
          </table:table-cell>
        </table:table-row>
      </table:table>
      <text:h text:style-name="P3" text:outline-level="2" loext:marker-style-name="T27"><text:span text:style-name="T28">二、</text:span><text:span text:style-name="T27">TCP vs UDP</text:span><text:span text:style-name="T28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6" loext:marker-style-name="T66"><text:span text:style-name="T65">特性</text:span><text:span text:style-name="T66"/></text:p>
            </table:table-cell>
            <table:table-cell table:style-name="表格70.A1" office:value-type="string">
              <text:p text:style-name="P6" loext:marker-style-name="T66"><text:span text:style-name="T75">TCP</text:span><text:span text:style-name="T65">（可靠模式）</text:span></text:p>
            </table:table-cell>
            <table:table-cell table:style-name="表格70.A1" office:value-type="string">
              <text:p text:style-name="P6" loext:marker-style-name="T66"><text:span text:style-name="T75">UDP</text:span><text:span text:style-name="T65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5" loext:marker-style-name="T80"><text:span text:style-name="T79">連線方式</text:span><text:span text:style-name="T80"/></text:p>
          </table:table-cell>
          <table:table-cell table:style-name="表格70.A2" office:value-type="string">
            <text:p text:style-name="P25" loext:marker-style-name="T308"><text:span text:style-name="T307">需要先建立連線</text:span><text:span text:style-name="T308"/></text:p>
          </table:table-cell>
          <table:table-cell table:style-name="表格70.A2" office:value-type="string">
            <text:p text:style-name="P25" loext:marker-style-name="T228"><text:span text:style-name="T227">無連線，直接送</text:span><text:span text:style-name="T228"/></text:p>
          </table:table-cell>
        </table:table-row>
        <table:table-row table:style-name="表格70.1">
          <table:table-cell table:style-name="表格70.A3" office:value-type="string">
            <text:p text:style-name="P25" loext:marker-style-name="T80"><text:span text:style-name="T79">可靠性</text:span><text:span text:style-name="T80"/></text:p>
          </table:table-cell>
          <table:table-cell table:style-name="表格70.A3" office:value-type="string">
            <text:p text:style-name="P25" loext:marker-style-name="T80"><text:span text:style-name="T79">保證送達（會重傳）</text:span><text:span text:style-name="T80"/></text:p>
          </table:table-cell>
          <table:table-cell table:style-name="表格70.A3" office:value-type="string">
            <text:p text:style-name="P25" loext:marker-style-name="T80"><text:span text:style-name="T79">不保證送達</text:span><text:span text:style-name="T80"/></text:p>
          </table:table-cell>
        </table:table-row>
        <table:table-row table:style-name="表格70.1">
          <table:table-cell table:style-name="表格70.A2" office:value-type="string">
            <text:p text:style-name="P25" loext:marker-style-name="T80"><text:span text:style-name="T79">順序</text:span><text:span text:style-name="T80"/></text:p>
          </table:table-cell>
          <table:table-cell table:style-name="表格70.A2" office:value-type="string">
            <text:p text:style-name="P25" loext:marker-style-name="T80"><text:span text:style-name="T79">保證順序正確</text:span><text:span text:style-name="T80"/></text:p>
          </table:table-cell>
          <table:table-cell table:style-name="表格70.A2" office:value-type="string">
            <text:p text:style-name="P25" loext:marker-style-name="T80"><text:span text:style-name="T79">不保證順序</text:span><text:span text:style-name="T80"/></text:p>
          </table:table-cell>
        </table:table-row>
        <table:table-row table:style-name="表格70.1">
          <table:table-cell table:style-name="表格70.A3" office:value-type="string">
            <text:p text:style-name="P25" loext:marker-style-name="T80"><text:span text:style-name="T79">速度</text:span><text:span text:style-name="T80"/></text:p>
          </table:table-cell>
          <table:table-cell table:style-name="表格70.A3" office:value-type="string">
            <text:p text:style-name="P25" loext:marker-style-name="T80"><text:span text:style-name="T79">較慢（有控制機制）</text:span><text:span text:style-name="T80"/></text:p>
          </table:table-cell>
          <table:table-cell table:style-name="表格70.A3" office:value-type="string">
            <text:p text:style-name="P25" loext:marker-style-name="T80"><text:span text:style-name="T79">較快（無額外開銷）</text:span><text:span text:style-name="T80"/></text:p>
          </table:table-cell>
        </table:table-row>
        <table:table-row table:style-name="表格70.1">
          <table:table-cell table:style-name="表格70.A2" office:value-type="string">
            <text:p text:style-name="P25" loext:marker-style-name="T80"><text:span text:style-name="T79">適合場景</text:span><text:span text:style-name="T80"/></text:p>
          </table:table-cell>
          <table:table-cell table:style-name="表格70.A2" office:value-type="string">
            <text:p text:style-name="P25" loext:marker-style-name="T83"><text:span text:style-name="T82">網頁、檔案傳輸、</text:span><text:span text:style-name="T125">Email</text:span></text:p>
          </table:table-cell>
          <table:table-cell table:style-name="表格70.A2" office:value-type="string">
            <text:p text:style-name="P25" loext:marker-style-name="T80"><text:span text:style-name="T82">直播、遊戲</text:span><text:span text:style-name="T79">、</text:span><text:span text:style-name="T121">DNS </text:span><text:span text:style-name="T79">查詢</text:span></text:p>
          </table:table-cell>
        </table:table-row>
        <table:table-row table:style-name="表格70.1">
          <table:table-cell table:style-name="表格70.A3" office:value-type="string">
            <text:p text:style-name="P25" loext:marker-style-name="T80"><text:span text:style-name="T79">比喻</text:span><text:span text:style-name="T80"/></text:p>
          </table:table-cell>
          <table:table-cell table:style-name="表格70.A3" office:value-type="string">
            <text:p text:style-name="P25" loext:marker-style-name="T87"><text:span text:style-name="T86">專業物流（簽收確認）</text:span><text:span text:style-name="T87"/></text:p>
          </table:table-cell>
          <table:table-cell table:style-name="表格70.A3" office:value-type="string">
            <text:p text:style-name="P25" loext:marker-style-name="T87"><text:span text:style-name="T86">亂丟紙飛機</text:span><text:span text:style-name="T87"/></text:p>
          </table:table-cell>
        </table:table-row>
      </table:table>
      <text:h text:style-name="P3" text:outline-level="2" loext:marker-style-name="T27"><text:span text:style-name="T28">三、建立連線：三次握手（</text:span><text:span text:style-name="T27">Three-way Handshake</text:span><text:span text:style-name="T28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8"><text:span text:style-name="T151">🤝 <text:s/></text:span><text:span text:style-name="T48">握手流程</text:span></text:p>
            <text:p text:style-name="P9"><text:span text:style-name="T61">① Client → Server</text:span><text:span text:style-name="T52">：</text:span><text:span text:style-name="T60">SYN</text:span><text:span text:style-name="T52">　</text:span><text:span text:style-name="T95">「我可以傳資料給你嗎？我準備好了。」（</text:span><text:span text:style-name="T129">Synchronize </text:span><text:span text:style-name="T95">同步請求）</text:span></text:p>
            <text:p text:style-name="P10"><text:span text:style-name="T61">② Server → Client</text:span><text:span text:style-name="T52">：</text:span><text:span text:style-name="T60">SYN + ACK</text:span><text:span text:style-name="T52">　</text:span><text:span text:style-name="T95">「可以！我收到你的請求了，我也準備好了。」（確認＋同步）</text:span></text:p>
            <text:p text:style-name="P10"><text:span text:style-name="T61">③ Client → Server</text:span><text:span text:style-name="T52">：</text:span><text:span text:style-name="T60">ACK</text:span><text:span text:style-name="T52">　</text:span><text:span text:style-name="T95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8"><text:span text:style-name="T151">🎯 <text:s/></text:span><text:span text:style-name="T201">三次握手真正目的（考試必考）</text:span></text:p>
            <text:p text:style-name="P9" loext:marker-style-name="T96"><text:span text:style-name="T95">確認雙向都能傳資料（</text:span><text:span text:style-name="T129">Client → Server </text:span><text:span text:style-name="T95">和 </text:span><text:span text:style-name="T129">Server → Client </text:span><text:span text:style-name="T95">各自驗證）。</text:span></text:p>
            <text:p text:style-name="P10" loext:marker-style-name="T96"><text:span text:style-name="T513">避免「</text:span><text:span text:style-name="T428">舊封包誤觸發新連線</text:span><text:span text:style-name="T513">」</text:span><text:span text:style-name="T95">：若少一次確認，</text:span><text:span text:style-name="T242">延遲的舊 </text:span><text:span text:style-name="T253">SYN </text:span><text:span text:style-name="T242">封包可能讓 </text:span><text:span text:style-name="T253">Server </text:span><text:span text:style-name="T242">誤以為要建立新連線</text:span><text:span text:style-name="T95">。</text:span></text:p>
          </table:table-cell>
        </table:table-row>
      </table:table>
      <text:h text:style-name="P3" text:outline-level="2" loext:marker-style-name="T27"><text:span text:style-name="T28">四、攻擊：</text:span><text:span text:style-name="T27">SYN Flood</text:span></text:h>
      <text:p text:style-name="P31" loext:marker-style-name="T96"><text:span text:style-name="T95">攻擊原理：攻擊者大量發送 </text:span><text:span text:style-name="T129">SYN </text:span><text:span text:style-name="T95">封包，但</text:span><text:span text:style-name="T283">故意不完成第三次握手（</text:span><text:span text:style-name="T237">不回 </text:span><text:span text:style-name="T247">ACK</text:span><text:span text:style-name="T283">）</text:span><text:span text:style-name="T95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22" loext:marker-style-name="T66"><text:span text:style-name="T65">步驟</text:span><text:span text:style-name="T66"/></text:p>
            </table:table-cell>
            <table:table-cell table:style-name="表格72.A1" office:value-type="string">
              <text:p text:style-name="P22" loext:marker-style-name="T66"><text:span text:style-name="T65">發生什麼</text:span><text:span text:style-name="T66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5" loext:marker-style-name="T80"><text:span text:style-name="T121">1</text:span><text:span text:style-name="T80"/></text:p>
          </table:table-cell>
          <table:table-cell table:style-name="表格72.A2" office:value-type="string">
            <text:p text:style-name="P25" loext:marker-style-name="T80"><text:span text:style-name="T79">攻擊者</text:span><text:span text:style-name="T86">送出大量 </text:span><text:span text:style-name="T123">SYN</text:span><text:span text:style-name="T79">，每個都</text:span><text:span text:style-name="T82">假冒不同來源 </text:span><text:span text:style-name="T125">IP</text:span></text:p>
          </table:table-cell>
        </table:table-row>
        <table:table-row table:style-name="表格72.1">
          <table:table-cell table:style-name="表格72.A3" office:value-type="string">
            <text:p text:style-name="P25" loext:marker-style-name="T80"><text:span text:style-name="T121">2</text:span><text:span text:style-name="T80"/></text:p>
          </table:table-cell>
          <table:table-cell table:style-name="表格72.A3" office:value-type="string">
            <text:p text:style-name="P25" loext:marker-style-name="T80"><text:span text:style-name="T480">Server </text:span><text:span text:style-name="T471">建立「半連線（</text:span><text:span text:style-name="T480">Half-open Connection</text:span><text:span text:style-name="T471">）」</text:span><text:span text:style-name="T79">，</text:span><text:span text:style-name="T384">每個都佔記憶體等待 </text:span><text:span text:style-name="T402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5" loext:marker-style-name="T80"><text:span text:style-name="T121">3</text:span><text:span text:style-name="T80"/></text:p>
          </table:table-cell>
          <table:table-cell table:style-name="表格72.A2" office:value-type="string">
            <text:p text:style-name="P25" loext:marker-style-name="T80"><text:span text:style-name="T498">攻擊者永遠不回 </text:span><text:span text:style-name="T501">ACK</text:span><text:span text:style-name="T79">，</text:span><text:span text:style-name="T121">Server </text:span><text:span text:style-name="T79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5" loext:marker-style-name="T80"><text:span text:style-name="T121">4</text:span><text:span text:style-name="T80"/></text:p>
          </table:table-cell>
          <table:table-cell table:style-name="表格72.A3" office:value-type="string">
            <text:p text:style-name="P25" loext:marker-style-name="T80"><text:span text:style-name="T86">正常用戶連線失敗</text:span><text:span text:style-name="T79">，</text:span><text:span text:style-name="T121">Server </text:span><text:span text:style-name="T79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8"><text:span text:style-name="T151">⚠️ <text:s/></text:span><text:span text:style-name="T173">本質</text:span></text:p>
            <text:p text:style-name="P9" loext:marker-style-name="T96"><text:span text:style-name="T95">這是一種 </text:span><text:span text:style-name="T135">DoS</text:span><text:span text:style-name="T101">（拒絕服務）攻擊</text:span><text:span text:style-name="T95">，利用 </text:span><text:span text:style-name="T129">TCP </text:span><text:span text:style-name="T95">三次握手機制的不對稱性。</text:span></text:p>
          </table:table-cell>
          <table:covered-table-cell/>
        </table:table-row>
      </table:table>
      <text:h text:style-name="P3" text:outline-level="2" loext:marker-style-name="T27"><text:span text:style-name="T28">五、傳送速度的兩個限制：</text:span><text:span text:style-name="T399">rwnd</text:span><text:span text:style-name="T27"> </text:span><text:span text:style-name="T28">與 </text:span><text:span text:style-name="T399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22" loext:marker-style-name="T66"><text:span text:style-name="T75">rwnd</text:span><text:span text:style-name="T65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22" loext:marker-style-name="T66"><text:span text:style-name="T75">cwnd</text:span><text:span text:style-name="T65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5" loext:marker-style-name="T80"><text:span text:style-name="T79">接收端的限制。</text:span><text:span text:style-name="T472">對方 </text:span><text:span text:style-name="T481">buffer</text:span><text:span text:style-name="T472">（暫存區）還剩多少空間</text:span><text:span text:style-name="T79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5" loext:marker-style-name="T80"><text:span text:style-name="T79">網路的限制。發送端根據網路狀況自行估計，</text:span><text:span text:style-name="T307">目前網路最多能承受多少資料量</text:span><text:span text:style-name="T79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9"><text:span text:style-name="T206">實際傳送量 ＝ </text:span><text:span text:style-name="T210">min(rwnd, cwnd)</text:span><text:span text:style-name="T202">　</text:span><text:span text:style-name="T100">取兩者最小值</text:span><text:span text:style-name="T95">。</text:span><text:span text:style-name="T106">對方吃不下就看 </text:span><text:span text:style-name="T140">rwnd</text:span><text:span text:style-name="T106">；網路塞就看 </text:span><text:span text:style-name="T140">cwnd</text:span><text:span text:style-name="T95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22" loext:marker-style-name="T66"><text:span text:style-name="T65">情境</text:span><text:span text:style-name="T66"/></text:p>
          </table:table-cell>
          <table:table-cell table:style-name="表格73.A1" office:value-type="string">
            <text:p text:style-name="P22" loext:marker-style-name="T66"><text:span text:style-name="T75">cwnd</text:span><text:span text:style-name="T66"/></text:p>
          </table:table-cell>
          <table:table-cell table:style-name="表格73.A1" table:number-columns-spanned="2" office:value-type="string">
            <text:p text:style-name="P22" loext:marker-style-name="T66"><text:span text:style-name="T75">rwnd</text:span><text:span text:style-name="T66"/></text:p>
          </table:table-cell>
          <table:covered-table-cell/>
          <table:table-cell table:style-name="表格73.A1" office:value-type="string">
            <text:p text:style-name="P22" loext:marker-style-name="T66"><text:span text:style-name="T65">實際傳送量</text:span><text:span text:style-name="T66"/></text:p>
          </table:table-cell>
          <table:table-cell table:style-name="表格73.A1" office:value-type="string">
            <text:p text:style-name="P22" loext:marker-style-name="T66"><text:span text:style-name="T65">瓶頸原因</text:span><text:span text:style-name="T66"/></text:p>
          </table:table-cell>
        </table:table-row>
        <table:table-row table:style-name="表格73.1">
          <table:table-cell table:style-name="表格73.A2" office:value-type="string">
            <text:p text:style-name="P25" loext:marker-style-name="T80"><text:span text:style-name="T79">對方 </text:span><text:span text:style-name="T121">buffer </text:span><text:span text:style-name="T79">快滿了</text:span></text:p>
          </table:table-cell>
          <table:table-cell table:style-name="表格73.A2" office:value-type="string">
            <text:p text:style-name="P25" loext:marker-style-name="T80"><text:span text:style-name="T121">10</text:span><text:span text:style-name="T80"/></text:p>
          </table:table-cell>
          <table:table-cell table:style-name="表格73.A2" table:number-columns-spanned="2" office:value-type="string">
            <text:p text:style-name="P25" loext:marker-style-name="T80"><text:span text:style-name="T121">3</text:span><text:span text:style-name="T80"/></text:p>
          </table:table-cell>
          <table:covered-table-cell/>
          <table:table-cell table:style-name="表格73.A2" office:value-type="string">
            <text:p text:style-name="P25" loext:marker-style-name="T80"><text:span text:style-name="T121">3</text:span><text:span text:style-name="T80"/></text:p>
          </table:table-cell>
          <table:table-cell table:style-name="表格73.A2" office:value-type="string">
            <text:p text:style-name="P25" loext:marker-style-name="T80"><text:span text:style-name="T79">接收端限制（</text:span><text:span text:style-name="T121">rwnd</text:span><text:span text:style-name="T79">）</text:span></text:p>
          </table:table-cell>
        </table:table-row>
        <table:table-row table:style-name="表格73.1">
          <table:table-cell table:style-name="表格73.A6" office:value-type="string">
            <text:p text:style-name="P25" loext:marker-style-name="T80"><text:span text:style-name="T79">網路很塞</text:span><text:span text:style-name="T80"/></text:p>
          </table:table-cell>
          <table:table-cell table:style-name="表格73.A6" office:value-type="string">
            <text:p text:style-name="P25" loext:marker-style-name="T80"><text:span text:style-name="T121">2</text:span><text:span text:style-name="T80"/></text:p>
          </table:table-cell>
          <table:table-cell table:style-name="表格73.A6" table:number-columns-spanned="2" office:value-type="string">
            <text:p text:style-name="P25" loext:marker-style-name="T80"><text:span text:style-name="T121">10</text:span><text:span text:style-name="T80"/></text:p>
          </table:table-cell>
          <table:covered-table-cell/>
          <table:table-cell table:style-name="表格73.A6" office:value-type="string">
            <text:p text:style-name="P25" loext:marker-style-name="T80"><text:span text:style-name="T121">2</text:span><text:span text:style-name="T80"/></text:p>
          </table:table-cell>
          <table:table-cell table:style-name="表格73.A6" office:value-type="string">
            <text:p text:style-name="P25" loext:marker-style-name="T80"><text:span text:style-name="T79">網路限制（</text:span><text:span text:style-name="T121">cwnd</text:span><text:span text:style-name="T79">）</text:span></text:p>
          </table:table-cell>
        </table:table-row>
        <table:table-row table:style-name="表格73.1">
          <table:table-cell table:style-name="表格73.A2" office:value-type="string">
            <text:p text:style-name="P25" loext:marker-style-name="T80"><text:span text:style-name="T79">兩者相近</text:span><text:span text:style-name="T80"/></text:p>
          </table:table-cell>
          <table:table-cell table:style-name="表格73.A2" office:value-type="string">
            <text:p text:style-name="P25" loext:marker-style-name="T80"><text:span text:style-name="T121">5</text:span><text:span text:style-name="T80"/></text:p>
          </table:table-cell>
          <table:table-cell table:style-name="表格73.A2" table:number-columns-spanned="2" office:value-type="string">
            <text:p text:style-name="P25" loext:marker-style-name="T80"><text:span text:style-name="T121">6</text:span><text:span text:style-name="T80"/></text:p>
          </table:table-cell>
          <table:covered-table-cell/>
          <table:table-cell table:style-name="表格73.A2" office:value-type="string">
            <text:p text:style-name="P25" loext:marker-style-name="T80"><text:span text:style-name="T121">5</text:span><text:span text:style-name="T80"/></text:p>
          </table:table-cell>
          <table:table-cell table:style-name="表格73.A2" office:value-type="string">
            <text:p text:style-name="P25" loext:marker-style-name="T80"><text:span text:style-name="T79">網路限制（</text:span><text:span text:style-name="T121">cwnd</text:span><text:span text:style-name="T79">）</text:span></text:p>
          </table:table-cell>
        </table:table-row>
      </table:table>
      <text:h text:style-name="P3" text:outline-level="2" loext:marker-style-name="T27"><text:span text:style-name="T28">六、滑動視窗（</text:span><text:span text:style-name="T27">Sliding Window</text:span><text:span text:style-name="T28">）</text:span></text:h>
      <text:p text:style-name="P31" loext:marker-style-name="T96"><text:span text:style-name="T97">最笨的方法：送 </text:span><text:span text:style-name="T130">1 </text:span><text:span text:style-name="T97">個封包 → 等 </text:span><text:span text:style-name="T130">ACK → </text:span><text:span text:style-name="T97">再送 </text:span><text:span text:style-name="T130">1 </text:span><text:span text:style-name="T97">個 → 等 </text:span><text:span text:style-name="T130">ACK</text:span><text:span text:style-name="T95">，</text:span><text:span text:style-name="T428">大部分時間在閒置，非常浪費</text:span><text:span text:style-name="T95">。</text:span><text:span text:style-name="T135">TCP </text:span><text:span text:style-name="T101">的改進</text:span><text:span text:style-name="T95">：</text:span><text:span text:style-name="T514">不用等 </text:span><text:span text:style-name="T518">ACK</text:span><text:span text:style-name="T514">，先連續送出多個封包讓封包都在網路上飛（</text:span><text:span text:style-name="T518">in-flight</text:span><text:span text:style-name="T514">），</text:span><text:span text:style-name="T518">ACK </text:span><text:span text:style-name="T514">再慢慢回來</text:span><text:span text:style-name="T95">，這就是 </text:span><text:span text:style-name="T129">pipeline</text:span><text:span text:style-name="T95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9"><text:span text:style-name="T189">✗ </text:span><text:span text:style-name="T183">常見錯誤：</text:span><text:span text:style-name="T95">視窗 </text:span><text:span text:style-name="T129">= cwnd</text:span><text:span text:style-name="T95">（擁塞視窗）。</text:span><text:span text:style-name="T193">✓ 正確：</text:span><text:span text:style-name="T242">視窗 </text:span><text:span text:style-name="T253">= min(cwnd, rwnd)</text:span><text:span text:style-name="T242">，</text:span><text:span text:style-name="T253">cwnd </text:span><text:span text:style-name="T24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6" loext:marker-style-name="T66"><text:span text:style-name="T65">時間點</text:span><text:span text:style-name="T66"/></text:p>
          </table:table-cell>
          <table:table-cell table:style-name="表格74.A2" office:value-type="string">
            <text:p text:style-name="P6" loext:marker-style-name="T66"><text:span text:style-name="T65">已確認</text:span><text:span text:style-name="T66"/></text:p>
          </table:table-cell>
          <table:table-cell table:style-name="表格74.A2" office:value-type="string">
            <text:p text:style-name="P6" loext:marker-style-name="T66"><text:span text:style-name="T65">視窗範圍（可送）</text:span><text:span text:style-name="T66"/></text:p>
          </table:table-cell>
          <table:table-cell table:style-name="表格74.A2" office:value-type="string">
            <text:p text:style-name="P6" loext:marker-style-name="T66"><text:span text:style-name="T65">等待中</text:span><text:span text:style-name="T66"/></text:p>
          </table:table-cell>
        </table:table-row>
        <table:table-row table:style-name="表格74.1">
          <table:table-cell table:style-name="表格74.A3" office:value-type="string">
            <text:p text:style-name="P25" loext:marker-style-name="T80"><text:span text:style-name="T79">初始狀態</text:span><text:span text:style-name="T80"/></text:p>
          </table:table-cell>
          <table:table-cell table:style-name="表格74.A3" office:value-type="string">
            <text:p text:style-name="P25" loext:marker-style-name="T80"><text:span text:style-name="T79">無</text:span><text:span text:style-name="T80"/></text:p>
          </table:table-cell>
          <table:table-cell table:style-name="表格74.A3" office:value-type="string">
            <text:p text:style-name="P25" loext:marker-style-name="T80"><text:span text:style-name="T79">封包 </text:span><text:span text:style-name="T121">1, 2, 3</text:span></text:p>
          </table:table-cell>
          <table:table-cell table:style-name="表格74.A3" office:value-type="string">
            <text:p text:style-name="P25" loext:marker-style-name="T80"><text:span text:style-name="T121">4, 5, 6 …</text:span><text:span text:style-name="T80"/></text:p>
          </table:table-cell>
        </table:table-row>
        <table:table-row table:style-name="表格74.1">
          <table:table-cell table:style-name="表格74.A4" office:value-type="string">
            <text:p text:style-name="P25" loext:marker-style-name="T88"><text:span text:style-name="T89">收到 </text:span><text:span text:style-name="T124">ACK 1</text:span></text:p>
          </table:table-cell>
          <table:table-cell table:style-name="表格74.A4" office:value-type="string">
            <text:p text:style-name="P25" loext:marker-style-name="T94"><text:span text:style-name="T93">封包 </text:span><text:span text:style-name="T128">1</text:span></text:p>
          </table:table-cell>
          <table:table-cell table:style-name="表格74.A4" office:value-type="string">
            <text:p text:style-name="P25" loext:marker-style-name="T80"><text:span text:style-name="T79">封包 </text:span><text:span text:style-name="T121">2, 3, 4</text:span></text:p>
          </table:table-cell>
          <table:table-cell table:style-name="表格74.A4" office:value-type="string">
            <text:p text:style-name="P25" loext:marker-style-name="T80"><text:span text:style-name="T121">5, 6 …</text:span><text:span text:style-name="T79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5" loext:marker-style-name="T88"><text:span text:style-name="T89">收到 </text:span><text:span text:style-name="T124">ACK 2</text:span></text:p>
          </table:table-cell>
          <table:table-cell table:style-name="表格74.A3" office:value-type="string">
            <text:p text:style-name="P25" loext:marker-style-name="T94"><text:span text:style-name="T93">封包 </text:span><text:span text:style-name="T128">1, 2</text:span></text:p>
          </table:table-cell>
          <table:table-cell table:style-name="表格74.A3" office:value-type="string">
            <text:p text:style-name="P25" loext:marker-style-name="T80"><text:span text:style-name="T79">封包 </text:span><text:span text:style-name="T121">3, 4, 5</text:span></text:p>
          </table:table-cell>
          <table:table-cell table:style-name="表格74.A3" office:value-type="string">
            <text:p text:style-name="P25" loext:marker-style-name="T80"><text:span text:style-name="T121">6, 7 …</text:span><text:span text:style-name="T79">（繼續往右滑）</text:span></text:p>
          </table:table-cell>
        </table:table-row>
      </table:table>
      <text:p text:style-name="P31" loext:marker-style-name="T11"><text:span text:style-name="T10">關鍵理解：視窗大小決定效率（越大越快），</text:span><text:span text:style-name="T504">ACK </text:span><text:span text:style-name="T502">的回傳決定視窗位置（往前滑）</text:span><text:span text:style-name="T10">，兩者合作讓傳輸保持流暢。</text:span></text:p>
      <text:h text:style-name="P3" text:outline-level="2" loext:marker-style-name="T27"><text:span text:style-name="T28">七、擁塞控制：怎麼調整速度</text:span><text:span text:style-name="T27"/></text:h>
      <text:h text:style-name="P2" text:outline-level="3"><text:span text:style-name="T153">▍</text:span><text:span text:style-name="T154"> </text:span><text:span text:style-name="T155">階段一：</text:span><text:span text:style-name="T154">Slow Start</text:span><text:span text:style-name="T155">（慢啟動）— 指數成長</text:span></text:h>
      <text:p text:style-name="P31" loext:marker-style-name="T96"><text:span text:style-name="T95">雖叫「慢」啟動，實際成長非常快。規則：</text:span><text:span text:style-name="T391">每收到一個 </text:span><text:span text:style-name="T407">ACK</text:span><text:span text:style-name="T391">，</text:span><text:span text:style-name="T407">cwnd </text:span><text:span text:style-name="T391">就 </text:span><text:span text:style-name="T407">+1</text:span><text:span text:style-name="T95">；</text:span><text:span text:style-name="T464">送出 </text:span><text:span text:style-name="T475">N </text:span><text:span text:style-name="T464">個封包 → 收回 </text:span><text:span text:style-name="T475">N </text:span><text:span text:style-name="T464">個 </text:span><text:span text:style-name="T475">ACK → cwnd </text:span><text:span text:style-name="T464">增加 </text:span><text:span text:style-name="T475">N</text:span><text:span text:style-name="T95">，所以每輪自然翻倍。</text:span><text:span text:style-name="T129">(</text:span><text:span text:style-name="T253">Slow Start = </text:span><text:span text:style-name="T242">每一輪變 </text:span><text:span text:style-name="T253">2 </text:span><text:span text:style-name="T242">倍，</text:span><text:span text:style-name="T253">Congestion Avoidance = </text:span><text:span text:style-name="T242">每一輪只加 </text:span><text:span text:style-name="T253">1</text:span><text:span text:style-name="T129">(</text:span><text:span text:style-name="T95">「</text:span><text:span text:style-name="T423">Slow Start</text:span><text:span text:style-name="T429">翻倍，壅塞避免加一</text:span><text:span text:style-name="T95">」</text:span><text:span text:style-name="T129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2" loext:marker-style-name="T66"><text:span text:style-name="T65">輪次（</text:span><text:span text:style-name="T75">RTT</text:span><text:span text:style-name="T65">）</text:span></text:p>
            </table:table-cell>
            <table:table-cell table:style-name="表格75.A1" office:value-type="string">
              <text:p text:style-name="P22" loext:marker-style-name="T66"><text:span text:style-name="T75">cwnd</text:span><text:span text:style-name="T66"/></text:p>
            </table:table-cell>
            <table:table-cell table:style-name="表格75.A1" office:value-type="string">
              <text:p text:style-name="P22" loext:marker-style-name="T66"><text:span text:style-name="T65">送出封包數</text:span><text:span text:style-name="T66"/></text:p>
            </table:table-cell>
            <table:table-cell table:style-name="表格75.A1" office:value-type="string">
              <text:p text:style-name="P22" loext:marker-style-name="T66"><text:span text:style-name="T65">收回 </text:span><text:span text:style-name="T75">ACK </text:span><text:span text:style-name="T65">數</text:span></text:p>
            </table:table-cell>
            <table:table-cell table:style-name="表格75.A1" office:value-type="string">
              <text:p text:style-name="P22" loext:marker-style-name="T66"><text:span text:style-name="T65">新 </text:span><text:span text:style-name="T75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5" loext:marker-style-name="T80"><text:span text:style-name="T79">第 </text:span><text:span text:style-name="T121">1 </text:span><text:span text:style-name="T79">輪</text:span></text:p>
          </table:table-cell>
          <table:table-cell table:style-name="表格75.A2" office:value-type="string">
            <text:p text:style-name="P25" loext:marker-style-name="T80"><text:span text:style-name="T121">1</text:span><text:span text:style-name="T80"/></text:p>
          </table:table-cell>
          <table:table-cell table:style-name="表格75.A2" office:value-type="string">
            <text:p text:style-name="P25" loext:marker-style-name="T80"><text:span text:style-name="T121">1</text:span><text:span text:style-name="T80"/></text:p>
          </table:table-cell>
          <table:table-cell table:style-name="表格75.A2" office:value-type="string">
            <text:p text:style-name="P25" loext:marker-style-name="T80"><text:span text:style-name="T121">1</text:span><text:span text:style-name="T80"/></text:p>
          </table:table-cell>
          <table:table-cell table:style-name="表格75.A2" office:value-type="string">
            <text:p text:style-name="P25" loext:marker-style-name="T80"><text:span text:style-name="T121">2</text:span><text:span text:style-name="T80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5" loext:marker-style-name="T80"><text:span text:style-name="T79">第 </text:span><text:span text:style-name="T121">2 </text:span><text:span text:style-name="T79">輪</text:span></text:p>
          </table:table-cell>
          <table:table-cell table:style-name="表格75.A3" office:value-type="string">
            <text:p text:style-name="P25" loext:marker-style-name="T80"><text:span text:style-name="T121">2</text:span><text:span text:style-name="T80"/></text:p>
          </table:table-cell>
          <table:table-cell table:style-name="表格75.A3" office:value-type="string">
            <text:p text:style-name="P25" loext:marker-style-name="T80"><text:span text:style-name="T121">2</text:span><text:span text:style-name="T80"/></text:p>
          </table:table-cell>
          <table:table-cell table:style-name="表格75.A3" office:value-type="string">
            <text:p text:style-name="P25" loext:marker-style-name="T80"><text:span text:style-name="T121">2</text:span><text:span text:style-name="T80"/></text:p>
          </table:table-cell>
          <table:table-cell table:style-name="表格75.A3" office:value-type="string">
            <text:p text:style-name="P25" loext:marker-style-name="T80"><text:span text:style-name="T121">4</text:span><text:span text:style-name="T80"/></text:p>
          </table:table-cell>
        </table:table-row>
        <table:table-row table:style-name="表格75.1">
          <table:table-cell table:style-name="表格75.A2" office:value-type="string">
            <text:p text:style-name="P25" loext:marker-style-name="T80"><text:span text:style-name="T79">第 </text:span><text:span text:style-name="T121">3 </text:span><text:span text:style-name="T79">輪</text:span></text:p>
          </table:table-cell>
          <table:table-cell table:style-name="表格75.A2" office:value-type="string">
            <text:p text:style-name="P25" loext:marker-style-name="T80"><text:span text:style-name="T121">4</text:span><text:span text:style-name="T80"/></text:p>
          </table:table-cell>
          <table:table-cell table:style-name="表格75.A2" office:value-type="string">
            <text:p text:style-name="P25" loext:marker-style-name="T80"><text:span text:style-name="T121">4</text:span><text:span text:style-name="T80"/></text:p>
          </table:table-cell>
          <table:table-cell table:style-name="表格75.A2" office:value-type="string">
            <text:p text:style-name="P25" loext:marker-style-name="T80"><text:span text:style-name="T121">4</text:span><text:span text:style-name="T80"/></text:p>
          </table:table-cell>
          <table:table-cell table:style-name="表格75.A2" office:value-type="string">
            <text:p text:style-name="P25" loext:marker-style-name="T80"><text:span text:style-name="T121">8</text:span><text:span text:style-name="T80"/></text:p>
          </table:table-cell>
        </table:table-row>
        <table:table-row table:style-name="表格75.1">
          <table:table-cell table:style-name="表格75.A3" office:value-type="string">
            <text:p text:style-name="P25" loext:marker-style-name="T80"><text:span text:style-name="T79">第 </text:span><text:span text:style-name="T121">4 </text:span><text:span text:style-name="T79">輪</text:span></text:p>
          </table:table-cell>
          <table:table-cell table:style-name="表格75.A3" office:value-type="string">
            <text:p text:style-name="P25" loext:marker-style-name="T80"><text:span text:style-name="T121">8</text:span><text:span text:style-name="T80"/></text:p>
          </table:table-cell>
          <table:table-cell table:style-name="表格75.A3" office:value-type="string">
            <text:p text:style-name="P25" loext:marker-style-name="T80"><text:span text:style-name="T121">8</text:span><text:span text:style-name="T80"/></text:p>
          </table:table-cell>
          <table:table-cell table:style-name="表格75.A3" office:value-type="string">
            <text:p text:style-name="P25" loext:marker-style-name="T80"><text:span text:style-name="T121">8</text:span><text:span text:style-name="T80"/></text:p>
          </table:table-cell>
          <table:table-cell table:style-name="表格75.A3" office:value-type="string">
            <text:p text:style-name="P25" loext:marker-style-name="T80"><text:span text:style-name="T121">16</text:span><text:span text:style-name="T80"/></text:p>
          </table:table-cell>
        </table:table-row>
      </table:table>
      <text:h text:style-name="P2" text:outline-level="3"><text:span text:style-name="T153">▍</text:span><text:span text:style-name="T154"> </text:span><text:span text:style-name="T155">階段二：</text:span><text:span text:style-name="T154">Congestion Avoidance</text:span><text:span text:style-name="T155">（擁塞避免）— 線性成長</text:span></text:h>
      <text:p text:style-name="P31" loext:marker-style-name="T96"><text:span text:style-name="T336">cwnd </text:span><text:span text:style-name="T324">成長到門檻值（</text:span><text:span text:style-name="T336">ssthresh</text:span><text:span text:style-name="T324">）後，改為線性成長</text:span><text:span text:style-name="T95">（</text:span><text:span text:style-name="T391">每個 </text:span><text:span text:style-name="T407">RTT </text:span><text:span text:style-name="T391">只 </text:span><text:span text:style-name="T407">+1</text:span><text:span text:style-name="T95">），</text:span><text:span text:style-name="T100">避免增長太快讓網路過載</text:span><text:span text:style-name="T95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6"/>
            </table:table-cell>
            <table:table-cell table:style-name="表格76.A1" office:value-type="string">
              <text:p text:style-name="P6" loext:marker-style-name="T66"><text:span text:style-name="T75">Slow Start</text:span><text:span text:style-name="T66"/></text:p>
            </table:table-cell>
            <table:table-cell table:style-name="表格76.A1" office:value-type="string">
              <text:p text:style-name="P6" loext:marker-style-name="T66"><text:span text:style-name="T75">Congestion Avoidance</text:span><text:span text:style-name="T66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5" loext:marker-style-name="T80"><text:span text:style-name="T79">觸發條件</text:span><text:span text:style-name="T80"/></text:p>
          </table:table-cell>
          <table:table-cell table:style-name="表格76.A2" office:value-type="string">
            <text:p text:style-name="P25" loext:marker-style-name="T88"><text:span text:style-name="T124">cwnd &lt; ssthresh</text:span><text:span text:style-name="T88"/></text:p>
          </table:table-cell>
          <table:table-cell table:style-name="表格76.A2" office:value-type="string">
            <text:p text:style-name="P25" loext:marker-style-name="T88"><text:span text:style-name="T124">cwnd ≥ ssthresh</text:span><text:span text:style-name="T88"/></text:p>
          </table:table-cell>
        </table:table-row>
        <table:table-row table:style-name="表格76.1">
          <table:table-cell table:style-name="表格76.A3" office:value-type="string">
            <text:p text:style-name="P25" loext:marker-style-name="T80"><text:span text:style-name="T79">成長方式</text:span><text:span text:style-name="T80"/></text:p>
          </table:table-cell>
          <table:table-cell table:style-name="表格76.A3" office:value-type="string">
            <text:p text:style-name="P25" loext:marker-style-name="T80"><text:span text:style-name="T473">指數成長</text:span><text:span text:style-name="T79">（</text:span><text:span text:style-name="T386">每個 </text:span><text:span text:style-name="T403">ACK +1</text:span><text:span text:style-name="T79">）</text:span></text:p>
          </table:table-cell>
          <table:table-cell table:style-name="表格76.A3" office:value-type="string">
            <text:p text:style-name="P25" loext:marker-style-name="T80"><text:span text:style-name="T498">線性成長</text:span><text:span text:style-name="T79">（</text:span><text:span text:style-name="T386">每個 </text:span><text:span text:style-name="T403">RTT +1</text:span><text:span text:style-name="T79">）</text:span><text:span text:style-name="T121">(</text:span><text:span text:style-name="T519">RTT </text:span><text:span text:style-name="T515">：</text:span><text:span text:style-name="T519">Round Trip Time</text:span><text:span text:style-name="T515">（往返時間）</text:span><text:span text:style-name="T519">= </text:span><text:span text:style-name="T515">封包出去 </text:span><text:span text:style-name="T519">+ ACK </text:span><text:span text:style-name="T515">回來的一個來回時間</text:span><text:span text:style-name="T121">)</text:span></text:p>
          </table:table-cell>
        </table:table-row>
        <table:table-row table:style-name="表格76.1">
          <table:table-cell table:style-name="表格76.A2" office:value-type="string">
            <text:p text:style-name="P25" loext:marker-style-name="T80"><text:span text:style-name="T79">特性</text:span><text:span text:style-name="T80"/></text:p>
          </table:table-cell>
          <table:table-cell table:style-name="表格76.A2" office:value-type="string">
            <text:p text:style-name="P25" loext:marker-style-name="T80"><text:span text:style-name="T79">快速試探網路上限</text:span><text:span text:style-name="T80"/></text:p>
          </table:table-cell>
          <table:table-cell table:style-name="表格76.A2" office:value-type="string">
            <text:p text:style-name="P25" loext:marker-style-name="T80"><text:span text:style-name="T79">保守維持穩定傳輸</text:span><text:span text:style-name="T80"/></text:p>
          </table:table-cell>
        </table:table-row>
      </table:table>
      <text:h text:style-name="P2" text:outline-level="3"><text:span text:style-name="T153">▍</text:span><text:span text:style-name="T154"> </text:span><text:span text:style-name="T155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6" loext:marker-style-name="T72"><text:span text:style-name="T71">丟包偵測方式</text:span><text:span text:style-name="T72"/></text:p>
            </table:table-cell>
            <table:table-cell table:style-name="表格77.A1" office:value-type="string">
              <text:p text:style-name="P6" loext:marker-style-name="T72"><text:span text:style-name="T71">說明</text:span><text:span text:style-name="T72"/></text:p>
            </table:table-cell>
            <table:table-cell table:style-name="表格77.A1" office:value-type="string">
              <text:p text:style-name="P6" loext:marker-style-name="T72"><text:span text:style-name="T77">ssthresh</text:span><text:span text:style-name="T72"/></text:p>
            </table:table-cell>
            <table:table-cell table:style-name="表格77.A1" office:value-type="string">
              <text:p text:style-name="P6" loext:marker-style-name="T72"><text:span text:style-name="T77">cwnd</text:span><text:span text:style-name="T72"/></text:p>
            </table:table-cell>
            <table:table-cell table:style-name="表格77.A1" office:value-type="string">
              <text:p text:style-name="P6" loext:marker-style-name="T72"><text:span text:style-name="T71">下一階段</text:span><text:span text:style-name="T72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5" loext:marker-style-name="T117"><text:span text:style-name="T147">Timeout</text:span><text:span text:style-name="T116">（逾時）</text:span></text:p>
          </table:table-cell>
          <table:table-cell table:style-name="表格77.A2" office:value-type="string">
            <text:p text:style-name="P25" loext:marker-style-name="T112"><text:span text:style-name="T114">等太久沒 </text:span><text:span text:style-name="T146">ACK</text:span><text:span text:style-name="T113">，</text:span><text:span text:style-name="T233">網路嚴重擁塞</text:span></text:p>
          </table:table-cell>
          <table:table-cell table:style-name="表格77.A2" office:value-type="string">
            <text:p text:style-name="P25" loext:marker-style-name="T112"><text:span text:style-name="T144">= </text:span><text:span text:style-name="T257">cwnd / 2</text:span></text:p>
          </table:table-cell>
          <table:table-cell table:style-name="表格77.A2" office:value-type="string">
            <text:p text:style-name="P25" loext:marker-style-name="T179"><text:span text:style-name="T178">重設為 </text:span><text:span text:style-name="T185">1</text:span></text:p>
          </table:table-cell>
          <table:table-cell table:style-name="表格77.A2" office:value-type="string">
            <text:p text:style-name="P25" loext:marker-style-name="T267"><text:span text:style-name="T266">重新進入 </text:span><text:span text:style-name="T272">Slow Start</text:span></text:p>
          </table:table-cell>
        </table:table-row>
        <table:table-row table:style-name="表格77.1">
          <table:table-cell table:style-name="表格77.A3" office:value-type="string">
            <text:p text:style-name="P25" loext:marker-style-name="T117"><text:span text:style-name="T147">3 </text:span><text:span text:style-name="T116">個重複 </text:span><text:span text:style-name="T147">ACK (Fast Retransmit)</text:span></text:p>
          </table:table-cell>
          <table:table-cell table:style-name="表格77.A3" office:value-type="string">
            <text:p text:style-name="P25" loext:marker-style-name="T112"><text:span text:style-name="T114">連續收 </text:span><text:span text:style-name="T146">3 </text:span><text:span text:style-name="T114">個同樣 </text:span><text:span text:style-name="T146">ACK</text:span><text:span text:style-name="T113">，</text:span><text:span text:style-name="T314">單一封包丟失</text:span></text:p>
          </table:table-cell>
          <table:table-cell table:style-name="表格77.A3" office:value-type="string">
            <text:p text:style-name="P25" loext:marker-style-name="T112"><text:span text:style-name="T144">= </text:span><text:span text:style-name="T257">cwnd / 2</text:span></text:p>
          </table:table-cell>
          <table:table-cell table:style-name="表格77.A3" office:value-type="string">
            <text:p text:style-name="P25" loext:marker-style-name="T31"><text:span text:style-name="T39">= ssthresh</text:span><text:span text:style-name="T32">（直接減半）</text:span></text:p>
          </table:table-cell>
          <table:table-cell table:style-name="表格77.A3" office:value-type="string">
            <text:p text:style-name="P25" loext:marker-style-name="T267"><text:span text:style-name="T266">進入 </text:span><text:span text:style-name="T272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8"><text:span text:style-name="T151">⚠️ <text:s/></text:span><text:span text:style-name="T173">重要區別</text:span></text:p>
            <text:p text:style-name="P9" loext:marker-style-name="T96"><text:span text:style-name="T507">Timeout </text:span><text:span text:style-name="T505">代表網路嚴重問題</text:span><text:span text:style-name="T95">，</text:span><text:span text:style-name="T477">cwnd </text:span><text:span text:style-name="T466">重設回 </text:span><text:span text:style-name="T477">1 </text:span><text:span text:style-name="T466">從頭來</text:span><text:span text:style-name="T95">；</text:span><text:span text:style-name="T521">3 </text:span><text:span text:style-name="T522">個重複 </text:span><text:span text:style-name="T521">ACK </text:span><text:span text:style-name="T522">只是單一封包遺失</text:span><text:span text:style-name="T95">，</text:span><text:span text:style-name="T477">cwnd </text:span><text:span text:style-name="T466">直接減半後繼續 </text:span><text:span text:style-name="T477">Congestion Avoidance</text:span><text:span text:style-name="T466">，不用從頭重來</text:span><text:span text:style-name="T95">。</text:span><text:span text:style-name="T129">(</text:span><text:span text:style-name="T255">Timeout → cwnd = 1</text:span><text:span text:style-name="T244">；</text:span><text:span text:style-name="T255">3Dup ACK → cwnd ÷ 2</text:span><text:span text:style-name="T129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" text:outline-level="3"><text:span text:style-name="T153">▍</text:span><text:span text:style-name="T154"> AIMD</text:span><text:span text:style-name="T155">（加法增長 </text:span><text:span text:style-name="T154">/ </text:span><text:span text:style-name="T155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22" loext:marker-style-name="T66"><text:span text:style-name="T75">AI</text:span><text:span text:style-name="T65">：加法增長 </text:span><text:span text:style-name="T75">Additive Increase</text:span></text:p>
            </table:table-cell>
            <table:table-cell table:style-name="表格78.A1" office:value-type="string">
              <text:p text:style-name="P22" loext:marker-style-name="T66"><text:span text:style-name="T75">MD</text:span><text:span text:style-name="T65">：乘法減少 </text:span><text:span text:style-name="T75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5" loext:marker-style-name="T80"><text:span text:style-name="T82">沒丟包 → 網路 </text:span><text:span text:style-name="T125">OK </text:span><text:span text:style-name="T121">→ CA </text:span><text:span text:style-name="T79">階段線性增加（</text:span><text:span text:style-name="T86">每 </text:span><text:span text:style-name="T123">RTT +1</text:span><text:span text:style-name="T79">），慢慢加速。</text:span></text:p>
          </table:table-cell>
          <table:table-cell table:style-name="表格78.A2" office:value-type="string">
            <text:p text:style-name="P25" loext:marker-style-name="T80"><text:span text:style-name="T82">偵測到丟包 → 網路塞了 </text:span><text:span text:style-name="T79">→ </text:span><text:span text:style-name="T123">cwnd ×0.5</text:span><text:span text:style-name="T86">（減半）</text:span><text:span text:style-name="T79">，快速降速避免繼續惡化。</text:span></text:p>
          </table:table-cell>
        </table:table-row>
      </table:table>
      <text:p text:style-name="P31" loext:marker-style-name="T11"><text:span text:style-name="T410">AIMD </text:span><text:span text:style-name="T394">本質：用 </text:span><text:span text:style-name="T410">ACK </text:span><text:span text:style-name="T394">當回饋，不斷探測網路的「最高速度」</text:span><text:span text:style-name="T10">——</text:span><text:span text:style-name="T268">慢慢加速找上限，遇到問題快速減速再重新找</text:span><text:span text:style-name="T10">，這個循環就是 </text:span><text:span text:style-name="T20">TCP </text:span><text:span text:style-name="T10">傳輸的節奏。</text:span></text:p>
      <text:h text:style-name="P3" text:outline-level="2" loext:marker-style-name="T27"><text:span text:style-name="T28">八、把整個 </text:span><text:span text:style-name="T27">TCP </text:span><text:span text:style-name="T28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8"><text:span text:style-name="T151">🔄 <text:s/></text:span><text:span text:style-name="T48">完整流程</text:span></text:p>
            <text:p text:style-name="P9" loext:marker-style-name="T96"><text:span text:style-name="T129">① </text:span><text:span text:style-name="T95">建立連線：三次握手（</text:span><text:span text:style-name="T129">SYN → SYN+ACK → ACK</text:span><text:span text:style-name="T95">）確認雙向通訊正常。</text:span></text:p>
            <text:p text:style-name="P10" loext:marker-style-name="T96"><text:span text:style-name="T129">② </text:span><text:span text:style-name="T95">開始傳資料 </text:span><text:span text:style-name="T129">Slow Start</text:span><text:span text:style-name="T95">：</text:span><text:span text:style-name="T129">cwnd </text:span><text:span text:style-name="T95">從 </text:span><text:span text:style-name="T129">1 </text:span><text:span text:style-name="T95">開始，每個 </text:span><text:span text:style-name="T129">ACK +1</text:span><text:span text:style-name="T95">，指數成長快速試探上限。</text:span></text:p>
            <text:p text:style-name="P10" loext:marker-style-name="T96"><text:span text:style-name="T129">③ </text:span><text:span text:style-name="T95">達到門檻切換 </text:span><text:span text:style-name="T129">CA</text:span><text:span text:style-name="T95">：</text:span><text:span text:style-name="T129">cwnd </text:span><text:span text:style-name="T95">到 </text:span><text:span text:style-name="T129">ssthresh </text:span><text:span text:style-name="T95">後改每 </text:span><text:span text:style-name="T129">RTT +1</text:span><text:span text:style-name="T95">，線性保守維持穩定。（</text:span><text:span text:style-name="T129">RTT</text:span><text:span text:style-name="T95">＝來回時間：送出一個封包到收到 </text:span><text:span text:style-name="T129">ACK </text:span><text:span text:style-name="T95">所花的時間）</text:span></text:p>
            <text:p text:style-name="P10" loext:marker-style-name="T96"><text:span text:style-name="T129">④ </text:span><text:span text:style-name="T95">每輪都考慮兩個限制：實際傳送量 </text:span><text:span text:style-name="T129">= min(rwnd, cwnd)</text:span><text:span text:style-name="T95">。</text:span></text:p>
            <text:p text:style-name="P10" loext:marker-style-name="T96"><text:span text:style-name="T129">⑤ </text:span><text:span text:style-name="T95">視窗持續滑動：每收到一個 </text:span><text:span text:style-name="T129">ACK </text:span><text:span text:style-name="T95">視窗往前移，保持 </text:span><text:span text:style-name="T129">pipeline </text:span><text:span text:style-name="T95">流暢。</text:span></text:p>
            <text:p text:style-name="P10" loext:marker-style-name="T96"><text:span text:style-name="T129">⑥ </text:span><text:span text:style-name="T95">偵測到丟包快速反應：</text:span><text:span text:style-name="T129">Timeout → cwnd=1 </text:span><text:span text:style-name="T95">重回 </text:span><text:span text:style-name="T129">Slow Start</text:span><text:span text:style-name="T95">；</text:span><text:span text:style-name="T129">3 </text:span><text:span text:style-name="T95">重複 </text:span><text:span text:style-name="T129">ACK → cwnd </text:span><text:span text:style-name="T95">減半續 </text:span><text:span text:style-name="T129">CA</text:span><text:span text:style-name="T95">。</text:span></text:p>
            <text:p text:style-name="P10" loext:marker-style-name="T96"><text:span text:style-name="T129">⑦ </text:span><text:span text:style-name="T95">持續循環調整：送 → 收 </text:span><text:span text:style-name="T129">ACK → </text:span><text:span text:style-name="T95">調整 </text:span><text:span text:style-name="T129">cwnd → </text:span><text:span text:style-name="T95">再送，</text:span><text:span text:style-name="T391">用 </text:span><text:span text:style-name="T407">ACK </text:span><text:span text:style-name="T391">當回饋不斷自我調節</text:span><text:span text:style-name="T95">。</text:span></text:p>
          </table:table-cell>
        </table:table-row>
      </table:table>
      <text:h text:style-name="P3" text:outline-level="2" loext:marker-style-name="T245"><text:soft-page-break/><text:span text:style-name="T245">TCP </text:span><text:span text:style-name="T246">七字口訣 <text:s text:c="2"/>握</text:span><text:span text:style-name="T245">(</text:span><text:span text:style-name="T246">三次握手</text:span><text:span text:style-name="T245">) → </text:span><text:span text:style-name="T246">衝</text:span><text:span text:style-name="T245">(Slow Start </text:span><text:span text:style-name="T246">指數成長</text:span><text:span text:style-name="T245">) → </text:span><text:span text:style-name="T246">穩</text:span><text:span text:style-name="T245">(CA </text:span><text:span text:style-name="T246">線性成長</text:span><text:span text:style-name="T245">) → </text:span><text:span text:style-name="T246">看</text:span><text:span text:style-name="T245">(min(rwnd,cwnd)) → </text:span><text:span text:style-name="T246">滑</text:span><text:span text:style-name="T245">(Sliding Window) → </text:span><text:span text:style-name="T246">救</text:span><text:span text:style-name="T245">(Timeout / 3 Dup ACK) → </text:span><text:span text:style-name="T246">循</text:span><text:span text:style-name="T245">(ACK </text:span><text:span text:style-name="T246">回饋循環</text:span><text:span text:style-name="T245">)</text:span></text:h>
      <text:h text:style-name="P15" text:outline-level="2" loext:marker-style-name="T27"/>
      <text:h text:style-name="P3" text:outline-level="2" loext:marker-style-name="T27"><text:span text:style-name="T28">九、</text:span><text:span text:style-name="T27">ARP / NAT / TCP </text:span><text:span text:style-name="T28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6" loext:marker-style-name="T66"><text:span text:style-name="T65">步驟</text:span><text:span text:style-name="T66"/></text:p>
            </table:table-cell>
            <table:table-cell table:style-name="表格80.A1" office:value-type="string">
              <text:p text:style-name="P6" loext:marker-style-name="T66"><text:span text:style-name="T65">發生什麼</text:span><text:span text:style-name="T66"/></text:p>
            </table:table-cell>
            <table:table-cell table:style-name="表格80.A1" office:value-type="string">
              <text:p text:style-name="P6" loext:marker-style-name="T66"><text:span text:style-name="T65">用到什麼</text:span><text:span text:style-name="T66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5" loext:marker-style-name="T80"><text:span text:style-name="T121">DNS </text:span><text:span text:style-name="T79">解析</text:span></text:p>
          </table:table-cell>
          <table:table-cell table:style-name="表格80.A2" office:value-type="string">
            <text:p text:style-name="P25" loext:marker-style-name="T80"><text:span text:style-name="T121">google.com → 142.250.x.x</text:span><text:span text:style-name="T80"/></text:p>
          </table:table-cell>
          <table:table-cell table:style-name="表格80.A2" office:value-type="string">
            <text:p text:style-name="P25" loext:marker-style-name="T80"><text:span text:style-name="T121">DNS</text:span><text:span text:style-name="T80"/></text:p>
          </table:table-cell>
        </table:table-row>
        <table:table-row table:style-name="表格80.1">
          <table:table-cell table:style-name="表格80.A3" office:value-type="string">
            <text:p text:style-name="P25" loext:marker-style-name="T80"><text:span text:style-name="T121">ARP </text:span><text:span text:style-name="T79">找路由器</text:span></text:p>
          </table:table-cell>
          <table:table-cell table:style-name="表格80.A3" office:value-type="string">
            <text:p text:style-name="P25" loext:marker-style-name="T80"><text:span text:style-name="T79">找路由器的 </text:span><text:span text:style-name="T121">MAC </text:span><text:span text:style-name="T79">位址</text:span></text:p>
          </table:table-cell>
          <table:table-cell table:style-name="表格80.A3" office:value-type="string">
            <text:p text:style-name="P25" loext:marker-style-name="T80"><text:span text:style-name="T121">ARP</text:span><text:span text:style-name="T80"/></text:p>
          </table:table-cell>
        </table:table-row>
        <table:table-row table:style-name="表格80.1">
          <table:table-cell table:style-name="表格80.A2" office:value-type="string">
            <text:p text:style-name="P25" loext:marker-style-name="T80"><text:span text:style-name="T121">NAT</text:span><text:span text:style-name="T80"/></text:p>
          </table:table-cell>
          <table:table-cell table:style-name="表格80.A2" office:value-type="string">
            <text:p text:style-name="P25" loext:marker-style-name="T80"><text:span text:style-name="T79">私有 </text:span><text:span text:style-name="T121">IP </text:span><text:span text:style-name="T79">換成公網 </text:span><text:span text:style-name="T121">IP</text:span></text:p>
          </table:table-cell>
          <table:table-cell table:style-name="表格80.A2" office:value-type="string">
            <text:p text:style-name="P25" loext:marker-style-name="T80"><text:span text:style-name="T121">NAT</text:span><text:span text:style-name="T80"/></text:p>
          </table:table-cell>
        </table:table-row>
        <table:table-row table:style-name="表格80.1">
          <table:table-cell table:style-name="表格80.A3" office:value-type="string">
            <text:p text:style-name="P25" loext:marker-style-name="T80"><text:span text:style-name="T121">TCP </text:span><text:span text:style-name="T79">三次握手</text:span></text:p>
          </table:table-cell>
          <table:table-cell table:style-name="表格80.A3" office:value-type="string">
            <text:p text:style-name="P25" loext:marker-style-name="T80"><text:span text:style-name="T79">與 </text:span><text:span text:style-name="T121">Google </text:span><text:span text:style-name="T79">建立可靠連線</text:span></text:p>
          </table:table-cell>
          <table:table-cell table:style-name="表格80.A3" office:value-type="string">
            <text:p text:style-name="P25" loext:marker-style-name="T80"><text:span text:style-name="T121">TCP</text:span><text:span text:style-name="T80"/></text:p>
          </table:table-cell>
        </table:table-row>
        <table:table-row table:style-name="表格80.1">
          <table:table-cell table:style-name="表格80.A2" office:value-type="string">
            <text:p text:style-name="P25" loext:marker-style-name="T80"><text:span text:style-name="T79">傳資料（</text:span><text:span text:style-name="T121">Slow Start → CA</text:span><text:span text:style-name="T79">）</text:span></text:p>
          </table:table-cell>
          <table:table-cell table:style-name="表格80.A2" office:value-type="string">
            <text:p text:style-name="P25" loext:marker-style-name="T80"><text:span text:style-name="T121">cwnd </text:span><text:span text:style-name="T79">慢慢加速，滑動視窗持續傳送</text:span></text:p>
          </table:table-cell>
          <table:table-cell table:style-name="表格80.A2" office:value-type="string">
            <text:p text:style-name="P25" loext:marker-style-name="T80"><text:span text:style-name="T121">TCP </text:span><text:span text:style-name="T79">擁塞控制</text:span></text:p>
          </table:table-cell>
        </table:table-row>
        <table:table-row table:style-name="表格80.1">
          <table:table-cell table:style-name="表格80.A3" office:value-type="string">
            <text:p text:style-name="P25" loext:marker-style-name="T80"><text:span text:style-name="T121">Google </text:span><text:span text:style-name="T79">回應</text:span></text:p>
          </table:table-cell>
          <table:table-cell table:style-name="表格80.A3" office:value-type="string">
            <text:p text:style-name="P25" loext:marker-style-name="T80"><text:span text:style-name="T79">資料送回你的電腦</text:span><text:span text:style-name="T80"/></text:p>
          </table:table-cell>
          <table:table-cell table:style-name="表格80.A3" office:value-type="string">
            <text:p text:style-name="P25" loext:marker-style-name="T80"><text:span text:style-name="T121">TCP + NAT</text:span><text:span text:style-name="T79">（回程換 </text:span><text:span text:style-name="T121">IP</text:span><text:span text:style-name="T79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8"><text:span text:style-name="T151">⚡ <text:s/></text:span><text:span text:style-name="T155">層次關係</text:span></text:p>
            <text:p text:style-name="P9" loext:marker-style-name="T96"><text:span text:style-name="T129">ARP </text:span><text:span text:style-name="T95">在 </text:span><text:span text:style-name="T129">L2/L3 </text:span><text:span text:style-name="T95">交界處工作（找 </text:span><text:span text:style-name="T129">MAC</text:span><text:span text:style-name="T95">）；</text:span><text:span text:style-name="T129">NAT </text:span><text:span text:style-name="T95">在 </text:span><text:span text:style-name="T129">L3</text:span><text:span text:style-name="T95">（換 </text:span><text:span text:style-name="T129">IP</text:span><text:span text:style-name="T95">）；</text:span><text:span text:style-name="T129">TCP </text:span><text:span text:style-name="T95">在 </text:span><text:span text:style-name="T129">L4</text:span><text:span text:style-name="T95">（控制傳輸）。三者各司其職，合作完成一次上網。</text:span></text:p>
          </table:table-cell>
          <table:covered-table-cell/>
          <table:covered-table-cell/>
        </table:table-row>
      </table:table>
      <text:h text:style-name="P3" text:outline-level="2" loext:marker-style-name="T27"><text:span text:style-name="T28">十、本篇一句話總結</text:span><text:span text:style-name="T27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8"><text:span text:style-name="T151">🧠 <text:s/></text:span><text:span text:style-name="T201">考試直接用</text:span></text:p>
            <text:p text:style-name="P9" loext:marker-style-name="T96"><text:span text:style-name="T129">TCP </text:span><text:span text:style-name="T95">用三次握手建立連線，</text:span><text:span text:style-name="T101">用 </text:span><text:span text:style-name="T135">rwnd</text:span><text:span text:style-name="T101">（接收端）和 </text:span><text:span text:style-name="T135">cwnd</text:span><text:span text:style-name="T101">（網路）雙重限制控制傳送速度</text:span><text:span text:style-name="T95">，透過 </text:span><text:span text:style-name="T129">Slow Start </text:span><text:span text:style-name="T95">指數試探、</text:span><text:span text:style-name="T129">Congestion Avoidance </text:span><text:span text:style-name="T95">線性增長、丟包後快速降速，</text:span><text:span text:style-name="T283">持續用 </text:span><text:span text:style-name="T288">ACK </text:span><text:span text:style-name="T283">當回饋調節</text:span><text:span text:style-name="T95">，確保資料可靠且高效地傳達。</text:span></text:p>
          </table:table-cell>
        </table:table-row>
      </table:table>
      <text:h text:style-name="P13" text:outline-level="1" loext:marker-style-name="T68"><text:span text:style-name="T67">第 六 篇　</text:span><text:span text:style-name="T68">DNS </text:span><text:span text:style-name="T67">與 </text:span><text:span text:style-name="T68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8"><text:span text:style-name="T151">💡 <text:s/></text:span><text:span text:style-name="T59">DNS </text:span><text:span text:style-name="T48">是什麼？</text:span></text:p>
            <text:p text:style-name="P9" loext:marker-style-name="T96"><text:span text:style-name="T129">DNS </text:span><text:span text:style-name="T95">就像「網路電話簿」。人類習慣記名字（</text:span><text:span text:style-name="T129">google.com</text:span><text:span text:style-name="T95">），但電腦只認識號碼（</text:span><text:span text:style-name="T129">IP </text:span><text:span text:style-name="T95">位址），</text:span><text:span text:style-name="T129">DNS </text:span><text:span text:style-name="T95">的工作就是幫你查出對應的號碼。全名 </text:span><text:span text:style-name="T129">Domain Name System</text:span><text:span text:style-name="T95">，是負責將「網域名稱」轉換為「</text:span><text:span text:style-name="T129">IP </text:span><text:span text:style-name="T95">位址」的分散式系統。</text:span></text:p>
          </table:table-cell>
        </table:table-row>
      </table:table>
      <text:h text:style-name="P3" text:outline-level="2" loext:marker-style-name="T27"><text:span text:style-name="T28">一、</text:span><text:span text:style-name="T27">DNS </text:span><text:span text:style-name="T28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6" loext:marker-style-name="T66"><text:span text:style-name="T65">類型</text:span><text:span text:style-name="T66"/></text:p>
            </table:table-cell>
            <table:table-cell table:style-name="表格83.A1" office:value-type="string">
              <text:p text:style-name="P6" loext:marker-style-name="T66"><text:span text:style-name="T65">全名</text:span><text:span text:style-name="T66"/></text:p>
            </table:table-cell>
            <table:table-cell table:style-name="表格83.A1" office:value-type="string">
              <text:p text:style-name="P6" loext:marker-style-name="T66"><text:span text:style-name="T65">用途</text:span><text:span text:style-name="T66"/></text:p>
            </table:table-cell>
            <table:table-cell table:style-name="表格83.A1" office:value-type="string">
              <text:p text:style-name="P6" loext:marker-style-name="T66"><text:span text:style-name="T65">範例</text:span><text:span text:style-name="T66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5" loext:marker-style-name="T83"><text:span text:style-name="T125">A</text:span><text:span text:style-name="T83"/></text:p>
          </table:table-cell>
          <table:table-cell table:style-name="表格83.A2" office:value-type="string">
            <text:p text:style-name="P25" loext:marker-style-name="T87"><text:span text:style-name="T123">Address Record</text:span><text:span text:style-name="T87"/></text:p>
          </table:table-cell>
          <table:table-cell table:style-name="表格83.A2" office:value-type="string">
            <text:p text:style-name="P25" loext:marker-style-name="T80"><text:span text:style-name="T79">網域名稱 → </text:span><text:span text:style-name="T300">IPv4 </text:span><text:span text:style-name="T307">位址</text:span></text:p>
          </table:table-cell>
          <table:table-cell table:style-name="表格83.A2" office:value-type="string">
            <text:p text:style-name="P25" loext:marker-style-name="T80"><text:span text:style-name="T121">google.com → 142.250.x.x</text:span><text:span text:style-name="T80"/></text:p>
          </table:table-cell>
        </table:table-row>
        <table:table-row table:style-name="表格83.1">
          <table:table-cell table:style-name="表格83.A3" office:value-type="string">
            <text:p text:style-name="P25" loext:marker-style-name="T83"><text:span text:style-name="T125">NS</text:span><text:span text:style-name="T83"/></text:p>
          </table:table-cell>
          <table:table-cell table:style-name="表格83.A3" office:value-type="string">
            <text:p text:style-name="P25" loext:marker-style-name="T87"><text:span text:style-name="T123">Name Server</text:span><text:span text:style-name="T87"/></text:p>
          </table:table-cell>
          <table:table-cell table:style-name="表格83.A3" office:value-type="string">
            <text:p text:style-name="P25" loext:marker-style-name="T80"><text:span text:style-name="T79">指定</text:span><text:span text:style-name="T229">管理該網域的 </text:span><text:span text:style-name="T121">DNS </text:span><text:span text:style-name="T79">伺服器</text:span></text:p>
          </table:table-cell>
          <table:table-cell table:style-name="表格83.A3" office:value-type="string">
            <text:p text:style-name="P25" loext:marker-style-name="T80"><text:span text:style-name="T121">google.com → ns1.google.com</text:span><text:span text:style-name="T80"/></text:p>
          </table:table-cell>
        </table:table-row>
        <table:table-row table:style-name="表格83.1">
          <table:table-cell table:style-name="表格83.A2" office:value-type="string">
            <text:p text:style-name="P25" loext:marker-style-name="T83"><text:span text:style-name="T125">MX</text:span><text:span text:style-name="T83"/></text:p>
          </table:table-cell>
          <table:table-cell table:style-name="表格83.A2" office:value-type="string">
            <text:p text:style-name="P25" loext:marker-style-name="T87"><text:span text:style-name="T123">Mail Exchange</text:span><text:span text:style-name="T87"/></text:p>
          </table:table-cell>
          <table:table-cell table:style-name="表格83.A2" office:value-type="string">
            <text:p text:style-name="P25" loext:marker-style-name="T80"><text:span text:style-name="T79">指定</text:span><text:span text:style-name="T473">負責收發郵件的</text:span><text:span text:style-name="T79">伺服器</text:span></text:p>
          </table:table-cell>
          <table:table-cell table:style-name="表格83.A2" office:value-type="string">
            <text:p text:style-name="P25" loext:marker-style-name="T80"><text:span text:style-name="T121">google.com → mail.google.com</text:span><text:span text:style-name="T80"/></text:p>
          </table:table-cell>
        </table:table-row>
        <table:table-row table:style-name="表格83.1">
          <table:table-cell table:style-name="表格83.A3" office:value-type="string">
            <text:p text:style-name="P25" loext:marker-style-name="T83"><text:span text:style-name="T125">CNAME</text:span><text:span text:style-name="T83"/></text:p>
          </table:table-cell>
          <table:table-cell table:style-name="表格83.A3" office:value-type="string">
            <text:p text:style-name="P25" loext:marker-style-name="T87"><text:span text:style-name="T123">Canonical Name</text:span><text:span text:style-name="T87"/></text:p>
          </table:table-cell>
          <table:table-cell table:style-name="表格83.A3" office:value-type="string">
            <text:p text:style-name="P25" loext:marker-style-name="T516"><text:span text:style-name="T515">設定網域別名，指向另一個網域</text:span><text:span text:style-name="T516"/></text:p>
          </table:table-cell>
          <table:table-cell table:style-name="表格83.A3" office:value-type="string">
            <text:p text:style-name="P25" loext:marker-style-name="T80"><text:span text:style-name="T121">www → google.com</text:span><text:span text:style-name="T80"/></text:p>
          </table:table-cell>
        </table:table-row>
      </table:table>
      <text:p text:style-name="P31" loext:marker-style-name="T7"><text:span text:style-name="T6">（</text:span><text:span text:style-name="T8">補充：</text:span><text:span text:style-name="T17">AAAA record → </text:span><text:span text:style-name="T8">回傳 </text:span><text:span text:style-name="T17">IPv6 </text:span><text:span text:style-name="T8">位址，見第三篇 </text:span><text:span text:style-name="T17">Dual Stack</text:span><text:span text:style-name="T8">。</text:span><text:span text:style-name="T6">）</text:span></text:p>
      <text:h text:style-name="P3" text:outline-level="2" loext:marker-style-name="T27"><text:span text:style-name="T28">二、</text:span><text:span text:style-name="T27">DNS </text:span><text:span text:style-name="T28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8"><text:span text:style-name="T151">📚 <text:s/></text:span><text:span text:style-name="T48">圖書館找書比喻</text:span></text:p>
            <text:p text:style-name="P9" loext:marker-style-name="T96"><text:span text:style-name="T95">你要找一本書，書名叫「</text:span><text:span text:style-name="T129">google.com</text:span><text:span text:style-name="T95">」：</text:span></text:p>
            <text:p text:style-name="P10" loext:marker-style-name="T96"><text:span text:style-name="T129">① </text:span><text:span text:style-name="T95">先翻自己的筆記本（</text:span><text:span text:style-name="T129">Cache</text:span><text:span text:style-name="T95">）→ 記得放哪就直接去</text:span></text:p>
            <text:p text:style-name="P10" loext:marker-style-name="T96"><text:span text:style-name="T129">② </text:span><text:span text:style-name="T95">問圖書館員（</text:span><text:span text:style-name="T129">Local DNS</text:span><text:span text:style-name="T95">）→「你知道這本書嗎？」</text:span></text:p>
            <text:p text:style-name="P10" loext:marker-style-name="T96"><text:span text:style-name="T129">③ </text:span><text:span text:style-name="T95">館員問館長（</text:span><text:span text:style-name="T129">Root DNS</text:span><text:span text:style-name="T95">）→「這本是哪個分類？」→「外文區」</text:span></text:p>
            <text:p text:style-name="P10" loext:marker-style-name="T96"><text:span text:style-name="T129">④ </text:span><text:span text:style-name="T95">去外文區管理員（</text:span><text:span text:style-name="T129">TLD</text:span><text:span text:style-name="T95">：</text:span><text:span text:style-name="T129">.com</text:span><text:span text:style-name="T95">）→「</text:span><text:span text:style-name="T129">google </text:span><text:span text:style-name="T95">在哪個書架？」</text:span></text:p>
            <text:p text:style-name="P10" loext:marker-style-name="T96"><text:span text:style-name="T129">⑤ </text:span><text:span text:style-name="T95">書架管理員（</text:span><text:span text:style-name="T129">Authoritative DNS</text:span><text:span text:style-name="T95">）→ 直接給你確切位置（</text:span><text:span text:style-name="T129">IP</text:span><text:span text:style-name="T95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22" loext:marker-style-name="T72"><text:span text:style-name="T71">步驟</text:span><text:span text:style-name="T72"/></text:p>
          </table:table-cell>
          <table:table-cell table:style-name="表格84.A2" office:value-type="string">
            <text:p text:style-name="P22" loext:marker-style-name="T72"><text:span text:style-name="T71">層級</text:span><text:span text:style-name="T72"/></text:p>
          </table:table-cell>
          <table:table-cell table:style-name="表格84.A2" office:value-type="string">
            <text:p text:style-name="P22" loext:marker-style-name="T72"><text:span text:style-name="T71">說明</text:span><text:span text:style-name="T72"/></text:p>
          </table:table-cell>
        </table:table-row>
        <table:table-row table:style-name="表格84.1">
          <table:table-cell table:style-name="表格84.A3" office:value-type="string">
            <text:p text:style-name="P25" loext:marker-style-name="T112"><text:span text:style-name="T144">1</text:span><text:span text:style-name="T112"/></text:p>
          </table:table-cell>
          <table:table-cell table:style-name="表格84.A3" office:value-type="string">
            <text:p text:style-name="P25" loext:marker-style-name="T376"><text:span text:style-name="T375">本機快取（</text:span><text:span text:style-name="T412">Cache</text:span><text:span text:style-name="T375">）</text:span></text:p>
          </table:table-cell>
          <table:table-cell table:style-name="表格84.A3" office:value-type="string">
            <text:p text:style-name="P25" loext:marker-style-name="T497"><text:span text:style-name="T496">先檢查電腦或瀏覽器有無記住此網址的 </text:span><text:span text:style-name="T500">IP</text:span><text:span text:style-name="T496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5" loext:marker-style-name="T112"><text:span text:style-name="T144">2</text:span><text:span text:style-name="T112"/></text:p>
          </table:table-cell>
          <table:table-cell table:style-name="表格84.A4" office:value-type="string">
            <text:p text:style-name="P25" loext:marker-style-name="T232"><text:span text:style-name="T256">Local DNS </text:span><text:span text:style-name="T231">伺服器</text:span></text:p>
          </table:table-cell>
          <table:table-cell table:style-name="表格84.A4" office:value-type="string">
            <text:p text:style-name="P25" loext:marker-style-name="T112"><text:span text:style-name="T113">向 </text:span><text:span text:style-name="T146">ISP</text:span><text:span text:style-name="T114">（如中華電信）</text:span><text:span text:style-name="T113">或</text:span><text:span text:style-name="T114">自設 </text:span><text:span text:style-name="T146">DNS</text:span><text:span text:style-name="T114">（如 </text:span><text:span text:style-name="T146">8.8.8.8</text:span><text:span text:style-name="T114">）</text:span><text:span text:style-name="T113">查詢。</text:span></text:p>
          </table:table-cell>
        </table:table-row>
        <table:table-row table:style-name="表格84.1">
          <table:table-cell table:style-name="表格84.A3" office:value-type="string">
            <text:p text:style-name="P25" loext:marker-style-name="T112"><text:span text:style-name="T144">3</text:span><text:span text:style-name="T112"/></text:p>
          </table:table-cell>
          <table:table-cell table:style-name="表格84.A3" office:value-type="string">
            <text:p text:style-name="P25" loext:marker-style-name="T469"><text:span text:style-name="T478">Root DNS </text:span><text:span text:style-name="T468">伺服器</text:span></text:p>
          </table:table-cell>
          <table:table-cell table:style-name="表格84.A3" office:value-type="string">
            <text:p text:style-name="P25" loext:marker-style-name="T112"><text:span text:style-name="T446">全球共 </text:span><text:span text:style-name="T459">13 </text:span><text:span text:style-name="T446">組根 </text:span><text:span text:style-name="T459">DNS</text:span><text:span text:style-name="T113">。不知道答案，但</text:span><text:span text:style-name="T116">會指向對應的 </text:span><text:span text:style-name="T147">TLD DNS</text:span><text:span text:style-name="T113">。</text:span></text:p>
          </table:table-cell>
        </table:table-row>
        <table:table-row table:style-name="表格84.1">
          <table:table-cell table:style-name="表格84.A4" office:value-type="string">
            <text:p text:style-name="P25" loext:marker-style-name="T112"><text:span text:style-name="T144">4</text:span><text:span text:style-name="T112"/></text:p>
          </table:table-cell>
          <table:table-cell table:style-name="表格84.A4" office:value-type="string">
            <text:p text:style-name="P25" loext:marker-style-name="T313"><text:span text:style-name="T328">TLD DNS </text:span><text:span text:style-name="T312">伺服器</text:span></text:p>
          </table:table-cell>
          <table:table-cell table:style-name="表格84.A4" office:value-type="string">
            <text:p text:style-name="P25" loext:marker-style-name="T112"><text:span text:style-name="T113">負責</text:span><text:span text:style-name="T517">管理頂層網域（</text:span><text:span text:style-name="T520">.com</text:span><text:span text:style-name="T517">、</text:span><text:span text:style-name="T520">.tw</text:span><text:span text:style-name="T517">）</text:span><text:span text:style-name="T113">。</text:span><text:span text:style-name="T116">回應 </text:span><text:span text:style-name="T147">Authoritative DNS </text:span><text:span text:style-name="T116">的位置。</text:span><text:span text:style-name="T230">「</text:span><text:span text:style-name="T257">TLD </text:span><text:span text:style-name="T230">是 </text:span><text:span text:style-name="T257">Top-Level Domain</text:span><text:span text:style-name="T230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5" loext:marker-style-name="T112"><text:span text:style-name="T144">5</text:span><text:span text:style-name="T112"/></text:p>
          </table:table-cell>
          <table:table-cell table:style-name="表格84.A3" office:value-type="string">
            <text:p text:style-name="P25" loext:marker-style-name="T506"><text:span text:style-name="T509">Authoritative DNS</text:span><text:span text:style-name="T506"/></text:p>
          </table:table-cell>
          <table:table-cell table:style-name="表格84.A3" office:value-type="string">
            <text:p text:style-name="P25" loext:marker-style-name="T112"><text:span text:style-name="T114">真正儲存答案的伺服器</text:span><text:span text:style-name="T113">，直接回傳正確的 </text:span><text:span text:style-name="T144">IP </text:span><text:span text:style-name="T113">位址。</text:span></text:p>
          </table:table-cell>
        </table:table-row>
        <table:table-row table:style-name="表格84.1">
          <table:table-cell table:style-name="表格84.A4" office:value-type="string">
            <text:p text:style-name="P25" loext:marker-style-name="T112"><text:span text:style-name="T144">6</text:span><text:span text:style-name="T112"/></text:p>
          </table:table-cell>
          <table:table-cell table:style-name="表格84.A4" office:value-type="string">
            <text:p text:style-name="P25" loext:marker-style-name="T112"><text:span text:style-name="T113">回傳 </text:span><text:span text:style-name="T144">IP </text:span><text:span text:style-name="T113">位址 ✓</text:span></text:p>
          </table:table-cell>
          <table:table-cell table:style-name="表格84.A4" office:value-type="string">
            <text:p text:style-name="P25" loext:marker-style-name="T112"><text:span text:style-name="T113">瀏覽器取得 </text:span><text:span text:style-name="T144">IP </text:span><text:span text:style-name="T113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8"><text:span text:style-name="T151">📌 <text:s/></text:span><text:span text:style-name="T201">一句話總結</text:span></text:p>
            <text:p text:style-name="P9" loext:marker-style-name="T96"><text:span text:style-name="T129">DNS </text:span><text:span text:style-name="T95">解析為「由快取開始，經 </text:span><text:span text:style-name="T129">Local DNS</text:span><text:span text:style-name="T95">，逐層向 </text:span><text:span text:style-name="T129">Root</text:span><text:span text:style-name="T95">、</text:span><text:span text:style-name="T129">TLD</text:span><text:span text:style-name="T95">、</text:span><text:span text:style-name="T129">Authoritative DNS </text:span><text:span text:style-name="T95">查詢，最後取得 </text:span><text:span text:style-name="T129">IP </text:span><text:span text:style-name="T95">位址」。</text:span></text:p>
          </table:table-cell>
          <table:covered-table-cell/>
          <table:covered-table-cell/>
        </table:table-row>
      </table:table>
      <text:h text:style-name="P3" text:outline-level="2" loext:marker-style-name="T27"><text:soft-page-break/><text:span text:style-name="T28">三、</text:span><text:span text:style-name="T27">Recursive vs. Iterative</text:span><text:span text:style-name="T28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8"><text:span text:style-name="T151">⚠️ <text:s/></text:span><text:span text:style-name="T173">最關鍵的差別</text:span></text:p>
            <text:p text:style-name="P9" loext:marker-style-name="T96"><text:span text:style-name="T101">兩種方式的路徑相同</text:span><text:span text:style-name="T95">（</text:span><text:span text:style-name="T129">Cache → Local → Root → TLD → Auth</text:span><text:span text:style-name="T95">），</text:span><text:span text:style-name="T268">唯一差別只有一件事：「誰去問」</text:span><text:span text:style-name="T95">。</text:span></text:p>
            <text:p text:style-name="P10" loext:marker-style-name="T96"><text:span text:style-name="T129">→ </text:span><text:span text:style-name="T253">DNS </text:span><text:span text:style-name="T242">幫你問完 ＝ </text:span><text:span text:style-name="T253">Recursive</text:span><text:span text:style-name="T242">（遞迴）</text:span><text:span text:style-name="T95">；</text:span><text:span text:style-name="T324">你自己去問 ＝ </text:span><text:span text:style-name="T336">Iterative</text:span><text:span text:style-name="T324">（反覆）</text:span><text:span text:style-name="T95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6" loext:marker-style-name="T66"><text:span text:style-name="T65">比較項目</text:span><text:span text:style-name="T66"/></text:p>
          </table:table-cell>
          <table:table-cell table:style-name="表格85.A2" office:value-type="string">
            <text:p text:style-name="P6" loext:marker-style-name="T66"><text:span text:style-name="T75">Recursive</text:span><text:span text:style-name="T65">（遞迴）</text:span></text:p>
          </table:table-cell>
          <table:table-cell table:style-name="表格85.A2" office:value-type="string">
            <text:p text:style-name="P6" loext:marker-style-name="T66"><text:span text:style-name="T75">Iterative</text:span><text:span text:style-name="T65">（反覆）</text:span></text:p>
          </table:table-cell>
        </table:table-row>
        <table:table-row table:style-name="表格85.1">
          <table:table-cell table:style-name="表格85.A3" office:value-type="string">
            <text:p text:style-name="P25" loext:marker-style-name="T80"><text:span text:style-name="T79">誰去問</text:span><text:span text:style-name="T80"/></text:p>
          </table:table-cell>
          <table:table-cell table:style-name="表格85.A3" office:value-type="string">
            <text:p text:style-name="P25" loext:marker-style-name="T87"><text:span text:style-name="T123">DNS </text:span><text:span text:style-name="T86">伺服器代替你問完</text:span></text:p>
          </table:table-cell>
          <table:table-cell table:style-name="表格85.A3" office:value-type="string">
            <text:p text:style-name="P25" loext:marker-style-name="T83"><text:span text:style-name="T82">你自己逐層查詢</text:span><text:span text:style-name="T83"/></text:p>
          </table:table-cell>
        </table:table-row>
        <table:table-row table:style-name="表格85.1">
          <table:table-cell table:style-name="表格85.A4" office:value-type="string">
            <text:p text:style-name="P25" loext:marker-style-name="T80"><text:span text:style-name="T79">問幾次</text:span><text:span text:style-name="T80"/></text:p>
          </table:table-cell>
          <table:table-cell table:style-name="表格85.A4" office:value-type="string">
            <text:p text:style-name="P25" loext:marker-style-name="T87"><text:span text:style-name="T86">你只問 </text:span><text:span text:style-name="T123">1 </text:span><text:span text:style-name="T86">次</text:span></text:p>
          </table:table-cell>
          <table:table-cell table:style-name="表格85.A4" office:value-type="string">
            <text:p text:style-name="P25" loext:marker-style-name="T83"><text:span text:style-name="T82">每層各問一次，共多次</text:span><text:span text:style-name="T83"/></text:p>
          </table:table-cell>
        </table:table-row>
        <table:table-row table:style-name="表格85.1">
          <table:table-cell table:style-name="表格85.A3" office:value-type="string">
            <text:p text:style-name="P25" loext:marker-style-name="T80"><text:span text:style-name="T79">常見場合</text:span><text:span text:style-name="T80"/></text:p>
          </table:table-cell>
          <table:table-cell table:style-name="表格85.A3" office:value-type="string">
            <text:p text:style-name="P25" loext:marker-style-name="T80"><text:span text:style-name="T79">一般使用者 → </text:span><text:span text:style-name="T121">Local DNS</text:span></text:p>
          </table:table-cell>
          <table:table-cell table:style-name="表格85.A3" office:value-type="string">
            <text:p text:style-name="P25" loext:marker-style-name="T80"><text:span text:style-name="T121">DNS </text:span><text:span text:style-name="T79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5" loext:marker-style-name="T80"><text:span text:style-name="T79">記憶口訣</text:span><text:span text:style-name="T80"/></text:p>
          </table:table-cell>
          <table:table-cell table:style-name="表格85.A4" office:value-type="string">
            <text:p text:style-name="P25" loext:marker-style-name="T162"><text:span text:style-name="T161">代查到底</text:span><text:span text:style-name="T162"/></text:p>
          </table:table-cell>
          <table:table-cell table:style-name="表格85.A4" office:value-type="string">
            <text:p text:style-name="P25" loext:marker-style-name="T34"><text:span text:style-name="T33">逐層詢問</text:span><text:span text:style-name="T34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8"><text:span text:style-name="T151">🗣️ <text:s/></text:span><text:span text:style-name="T48">問路比喻</text:span></text:p>
            <text:p text:style-name="P9"><text:span text:style-name="T62">Recursive</text:span><text:span text:style-name="T54">（朋友幫你問完）</text:span><text:span text:style-name="T52">：</text:span><text:span text:style-name="T100">你只問朋友（</text:span><text:span text:style-name="T134">Local DNS</text:span><text:span text:style-name="T100">）一次</text:span><text:span text:style-name="T95">「台北</text:span><text:span text:style-name="T129">101</text:span><text:span text:style-name="T95">在哪？」朋友自己跑完 </text:span><text:span text:style-name="T129">Root→TLD→Auth</text:span><text:span text:style-name="T95">，回你 </text:span><text:span text:style-name="T129">IP</text:span><text:span text:style-name="T95">，你沒動過。</text:span></text:p>
            <text:p text:style-name="P10"><text:span text:style-name="T62">Iterative</text:span><text:span text:style-name="T54">（你自己跑全程）</text:span><text:span text:style-name="T52">：</text:span><text:span text:style-name="T95">你問 </text:span><text:span text:style-name="T129">Root</text:span><text:span text:style-name="T95">「我不知道，去問 </text:span><text:span text:style-name="T129">TLD</text:span><text:span text:style-name="T95">」→ 你問 </text:span><text:span text:style-name="T129">TLD</text:span><text:span text:style-name="T95">「去問 </text:span><text:span text:style-name="T129">Auth</text:span><text:span text:style-name="T95">」→ 你問 </text:span><text:span text:style-name="T129">Auth </text:span><text:span text:style-name="T95">拿到 </text:span><text:span text:style-name="T129">IP</text:span><text:span text:style-name="T95">，全程你自己跑。</text:span></text:p>
            <text:p text:style-name="P10"><text:span text:style-name="T24">為什麼有兩種？</text:span><text:span text:style-name="T243">一般使用者採 </text:span><text:span text:style-name="T254">Recursive</text:span><text:span text:style-name="T243">（簡單方便）</text:span><text:span text:style-name="T95">；</text:span><text:span text:style-name="T337">DNS </text:span><text:span text:style-name="T325">伺服器之間採 </text:span><text:span text:style-name="T337">Iterative</text:span><text:span text:style-name="T95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3" text:outline-level="2" loext:marker-style-name="T27"><text:span text:style-name="T28">四、</text:span><text:span text:style-name="T27">Open Resolver </text:span><text:span text:style-name="T28">風險</text:span></text:h>
      <text:p text:style-name="P31" loext:marker-style-name="T96"><text:span text:style-name="T135">Open Resolver </text:span><text:span text:style-name="T95">是</text:span><text:span text:style-name="T495">對外完全開放、任何人都可以使用的 </text:span><text:span text:style-name="T499">DNS </text:span><text:span text:style-name="T495">伺服器</text:span><text:span text:style-name="T95">；因為</text:span><text:span text:style-name="T100">沒有存取限制，容易成為攻擊目標</text:span><text:span text:style-name="T95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22" loext:marker-style-name="T66"><text:span text:style-name="T75">⚠️ Cache Poisoning</text:span><text:span text:style-name="T65">（快取污染）</text:span></text:p>
            </table:table-cell>
            <table:table-cell table:style-name="表格86.A1" office:value-type="string">
              <text:p text:style-name="P22" loext:marker-style-name="T66"><text:span text:style-name="T75">⚡ DDoS </text:span><text:span text:style-name="T65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5" loext:marker-style-name="T80"><text:span text:style-name="T387">攻擊者偽造 </text:span><text:span text:style-name="T404">DNS </text:span><text:span text:style-name="T387">回應</text:span><text:span text:style-name="T79">，</text:span><text:span text:style-name="T264">將惡意 </text:span><text:span text:style-name="T260">IP </text:span><text:span text:style-name="T264">植入 </text:span><text:span text:style-name="T260">DNS </text:span><text:span text:style-name="T264">快取，使用者被引導至釣魚網站</text:span><text:span text:style-name="T79">。流程：偽造回應 → </text:span><text:span text:style-name="T121">DNS </text:span><text:span text:style-name="T79">存假 </text:span><text:span text:style-name="T121">IP → </text:span><text:span text:style-name="T79">用戶連到釣魚網站。</text:span></text:p>
          </table:table-cell>
          <table:table-cell table:style-name="表格86.A2" office:value-type="string">
            <text:p text:style-name="P25" loext:marker-style-name="T80"><text:span text:style-name="T442">攻擊者偽造受害者 </text:span><text:span text:style-name="T458">IP </text:span><text:span text:style-name="T275">發送查詢</text:span><text:span text:style-name="T79">，</text:span><text:span text:style-name="T260">DNS </text:span><text:span text:style-name="T264">回傳大量資料給受害者，形成流量放大效果</text:span><text:span text:style-name="T79">。流程：小封包 → </text:span><text:span text:style-name="T121">DNS </text:span><text:span text:style-name="T79">回超大資料 → 灌爆受害者。</text:span></text:p>
          </table:table-cell>
        </table:table-row>
      </table:table>
      <text:h text:style-name="P3" text:outline-level="2" loext:marker-style-name="T27"><text:span text:style-name="T28">五、</text:span><text:span text:style-name="T27">DNSSEC — DNS </text:span><text:span text:style-name="T28">安全機制</text:span></text:h>
      <text:p text:style-name="P31" loext:marker-style-name="T96"><text:span text:style-name="T129">DNSSEC</text:span><text:span text:style-name="T95">（</text:span><text:span text:style-name="T129">DNS Security Extensions</text:span><text:span text:style-name="T95">）透過</text:span><text:span text:style-name="T395">數位簽章機制</text:span><text:span text:style-name="T95">，</text:span><text:span text:style-name="T350">讓接收方能驗證 </text:span><text:span text:style-name="T358">DNS </text:span><text:span text:style-name="T350">回應的真實性與完整性</text:span><text:span text:style-name="T95">，</text:span><text:span text:style-name="T101">防止資料被偽造或篡改</text:span><text:span text:style-name="T95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22" loext:marker-style-name="T66"><text:span text:style-name="T75">✅ DNSSEC </text:span><text:span text:style-name="T65">可以防禦</text:span></text:p>
            </table:table-cell>
            <table:table-cell table:style-name="表格87.A1" office:value-type="string">
              <text:p text:style-name="P22" loext:marker-style-name="T66"><text:span text:style-name="T75">❌ DNSSEC </text:span><text:span text:style-name="T65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5" loext:marker-style-name="T80"><text:span text:style-name="T79">防止 </text:span><text:span text:style-name="T121">DNS Spoofing</text:span><text:span text:style-name="T79">（假回應）／防止 </text:span><text:span text:style-name="T121">Cache Poisoning</text:span><text:span text:style-name="T79">（快取污染）／</text:span><text:span text:style-name="T388">驗證資料完整性與來源真實性</text:span></text:p>
          </table:table-cell>
          <table:table-cell table:style-name="表格87.A2" office:value-type="string">
            <text:p text:style-name="P25" loext:marker-style-name="T80"><text:span text:style-name="T79">不提供加密功能（非 </text:span><text:span text:style-name="T121">HTTPS</text:span><text:span text:style-name="T79">）／</text:span><text:span text:style-name="T229">無法防禦 </text:span><text:span text:style-name="T221">DoS / DDoS </text:span><text:span text:style-name="T229">攻擊</text:span><text:span text:style-name="T79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8"><text:span text:style-name="T151">⚠️ <text:s/></text:span><text:span text:style-name="T201">最重要的一句話</text:span></text:p>
            <text:p text:style-name="P9" loext:marker-style-name="T205"><text:span text:style-name="T209">DNSSEC</text:span><text:span text:style-name="T208"> = </text:span><text:span text:style-name="T206">驗證真偽，不是加密，不防 </text:span><text:span text:style-name="T210">DDoS</text:span></text:p>
          </table:table-cell>
          <table:covered-table-cell/>
        </table:table-row>
      </table:table>
      <text:h text:style-name="P3" text:outline-level="2" loext:marker-style-name="T27"><text:span text:style-name="T28">六、</text:span><text:span text:style-name="T27">DNS </text:span><text:span text:style-name="T28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8"><text:span text:style-name="T151">🔍 <text:s/></text:span><text:span text:style-name="T48">診斷結論</text:span></text:p>
            <text:p text:style-name="P9" loext:marker-style-name="T96"><text:span text:style-name="T95">能用 </text:span><text:span text:style-name="T129">IP </text:span><text:span text:style-name="T95">連線（</text:span><text:span text:style-name="T129">ping 142.250.1.1 </text:span><text:span text:style-name="T95">成功），但無法用網域名稱連線（</text:span><text:span text:style-name="T129">ping google.com </text:span><text:span text:style-name="T95">失敗）→ </text:span><text:span text:style-name="T129">DNS </text:span><text:span text:style-name="T95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8"><text:span text:style-name="T151">📝 <text:s/></text:span><text:span text:style-name="T192">申論題標準答案</text:span></text:p>
            <text:p text:style-name="P9"><text:span text:style-name="T193">一、</text:span><text:span text:style-name="T196">DNS </text:span><text:span text:style-name="T193">功能：</text:span><text:span text:style-name="T129">DNS </text:span><text:span text:style-name="T95">為網際網路中負責</text:span><text:span text:style-name="T241">將網域名稱轉換為 </text:span><text:span text:style-name="T252">IP </text:span><text:span text:style-name="T241">位址</text:span><text:span text:style-name="T95">的分散式系統。</text:span></text:p>
            <text:p text:style-name="P10"><text:span text:style-name="T193">二、查詢流程：</text:span><text:span text:style-name="T95">由</text:span><text:span text:style-name="T101">快取</text:span><text:span text:style-name="T95">開始，依序向 </text:span><text:span text:style-name="T135">Local DNS</text:span><text:span text:style-name="T95">、</text:span><text:span text:style-name="T135">Root DNS</text:span><text:span text:style-name="T95">、</text:span><text:span text:style-name="T135">TLD DNS</text:span><text:span text:style-name="T95">、</text:span><text:span text:style-name="T135">Authoritative DN</text:span><text:span text:style-name="T129">S </text:span><text:span text:style-name="T95">查詢，最終取得 </text:span><text:span text:style-name="T129">IP </text:span><text:span text:style-name="T95">位址。</text:span></text:p>
            <text:p text:style-name="P10"><text:span text:style-name="T193">三、</text:span><text:span text:style-name="T196">Recursive</text:span><text:span text:style-name="T193">：</text:span><text:span text:style-name="T95">由 </text:span><text:span text:style-name="T129">DNS </text:span><text:span text:style-name="T95">伺服器代替用戶端完整查詢並直接回傳最終 </text:span><text:span text:style-name="T129">IP</text:span><text:span text:style-name="T95">，用戶端只需等待結果。</text:span></text:p>
            <text:p text:style-name="P10"><text:span text:style-name="T193">四、</text:span><text:span text:style-name="T196">Iterative</text:span><text:span text:style-name="T193">：</text:span><text:span text:style-name="T129">DNS </text:span><text:span text:style-name="T95">伺服器僅回應下一步查詢位置，由用戶端自行逐層向各 </text:span><text:span text:style-name="T129">DNS </text:span><text:span text:style-name="T95">查詢，直到取得 </text:span><text:span text:style-name="T129">IP</text:span><text:span text:style-name="T95">。</text:span></text:p>
            <text:p text:style-name="P10"><text:span text:style-name="T193">五、</text:span><text:span text:style-name="T196">DNSSEC</text:span><text:span text:style-name="T193">：</text:span><text:span text:style-name="T95">透過</text:span><text:span text:style-name="T101">數位簽章</text:span><text:span text:style-name="T523">驗證 </text:span><text:span text:style-name="T524">DNS </text:span><text:span text:style-name="T523">回應真實性</text:span><text:span text:style-name="T95">，可防 </text:span><text:span text:style-name="T129">DNS Spoofing </text:span><text:span text:style-name="T95">及 </text:span><text:span text:style-name="T129">Cache Poisoning</text:span><text:span text:style-name="T95">，但不提供加密，也</text:span><text:span text:style-name="T244">無法防禦 </text:span><text:span text:style-name="T255">DDoS</text:span><text:span text:style-name="T95">。</text:span></text:p>
          </table:table-cell>
        </table:table-row>
      </table:table>
      <text:h text:style-name="P13" text:outline-level="1" loext:marker-style-name="T68"><text:span text:style-name="T67">第 七 篇　路由協定：</text:span><text:span text:style-name="T68">OSPF </text:span><text:span text:style-name="T67">與 </text:span><text:span text:style-name="T68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8"><text:span text:style-name="T151">🗺️ <text:s/></text:span><text:span text:style-name="T48">在解決什麼問題？</text:span></text:p>
            <text:p text:style-name="P9" loext:marker-style-name="T96"><text:span text:style-name="T95">網路上有無數個</text:span><text:span text:style-name="T101">路由器（</text:span><text:span text:style-name="T135">Router</text:span><text:span text:style-name="T101">）</text:span><text:span text:style-name="T95">，它們只有一個任務：「</text:span><text:span text:style-name="T237">資料要走哪條路才能抵達目的地？</text:span><text:span text:style-name="T95">」</text:span><text:span text:style-name="T268">它們需要一套共通的對話規則，這就是路由協定</text:span><text:span text:style-name="T95">。</text:span></text:p>
          </table:table-cell>
        </table:table-row>
      </table:table>
      <text:h text:style-name="P3" text:outline-level="2" loext:marker-style-name="T27"><text:span text:style-name="T28">一、路由協定兩大分類：</text:span><text:span text:style-name="T30">IGP</text:span><text:span text:style-name="T27"> vs </text:span><text:span text:style-name="T30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22" loext:marker-style-name="T66"><text:span text:style-name="T75">🏢 IGP — </text:span><text:span text:style-name="T65">內部用</text:span></text:p>
            </table:table-cell>
            <table:table-cell table:style-name="表格90.A1" office:value-type="string">
              <text:p text:style-name="P22" loext:marker-style-name="T66"><text:span text:style-name="T75">🌍 EGP — </text:span><text:span text:style-name="T65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5" loext:marker-style-name="T80"><text:span text:style-name="T123">Interior Gateway Protocol</text:span><text:span text:style-name="T79">，在</text:span><text:span text:style-name="T307">同一個組織內部使用</text:span><text:span text:style-name="T79">（公司內網、校園網路）。常見：</text:span><text:span text:style-name="T121">OSPF</text:span><text:span text:style-name="T79">（最主流）、</text:span><text:span text:style-name="T121">RIP</text:span><text:span text:style-name="T79">（較舊）。</text:span></text:p>
          </table:table-cell>
          <table:table-cell table:style-name="表格90.A2" office:value-type="string">
            <text:p text:style-name="P25" loext:marker-style-name="T80"><text:span text:style-name="T123">Exterior Gateway Protocol</text:span><text:span text:style-name="T79">，</text:span><text:span text:style-name="T229">在不同組織之間使用</text:span><text:span text:style-name="T79">（中華電信 ↔ </text:span><text:span text:style-name="T121">Google</text:span><text:span text:style-name="T79">、</text:span><text:span text:style-name="T121">ISP ↔ ISP</text:span><text:span text:style-name="T79">）。目前唯一在用：</text:span><text:span text:style-name="T121">BGP</text:span><text:span text:style-name="T79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8"><text:span text:style-name="T151">⚡ <text:s/></text:span><text:span text:style-name="T155">一句話記憶法</text:span></text:p>
            <text:p text:style-name="P9" loext:marker-style-name="T96"><text:span text:style-name="T436">公司／校園內 → 用 </text:span><text:span text:style-name="T453">IGP</text:span><text:span text:style-name="T95">（</text:span><text:span text:style-name="T247">OSPF</text:span><text:span text:style-name="T129"> </text:span><text:span text:style-name="T95">或 </text:span><text:span text:style-name="T129">RIP</text:span><text:span text:style-name="T95">）；</text:span><text:span text:style-name="T437">公司與公司間 → 用 </text:span><text:span text:style-name="T454">EGP</text:span><text:span text:style-name="T95">（</text:span><text:span text:style-name="T247">BGP</text:span><text:span text:style-name="T95">）。</text:span></text:p>
          </table:table-cell>
          <table:covered-table-cell/>
        </table:table-row>
      </table:table>
      <text:h text:style-name="P3" text:outline-level="2" loext:marker-style-name="T27"><text:span text:style-name="T28">二、</text:span><text:span text:style-name="T27">OSPF </text:span><text:span text:style-name="T28">的核心概念</text:span></text:h>
      <text:p text:style-name="P31" loext:marker-style-name="T96"><text:span text:style-name="T247">OSPF</text:span><text:span text:style-name="T237">（</text:span><text:span text:style-name="T247">Open Shortest Path First</text:span><text:span text:style-name="T237">）</text:span><text:span text:style-name="T95">是 </text:span><text:span text:style-name="T135">IGP </text:span><text:span text:style-name="T101">裡最主流的協定</text:span><text:span text:style-name="T95">，最大特色是</text:span><text:span text:style-name="T396">把網路切成多個區域（</text:span><text:span text:style-name="T411">Area</text:span><text:span text:style-name="T396">）管理</text:span><text:span text:style-name="T95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8"><text:span text:style-name="T151">📌 <text:s/></text:span><text:span text:style-name="T201">最重要的規定</text:span></text:p>
            <text:p text:style-name="P9" loext:marker-style-name="T96"><text:span text:style-name="T325">所有 </text:span><text:span text:style-name="T337">Area </text:span><text:span text:style-name="T325">都必須連到 </text:span><text:span text:style-name="T337">Area 0</text:span><text:span text:style-name="T325">（骨幹區域）</text:span><text:span text:style-name="T95">。</text:span><text:span text:style-name="T455">Area 0 </text:span><text:span text:style-name="T438">就像高速公路主幹道，其他 </text:span><text:span text:style-name="T455">Area </text:span><text:span text:style-name="T438">是交流道</text:span><text:span text:style-name="T95">。</text:span></text:p>
          </table:table-cell>
        </table:table-row>
      </table:table>
      <text:h text:style-name="P3" text:outline-level="2" loext:marker-style-name="T27"><text:span text:style-name="T28">三、</text:span><text:span text:style-name="T27">OSPF </text:span><text:span text:style-name="T28">的 </text:span><text:span text:style-name="T27">4 </text:span><text:span text:style-name="T28">種 </text:span><text:span text:style-name="T27">Router</text:span><text:span text:style-name="T28">（重點！）</text:span></text:h>
      <text:p text:style-name="P31" loext:marker-style-name="T96"><text:span text:style-name="T95">把整個 </text:span><text:span text:style-name="T129">OSPF </text:span><text:span text:style-name="T95">網路想像成一座城市：</text:span><text:span text:style-name="T101">城市裡有很多「區（</text:span><text:span text:style-name="T135">Area</text:span><text:span text:style-name="T101">）」像大樓</text:span><text:span text:style-name="T95">；</text:span><text:span text:style-name="T525">中間一定有「主幹道」就是 </text:span><text:span text:style-name="T526">Area 0</text:span><text:span text:style-name="T525">；所有大樓要互通都必須先連到 </text:span><text:span text:style-name="T526">Area 0</text:span><text:span text:style-name="T95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6" loext:marker-style-name="T72"><text:span text:style-name="T71">類型</text:span><text:span text:style-name="T72"/></text:p>
            </table:table-cell>
            <table:table-cell table:style-name="表格92.A1" office:value-type="string">
              <text:p text:style-name="P6" loext:marker-style-name="T72"><text:span text:style-name="T71">本質</text:span><text:span text:style-name="T72"/></text:p>
            </table:table-cell>
            <table:table-cell table:style-name="表格92.A1" office:value-type="string">
              <text:p text:style-name="P6" loext:marker-style-name="T72"><text:span text:style-name="T71">核心記憶點</text:span><text:span text:style-name="T72"/></text:p>
            </table:table-cell>
            <table:table-cell table:style-name="表格92.A1" office:value-type="string">
              <text:p text:style-name="P6" loext:marker-style-name="T72"><text:span text:style-name="T71">比喻</text:span><text:span text:style-name="T72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5" loext:marker-style-name="T112"><text:span text:style-name="T144">① Internal</text:span><text:span text:style-name="T112"/></text:p>
          </table:table-cell>
          <table:table-cell table:style-name="表格92.A2" office:value-type="string">
            <text:p text:style-name="P25" loext:marker-style-name="T112"><text:span text:style-name="T113">不出 </text:span><text:span text:style-name="T144">Area</text:span></text:p>
          </table:table-cell>
          <table:table-cell table:style-name="表格92.A2" office:value-type="string">
            <text:p text:style-name="P25" loext:marker-style-name="T112"><text:span text:style-name="T113">只在同一個 </text:span><text:span text:style-name="T144">Area </text:span><text:span text:style-name="T113">裡活動，對外一無所知</text:span></text:p>
          </table:table-cell>
          <table:table-cell table:style-name="表格92.A2" office:value-type="string">
            <text:p text:style-name="P25" loext:marker-style-name="T112"><text:span text:style-name="T113">只在一個辦公室活動的員工</text:span><text:span text:style-name="T112"/></text:p>
          </table:table-cell>
        </table:table-row>
        <table:table-row table:style-name="表格92.1">
          <table:table-cell table:style-name="表格92.A3" office:value-type="string">
            <text:p text:style-name="P25" loext:marker-style-name="T112"><text:span text:style-name="T144">② </text:span><text:span text:style-name="T527">Backbone</text:span></text:p>
          </table:table-cell>
          <table:table-cell table:style-name="表格92.A3" office:value-type="string">
            <text:p text:style-name="P25" loext:marker-style-name="T529"><text:span text:style-name="T528">在 </text:span><text:span text:style-name="T527">Area 0</text:span></text:p>
          </table:table-cell>
          <table:table-cell table:style-name="表格92.A3" office:value-type="string">
            <text:p text:style-name="P25" loext:marker-style-name="T112"><text:span text:style-name="T528">核心骨幹節點</text:span><text:span text:style-name="T113">，所有跨區流量都經過這裡</text:span></text:p>
          </table:table-cell>
          <table:table-cell table:style-name="表格92.A3" office:value-type="string">
            <text:p text:style-name="P25" loext:marker-style-name="T380"><text:span text:style-name="T379">高速公路主幹上的節點</text:span><text:span text:style-name="T380"/></text:p>
          </table:table-cell>
        </table:table-row>
        <table:table-row table:style-name="表格92.1">
          <table:table-cell table:style-name="表格92.A2" office:value-type="string">
            <text:p text:style-name="P25" loext:marker-style-name="T112"><text:span text:style-name="T144">③ </text:span><text:span text:style-name="T460">ABR</text:span></text:p>
          </table:table-cell>
          <table:table-cell table:style-name="表格92.A2" office:value-type="string">
            <text:p text:style-name="P25" loext:marker-style-name="T448"><text:span text:style-name="T447">跨 </text:span><text:span text:style-name="T460">Area </text:span><text:span text:style-name="T447">橋樑</text:span></text:p>
          </table:table-cell>
          <table:table-cell table:style-name="表格92.A2" office:value-type="string">
            <text:p text:style-name="P25" loext:marker-style-name="T448"><text:span text:style-name="T447">同時連 </text:span><text:span text:style-name="T460">Area 0 </text:span><text:span text:style-name="T447">與其他 </text:span><text:span text:style-name="T460">Area</text:span><text:span text:style-name="T447">，是區域間唯一合法的橋</text:span></text:p>
          </table:table-cell>
          <table:table-cell table:style-name="表格92.A2" office:value-type="string">
            <text:p text:style-name="P25" loext:marker-style-name="T267"><text:span text:style-name="T266">不同部門之間的聯絡窗口</text:span><text:span text:style-name="T267"/></text:p>
          </table:table-cell>
        </table:table-row>
        <table:table-row table:style-name="表格92.1">
          <table:table-cell table:style-name="表格92.A3" office:value-type="string">
            <text:p text:style-name="P25" loext:marker-style-name="T112"><text:span text:style-name="T144">④ </text:span><text:span text:style-name="T328">ASBR</text:span></text:p>
          </table:table-cell>
          <table:table-cell table:style-name="表格92.A3" office:value-type="string">
            <text:p text:style-name="P25" loext:marker-style-name="T112"><text:span text:style-name="T113">跨 </text:span><text:span text:style-name="T144">AS </text:span><text:span text:style-name="T113">入口</text:span></text:p>
          </table:table-cell>
          <table:table-cell table:style-name="表格92.A3" office:value-type="string">
            <text:p text:style-name="P25" loext:marker-style-name="T112"><text:span text:style-name="T113">把外部路由（</text:span><text:span text:style-name="T144">BGP/</text:span><text:span text:style-name="T113">靜態）引入 </text:span><text:span text:style-name="T144">OSPF</text:span><text:span text:style-name="T113">，</text:span><text:span text:style-name="T230">是對外入口</text:span></text:p>
          </table:table-cell>
          <table:table-cell table:style-name="表格92.A3" office:value-type="string">
            <text:p text:style-name="P25" loext:marker-style-name="T112"><text:span text:style-name="T113">公司對外的大門警衛室</text:span><text:span text:style-name="T112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8"><text:span text:style-name="T151">⚠️ <text:s/></text:span><text:span text:style-name="T173">考試最愛考的三個陷阱</text:span></text:p>
            <text:p text:style-name="P9"><text:span text:style-name="T189">✗ ABR </text:span><text:span text:style-name="T183">負責連接外部網路　→　</text:span><text:span text:style-name="T95">✓</text:span><text:span text:style-name="T100"> </text:span><text:span text:style-name="T134">ABR </text:span><text:span text:style-name="T100">只負責 </text:span><text:span text:style-name="T134">Area </text:span><text:span text:style-name="T100">之間的橋樑</text:span><text:span text:style-name="T95">，對外是 </text:span><text:span text:style-name="T129">ASBR </text:span><text:span text:style-name="T95">的工作。</text:span></text:p>
            <text:p text:style-name="P10"><text:span text:style-name="T189">✗ ASBR </text:span><text:span text:style-name="T183">是用來跨越不同 </text:span><text:span text:style-name="T189">Area</text:span><text:span text:style-name="T183">　→　</text:span><text:span text:style-name="T95">✓ </text:span><text:span text:style-name="T134">ASBR </text:span><text:span text:style-name="T100">是跨越不同 </text:span><text:span text:style-name="T134">AS</text:span><text:span text:style-name="T100">（整個系統）</text:span><text:span text:style-name="T95">，不是跨 </text:span><text:span text:style-name="T129">Area</text:span><text:span text:style-name="T95">。</text:span></text:p>
            <text:p text:style-name="P10"><text:span text:style-name="T189">✗ </text:span><text:span text:style-name="T183">任意兩個 </text:span><text:span text:style-name="T189">Area </text:span><text:span text:style-name="T183">可直接相連　→　</text:span><text:span text:style-name="T95">✓ </text:span><text:span text:style-name="T268">所有 </text:span><text:span text:style-name="T273">Area </text:span><text:span text:style-name="T268">一定要透過 </text:span><text:span text:style-name="T273">Area 0 </text:span><text:span text:style-name="T268">才能互通，不能繞過</text:span><text:span text:style-name="T95">。</text:span></text:p>
          </table:table-cell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四、</text:span><text:span text:style-name="T27">AS-PATH </text:span><text:span text:style-name="T28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22" loext:marker-style-name="T66"><text:span text:style-name="T75">📦 Route</text:span><text:span text:style-name="T65">（路由）</text:span></text:p>
            </table:table-cell>
            <table:table-cell table:style-name="表格93.A1" office:value-type="string">
              <text:p text:style-name="P22" loext:marker-style-name="T66"><text:span text:style-name="T75">📜 AS-PATH</text:span><text:span text:style-name="T66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5" loext:marker-style-name="T80"><text:span text:style-name="T79">回答「封包下一步要丟給誰？」。這是路由器最後做出</text:span><text:soft-page-break/><text:span text:style-name="T79">的轉送決定，對應到一個 </text:span><text:span text:style-name="T121">Next-Hop</text:span><text:span text:style-name="T79">（下一跳）。</text:span></text:p>
          </table:table-cell>
          <table:table-cell table:style-name="表格93.A2" office:value-type="string">
            <text:p text:style-name="P25" loext:marker-style-name="T80"><text:span text:style-name="T79">回答「這條路由消息一路經過了哪些 </text:span><text:span text:style-name="T121">AS</text:span><text:span text:style-name="T79">（自治系統）？」。它是一串 </text:span><text:span text:style-name="T121">AS </text:span><text:span text:style-name="T79">編號名單，也是 </text:span><text:span text:style-name="T216">BGP</text:span><text:span text:style-name="T121"> </text:span><text:span text:style-name="T79">用來判</text:span><text:soft-page-break/><text:span text:style-name="T79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5" loext:marker-style-name="T80"><text:span text:style-name="T79">是</text:span><text:span text:style-name="T307">「實際的轉送動作」——封包真的會照它走</text:span><text:span text:style-name="T79">。</text:span></text:p>
          </table:table-cell>
          <table:table-cell table:style-name="表格93.A2" office:value-type="string">
            <text:p text:style-name="P25" loext:marker-style-name="T80"><text:span text:style-name="T79">是</text:span><text:span text:style-name="T443">「這條路的來歷（履歷）」——封包根本看不到它</text:span><text:span text:style-name="T79">，</text:span><text:span text:style-name="T261">它只給 </text:span><text:span text:style-name="T258">BGP </text:span><text:span text:style-name="T261">參考</text:span><text:span text:style-name="T79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8"><text:span text:style-name="T151">🔎 <text:s/></text:span><text:span text:style-name="T48">看一個例子：兩條路由二選一</text:span></text:p>
            <text:p text:style-name="P9" loext:marker-style-name="T96"><text:span text:style-name="T134">Google </text:span><text:span text:style-name="T100">同時收到兩條到 </text:span><text:span text:style-name="T134">1.1.1.0/24 </text:span><text:span text:style-name="T100">的路由廣告</text:span><text:span text:style-name="T95">：</text:span><text:span text:style-name="T135">ISP A </text:span><text:span text:style-name="T101">的 </text:span><text:span text:style-name="T135">AS-PATH </text:span><text:span text:style-name="T101">是「</text:span><text:span text:style-name="T135">100 200 300</text:span><text:span text:style-name="T101">」（經過 </text:span><text:span text:style-name="T135">3 </text:span><text:span text:style-name="T101">個 </text:span><text:span text:style-name="T135">AS</text:span><text:span text:style-name="T101">）</text:span><text:span text:style-name="T95">，</text:span><text:span text:style-name="T135">ISP B </text:span><text:span text:style-name="T101">的 </text:span><text:span text:style-name="T135">AS-PATH </text:span><text:span text:style-name="T101">是「</text:span><text:span text:style-name="T135">400 300</text:span><text:span text:style-name="T101">」（只經過 </text:span><text:span text:style-name="T135">2 </text:span><text:span text:style-name="T101">個 </text:span><text:span text:style-name="T135">AS</text:span><text:span text:style-name="T101">）</text:span><text:span text:style-name="T95">。</text:span></text:p>
            <text:p text:style-name="P10"><text:span text:style-name="T99">在其他條件都相同時 →</text:span><text:span text:style-name="T237"> </text:span><text:span text:style-name="T247">BGP </text:span><text:span text:style-name="T237">會偏好較短的「</text:span><text:span text:style-name="T247">400 300</text:span><text:span text:style-name="T237">」</text:span><text:span text:style-name="T95">。</text:span></text:p>
            <text:p text:style-name="P10" loext:marker-style-name="T96"><text:span text:style-name="T95">小提醒：</text:span><text:span text:style-name="T273">AS-PATH </text:span><text:span text:style-name="T268">要從右邊讀起，最右邊的「</text:span><text:span text:style-name="T273">300</text:span><text:span text:style-name="T268">」才是這條路由的發源地（</text:span><text:span text:style-name="T273">Origin AS</text:span><text:span text:style-name="T268">）</text:span><text:span text:style-name="T95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8"><text:span text:style-name="T149">❁</text:span><text:span text:style-name="T95">假設你收到兩條路由：</text:span><text:span text:style-name="T132"><text:line-break/>Route A: AS-PATH = 100 200 300<text:line-break/>Route B: AS-PATH = 400 300<text:line-break/><text:line-break/></text:span><text:span text:style-name="T95">你先不要管 </text:span><text:span text:style-name="T132">Route </text:span><text:span text:style-name="T95">是什麼。</text:span><text:span text:style-name="T132"><text:line-break/><text:line-break/></text:span><text:span text:style-name="T95">只看 </text:span><text:span text:style-name="T132">AS-PATH</text:span><text:span text:style-name="T95">：</text:span><text:span text:style-name="T132">100 200 300 <text:s/></text:span><text:span text:style-name="T95">意思：我 ← </text:span><text:span text:style-name="T132">AS100 ← AS200 ← AS300<text:line-break/><text:line-break/></text:span><text:span text:style-name="T95">而</text:span><text:span text:style-name="T132">400 300 <text:s/></text:span><text:span text:style-name="T95">意思：我 ← </text:span><text:span text:style-name="T132">AS400 ← AS300<text:line-break/><text:line-break/></text:span><text:span text:style-name="T508">AS-PATH </text:span><text:span text:style-name="T505">就只是：這個路由消息經過了哪些 </text:span><text:span text:style-name="T508">AS </text:span><text:span text:style-name="T505">的名單。就這樣而已。</text:span><text:span text:style-name="T132"><text:line-break/><text:line-break/></text:span><text:span text:style-name="T95">然後 </text:span><text:span text:style-name="T248">BGP</text:span><text:span text:style-name="T132"> </text:span><text:span text:style-name="T95">看到：</text:span><text:span text:style-name="T132"><text:line-break/><text:line-break/>100 200 300 <text:s/></text:span><text:span text:style-name="T95">有 </text:span><text:span text:style-name="T132">3 </text:span><text:span text:style-name="T95">個 </text:span><text:span text:style-name="T132">AS</text:span><text:span text:style-name="T95">。</text:span><text:span text:style-name="T132"><text:line-break/><text:line-break/>400 300 <text:s/></text:span><text:span text:style-name="T95">有 </text:span><text:span text:style-name="T132">2 </text:span><text:span text:style-name="T95">個 </text:span><text:span text:style-name="T132">AS</text:span><text:span text:style-name="T95">。</text:span><text:span text:style-name="T132"><text:line-break/><text:line-break/></text:span><text:span text:style-name="T95">於是它想：</text:span><text:span text:style-name="T464">「嗯，看起來第二條比較短。」然後選第二條</text:span><text:span text:style-name="T95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8"><text:span text:style-name="T151">⚠️ <text:s/></text:span><text:span text:style-name="T48">新手最容易搞混的地方</text:span></text:p>
            <text:p text:style-name="P9" loext:marker-style-name="T96"><text:span text:style-name="T129">AS-PATH </text:span><text:span text:style-name="T95">不是寫在封包上的東西，也不是「下一跳」。封包只認 </text:span><text:span text:style-name="T129">Next-Hop</text:span><text:span text:style-name="T95">；</text:span><text:span text:style-name="T254">AS-PATH </text:span><text:span text:style-name="T243">純粹是 </text:span><text:span text:style-name="T254">BGP </text:span><text:span text:style-name="T243">拿來「比較哪條路由比較好」的參考資料</text:span><text:span text:style-name="T95">。</text:span></text:p>
            <text:p text:style-name="P8"><text:span text:style-name="T151">🎯 <text:s/></text:span><text:span text:style-name="T48">考點加碼：</text:span><text:span text:style-name="T59">AS-PATH </text:span><text:span text:style-name="T48">的另一個任務</text:span></text:p>
            <text:p text:style-name="P10" loext:marker-style-name="T96"><text:span text:style-name="T95">防迴圈！</text:span><text:span text:style-name="T100">當某個 </text:span><text:span text:style-name="T134">AS </text:span><text:span text:style-name="T100">發現一條路由的 </text:span><text:span text:style-name="T134">AS-PATH </text:span><text:span text:style-name="T100">裡「已經有自己的 </text:span><text:span text:style-name="T134">AS </text:span><text:span text:style-name="T100">編號」</text:span><text:span text:style-name="T95">，</text:span><text:span text:style-name="T268">就會直接丟棄這條路由，避免封包在 </text:span><text:span text:style-name="T273">AS </text:span><text:span text:style-name="T268">之間繞圈圈</text:span><text:span text:style-name="T95">。</text:span></text:p>
          </table:table-cell>
          <table:covered-table-cell/>
        </table:table-row>
      </table:table>
      <text:h text:style-name="P3" text:outline-level="2" loext:marker-style-name="T27"><text:span text:style-name="T28">五、</text:span><text:span text:style-name="T27">BGP </text:span><text:span text:style-name="T28">必背考點：高命中率一次搞懂</text:span></text:h>
      <text:p text:style-name="P31" loext:marker-style-name="T96"><text:span text:style-name="T129">BGP </text:span><text:span text:style-name="T95">不像 </text:span><text:span text:style-name="T129">OSPF </text:span><text:span text:style-name="T95">會自己算最短距離，它是在「比條件、看政策」。與其硬背排序表，不如先搞懂下面這 </text:span><text:span text:style-name="T132">9 </text:span><text:span text:style-name="T95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22" loext:marker-style-name="T72"><text:span text:style-name="T78">#</text:span><text:span text:style-name="T72"/></text:p>
            </table:table-cell>
            <table:table-cell table:style-name="表格94.A1" office:value-type="string">
              <text:p text:style-name="P22" loext:marker-style-name="T72"><text:span text:style-name="T71">考點</text:span><text:span text:style-name="T72"/></text:p>
            </table:table-cell>
            <table:table-cell table:style-name="表格94.A1" office:value-type="string">
              <text:p text:style-name="P22" loext:marker-style-name="T72"><text:span text:style-name="T71">一句話重點</text:span><text:span text:style-name="T72"/></text:p>
            </table:table-cell>
            <table:table-cell table:style-name="表格94.A1" office:value-type="string">
              <text:p text:style-name="P22" loext:marker-style-name="T72"><text:span text:style-name="T71">白話理解 </text:span><text:span text:style-name="T78">× </text:span><text:span text:style-name="T71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4" loext:marker-style-name="T80"><text:span text:style-name="T121">①</text:span><text:span text:style-name="T80"/></text:p>
          </table:table-cell>
          <table:table-cell table:style-name="表格94.A2" office:value-type="string">
            <text:p text:style-name="P25" loext:marker-style-name="T112"><text:span text:style-name="T144">TCP 179</text:span><text:span text:style-name="T112"/></text:p>
          </table:table-cell>
          <table:table-cell table:style-name="表格94.A2" office:value-type="string">
            <text:p text:style-name="P25" loext:marker-style-name="T112"><text:span text:style-name="T145">BGP </text:span><text:span text:style-name="T113">跑在 </text:span><text:span text:style-name="T145">TCP</text:span><text:span text:style-name="T113">，埠號 </text:span><text:span text:style-name="T145">179</text:span><text:span text:style-name="T113">（不是 </text:span><text:span text:style-name="T145">UDP</text:span><text:span text:style-name="T113">）</text:span></text:p>
          </table:table-cell>
          <table:table-cell table:style-name="表格94.A2" office:value-type="string">
            <text:p text:style-name="P25" loext:marker-style-name="T112"><text:span text:style-name="T113">要傳「整個網際網路」的路由，丟包會大亂，所以需要 </text:span><text:span text:style-name="T145">TCP </text:span><text:span text:style-name="T113">的可靠重送與順序保證。考：</text:span><text:span text:style-name="T145">BGP </text:span><text:span text:style-name="T113">傳輸層協定 → </text:span><text:span text:style-name="T145">TCP</text:span><text:span text:style-name="T113">。</text:span></text:p>
          </table:table-cell>
        </table:table-row>
        <table:table-row table:style-name="表格94.1">
          <table:table-cell table:style-name="表格94.A3" office:value-type="string">
            <text:p text:style-name="P24" loext:marker-style-name="T80"><text:span text:style-name="T121">②</text:span><text:span text:style-name="T80"/></text:p>
          </table:table-cell>
          <table:table-cell table:style-name="表格94.A3" office:value-type="string">
            <text:p text:style-name="P25" loext:marker-style-name="T112"><text:span text:style-name="T144">Path Vector</text:span><text:span text:style-name="T112"/></text:p>
          </table:table-cell>
          <table:table-cell table:style-name="表格94.A3" office:value-type="string">
            <text:p text:style-name="P25" loext:marker-style-name="T112"><text:span text:style-name="T145">BGP </text:span><text:span text:style-name="T113">屬於 </text:span><text:span text:style-name="T145">Path Vector </text:span><text:span text:style-name="T113">協定</text:span></text:p>
          </table:table-cell>
          <table:table-cell table:style-name="表格94.A3" office:value-type="string">
            <text:p text:style-name="P25" loext:marker-style-name="T112"><text:span text:style-name="T113">不只報「距離」，而是把「整條 </text:span><text:span text:style-name="T145">AS </text:span><text:span text:style-name="T113">路徑」報給你。</text:span><text:span text:style-name="T145">RIP</text:span><text:span text:style-name="T113">＝</text:span><text:span text:style-name="T145">Distance Vector</text:span><text:span text:style-name="T113">、</text:span><text:span text:style-name="T145">OSPF</text:span><text:span text:style-name="T113">＝</text:span><text:span text:style-name="T145">Link State</text:span><text:span text:style-name="T113">、</text:span><text:span text:style-name="T145">BGP</text:span><text:span text:style-name="T113">＝</text:span><text:soft-page-break/><text:span text:style-name="T145">Path Vector</text:span><text:span text:style-name="T113">。</text:span></text:p>
          </table:table-cell>
        </table:table-row>
        <table:table-row table:style-name="表格94.1">
          <table:table-cell table:style-name="表格94.A2" office:value-type="string">
            <text:p text:style-name="P24" loext:marker-style-name="T80"><text:span text:style-name="T121">③</text:span><text:span text:style-name="T80"/></text:p>
          </table:table-cell>
          <table:table-cell table:style-name="表格94.A2" office:value-type="string">
            <text:p text:style-name="P25" loext:marker-style-name="T112"><text:span text:style-name="T144">AS-PATH</text:span><text:span text:style-name="T113">（防迴圈）</text:span></text:p>
          </table:table-cell>
          <table:table-cell table:style-name="表格94.A2" office:value-type="string">
            <text:p text:style-name="P25" loext:marker-style-name="T112"><text:span text:style-name="T39">✅ </text:span><text:span text:style-name="T113">最大用途＝防 </text:span><text:span text:style-name="T145">Routing Loop</text:span></text:p>
          </table:table-cell>
          <table:table-cell table:style-name="表格94.A2" office:value-type="string">
            <text:p text:style-name="P25" loext:marker-style-name="T112"><text:span text:style-name="T145">AS </text:span><text:span text:style-name="T113">一看到 </text:span><text:span text:style-name="T145">AS-PATH </text:span><text:span text:style-name="T113">裡有「自己的 </text:span><text:span text:style-name="T145">AS </text:span><text:span text:style-name="T113">編號」就立刻丟棄，避免繞圈。考「</text:span><text:span text:style-name="T145">AS-PATH </text:span><text:span text:style-name="T113">主要功能」→ </text:span><text:span text:style-name="T145">Loop Prevention</text:span><text:span text:style-name="T113">。</text:span></text:p>
          </table:table-cell>
        </table:table-row>
        <table:table-row table:style-name="表格94.1">
          <table:table-cell table:style-name="表格94.A3" office:value-type="string">
            <text:p text:style-name="P24" loext:marker-style-name="T80"><text:span text:style-name="T121">④</text:span><text:span text:style-name="T80"/></text:p>
          </table:table-cell>
          <table:table-cell table:style-name="表格94.A3" office:value-type="string">
            <text:p text:style-name="P25" loext:marker-style-name="T112"><text:span text:style-name="T144">Local Preference</text:span><text:span text:style-name="T112"/></text:p>
          </table:table-cell>
          <table:table-cell table:style-name="表格94.A3" office:value-type="string">
            <text:p text:style-name="P25" loext:marker-style-name="T112"><text:span text:style-name="T40">數值越大越優先</text:span><text:span text:style-name="T112"/></text:p>
          </table:table-cell>
          <table:table-cell table:style-name="表格94.A3" office:value-type="string">
            <text:p text:style-name="P25" loext:marker-style-name="T112"><text:span text:style-name="T39">✅ </text:span><text:span text:style-name="T40">通用屬性中最重要！</text:span><text:span text:style-name="T113">是 </text:span><text:span text:style-name="T145">AS </text:span><text:span text:style-name="T113">的「內部政策」：想走哪個出口就把它設高分。</text:span></text:p>
          </table:table-cell>
        </table:table-row>
        <table:table-row table:style-name="表格94.1">
          <table:table-cell table:style-name="表格94.A2" office:value-type="string">
            <text:p text:style-name="P24" loext:marker-style-name="T80"><text:span text:style-name="T121">⑤</text:span><text:span text:style-name="T80"/></text:p>
          </table:table-cell>
          <table:table-cell table:style-name="表格94.A2" office:value-type="string">
            <text:p text:style-name="P25" loext:marker-style-name="T112"><text:span text:style-name="T144">AS-PATH</text:span><text:span text:style-name="T113">（長度）</text:span></text:p>
          </table:table-cell>
          <table:table-cell table:style-name="表格94.A2" office:value-type="string">
            <text:p text:style-name="P25" loext:marker-style-name="T112"><text:span text:style-name="T113">路徑越短（經過 </text:span><text:span text:style-name="T145">AS </text:span><text:span text:style-name="T113">越少）越優先</text:span></text:p>
          </table:table-cell>
          <table:table-cell table:style-name="表格94.A2" office:value-type="string">
            <text:p text:style-name="P25" loext:marker-style-name="T112"><text:span text:style-name="T39">⚠️ </text:span><text:span text:style-name="T113">但要先比 </text:span><text:span text:style-name="T145">Weight</text:span><text:span text:style-name="T113">、</text:span><text:span text:style-name="T145">Local Pref</text:span><text:span text:style-name="T113">，前面平手才輪到它——別誤以為 </text:span><text:span text:style-name="T145">AS-PATH </text:span><text:span text:style-name="T113">最重要。</text:span></text:p>
          </table:table-cell>
        </table:table-row>
        <table:table-row table:style-name="表格94.1">
          <table:table-cell table:style-name="表格94.A3" office:value-type="string">
            <text:p text:style-name="P24" loext:marker-style-name="T80"><text:span text:style-name="T121">⑥</text:span><text:span text:style-name="T80"/></text:p>
          </table:table-cell>
          <table:table-cell table:style-name="表格94.A3" office:value-type="string">
            <text:p text:style-name="P25" loext:marker-style-name="T112"><text:span text:style-name="T144">MED</text:span><text:span text:style-name="T112"/></text:p>
          </table:table-cell>
          <table:table-cell table:style-name="表格94.A3" office:value-type="string">
            <text:p text:style-name="P25" loext:marker-style-name="T112"><text:span text:style-name="T113">數值越小越優先</text:span><text:span text:style-name="T112"/></text:p>
          </table:table-cell>
          <table:table-cell table:style-name="表格94.A3" office:value-type="string">
            <text:p text:style-name="P25" loext:marker-style-name="T112"><text:span text:style-name="T113">告訴鄰居「請從這個入口進來」，數字小的入口優先。</text:span><text:span text:style-name="T112"/></text:p>
          </table:table-cell>
        </table:table-row>
        <table:table-row table:style-name="表格94.1">
          <table:table-cell table:style-name="表格94.A2" office:value-type="string">
            <text:p text:style-name="P24" loext:marker-style-name="T80"><text:span text:style-name="T121">⑦</text:span><text:span text:style-name="T80"/></text:p>
          </table:table-cell>
          <table:table-cell table:style-name="表格94.A2" office:value-type="string">
            <text:p text:style-name="P25" loext:marker-style-name="T112"><text:span text:style-name="T144">eBGP vs iBGP</text:span><text:span text:style-name="T112"/></text:p>
          </table:table-cell>
          <table:table-cell table:style-name="表格94.A2" office:value-type="string">
            <text:p text:style-name="P25" loext:marker-style-name="T112"><text:span text:style-name="T145">eBGP </text:span><text:span text:style-name="T113">優先於 </text:span><text:span text:style-name="T145">iBGP</text:span></text:p>
          </table:table-cell>
          <table:table-cell table:style-name="表格94.A2" office:value-type="string">
            <text:p text:style-name="P25" loext:marker-style-name="T112"><text:span text:style-name="T145">eBGP</text:span><text:span text:style-name="T113">＝外面直接告訴你；</text:span><text:span text:style-name="T145">iBGP</text:span><text:span text:style-name="T113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24" loext:marker-style-name="T80"><text:span text:style-name="T121">⑧</text:span><text:span text:style-name="T80"/></text:p>
          </table:table-cell>
          <table:table-cell table:style-name="表格94.A3" office:value-type="string">
            <text:p text:style-name="P25" loext:marker-style-name="T112"><text:span text:style-name="T144">MED</text:span><text:span text:style-name="T113">（比較範圍）</text:span></text:p>
          </table:table-cell>
          <table:table-cell table:style-name="表格94.A3" office:value-type="string">
            <text:p text:style-name="P25" loext:marker-style-name="T112"><text:span text:style-name="T113">只比較同一個「來源 </text:span><text:span text:style-name="T145">AS</text:span><text:span text:style-name="T113">」</text:span></text:p>
          </table:table-cell>
          <table:table-cell table:style-name="表格94.A3" office:value-type="string">
            <text:p text:style-name="P25" loext:marker-style-name="T112"><text:span text:style-name="T39">⚠️ </text:span><text:span text:style-name="T113">不同 </text:span><text:span text:style-name="T145">AS </text:span><text:span text:style-name="T113">的 </text:span><text:span text:style-name="T145">MED </text:span><text:span text:style-name="T113">不能互比；只在同一家公司的建議之間比大小。最愛考！</text:span></text:p>
          </table:table-cell>
        </table:table-row>
        <table:table-row table:style-name="表格94.1">
          <table:table-cell table:style-name="表格94.A2" office:value-type="string">
            <text:p text:style-name="P24" loext:marker-style-name="T80"><text:span text:style-name="T121">⑨</text:span><text:span text:style-name="T80"/></text:p>
          </table:table-cell>
          <table:table-cell table:style-name="表格94.A2" office:value-type="string">
            <text:p text:style-name="P25" loext:marker-style-name="T112"><text:span text:style-name="T144">Weight</text:span><text:span text:style-name="T112"/></text:p>
          </table:table-cell>
          <table:table-cell table:style-name="表格94.A2" office:value-type="string">
            <text:p text:style-name="P25" loext:marker-style-name="T112"><text:span text:style-name="T39">Cisco </text:span><text:span text:style-name="T40">私有</text:span><text:span text:style-name="T113">，非 </text:span><text:span text:style-name="T145">BGP </text:span><text:span text:style-name="T113">標準</text:span></text:p>
          </table:table-cell>
          <table:table-cell table:style-name="表格94.A2" office:value-type="string">
            <text:p text:style-name="P25" loext:marker-style-name="T112"><text:span text:style-name="T39">⚠️ </text:span><text:span text:style-name="T113">看到「</text:span><text:span text:style-name="T145">BGP </text:span><text:span text:style-name="T113">標準屬性」選項別選 </text:span><text:span text:style-name="T145">Weight</text:span><text:span text:style-name="T113">（</text:span><text:span text:style-name="T145">Juniper</text:span><text:span text:style-name="T113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8"><text:span text:style-name="T151">🧠 <text:s/></text:span><text:span text:style-name="T201">白話理解（這句最重要）</text:span></text:p>
            <text:p text:style-name="P9" loext:marker-style-name="T96"><text:span text:style-name="T247">BGP </text:span><text:span text:style-name="T237">心裡在想：「哪條路比較值得信任？比較符合政策？」不是「哪條最短」</text:span><text:span text:style-name="T95">（</text:span><text:span text:style-name="T268">那是 </text:span><text:span text:style-name="T273">OSPF </text:span><text:span text:style-name="T268">在做的事</text:span><text:span text:style-name="T95">）。</text:span></text:p>
            <text:p text:style-name="P10"><text:span text:style-name="T202">一句話總結 → </text:span><text:span text:style-name="T129">BGP </text:span><text:span text:style-name="T95">是政策導向（</text:span><text:span text:style-name="T129">policy-based routing</text:span><text:span text:style-name="T95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8"><text:span text:style-name="T151">⚡ <text:s/></text:span><text:span text:style-name="T155">考前濃縮版（</text:span><text:span text:style-name="T165">10 </text:span><text:span text:style-name="T155">秒掃過）</text:span></text:p>
            <text:p text:style-name="P9" loext:marker-style-name="T96"><text:span text:style-name="T129">BGP</text:span><text:span text:style-name="T95">＝</text:span><text:span text:style-name="T129">TCP 179</text:span><text:span text:style-name="T95">、</text:span><text:span text:style-name="T129">Path Vector</text:span><text:span text:style-name="T95">｜</text:span><text:span text:style-name="T129">AS-PATH</text:span><text:span text:style-name="T95">：防迴圈＋越短越好｜</text:span><text:span text:style-name="T129">Local Preference</text:span><text:span text:style-name="T95">：越大越好｜</text:span><text:span text:style-name="T129">MED</text:span><text:span text:style-name="T95">：越小越好＋只比同 </text:span><text:span text:style-name="T129">AS</text:span><text:span text:style-name="T95">｜</text:span><text:span text:style-name="T129">eBGP &gt; iBGP</text:span><text:span text:style-name="T95">｜</text:span><text:span text:style-name="T129">Weight</text:span><text:span text:style-name="T95">：</text:span><text:span text:style-name="T129">Cisco </text:span><text:span text:style-name="T95">私有。</text:span></text:p>
            <text:p text:style-name="P9" loext:marker-style-name="T96"><text:span text:style-name="T95">選路優先順序：</text:span><text:span text:style-name="T129">Weight &gt; Local Pref &gt; </text:span><text:span text:style-name="T95">自己產生 </text:span><text:span text:style-name="T129">&gt; AS-PATH &gt; Origin &gt; MED &gt; eBGP &gt; IGP cost &gt; Router ID</text:span><text:span text:style-name="T95">（</text:span><text:span text:style-name="T129">Weight </text:span><text:span text:style-name="T95">為 </text:span><text:span text:style-name="T129">Cisco </text:span><text:span text:style-name="T95">私有；</text:span><text:span text:style-name="T129">Local Pref </text:span><text:span text:style-name="T95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六、</text:span><text:span text:style-name="T27">BGP </text:span><text:span text:style-name="T28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9"><text:span text:style-name="T189">✗ AS-PATH </text:span><text:span text:style-name="T183">是 </text:span><text:span text:style-name="T189">BGP </text:span><text:span text:style-name="T183">選路最重要的屬性　→　</text:span><text:span text:style-name="T95">✓ </text:span><text:span text:style-name="T129">Local Preference </text:span><text:span text:style-name="T95">才是最重要的通用屬性（</text:span><text:span text:style-name="T129">Weight </text:span><text:span text:style-name="T95">是 </text:span><text:span text:style-name="T129">Cisco </text:span><text:span text:style-name="T95">私有）。</text:span></text:p>
            <text:p text:style-name="P10"><text:span text:style-name="T189">✗ AS-PATH </text:span><text:span text:style-name="T183">越短就一定會選那條　→　</text:span><text:span text:style-name="T95">✓ 只有前面的屬性（</text:span><text:span text:style-name="T129">Local Pref </text:span><text:span text:style-name="T95">等）完全相同時，才會比較 </text:span><text:span text:style-name="T129">AS-PATH</text:span><text:span text:style-name="T95">。</text:span></text:p>
            <text:p text:style-name="P10"><text:span text:style-name="T189">✗ BGP </text:span><text:span text:style-name="T183">會自己計算最短路徑　→　</text:span><text:span text:style-name="T95">✓ </text:span><text:span text:style-name="T129">BGP </text:span><text:span text:style-name="T95">不算距離，</text:span><text:span text:style-name="T129">OSPF </text:span><text:span text:style-name="T95">才做最短路徑計算。</text:span></text:p>
            <text:p text:style-name="P10"><text:span text:style-name="T189">✗ iBGP </text:span><text:span text:style-name="T183">比 </text:span><text:span text:style-name="T189">eBGP </text:span><text:span text:style-name="T183">優先　→　</text:span><text:span text:style-name="T95">✓ </text:span><text:span text:style-name="T129">eBGP </text:span><text:span text:style-name="T95">優先於 </text:span><text:span text:style-name="T129">iBGP</text:span><text:span text:style-name="T95">（外部路由更可信）。</text:span></text:p>
            <text:p text:style-name="P10"><text:span text:style-name="T189">✗ MED </text:span><text:span text:style-name="T183">可以跨不同 </text:span><text:span text:style-name="T189">AS </text:span><text:span text:style-name="T183">互相比較　→　</text:span><text:span text:style-name="T95">✓ </text:span><text:span text:style-name="T129">MED </text:span><text:span text:style-name="T95">只能比較來自同一個 </text:span><text:span text:style-name="T129">AS </text:span><text:span text:style-name="T95">的路由。</text:span></text:p>
          </table:table-cell>
        </table:table-row>
      </table:table>
      <text:h text:style-name="P3" text:outline-level="2" loext:marker-style-name="T27"><text:span text:style-name="T28">七、</text:span><text:span text:style-name="T27">BGP + NAT + </text:span><text:span text:style-name="T28">防火牆 整合流程</text:span></text:h>
      <text:p text:style-name="P31" loext:marker-style-name="T96"><text:span text:style-name="T95">把三個概念串在一起，這才是實務上封包實際走的路。情境：你的電腦要連到健保署，有兩條對外線路</text:span><text:soft-page-break/><text:span text:style-name="T95">（中華電信 </text:span><text:span text:style-name="T129">AS-PATH </text:span><text:span text:style-name="T95">長度 </text:span><text:span text:style-name="T129">2</text:span><text:span text:style-name="T95">、台灣固網 </text:span><text:span text:style-name="T129">AS-PATH </text:span><text:span text:style-name="T95">長度 </text:span><text:span text:style-name="T129">3</text:span><text:span text:style-name="T95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6" loext:marker-style-name="T72"><text:span text:style-name="T71">步驟</text:span><text:span text:style-name="T72"/></text:p>
            </table:table-cell>
            <table:table-cell table:style-name="表格96.A1" office:value-type="string">
              <text:p text:style-name="P6" loext:marker-style-name="T72"><text:span text:style-name="T71">動作</text:span><text:span text:style-name="T72"/></text:p>
            </table:table-cell>
            <table:table-cell table:style-name="表格96.A1" office:value-type="string">
              <text:p text:style-name="P6" loext:marker-style-name="T72"><text:span text:style-name="T71">關鍵一句</text:span><text:span text:style-name="T72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5" loext:marker-style-name="T112"><text:span text:style-name="T144">1 </text:span><text:span text:style-name="T113">封包產生</text:span></text:p>
          </table:table-cell>
          <table:table-cell table:style-name="表格96.A2" office:value-type="string">
            <text:p text:style-name="P25" loext:marker-style-name="T112"><text:span text:style-name="T113">你的電腦說「我要去健保署 </text:span><text:span text:style-name="T144">IP</text:span><text:span text:style-name="T113">」</text:span></text:p>
          </table:table-cell>
          <table:table-cell table:style-name="表格96.A2" office:value-type="string">
            <text:p text:style-name="P25" loext:marker-style-name="T112"><text:span text:style-name="T113">封包準備出發</text:span><text:span text:style-name="T112"/></text:p>
          </table:table-cell>
        </table:table-row>
        <table:table-row table:style-name="表格96.1">
          <table:table-cell table:style-name="表格96.A3" office:value-type="string">
            <text:p text:style-name="P25" loext:marker-style-name="T112"><text:span text:style-name="T144">2 </text:span><text:span text:style-name="T113">防火牆 </text:span><text:span text:style-name="T144">Firewall</text:span></text:p>
          </table:table-cell>
          <table:table-cell table:style-name="表格96.A3" office:value-type="string">
            <text:p text:style-name="P25" loext:marker-style-name="T112"><text:span text:style-name="T113">看來源</text:span><text:span text:style-name="T144">/</text:span><text:span text:style-name="T113">目的 </text:span><text:span text:style-name="T144">IP</text:span><text:span text:style-name="T113">、</text:span><text:span text:style-name="T144">Port</text:span><text:span text:style-name="T113">，不符就擋掉</text:span></text:p>
          </table:table-cell>
          <table:table-cell table:style-name="表格96.A3" office:value-type="string">
            <text:p text:style-name="P25" loext:marker-style-name="T112"><text:span text:style-name="T113">防火牆決定「能不能走」</text:span><text:span text:style-name="T112"/></text:p>
          </table:table-cell>
        </table:table-row>
        <table:table-row table:style-name="表格96.1">
          <table:table-cell table:style-name="表格96.A2" office:value-type="string">
            <text:p text:style-name="P25" loext:marker-style-name="T112"><text:span text:style-name="T144">3 NAT</text:span><text:span text:style-name="T112"/></text:p>
          </table:table-cell>
          <table:table-cell table:style-name="表格96.A2" office:value-type="string">
            <text:p text:style-name="P25" loext:marker-style-name="T112"><text:span text:style-name="T113">把私有 </text:span><text:span text:style-name="T144">IP </text:span><text:span text:style-name="T113">換成公網 </text:span><text:span text:style-name="T144">IP</text:span><text:span text:style-name="T113">（</text:span><text:span text:style-name="T144">192.168.1.10 → 203.66.x.x</text:span><text:span text:style-name="T113">）</text:span></text:p>
          </table:table-cell>
          <table:table-cell table:style-name="表格96.A2" office:value-type="string">
            <text:p text:style-name="P25" loext:marker-style-name="T112"><text:span text:style-name="T144">NAT </text:span><text:span text:style-name="T113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5" loext:marker-style-name="T112"><text:span text:style-name="T144">4 BGP </text:span><text:span text:style-name="T113">選路</text:span></text:p>
          </table:table-cell>
          <table:table-cell table:style-name="表格96.A3" office:value-type="string">
            <text:p text:style-name="P25" loext:marker-style-name="T112"><text:span text:style-name="T113">比條件：若相同選 </text:span><text:span text:style-name="T144">AS-PATH </text:span><text:span text:style-name="T113">較短路</text:span><text:span text:style-name="T144">1</text:span><text:span text:style-name="T113">；若中華電信 </text:span><text:span text:style-name="T144">Local Pref </text:span><text:span text:style-name="T113">較高則不管長短走路</text:span><text:span text:style-name="T144">1</text:span></text:p>
          </table:table-cell>
          <table:table-cell table:style-name="表格96.A3" office:value-type="string">
            <text:p text:style-name="P25" loext:marker-style-name="T112"><text:span text:style-name="T144">BGP </text:span><text:span text:style-name="T113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5" loext:marker-style-name="T112"><text:span text:style-name="T144">5 </text:span><text:span text:style-name="T113">出 </text:span><text:span text:style-name="T144">ISP </text:span><text:span text:style-name="T113">跨 </text:span><text:span text:style-name="T144">AS</text:span></text:p>
          </table:table-cell>
          <table:table-cell table:style-name="表格96.A2" office:value-type="string">
            <text:p text:style-name="P25" loext:marker-style-name="T112"><text:span text:style-name="T113">封包經過多個 </text:span><text:span text:style-name="T144">AS</text:span><text:span text:style-name="T113">（這就是 </text:span><text:span text:style-name="T144">AS-PATH </text:span><text:span text:style-name="T113">的來源）</text:span></text:p>
          </table:table-cell>
          <table:table-cell table:style-name="表格96.A2" office:value-type="string">
            <text:p text:style-name="P25" loext:marker-style-name="T112"><text:span text:style-name="T144">—</text:span><text:span text:style-name="T112"/></text:p>
          </table:table-cell>
        </table:table-row>
        <table:table-row table:style-name="表格96.1">
          <table:table-cell table:style-name="表格96.A3" office:value-type="string">
            <text:p text:style-name="P25" loext:marker-style-name="T112"><text:span text:style-name="T144">6 </text:span><text:span text:style-name="T113">到達健保署</text:span></text:p>
          </table:table-cell>
          <table:table-cell table:style-name="表格96.A3" office:value-type="string">
            <text:p text:style-name="P25" loext:marker-style-name="T112"><text:span text:style-name="T113">健保署收到請求，完成連線</text:span><text:span text:style-name="T112"/></text:p>
          </table:table-cell>
          <table:table-cell table:style-name="表格96.A3" office:value-type="string">
            <text:p text:style-name="P25" loext:marker-style-name="T112"><text:span text:style-name="T144">—</text:span><text:span text:style-name="T112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8"><text:span text:style-name="T151">🎯 <text:s/></text:span><text:span text:style-name="T201">三層分工，一句話各自記</text:span></text:p>
            <text:p text:style-name="P9"><text:span text:style-name="T202">防火牆 → </text:span><text:span text:style-name="T95">決定「能不能走」｜</text:span><text:span text:style-name="T208">NAT → </text:span><text:span text:style-name="T95">解決「你是誰」｜</text:span><text:span text:style-name="T208">BGP → </text:span><text:span text:style-name="T95">決定「要怎麼走」</text:span></text:p>
            <text:p text:style-name="P10" loext:marker-style-name="T96"><text:span text:style-name="T95">生活比喻：海關（防火牆）→ 換護照</text:span><text:span text:style-name="T129">/</text:span><text:span text:style-name="T95">身份（</text:span><text:span text:style-name="T129">NAT</text:span><text:span text:style-name="T95">）→ 選航班（</text:span><text:span text:style-name="T129">BGP</text:span><text:span text:style-name="T95">）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8"><text:span text:style-name="T151">⚠️ <text:s/></text:span><text:span text:style-name="T173">整合情境的考試陷阱</text:span></text:p>
            <text:p text:style-name="P9"><text:span text:style-name="T189">✗ </text:span><text:span text:style-name="T183">封包送不出去 → 一定是 </text:span><text:span text:style-name="T189">BGP </text:span><text:span text:style-name="T183">問題　→　</text:span><text:span text:style-name="T95">✓ 應依序排查：防火牆有沒有擋？</text:span><text:span text:style-name="T129">NAT </text:span><text:span text:style-name="T95">有沒有設？</text:span><text:span text:style-name="T129">BGP </text:span><text:span text:style-name="T95">有沒有路？</text:span></text:p>
            <text:p text:style-name="P10"><text:span text:style-name="T189">✗ </text:span><text:span text:style-name="T183">有路但連不到 → 是 </text:span><text:span text:style-name="T189">BGP </text:span><text:span text:style-name="T183">路由問題　→　</text:span><text:span text:style-name="T95">✓ 通常是防火牆或 </text:span><text:span text:style-name="T129">NAT </text:span><text:span text:style-name="T95">問題，不是 </text:span><text:span text:style-name="T129">BGP</text:span><text:span text:style-name="T95">。</text:span></text:p>
            <text:p text:style-name="P10"><text:span text:style-name="T189">✗ </text:span><text:span text:style-name="T183">走到錯誤的 </text:span><text:span text:style-name="T189">ISP → </text:span><text:span text:style-name="T183">是 </text:span><text:span text:style-name="T189">NAT </text:span><text:span text:style-name="T183">設定問題　→　</text:span><text:span text:style-name="T95">✓ 走到錯誤 </text:span><text:span text:style-name="T129">ISP </text:span><text:span text:style-name="T95">是 </text:span><text:span text:style-name="T129">BGP </text:span><text:span text:style-name="T95">選路問題（</text:span><text:span text:style-name="T129">Local Pref </text:span><text:span text:style-name="T95">或 </text:span><text:span text:style-name="T129">AS-PATH </text:span><text:span text:style-name="T95">設定不對）。</text:span></text:p>
          </table:table-cell>
          <table:covered-table-cell/>
          <table:covered-table-cell/>
        </table:table-row>
      </table:table>
      <text:h text:style-name="P13" text:outline-level="1" loext:marker-style-name="T68"><text:span text:style-name="T67">第 八 篇　網路系統進階：</text:span><text:span text:style-name="T68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8"><text:span text:style-name="T151">🌐 <text:s/></text:span><text:span text:style-name="T48">本篇重點</text:span></text:p>
            <text:p text:style-name="P9" loext:marker-style-name="T96"><text:span text:style-name="T95">本篇涵蓋四大現代網路主題：</text:span><text:span text:style-name="T129">SDN</text:span><text:span text:style-name="T95">（網路如何被控制）、</text:span><text:span text:style-name="T129">Load Balancing</text:span><text:span text:style-name="T95">（流量如何分配）、</text:span><text:span text:style-name="T129">CDN</text:span><text:span text:style-name="T95">（網站如何加速）、</text:span><text:span text:style-name="T129">5G</text:span><text:span text:style-name="T95">（新世代行動網路特性）。</text:span></text:p>
          </table:table-cell>
        </table:table-row>
      </table:table>
      <text:h text:style-name="P3" text:outline-level="2" loext:marker-style-name="T27"><text:span text:style-name="T28">一、</text:span><text:span text:style-name="T27">SDN</text:span><text:span text:style-name="T28">（軟體定義網路）</text:span></text:h>
      <text:p text:style-name="P31" loext:marker-style-name="T96"><text:span text:style-name="T129">SDN</text:span><text:span text:style-name="T95">（</text:span><text:span text:style-name="T129">Software Defined Networking</text:span><text:span text:style-name="T95">）的核心概念是：將「控制平面」與「資料平面」分離。傳統網路中路由器和交換器同時負責「決定資料走哪條路」和「實際傳送資料」，</text:span><text:span text:style-name="T129">SDN </text:span><text:span text:style-name="T95">則把「決策」抽出來交給集中式的 </text:span><text:span text:style-name="T129">Controller </text:span><text:span text:style-name="T95">統一管理。（</text:span><text:span text:style-name="T129">Router</text:span><text:span text:style-name="T95">：負責「不同網路之間」傳資料；</text:span><text:span text:style-name="T129">Switch</text:span><text:span text:style-name="T95">：負責「同一個網路內」傳資料）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8"><text:span text:style-name="T151">🟦 <text:s/></text:span><text:span text:style-name="T201">核心概念（考試最常考）</text:span></text:p>
            <text:p text:style-name="P9"><text:span text:style-name="T202">控制平面（</text:span><text:span text:style-name="T208">Control Plane</text:span><text:span text:style-name="T202">）：</text:span><text:span text:style-name="T95">決定資料「怎麼走」——負責路由決策的大腦。</text:span></text:p>
            <text:p text:style-name="P10"><text:span text:style-name="T202">資料平面（</text:span><text:span text:style-name="T208">Data Plane</text:span><text:span text:style-name="T202">）：</text:span><text:span text:style-name="T95">負責資料「實際傳送」——執行指令的手腳。</text:span></text:p>
            <text:p text:style-name="P10"><text:span text:style-name="T208">🔑 </text:span><text:span text:style-name="T202">關鍵：</text:span><text:span text:style-name="T95">兩者分離，是 </text:span><text:span text:style-name="T129">SDN </text:span><text:span text:style-name="T95">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6" loext:marker-style-name="T72"><text:span text:style-name="T71">三層架構</text:span><text:span text:style-name="T72"/></text:p>
          </table:table-cell>
          <table:table-cell table:style-name="表格98.A2" office:value-type="string">
            <text:p text:style-name="P6" loext:marker-style-name="T72"><text:span text:style-name="T71">說明</text:span><text:span text:style-name="T72"/></text:p>
          </table:table-cell>
          <table:table-cell table:style-name="表格98.A2" office:value-type="string">
            <text:p text:style-name="P6" loext:marker-style-name="T72"><text:span text:style-name="T71">白話</text:span><text:span text:style-name="T72"/></text:p>
          </table:table-cell>
        </table:table-row>
        <table:table-row table:style-name="表格98.1">
          <table:table-cell table:style-name="表格98.A3" office:value-type="string">
            <text:p text:style-name="P25" loext:marker-style-name="T112"><text:span text:style-name="T144">🟦 Application Layer </text:span><text:span text:style-name="T113">應用層</text:span></text:p>
          </table:table-cell>
          <table:table-cell table:style-name="表格98.A3" office:value-type="string">
            <text:p text:style-name="P25" loext:marker-style-name="T112"><text:span text:style-name="T113">使用者所使用的服務，如網頁、</text:span><text:span text:style-name="T144">API</text:span><text:span text:style-name="T113">、</text:span><text:span text:style-name="T144">App</text:span></text:p>
          </table:table-cell>
          <table:table-cell table:style-name="表格98.A3" office:value-type="string">
            <text:p text:style-name="P25" loext:marker-style-name="T112"><text:span text:style-name="T113">你真正在用的東西</text:span><text:span text:style-name="T112"/></text:p>
          </table:table-cell>
        </table:table-row>
        <table:table-row table:style-name="表格98.1">
          <table:table-cell table:style-name="表格98.A4" office:value-type="string">
            <text:p text:style-name="P25" loext:marker-style-name="T112"><text:span text:style-name="T144">🟨 Control Layer </text:span><text:span text:style-name="T113">控制層</text:span></text:p>
          </table:table-cell>
          <table:table-cell table:style-name="表格98.A4" office:value-type="string">
            <text:p text:style-name="P25" loext:marker-style-name="T112"><text:span text:style-name="T144">SDN Controller</text:span><text:span text:style-name="T113">（大腦），決定資料流向、集中管理</text:span></text:p>
          </table:table-cell>
          <table:table-cell table:style-name="表格98.A4" office:value-type="string">
            <text:p text:style-name="P25" loext:marker-style-name="T112"><text:span text:style-name="T113">交通指揮中心</text:span><text:span text:style-name="T112"/></text:p>
          </table:table-cell>
        </table:table-row>
        <table:table-row table:style-name="表格98.1">
          <table:table-cell table:style-name="表格98.A3" office:value-type="string">
            <text:p text:style-name="P25" loext:marker-style-name="T112"><text:span text:style-name="T144">🟩 Infrastructure Layer </text:span><text:span text:style-name="T113">基礎層</text:span></text:p>
          </table:table-cell>
          <table:table-cell table:style-name="表格98.A3" office:value-type="string">
            <text:p text:style-name="P25" loext:marker-style-name="T112"><text:span text:style-name="T113">真正傳送資料的設備，如 </text:span><text:span text:style-name="T144">Router</text:span><text:span text:style-name="T113">、</text:span><text:span text:style-name="T144">Switch</text:span></text:p>
          </table:table-cell>
          <table:table-cell table:style-name="表格98.A3" office:value-type="string">
            <text:p text:style-name="P25" loext:marker-style-name="T112"><text:span text:style-name="T113">路、車道和車子</text:span><text:span text:style-name="T112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8"><text:span text:style-name="T151">⚡ <text:s/></text:span><text:span text:style-name="T155">記憶口訣</text:span></text:p>
            <text:p text:style-name="P9" loext:marker-style-name="T96"><text:span text:style-name="T95">「</text:span><text:span text:style-name="T129">SDN </text:span><text:span text:style-name="T95">分平面、三層 </text:span><text:span text:style-name="T129">App-</text:span><text:span text:style-name="T95">控</text:span><text:span text:style-name="T129">-</text:span><text:span text:style-name="T95">基」→ 分平面＝控制／資料分離；三層＝</text:span><text:span text:style-name="T129">Application / Control / Infrastructure</text:span><text:span text:style-name="T95">。</text:span></text:p>
          </table:table-cell>
          <table:covered-table-cell/>
          <table:covered-table-cell/>
        </table:table-row>
      </table:table>
      <text:h text:style-name="P3" text:outline-level="2" loext:marker-style-name="T27"><text:span text:style-name="T28">二、</text:span><text:span text:style-name="T27">Load Balancing</text:span><text:span text:style-name="T28">（負載平衡）</text:span></text:h>
      <text:p text:style-name="P31" loext:marker-style-name="T96"><text:span text:style-name="T95">當大量使用者同時存取同一網站，單一台伺服器會不堪負荷。負載平衡器把流量「智慧分配」到多台伺服器，確保每台都不過載。</text:span><text:span text:style-name="T96"/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6" loext:marker-style-name="T72"><text:span text:style-name="T71">策略</text:span><text:span text:style-name="T72"/></text:p>
            </table:table-cell>
            <table:table-cell table:style-name="表格99.A1" office:value-type="string">
              <text:p text:style-name="P6" loext:marker-style-name="T72"><text:span text:style-name="T71">說明</text:span><text:span text:style-name="T72"/></text:p>
            </table:table-cell>
            <table:table-cell table:style-name="表格99.A1" office:value-type="string">
              <text:p text:style-name="P6" loext:marker-style-name="T72"><text:span text:style-name="T71">優 </text:span><text:span text:style-name="T77">/ </text:span><text:span text:style-name="T71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5" loext:marker-style-name="T112"><text:span text:style-name="T144">① Round Robin</text:span><text:span text:style-name="T113">（輪詢）</text:span></text:p>
          </table:table-cell>
          <table:table-cell table:style-name="表格99.A2" office:value-type="string">
            <text:p text:style-name="P25" loext:marker-style-name="T112"><text:span text:style-name="T113">依序輪流分配，不考慮伺服器效能或負載</text:span><text:span text:style-name="T112"/></text:p>
          </table:table-cell>
          <table:table-cell table:style-name="表格99.A2" office:value-type="string">
            <text:p text:style-name="P25" loext:marker-style-name="T112"><text:span text:style-name="T144">✓ </text:span><text:span text:style-name="T113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5" loext:marker-style-name="T112"><text:span text:style-name="T144">② Weighted Round Robin</text:span><text:span text:style-name="T113">（加權輪詢）</text:span></text:p>
          </table:table-cell>
          <table:table-cell table:style-name="表格99.A3" office:value-type="string">
            <text:p text:style-name="P25" loext:marker-style-name="T112"><text:span text:style-name="T113">依各伺服器處理能力設「權重」，能力強分到更多</text:span><text:span text:style-name="T112"/></text:p>
          </table:table-cell>
          <table:table-cell table:style-name="表格99.A3" office:value-type="string">
            <text:p text:style-name="P25" loext:marker-style-name="T112"><text:span text:style-name="T144">✓ </text:span><text:span text:style-name="T113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5" loext:marker-style-name="T112"><text:span text:style-name="T144">③ Session Stickiness</text:span><text:span text:style-name="T113">（會話黏著）</text:span></text:p>
          </table:table-cell>
          <table:table-cell table:style-name="表格99.A2" office:value-type="string">
            <text:p text:style-name="P25" loext:marker-style-name="T112"><text:span text:style-name="T113">同一使用者所有請求固定導向同一台，維持連線狀態</text:span><text:span text:style-name="T112"/></text:p>
          </table:table-cell>
          <table:table-cell table:style-name="表格99.A2" office:value-type="string">
            <text:p text:style-name="P25" loext:marker-style-name="T112"><text:span text:style-name="T144">✓ </text:span><text:span text:style-name="T113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8"><text:span text:style-name="T151">⚡ <text:s/></text:span><text:span text:style-name="T155">記憶口訣</text:span></text:p>
            <text:p text:style-name="P9" loext:marker-style-name="T96"><text:span text:style-name="T95">「</text:span><text:span text:style-name="T129">LB </text:span><text:span text:style-name="T95">輪、重、黏」→ 輪＝</text:span><text:span text:style-name="T129">Round Robin</text:span><text:span text:style-name="T95">（輪流）；重＝</text:span><text:span text:style-name="T129">Weighted RR</text:span><text:span text:style-name="T95">（加權）；黏＝</text:span><text:span text:style-name="T129">Stickiness</text:span><text:span text:style-name="T95">（固定同一台）。</text:span></text:p>
          </table:table-cell>
          <table:covered-table-cell/>
          <table:covered-table-cell/>
        </table:table-row>
      </table:table>
      <text:h text:style-name="P3" text:outline-level="2" loext:marker-style-name="T27"><text:span text:style-name="T28">三、</text:span><text:span text:style-name="T27">CDN</text:span><text:span text:style-name="T28">（內容傳遞網路）</text:span></text:h>
      <text:p text:style-name="P31" loext:marker-style-name="T96"><text:span text:style-name="T129">CDN</text:span><text:span text:style-name="T95">（</text:span><text:span text:style-name="T129">Content Delivery Network</text:span><text:span text:style-name="T95">）透過在全球各地部署「邊緣伺服器（</text:span><text:span text:style-name="T129">Edge Server</text:span><text:span text:style-name="T95">）」加速內容傳</text:span><text:soft-page-break/><text:span text:style-name="T95">遞。當你開啟 </text:span><text:span text:style-name="T129">Google </text:span><text:span text:style-name="T95">或 </text:span><text:span text:style-name="T129">YouTube</text:span><text:span text:style-name="T95">，不需跨越太平洋連到美國總部，而是連到你附近的 </text:span><text:span text:style-name="T129">CDN </text:span><text:span text:style-name="T95">節點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8"><text:span text:style-name="T151">🌍 <text:s/></text:span><text:span text:style-name="T59">CDN </text:span><text:span text:style-name="T48">完整流程（一定要記）</text:span></text:p>
            <text:p text:style-name="P9" loext:marker-style-name="T96"><text:span text:style-name="T129">Step 1 </text:span><text:span text:style-name="T95">使用者輸入網址（</text:span><text:span text:style-name="T129">www.example.com</text:span><text:span text:style-name="T95">）</text:span></text:p>
            <text:p text:style-name="P10" loext:marker-style-name="T96"><text:span text:style-name="T129">Step 2 DNS </text:span><text:span text:style-name="T95">解析網址，找到對應 </text:span><text:span text:style-name="T129">CDN </text:span><text:span text:style-name="T95">的 </text:span><text:span text:style-name="T129">CNAME </text:span><text:span text:style-name="T95">記錄</text:span></text:p>
            <text:p text:style-name="P10" loext:marker-style-name="T96"><text:span text:style-name="T129">Step 3 CNAME </text:span><text:span text:style-name="T95">將請求轉向 </text:span><text:span text:style-name="T129">CDN </text:span><text:span text:style-name="T95">服務商（如 </text:span><text:span text:style-name="T129">cdn.example.net</text:span><text:span text:style-name="T95">）</text:span></text:p>
            <text:p text:style-name="P10" loext:marker-style-name="T96"><text:span text:style-name="T129">Step 4 CDN </text:span><text:span text:style-name="T95">根據使用者地理位置，選擇最近的 </text:span><text:span text:style-name="T129">Edge </text:span><text:span text:style-name="T95">伺服器</text:span></text:p>
            <text:p text:style-name="P10" loext:marker-style-name="T96"><text:span text:style-name="T129">Step 5 Edge </text:span><text:span text:style-name="T95">伺服器將快取內容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6" loext:marker-style-name="T66"><text:span text:style-name="T65">關鍵名詞</text:span><text:span text:style-name="T66"/></text:p>
          </table:table-cell>
          <table:table-cell table:style-name="表格100.A2" office:value-type="string">
            <text:p text:style-name="P6" loext:marker-style-name="T66"><text:span text:style-name="T65">說明</text:span><text:span text:style-name="T66"/></text:p>
          </table:table-cell>
        </table:table-row>
        <table:table-row table:style-name="表格100.1">
          <table:table-cell table:style-name="表格100.A3" office:value-type="string">
            <text:p text:style-name="P25" loext:marker-style-name="T80"><text:span text:style-name="T121">CNAME</text:span><text:span text:style-name="T79">（別名記錄）</text:span></text:p>
          </table:table-cell>
          <table:table-cell table:style-name="表格100.A3" office:value-type="string">
            <text:p text:style-name="P25" loext:marker-style-name="T80"><text:span text:style-name="T121">DNS </text:span><text:span text:style-name="T79">的一種記錄，作用是「網址指向另一個網址」（不是 </text:span><text:span text:style-name="T121">IP</text:span><text:span text:style-name="T79">）。範例：</text:span><text:span text:style-name="T121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5" loext:marker-style-name="T80"><text:span text:style-name="T121">Edge Server</text:span><text:span text:style-name="T79">（邊緣伺服器）</text:span></text:p>
          </table:table-cell>
          <table:table-cell table:style-name="表格100.A4" office:value-type="string">
            <text:p text:style-name="P25" loext:marker-style-name="T80"><text:span text:style-name="T79">部署在全球各地靠近使用者的伺服器，負責快取並就近回應請求，大幅減少延遲。</text:span><text:span text:style-name="T80"/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8"><text:span text:style-name="T151">⚡ <text:s/></text:span><text:span text:style-name="T155">記憶口訣</text:span></text:p>
            <text:p text:style-name="P9" loext:marker-style-name="T96"><text:span text:style-name="T95">「</text:span><text:span text:style-name="T129">CDN</text:span><text:span text:style-name="T95">：網址轉轉轉，資料找最近」→ </text:span><text:span text:style-name="T129">CNAME</text:span><text:span text:style-name="T95">＝網址→網址（不是 </text:span><text:span text:style-name="T129">IP</text:span><text:span text:style-name="T95">！）；</text:span><text:span text:style-name="T129">Edge</text:span><text:span text:style-name="T95">＝就近服務，不用跑遠。</text:span></text:p>
          </table:table-cell>
          <table:covered-table-cell/>
        </table:table-row>
      </table:table>
      <text:h text:style-name="P3" text:outline-level="2" loext:marker-style-name="T27"><text:span text:style-name="T28">四、</text:span><text:span text:style-name="T27">5G </text:span><text:span text:style-name="T28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6" loext:marker-style-name="T72"><text:span text:style-name="T71">四大核心特性</text:span><text:span text:style-name="T72"/></text:p>
            </table:table-cell>
            <table:table-cell table:style-name="表格101.A1" office:value-type="string">
              <text:p text:style-name="P6" loext:marker-style-name="T72"><text:span text:style-name="T71">說明</text:span><text:span text:style-name="T72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5" loext:marker-style-name="T112"><text:span text:style-name="T144">① </text:span><text:span text:style-name="T113">高速傳輸（</text:span><text:span text:style-name="T144">eMBB</text:span><text:span text:style-name="T113">）</text:span></text:p>
          </table:table-cell>
          <table:table-cell table:style-name="表格101.A2" office:value-type="string">
            <text:p text:style-name="P25" loext:marker-style-name="T112"><text:span text:style-name="T144">Enhanced Mobile Broadband — </text:span><text:span text:style-name="T113">比 </text:span><text:span text:style-name="T144">4G </text:span><text:span text:style-name="T113">快數十倍，適合高畫質影音、</text:span><text:span text:style-name="T144">AR/VR</text:span></text:p>
          </table:table-cell>
        </table:table-row>
        <table:table-row table:style-name="表格101.1">
          <table:table-cell table:style-name="表格101.A3" office:value-type="string">
            <text:p text:style-name="P25" loext:marker-style-name="T112"><text:span text:style-name="T144">② </text:span><text:span text:style-name="T113">超低延遲（</text:span><text:span text:style-name="T144">URLLC</text:span><text:span text:style-name="T113">）</text:span></text:p>
          </table:table-cell>
          <table:table-cell table:style-name="表格101.A3" office:value-type="string">
            <text:p text:style-name="P25" loext:marker-style-name="T112"><text:span text:style-name="T144">Ultra-Reliable Low Latency — </text:span><text:span text:style-name="T113">延遲低至 </text:span><text:span text:style-name="T144">1ms </text:span><text:span text:style-name="T113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5" loext:marker-style-name="T112"><text:span text:style-name="T144">③ </text:span><text:span text:style-name="T113">大量連線（</text:span><text:span text:style-name="T144">mMTC</text:span><text:span text:style-name="T113">）</text:span></text:p>
          </table:table-cell>
          <table:table-cell table:style-name="表格101.A2" office:value-type="string">
            <text:p text:style-name="P25" loext:marker-style-name="T112"><text:span text:style-name="T144">Massive Machine Type — </text:span><text:span text:style-name="T113">每平方公里可連數百萬台裝置，適合 </text:span><text:span text:style-name="T144">IoT </text:span><text:span text:style-name="T113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5" loext:marker-style-name="T112"><text:span text:style-name="T144">④ </text:span><text:span text:style-name="T113">網路切片（</text:span><text:span text:style-name="T144">Network Slicing</text:span><text:span text:style-name="T113">）</text:span></text:p>
          </table:table-cell>
          <table:table-cell table:style-name="表格101.A3" office:value-type="string">
            <text:p text:style-name="P25" loext:marker-style-name="T112"><text:span text:style-name="T113">將同一物理網路虛擬化為多個獨立「切片」，各自不同 </text:span><text:span text:style-name="T144">QoS</text:span><text:span text:style-name="T113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8"><text:span text:style-name="T151">⚡ <text:s/></text:span><text:span text:style-name="T155">記憶口訣</text:span></text:p>
            <text:p text:style-name="P9" loext:marker-style-name="T96"><text:span text:style-name="T95">「</text:span><text:span text:style-name="T129">5G </text:span><text:span text:style-name="T95">快、低、多、切」→ 快（</text:span><text:span text:style-name="T129">eMBB</text:span><text:span text:style-name="T95">）＝高速；低（</text:span><text:span text:style-name="T129">URLLC</text:span><text:span text:style-name="T95">）＝超低延遲；多（</text:span><text:span text:style-name="T129">mMTC</text:span><text:span text:style-name="T95">）＝大量連線；切＝網路切片。</text:span></text:p>
          </table:table-cell>
          <table:covered-table-cell/>
        </table:table-row>
      </table:table>
      <text:h text:style-name="P3" text:outline-level="2" loext:marker-style-name="T27"><text:span text:style-name="T28">五、本篇陷阱與情境串連</text:span><text:span text:style-name="T27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6" loext:marker-style-name="T72"><text:span text:style-name="T71">常見錯誤</text:span><text:span text:style-name="T72"/></text:p>
            </table:table-cell>
            <table:table-cell table:style-name="表格102.A1" office:value-type="string">
              <text:p text:style-name="P6" loext:marker-style-name="T72"><text:span text:style-name="T71">正確觀念</text:span><text:span text:style-name="T72"/></text:p>
            </table:table-cell>
            <table:table-cell table:style-name="表格102.A1" office:value-type="string">
              <text:p text:style-name="P6" loext:marker-style-name="T72"><text:span text:style-name="T71">主題</text:span><text:span text:style-name="T72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5" loext:marker-style-name="T112"><text:span text:style-name="T144">SDN </text:span><text:span text:style-name="T113">是把控制與資料整合</text:span></text:p>
          </table:table-cell>
          <table:table-cell table:style-name="表格102.A2" office:value-type="string">
            <text:p text:style-name="P25" loext:marker-style-name="T112"><text:span text:style-name="T144">SDN = </text:span><text:span text:style-name="T113">控制與資料「分離」</text:span></text:p>
          </table:table-cell>
          <table:table-cell table:style-name="表格102.A2" office:value-type="string">
            <text:p text:style-name="P25" loext:marker-style-name="T112"><text:span text:style-name="T144">SDN</text:span><text:span text:style-name="T112"/></text:p>
          </table:table-cell>
        </table:table-row>
        <table:table-row table:style-name="表格102.1">
          <table:table-cell table:style-name="表格102.A3" office:value-type="string">
            <text:p text:style-name="P25" loext:marker-style-name="T112"><text:span text:style-name="T144">Round Robin </text:span><text:span text:style-name="T113">會考慮伺服器效能</text:span></text:p>
          </table:table-cell>
          <table:table-cell table:style-name="表格102.A3" office:value-type="string">
            <text:p text:style-name="P25" loext:marker-style-name="T112"><text:span text:style-name="T144">RR </text:span><text:span text:style-name="T113">不看效能，</text:span><text:span text:style-name="T144">Weighted RR </text:span><text:span text:style-name="T113">才看</text:span></text:p>
          </table:table-cell>
          <table:table-cell table:style-name="表格102.A3" office:value-type="string">
            <text:p text:style-name="P25" loext:marker-style-name="T112"><text:span text:style-name="T144">LB</text:span><text:span text:style-name="T112"/></text:p>
          </table:table-cell>
        </table:table-row>
        <table:table-row table:style-name="表格102.1">
          <table:table-cell table:style-name="表格102.A2" office:value-type="string">
            <text:p text:style-name="P25" loext:marker-style-name="T112"><text:span text:style-name="T144">Stickiness </text:span><text:span text:style-name="T113">是平均分配流量</text:span></text:p>
          </table:table-cell>
          <table:table-cell table:style-name="表格102.A2" office:value-type="string">
            <text:p text:style-name="P25" loext:marker-style-name="T112"><text:span text:style-name="T144">Stickiness = </text:span><text:span text:style-name="T113">固定同一台 </text:span><text:span text:style-name="T144">Server</text:span></text:p>
          </table:table-cell>
          <table:table-cell table:style-name="表格102.A2" office:value-type="string">
            <text:p text:style-name="P25" loext:marker-style-name="T112"><text:span text:style-name="T144">LB</text:span><text:span text:style-name="T112"/></text:p>
          </table:table-cell>
        </table:table-row>
        <table:table-row table:style-name="表格102.1">
          <table:table-cell table:style-name="表格102.A3" office:value-type="string">
            <text:p text:style-name="P25" loext:marker-style-name="T112"><text:span text:style-name="T144">CDN </text:span><text:span text:style-name="T113">是把資料放在中心機房</text:span></text:p>
          </table:table-cell>
          <table:table-cell table:style-name="表格102.A3" office:value-type="string">
            <text:p text:style-name="P25" loext:marker-style-name="T112"><text:span text:style-name="T144">CDN </text:span><text:span text:style-name="T113">放在靠近使用者的 </text:span><text:span text:style-name="T144">Edge </text:span><text:span text:style-name="T113">節點</text:span></text:p>
          </table:table-cell>
          <table:table-cell table:style-name="表格102.A3" office:value-type="string">
            <text:p text:style-name="P25" loext:marker-style-name="T112"><text:span text:style-name="T144">CDN</text:span><text:span text:style-name="T112"/></text:p>
          </table:table-cell>
        </table:table-row>
        <table:table-row table:style-name="表格102.1">
          <table:table-cell table:style-name="表格102.A2" office:value-type="string">
            <text:p text:style-name="P25" loext:marker-style-name="T112"><text:span text:style-name="T144">CNAME </text:span><text:span text:style-name="T113">是 </text:span><text:span text:style-name="T144">IP </text:span><text:span text:style-name="T113">位址的對應</text:span></text:p>
          </table:table-cell>
          <table:table-cell table:style-name="表格102.A2" office:value-type="string">
            <text:p text:style-name="P25" loext:marker-style-name="T112"><text:span text:style-name="T144">CNAME = </text:span><text:span text:style-name="T113">網址 → 網址（非 </text:span><text:span text:style-name="T144">IP</text:span><text:span text:style-name="T113">）</text:span></text:p>
          </table:table-cell>
          <table:table-cell table:style-name="表格102.A2" office:value-type="string">
            <text:p text:style-name="P25" loext:marker-style-name="T112"><text:span text:style-name="T144">CDN</text:span><text:span text:style-name="T112"/></text:p>
          </table:table-cell>
        </table:table-row>
        <table:table-row table:style-name="表格102.1">
          <table:table-cell table:style-name="表格102.A3" office:value-type="string">
            <text:p text:style-name="P25" loext:marker-style-name="T112"><text:span text:style-name="T144">WiFi </text:span><text:span text:style-name="T113">使用 </text:span><text:span text:style-name="T144">CSMA/CD</text:span></text:p>
          </table:table-cell>
          <table:table-cell table:style-name="表格102.A3" office:value-type="string">
            <text:p text:style-name="P25" loext:marker-style-name="T112"><text:span text:style-name="T144">WiFi </text:span><text:span text:style-name="T113">用 </text:span><text:span text:style-name="T144">CSMA/CA</text:span><text:span text:style-name="T113">（</text:span><text:span text:style-name="T144">CD </text:span><text:span text:style-name="T113">是有線網路）</text:span></text:p>
          </table:table-cell>
          <table:table-cell table:style-name="表格102.A3" office:value-type="string">
            <text:p text:style-name="P25" loext:marker-style-name="T112"><text:span text:style-name="T144">WiFi</text:span><text:span text:style-name="T112"/></text:p>
          </table:table-cell>
        </table:table-row>
        <table:table-row table:style-name="表格102.1">
          <table:table-cell table:style-name="表格102.A2" office:value-type="string">
            <text:p text:style-name="P25" loext:marker-style-name="T112"><text:span text:style-name="T144">5G </text:span><text:span text:style-name="T113">只是速度變快</text:span></text:p>
          </table:table-cell>
          <table:table-cell table:style-name="表格102.A2" office:value-type="string">
            <text:p text:style-name="P25" loext:marker-style-name="T112"><text:span text:style-name="T144">5G </text:span><text:span text:style-name="T113">還有低延遲、大量連線、網路切片</text:span></text:p>
          </table:table-cell>
          <table:table-cell table:style-name="表格102.A2" office:value-type="string">
            <text:p text:style-name="P25" loext:marker-style-name="T112"><text:span text:style-name="T144">5G</text:span><text:span text:style-name="T112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8"><text:span text:style-name="T151">🔗 <text:s/></text:span><text:span text:style-name="T48">使用情境串連（理解記憶）</text:span><text:soft-page-break/></text:p>
            <text:p text:style-name="P9" loext:marker-style-name="T96"><text:span text:style-name="T95">想像你用手機打開 </text:span><text:span text:style-name="T129">App</text:span><text:span text:style-name="T95">：① 開啟 </text:span><text:span text:style-name="T129">App → Application Layer</text:span><text:span text:style-name="T95">；② </text:span><text:span text:style-name="T129">SDN Controller </text:span><text:span text:style-name="T95">決定資料怎麼走 → </text:span><text:span text:style-name="T129">Control Layer</text:span><text:span text:style-name="T95">；③ </text:span><text:span text:style-name="T129">Router/Switch </text:span><text:span text:style-name="T95">實際傳送 → </text:span><text:span text:style-name="T129">Infrastructure Layer</text:span><text:span text:style-name="T95">；④ </text:span><text:span text:style-name="T129">Load Balancer </text:span><text:span text:style-name="T95">把請求分配到空閒伺服器 → </text:span><text:span text:style-name="T129">Load Balancing</text:span><text:span text:style-name="T95">；⑤ </text:span><text:span text:style-name="T129">CDN </text:span><text:span text:style-name="T95">找最近節點傳回網頁 → </text:span><text:span text:style-name="T129">CDN Edge</text:span><text:span text:style-name="T95">；⑥ 資料透過 </text:span><text:span text:style-name="T129">WiFi </text:span><text:span text:style-name="T95">或 </text:span><text:span text:style-name="T129">5G </text:span><text:span text:style-name="T95">傳到你的手機。</text:span></text:p>
          </table:table-cell>
          <table:covered-table-cell/>
          <table:covered-table-cell/>
        </table:table-row>
      </table:table>
      <text:h text:style-name="P13" text:outline-level="1" loext:marker-style-name="T68"><text:span text:style-name="T67">第 九 篇　無線通訊：</text:span><text:span text:style-name="T68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8"><text:span text:style-name="T151">💡 <text:s/></text:span><text:span text:style-name="T48">核心問題：大家同時說話會怎樣？</text:span></text:p>
            <text:p text:style-name="P9" loext:marker-style-name="T96"><text:span text:style-name="T95">很多裝置想用無線電波傳資料，若同時傳訊號會「撞在一起」。這個「決定誰先傳」的規則，就叫 </text:span><text:span text:style-name="T129">MAC </text:span><text:span text:style-name="T95">機制（</text:span><text:span text:style-name="T129">Media Access Control</text:span><text:span text:style-name="T95">）。⚠️ 注意：這裡的 </text:span><text:span text:style-name="T129">MAC </text:span><text:span text:style-name="T95">指「誰先傳資料的規則」，不是 </text:span><text:span text:style-name="T129">MAC </text:span><text:span text:style-name="T95">位址（硬體位址）！</text:span></text:p>
          </table:table-cell>
        </table:table-row>
      </table:table>
      <text:h text:style-name="P3" text:outline-level="2" loext:marker-style-name="T27"><text:span text:style-name="T28">一、</text:span><text:span text:style-name="T27">WiFi</text:span><text:span text:style-name="T28">：先聽再講（</text:span><text:span text:style-name="T27">CSMA/CA</text:span><text:span text:style-name="T28">）</text:span></text:h>
      <text:p text:style-name="P31" loext:marker-style-name="T96"><text:span text:style-name="T129">WiFi </text:span><text:span text:style-name="T95">採用「先聽再講」的競爭機制，就像一群人用對講機：① 先聽頻道有沒有人在傳；② 沒人傳才開始傳；③ 有人在傳就等一段隨機時間再試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6" loext:marker-style-name="T66"><text:span text:style-name="T75">CSMA/CA </text:span><text:span text:style-name="T65">拆解</text:span></text:p>
            </table:table-cell>
            <table:table-cell table:style-name="表格104.A1" office:value-type="string">
              <text:p text:style-name="P6" loext:marker-style-name="T66"><text:span text:style-name="T65">意義</text:span><text:span text:style-name="T66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5" loext:marker-style-name="T80"><text:span text:style-name="T121">Carrier Sense </text:span><text:span text:style-name="T79">載波感測</text:span></text:p>
          </table:table-cell>
          <table:table-cell table:style-name="表格104.A2" office:value-type="string">
            <text:p text:style-name="P25" loext:marker-style-name="T80"><text:span text:style-name="T79">先聽頻道有沒有人在用</text:span><text:span text:style-name="T80"/></text:p>
          </table:table-cell>
        </table:table-row>
        <table:table-row table:style-name="表格104.1">
          <table:table-cell table:style-name="表格104.A3" office:value-type="string">
            <text:p text:style-name="P25" loext:marker-style-name="T80"><text:span text:style-name="T121">Multiple Access </text:span><text:span text:style-name="T79">多重存取</text:span></text:p>
          </table:table-cell>
          <table:table-cell table:style-name="表格104.A3" office:value-type="string">
            <text:p text:style-name="P25" loext:marker-style-name="T80"><text:span text:style-name="T79">大家共用同一個頻道</text:span><text:span text:style-name="T80"/></text:p>
          </table:table-cell>
        </table:table-row>
        <table:table-row table:style-name="表格104.1">
          <table:table-cell table:style-name="表格104.A2" office:value-type="string">
            <text:p text:style-name="P25" loext:marker-style-name="T80"><text:span text:style-name="T121">Collision Avoidance </text:span><text:span text:style-name="T79">碰撞避免</text:span></text:p>
          </table:table-cell>
          <table:table-cell table:style-name="表格104.A2" office:value-type="string">
            <text:p text:style-name="P25" loext:marker-style-name="T80"><text:span text:style-name="T79">盡量「避免」訊號互撞（而非偵測後再處理）</text:span><text:span text:style-name="T80"/>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8"><text:span text:style-name="T151">📶 <text:s/></text:span><text:span text:style-name="T63">WiFi </text:span><text:span text:style-name="T55">高速基礎</text:span></text:p>
            <text:p text:style-name="P9" loext:marker-style-name="T96"><text:span text:style-name="T95">另：</text:span><text:span text:style-name="T129">OFDM</text:span><text:span text:style-name="T95">（正交分頻多工）— 將資料分成多個子頻道同時傳輸，讓頻寬利用率大幅提升，是現代 </text:span><text:span text:style-name="T129">WiFi </text:span><text:span text:style-name="T95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8"><text:span text:style-name="T151">🚑 <text:s/></text:span><text:span text:style-name="T165">WiFi </text:span><text:span text:style-name="T155">的 </text:span><text:span text:style-name="T165">QoS</text:span><text:span text:style-name="T155">：</text:span><text:span text:style-name="T165">EDCA</text:span></text:p>
            <text:p text:style-name="P9" loext:marker-style-name="T96"><text:span text:style-name="T95">當很多人在搶頻道，某些資料（語音、視訊）需要優先通過，這就是 </text:span><text:span text:style-name="T129">EDCA</text:span><text:span text:style-name="T95">（</text:span><text:span text:style-name="T129">Enhanced Distributed Channel Access</text:span><text:span text:style-name="T95">）的功能。視訊通話</text:span><text:span text:style-name="T129">/</text:span><text:span text:style-name="T95">語音→少等、優先傳；網頁</text:span><text:span text:style-name="T129">/</text:span><text:span text:style-name="T95">大檔下載→稍微等一下也沒關係。</text:span></text:p>
            <text:p text:style-name="P10" loext:marker-style-name="T96"><text:span text:style-name="T95">記憶口訣：</text:span><text:span text:style-name="T129">WiFi = </text:span><text:span text:style-name="T95">急診室排隊制度（心臟病</text:span><text:span text:style-name="T129">/</text:span><text:span text:style-name="T95">語音視訊優先，小感冒</text:span><text:span text:style-name="T129">/</text:span><text:span text:style-name="T95">網頁下載等一下）。</text:span></text:p>
          </table:table-cell>
          <table:covered-table-cell/>
        </table:table-row>
      </table:table>
      <text:h text:style-name="P3" text:outline-level="2" loext:marker-style-name="T27"><text:span text:style-name="T28">二、</text:span><text:span text:style-name="T27">Bluetooth</text:span><text:span text:style-name="T28">：老大排班（</text:span><text:span text:style-name="T27">Master-Slave</text:span><text:span text:style-name="T28">）</text:span></text:h>
      <text:p text:style-name="P31" loext:marker-style-name="T96"><text:span text:style-name="T129">Bluetooth </text:span><text:span text:style-name="T95">不靠「搶」，而是由 </text:span><text:span text:style-name="T129">Master </text:span><text:span text:style-name="T95">統一分配時間，</text:span><text:span text:style-name="T129">Slave </text:span><text:span text:style-name="T95">照順序傳資料（</text:span><text:span text:style-name="T129">0~1ms </text:span><text:span text:style-name="T95">耳機、</text:span><text:span text:style-name="T129">1~2ms </text:span><text:span text:style-name="T95">滑鼠、</text:span><text:span text:style-name="T129">2~3ms </text:span><text:span text:style-name="T95">鍵盤、</text:span><text:span text:style-name="T129">3~4ms </text:span><text:span text:style-name="T95">再回耳機…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8"><text:span text:style-name="T151">🔵 <text:s/></text:span><text:span text:style-name="T55">為什麼要排班？</text:span></text:p>
            <text:p text:style-name="P9" loext:marker-style-name="T96"><text:span text:style-name="T95">因為藍牙裝置大多是「即時設備」，延遲太久就沒用了（耳機你說「你好」</text:span><text:span text:style-name="T129">2 </text:span><text:span text:style-name="T95">秒後才到→完蛋；滑鼠 </text:span><text:span text:style-name="T129">1 </text:span><text:span text:style-name="T95">秒後游標才動→無法使用）。因此 </text:span><text:span text:style-name="T129">Bluetooth </text:span><text:span text:style-name="T95">保留固定時槽（</text:span><text:span text:style-name="T129">Time Slot</text:span><text:span text:style-name="T95">），確保即時性與穩定性。</text:span></text:p>
            <text:p text:style-name="P10" loext:marker-style-name="T96"><text:span text:style-name="T95">記憶口訣：</text:span><text:span text:style-name="T129">WiFi = </text:span><text:span text:style-name="T95">菜市場（自由競爭，亂搶）；</text:span><text:span text:style-name="T129">Bluetooth = </text:span><text:span text:style-name="T95">公司會議室預約（固定排班，有秩序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6" loext:marker-style-name="T66"><text:span text:style-name="T65">即時語音</text:span><text:span text:style-name="T66"/></text:p>
          </table:table-cell>
          <table:table-cell table:style-name="表格105.A2" office:value-type="string">
            <text:p text:style-name="P6" loext:marker-style-name="T66"><text:span text:style-name="T65">全名</text:span><text:span text:style-name="T66"/></text:p>
          </table:table-cell>
          <table:table-cell table:style-name="表格105.A2" office:value-type="string">
            <text:p text:style-name="P6" loext:marker-style-name="T66"><text:span text:style-name="T65">說明</text:span><text:span text:style-name="T66"/></text:p>
          </table:table-cell>
          <table:table-cell table:style-name="表格105.A2" office:value-type="string">
            <text:p text:style-name="P6" loext:marker-style-name="T66"><text:span text:style-name="T65">用途</text:span><text:span text:style-name="T66"/></text:p>
          </table:table-cell>
        </table:table-row>
        <table:table-row table:style-name="表格105.1">
          <table:table-cell table:style-name="表格105.A3" office:value-type="string">
            <text:p text:style-name="P25" loext:marker-style-name="T80"><text:span text:style-name="T121">SCO</text:span><text:span text:style-name="T80"/></text:p>
          </table:table-cell>
          <table:table-cell table:style-name="表格105.A3" office:value-type="string">
            <text:p text:style-name="P25" loext:marker-style-name="T80"><text:span text:style-name="T121">Synchronous Connection-Oriented</text:span><text:span text:style-name="T80"/></text:p>
          </table:table-cell>
          <table:table-cell table:style-name="表格105.A3" office:value-type="string">
            <text:p text:style-name="P25" loext:marker-style-name="T80"><text:span text:style-name="T79">固定時槽、同步傳輸</text:span><text:span text:style-name="T80"/></text:p>
          </table:table-cell>
          <table:table-cell table:style-name="表格105.A3" office:value-type="string">
            <text:p text:style-name="P25" loext:marker-style-name="T80"><text:span text:style-name="T79">藍牙耳機通話</text:span><text:span text:style-name="T80"/></text:p>
          </table:table-cell>
        </table:table-row>
        <table:table-row table:style-name="表格105.1">
          <table:table-cell table:style-name="表格105.A4" office:value-type="string">
            <text:p text:style-name="P25" loext:marker-style-name="T80"><text:span text:style-name="T121">eSCO</text:span><text:span text:style-name="T80"/></text:p>
          </table:table-cell>
          <table:table-cell table:style-name="表格105.A4" office:value-type="string">
            <text:p text:style-name="P25" loext:marker-style-name="T80"><text:span text:style-name="T121">Enhanced SCO</text:span><text:span text:style-name="T80"/></text:p>
          </table:table-cell>
          <table:table-cell table:style-name="表格105.A4" office:value-type="string">
            <text:p text:style-name="P25" loext:marker-style-name="T80"><text:span text:style-name="T121">SCO </text:span><text:span text:style-name="T79">加強版、可重傳、品質更好</text:span></text:p>
          </table:table-cell>
          <table:table-cell table:style-name="表格105.A4" office:value-type="string">
            <text:p text:style-name="P25" loext:marker-style-name="T80"><text:span text:style-name="T79">高品質語音</text:span><text:span text:style-name="T80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8"><text:span text:style-name="T151">🔀 <text:s/></text:span><text:span text:style-name="T63">Bluetooth </text:span><text:span text:style-name="T55">抗干擾</text:span></text:p>
            <text:p text:style-name="P9" loext:marker-style-name="T96"><text:span text:style-name="T95">另：</text:span><text:span text:style-name="T129">FHSS</text:span><text:span text:style-name="T95">（跳頻展頻）— 在 </text:span><text:span text:style-name="T129">2.4GHz </text:span><text:span text:style-name="T95">頻段中每秒快速切換數百次（每秒約 </text:span><text:span text:style-name="T129">1600 </text:span><text:span text:style-name="T95">次）頻道，避免與其他設備干擾，提升穩定性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3" text:outline-level="2"><text:soft-page-break/><text:span text:style-name="T28">三、深入理解：時槽（</text:span><text:span text:style-name="T27">Time Slot</text:span><text:span text:style-name="T28">）</text:span></text:h>
      <text:p text:style-name="P31" loext:marker-style-name="T96"><text:span text:style-name="T95">時槽就是「切好的時間格子」。藍牙頻道像一條只有一個人能講話的走廊，如果大家同時講會混在一起亂掉。</text:span><text:span text:style-name="T129">Bluetooth </text:span><text:span text:style-name="T95">的解法：把時間先切成固定小格子，每個格子叫 </text:span><text:span text:style-name="T129">Time Slot</text:span><text:span text:style-name="T95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6" loext:marker-style-name="T72"><text:span text:style-name="T71">三大好處</text:span><text:span text:style-name="T72"/></text:p>
            </table:table-cell>
            <table:table-cell table:style-name="表格106.A1" table:number-columns-spanned="2" office:value-type="string">
              <text:p text:style-name="P6" loext:marker-style-name="T72"><text:span text:style-name="T71">說明</text:span><text:span text:style-name="T72"/></text:p>
            </table:table-cell>
            <table:covered-table-cell/>
            <table:table-cell table:style-name="表格106.A1" office:value-type="string">
              <text:p text:style-name="P6" loext:marker-style-name="T72"><text:span text:style-name="T71">比喻</text:span><text:span text:style-name="T72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5" loext:marker-style-name="T112"><text:span text:style-name="T113">穩定不碰撞</text:span><text:span text:style-name="T112"/></text:p>
          </table:table-cell>
          <table:table-cell table:style-name="表格106.A2" table:number-columns-spanned="2" office:value-type="string">
            <text:p text:style-name="P25" loext:marker-style-name="T112"><text:span text:style-name="T113">每人有專屬時間，不會互相干擾</text:span><text:span text:style-name="T112"/></text:p>
          </table:table-cell>
          <table:covered-table-cell/>
          <table:table-cell table:style-name="表格106.A2" office:value-type="string">
            <text:p text:style-name="P25" loext:marker-style-name="T112"><text:span text:style-name="T113">公司會議室預約制</text:span><text:span text:style-name="T112"/></text:p>
          </table:table-cell>
        </table:table-row>
        <table:table-row table:style-name="表格106.1">
          <table:table-cell table:style-name="表格106.A3" office:value-type="string">
            <text:p text:style-name="P25" loext:marker-style-name="T112"><text:span text:style-name="T113">即時性保證</text:span><text:span text:style-name="T112"/></text:p>
          </table:table-cell>
          <table:table-cell table:style-name="表格106.A3" table:number-columns-spanned="2" office:value-type="string">
            <text:p text:style-name="P25" loext:marker-style-name="T112"><text:span text:style-name="T113">耳機每隔固定時間必定輪到，聲音不卡頓</text:span><text:span text:style-name="T112"/></text:p>
          </table:table-cell>
          <table:covered-table-cell/>
          <table:table-cell table:style-name="表格106.A3" office:value-type="string">
            <text:p text:style-name="P25" loext:marker-style-name="T112"><text:span text:style-name="T113">醫院預約制，準時看診</text:span><text:span text:style-name="T112"/></text:p>
          </table:table-cell>
        </table:table-row>
        <table:table-row table:style-name="表格106.1">
          <table:table-cell table:style-name="表格106.A2" office:value-type="string">
            <text:p text:style-name="P25" loext:marker-style-name="T112"><text:span text:style-name="T113">省電效果</text:span><text:span text:style-name="T112"/></text:p>
          </table:table-cell>
          <table:table-cell table:style-name="表格106.A2" table:number-columns-spanned="2" office:value-type="string">
            <text:p text:style-name="P25" loext:marker-style-name="T112"><text:span text:style-name="T113">裝置知道「還沒輪到我」，可先休眠等待</text:span><text:span text:style-name="T112"/></text:p>
          </table:table-cell>
          <table:covered-table-cell/>
          <table:table-cell table:style-name="表格106.A2" office:value-type="string">
            <text:p text:style-name="P25" loext:marker-style-name="T112"><text:span text:style-name="T113">等候室等叫號，先睡一下</text:span><text:span text:style-name="T112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22" loext:marker-style-name="T66"><text:span text:style-name="T75">WiFi </text:span><text:span text:style-name="T65">競爭制</text:span></text:p>
          </table:table-cell>
          <table:covered-table-cell/>
          <table:table-cell table:style-name="表格106.A1" table:number-columns-spanned="2" office:value-type="string">
            <text:p text:style-name="P22" loext:marker-style-name="T66"><text:span text:style-name="T75">BT </text:span><text:span text:style-name="T65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5" loext:marker-style-name="T80"><text:span text:style-name="T79">菜市場：大家自由搶。吞吐量高、速度快，但可能塞車、延遲不穩定。</text:span><text:span text:style-name="T80"/></text:p>
          </table:table-cell>
          <table:covered-table-cell/>
          <table:table-cell table:style-name="表格106.A2" table:number-columns-spanned="2" office:value-type="string">
            <text:p text:style-name="P25" loext:marker-style-name="T80"><text:span text:style-name="T79">醫院預約制：輪流看診。延遲固定、穩定省電，但速度不如 </text:span><text:span text:style-name="T121">WiFi </text:span><text:span text:style-name="T79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8"><text:span text:style-name="T151">🕐 <text:s/></text:span><text:span text:style-name="T201">考試定義（背起來）</text:span></text:p>
            <text:p text:style-name="P9" loext:marker-style-name="T96"><text:span text:style-name="T129">Time Slot</text:span><text:span text:style-name="T95">（時槽）＝將時間切成固定小區段，由不同裝置依序使用，避免碰撞並確保即時性。</text:span></text:p>
          </table:table-cell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四、</text:span><text:span text:style-name="T27">WiFi vs Bluetooth </text:span><text:span text:style-name="T28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6" loext:marker-style-name="T66"><text:span text:style-name="T65">項目</text:span><text:span text:style-name="T66"/></text:p>
            </table:table-cell>
            <table:table-cell table:style-name="表格107.A1" office:value-type="string">
              <text:p text:style-name="P6" loext:marker-style-name="T66"><text:span text:style-name="T75">WiFi</text:span><text:span text:style-name="T66"/></text:p>
            </table:table-cell>
            <table:table-cell table:style-name="表格107.A1" office:value-type="string">
              <text:p text:style-name="P6" loext:marker-style-name="T66"><text:span text:style-name="T75">Bluetooth</text:span><text:span text:style-name="T66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5" loext:marker-style-name="T80"><text:span text:style-name="T79">核心機制</text:span><text:span text:style-name="T80"/></text:p>
          </table:table-cell>
          <table:table-cell table:style-name="表格107.A2" office:value-type="string">
            <text:p text:style-name="P25" loext:marker-style-name="T80"><text:span text:style-name="T121">CSMA/CA</text:span><text:span text:style-name="T79">（先偵聽再傳）</text:span></text:p>
          </table:table-cell>
          <table:table-cell table:style-name="表格107.A2" office:value-type="string">
            <text:p text:style-name="P25" loext:marker-style-name="T80"><text:span text:style-name="T121">Master-Slave</text:span><text:span text:style-name="T79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25" loext:marker-style-name="T80"><text:span text:style-name="T79">即時語音 </text:span><text:span text:style-name="T121">/ QoS</text:span></text:p>
          </table:table-cell>
          <table:table-cell table:style-name="表格107.A3" office:value-type="string">
            <text:p text:style-name="P25" loext:marker-style-name="T80"><text:span text:style-name="T121">EDCA</text:span><text:span text:style-name="T79">（</text:span><text:span text:style-name="T121">QoS </text:span><text:span text:style-name="T79">優先）</text:span></text:p>
          </table:table-cell>
          <table:table-cell table:style-name="表格107.A3" office:value-type="string">
            <text:p text:style-name="P25" loext:marker-style-name="T80"><text:span text:style-name="T121">SCO / eSCO</text:span><text:span text:style-name="T79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5" loext:marker-style-name="T80"><text:span text:style-name="T79">速度</text:span><text:span text:style-name="T80"/></text:p>
          </table:table-cell>
          <table:table-cell table:style-name="表格107.A2" office:value-type="string">
            <text:p text:style-name="P25" loext:marker-style-name="T80"><text:span text:style-name="T79">高速（快）</text:span><text:span text:style-name="T80"/></text:p>
          </table:table-cell>
          <table:table-cell table:style-name="表格107.A2" office:value-type="string">
            <text:p text:style-name="P25" loext:marker-style-name="T80"><text:span text:style-name="T79">較慢</text:span><text:span text:style-name="T80"/></text:p>
          </table:table-cell>
        </table:table-row>
        <table:table-row table:style-name="表格107.1">
          <table:table-cell table:style-name="表格107.A3" office:value-type="string">
            <text:p text:style-name="P25" loext:marker-style-name="T80"><text:span text:style-name="T79">耗電量</text:span><text:span text:style-name="T80"/></text:p>
          </table:table-cell>
          <table:table-cell table:style-name="表格107.A3" office:value-type="string">
            <text:p text:style-name="P25" loext:marker-style-name="T80"><text:span text:style-name="T79">較高</text:span><text:span text:style-name="T80"/></text:p>
          </table:table-cell>
          <table:table-cell table:style-name="表格107.A3" office:value-type="string">
            <text:p text:style-name="P25" loext:marker-style-name="T80"><text:span text:style-name="T79">低功耗</text:span><text:span text:style-name="T80"/></text:p>
          </table:table-cell>
        </table:table-row>
        <table:table-row table:style-name="表格107.1">
          <table:table-cell table:style-name="表格107.A2" office:value-type="string">
            <text:p text:style-name="P25" loext:marker-style-name="T80"><text:span text:style-name="T79">傳輸距離</text:span><text:span text:style-name="T80"/></text:p>
          </table:table-cell>
          <table:table-cell table:style-name="表格107.A2" office:value-type="string">
            <text:p text:style-name="P25" loext:marker-style-name="T80"><text:span text:style-name="T79">較遠（數十</text:span><text:span text:style-name="T121">~</text:span><text:span text:style-name="T79">百公尺）</text:span></text:p>
          </table:table-cell>
          <table:table-cell table:style-name="表格107.A2" office:value-type="string">
            <text:p text:style-name="P25" loext:marker-style-name="T80"><text:span text:style-name="T79">較短（約 </text:span><text:span text:style-name="T121">10 </text:span><text:span text:style-name="T79">公尺）</text:span></text:p>
          </table:table-cell>
        </table:table-row>
        <table:table-row table:style-name="表格107.1">
          <table:table-cell table:style-name="表格107.A3" office:value-type="string">
            <text:p text:style-name="P25" loext:marker-style-name="T80"><text:span text:style-name="T79">穩定性</text:span><text:span text:style-name="T80"/></text:p>
          </table:table-cell>
          <table:table-cell table:style-name="表格107.A3" office:value-type="string">
            <text:p text:style-name="P25" loext:marker-style-name="T80"><text:span text:style-name="T79">受干擾影響較大</text:span><text:span text:style-name="T80"/></text:p>
          </table:table-cell>
          <table:table-cell table:style-name="表格107.A3" office:value-type="string">
            <text:p text:style-name="P25" loext:marker-style-name="T80"><text:span text:style-name="T79">固定時槽非常穩定</text:span><text:span text:style-name="T80"/></text:p>
          </table:table-cell>
        </table:table-row>
        <table:table-row table:style-name="表格107.1">
          <table:table-cell table:style-name="表格107.A2" office:value-type="string">
            <text:p text:style-name="P25" loext:marker-style-name="T80"><text:span text:style-name="T79">適用場景</text:span><text:span text:style-name="T80"/></text:p>
          </table:table-cell>
          <table:table-cell table:style-name="表格107.A2" office:value-type="string">
            <text:p text:style-name="P25" loext:marker-style-name="T80"><text:span text:style-name="T79">上網、看影片、大檔下載</text:span><text:span text:style-name="T80"/></text:p>
          </table:table-cell>
          <table:table-cell table:style-name="表格107.A2" office:value-type="string">
            <text:p text:style-name="P25" loext:marker-style-name="T80"><text:span text:style-name="T79">耳機、滑鼠、鍵盤、通話</text:span><text:span text:style-name="T80"/></text:p>
          </table:table-cell>
        </table:table-row>
      </table:table>
      <text:h text:style-name="P3" text:outline-level="2" loext:marker-style-name="T27"><text:span text:style-name="T28">五、</text:span><text:span text:style-name="T27">L2CAP</text:span><text:span text:style-name="T28">：藍牙的資料管理員</text:span></text:h>
      <text:p text:style-name="P31" loext:marker-style-name="T96"><text:span text:style-name="T129">L2CAP</text:span><text:span text:style-name="T95">（</text:span><text:span text:style-name="T129">Logical Link Control and Adaptation Protocol</text:span><text:span text:style-name="T95">）是藍牙協議的重要一層，負責：管理並分流不同類型的資料（語音、檔案、控制指令）；建立、管理、釋放「邏輯通道」；提供 </text:span><text:span text:style-name="T129">QoS </text:span><text:span text:style-name="T95">服務品質保證。一句話記憶：</text:span><text:span text:style-name="T129">L2CAP </text:span><text:span text:style-name="T95">＝ 藍牙的資料管理中心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6" loext:marker-style-name="T72"><text:span text:style-name="T71">三種邏輯通道</text:span><text:span text:style-name="T72"/></text:p>
            </table:table-cell>
            <table:table-cell table:style-name="表格108.A1" table:number-columns-spanned="2" office:value-type="string">
              <text:p text:style-name="P6" loext:marker-style-name="T72"><text:span text:style-name="T71">特性</text:span><text:span text:style-name="T72"/></text:p>
            </table:table-cell>
            <table:covered-table-cell/>
            <table:table-cell table:style-name="表格108.A1" office:value-type="string">
              <text:p text:style-name="P6" loext:marker-style-name="T72"><text:span text:style-name="T71">用途</text:span><text:span text:style-name="T72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5" loext:marker-style-name="T112"><text:span text:style-name="T144">Connection-oriented</text:span><text:span text:style-name="T113">（連線導向）</text:span></text:p>
          </table:table-cell>
          <table:table-cell table:style-name="表格108.A2" table:number-columns-spanned="2" office:value-type="string">
            <text:p text:style-name="P25" loext:marker-style-name="T112"><text:span text:style-name="T113">有建立連線、雙方確認，可靠、確保收到</text:span><text:span text:style-name="T112"/></text:p>
          </table:table-cell>
          <table:covered-table-cell/>
          <table:table-cell table:style-name="表格108.A2" office:value-type="string">
            <text:p text:style-name="P25" loext:marker-style-name="T112"><text:span text:style-name="T113">重要資料傳輸、檔案（像打電話）</text:span><text:span text:style-name="T112"/></text:p>
          </table:table-cell>
        </table:table-row>
        <table:table-row table:style-name="表格108.1">
          <table:table-cell table:style-name="表格108.A3" office:value-type="string">
            <text:p text:style-name="P25" loext:marker-style-name="T112"><text:span text:style-name="T144">Connectionless</text:span><text:span text:style-name="T113">（非連線）</text:span></text:p>
          </table:table-cell>
          <table:table-cell table:style-name="表格108.A3" table:number-columns-spanned="2" office:value-type="string">
            <text:p text:style-name="P25" loext:marker-style-name="T112"><text:span text:style-name="T113">直接送出、不確認，快速但可能遺失</text:span><text:span text:style-name="T112"/></text:p>
          </table:table-cell>
          <table:covered-table-cell/>
          <table:table-cell table:style-name="表格108.A3" office:value-type="string">
            <text:p text:style-name="P25" loext:marker-style-name="T112"><text:span text:style-name="T113">廣播、串流（像廣播）</text:span><text:span text:style-name="T112"/></text:p>
          </table:table-cell>
        </table:table-row>
        <table:table-row table:style-name="表格108.1">
          <table:table-cell table:style-name="表格108.A2" office:value-type="string">
            <text:p text:style-name="P25" loext:marker-style-name="T112"><text:span text:style-name="T144">Signaling Channel</text:span><text:span text:style-name="T113">（信令通道）</text:span></text:p>
          </table:table-cell>
          <table:table-cell table:style-name="表格108.A2" table:number-columns-spanned="2" office:value-type="string">
            <text:p text:style-name="P25" loext:marker-style-name="T112"><text:span text:style-name="T113">控制管理用，不傳資料只管控制</text:span><text:span text:style-name="T112"/></text:p>
          </table:table-cell>
          <table:covered-table-cell/>
          <table:table-cell table:style-name="表格108.A2" office:value-type="string">
            <text:p text:style-name="P25" loext:marker-style-name="T112"><text:span text:style-name="T113">建立</text:span><text:span text:style-name="T144">/</text:span><text:span text:style-name="T113">釋放連線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6" loext:marker-style-name="T66"><text:span text:style-name="T75">OSI </text:span><text:span text:style-name="T65">層</text:span></text:p>
          </table:table-cell>
          <table:covered-table-cell/>
          <table:table-cell table:style-name="表格108.A1" table:number-columns-spanned="2" office:value-type="string">
            <text:p text:style-name="P6" loext:marker-style-name="T66"><text:span text:style-name="T65">藍牙對應</text:span><text:span text:style-name="T66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5" loext:marker-style-name="T80"><text:span text:style-name="T79">應用層 </text:span><text:span text:style-name="T121">Application</text:span></text:p>
          </table:table-cell>
          <table:covered-table-cell/>
          <table:table-cell table:style-name="表格108.A2" table:number-columns-spanned="2" office:value-type="string">
            <text:p text:style-name="P25" loext:marker-style-name="T80"><text:span text:style-name="T121">App / </text:span><text:span text:style-name="T79">語音 </text:span><text:span text:style-name="T121">/ </text:span><text:span text:style-name="T79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5" loext:marker-style-name="T80"><text:span text:style-name="T79">傳輸層 </text:span><text:span text:style-name="T121">Transport</text:span></text:p>
          </table:table-cell>
          <table:covered-table-cell/>
          <table:table-cell table:style-name="表格108.A3" table:number-columns-spanned="2" office:value-type="string">
            <text:p text:style-name="P25" loext:marker-style-name="T80"><text:span text:style-name="T79">部分功能在 </text:span><text:span text:style-name="T121">L2CAP</text:span><text:span text:style-name="T79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5" loext:marker-style-name="T80"><text:span text:style-name="T79">網路層 </text:span><text:span text:style-name="T121">Network</text:span></text:p>
          </table:table-cell>
          <table:covered-table-cell/>
          <table:table-cell table:style-name="表格108.A2" table:number-columns-spanned="2" office:value-type="string">
            <text:p text:style-name="P25" loext:marker-style-name="T80"><text:span text:style-name="T79">（幾乎不對應，藍牙無路由概念）</text:span><text:span text:style-name="T80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5" loext:marker-style-name="T80"><text:span text:style-name="T79">資料鏈結層 </text:span><text:span text:style-name="T121">Data Link</text:span></text:p>
          </table:table-cell>
          <table:covered-table-cell/>
          <table:table-cell table:style-name="表格108.A3" table:number-columns-spanned="2" office:value-type="string">
            <text:p text:style-name="P25" loext:marker-style-name="T80"><text:span text:style-name="T121">L2CAP / MAC </text:span><text:span text:style-name="T79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5" loext:marker-style-name="T80"><text:span text:style-name="T79">實體層 </text:span><text:span text:style-name="T121">Physical</text:span></text:p>
          </table:table-cell>
          <table:covered-table-cell/>
          <table:table-cell table:style-name="表格108.A2" table:number-columns-spanned="2" office:value-type="string">
            <text:p text:style-name="P25" loext:marker-style-name="T80"><text:span text:style-name="T79">無線電波（</text:span><text:span text:style-name="T121">2.4GHz</text:span><text:span text:style-name="T79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8"><text:span text:style-name="T151">📐 <text:s/></text:span><text:span text:style-name="T173">重要</text:span></text:p>
            <text:p text:style-name="P9" loext:marker-style-name="T96"><text:span text:style-name="T129">L2CAP </text:span><text:span text:style-name="T95">主要位於「資料鏈結層（</text:span><text:span text:style-name="T129">Data Link Layer</text:span><text:span text:style-name="T95">）」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3" text:outline-level="2" loext:marker-style-name="T27"><text:span text:style-name="T28">六、本篇考試陷阱整理</text:span><text:span text:style-name="T27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9"><text:span text:style-name="T133">WiFi </text:span><text:span text:style-name="T99">用什麼避免碰撞？　</text:span><text:span text:style-name="T95">✗ </text:span><text:span text:style-name="T129">CSMA/CD</text:span><text:span text:style-name="T95">（有線乙太網路機制）→ ✓ </text:span><text:span text:style-name="T129">CSMA/CA</text:span><text:span text:style-name="T95">（</text:span><text:span text:style-name="T129">WiFi </text:span><text:span text:style-name="T95">用「避免」碰撞，不是「偵測」）。口訣：有線 </text:span><text:span text:style-name="T129">Ethernet = CD</text:span><text:span text:style-name="T95">（</text:span><text:span text:style-name="T129">Detect</text:span><text:span text:style-name="T95">），無線 </text:span><text:span text:style-name="T129">WiFi = CA</text:span><text:span text:style-name="T95">（</text:span><text:span text:style-name="T129">Avoid</text:span><text:span text:style-name="T95">）。</text:span></text:p>
            <text:p text:style-name="P10"><text:span text:style-name="T133">Bluetooth </text:span><text:span text:style-name="T99">是競爭制還是排程制？　</text:span><text:span text:style-name="T95">✓ 排程制（</text:span><text:span text:style-name="T129">Master-Slave</text:span><text:span text:style-name="T95">，老大安排時槽），不是競爭制。</text:span></text:p>
            <text:p text:style-name="P10"><text:span text:style-name="T99">藍牙即時語音用什麼？　</text:span><text:span text:style-name="T95">✓ </text:span><text:span text:style-name="T129">SCO</text:span><text:span text:style-name="T95">（同步連線）或 </text:span><text:span text:style-name="T129">eSCO</text:span><text:span text:style-name="T95">（加強版，可重傳）。</text:span></text:p>
            <text:p text:style-name="P10"><text:span text:style-name="T133">L2CAP </text:span><text:span text:style-name="T99">控制管理用哪個通道？　</text:span><text:span text:style-name="T95">✓ </text:span><text:span text:style-name="T129">Signaling Channel</text:span><text:span text:style-name="T95">；最可靠＝</text:span><text:span text:style-name="T129">Connection-oriented</text:span><text:span text:style-name="T95">；最快速低延遲＝</text:span><text:span text:style-name="T129">Connectionless</text:span><text:span text:style-name="T95">。</text:span></text:p>
          </table:table-cell>
        </table:table-row>
        <table:table-row table:style-name="表格109.1">
          <table:table-cell table:style-name="表格109.A2" office:value-type="string">
            <text:p text:style-name="P8"><text:span text:style-name="T151">⏱ <text:s/></text:span><text:span text:style-name="T201">考前 </text:span><text:span text:style-name="T207">30 </text:span><text:span text:style-name="T201">秒濃縮</text:span></text:p>
            <text:p text:style-name="P9" loext:marker-style-name="T96"><text:span text:style-name="T129">WiFi</text:span><text:span text:style-name="T95">＝搶頻道 </text:span><text:span text:style-name="T129">· BT</text:span><text:span text:style-name="T95">＝排班 </text:span><text:span text:style-name="T129">· </text:span><text:span text:style-name="T95">時槽＝時間格子 </text:span><text:span text:style-name="T129">· SCO</text:span><text:span text:style-name="T95">＝語音 </text:span><text:span text:style-name="T129">· L2CAP</text:span><text:span text:style-name="T95">＝三通道（位於 </text:span><text:span text:style-name="T129">Data Link </text:span><text:span text:style-name="T95">層）。</text:span></text:p>
          </table:table-cell>
        </table:table-row>
      </table:table>
      <text:h text:style-name="P13" text:outline-level="1" loext:marker-style-name="T68"><text:span text:style-name="T67">第 十 篇　資訊安全：設備防護 </text:span><text:span text:style-name="T68">· </text:span><text:span text:style-name="T67">攻防解析 </text:span><text:span text:style-name="T68">· </text:span><text:span text:style-name="T67">企業資安 </text:span><text:span text:style-name="T68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8"><text:span text:style-name="T151">🛡️ <text:s/></text:span><text:span text:style-name="T48">本篇地圖</text:span></text:p>
            <text:p text:style-name="P9" loext:marker-style-name="T96"><text:span text:style-name="T95">本篇是全書最大主題，分六大部分：① 防護設備（</text:span><text:span text:style-name="T129">FW/WAF/NGFW/DMZ/IOC/Proxy</text:span><text:span text:style-name="T95">）；② </text:span><text:span text:style-name="T129">SQL Injection </text:span><text:span text:style-name="T95">與 </text:span><text:span text:style-name="T129">Zero-Day </text:span><text:span text:style-name="T95">攻防；③ </text:span><text:span text:style-name="T129">Firewall/IDS/IPS/SNMP/ICMP</text:span><text:span text:style-name="T95">；④ 企業資安三階段；⑤ </text:span><text:span text:style-name="T129">EDR/MDR/MITRE ATT&amp;CK/</text:span><text:span text:style-name="T95">數位韌性；⑥ </text:span><text:span text:style-name="T129">Zero Trust </text:span><text:span text:style-name="T95">零信任。</text:span></text:p>
          </table:table-cell>
        </table:table-row>
      </table:table>
      <text:h text:style-name="P3" text:outline-level="2" loext:marker-style-name="T27"><text:span text:style-name="T28">壹、資安與網路設備：</text:span><text:span text:style-name="T27">FW · WAF · NGFW · DMZ · IOC · Proxy</text:span></text:h>
      <text:p text:style-name="P31" loext:marker-style-name="T96"><text:span text:style-name="T95">想像你家是一間公司：外面是危險的 </text:span><text:span text:style-name="T129">Internet</text:span><text:span text:style-name="T95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6" loext:marker-style-name="T66"><text:span text:style-name="T65">名詞</text:span><text:span text:style-name="T66"/></text:p>
            </table:table-cell>
            <table:table-cell table:style-name="表格111.A1" office:value-type="string">
              <text:p text:style-name="P6" loext:marker-style-name="T66"><text:span text:style-name="T65">一行說明</text:span><text:span text:style-name="T66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5" loext:marker-style-name="T80"><text:span text:style-name="T121">FW</text:span><text:span text:style-name="T80"/></text:p>
          </table:table-cell>
          <table:table-cell table:style-name="表格111.A2" office:value-type="string">
            <text:p text:style-name="P25" loext:marker-style-name="T80"><text:span text:style-name="T79">傳統防火牆，只看封包「外面」的 </text:span><text:span text:style-name="T121">IP</text:span><text:span text:style-name="T79">、</text:span><text:span text:style-name="T121">Port</text:span><text:span text:style-name="T79">、</text:span><text:span text:style-name="T121">Protocol</text:span></text:p>
          </table:table-cell>
        </table:table-row>
        <table:table-row table:style-name="表格111.1">
          <table:table-cell table:style-name="表格111.A3" office:value-type="string">
            <text:p text:style-name="P25" loext:marker-style-name="T80"><text:span text:style-name="T121">WAF</text:span><text:span text:style-name="T80"/></text:p>
          </table:table-cell>
          <table:table-cell table:style-name="表格111.A3" office:value-type="string">
            <text:p text:style-name="P25" loext:marker-style-name="T80"><text:span text:style-name="T79">網站應用防火牆，會打開封包「裡面」，防 </text:span><text:span text:style-name="T121">SQL Injection</text:span><text:span text:style-name="T79">、</text:span><text:span text:style-name="T121">XSS</text:span></text:p>
          </table:table-cell>
        </table:table-row>
        <table:table-row table:style-name="表格111.1">
          <table:table-cell table:style-name="表格111.A2" office:value-type="string">
            <text:p text:style-name="P25" loext:marker-style-name="T80"><text:span text:style-name="T121">NGFW</text:span><text:span text:style-name="T80"/></text:p>
          </table:table-cell>
          <table:table-cell table:style-name="表格111.A2" office:value-type="string">
            <text:p text:style-name="P25" loext:marker-style-name="T80"><text:span text:style-name="T79">次世代防火牆，比 </text:span><text:span text:style-name="T121">FW </text:span><text:span text:style-name="T79">更聰明，有 </text:span><text:span text:style-name="T121">DPI </text:span><text:span text:style-name="T79">深度檢查、</text:span><text:span text:style-name="T121">IPS</text:span><text:span text:style-name="T79">、</text:span><text:span text:style-name="T121">App </text:span><text:span text:style-name="T79">識別</text:span></text:p>
          </table:table-cell>
        </table:table-row>
        <table:table-row table:style-name="表格111.1">
          <table:table-cell table:style-name="表格111.A3" office:value-type="string">
            <text:p text:style-name="P25" loext:marker-style-name="T80"><text:span text:style-name="T121">DMZ</text:span><text:span text:style-name="T80"/></text:p>
          </table:table-cell>
          <table:table-cell table:style-name="表格111.A3" office:value-type="string">
            <text:p text:style-name="P25" loext:marker-style-name="T80"><text:span text:style-name="T79">隔離區，把對外服務（</text:span><text:span text:style-name="T121">Web</text:span><text:span text:style-name="T79">、</text:span><text:span text:style-name="T121">Mail</text:span><text:span text:style-name="T79">）放這裡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25" loext:marker-style-name="T80"><text:span text:style-name="T121">IOC</text:span><text:span text:style-name="T80"/></text:p>
          </table:table-cell>
          <table:table-cell table:style-name="表格111.A2" office:value-type="string">
            <text:p text:style-name="P25" loext:marker-style-name="T80"><text:span text:style-name="T79">入侵指標（攻擊事後證據）：</text:span><text:span text:style-name="T121">Domain</text:span><text:span text:style-name="T79">（網）、</text:span><text:span text:style-name="T121">Hash</text:span><text:span text:style-name="T79">（檔）、</text:span><text:span text:style-name="T121">IP</text:span><text:span text:style-name="T79">（連）、</text:span><text:span text:style-name="T121">C2</text:span><text:span text:style-name="T79">（控）</text:span></text:p>
          </table:table-cell>
        </table:table-row>
        <table:table-row table:style-name="表格111.1">
          <table:table-cell table:style-name="表格111.A3" office:value-type="string">
            <text:p text:style-name="P25" loext:marker-style-name="T80"><text:span text:style-name="T121">Proxy</text:span><text:span text:style-name="T80"/></text:p>
          </table:table-cell>
          <table:table-cell table:style-name="表格111.A3" office:value-type="string">
            <text:p text:style-name="P25" loext:marker-style-name="T80"><text:span text:style-name="T79">正向代理，幫「使用者（</text:span><text:span text:style-name="T121">Client</text:span><text:span text:style-name="T79">）」隱藏 </text:span><text:span text:style-name="T121">IP</text:span><text:span text:style-name="T79">、快取內容</text:span></text:p>
          </table:table-cell>
        </table:table-row>
        <table:table-row table:style-name="表格111.1">
          <table:table-cell table:style-name="表格111.A2" office:value-type="string">
            <text:p text:style-name="P25" loext:marker-style-name="T80"><text:span text:style-name="T121">Reverse Proxy</text:span><text:span text:style-name="T80"/></text:p>
          </table:table-cell>
          <table:table-cell table:style-name="表格111.A2" office:value-type="string">
            <text:p text:style-name="P25" loext:marker-style-name="T80"><text:span text:style-name="T79">反向代理，幫「伺服器（</text:span><text:span text:style-name="T121">Server</text:span><text:span text:style-name="T79">）」負載平衡、隱藏主機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防火牆 </text:span><text:span text:style-name="T154">Firewall</text:span><text:span text:style-name="T155">（</text:span><text:span text:style-name="T154">FW</text:span><text:span text:style-name="T155">）</text:span></text:h>
      <text:p text:style-name="P31" loext:marker-style-name="T96"><text:span text:style-name="T95">最基本的網路防護設備，像公司門口的警衛。只看封包的「外部資訊」：</text:span><text:span text:style-name="T129">IP </text:span><text:span text:style-name="T95">位址（來者是誰）、</text:span><text:span text:style-name="T129">Port</text:span><text:span text:style-name="T95">（從哪個門進來）、</text:span><text:span text:style-name="T129">Protocol</text:span><text:span text:style-name="T95">（什麼類型）。主要運作在 </text:span><text:span text:style-name="T129">L3</text:span><text:span text:style-name="T95">（網路層）與 </text:span><text:span text:style-name="T129">L4</text:span><text:span text:style-name="T95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8"><text:span text:style-name="T151">⚠️ <text:s/></text:span><text:span text:style-name="T173">缺點</text:span></text:p>
            <text:p text:style-name="P9" loext:marker-style-name="T96"><text:span text:style-name="T129">FW </text:span><text:span text:style-name="T95">只看外面，不看封包裡面的內容，無法防止應用層攻擊（如 </text:span><text:span text:style-name="T129">SQL Injection</text:span><text:span text:style-name="T95">）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網站應用防火牆 </text:span><text:span text:style-name="T154">WAF</text:span></text:h>
      <text:p text:style-name="P31" loext:marker-style-name="T96"><text:span text:style-name="T95">進階版防護，會「打開包包檢查內容」，專門防禦網站層面的攻擊：</text:span><text:span text:style-name="T129">SQL Injection</text:span><text:span text:style-name="T95">（注入惡意 </text:span><text:span text:style-name="T129">SQL </text:span><text:span text:style-name="T95">竊取資料庫）、</text:span><text:span text:style-name="T129">XSS</text:span><text:span text:style-name="T95">（插入惡意 </text:span><text:span text:style-name="T129">JavaScript</text:span><text:span text:style-name="T95">）、其他 </text:span><text:span text:style-name="T129">HTTP </text:span><text:span text:style-name="T95">層攻擊（</text:span><text:span text:style-name="T129">CSRF</text:span><text:span text:style-name="T95">、</text:span><text:span text:style-name="T129">Path Traversal</text:span><text:span text:style-name="T95">）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6" loext:marker-style-name="T66"><text:span text:style-name="T65">比較項目</text:span><text:span text:style-name="T66"/></text:p>
            </table:table-cell>
            <table:table-cell table:style-name="表格113.A1" office:value-type="string">
              <text:p text:style-name="P6" loext:marker-style-name="T66"><text:span text:style-name="T75">FW</text:span><text:span text:style-name="T66"/></text:p>
            </table:table-cell>
            <table:table-cell table:style-name="表格113.A1" office:value-type="string">
              <text:p text:style-name="P6" loext:marker-style-name="T66"><text:span text:style-name="T75">WAF</text:span><text:span text:style-name="T66"/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5" loext:marker-style-name="T80"><text:span text:style-name="T79">檢查範圍</text:span><text:span text:style-name="T80"/></text:p>
          </table:table-cell>
          <table:table-cell table:style-name="表格113.A2" office:value-type="string">
            <text:p text:style-name="P25" loext:marker-style-name="T80"><text:span text:style-name="T79">封包外面（</text:span><text:span text:style-name="T121">IP/Port</text:span><text:span text:style-name="T79">）</text:span></text:p>
          </table:table-cell>
          <table:table-cell table:style-name="表格113.A2" office:value-type="string">
            <text:p text:style-name="P25" loext:marker-style-name="T80"><text:span text:style-name="T79">封包裡面（</text:span><text:span text:style-name="T121">HTTP </text:span><text:span text:style-name="T79">內容）</text:span></text:p>
          </table:table-cell>
        </table:table-row>
        <table:table-row table:style-name="表格113.1">
          <table:table-cell table:style-name="表格113.A3" office:value-type="string">
            <text:p text:style-name="P25" loext:marker-style-name="T80"><text:span text:style-name="T121">OSI </text:span><text:span text:style-name="T79">分層</text:span></text:p>
          </table:table-cell>
          <table:table-cell table:style-name="表格113.A3" office:value-type="string">
            <text:p text:style-name="P25" loext:marker-style-name="T80"><text:span text:style-name="T121">L3 / L4</text:span><text:span text:style-name="T80"/></text:p>
          </table:table-cell>
          <table:table-cell table:style-name="表格113.A3" office:value-type="string">
            <text:p text:style-name="P25" loext:marker-style-name="T80"><text:span text:style-name="T121">L7</text:span><text:span text:style-name="T79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5" loext:marker-style-name="T80"><text:span text:style-name="T79">防禦 </text:span><text:span text:style-name="T121">SQL Injection</text:span></text:p>
          </table:table-cell>
          <table:table-cell table:style-name="表格113.A2" office:value-type="string">
            <text:p text:style-name="P25" loext:marker-style-name="T80"><text:span text:style-name="T121">✗ </text:span><text:span text:style-name="T79">無法</text:span></text:p>
          </table:table-cell>
          <table:table-cell table:style-name="表格113.A2" office:value-type="string">
            <text:p text:style-name="P25" loext:marker-style-name="T80"><text:span text:style-name="T121">○ </text:span><text:span text:style-name="T79">可以</text:span></text:p>
          </table:table-cell>
        </table:table-row>
        <table:table-row table:style-name="表格113.1">
          <table:table-cell table:style-name="表格113.A3" office:value-type="string">
            <text:p text:style-name="P25" loext:marker-style-name="T80"><text:span text:style-name="T79">防禦 </text:span><text:span text:style-name="T121">XSS</text:span></text:p>
          </table:table-cell>
          <table:table-cell table:style-name="表格113.A3" office:value-type="string">
            <text:p text:style-name="P25" loext:marker-style-name="T80"><text:span text:style-name="T121">✗ </text:span><text:span text:style-name="T79">無法</text:span></text:p>
          </table:table-cell>
          <table:table-cell table:style-name="表格113.A3" office:value-type="string">
            <text:p text:style-name="P25" loext:marker-style-name="T80"><text:span text:style-name="T121">○ </text:span><text:span text:style-name="T79">可以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次世代防火牆 </text:span><text:span text:style-name="T154">NGFW</text:span></text:h>
      <text:p text:style-name="P31" loext:marker-style-name="T96"><text:span text:style-name="T95">在傳統 </text:span><text:span text:style-name="T129">FW </text:span><text:span text:style-name="T95">基礎上大幅強化：</text:span><text:span text:style-name="T129">DPI</text:span><text:span text:style-name="T95">（深度封包檢測）、</text:span><text:span text:style-name="T129">IPS</text:span><text:span text:style-name="T95">（入侵防禦）、</text:span><text:span text:style-name="T129">App </text:span><text:span text:style-name="T95">識別（知道你在用 </text:span><text:span text:style-name="T129">LINE </text:span><text:span text:style-name="T95">還是 </text:span><text:span text:style-name="T129">YouTube</text:span><text:span text:style-name="T95">）、使用者身份識別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22" loext:marker-style-name="T66"><text:span text:style-name="T65">能力</text:span><text:span text:style-name="T66"/></text:p>
            </table:table-cell>
            <table:table-cell table:style-name="表格114.A1" office:value-type="string">
              <text:p text:style-name="P22" loext:marker-style-name="T66"><text:span text:style-name="T75">FW</text:span><text:span text:style-name="T66"/></text:p>
            </table:table-cell>
            <table:table-cell table:style-name="表格114.A1" office:value-type="string">
              <text:p text:style-name="P22" loext:marker-style-name="T66"><text:span text:style-name="T75">WAF</text:span><text:span text:style-name="T66"/></text:p>
            </table:table-cell>
            <table:table-cell table:style-name="表格114.A1" office:value-type="string">
              <text:p text:style-name="P22" loext:marker-style-name="T66"><text:span text:style-name="T75">NGFW</text:span><text:span text:style-name="T66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5" loext:marker-style-name="T80"><text:span text:style-name="T121">IP/Port </text:span><text:span text:style-name="T79">過濾</text:span></text:p>
          </table:table-cell>
          <table:table-cell table:style-name="表格114.A2" office:value-type="string">
            <text:p text:style-name="P24" loext:marker-style-name="T191"><text:span text:style-name="T190">○</text:span><text:span text:style-name="T191"/></text:p>
          </table:table-cell>
          <table:table-cell table:style-name="表格114.A2" office:value-type="string">
            <text:p text:style-name="P24" loext:marker-style-name="T191"><text:span text:style-name="T190">○</text:span><text:span text:style-name="T191"/></text:p>
          </table:table-cell>
          <table:table-cell table:style-name="表格114.A2" office:value-type="string">
            <text:p text:style-name="P24" loext:marker-style-name="T191"><text:span text:style-name="T190">○</text:span><text:span text:style-name="T191"/>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5" loext:marker-style-name="T80"><text:span text:style-name="T121">HTTP </text:span><text:span text:style-name="T79">內容檢查</text:span></text:p>
          </table:table-cell>
          <table:table-cell table:style-name="表格114.A3" office:value-type="string">
            <text:p text:style-name="P24" loext:marker-style-name="T182"><text:span text:style-name="T187">✗</text:span><text:span text:style-name="T182"/></text:p>
          </table:table-cell>
          <table:table-cell table:style-name="表格114.A3" office:value-type="string">
            <text:p text:style-name="P24" loext:marker-style-name="T191"><text:span text:style-name="T190">○</text:span><text:span text:style-name="T191"/></text:p>
          </table:table-cell>
          <table:table-cell table:style-name="表格114.A3" office:value-type="string">
            <text:p text:style-name="P24" loext:marker-style-name="T191"><text:span text:style-name="T190">○</text:span><text:span text:style-name="T191"/></text:p>
          </table:table-cell>
        </table:table-row>
        <table:table-row table:style-name="表格114.1">
          <table:table-cell table:style-name="表格114.A2" office:value-type="string">
            <text:p text:style-name="P25" loext:marker-style-name="T80"><text:span text:style-name="T121">DPI </text:span><text:span text:style-name="T79">深度檢查</text:span></text:p>
          </table:table-cell>
          <table:table-cell table:style-name="表格114.A2" office:value-type="string">
            <text:p text:style-name="P24" loext:marker-style-name="T182"><text:span text:style-name="T187">✗</text:span><text:span text:style-name="T182"/></text:p>
          </table:table-cell>
          <table:table-cell table:style-name="表格114.A2" office:value-type="string">
            <text:p text:style-name="P24" loext:marker-style-name="T182"><text:span text:style-name="T187">✗</text:span><text:span text:style-name="T182"/></text:p>
          </table:table-cell>
          <table:table-cell table:style-name="表格114.A2" office:value-type="string">
            <text:p text:style-name="P24" loext:marker-style-name="T191"><text:span text:style-name="T190">○</text:span><text:span text:style-name="T191"/></text:p>
          </table:table-cell>
        </table:table-row>
        <table:table-row table:style-name="表格114.1">
          <table:table-cell table:style-name="表格114.A3" office:value-type="string">
            <text:p text:style-name="P25" loext:marker-style-name="T80"><text:span text:style-name="T121">App </text:span><text:span text:style-name="T79">識別</text:span></text:p>
          </table:table-cell>
          <table:table-cell table:style-name="表格114.A3" office:value-type="string">
            <text:p text:style-name="P24" loext:marker-style-name="T182"><text:span text:style-name="T187">✗</text:span><text:span text:style-name="T182"/></text:p>
          </table:table-cell>
          <table:table-cell table:style-name="表格114.A3" office:value-type="string">
            <text:p text:style-name="P24" loext:marker-style-name="T182"><text:span text:style-name="T187">✗</text:span><text:span text:style-name="T182"/></text:p>
          </table:table-cell>
          <table:table-cell table:style-name="表格114.A3" office:value-type="string">
            <text:p text:style-name="P24" loext:marker-style-name="T191"><text:span text:style-name="T190">○</text:span><text:span text:style-name="T191"/></text:p>
          </table:table-cell>
        </table:table-row>
        <table:table-row table:style-name="表格114.1">
          <table:table-cell table:style-name="表格114.A2" office:value-type="string">
            <text:p text:style-name="P25" loext:marker-style-name="T80"><text:span text:style-name="T121">IPS </text:span><text:span text:style-name="T79">入侵防禦</text:span></text:p>
          </table:table-cell>
          <table:table-cell table:style-name="表格114.A2" office:value-type="string">
            <text:p text:style-name="P24" loext:marker-style-name="T182"><text:span text:style-name="T187">✗</text:span><text:span text:style-name="T182"/></text:p>
          </table:table-cell>
          <table:table-cell table:style-name="表格114.A2" office:value-type="string">
            <text:p text:style-name="P24" loext:marker-style-name="T182"><text:span text:style-name="T187">✗</text:span><text:span text:style-name="T182"/></text:p>
          </table:table-cell>
          <table:table-cell table:style-name="表格114.A2" office:value-type="string">
            <text:p text:style-name="P24" loext:marker-style-name="T191"><text:span text:style-name="T190">○</text:span><text:span text:style-name="T191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8"><text:span text:style-name="T151">💡 <text:s/></text:span><text:span text:style-name="T155">實務說明</text:span></text:p>
            <text:p text:style-name="P9" loext:marker-style-name="T96"><text:span text:style-name="T129">NGFW </text:span><text:span text:style-name="T95">在現代企業通常用來「取代」傳統 </text:span><text:span text:style-name="T129">FW</text:span><text:span text:style-name="T95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2" text:outline-level="3"><text:span text:style-name="T153">▍</text:span><text:span text:style-name="T154"> DMZ</text:span><text:span text:style-name="T155">（非軍事區 </text:span><text:span text:style-name="T154">/ </text:span><text:span text:style-name="T155">隔離區）</text:span></text:h>
      <text:p text:style-name="P31" loext:marker-style-name="T96"><text:span text:style-name="T95">網路架構中的「隔離緩衝區」，專門放置需要對外公開的服務。生活比喻：</text:span><text:span text:style-name="T129">DMZ</text:span><text:span text:style-name="T95">＝大樓門口的接待室，訪客只能到接待室、無法進入辦公室；就算接待室被搗亂，也不影響裡面的員工與機密。通常放：</text:span><text:span text:style-name="T129">Web Server</text:span><text:span text:style-name="T95">、</text:span><text:span text:style-name="T129">Mail Server</text:span><text:span text:style-name="T95">、</text:span><text:span text:style-name="T129">DNS Server</text:span><text:span text:style-name="T95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8"><text:span text:style-name="T151">⚠️ <text:s/></text:span><text:span text:style-name="T173">考試陷阱</text:span></text:p>
            <text:p text:style-name="P9" loext:marker-style-name="T96"><text:span text:style-name="T129">DMZ </text:span><text:span text:style-name="T95">的用途是「隔離保護」（就算 </text:span><text:span text:style-name="T129">DMZ </text:span><text:span text:style-name="T95">內伺服器被駭，駭客也無法直接進入內部網路），不是提升速度，也不是加密資料！</text:span></text:p>
          </table:table-cell>
        </table:table-row>
      </table:table>
      <text:h text:style-name="P2" text:outline-level="3"><text:span text:style-name="T153">▍</text:span><text:span text:style-name="T154"> IOC</text:span><text:span text:style-name="T155">（入侵指標）</text:span></text:h>
      <text:p text:style-name="P31" loext:marker-style-name="T96"><text:span text:style-name="T129">IOC</text:span><text:span text:style-name="T95">（</text:span><text:span text:style-name="T129">Indicator of Compromise</text:span><text:span text:style-name="T95">）是「攻擊發生後所留下的已知痕跡與線索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8"><text:span text:style-name="T151">🎯 <text:s/></text:span><text:span text:style-name="T201">核心觀念</text:span></text:p>
            <text:p text:style-name="P9" loext:marker-style-name="T96"><text:span text:style-name="T129">IOC </text:span><text:span text:style-name="T95">是「已發生攻擊的事後證據」，不是用來預測未來攻擊的工具！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22" loext:marker-style-name="T72"><text:span text:style-name="T71">口訣</text:span><text:span text:style-name="T72"/></text:p>
          </table:table-cell>
          <table:table-cell table:style-name="表格116.A2" office:value-type="string">
            <text:p text:style-name="P22" loext:marker-style-name="T72"><text:span text:style-name="T77">IOC </text:span><text:span text:style-name="T71">類型</text:span></text:p>
          </table:table-cell>
          <table:table-cell table:style-name="表格116.A2" office:value-type="string">
            <text:p text:style-name="P22" loext:marker-style-name="T72"><text:span text:style-name="T71">白話說明</text:span><text:span text:style-name="T72"/></text:p>
          </table:table-cell>
          <table:table-cell table:style-name="表格116.A2" office:value-type="string">
            <text:p text:style-name="P22" loext:marker-style-name="T72"><text:span text:style-name="T71">對應防禦工具</text:span><text:span text:style-name="T72"/></text:p>
          </table:table-cell>
        </table:table-row>
        <table:table-row table:style-name="表格116.1">
          <table:table-cell table:style-name="表格116.A3" office:value-type="string">
            <text:p text:style-name="P24" loext:marker-style-name="T200"><text:span text:style-name="T199">網</text:span><text:span text:style-name="T200"/></text:p>
          </table:table-cell>
          <table:table-cell table:style-name="表格116.A3" office:value-type="string">
            <text:p text:style-name="P25" loext:marker-style-name="T112"><text:span text:style-name="T113">惡意 </text:span><text:span text:style-name="T144">Domain</text:span><text:span text:style-name="T113">（網域）</text:span></text:p>
          </table:table-cell>
          <table:table-cell table:style-name="表格116.A3" office:value-type="string">
            <text:p text:style-name="P25" loext:marker-style-name="T112"><text:span text:style-name="T113">釣魚網站網址，用來騙帳密、假冒正規網站</text:span><text:span text:style-name="T112"/></text:p>
          </table:table-cell>
          <table:table-cell table:style-name="表格116.A3" office:value-type="string">
            <text:p text:style-name="P25" loext:marker-style-name="T112"><text:span text:style-name="T144">DNS </text:span><text:span text:style-name="T113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24" loext:marker-style-name="T200"><text:span text:style-name="T199">檔</text:span><text:span text:style-name="T200"/></text:p>
          </table:table-cell>
          <table:table-cell table:style-name="表格116.A4" office:value-type="string">
            <text:p text:style-name="P25" loext:marker-style-name="T112"><text:span text:style-name="T113">惡意 </text:span><text:span text:style-name="T144">Hash</text:span><text:span text:style-name="T113">（雜湊值）</text:span></text:p>
          </table:table-cell>
          <table:table-cell table:style-name="表格116.A4" office:value-type="string">
            <text:p text:style-name="P25" loext:marker-style-name="T112"><text:span text:style-name="T113">惡意程式的唯一特徵碼，改檔名也能識別</text:span><text:span text:style-name="T112"/></text:p>
          </table:table-cell>
          <table:table-cell table:style-name="表格116.A4" office:value-type="string">
            <text:p text:style-name="P25" loext:marker-style-name="T112"><text:span text:style-name="T113">防毒軟體 </text:span><text:span text:style-name="T144">AV</text:span><text:span text:style-name="T113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24" loext:marker-style-name="T200"><text:span text:style-name="T199">連</text:span><text:span text:style-name="T200"/></text:p>
          </table:table-cell>
          <table:table-cell table:style-name="表格116.A3" office:value-type="string">
            <text:p text:style-name="P25" loext:marker-style-name="T112"><text:span text:style-name="T113">惡意 </text:span><text:span text:style-name="T144">IP </text:span><text:span text:style-name="T113">位址</text:span></text:p>
          </table:table-cell>
          <table:table-cell table:style-name="表格116.A3" office:value-type="string">
            <text:p text:style-name="P25" loext:marker-style-name="T112"><text:span text:style-name="T113">感染後電腦對外異常連線的目標</text:span><text:span text:style-name="T112"/></text:p>
          </table:table-cell>
          <table:table-cell table:style-name="表格116.A3" office:value-type="string">
            <text:p text:style-name="P25" loext:marker-style-name="T112"><text:span text:style-name="T113">防火牆 </text:span><text:span text:style-name="T144">FW / NGFW</text:span><text:span text:style-name="T113">（封鎖 </text:span><text:span text:style-name="T144">IP</text:span><text:span text:style-name="T113">）</text:span></text:p>
          </table:table-cell>
        </table:table-row>
        <table:table-row table:style-name="表格116.1">
          <table:table-cell table:style-name="表格116.A4" office:value-type="string">
            <text:p text:style-name="P24" loext:marker-style-name="T200"><text:span text:style-name="T199">控</text:span><text:span text:style-name="T200"/></text:p>
          </table:table-cell>
          <table:table-cell table:style-name="表格116.A4" office:value-type="string">
            <text:p text:style-name="P25" loext:marker-style-name="T112"><text:span text:style-name="T144">C2 Server</text:span><text:span text:style-name="T113">（指揮控制）</text:span></text:p>
          </table:table-cell>
          <table:table-cell table:style-name="表格116.A4" office:value-type="string">
            <text:p text:style-name="P25" loext:marker-style-name="T112"><text:span text:style-name="T113">駭客遠端操控被感染主機的總部</text:span><text:span text:style-name="T112"/></text:p>
          </table:table-cell>
          <table:table-cell table:style-name="表格116.A4" office:value-type="string">
            <text:p text:style-name="P25" loext:marker-style-name="T112"><text:span text:style-name="T144">SIEM / IDS</text:span><text:span text:style-name="T113">（偵測異常連線）</text:span>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8"><text:span text:style-name="T151">▸ <text:s/></text:span><text:span text:style-name="T48">攻擊全流程（</text:span><text:span text:style-name="T59">IOC </text:span><text:span text:style-name="T48">出現在哪裡？）</text:span></text:p>
            <text:p text:style-name="P9" loext:marker-style-name="T96"><text:span text:style-name="T129">① </text:span><text:span text:style-name="T95">駭客準備：建立釣魚網站（</text:span><text:span text:style-name="T129">Domain</text:span><text:span text:style-name="T95">）、製作惡意程式（</text:span><text:span text:style-name="T129">Hash</text:span><text:span text:style-name="T95">）、架設控制中心（</text:span><text:span text:style-name="T129">C2</text:span><text:span text:style-name="T95">）→ ② 發動攻擊：受害者點釣魚網站 → 下載惡意程式 → ③ 主機感染：電腦自動連回駭客主機（</text:span><text:span text:style-name="T129">IP</text:span><text:span text:style-name="T95">）或 </text:span><text:span text:style-name="T129">C2 → ④ </text:span><text:span text:style-name="T95">駭客控制：下指令、偷資料、橫向移動 → ⑤ 資安系統偵測：比對異常 </text:span><text:span text:style-name="T129">IP</text:span><text:span text:style-name="T95">、惡意 </text:span><text:span text:style-name="T129">Domain</text:span><text:span text:style-name="T95">、已知 </text:span><text:span text:style-name="T129">Hash</text:span><text:span text:style-name="T95">、</text:span><text:span text:style-name="T129">C2 </text:span><text:span text:style-name="T95">行為 → ⑥ 判定中毒 → </text:span><text:span text:style-name="T129">IOC </text:span><text:span text:style-name="T95">記錄建立 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8"><text:span text:style-name="T151">⚡ <text:s/></text:span><text:span text:style-name="T165">10 </text:span><text:span text:style-name="T155">秒口訣速記</text:span></text:p>
            <text:p text:style-name="P9" loext:marker-style-name="T96"><text:span text:style-name="T95">網騙你（</text:span><text:span text:style-name="T129">Domain</text:span><text:span text:style-name="T95">）→ 檔害你（</text:span><text:span text:style-name="T129">Hash</text:span><text:span text:style-name="T95">）→ 連出去（</text:span><text:span text:style-name="T129">IP</text:span><text:span text:style-name="T95">）→ 被控制（</text:span><text:span text:style-name="T129">C2</text:span><text:span text:style-name="T95">）。口訣：「網 → 檔 → 連 → 控」。</text:span></text:p>
          </table:table-cell>
          <table:covered-table-cell/>
          <table:covered-table-cell/>
          <table:covered-table-cell/>
        </table:table-row>
      </table:table>
      <text:h text:style-name="P2" text:outline-level="3"><text:span text:style-name="T153">▍</text:span><text:span text:style-name="T154"> Proxy </text:span><text:span text:style-name="T155">與 </text:span><text:span text:style-name="T154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22" loext:marker-style-name="T66"><text:span text:style-name="T75">🧍 Proxy</text:span><text:span text:style-name="T65">（正向代理）— 幫 </text:span><text:span text:style-name="T75">Client</text:span></text:p>
            </table:table-cell>
            <table:table-cell table:style-name="表格117.A1" office:value-type="string">
              <text:p text:style-name="P22" loext:marker-style-name="T66"><text:span text:style-name="T75">🏢 Reverse Proxy</text:span><text:span text:style-name="T65">（反向代理）— 幫 </text:span><text:span text:style-name="T75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5" loext:marker-style-name="T80"><text:span text:style-name="T79">流程：你 → </text:span><text:span text:style-name="T121">Proxy → </text:span><text:span text:style-name="T79">網站。隱藏使用者真實 </text:span><text:span text:style-name="T121">IP</text:span><text:span text:style-name="T79">、</text:span><text:span text:style-name="T121">Cache </text:span><text:span text:style-name="T79">加速、企業控管員工能存取哪些網站。比</text:span><text:soft-page-break/><text:span text:style-name="T79">喻：你請朋友幫你買東西，店家不知道真正買家是你。</text:span></text:p>
          </table:table-cell>
          <table:table-cell table:style-name="表格117.A2" office:value-type="string">
            <text:p text:style-name="P25" loext:marker-style-name="T80"><text:span text:style-name="T79">流程：你 → </text:span><text:span text:style-name="T121">Reverse Proxy → </text:span><text:span text:style-name="T79">真正 </text:span><text:span text:style-name="T121">Server</text:span><text:span text:style-name="T79">。負載平衡、隱藏後端伺服器、</text:span><text:span text:style-name="T121">SSL </text:span><text:span text:style-name="T79">終止與安全防護。比喻：公</text:span><text:soft-page-break/><text:span text:style-name="T79">司大廳接待員分流訪客，客人不知道真正辦公室在哪層。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8"><text:span text:style-name="T151">🚧 <text:s/></text:span><text:span text:style-name="T48">封包闖關順序</text:span></text:p>
            <text:p text:style-name="P9" loext:marker-style-name="T96"><text:span text:style-name="T129">🧍 </text:span><text:span text:style-name="T95">使用者（</text:span><text:span text:style-name="T129">Client</text:span><text:span text:style-name="T95">）→ 🔵 </text:span><text:span text:style-name="T129">Proxy</text:span><text:span text:style-name="T95">（選用，隱藏 </text:span><text:span text:style-name="T129">IP/</text:span><text:span text:style-name="T95">上網控管）→ 🌍 </text:span><text:span text:style-name="T129">Internet → 🔥 FW/NGFW</text:span><text:span text:style-name="T95">（第一道防線，過濾 </text:span><text:span text:style-name="T129">IP/Port/</text:span><text:span text:style-name="T95">深度檢查）→ 🏝 </text:span><text:span text:style-name="T129">DMZ</text:span><text:span text:style-name="T95">（</text:span><text:span text:style-name="T129">Web/Mail/DNS </text:span><text:span text:style-name="T95">伺服器）→ 🛡 </text:span><text:span text:style-name="T129">WAF</text:span><text:span text:style-name="T95">（深度過濾 </text:span><text:span text:style-name="T129">HTTP</text:span><text:span text:style-name="T95">，防 </text:span><text:span text:style-name="T129">SQLi/XSS</text:span><text:span text:style-name="T95">）→ 🪞 </text:span><text:span text:style-name="T129">Reverse Proxy</text:span><text:span text:style-name="T95">（負載平衡</text:span><text:span text:style-name="T129">/</text:span><text:span text:style-name="T95">隱藏後端）→ 🏢 內部 </text:span><text:span text:style-name="T129">Server</text:span><text:span text:style-name="T95">（核心資產）。</text:span></text:p>
            <text:p text:style-name="P10" loext:marker-style-name="T96"><text:span text:style-name="T129">📌 </text:span><text:span text:style-name="T95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8"><text:span text:style-name="T151">🔑 <text:s/></text:span><text:span text:style-name="T201">萬用口訣</text:span></text:p>
            <text:p text:style-name="P9" loext:marker-style-name="T96"><text:span text:style-name="T129">FW </text:span><text:span text:style-name="T95">封外、</text:span><text:span text:style-name="T129">WAF </text:span><text:span text:style-name="T95">看內、</text:span><text:span text:style-name="T129">NGFW </text:span><text:span text:style-name="T95">最強、</text:span><text:span text:style-name="T129">DMZ </text:span><text:span text:style-name="T95">隔離、</text:span><text:span text:style-name="T129">IOC </text:span><text:span text:style-name="T95">壞人、</text:span><text:span text:style-name="T129">Proxy </text:span><text:span text:style-name="T95">幫客、</text:span><text:span text:style-name="T129">Reverse </text:span><text:span text:style-name="T95">幫服。</text:span></text:p>
          </table:table-cell>
        </table:table-row>
      </table:table>
      <text:h text:style-name="P3" text:outline-level="2" loext:marker-style-name="T27"><text:span text:style-name="T28">貳、</text:span><text:span text:style-name="T27">SQL Injection × Zero-Day × </text:span><text:span text:style-name="T28">防禦機制</text:span></text:h>
      <text:h text:style-name="P2" text:outline-level="3"><text:span text:style-name="T153">▍</text:span><text:span text:style-name="T154"> SQL Injection</text:span><text:span text:style-name="T155">（</text:span><text:span text:style-name="T154">SQL </text:span><text:span text:style-name="T155">注入攻擊）</text:span></text:h>
      <text:p text:style-name="P31" loext:marker-style-name="T96"><text:span text:style-name="T95">當你在登入頁輸入帳密，後端會把輸入組合成 </text:span><text:span text:style-name="T129">SQL </text:span><text:span text:style-name="T95">送到資料庫查詢，例如：</text:span><text:span text:style-name="T129">SELECT * FROM users WHERE account='john' AND password='1234'</text:span><text:span text:style-name="T95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8"><text:span text:style-name="T151">💉 <text:s/></text:span><text:span text:style-name="T173">什麼是 </text:span><text:span text:style-name="T177">SQL Injection</text:span><text:span text:style-name="T173">？</text:span></text:p>
            <text:p text:style-name="P9"><text:span text:style-name="T169">核心一句話：</text:span><text:span text:style-name="T95">把原本只是「資料」的輸入，惡意改造成可執行的「</text:span><text:span text:style-name="T129">SQL </text:span><text:span text:style-name="T95">指令」。</text:span></text:p>
            <text:p text:style-name="P10" loext:marker-style-name="T96"><text:span text:style-name="T95">駭客在帳號欄位輸入：</text:span><text:span text:style-name="T129">' OR 1=1 --</text:span><text:span text:style-name="T95">，拼入後變成：…</text:span><text:span text:style-name="T129">WHERE account='' OR 1=1 -- ' AND password='1234'</text:span><text:span text:style-name="T95">。</text:span></text:p>
            <text:p text:style-name="P10" loext:marker-style-name="T96"><text:span text:style-name="T129">OR 1=1 </text:span><text:span text:style-name="T95">永遠成立 → 查出所有使用者；</text:span><text:span text:style-name="T129">-- </text:span><text:span text:style-name="T95">是 </text:span><text:span text:style-name="T129">SQL </text:span><text:span text:style-name="T95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22" loext:marker-style-name="T66"><text:span text:style-name="T75">❌ </text:span><text:span text:style-name="T65">攻擊成功的原因</text:span></text:p>
          </table:table-cell>
          <table:covered-table-cell/>
          <table:table-cell table:style-name="表格119.A2" office:value-type="string">
            <text:p text:style-name="P22" loext:marker-style-name="T66"><text:span text:style-name="T75">✅ </text:span><text:span text:style-name="T65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5" loext:marker-style-name="T80"><text:span text:style-name="T121">① OR 1=1 </text:span><text:span text:style-name="T79">永遠成立，回傳全部使用者 ② </text:span><text:span text:style-name="T121">-- </text:span><text:span text:style-name="T79">把密碼驗證段註解掉 ③ 工程師直接用字串拼接組 </text:span><text:span text:style-name="T121">SQL</text:span><text:span text:style-name="T79">，沒有驗證輸入</text:span></text:p>
          </table:table-cell>
          <table:covered-table-cell/>
          <table:table-cell table:style-name="表格119.A3" office:value-type="string">
            <text:p text:style-name="P25" loext:marker-style-name="T80"><text:span text:style-name="T79">把使用者輸入視為「純資料」，不允許改變 </text:span><text:span text:style-name="T121">SQL </text:span><text:span text:style-name="T79">結構；</text:span><text:span text:style-name="T121">SQL </text:span><text:span text:style-name="T79">骨架固定，不因任何輸入而改變；使用 </text:span><text:span text:style-name="T121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8"><text:span text:style-name="T151">🛡️ <text:s/></text:span><text:span text:style-name="T192">防禦核心：</text:span><text:span text:style-name="T198">Prepared Statement</text:span><text:span text:style-name="T192">（預備語句）</text:span></text:p>
            <text:p text:style-name="P9"><text:span text:style-name="T193">概念：</text:span><text:span text:style-name="T95">先把 </text:span><text:span text:style-name="T129">SQL </text:span><text:span text:style-name="T95">骨架「鎖死」，使用者只能填入資料，完全無法修改 </text:span><text:span text:style-name="T129">SQL </text:span><text:span text:style-name="T95">結構。</text:span></text:p>
            <text:p text:style-name="P10" loext:marker-style-name="T96"><text:span text:style-name="T129">❌ </text:span><text:span text:style-name="T95">危險寫法（字串拼接）：</text:span><text:span text:style-name="T129">sql = "SELECT * FROM users WHERE id='" + input + "'"</text:span><text:span text:style-name="T95">；輸入 </text:span><text:span text:style-name="T129">' OR 1=1 -- → </text:span><text:span text:style-name="T95">結構被竄改。</text:span></text:p>
            <text:p text:style-name="P10" loext:marker-style-name="T96"><text:span text:style-name="T129">✅ </text:span><text:span text:style-name="T95">安全寫法：</text:span><text:span text:style-name="T129">String sql = "SELECT * FROM users WHERE id=?"</text:span><text:span text:style-name="T95">；</text:span><text:span text:style-name="T129">? </text:span><text:span text:style-name="T95">是佔位符，</text:span><text:span text:style-name="T129">input </text:span><text:span text:style-name="T95">被視為純文字，</text:span><text:span text:style-name="T129">' OR 1=1 -- </text:span><text:span text:style-name="T95">完全無效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6" loext:marker-style-name="T72"><text:span text:style-name="T71">輔助防禦手段</text:span><text:span text:style-name="T72"/></text:p>
          </table:table-cell>
          <table:table-cell table:style-name="表格119.A2" table:number-columns-spanned="2" office:value-type="string">
            <text:p text:style-name="P6" loext:marker-style-name="T72"><text:span text:style-name="T71">說明</text:span><text:span text:style-name="T72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5" loext:marker-style-name="T112"><text:span text:style-name="T144">Prepared Statement</text:span><text:span text:style-name="T112"/></text:p>
          </table:table-cell>
          <table:table-cell table:style-name="表格119.A3" table:number-columns-spanned="2" office:value-type="string">
            <text:p text:style-name="P25" loext:marker-style-name="T112"><text:span text:style-name="T144">✅ </text:span><text:span text:style-name="T113">根本解決方案。</text:span><text:span text:style-name="T144">SQL </text:span><text:span text:style-name="T113">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5" loext:marker-style-name="T112"><text:span text:style-name="T113">輸入驗證 </text:span><text:span text:style-name="T144">(Input Validation)</text:span></text:p>
          </table:table-cell>
          <table:table-cell table:style-name="表格119.A7" table:number-columns-spanned="2" office:value-type="string">
            <text:p text:style-name="P25" loext:marker-style-name="T112"><text:span text:style-name="T113">過濾或拒絕特殊字元（如單引號），輔助手段，但單靠此法仍可能被繞過。</text:span><text:span text:style-name="T112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5" loext:marker-style-name="T112"><text:span text:style-name="T144">WAF</text:span><text:span text:style-name="T113">（網站應用防火牆）</text:span></text:p>
          </table:table-cell>
          <table:table-cell table:style-name="表格119.A3" table:number-columns-spanned="2" office:value-type="string">
            <text:p text:style-name="P25" loext:marker-style-name="T112"><text:span text:style-name="T113">偵測 </text:span><text:span text:style-name="T144">OR 1=1</text:span><text:span text:style-name="T113">、</text:span><text:span text:style-name="T144">UNION SELECT </text:span><text:span text:style-name="T113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5" loext:marker-style-name="T112"><text:span text:style-name="T113">最小權限原則</text:span><text:span text:style-name="T112"/></text:p>
          </table:table-cell>
          <table:table-cell table:style-name="表格119.A7" table:number-columns-spanned="2" office:value-type="string">
            <text:p text:style-name="P25" loext:marker-style-name="T112"><text:span text:style-name="T113">資料庫帳號只給應用程式必要的權限，避免帳號被拿下後資料全失。</text:span><text:span text:style-name="T112"/></text:p>
          </table:table-cell>
          <table:covered-table-cell/>
        </table:table-row>
      </table:table>
      <text:h text:style-name="P2" text:outline-level="3"><text:span text:style-name="T153">▍</text:span><text:span text:style-name="T154"> Zero-Day Attack</text:span><text:span text:style-name="T155">（零時差攻擊）</text:span></text:h>
      <text:p text:style-name="P31" loext:marker-style-name="T96"><text:span text:style-name="T129">Zero-Day </text:span><text:span text:style-name="T95">指一個「尚未被開發商發現或公開」的安全漏洞，在廠商來得及發布修補程式（</text:span><text:span text:style-name="T129">Patch</text:span><text:span text:style-name="T95">）之前，駭客就已利用它展開攻擊。命名由來：「</text:span><text:span text:style-name="T129">Day Zero</text:span><text:span text:style-name="T95">」代表廠商只有 </text:span><text:span text:style-name="T129">0 </text:span><text:span text:style-name="T95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22" loext:marker-style-name="T66"><text:span text:style-name="T75">😱 </text:span><text:span text:style-name="T65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22" loext:marker-style-name="T66"><text:span text:style-name="T75">🏠 </text:span><text:span text:style-name="T65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5" loext:marker-style-name="T80"><text:span text:style-name="T79">傳統防毒靠「特徵碼（</text:span><text:span text:style-name="T121">Signature</text:span><text:span text:style-name="T79">）」辨識病毒，像通緝名單。但 </text:span><text:span text:style-name="T121">Zero-Day </text:span><text:span text:style-name="T79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5" loext:marker-style-name="T80"><text:span text:style-name="T79">你家大門有個秘密漏洞，你不知道、鎖廠不知道、所有人都不知道——只有小偷知道。小偷可以天天進你家，直到漏洞被發現並修補為止。</text:span><text:span text:style-name="T80"/></text:p>
          </table:table-cell>
        </table:table-row>
        <table:table-row table:style-name="表格120.1">
          <table:table-cell table:style-name="表格120.A1" office:value-type="string">
            <text:p text:style-name="P6" loext:marker-style-name="T72"><text:span text:style-name="T71">防禦層</text:span><text:span text:style-name="T72"/></text:p>
          </table:table-cell>
          <table:table-cell table:style-name="表格120.A1" office:value-type="string">
            <text:p text:style-name="P6" loext:marker-style-name="T72"><text:span text:style-name="T71">手段</text:span><text:span text:style-name="T72"/></text:p>
          </table:table-cell>
          <table:table-cell table:style-name="表格120.A1" table:number-columns-spanned="2" office:value-type="string">
            <text:p text:style-name="P6" loext:marker-style-name="T72"><text:span text:style-name="T71">說明</text:span><text:span text:style-name="T72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5" loext:marker-style-name="T112"><text:span text:style-name="T113">修補</text:span><text:span text:style-name="T112"/></text:p>
          </table:table-cell>
          <table:table-cell table:style-name="表格120.A2" office:value-type="string">
            <text:p text:style-name="P25" loext:marker-style-name="T112"><text:span text:style-name="T144">Patch </text:span><text:span text:style-name="T113">更新</text:span></text:p>
          </table:table-cell>
          <table:table-cell table:style-name="表格120.A2" table:number-columns-spanned="2" office:value-type="string">
            <text:p text:style-name="P25" loext:marker-style-name="T112"><text:span text:style-name="T113">漏洞公開後立即套用廠商安全更新（這是最重要的行動）</text:span><text:span text:style-name="T112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5" loext:marker-style-name="T112"><text:span text:style-name="T113">偵測</text:span><text:span text:style-name="T112"/></text:p>
          </table:table-cell>
          <table:table-cell table:style-name="表格120.A5" office:value-type="string">
            <text:p text:style-name="P25" loext:marker-style-name="T112"><text:span text:style-name="T144">IDS / IPS</text:span><text:span text:style-name="T112"/></text:p>
          </table:table-cell>
          <table:table-cell table:style-name="表格120.A5" table:number-columns-spanned="2" office:value-type="string">
            <text:p text:style-name="P25" loext:marker-style-name="T112"><text:span text:style-name="T144">IDS </text:span><text:span text:style-name="T113">發現異常後發警報；</text:span><text:span text:style-name="T144">IPS </text:span><text:span text:style-name="T113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5" loext:marker-style-name="T112"><text:span text:style-name="T113">深度檢查</text:span><text:span text:style-name="T112"/></text:p>
          </table:table-cell>
          <table:table-cell table:style-name="表格120.A2" office:value-type="string">
            <text:p text:style-name="P25" loext:marker-style-name="T112"><text:span text:style-name="T144">DPI</text:span><text:span text:style-name="T113">（深度封包檢查）</text:span></text:p>
          </table:table-cell>
          <table:table-cell table:style-name="表格120.A2" table:number-columns-spanned="2" office:value-type="string">
            <text:p text:style-name="P25" loext:marker-style-name="T112"><text:span text:style-name="T113">拆開檢查封包內容，偵測隱藏其中的攻擊指令</text:span><text:span text:style-name="T112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5" loext:marker-style-name="T112"><text:span text:style-name="T113">隔離</text:span><text:span text:style-name="T112"/></text:p>
          </table:table-cell>
          <table:table-cell table:style-name="表格120.A5" office:value-type="string">
            <text:p text:style-name="P25" loext:marker-style-name="T112"><text:span text:style-name="T113">網路分段</text:span><text:span text:style-name="T112"/></text:p>
          </table:table-cell>
          <table:table-cell table:style-name="表格120.A5" table:number-columns-spanned="2" office:value-type="string">
            <text:p text:style-name="P25" loext:marker-style-name="T112"><text:span text:style-name="T113">把網路切成多區，即使入侵一區也難橫向擴散</text:span><text:span text:style-name="T112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5" loext:marker-style-name="T112"><text:span text:style-name="T113">降低風險</text:span><text:span text:style-name="T112"/></text:p>
          </table:table-cell>
          <table:table-cell table:style-name="表格120.A2" office:value-type="string">
            <text:p text:style-name="P25" loext:marker-style-name="T112"><text:span text:style-name="T113">最小權限原則</text:span><text:span text:style-name="T112"/></text:p>
          </table:table-cell>
          <table:table-cell table:style-name="表格120.A2" table:number-columns-spanned="2" office:value-type="string">
            <text:p text:style-name="P25" loext:marker-style-name="T112"><text:span text:style-name="T113">每個帳號只給必要的最低權限，減少淪陷後的損害</text:span><text:span text:style-name="T112"/></text:p>
          </table:table-cell>
          <table:covered-table-cell/>
        </table:table-row>
      </table:table>
      <text:h text:style-name="P2" text:outline-level="3"><text:span text:style-name="T153">▍</text:span><text:span text:style-name="T154"> </text:span><text:span text:style-name="T155">防禦機制速查：</text:span><text:span text:style-name="T154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6" loext:marker-style-name="T72"><text:span text:style-name="T71">機制</text:span><text:span text:style-name="T72"/></text:p>
            </table:table-cell>
            <table:table-cell table:style-name="表格121.A1" office:value-type="string">
              <text:p text:style-name="P6" loext:marker-style-name="T72"><text:span text:style-name="T71">白話比喻</text:span><text:span text:style-name="T72"/></text:p>
            </table:table-cell>
            <table:table-cell table:style-name="表格121.A1" office:value-type="string">
              <text:p text:style-name="P6" loext:marker-style-name="T72"><text:span text:style-name="T71">主要功能</text:span><text:span text:style-name="T72"/></text:p>
            </table:table-cell>
            <table:table-cell table:style-name="表格121.A1" office:value-type="string">
              <text:p text:style-name="P6" loext:marker-style-name="T72"><text:span text:style-name="T71">備註</text:span><text:span text:style-name="T72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5" loext:marker-style-name="T112"><text:span text:style-name="T144">Firewall</text:span><text:span text:style-name="T112"/></text:p>
          </table:table-cell>
          <table:table-cell table:style-name="表格121.A2" office:value-type="string">
            <text:p text:style-name="P25" loext:marker-style-name="T112"><text:span text:style-name="T113">社區大門保全</text:span><text:span text:style-name="T112"/></text:p>
          </table:table-cell>
          <table:table-cell table:style-name="表格121.A2" office:value-type="string">
            <text:p text:style-name="P25" loext:marker-style-name="T112"><text:span text:style-name="T113">依 </text:span><text:span text:style-name="T144">IP</text:span><text:span text:style-name="T113">、</text:span><text:span text:style-name="T144">Port</text:span><text:span text:style-name="T113">、協定決定允許或拒絕流量</text:span></text:p>
          </table:table-cell>
          <table:table-cell table:style-name="表格121.A2" office:value-type="string">
            <text:p text:style-name="P25" loext:marker-style-name="T112"><text:span text:style-name="T113">基礎但必要</text:span><text:span text:style-name="T112"/></text:p>
          </table:table-cell>
        </table:table-row>
        <table:table-row table:style-name="表格121.1">
          <table:table-cell table:style-name="表格121.A3" office:value-type="string">
            <text:p text:style-name="P25" loext:marker-style-name="T112"><text:span text:style-name="T144">IDS</text:span><text:span text:style-name="T112"/></text:p>
          </table:table-cell>
          <table:table-cell table:style-name="表格121.A3" office:value-type="string">
            <text:p text:style-name="P25" loext:marker-style-name="T112"><text:span text:style-name="T113">監視器</text:span><text:span text:style-name="T112"/></text:p>
          </table:table-cell>
          <table:table-cell table:style-name="表格121.A3" office:value-type="string">
            <text:p text:style-name="P25" loext:marker-style-name="T112"><text:span text:style-name="T113">偵測到異常流量後產生警報，不主動攔截</text:span><text:span text:style-name="T112"/></text:p>
          </table:table-cell>
          <table:table-cell table:style-name="表格121.A3" office:value-type="string">
            <text:p text:style-name="P25" loext:marker-style-name="T112"><text:span text:style-name="T113">只警告</text:span><text:span text:style-name="T112"/></text:p>
          </table:table-cell>
        </table:table-row>
        <table:table-row table:style-name="表格121.1">
          <table:table-cell table:style-name="表格121.A2" office:value-type="string">
            <text:p text:style-name="P25" loext:marker-style-name="T112"><text:span text:style-name="T144">IPS</text:span><text:span text:style-name="T112"/></text:p>
          </table:table-cell>
          <table:table-cell table:style-name="表格121.A2" office:value-type="string">
            <text:p text:style-name="P25" loext:marker-style-name="T112"><text:span text:style-name="T113">警衛直接攔人</text:span><text:span text:style-name="T112"/></text:p>
          </table:table-cell>
          <table:table-cell table:style-name="表格121.A2" office:value-type="string">
            <text:p text:style-name="P25" loext:marker-style-name="T112"><text:span text:style-name="T113">自動阻斷偵測到的攻擊流量</text:span><text:span text:style-name="T112"/></text:p>
          </table:table-cell>
          <table:table-cell table:style-name="表格121.A2" office:value-type="string">
            <text:p text:style-name="P25" loext:marker-style-name="T112"><text:span text:style-name="T113">直接阻擋</text:span><text:span text:style-name="T112"/></text:p>
          </table:table-cell>
        </table:table-row>
        <table:table-row table:style-name="表格121.1">
          <table:table-cell table:style-name="表格121.A3" office:value-type="string">
            <text:p text:style-name="P25" loext:marker-style-name="T112"><text:span text:style-name="T144">DPI</text:span><text:span text:style-name="T112"/></text:p>
          </table:table-cell>
          <table:table-cell table:style-name="表格121.A3" office:value-type="string">
            <text:p text:style-name="P25" loext:marker-style-name="T112"><text:span text:style-name="T113">海關拆包裹</text:span><text:span text:style-name="T112"/></text:p>
          </table:table-cell>
          <table:table-cell table:style-name="表格121.A3" office:value-type="string">
            <text:p text:style-name="P25" loext:marker-style-name="T112"><text:span text:style-name="T113">不只看封包表頭，深入檢查封包內容</text:span><text:span text:style-name="T112"/></text:p>
          </table:table-cell>
          <table:table-cell table:style-name="表格121.A3" office:value-type="string">
            <text:p text:style-name="P25" loext:marker-style-name="T112"><text:span text:style-name="T113">最深層檢查</text:span><text:span text:style-name="T112"/></text:p>
          </table:table-cell>
        </table:table-row>
        <table:table-row table:style-name="表格121.1">
          <table:table-cell table:style-name="表格121.A2" office:value-type="string">
            <text:p text:style-name="P25" loext:marker-style-name="T112"><text:span text:style-name="T144">WAF</text:span><text:span text:style-name="T112"/></text:p>
          </table:table-cell>
          <table:table-cell table:style-name="表格121.A2" office:value-type="string">
            <text:p text:style-name="P25" loext:marker-style-name="T112"><text:span text:style-name="T113">網站門口掃描機</text:span><text:span text:style-name="T112"/></text:p>
          </table:table-cell>
          <table:table-cell table:style-name="表格121.A2" office:value-type="string">
            <text:p text:style-name="P25" loext:marker-style-name="T112"><text:span text:style-name="T113">專門針對 </text:span><text:span text:style-name="T144">Web </text:span><text:span text:style-name="T113">攻擊（</text:span><text:span text:style-name="T144">SQLi</text:span><text:span text:style-name="T113">、</text:span><text:span text:style-name="T144">XSS</text:span><text:span text:style-name="T113">）過濾</text:span></text:p>
          </table:table-cell>
          <table:table-cell table:style-name="表格121.A2" office:value-type="string">
            <text:p text:style-name="P25" loext:marker-style-name="T112"><text:span text:style-name="T113">網站專用</text:span><text:span text:style-name="T112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8"><text:span text:style-name="T151">⚠️ <text:s/></text:span><text:span text:style-name="T173">考試常考</text:span></text:p>
            <text:p text:style-name="P9" loext:marker-style-name="T96"><text:span text:style-name="T129">IDS </text:span><text:span text:style-name="T95">只發警報（不攔截）；</text:span><text:span text:style-name="T129">IPS </text:span><text:span text:style-name="T95">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2" text:outline-level="3"><text:span text:style-name="T153">▍</text:span><text:span text:style-name="T154"> </text:span><text:span text:style-name="T155">駭客如何一步一步入侵網站（典型 </text:span><text:span text:style-name="T154">7 </text:span><text:span text:style-name="T155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22" loext:marker-style-name="T72"><text:span text:style-name="T77">Step</text:span><text:span text:style-name="T72"/></text:p>
            </table:table-cell>
            <table:table-cell table:style-name="表格122.A1" office:value-type="string">
              <text:p text:style-name="P22" loext:marker-style-name="T72"><text:span text:style-name="T71">階段</text:span><text:span text:style-name="T72"/></text:p>
            </table:table-cell>
            <table:table-cell table:style-name="表格122.A1" office:value-type="string">
              <text:p text:style-name="P22" loext:marker-style-name="T72"><text:span text:style-name="T71">做什麼</text:span><text:span text:style-name="T72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5" loext:marker-style-name="T112"><text:span text:style-name="T144">1</text:span><text:span text:style-name="T112"/></text:p>
          </table:table-cell>
          <table:table-cell table:style-name="表格122.A2" office:value-type="string">
            <text:p text:style-name="P25" loext:marker-style-name="T112"><text:span text:style-name="T113">偵察 </text:span><text:span text:style-name="T144">Reconnaissance</text:span></text:p>
          </table:table-cell>
          <table:table-cell table:style-name="表格122.A2" office:value-type="string">
            <text:p text:style-name="P25" loext:marker-style-name="T112"><text:span text:style-name="T113">掃描目標網站，找漏洞：</text:span><text:span text:style-name="T144">SQL Injection</text:span><text:span text:style-name="T113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5" loext:marker-style-name="T112"><text:span text:style-name="T144">2</text:span><text:span text:style-name="T112"/></text:p>
          </table:table-cell>
          <table:table-cell table:style-name="表格122.A3" office:value-type="string">
            <text:p text:style-name="P25" loext:marker-style-name="T112"><text:span text:style-name="T113">試探 </text:span><text:span text:style-name="T144">Probing</text:span></text:p>
          </table:table-cell>
          <table:table-cell table:style-name="表格122.A3" office:value-type="string">
            <text:p text:style-name="P25" loext:marker-style-name="T112"><text:span text:style-name="T113">嘗試輸入 </text:span><text:span text:style-name="T144">' OR 1=1 -- </text:span><text:span text:style-name="T113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5" loext:marker-style-name="T112"><text:span text:style-name="T144">3</text:span><text:span text:style-name="T112"/></text:p>
          </table:table-cell>
          <table:table-cell table:style-name="表格122.A2" office:value-type="string">
            <text:p text:style-name="P25" loext:marker-style-name="T112"><text:span text:style-name="T113">取得初步權限</text:span><text:span text:style-name="T112"/></text:p>
          </table:table-cell>
          <table:table-cell table:style-name="表格122.A2" office:value-type="string">
            <text:p text:style-name="P25" loext:marker-style-name="T112"><text:span text:style-name="T113">成功繞過驗證或取得資料庫讀取權，可能拿到帳密清單</text:span><text:span text:style-name="T112"/></text:p>
          </table:table-cell>
        </table:table-row>
        <table:table-row table:style-name="表格122.1">
          <table:table-cell table:style-name="表格122.A3" office:value-type="string">
            <text:p text:style-name="P25" loext:marker-style-name="T112"><text:span text:style-name="T144">4</text:span><text:span text:style-name="T112"/></text:p>
          </table:table-cell>
          <table:table-cell table:style-name="表格122.A3" office:value-type="string">
            <text:p text:style-name="P25" loext:marker-style-name="T112"><text:span text:style-name="T113">橫向移動 </text:span><text:span text:style-name="T144">Lateral Movement</text:span></text:p>
          </table:table-cell>
          <table:table-cell table:style-name="表格122.A3" office:value-type="string">
            <text:p text:style-name="P25" loext:marker-style-name="T112"><text:span text:style-name="T113">從網站主機延伸進資料庫，再滲透內網其他系統</text:span><text:span text:style-name="T112"/></text:p>
          </table:table-cell>
        </table:table-row>
        <table:table-row table:style-name="表格122.1">
          <table:table-cell table:style-name="表格122.A2" office:value-type="string">
            <text:p text:style-name="P25" loext:marker-style-name="T112"><text:span text:style-name="T144">5</text:span><text:span text:style-name="T112"/></text:p>
          </table:table-cell>
          <table:table-cell table:style-name="表格122.A2" office:value-type="string">
            <text:p text:style-name="P25" loext:marker-style-name="T112"><text:span text:style-name="T113">竊取資料 </text:span><text:span text:style-name="T144">Exfiltration</text:span></text:p>
          </table:table-cell>
          <table:table-cell table:style-name="表格122.A2" office:value-type="string">
            <text:p text:style-name="P25" loext:marker-style-name="T112"><text:span text:style-name="T113">偷取個資、信用卡資料、機密文件</text:span><text:span text:style-name="T112"/></text:p>
          </table:table-cell>
        </table:table-row>
        <table:table-row table:style-name="表格122.1">
          <table:table-cell table:style-name="表格122.A3" office:value-type="string">
            <text:p text:style-name="P25" loext:marker-style-name="T112"><text:span text:style-name="T144">6</text:span><text:span text:style-name="T112"/></text:p>
          </table:table-cell>
          <table:table-cell table:style-name="表格122.A3" office:value-type="string">
            <text:p text:style-name="P25" loext:marker-style-name="T112"><text:span text:style-name="T113">植入後門 </text:span><text:span text:style-name="T144">Backdoor</text:span></text:p>
          </table:table-cell>
          <table:table-cell table:style-name="表格122.A3" office:value-type="string">
            <text:p text:style-name="P25" loext:marker-style-name="T112"><text:span text:style-name="T113">埋下後門程式，確保下次還能輕鬆進入</text:span><text:span text:style-name="T112"/></text:p>
          </table:table-cell>
        </table:table-row>
        <table:table-row table:style-name="表格122.1">
          <table:table-cell table:style-name="表格122.A2" office:value-type="string">
            <text:p text:style-name="P25" loext:marker-style-name="T112"><text:span text:style-name="T144">7</text:span><text:span text:style-name="T112"/></text:p>
          </table:table-cell>
          <table:table-cell table:style-name="表格122.A2" office:value-type="string">
            <text:p text:style-name="P25" loext:marker-style-name="T112"><text:span text:style-name="T113">勒索或變現</text:span><text:span text:style-name="T112"/></text:p>
          </table:table-cell>
          <table:table-cell table:style-name="表格122.A2" office:value-type="string">
            <text:p text:style-name="P25" loext:marker-style-name="T112"><text:span text:style-name="T113">加密資料索取贖金，或在暗網販售竊取的資料</text:span><text:span text:style-name="T112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8"><text:span text:style-name="T151">⚠️ <text:s/></text:span><text:span text:style-name="T173">公職考試常見陷阱</text:span></text:p>
            <text:p text:style-name="P9"><text:span text:style-name="T99">「輸入驗證」就足夠防 </text:span><text:span text:style-name="T133">SQLi</text:span><text:span text:style-name="T99">？　</text:span><text:span text:style-name="T95">❌ 不夠，過濾特殊字元有被繞過風險。✅ 真正防禦是 </text:span><text:span text:style-name="T129">Prepared Statement</text:span><text:span text:style-name="T95">。</text:span></text:p>
            <text:p text:style-name="P10"><text:span text:style-name="T133">WAF </text:span><text:span text:style-name="T99">可以完全防止所有攻擊？　</text:span><text:span text:style-name="T95">❌ 不能，</text:span><text:span text:style-name="T129">WAF </text:span><text:span text:style-name="T95">是輔助防禦，新型攻擊可能繞過。✅ </text:span><text:span text:style-name="T129">WAF + Prepared Statement </text:span><text:span text:style-name="T95">才是正道。</text:span></text:p>
            <text:p text:style-name="P10"><text:span text:style-name="T133">Zero-Day </text:span><text:span text:style-name="T99">最危險是它「很強大」？　</text:span><text:span text:style-name="T95">❌ 不是，最危險的是「還沒人知道」，防毒無法識別。</text:span></text:p>
            <text:p text:style-name="P10"><text:span text:style-name="T133">IDS </text:span><text:span text:style-name="T99">可以阻擋攻擊？　</text:span><text:span text:style-name="T95">❌ 不行，</text:span><text:span text:style-name="T129">IDS </text:span><text:span text:style-name="T95">只能偵測警報，能阻擋的是 </text:span><text:span text:style-name="T129">IPS</text:span><text:span text:style-name="T95">。</text:span></text:p>
          </table:table-cell>
          <table:covered-table-cell/>
          <table:covered-table-cell/>
        </table:table-row>
      </table:table>
      <text:h text:style-name="P3" text:outline-level="2" loext:marker-style-name="T27"><text:soft-page-break/><text:span text:style-name="T28">參、網路安全：</text:span><text:span text:style-name="T27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6" loext:marker-style-name="T66"><text:span text:style-name="T65">工具</text:span><text:span text:style-name="T66"/></text:p>
            </table:table-cell>
            <table:table-cell table:style-name="表格123.A1" office:value-type="string">
              <text:p text:style-name="P6" loext:marker-style-name="T66"><text:span text:style-name="T65">角色</text:span><text:span text:style-name="T66"/></text:p>
            </table:table-cell>
            <table:table-cell table:style-name="表格123.A1" office:value-type="string">
              <text:p text:style-name="P6" loext:marker-style-name="T66"><text:span text:style-name="T65">功能</text:span><text:span text:style-name="T66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5" loext:marker-style-name="T80"><text:span text:style-name="T121">🚪 Firewall</text:span><text:span text:style-name="T80"/></text:p>
          </table:table-cell>
          <table:table-cell table:style-name="表格123.A2" office:value-type="string">
            <text:p text:style-name="P25" loext:marker-style-name="T80"><text:span text:style-name="T79">大門警衛</text:span><text:span text:style-name="T80"/></text:p>
          </table:table-cell>
          <table:table-cell table:style-name="表格123.A2" office:value-type="string">
            <text:p text:style-name="P25" loext:marker-style-name="T80"><text:span text:style-name="T79">過濾進出流量（擋或放）</text:span><text:span text:style-name="T80"/></text:p>
          </table:table-cell>
        </table:table-row>
        <table:table-row table:style-name="表格123.1">
          <table:table-cell table:style-name="表格123.A3" office:value-type="string">
            <text:p text:style-name="P25" loext:marker-style-name="T80"><text:span text:style-name="T121">👀 IDS</text:span><text:span text:style-name="T80"/></text:p>
          </table:table-cell>
          <table:table-cell table:style-name="表格123.A3" office:value-type="string">
            <text:p text:style-name="P25" loext:marker-style-name="T80"><text:span text:style-name="T79">監視器（只看）</text:span><text:span text:style-name="T80"/></text:p>
          </table:table-cell>
          <table:table-cell table:style-name="表格123.A3" office:value-type="string">
            <text:p text:style-name="P25" loext:marker-style-name="T80"><text:span text:style-name="T79">偵測異常、發出警報，不主動阻擋</text:span><text:span text:style-name="T80"/></text:p>
          </table:table-cell>
        </table:table-row>
        <table:table-row table:style-name="表格123.1">
          <table:table-cell table:style-name="表格123.A2" office:value-type="string">
            <text:p text:style-name="P25" loext:marker-style-name="T80"><text:span text:style-name="T121">🚨 IPS</text:span><text:span text:style-name="T80"/></text:p>
          </table:table-cell>
          <table:table-cell table:style-name="表格123.A2" office:value-type="string">
            <text:p text:style-name="P25" loext:marker-style-name="T80"><text:span text:style-name="T79">監視器＋警衛</text:span><text:span text:style-name="T80"/></text:p>
          </table:table-cell>
          <table:table-cell table:style-name="表格123.A2" office:value-type="string">
            <text:p text:style-name="P25" loext:marker-style-name="T80"><text:span text:style-name="T79">偵測異常並自動阻擋攻擊</text:span><text:span text:style-name="T80"/></text:p>
          </table:table-cell>
        </table:table-row>
        <table:table-row table:style-name="表格123.1">
          <table:table-cell table:style-name="表格123.A3" office:value-type="string">
            <text:p text:style-name="P25" loext:marker-style-name="T80"><text:span text:style-name="T121">📊 SNMP</text:span><text:span text:style-name="T80"/></text:p>
          </table:table-cell>
          <table:table-cell table:style-name="表格123.A3" office:value-type="string">
            <text:p text:style-name="P25" loext:marker-style-name="T80"><text:span text:style-name="T79">管理室</text:span><text:span text:style-name="T80"/></text:p>
          </table:table-cell>
          <table:table-cell table:style-name="表格123.A3" office:value-type="string">
            <text:p text:style-name="P25" loext:marker-style-name="T80"><text:span text:style-name="T79">監控網路設備狀態（</text:span><text:span text:style-name="T121">CPU</text:span><text:span text:style-name="T79">、流量等）</text:span></text:p>
          </table:table-cell>
        </table:table-row>
        <table:table-row table:style-name="表格123.1">
          <table:table-cell table:style-name="表格123.A2" office:value-type="string">
            <text:p text:style-name="P25" loext:marker-style-name="T80"><text:span text:style-name="T121">📶 ICMP</text:span><text:span text:style-name="T80"/></text:p>
          </table:table-cell>
          <table:table-cell table:style-name="表格123.A2" office:value-type="string">
            <text:p text:style-name="P25" loext:marker-style-name="T80"><text:span text:style-name="T79">網路測試員</text:span><text:span text:style-name="T80"/></text:p>
          </table:table-cell>
          <table:table-cell table:style-name="表格123.A2" office:value-type="string">
            <text:p text:style-name="P25" loext:marker-style-name="T80"><text:span text:style-name="T79">診斷網路連線（</text:span><text:span text:style-name="T121">Ping / Traceroute</text:span><text:span text:style-name="T79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8"><text:span text:style-name="T151">⚡ <text:s/></text:span><text:span text:style-name="T155">核心記憶口訣</text:span></text:p>
            <text:p text:style-name="P9" loext:marker-style-name="T96"><text:span text:style-name="T129">Firewall </text:span><text:span text:style-name="T95">擋入口 </text:span><text:span text:style-name="T129">· IDS </text:span><text:span text:style-name="T95">只看 </text:span><text:span text:style-name="T129">· IPS </text:span><text:span text:style-name="T95">看＋擋。</text:span></text:p>
          </table:table-cell>
          <table:covered-table-cell/>
          <table:covered-table-cell/>
        </table:table-row>
      </table:table>
      <text:h text:style-name="P2" text:outline-level="3"><text:span text:style-name="T153">▍</text:span><text:span text:style-name="T154"> HIDS vs NIDS</text:span><text:span text:style-name="T155">（</text:span><text:span text:style-name="T154">IDS </text:span><text:span text:style-name="T155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6"/>
            </table:table-cell>
            <table:table-cell table:style-name="表格124.A1" office:value-type="string">
              <text:p text:style-name="P6" loext:marker-style-name="T66"><text:span text:style-name="T75">HIDS</text:span><text:span text:style-name="T66"/></text:p>
            </table:table-cell>
            <table:table-cell table:style-name="表格124.A1" office:value-type="string">
              <text:p text:style-name="P6" loext:marker-style-name="T66"><text:span text:style-name="T75">NIDS</text:span><text:span text:style-name="T66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5" loext:marker-style-name="T80"><text:span text:style-name="T79">安裝位置</text:span><text:span text:style-name="T80"/></text:p>
          </table:table-cell>
          <table:table-cell table:style-name="表格124.A2" office:value-type="string">
            <text:p text:style-name="P25" loext:marker-style-name="T80"><text:span text:style-name="T79">裝在主機（電腦）內部</text:span><text:span text:style-name="T80"/></text:p>
          </table:table-cell>
          <table:table-cell table:style-name="表格124.A2" office:value-type="string">
            <text:p text:style-name="P25" loext:marker-style-name="T80"><text:span text:style-name="T79">裝在網路節點（交換器旁）</text:span><text:span text:style-name="T80"/></text:p>
          </table:table-cell>
        </table:table-row>
        <table:table-row table:style-name="表格124.1">
          <table:table-cell table:style-name="表格124.A3" office:value-type="string">
            <text:p text:style-name="P25" loext:marker-style-name="T80"><text:span text:style-name="T79">監控內容</text:span><text:span text:style-name="T80"/></text:p>
          </table:table-cell>
          <table:table-cell table:style-name="表格124.A3" office:value-type="string">
            <text:p text:style-name="P25" loext:marker-style-name="T80"><text:span text:style-name="T79">系統 </text:span><text:span text:style-name="T121">Log</text:span><text:span text:style-name="T79">、使用者行為</text:span></text:p>
          </table:table-cell>
          <table:table-cell table:style-name="表格124.A3" office:value-type="string">
            <text:p text:style-name="P25" loext:marker-style-name="T80"><text:span text:style-name="T79">網路封包與流量</text:span><text:span text:style-name="T80"/></text:p>
          </table:table-cell>
        </table:table-row>
        <table:table-row table:style-name="表格124.1">
          <table:table-cell table:style-name="表格124.A2" office:value-type="string">
            <text:p text:style-name="P25" loext:marker-style-name="T80"><text:span text:style-name="T79">比喻</text:span><text:span text:style-name="T80"/></text:p>
          </table:table-cell>
          <table:table-cell table:style-name="表格124.A2" office:value-type="string">
            <text:p text:style-name="P25" loext:marker-style-name="T80"><text:span text:style-name="T79">電腦裡的監視器</text:span><text:span text:style-name="T80"/></text:p>
          </table:table-cell>
          <table:table-cell table:style-name="表格124.A2" office:value-type="string">
            <text:p text:style-name="P25" loext:marker-style-name="T80"><text:span text:style-name="T79">路口的交通監視器</text:span><text:span text:style-name="T80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8"><text:span text:style-name="T151">⚡ <text:s/></text:span><text:span text:style-name="T155">一句話秒懂</text:span></text:p>
            <text:p text:style-name="P9" loext:marker-style-name="T96"><text:span text:style-name="T129">HIDS </text:span><text:span text:style-name="T95">看主機（</text:span><text:span text:style-name="T129">Log</text:span><text:span text:style-name="T95">）</text:span><text:span text:style-name="T129">· NIDS </text:span><text:span text:style-name="T95">看網路（封包）。</text:span></text:p>
          </table:table-cell>
          <table:covered-table-cell/>
          <table:covered-table-cell/>
        </table:table-row>
      </table:table>
      <text:h text:style-name="P2" text:outline-level="3"><text:span text:style-name="T153">▍</text:span><text:span text:style-name="T154"> SNMP vs ICMP</text:span><text:span text:style-name="T155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6"/>
            </table:table-cell>
            <table:table-cell table:style-name="表格125.A1" office:value-type="string">
              <text:p text:style-name="P6" loext:marker-style-name="T66"><text:span text:style-name="T75">SNMP</text:span><text:span text:style-name="T66"/></text:p>
            </table:table-cell>
            <table:table-cell table:style-name="表格125.A1" office:value-type="string">
              <text:p text:style-name="P6" loext:marker-style-name="T66"><text:span text:style-name="T75">ICMP</text:span><text:span text:style-name="T66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5" loext:marker-style-name="T80"><text:span text:style-name="T79">用途</text:span><text:span text:style-name="T80"/></text:p>
          </table:table-cell>
          <table:table-cell table:style-name="表格125.A2" office:value-type="string">
            <text:p text:style-name="P25" loext:marker-style-name="T80"><text:span text:style-name="T79">管理與監控網路設備</text:span><text:span text:style-name="T80"/></text:p>
          </table:table-cell>
          <table:table-cell table:style-name="表格125.A2" office:value-type="string">
            <text:p text:style-name="P25" loext:marker-style-name="T80"><text:span text:style-name="T79">測試網路是否連通</text:span><text:span text:style-name="T80"/></text:p>
          </table:table-cell>
        </table:table-row>
        <table:table-row table:style-name="表格125.1">
          <table:table-cell table:style-name="表格125.A3" office:value-type="string">
            <text:p text:style-name="P25" loext:marker-style-name="T80"><text:span text:style-name="T121">OSI </text:span><text:span text:style-name="T79">層</text:span></text:p>
          </table:table-cell>
          <table:table-cell table:style-name="表格125.A3" office:value-type="string">
            <text:p text:style-name="P25" loext:marker-style-name="T80"><text:span text:style-name="T121">Application Layer</text:span><text:span text:style-name="T79">（應用層）</text:span></text:p>
          </table:table-cell>
          <table:table-cell table:style-name="表格125.A3" office:value-type="string">
            <text:p text:style-name="P25" loext:marker-style-name="T80"><text:span text:style-name="T121">Network Layer</text:span><text:span text:style-name="T79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5" loext:marker-style-name="T80"><text:span text:style-name="T79">傳輸協定</text:span><text:span text:style-name="T80"/></text:p>
          </table:table-cell>
          <table:table-cell table:style-name="表格125.A2" office:value-type="string">
            <text:p text:style-name="P25" loext:marker-style-name="T80"><text:span text:style-name="T121">UDP</text:span><text:span text:style-name="T80"/></text:p>
          </table:table-cell>
          <table:table-cell table:style-name="表格125.A2" office:value-type="string">
            <text:p text:style-name="P25" loext:marker-style-name="T80"><text:span text:style-name="T121">IP </text:span><text:span text:style-name="T79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5" loext:marker-style-name="T80"><text:span text:style-name="T79">常見功能</text:span><text:span text:style-name="T80"/></text:p>
          </table:table-cell>
          <table:table-cell table:style-name="表格125.A3" office:value-type="string">
            <text:p text:style-name="P25" loext:marker-style-name="T80"><text:span text:style-name="T79">看 </text:span><text:span text:style-name="T121">CPU </text:span><text:span text:style-name="T79">使用率、設備狀態、</text:span><text:span text:style-name="T121">Trap </text:span><text:span text:style-name="T79">警報</text:span></text:p>
          </table:table-cell>
          <table:table-cell table:style-name="表格125.A3" office:value-type="string">
            <text:p text:style-name="P25" loext:marker-style-name="T80"><text:span text:style-name="T121">Ping</text:span><text:span text:style-name="T79">、</text:span><text:span text:style-name="T121">Traceroute</text:span></text:p>
          </table:table-cell>
        </table:table-row>
        <table:table-row table:style-name="表格125.1">
          <table:table-cell table:style-name="表格125.A2" office:value-type="string">
            <text:p text:style-name="P25" loext:marker-style-name="T80"><text:span text:style-name="T79">比喻</text:span><text:span text:style-name="T80"/></text:p>
          </table:table-cell>
          <table:table-cell table:style-name="表格125.A2" office:value-type="string">
            <text:p text:style-name="P25" loext:marker-style-name="T80"><text:span text:style-name="T79">大樓管理室的監控系統</text:span><text:span text:style-name="T80"/></text:p>
          </table:table-cell>
          <table:table-cell table:style-name="表格125.A2" office:value-type="string">
            <text:p text:style-name="P25" loext:marker-style-name="T80"><text:span text:style-name="T79">網路連線的體溫計</text:span><text:span text:style-name="T80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8"><text:span text:style-name="T151">⚡ <text:s/></text:span><text:span text:style-name="T155">核心差異</text:span></text:p>
            <text:p text:style-name="P9" loext:marker-style-name="T96"><text:span text:style-name="T129">SNMP </text:span><text:span text:style-name="T95">管理設備（應用層 </text:span><text:span text:style-name="T129">/ UDP</text:span><text:span text:style-name="T95">）</text:span><text:span text:style-name="T129">· ICMP </text:span><text:span text:style-name="T95">診斷網路（網路層）。</text:span></text:p>
          </table:table-cell>
          <table:covered-table-cell/>
          <table:covered-table-cell/>
        </table:table-row>
      </table:table>
      <text:h text:style-name="P2" text:outline-level="3"><text:span text:style-name="T153">▍</text:span><text:span text:style-name="T154"> </text:span><text:span text:style-name="T155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8"><text:span text:style-name="T151">🗺 <text:s/></text:span><text:span text:style-name="T48">工具各自負責的位置</text:span></text:p>
            <text:p text:style-name="P9" loext:marker-style-name="T96"><text:span text:style-name="T129">🌐 </text:span><text:span text:style-name="T95">外部攻擊者 → 🚪 </text:span><text:span text:style-name="T129">Firewall</text:span><text:span text:style-name="T95">（第一道防線，依 </text:span><text:span text:style-name="T129">IP/Port </text:span><text:span text:style-name="T95">規則過濾）→ 📡 </text:span><text:span text:style-name="T129">NIDS / IPS</text:span><text:span text:style-name="T95">（網路中間監控：</text:span><text:span text:style-name="T129">IDS </text:span><text:span text:style-name="T95">分析封包發現異常只發警報；</text:span><text:span text:style-name="T129">IPS </text:span><text:span text:style-name="T95">分析封包發現異常直接阻擋）→ 🖥 主機 </text:span><text:span text:style-name="T129">/ Server → 👀 HIDS</text:span><text:span text:style-name="T95">（主機內部最後防線，監控系統 </text:span><text:span text:style-name="T129">Log </text:span><text:span text:style-name="T95">與使用者行為）。旁側：📊 </text:span><text:span text:style-name="T129">SNMP </text:span><text:span text:style-name="T95">監控全域設備狀態；📶 </text:span><text:span text:style-name="T129">ICMP</text:span><text:span text:style-name="T95">（</text:span><text:span text:style-name="T129">Ping/Traceroute</text:span><text:span text:style-name="T95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8"><text:span text:style-name="T151">⚠️ <text:s/></text:span><text:span text:style-name="T173">考試陷阱整理</text:span></text:p>
            <text:p text:style-name="P9"><text:span text:style-name="T189">① IDS </text:span><text:span text:style-name="T183">可以自動阻擋攻擊　→　</text:span><text:span text:style-name="T95">✓ </text:span><text:span text:style-name="T129">IDS </text:span><text:span text:style-name="T95">只偵測＋發警報，</text:span><text:span text:style-name="T129">IPS </text:span><text:span text:style-name="T95">才會阻擋。</text:span></text:p>
            <text:p text:style-name="P10"><text:span text:style-name="T189">② Firewall </text:span><text:span text:style-name="T183">可以偵測異常行為　→　</text:span><text:span text:style-name="T95">✓ </text:span><text:span text:style-name="T129">Firewall </text:span><text:span text:style-name="T95">依規則（</text:span><text:span text:style-name="T129">IP/Port</text:span><text:span text:style-name="T95">）過濾，不做行為分析。</text:span></text:p>
            <text:p text:style-name="P10"><text:soft-page-break/><text:span text:style-name="T189">③ HIDS </text:span><text:span text:style-name="T183">用來監控網路封包　→　</text:span><text:span text:style-name="T95">✓ </text:span><text:span text:style-name="T129">HIDS </text:span><text:span text:style-name="T95">監控主機 </text:span><text:span text:style-name="T129">Log </text:span><text:span text:style-name="T95">與系統行為，封包是 </text:span><text:span text:style-name="T129">NIDS </text:span><text:span text:style-name="T95">的工作。</text:span></text:p>
            <text:p text:style-name="P10"><text:span text:style-name="T189">④ ICMP </text:span><text:span text:style-name="T183">用來監控設備狀態　→　</text:span><text:span text:style-name="T95">✓ </text:span><text:span text:style-name="T129">ICMP </text:span><text:span text:style-name="T95">只診斷網路（</text:span><text:span text:style-name="T129">Ping</text:span><text:span text:style-name="T95">），監控設備是 </text:span><text:span text:style-name="T129">SNMP</text:span><text:span text:style-name="T95">。</text:span></text:p>
            <text:p text:style-name="P10"><text:span text:style-name="T189">⑤ ICMP </text:span><text:span text:style-name="T183">屬於 </text:span><text:span text:style-name="T189">Application Layer</text:span><text:span text:style-name="T183">　→　</text:span><text:span text:style-name="T95">✓ </text:span><text:span text:style-name="T129">ICMP </text:span><text:span text:style-name="T95">屬 </text:span><text:span text:style-name="T129">Network Layer</text:span><text:span text:style-name="T95">，</text:span><text:span text:style-name="T129">SNMP </text:span><text:span text:style-name="T95">才是 </text:span><text:span text:style-name="T129">Application Layer</text:span><text:span text:style-name="T95">。</text:span></text:p>
            <text:p text:style-name="P10"><text:span text:style-name="T189">⑥ IPS </text:span><text:span text:style-name="T183">就是防火牆　→　</text:span><text:span text:style-name="T95">✓ </text:span><text:span text:style-name="T129">Firewall </text:span><text:span text:style-name="T95">靜態過濾（規則），</text:span><text:span text:style-name="T129">IPS </text:span><text:span text:style-name="T95">動態偵測行為後阻擋，兩者不同。</text:span></text:p>
          </table:table-cell>
        </table:table-row>
      </table:table>
      <text:h text:style-name="P2" text:outline-level="3"><text:span text:style-name="T153">▍</text:span><text:span text:style-name="T154"> 10 </text:span><text:span text:style-name="T155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6" loext:marker-style-name="T74"><text:span text:style-name="T73">題目</text:span><text:span text:style-name="T74"/></text:p>
            </table:table-cell>
            <table:table-cell table:style-name="表格127.A1" office:value-type="string">
              <text:p text:style-name="P6" loext:marker-style-name="T74"><text:span text:style-name="T73">答案</text:span><text:span text:style-name="T74"/></text:p>
            </table:table-cell>
            <table:table-cell table:style-name="表格127.A1" office:value-type="string">
              <text:p text:style-name="P6" loext:marker-style-name="T74"><text:span text:style-name="T73">解析</text:span><text:span text:style-name="T74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5" loext:marker-style-name="T120"><text:span text:style-name="T150">Q1 </text:span><text:span text:style-name="T119">何者負責「過濾進出網路流量」？</text:span></text:p>
          </table:table-cell>
          <table:table-cell table:style-name="表格127.A2" office:value-type="string">
            <text:p text:style-name="P25" loext:marker-style-name="T120"><text:span text:style-name="T150">Firewall</text:span><text:span text:style-name="T120"/></text:p>
          </table:table-cell>
          <table:table-cell table:style-name="表格127.A2" office:value-type="string">
            <text:p text:style-name="P25" loext:marker-style-name="T120"><text:span text:style-name="T150">Firewall </text:span><text:span text:style-name="T119">是網路入口過濾工具，依規則決定放行。</text:span><text:span text:style-name="T150">IDS/IPS </text:span><text:span text:style-name="T119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5" loext:marker-style-name="T120"><text:span text:style-name="T150">Q2 IDS </text:span><text:span text:style-name="T119">的主要功能為何？</text:span></text:p>
          </table:table-cell>
          <table:table-cell table:style-name="表格127.A3" office:value-type="string">
            <text:p text:style-name="P25" loext:marker-style-name="T120"><text:span text:style-name="T119">偵測並發出警報</text:span><text:span text:style-name="T120"/></text:p>
          </table:table-cell>
          <table:table-cell table:style-name="表格127.A3" office:value-type="string">
            <text:p text:style-name="P25" loext:marker-style-name="T120"><text:span text:style-name="T150">IDS </text:span><text:span text:style-name="T119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5" loext:marker-style-name="T120"><text:span text:style-name="T150">Q3 IPS </text:span><text:span text:style-name="T119">與 </text:span><text:span text:style-name="T150">IDS </text:span><text:span text:style-name="T119">最大差別？</text:span></text:p>
          </table:table-cell>
          <table:table-cell table:style-name="表格127.A2" office:value-type="string">
            <text:p text:style-name="P25" loext:marker-style-name="T120"><text:span text:style-name="T150">IPS </text:span><text:span text:style-name="T119">會阻擋，</text:span><text:span text:style-name="T150">IDS </text:span><text:span text:style-name="T119">不會</text:span></text:p>
          </table:table-cell>
          <table:table-cell table:style-name="表格127.A2" office:value-type="string">
            <text:p text:style-name="P25" loext:marker-style-name="T120"><text:span text:style-name="T150">IPS = IDS </text:span><text:span text:style-name="T119">全功能 </text:span><text:span text:style-name="T150">+ </text:span><text:span text:style-name="T119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5" loext:marker-style-name="T120"><text:span text:style-name="T150">Q4 </text:span><text:span text:style-name="T119">何者屬「主機型入侵偵測」？</text:span></text:p>
          </table:table-cell>
          <table:table-cell table:style-name="表格127.A3" office:value-type="string">
            <text:p text:style-name="P25" loext:marker-style-name="T120"><text:span text:style-name="T150">HIDS</text:span><text:span text:style-name="T120"/></text:p>
          </table:table-cell>
          <table:table-cell table:style-name="表格127.A3" office:value-type="string">
            <text:p text:style-name="P25" loext:marker-style-name="T120"><text:span text:style-name="T150">HIDS </text:span><text:span text:style-name="T119">安裝於主機內部，監控 </text:span><text:span text:style-name="T150">Log </text:span><text:span text:style-name="T119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5" loext:marker-style-name="T120"><text:span text:style-name="T150">Q5 NIDS </text:span><text:span text:style-name="T119">主要監控什麼？</text:span></text:p>
          </table:table-cell>
          <table:table-cell table:style-name="表格127.A2" office:value-type="string">
            <text:p text:style-name="P25" loext:marker-style-name="T120"><text:span text:style-name="T119">網路封包</text:span><text:span text:style-name="T120"/></text:p>
          </table:table-cell>
          <table:table-cell table:style-name="表格127.A2" office:value-type="string">
            <text:p text:style-name="P25" loext:marker-style-name="T120"><text:span text:style-name="T150">NIDS </text:span><text:span text:style-name="T119">部署在網路節點，分析封包流量；</text:span><text:span text:style-name="T150">HIDS </text:span><text:span text:style-name="T119">才看 </text:span><text:span text:style-name="T150">Log</text:span><text:span text:style-name="T119">。</text:span></text:p>
          </table:table-cell>
        </table:table-row>
        <table:table-row table:style-name="表格127.1">
          <table:table-cell table:style-name="表格127.A3" office:value-type="string">
            <text:p text:style-name="P25" loext:marker-style-name="T120"><text:span text:style-name="T150">Q6 SNMP </text:span><text:span text:style-name="T119">的主要用途？</text:span></text:p>
          </table:table-cell>
          <table:table-cell table:style-name="表格127.A3" office:value-type="string">
            <text:p text:style-name="P25" loext:marker-style-name="T120"><text:span text:style-name="T119">管理網路設備</text:span><text:span text:style-name="T120"/></text:p>
          </table:table-cell>
          <table:table-cell table:style-name="表格127.A3" office:value-type="string">
            <text:p text:style-name="P25" loext:marker-style-name="T120"><text:span text:style-name="T150">SNMP </text:span><text:span text:style-name="T119">監控與管理路由器、交換器狀態（</text:span><text:span text:style-name="T150">CPU</text:span><text:span text:style-name="T119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5" loext:marker-style-name="T120"><text:span text:style-name="T150">Q7 ICMP </text:span><text:span text:style-name="T119">常用於哪種工具？</text:span></text:p>
          </table:table-cell>
          <table:table-cell table:style-name="表格127.A2" office:value-type="string">
            <text:p text:style-name="P25" loext:marker-style-name="T120"><text:span text:style-name="T150">Ping</text:span><text:span text:style-name="T120"/></text:p>
          </table:table-cell>
          <table:table-cell table:style-name="表格127.A2" office:value-type="string">
            <text:p text:style-name="P25" loext:marker-style-name="T120"><text:span text:style-name="T150">Ping </text:span><text:span text:style-name="T119">與 </text:span><text:span text:style-name="T150">Traceroute </text:span><text:span text:style-name="T119">都用 </text:span><text:span text:style-name="T150">ICMP </text:span><text:span text:style-name="T119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5" loext:marker-style-name="T120"><text:span text:style-name="T150">Q8 ICMP </text:span><text:span text:style-name="T119">屬 </text:span><text:span text:style-name="T150">OSI </text:span><text:span text:style-name="T119">哪一層？</text:span></text:p>
          </table:table-cell>
          <table:table-cell table:style-name="表格127.A3" office:value-type="string">
            <text:p text:style-name="P25" loext:marker-style-name="T120"><text:span text:style-name="T150">Network Layer</text:span><text:span text:style-name="T120"/></text:p>
          </table:table-cell>
          <table:table-cell table:style-name="表格127.A3" office:value-type="string">
            <text:p text:style-name="P25" loext:marker-style-name="T120"><text:span text:style-name="T150">ICMP </text:span><text:span text:style-name="T119">是 </text:span><text:span text:style-name="T150">IP </text:span><text:span text:style-name="T119">的附屬協定，屬網路層；</text:span><text:span text:style-name="T150">SNMP </text:span><text:span text:style-name="T119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5" loext:marker-style-name="T120"><text:span text:style-name="T150">Q9 </text:span><text:span text:style-name="T119">何者用 </text:span><text:span text:style-name="T150">UDP </text:span><text:span text:style-name="T119">且屬應用層？</text:span></text:p>
          </table:table-cell>
          <table:table-cell table:style-name="表格127.A2" office:value-type="string">
            <text:p text:style-name="P25" loext:marker-style-name="T120"><text:span text:style-name="T150">SNMP</text:span><text:span text:style-name="T120"/></text:p>
          </table:table-cell>
          <table:table-cell table:style-name="表格127.A2" office:value-type="string">
            <text:p text:style-name="P25" loext:marker-style-name="T120"><text:span text:style-name="T150">SNMP </text:span><text:span text:style-name="T119">用 </text:span><text:span text:style-name="T150">UDP</text:span><text:span text:style-name="T119">、屬應用層；</text:span><text:span text:style-name="T150">ICMP </text:span><text:span text:style-name="T119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5" loext:marker-style-name="T120"><text:span text:style-name="T150">Q10 </text:span><text:span text:style-name="T119">下列何者正確？</text:span></text:p>
          </table:table-cell>
          <table:table-cell table:style-name="表格127.A3" office:value-type="string">
            <text:p text:style-name="P25" loext:marker-style-name="T120"><text:span text:style-name="T150">SNMP </text:span><text:span text:style-name="T119">用於設備管理</text:span></text:p>
          </table:table-cell>
          <table:table-cell table:style-name="表格127.A3" office:value-type="string">
            <text:p text:style-name="P25" loext:marker-style-name="T120"><text:span text:style-name="T150">IDS </text:span><text:span text:style-name="T119">不阻擋；</text:span><text:span text:style-name="T150">Firewall </text:span><text:span text:style-name="T119">不做行為分析；</text:span><text:span text:style-name="T150">ICMP </text:span><text:span text:style-name="T119">只做網路診斷。</text:span></text:p>
          </table:table-cell>
        </table:table-row>
      </table:table>
      <text:h text:style-name="P3" text:outline-level="2" loext:marker-style-name="T27"><text:span text:style-name="T28">肆、企業資訊安全：預防 → 偵測 → 復原</text:span><text:span text:style-name="T27"/></text:h>
      <text:p text:style-name="P31" loext:marker-style-name="T96"><text:span text:style-name="T95">企業資訊系統（官網、資料庫、公文</text:span><text:span text:style-name="T129">/</text:span><text:span text:style-name="T95">健保</text:span><text:span text:style-name="T129">/</text:span><text:span text:style-name="T95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6" loext:marker-style-name="T72"><text:span text:style-name="T71">三大核心</text:span><text:span text:style-name="T72"/></text:p>
            </table:table-cell>
            <table:table-cell table:style-name="表格128.A1" office:value-type="string">
              <text:p text:style-name="P6" loext:marker-style-name="T72"><text:span text:style-name="T71">目標</text:span><text:span text:style-name="T72"/></text:p>
            </table:table-cell>
            <table:table-cell table:style-name="表格128.A1" office:value-type="string">
              <text:p text:style-name="P6" loext:marker-style-name="T72"><text:span text:style-name="T71">做法</text:span><text:span text:style-name="T72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5" loext:marker-style-name="T112"><text:span text:style-name="T144">① </text:span><text:span text:style-name="T113">事前預防</text:span></text:p>
          </table:table-cell>
          <table:table-cell table:style-name="表格128.A2" office:value-type="string">
            <text:p text:style-name="P25" loext:marker-style-name="T112"><text:span text:style-name="T113">讓壞事不要發生</text:span><text:span text:style-name="T112"/></text:p>
          </table:table-cell>
          <table:table-cell table:style-name="表格128.A2" office:value-type="string">
            <text:p text:style-name="P25" loext:marker-style-name="T112"><text:span text:style-name="T113">設密碼、</text:span><text:span text:style-name="T144">MFA</text:span><text:span text:style-name="T113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5" loext:marker-style-name="T112"><text:span text:style-name="T144">② </text:span><text:span text:style-name="T113">事中偵測</text:span></text:p>
          </table:table-cell>
          <table:table-cell table:style-name="表格128.A3" office:value-type="string">
            <text:p text:style-name="P25" loext:marker-style-name="T112"><text:span text:style-name="T113">出事時盡快發現</text:span><text:span text:style-name="T112"/></text:p>
          </table:table-cell>
          <table:table-cell table:style-name="表格128.A3" office:value-type="string">
            <text:p text:style-name="P25" loext:marker-style-name="T112"><text:span text:style-name="T113">偵測異常登入、流量、病毒警報（</text:span><text:span text:style-name="T144">IDS/IPS/NGFW/EDR/MDR</text:span><text:span text:style-name="T113">）</text:span></text:p>
          </table:table-cell>
        </table:table-row>
        <table:table-row table:style-name="表格128.1">
          <table:table-cell table:style-name="表格128.A2" office:value-type="string">
            <text:p text:style-name="P25" loext:marker-style-name="T112"><text:span text:style-name="T144">③ </text:span><text:span text:style-name="T113">事後復原</text:span></text:p>
          </table:table-cell>
          <table:table-cell table:style-name="表格128.A2" office:value-type="string">
            <text:p text:style-name="P25" loext:marker-style-name="T112"><text:span text:style-name="T113">壞掉後快速救回來</text:span><text:span text:style-name="T112"/></text:p>
          </table:table-cell>
          <table:table-cell table:style-name="表格128.A2" office:value-type="string">
            <text:p text:style-name="P25" loext:marker-style-name="T112"><text:span text:style-name="T113">備份還原、啟動備援系統、災難復原（</text:span><text:span text:style-name="T144">BCP</text:span><text:span text:style-name="T113">、</text:span><text:span text:style-name="T144">RTO/RPO</text:span><text:span text:style-name="T113">）</text:span></text:p>
          </table:table-cell>
        </table:table-row>
      </table:table>
      <text:h text:style-name="P2" text:outline-level="3"><text:span text:style-name="T153">▍</text:span><text:span text:style-name="T154"> </text:span><text:span text:style-name="T155">事前預防：</text:span><text:span text:style-name="T154">MFA</text:span><text:span text:style-name="T155">（多因素驗證）</text:span></text:h>
      <text:p text:style-name="P31" loext:marker-style-name="T96"><text:span text:style-name="T129">MFA = Multi-Factor Authentication</text:span><text:span text:style-name="T95">。登入帳號時不只輸入密碼，還要再驗證一次身份：手機簡訊驗證碼、</text:span><text:span text:style-name="T129">Google Authenticator </text:span><text:span text:style-name="T95">動態碼、指紋或臉部辨識。為什麼要 </text:span><text:span text:style-name="T129">MFA</text:span><text:span text:style-name="T95">？即使駭客知道你的密碼，沒有你的手機或指紋，也無法登入。</text:span></text:p>
      <text:h text:style-name="P2" text:outline-level="3"><text:span text:style-name="T153">▍</text:span><text:span text:style-name="T154"> </text:span><text:span text:style-name="T155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6" loext:marker-style-name="T72"><text:span text:style-name="T71">工具</text:span><text:span text:style-name="T72"/></text:p>
            </table:table-cell>
            <table:table-cell table:style-name="表格129.A1" office:value-type="string">
              <text:p text:style-name="P6" loext:marker-style-name="T72"><text:span text:style-name="T71">全名 </text:span><text:span text:style-name="T77">/ </text:span><text:span text:style-name="T71">說明</text:span></text:p>
            </table:table-cell>
            <table:table-cell table:style-name="表格129.A1" office:value-type="string">
              <text:p text:style-name="P6" loext:marker-style-name="T72"><text:span text:style-name="T71">會阻擋？</text:span><text:span text:style-name="T72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5" loext:marker-style-name="T112"><text:span text:style-name="T144">Firewall</text:span><text:span text:style-name="T112"/></text:p>
          </table:table-cell>
          <table:table-cell table:style-name="表格129.A2" office:value-type="string">
            <text:p text:style-name="P25" loext:marker-style-name="T112"><text:span text:style-name="T113">控制誰能進出網路</text:span><text:span text:style-name="T112"/></text:p>
          </table:table-cell>
          <table:table-cell table:style-name="表格129.A2" office:value-type="string">
            <text:p text:style-name="P25" loext:marker-style-name="T112"><text:span text:style-name="T144">✔ </text:span><text:span text:style-name="T113">會</text:span>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25" loext:marker-style-name="T112"><text:span text:style-name="T144">NGFW</text:span><text:span text:style-name="T112"/></text:p>
          </table:table-cell>
          <table:table-cell table:style-name="表格129.A3" office:value-type="string">
            <text:p text:style-name="P25" loext:marker-style-name="T112"><text:span text:style-name="T113">次世代防火牆，能辨識應用層威脅</text:span><text:span text:style-name="T112"/></text:p>
          </table:table-cell>
          <table:table-cell table:style-name="表格129.A3" office:value-type="string">
            <text:p text:style-name="P25" loext:marker-style-name="T112"><text:span text:style-name="T144">✔ </text:span><text:span text:style-name="T113">會</text:span></text:p>
          </table:table-cell>
        </table:table-row>
        <table:table-row table:style-name="表格129.1">
          <table:table-cell table:style-name="表格129.A2" office:value-type="string">
            <text:p text:style-name="P25" loext:marker-style-name="T112"><text:span text:style-name="T144">IDS</text:span><text:span text:style-name="T112"/></text:p>
          </table:table-cell>
          <table:table-cell table:style-name="表格129.A2" office:value-type="string">
            <text:p text:style-name="P25" loext:marker-style-name="T112"><text:span text:style-name="T113">入侵偵測系統，發現異常就發警報</text:span><text:span text:style-name="T112"/></text:p>
          </table:table-cell>
          <table:table-cell table:style-name="表格129.A2" office:value-type="string">
            <text:p text:style-name="P25" loext:marker-style-name="T112"><text:span text:style-name="T144">✘ </text:span><text:span text:style-name="T113">不會</text:span></text:p>
          </table:table-cell>
        </table:table-row>
        <table:table-row table:style-name="表格129.1">
          <table:table-cell table:style-name="表格129.A3" office:value-type="string">
            <text:p text:style-name="P25" loext:marker-style-name="T112"><text:span text:style-name="T144">IPS</text:span><text:span text:style-name="T112"/></text:p>
          </table:table-cell>
          <table:table-cell table:style-name="表格129.A3" office:value-type="string">
            <text:p text:style-name="P25" loext:marker-style-name="T112"><text:span text:style-name="T113">入侵防禦系統，發現異常直接阻擋</text:span><text:span text:style-name="T112"/></text:p>
          </table:table-cell>
          <table:table-cell table:style-name="表格129.A3" office:value-type="string">
            <text:p text:style-name="P25" loext:marker-style-name="T112"><text:span text:style-name="T144">✔ </text:span><text:span text:style-name="T113">會</text:span></text:p>
          </table:table-cell>
        </table:table-row>
        <table:table-row table:style-name="表格129.1">
          <table:table-cell table:style-name="表格129.A2" office:value-type="string">
            <text:p text:style-name="P25" loext:marker-style-name="T112"><text:span text:style-name="T144">EDR</text:span><text:span text:style-name="T112"/></text:p>
          </table:table-cell>
          <table:table-cell table:style-name="表格129.A2" office:value-type="string">
            <text:p text:style-name="P25" loext:marker-style-name="T112"><text:span text:style-name="T144">Endpoint Detection &amp; Response</text:span><text:span text:style-name="T113">，監控每台電腦行為</text:span></text:p>
          </table:table-cell>
          <table:table-cell table:style-name="表格129.A2" office:value-type="string">
            <text:p text:style-name="P25" loext:marker-style-name="T112"><text:span text:style-name="T144">✔ </text:span><text:span text:style-name="T113">會</text:span></text:p>
          </table:table-cell>
        </table:table-row>
        <table:table-row table:style-name="表格129.1">
          <table:table-cell table:style-name="表格129.A3" office:value-type="string">
            <text:p text:style-name="P25" loext:marker-style-name="T112"><text:span text:style-name="T144">MDR</text:span><text:span text:style-name="T112"/></text:p>
          </table:table-cell>
          <table:table-cell table:style-name="表格129.A3" office:value-type="string">
            <text:p text:style-name="P25" loext:marker-style-name="T112"><text:span text:style-name="T144">Managed D&amp;R</text:span><text:span text:style-name="T113">，委外資安監控服務（</text:span><text:span text:style-name="T144">24 </text:span><text:span text:style-name="T113">小時）</text:span></text:p>
          </table:table-cell>
          <table:table-cell table:style-name="表格129.A3" office:value-type="string">
            <text:p text:style-name="P25" loext:marker-style-name="T112"><text:span text:style-name="T144">✔ </text:span><text:span text:style-name="T113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8"><text:span text:style-name="T151">🏠 <text:s/></text:span><text:span text:style-name="T48">比喻幫你秒懂（公司＝大樓）</text:span></text:p>
            <text:p text:style-name="P9" loext:marker-style-name="T96"><text:span text:style-name="T95">防火牆＝社區大門警衛；</text:span><text:span text:style-name="T129">NGFW</text:span><text:span text:style-name="T95">＝更聰明的警衛（還會看你帶什麼東西進來）；</text:span><text:span text:style-name="T129">IDS</text:span><text:span text:style-name="T95">＝監視器警報（只會叫，不會阻止）；</text:span><text:span text:style-name="T129">IPS</text:span><text:span text:style-name="T95">＝保全（直接壓制壞人）；</text:span><text:span text:style-name="T129">EDR</text:span><text:span text:style-name="T95">＝每個房間都裝攝影機（監控每台電腦</text:span><text:span text:style-name="T129">/</text:span><text:span text:style-name="T95">程式）；</text:span><text:span text:style-name="T129">MDR</text:span><text:span text:style-name="T95">＝把保全工作委外給專業公司 </text:span><text:span text:style-name="T129">24 </text:span><text:span text:style-name="T95">小時監控。</text:span></text:p>
          </table:table-cell>
          <table:covered-table-cell/>
          <table:covered-table-cell/>
        </table:table-row>
      </table:table>
      <text:h text:style-name="P2" text:outline-level="3"><text:span text:style-name="T153">▍</text:span><text:span text:style-name="T154"> </text:span><text:span text:style-name="T155">事後復原：備份、</text:span><text:span text:style-name="T154">RTO / RPO</text:span><text:span text:style-name="T155">、</text:span><text:span text:style-name="T154">BCP</text:span></text:h>
      <text:p text:style-name="P31" loext:marker-style-name="T96"><text:span text:style-name="T95">當資料損毀或遭加密（如勒索病毒），可透過備份救回。最佳實踐：本地備份 </text:span><text:span text:style-name="T129">+ </text:span><text:span text:style-name="T95">異地備份（台北機房同步到高雄機房）；定期測試「備份能否真的還原」；雲端備份（</text:span><text:span text:style-name="T129">AWS/Azure/GCP</text:span><text:span text:style-name="T95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6" loext:marker-style-name="T72"><text:span text:style-name="T71">指標</text:span><text:span text:style-name="T72"/></text:p>
            </table:table-cell>
            <table:table-cell table:style-name="表格130.A1" office:value-type="string">
              <text:p text:style-name="P6" loext:marker-style-name="T72"><text:span text:style-name="T71">全名</text:span><text:span text:style-name="T72"/></text:p>
            </table:table-cell>
            <table:table-cell table:style-name="表格130.A1" office:value-type="string">
              <text:p text:style-name="P6" loext:marker-style-name="T72"><text:span text:style-name="T71">問什麼</text:span><text:span text:style-name="T72"/></text:p>
            </table:table-cell>
            <table:table-cell table:style-name="表格130.A1" office:value-type="string">
              <text:p text:style-name="P6" loext:marker-style-name="T72"><text:span text:style-name="T71">範例</text:span><text:span text:style-name="T72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5" loext:marker-style-name="T112"><text:span text:style-name="T144">RTO</text:span><text:span text:style-name="T112"/></text:p>
          </table:table-cell>
          <table:table-cell table:style-name="表格130.A2" office:value-type="string">
            <text:p text:style-name="P25" loext:marker-style-name="T112"><text:span text:style-name="T144">Recovery Time Objective </text:span><text:span text:style-name="T113">復原時間目標</text:span></text:p>
          </table:table-cell>
          <table:table-cell table:style-name="表格130.A2" office:value-type="string">
            <text:p text:style-name="P25" loext:marker-style-name="T112"><text:span text:style-name="T113">系統出問題後，最多能停多久？</text:span><text:span text:style-name="T112"/></text:p>
          </table:table-cell>
          <table:table-cell table:style-name="表格130.A2" office:value-type="string">
            <text:p text:style-name="P25" loext:marker-style-name="T112"><text:span text:style-name="T113">銀行 </text:span><text:span text:style-name="T144">RTO 10 </text:span><text:span text:style-name="T113">分鐘；學校網站 </text:span><text:span text:style-name="T144">RTO </text:span><text:span text:style-name="T113">半天</text:span></text:p>
          </table:table-cell>
        </table:table-row>
        <table:table-row table:style-name="表格130.1">
          <table:table-cell table:style-name="表格130.A3" office:value-type="string">
            <text:p text:style-name="P25" loext:marker-style-name="T112"><text:span text:style-name="T144">RPO</text:span><text:span text:style-name="T112"/></text:p>
          </table:table-cell>
          <table:table-cell table:style-name="表格130.A3" office:value-type="string">
            <text:p text:style-name="P25" loext:marker-style-name="T112"><text:span text:style-name="T144">Recovery Point Objective </text:span><text:span text:style-name="T113">復原點目標</text:span></text:p>
          </table:table-cell>
          <table:table-cell table:style-name="表格130.A3" office:value-type="string">
            <text:p text:style-name="P25" loext:marker-style-name="T112"><text:span text:style-name="T113">最多能接受丟失幾小時的資料？</text:span><text:span text:style-name="T112"/></text:p>
          </table:table-cell>
          <table:table-cell table:style-name="表格130.A3" office:value-type="string">
            <text:p text:style-name="P25" loext:marker-style-name="T112"><text:span text:style-name="T113">銀行 </text:span><text:span text:style-name="T144">RPO </text:span><text:span text:style-name="T113">接近 </text:span><text:span text:style-name="T144">0</text:span><text:span text:style-name="T113">；一般公司 </text:span><text:span text:style-name="T144">RPO 24 </text:span><text:span text:style-name="T113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8"><text:span text:style-name="T151">⏱ <text:s/></text:span><text:span text:style-name="T201">一句話記憶法</text:span></text:p>
            <text:p text:style-name="P9"><text:span text:style-name="T208">RTO = </text:span><text:span text:style-name="T202">停機時間</text:span><text:span text:style-name="T95">（能停多久？）　</text:span><text:span text:style-name="T208">RPO = </text:span><text:span text:style-name="T202">資料損失量</text:span><text:span text:style-name="T95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8"><text:span text:style-name="T151">🏢 <text:s/></text:span><text:span text:style-name="T59">BCP</text:span><text:span text:style-name="T48">：公司炸掉了還能繼續運作嗎？</text:span></text:p>
            <text:p text:style-name="P9" loext:marker-style-name="T96"><text:span text:style-name="T129">BCP = Business Continuity Planning</text:span><text:span text:style-name="T95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2" text:outline-level="3"><text:span text:style-name="T153">▍</text:span><text:span text:style-name="T154"> SSDLC</text:span><text:span text:style-name="T155">：軟體開發的每個階段都加入資安</text:span></text:h>
      <text:p text:style-name="P31" loext:marker-style-name="T96"><text:span text:style-name="T129">SSDLC = Security Software Development Life Cycle</text:span><text:span text:style-name="T95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6" loext:marker-style-name="T72"><text:span text:style-name="T71">階段</text:span><text:span text:style-name="T72"/></text:p>
            </table:table-cell>
            <table:table-cell table:style-name="表格131.A1" office:value-type="string">
              <text:p text:style-name="P6" loext:marker-style-name="T72"><text:span text:style-name="T71">英文</text:span><text:span text:style-name="T72"/></text:p>
            </table:table-cell>
            <table:table-cell table:style-name="表格131.A1" office:value-type="string">
              <text:p text:style-name="P6" loext:marker-style-name="T72"><text:span text:style-name="T71">做什麼</text:span><text:span text:style-name="T72"/></text:p>
            </table:table-cell>
            <table:table-cell table:style-name="表格131.A1" office:value-type="string">
              <text:p text:style-name="P6" loext:marker-style-name="T72"><text:span text:style-name="T71">資安重點</text:span><text:span text:style-name="T72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5" loext:marker-style-name="T112"><text:span text:style-name="T144">① </text:span><text:span text:style-name="T113">定義</text:span></text:p>
          </table:table-cell>
          <table:table-cell table:style-name="表格131.A2" office:value-type="string">
            <text:p text:style-name="P25" loext:marker-style-name="T112"><text:span text:style-name="T144">Define</text:span><text:span text:style-name="T112"/></text:p>
          </table:table-cell>
          <table:table-cell table:style-name="表格131.A2" office:value-type="string">
            <text:p text:style-name="P25" loext:marker-style-name="T112"><text:span text:style-name="T113">確認需求與範圍</text:span><text:span text:style-name="T112"/></text:p>
          </table:table-cell>
          <table:table-cell table:style-name="表格131.A2" office:value-type="string">
            <text:p text:style-name="P25" loext:marker-style-name="T112"><text:span text:style-name="T113">列出安全需求（需要登入驗證嗎？）</text:span><text:span text:style-name="T112"/></text:p>
          </table:table-cell>
        </table:table-row>
        <table:table-row table:style-name="表格131.1">
          <table:table-cell table:style-name="表格131.A3" office:value-type="string">
            <text:p text:style-name="P25" loext:marker-style-name="T112"><text:span text:style-name="T144">② </text:span><text:span text:style-name="T113">設計</text:span></text:p>
          </table:table-cell>
          <table:table-cell table:style-name="表格131.A3" office:value-type="string">
            <text:p text:style-name="P25" loext:marker-style-name="T112"><text:span text:style-name="T144">Design</text:span><text:span text:style-name="T112"/></text:p>
          </table:table-cell>
          <table:table-cell table:style-name="表格131.A3" office:value-type="string">
            <text:p text:style-name="P25" loext:marker-style-name="T112"><text:span text:style-name="T113">設計系統架構</text:span><text:span text:style-name="T112"/></text:p>
          </table:table-cell>
          <table:table-cell table:style-name="表格131.A3" office:value-type="string">
            <text:p text:style-name="P25" loext:marker-style-name="T112"><text:span text:style-name="T113">規劃權限控管、密碼加密、防 </text:span><text:span text:style-name="T144">SQL Injection</text:span></text:p>
          </table:table-cell>
        </table:table-row>
        <table:table-row table:style-name="表格131.1">
          <table:table-cell table:style-name="表格131.A2" office:value-type="string">
            <text:p text:style-name="P25" loext:marker-style-name="T112"><text:span text:style-name="T144">③ </text:span><text:span text:style-name="T113">開發</text:span></text:p>
          </table:table-cell>
          <table:table-cell table:style-name="表格131.A2" office:value-type="string">
            <text:p text:style-name="P25" loext:marker-style-name="T112"><text:span text:style-name="T144">Develop</text:span><text:span text:style-name="T112"/></text:p>
          </table:table-cell>
          <table:table-cell table:style-name="表格131.A2" office:value-type="string">
            <text:p text:style-name="P25" loext:marker-style-name="T112"><text:span text:style-name="T113">工程師寫程式</text:span><text:span text:style-name="T112"/></text:p>
          </table:table-cell>
          <table:table-cell table:style-name="表格131.A2" office:value-type="string">
            <text:p text:style-name="P25" loext:marker-style-name="T112"><text:span text:style-name="T113">遵守安全編碼規範，不寫危險程式碼</text:span><text:span text:style-name="T112"/></text:p>
          </table:table-cell>
        </table:table-row>
        <table:table-row table:style-name="表格131.1">
          <table:table-cell table:style-name="表格131.A3" office:value-type="string">
            <text:p text:style-name="P25" loext:marker-style-name="T112"><text:span text:style-name="T144">④ </text:span><text:span text:style-name="T113">測試</text:span></text:p>
          </table:table-cell>
          <table:table-cell table:style-name="表格131.A3" office:value-type="string">
            <text:p text:style-name="P25" loext:marker-style-name="T112"><text:span text:style-name="T144">Test</text:span><text:span text:style-name="T112"/></text:p>
          </table:table-cell>
          <table:table-cell table:style-name="表格131.A3" office:value-type="string">
            <text:p text:style-name="P25" loext:marker-style-name="T112"><text:span text:style-name="T113">測試功能與安全</text:span><text:span text:style-name="T112"/></text:p>
          </table:table-cell>
          <table:table-cell table:style-name="表格131.A3" office:value-type="string">
            <text:p text:style-name="P25" loext:marker-style-name="T112"><text:span text:style-name="T113">弱點掃描、滲透測試，找出漏洞</text:span><text:span text:style-name="T112"/></text:p>
          </table:table-cell>
        </table:table-row>
        <table:table-row table:style-name="表格131.1">
          <table:table-cell table:style-name="表格131.A2" office:value-type="string">
            <text:p text:style-name="P25" loext:marker-style-name="T112"><text:span text:style-name="T144">⑤ </text:span><text:span text:style-name="T113">上線</text:span></text:p>
          </table:table-cell>
          <table:table-cell table:style-name="表格131.A2" office:value-type="string">
            <text:p text:style-name="P25" loext:marker-style-name="T112"><text:span text:style-name="T144">Deploy</text:span><text:span text:style-name="T112"/></text:p>
          </table:table-cell>
          <table:table-cell table:style-name="表格131.A2" office:value-type="string">
            <text:p text:style-name="P25" loext:marker-style-name="T112"><text:span text:style-name="T113">正式發布系統</text:span><text:span text:style-name="T112"/></text:p>
          </table:table-cell>
          <table:table-cell table:style-name="表格131.A2" office:value-type="string">
            <text:p text:style-name="P25" loext:marker-style-name="T112"><text:span text:style-name="T113">確認設定沒疏漏，最小權限原則</text:span><text:span text:style-name="T112"/></text:p>
          </table:table-cell>
        </table:table-row>
        <table:table-row table:style-name="表格131.1">
          <table:table-cell table:style-name="表格131.A3" office:value-type="string">
            <text:p text:style-name="P25" loext:marker-style-name="T112"><text:span text:style-name="T144">⑥ </text:span><text:span text:style-name="T113">維護</text:span></text:p>
          </table:table-cell>
          <table:table-cell table:style-name="表格131.A3" office:value-type="string">
            <text:p text:style-name="P25" loext:marker-style-name="T112"><text:span text:style-name="T144">Maintain</text:span><text:span text:style-name="T112"/></text:p>
          </table:table-cell>
          <table:table-cell table:style-name="表格131.A3" office:value-type="string">
            <text:p text:style-name="P25" loext:marker-style-name="T112"><text:span text:style-name="T113">持續監控與更新</text:span><text:span text:style-name="T112"/></text:p>
          </table:table-cell>
          <table:table-cell table:style-name="表格131.A3" office:value-type="string">
            <text:p text:style-name="P25" loext:marker-style-name="T112"><text:span text:style-name="T113">定期更新修補，監控異常行為</text:span><text:span text:style-name="T112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8"><text:span text:style-name="T151">🔑 <text:s/></text:span><text:span text:style-name="T165">SSDLC </text:span><text:span text:style-name="T155">核心</text:span></text:p>
            <text:p text:style-name="P9" loext:marker-style-name="T96"><text:span text:style-name="T95">核心精神「左移（</text:span><text:span text:style-name="T129">Shift Left</text:span><text:span text:style-name="T95">）」——把資安工作從最後一步，往前移到設計和開發階段。越早發現</text:span><text:soft-page-break/><text:span text:style-name="T95">漏洞，修復成本越低。</text:span></text:p>
          </table:table-cell>
          <table:covered-table-cell/>
          <table:covered-table-cell/>
          <table:covered-table-cell/>
        </table:table-row>
      </table:table>
      <text:h text:style-name="P2" text:outline-level="3"><text:span text:style-name="T153">▍</text:span><text:span text:style-name="T154"> ISO 27001</text:span><text:span text:style-name="T155">：用制度管理資安</text:span></text:h>
      <text:p text:style-name="P31" loext:marker-style-name="T96"><text:span text:style-name="T129">ISO 27001 </text:span><text:span text:style-name="T95">是國際公認的資安管理制度標準，建立的制度稱為 </text:span><text:span text:style-name="T129">ISMS</text:span><text:span text:style-name="T95">（</text:span><text:span text:style-name="T129">Information Security Management System</text:span><text:span text:style-name="T95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6" loext:marker-style-name="T72"><text:span text:style-name="T71">四個面向</text:span><text:span text:style-name="T72"/></text:p>
            </table:table-cell>
            <table:table-cell table:style-name="表格132.A1" office:value-type="string">
              <text:p text:style-name="P6" loext:marker-style-name="T72"><text:span text:style-name="T71">管什麼</text:span><text:span text:style-name="T72"/></text:p>
            </table:table-cell>
            <table:table-cell table:style-name="表格132.A1" office:value-type="string">
              <text:p text:style-name="P6" loext:marker-style-name="T72"><text:span text:style-name="T71">例子</text:span><text:span text:style-name="T72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5" loext:marker-style-name="T112"><text:span text:style-name="T113">人（</text:span><text:span text:style-name="T144">People</text:span><text:span text:style-name="T113">）</text:span></text:p>
          </table:table-cell>
          <table:table-cell table:style-name="表格132.A2" office:value-type="string">
            <text:p text:style-name="P25" loext:marker-style-name="T112"><text:span text:style-name="T113">管理人員的行為與責任</text:span><text:span text:style-name="T112"/></text:p>
          </table:table-cell>
          <table:table-cell table:style-name="表格132.A2" office:value-type="string">
            <text:p text:style-name="P25" loext:marker-style-name="T112"><text:span text:style-name="T113">員工教育訓練、離職員工帳號立即停用、權限最小化</text:span><text:span text:style-name="T112"/></text:p>
          </table:table-cell>
        </table:table-row>
        <table:table-row table:style-name="表格132.1">
          <table:table-cell table:style-name="表格132.A3" office:value-type="string">
            <text:p text:style-name="P25" loext:marker-style-name="T112"><text:span text:style-name="T113">技術（</text:span><text:span text:style-name="T144">Technology</text:span><text:span text:style-name="T113">）</text:span></text:p>
          </table:table-cell>
          <table:table-cell table:style-name="表格132.A3" office:value-type="string">
            <text:p text:style-name="P25" loext:marker-style-name="T112"><text:span text:style-name="T113">使用適當的安全技術</text:span><text:span text:style-name="T112"/></text:p>
          </table:table-cell>
          <table:table-cell table:style-name="表格132.A3" office:value-type="string">
            <text:p text:style-name="P25" loext:marker-style-name="T112"><text:span text:style-name="T113">防火牆、</text:span><text:span text:style-name="T144">MFA</text:span><text:span text:style-name="T113">、資料加密、</text:span><text:span text:style-name="T144">EDR</text:span></text:p>
          </table:table-cell>
        </table:table-row>
        <table:table-row table:style-name="表格132.1">
          <table:table-cell table:style-name="表格132.A2" office:value-type="string">
            <text:p text:style-name="P25" loext:marker-style-name="T112"><text:span text:style-name="T113">組織（</text:span><text:span text:style-name="T144">Organization</text:span><text:span text:style-name="T113">）</text:span></text:p>
          </table:table-cell>
          <table:table-cell table:style-name="表格132.A2" office:value-type="string">
            <text:p text:style-name="P25" loext:marker-style-name="T112"><text:span text:style-name="T113">建立流程與管理制度</text:span><text:span text:style-name="T112"/></text:p>
          </table:table-cell>
          <table:table-cell table:style-name="表格132.A2" office:value-type="string">
            <text:p text:style-name="P25" loext:marker-style-name="T112"><text:span text:style-name="T113">資安政策、</text:span><text:span text:style-name="T144">SOP</text:span><text:span text:style-name="T113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5" loext:marker-style-name="T112"><text:span text:style-name="T113">實體（</text:span><text:span text:style-name="T144">Physical</text:span><text:span text:style-name="T113">）</text:span></text:p>
          </table:table-cell>
          <table:table-cell table:style-name="表格132.A3" office:value-type="string">
            <text:p text:style-name="P25" loext:marker-style-name="T112"><text:span text:style-name="T113">保護實體環境</text:span><text:span text:style-name="T112"/></text:p>
          </table:table-cell>
          <table:table-cell table:style-name="表格132.A3" office:value-type="string">
            <text:p text:style-name="P25" loext:marker-style-name="T112"><text:span text:style-name="T113">機房門禁、監視器、防止未授權人員進入</text:span><text:span text:style-name="T112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8"><text:span text:style-name="T151">🌟 <text:s/></text:span><text:span text:style-name="T201">考試必背三句話</text:span></text:p>
            <text:p text:style-name="P9" loext:marker-style-name="T96"><text:span text:style-name="T129">1. </text:span><text:span text:style-name="T95">資安三階段：事前預防 → 事中偵測 → 事後復原。</text:span></text:p>
            <text:p text:style-name="P10" loext:marker-style-name="T96"><text:span text:style-name="T129">2. SSDLC</text:span><text:span text:style-name="T95">：六階段（</text:span><text:span text:style-name="T129">Define→Design→Develop→Test→Deploy→Maintain</text:span><text:span text:style-name="T95">）都加入資安。</text:span></text:p>
            <text:p text:style-name="P10" loext:marker-style-name="T96"><text:span text:style-name="T129">3. ISO 27001</text:span><text:span text:style-name="T95">：用 </text:span><text:span text:style-name="T129">ISMS </text:span><text:span text:style-name="T95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3" text:outline-level="2" loext:marker-style-name="T27"><text:span text:style-name="T28">伍、進階防禦：</text:span><text:span text:style-name="T27">EDR · MDR · MITRE ATT&amp;CK · </text:span><text:span text:style-name="T28">數位韌性</text:span></text:h>
      <text:p text:style-name="P31" loext:marker-style-name="T96"><text:span text:style-name="T95">現代駭客不一定放病毒，而是偷登入帳號偽裝成正常使用者、長期潛伏、利用合法工具發動攻擊。因此資安核心已從「防毒」轉向「持續監控電腦行為，即時偵測並快速應變」。</text:span><text:span text:style-name="T96"/></text:p>
      <text:h text:style-name="P2" text:outline-level="3"><text:span text:style-name="T153">▍</text:span><text:span text:style-name="T154"> EDR — </text:span><text:span text:style-name="T155">自己監控的資安工具</text:span></text:h>
      <text:p text:style-name="P31" loext:marker-style-name="T96"><text:span text:style-name="T129">EDR = Endpoint Detection and Response</text:span><text:span text:style-name="T95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22" loext:marker-style-name="T66"><text:span text:style-name="T65">三大偵測範圍</text:span><text:span text:style-name="T66"/></text:p>
            </table:table-cell>
            <table:table-cell table:style-name="表格133.A1" office:value-type="string">
              <text:p text:style-name="P22" loext:marker-style-name="T66"><text:span text:style-name="T65">三大回應動作</text:span><text:span text:style-name="T66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5" loext:marker-style-name="T80"><text:span text:style-name="T79">檔案行為：大量加密</text:span><text:span text:style-name="T121">/</text:span><text:span text:style-name="T79">修改系統檔案 → 可能勒索病毒｜程式行為：</text:span><text:span text:style-name="T121">Office </text:span><text:span text:style-name="T79">偷偷開命令列 → 明顯異常｜網路行為：突然連線境外 </text:span><text:span text:style-name="T121">IP → </text:span><text:span text:style-name="T79">可能已遭入侵</text:span></text:p>
          </table:table-cell>
          <table:table-cell table:style-name="表格133.A2" office:value-type="string">
            <text:p text:style-name="P25" loext:marker-style-name="T80"><text:span text:style-name="T79">中斷程序：立即殺掉可疑惡意程式｜隔離主機：切斷該電腦與內網連線，防擴散｜封鎖連線：禁止與駭客伺服器通訊</text:span><text:span text:style-name="T80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8"><text:span text:style-name="T151">💡 <text:s/></text:span><text:span text:style-name="T155">核心觀念</text:span></text:p>
            <text:p text:style-name="P9" loext:marker-style-name="T96"><text:span text:style-name="T129">EDR </text:span><text:span text:style-name="T95">是「買工具、自己守」。企業需要有內部資安人員負責查看警報並處理事件。</text:span></text:p>
          </table:table-cell>
          <table:covered-table-cell/>
        </table:table-row>
      </table:table>
      <text:h text:style-name="P2" text:outline-level="3"><text:span text:style-name="T153">▍</text:span><text:span text:style-name="T154"> MDR — </text:span><text:span text:style-name="T155">委外的資安託管服務</text:span></text:h>
      <text:p text:style-name="P31" loext:marker-style-name="T96"><text:span text:style-name="T129">MDR = Managed Detection and Response</text:span><text:span text:style-name="T95">。重點在「</text:span><text:span text:style-name="T129">Managed</text:span><text:span text:style-name="T95">（託管）」——你不需要自己有資安團隊，直接花錢請外部資安公司 </text:span><text:span text:style-name="T129">24 </text:span><text:span text:style-name="T95">小時幫你守。服務包含 </text:span><text:span text:style-name="T129">SOC</text:span><text:span text:style-name="T95">（資安監控中心，專業人員 </text:span><text:span text:style-name="T129">24 </text:span><text:span text:style-name="T95">小時盯著）、</text:span><text:span text:style-name="T129">IDS</text:span><text:span text:style-name="T95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6" loext:marker-style-name="T66"><text:span text:style-name="T65">比較項目</text:span><text:span text:style-name="T66"/></text:p>
            </table:table-cell>
            <table:table-cell table:style-name="表格134.A1" office:value-type="string">
              <text:p text:style-name="P6" loext:marker-style-name="T66"><text:span text:style-name="T75">EDR</text:span><text:span text:style-name="T66"/></text:p>
            </table:table-cell>
            <table:table-cell table:style-name="表格134.A1" office:value-type="string">
              <text:p text:style-name="P6" loext:marker-style-name="T66"><text:span text:style-name="T75">MDR</text:span><text:span text:style-name="T66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5" loext:marker-style-name="T80"><text:span text:style-name="T79">管理方式</text:span><text:span text:style-name="T80"/></text:p>
          </table:table-cell>
          <table:table-cell table:style-name="表格134.A2" office:value-type="string">
            <text:p text:style-name="P25" loext:marker-style-name="T80"><text:span text:style-name="T79">自行管理</text:span><text:span text:style-name="T80"/></text:p>
          </table:table-cell>
          <table:table-cell table:style-name="表格134.A2" office:value-type="string">
            <text:p text:style-name="P25" loext:marker-style-name="T80"><text:span text:style-name="T79">委外管理</text:span><text:span text:style-name="T80"/></text:p>
          </table:table-cell>
        </table:table-row>
        <table:table-row table:style-name="表格134.1">
          <table:table-cell table:style-name="表格134.A3" office:value-type="string">
            <text:p text:style-name="P25" loext:marker-style-name="T80"><text:span text:style-name="T79">監控時間</text:span><text:span text:style-name="T80"/></text:p>
          </table:table-cell>
          <table:table-cell table:style-name="表格134.A3" office:value-type="string">
            <text:p text:style-name="P25" loext:marker-style-name="T80"><text:span text:style-name="T79">視團隊而定</text:span><text:span text:style-name="T80"/></text:p>
          </table:table-cell>
          <table:table-cell table:style-name="表格134.A3" office:value-type="string">
            <text:p text:style-name="P25" loext:marker-style-name="T80"><text:span text:style-name="T121">24 / 7 </text:span><text:span text:style-name="T79">全天</text:span></text:p>
          </table:table-cell>
        </table:table-row>
        <table:table-row table:style-name="表格134.1">
          <table:table-cell table:style-name="表格134.A2" office:value-type="string">
            <text:p text:style-name="P25" loext:marker-style-name="T80"><text:span text:style-name="T79">所需能力</text:span><text:span text:style-name="T80"/></text:p>
          </table:table-cell>
          <table:table-cell table:style-name="表格134.A2" office:value-type="string">
            <text:p text:style-name="P25" loext:marker-style-name="T80"><text:span text:style-name="T79">需內部資安人員</text:span><text:span text:style-name="T80"/></text:p>
          </table:table-cell>
          <table:table-cell table:style-name="表格134.A2" office:value-type="string">
            <text:p text:style-name="P25" loext:marker-style-name="T80"><text:span text:style-name="T79">無須自建團隊</text:span><text:span text:style-name="T80"/></text:p>
          </table:table-cell>
        </table:table-row>
        <table:table-row table:style-name="表格134.1">
          <table:table-cell table:style-name="表格134.A3" office:value-type="string">
            <text:p text:style-name="P25" loext:marker-style-name="T80"><text:span text:style-name="T79">適合對象</text:span><text:span text:style-name="T80"/></text:p>
          </table:table-cell>
          <table:table-cell table:style-name="表格134.A3" office:value-type="string">
            <text:p text:style-name="P25" loext:marker-style-name="T80"><text:span text:style-name="T79">大型企業</text:span><text:span text:style-name="T80"/></text:p>
          </table:table-cell>
          <table:table-cell table:style-name="表格134.A3" office:value-type="string">
            <text:p text:style-name="P25" loext:marker-style-name="T80"><text:span text:style-name="T79">中小企業</text:span><text:span text:style-name="T80"/>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5" loext:marker-style-name="T80"><text:span text:style-name="T79">成本模式</text:span><text:span text:style-name="T80"/></text:p>
          </table:table-cell>
          <table:table-cell table:style-name="表格134.A2" office:value-type="string">
            <text:p text:style-name="P25" loext:marker-style-name="T80"><text:span text:style-name="T79">工具費 </text:span><text:span text:style-name="T121">+ </text:span><text:span text:style-name="T79">人力</text:span></text:p>
          </table:table-cell>
          <table:table-cell table:style-name="表格134.A2" office:value-type="string">
            <text:p text:style-name="P25" loext:marker-style-name="T80"><text:span text:style-name="T79">月費 </text:span><text:span text:style-name="T121">/ </text:span><text:span text:style-name="T79">年費訂閱</text:span></text:p>
          </table:table-cell>
        </table:table-row>
      </table:table>
      <text:h text:style-name="P2" text:outline-level="3"><text:span text:style-name="T153">▍</text:span><text:span text:style-name="T154"> MITRE ATT&amp;CK — </text:span><text:span text:style-name="T155">駭客招式大全</text:span></text:h>
      <text:p text:style-name="P31" loext:marker-style-name="T96"><text:span text:style-name="T95">資安界發現駭客攻擊模式相當固定（寄釣魚信→偷帳號→開後門→橫向移動→竊取資料）。</text:span><text:span text:style-name="T129">MITRE </text:span><text:span text:style-name="T95">公司將所有已知駭客手法整理成全球通用的知識庫，稱為 </text:span><text:span text:style-name="T129">MITRE ATT&amp;CK</text:span><text:span text:style-name="T95">（</text:span><text:span text:style-name="T129">Adversarial Tactics, Techniques, and Common Knowledge</text:span><text:span text:style-name="T95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6" loext:marker-style-name="T72"><text:span text:style-name="T77">TTP</text:span><text:span text:style-name="T72"/></text:p>
            </table:table-cell>
            <table:table-cell table:style-name="表格135.A1" office:value-type="string">
              <text:p text:style-name="P6" loext:marker-style-name="T72"><text:span text:style-name="T71">意義</text:span><text:span text:style-name="T72"/></text:p>
            </table:table-cell>
            <table:table-cell table:style-name="表格135.A1" office:value-type="string">
              <text:p text:style-name="P6" loext:marker-style-name="T72"><text:span text:style-name="T77">ATT&amp;CK </text:span><text:span text:style-name="T71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5" loext:marker-style-name="T112"><text:span text:style-name="T144">T - Tactics</text:span><text:span text:style-name="T112"/></text:p>
          </table:table-cell>
          <table:table-cell table:style-name="表格135.A2" office:value-type="string">
            <text:p text:style-name="P25" loext:marker-style-name="T112"><text:span text:style-name="T113">戰術（攻擊目的）</text:span><text:span text:style-name="T112"/></text:p>
          </table:table-cell>
          <table:table-cell table:style-name="表格135.A2" office:value-type="string">
            <text:p text:style-name="P25" loext:marker-style-name="T112"><text:span text:style-name="T113">威脅分析：快速定性事件性質</text:span><text:span text:style-name="T112"/></text:p>
          </table:table-cell>
        </table:table-row>
        <table:table-row table:style-name="表格135.1">
          <table:table-cell table:style-name="表格135.A3" office:value-type="string">
            <text:p text:style-name="P25" loext:marker-style-name="T112"><text:span text:style-name="T144">T - Techniques</text:span><text:span text:style-name="T112"/></text:p>
          </table:table-cell>
          <table:table-cell table:style-name="表格135.A3" office:value-type="string">
            <text:p text:style-name="P25" loext:marker-style-name="T112"><text:span text:style-name="T113">技術（使用方法）</text:span><text:span text:style-name="T112"/></text:p>
          </table:table-cell>
          <table:table-cell table:style-name="表格135.A3" office:value-type="string">
            <text:p text:style-name="P25" loext:marker-style-name="T112"><text:span text:style-name="T113">防禦對應：針對常見手法加強監控</text:span><text:span text:style-name="T112"/></text:p>
          </table:table-cell>
        </table:table-row>
        <table:table-row table:style-name="表格135.1">
          <table:table-cell table:style-name="表格135.A2" office:value-type="string">
            <text:p text:style-name="P25" loext:marker-style-name="T112"><text:span text:style-name="T144">P - Procedures</text:span><text:span text:style-name="T112"/></text:p>
          </table:table-cell>
          <table:table-cell table:style-name="表格135.A2" office:value-type="string">
            <text:p text:style-name="P25" loext:marker-style-name="T112"><text:span text:style-name="T113">流程（實際操作步驟）</text:span><text:span text:style-name="T112"/></text:p>
          </table:table-cell>
          <table:table-cell table:style-name="表格135.A2" office:value-type="string">
            <text:p text:style-name="P25" loext:marker-style-name="T112"><text:span text:style-name="T113">主動防禦：預測下一步，提前部署</text:span><text:span text:style-name="T112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8"><text:span text:style-name="T151">💡 <text:s/></text:span><text:span text:style-name="T155">核心觀念</text:span></text:p>
            <text:p text:style-name="P9" loext:marker-style-name="T96"><text:span text:style-name="T129">ATT&amp;CK </text:span><text:span text:style-name="T95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2" text:outline-level="3"><text:span text:style-name="T153">▍</text:span><text:span text:style-name="T154"> </text:span><text:span text:style-name="T155">數位韌性（</text:span><text:span text:style-name="T154">Digital Resilience</text:span><text:span text:style-name="T155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22" loext:marker-style-name="T66"><text:span text:style-name="T75">❌ </text:span><text:span text:style-name="T65">以前的想法</text:span></text:p>
            </table:table-cell>
            <table:table-cell table:style-name="表格136.A1" office:value-type="string">
              <text:p text:style-name="P22" loext:marker-style-name="T66"><text:span text:style-name="T75">✅ </text:span><text:span text:style-name="T65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5" loext:marker-style-name="T80"><text:span text:style-name="T79">「不能被攻擊」——重點：阻止所有入侵。</text:span><text:span text:style-name="T80"/></text:p>
          </table:table-cell>
          <table:table-cell table:style-name="表格136.A2" office:value-type="string">
            <text:p text:style-name="P25" loext:marker-style-name="T80"><text:span text:style-name="T79">「被打了還能撐住並快速恢復」——重點：強化復原能力。</text:span><text:span text:style-name="T80"/></text:p>
          </table:table-cell>
        </table:table-row>
      </table:table>
      <text:p text:style-name="P31" loext:marker-style-name="T11"><text:span text:style-name="T10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1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8"><text:span text:style-name="T151">📝 <text:s/></text:span><text:span text:style-name="T201">一行記憶法</text:span></text:p>
            <text:p text:style-name="P9"><text:span text:style-name="T208">🛡 EDR → </text:span><text:span text:style-name="T95">自己買工具守　</text:span><text:span text:style-name="T202">👥 </text:span><text:span text:style-name="T208">MDR → </text:span><text:span text:style-name="T95">請公司幫你守</text:span></text:p>
            <text:p text:style-name="P10"><text:span text:style-name="T208">📖 ATT&amp;CK → </text:span><text:span text:style-name="T95">駭客招式教材　</text:span><text:span text:style-name="T202">💪 韌性 → </text:span><text:span text:style-name="T95">撐住、快速復原</text:span></text:p>
          </table:table-cell>
        </table:table-row>
      </table:table>
      <text:h text:style-name="P3" text:outline-level="2" loext:marker-style-name="T27"><text:span text:style-name="T28">陸、</text:span><text:span text:style-name="T27">Zero Trust </text:span><text:span text:style-name="T28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8"><text:span text:style-name="T151">📋 <text:s/></text:span><text:span text:style-name="T173">內容審查說明</text:span></text:p>
            <text:p text:style-name="P9" loext:marker-style-name="T96"><text:span text:style-name="T95">文中「三要素（身份</text:span><text:span text:style-name="T129">/</text:span><text:span text:style-name="T95">設備</text:span><text:span text:style-name="T129">/</text:span><text:span text:style-name="T95">情境）」源自 </text:span><text:span text:style-name="T129">Microsoft </text:span><text:span text:style-name="T95">的 </text:span><text:span text:style-name="T129">Zero Trust </text:span><text:span text:style-name="T95">簡化說法；</text:span><text:span text:style-name="T129">NIST SP 800-207 </text:span><text:span text:style-name="T95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31" loext:marker-style-name="T96"><text:span text:style-name="T95">傳統企業網路以「邊界防護」為核心，邊界之內的人員與設備幾乎被預設為可信任（城堡思維）。</text:span><text:span text:style-name="T129">Zero Trust </text:span><text:span text:style-name="T95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6"/>
            </table:table-cell>
            <table:table-cell table:style-name="表格139.A1" office:value-type="string">
              <text:p text:style-name="P6" loext:marker-style-name="T66"><text:span text:style-name="T65">傳統（城堡思維）</text:span><text:span text:style-name="T66"/></text:p>
            </table:table-cell>
            <table:table-cell table:style-name="表格139.A1" office:value-type="string">
              <text:p text:style-name="P6" loext:marker-style-name="T66"><text:span text:style-name="T75">Zero Trust</text:span><text:span text:style-name="T66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5" loext:marker-style-name="T80"><text:span text:style-name="T79">核心假設</text:span><text:span text:style-name="T80"/></text:p>
          </table:table-cell>
          <table:table-cell table:style-name="表格139.A2" office:value-type="string">
            <text:p text:style-name="P25" loext:marker-style-name="T80"><text:span text:style-name="T79">內網 </text:span><text:span text:style-name="T121">= </text:span><text:span text:style-name="T79">可信任</text:span></text:p>
          </table:table-cell>
          <table:table-cell table:style-name="表格139.A2" office:value-type="string">
            <text:p text:style-name="P25" loext:marker-style-name="T80"><text:span text:style-name="T79">任何人都需持續驗證</text:span><text:span text:style-name="T80"/></text:p>
          </table:table-cell>
        </table:table-row>
        <table:table-row table:style-name="表格139.1">
          <table:table-cell table:style-name="表格139.A3" office:value-type="string">
            <text:p text:style-name="P25" loext:marker-style-name="T80"><text:span text:style-name="T79">防護重點</text:span><text:span text:style-name="T80"/></text:p>
          </table:table-cell>
          <table:table-cell table:style-name="表格139.A3" office:value-type="string">
            <text:p text:style-name="P25" loext:marker-style-name="T80"><text:span text:style-name="T79">網路邊界 </text:span><text:span text:style-name="T121">/ </text:span><text:span text:style-name="T79">防火牆</text:span></text:p>
          </table:table-cell>
          <table:table-cell table:style-name="表格139.A3" office:value-type="string">
            <text:p text:style-name="P25" loext:marker-style-name="T80"><text:span text:style-name="T79">身份 </text:span><text:span text:style-name="T121">× </text:span><text:span text:style-name="T79">設備 </text:span><text:span text:style-name="T121">× </text:span><text:span text:style-name="T79">情境</text:span></text:p>
          </table:table-cell>
        </table:table-row>
        <table:table-row table:style-name="表格139.1">
          <table:table-cell table:style-name="表格139.A2" office:value-type="string">
            <text:p text:style-name="P25" loext:marker-style-name="T80"><text:span text:style-name="T79">登入之後</text:span><text:span text:style-name="T80"/></text:p>
          </table:table-cell>
          <table:table-cell table:style-name="表格139.A2" office:value-type="string">
            <text:p text:style-name="P25" loext:marker-style-name="T80"><text:span text:style-name="T79">幾乎不再驗證</text:span><text:span text:style-name="T80"/></text:p>
          </table:table-cell>
          <table:table-cell table:style-name="表格139.A2" office:value-type="string">
            <text:p text:style-name="P25" loext:marker-style-name="T80"><text:span text:style-name="T79">每個操作持續驗證</text:span><text:span text:style-name="T80"/></text:p>
          </table:table-cell>
        </table:table-row>
        <table:table-row table:style-name="表格139.1">
          <table:table-cell table:style-name="表格139.A3" office:value-type="string">
            <text:p text:style-name="P25" loext:marker-style-name="T80"><text:span text:style-name="T79">駭客入侵後</text:span><text:span text:style-name="T80"/></text:p>
          </table:table-cell>
          <table:table-cell table:style-name="表格139.A3" office:value-type="string">
            <text:p text:style-name="P25" loext:marker-style-name="T80"><text:span text:style-name="T79">可橫向移動整個內網</text:span><text:span text:style-name="T80"/></text:p>
          </table:table-cell>
          <table:table-cell table:style-name="表格139.A3" office:value-type="string">
            <text:p text:style-name="P25" loext:marker-style-name="T80"><text:span text:style-name="T79">被微分段限制，難以擴散</text:span><text:span text:style-name="T80"/></text:p>
          </table:table-cell>
        </table:table-row>
        <table:table-row table:style-name="表格139.1">
          <table:table-cell table:style-name="表格139.A2" office:value-type="string">
            <text:p text:style-name="P25" loext:marker-style-name="T80"><text:span text:style-name="T79">適合時代</text:span><text:span text:style-name="T80"/></text:p>
          </table:table-cell>
          <table:table-cell table:style-name="表格139.A2" office:value-type="string">
            <text:p text:style-name="P25" loext:marker-style-name="T80"><text:span text:style-name="T79">固定辦公室 </text:span><text:span text:style-name="T121">/ </text:span><text:span text:style-name="T79">單一內網</text:span></text:p>
          </table:table-cell>
          <table:table-cell table:style-name="表格139.A2" office:value-type="string">
            <text:p text:style-name="P25" loext:marker-style-name="T80"><text:span text:style-name="T121">Cloud / </text:span><text:span text:style-name="T79">遠端 </text:span><text:span text:style-name="T121">/ </text:span><text:span text:style-name="T79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8"><text:span text:style-name="T151">🔑 <text:s/></text:span><text:span text:style-name="T201">核心一句話</text:span></text:p>
            <text:p text:style-name="P9" loext:marker-style-name="T205"><text:soft-page-break/><text:span text:style-name="T208">❝ </text:span><text:span text:style-name="T202">永不信任，始終驗證 ❞（</text:span><text:span text:style-name="T208">Never Trust, Always Verify</text:span><text:span text:style-name="T202">）</text:span></text:p>
            <text:p text:style-name="P10" loext:marker-style-name="T96"><text:span text:style-name="T95">無論使用者身處公司內網或外部網路，無論設備是否為公司配發，系統都不會因為「位置」就直接信任，而是透過多重機制持續確認安全性。</text:span><text:span text:style-name="T96"/></text:p>
          </table:table-cell>
          <table:covered-table-cell/>
          <table:covered-table-cell/>
        </table:table-row>
      </table:table>
      <text:h text:style-name="P2" text:outline-level="3"><text:span text:style-name="T153">▍</text:span><text:span text:style-name="T154"> </text:span><text:span text:style-name="T155">三大核心支柱：人 </text:span><text:span text:style-name="T154">· </text:span><text:span text:style-name="T155">機 </text:span><text:span text:style-name="T154">· </text:span><text:span text:style-name="T155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6" loext:marker-style-name="T72"><text:span text:style-name="T71">支柱</text:span><text:span text:style-name="T72"/></text:p>
            </table:table-cell>
            <table:table-cell table:style-name="表格140.A1" office:value-type="string">
              <text:p text:style-name="P6" loext:marker-style-name="T72"><text:span text:style-name="T71">口訣</text:span><text:span text:style-name="T72"/></text:p>
            </table:table-cell>
            <table:table-cell table:style-name="表格140.A1" office:value-type="string">
              <text:p text:style-name="P6" loext:marker-style-name="T72"><text:span text:style-name="T71">具體內容</text:span><text:span text:style-name="T72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5" loext:marker-style-name="T112"><text:span text:style-name="T144">🔑 Identity</text:span><text:span text:style-name="T113">（身份驗證）</text:span></text:p>
          </table:table-cell>
          <table:table-cell table:style-name="表格140.A2" office:value-type="string">
            <text:p text:style-name="P25" loext:marker-style-name="T112"><text:span text:style-name="T113">人</text:span><text:span text:style-name="T112"/></text:p>
          </table:table-cell>
          <table:table-cell table:style-name="表格140.A2" office:value-type="string">
            <text:p text:style-name="P25" loext:marker-style-name="T112"><text:span text:style-name="T113">確認使用者是本人：帳密、</text:span><text:span text:style-name="T144">MFA</text:span><text:span text:style-name="T113">（手機 </text:span><text:span text:style-name="T144">OTP</text:span><text:span text:style-name="T113">、指紋）、</text:span><text:span text:style-name="T144">IAM </text:span><text:span text:style-name="T113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5" loext:marker-style-name="T112"><text:span text:style-name="T144">💻 Device</text:span><text:span text:style-name="T113">（設備健康）</text:span></text:p>
          </table:table-cell>
          <table:table-cell table:style-name="表格140.A3" office:value-type="string">
            <text:p text:style-name="P25" loext:marker-style-name="T112"><text:span text:style-name="T113">機</text:span><text:span text:style-name="T112"/></text:p>
          </table:table-cell>
          <table:table-cell table:style-name="表格140.A3" office:value-type="string">
            <text:p text:style-name="P25" loext:marker-style-name="T112"><text:span text:style-name="T113">確認設備是否安全：防毒更新、系統版本、是否為授權設備（</text:span><text:span text:style-name="T144">Device Posture</text:span><text:span text:style-name="T113">）</text:span></text:p>
          </table:table-cell>
        </table:table-row>
        <table:table-row table:style-name="表格140.1">
          <table:table-cell table:style-name="表格140.A2" office:value-type="string">
            <text:p text:style-name="P25" loext:marker-style-name="T112"><text:span text:style-name="T144">🌐 Context</text:span><text:span text:style-name="T113">（存取情境）</text:span></text:p>
          </table:table-cell>
          <table:table-cell table:style-name="表格140.A2" office:value-type="string">
            <text:p text:style-name="P25" loext:marker-style-name="T112"><text:span text:style-name="T113">境</text:span><text:span text:style-name="T112"/></text:p>
          </table:table-cell>
          <table:table-cell table:style-name="表格140.A2" office:value-type="string">
            <text:p text:style-name="P25" loext:marker-style-name="T112"><text:span text:style-name="T113">評估環境是否異常：登入時間、地點、行為模式；凌晨從境外登入會觸發額外驗證</text:span><text:span text:style-name="T112"/></text:p>
          </table:table-cell>
        </table:table-row>
      </table:table>
      <text:h text:style-name="P2" text:outline-level="3"><text:span text:style-name="T153">▍</text:span><text:span text:style-name="T154"> </text:span><text:span text:style-name="T155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6" loext:marker-style-name="T72"><text:span text:style-name="T71">機制</text:span><text:span text:style-name="T72"/></text:p>
            </table:table-cell>
            <table:table-cell table:style-name="表格141.A1" office:value-type="string">
              <text:p text:style-name="P6" loext:marker-style-name="T72"><text:span text:style-name="T71">說明</text:span><text:span text:style-name="T72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5" loext:marker-style-name="T112"><text:span text:style-name="T144">① MFA </text:span><text:span text:style-name="T113">多因素驗證</text:span></text:p>
          </table:table-cell>
          <table:table-cell table:style-name="表格141.A2" office:value-type="string">
            <text:p text:style-name="P25" loext:marker-style-name="T112"><text:span text:style-name="T113">登入不只密碼，還需第二層驗證（手機驗證碼、指紋、硬體金鑰），密碼外洩也難入侵</text:span><text:span text:style-name="T112"/></text:p>
          </table:table-cell>
        </table:table-row>
        <table:table-row table:style-name="表格141.1">
          <table:table-cell table:style-name="表格141.A3" office:value-type="string">
            <text:p text:style-name="P25" loext:marker-style-name="T112"><text:span text:style-name="T144">② Least Privilege </text:span><text:span text:style-name="T113">最小權限</text:span></text:p>
          </table:table-cell>
          <table:table-cell table:style-name="表格141.A3" office:value-type="string">
            <text:p text:style-name="P25" loext:marker-style-name="T112"><text:span text:style-name="T113">每位使用者只獲得完成工作所需的最低權限。權限愈小，風險愈低</text:span><text:span text:style-name="T112"/></text:p>
          </table:table-cell>
        </table:table-row>
        <table:table-row table:style-name="表格141.1">
          <table:table-cell table:style-name="表格141.A2" office:value-type="string">
            <text:p text:style-name="P25" loext:marker-style-name="T112"><text:span text:style-name="T144">③ Micro-Segmentation </text:span><text:span text:style-name="T113">微分段</text:span></text:p>
          </table:table-cell>
          <table:table-cell table:style-name="表格141.A2" office:value-type="string">
            <text:p text:style-name="P25" loext:marker-style-name="T112"><text:span text:style-name="T113">將內網切成多個獨立小區段，各區設存取控制；攻破一段也無法橫向擴散</text:span><text:span text:style-name="T112"/></text:p>
          </table:table-cell>
        </table:table-row>
        <table:table-row table:style-name="表格141.1">
          <table:table-cell table:style-name="表格141.A3" office:value-type="string">
            <text:p text:style-name="P25" loext:marker-style-name="T112"><text:span text:style-name="T144">④ Continuous Monitoring </text:span><text:span text:style-name="T113">持續監控</text:span></text:p>
          </table:table-cell>
          <table:table-cell table:style-name="表格141.A3" office:value-type="string">
            <text:p text:style-name="P25" loext:marker-style-name="T112"><text:span text:style-name="T113">全天候分析行為，異常立即警示（如半夜大量下載、短時間多國登入、刪大量日誌）</text:span><text:span text:style-name="T112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8"><text:span text:style-name="T151">🔥 <text:s/></text:span><text:span text:style-name="T155">考前 </text:span><text:span text:style-name="T165">10 </text:span><text:span text:style-name="T155">秒超濃縮</text:span></text:p>
            <text:p text:style-name="P9" loext:marker-style-name="T96"><text:span text:style-name="T129">ZT </text:span><text:span text:style-name="T95">核心：不信任任何人（含內網）；檢查三件事——人（</text:span><text:span text:style-name="T129">Identity</text:span><text:span text:style-name="T95">）、機（</text:span><text:span text:style-name="T129">Device</text:span><text:span text:style-name="T95">）、境（</text:span><text:span text:style-name="T129">Context</text:span><text:span text:style-name="T95">）；搭配四招——</text:span><text:span text:style-name="T129">MFA </text:span><text:span text:style-name="T95">＋ 最小權限 ＋ 微分段 ＋ 持續監控。</text:span></text:p>
            <text:p text:style-name="P10" loext:marker-style-name="T96"><text:span text:style-name="T95">口訣：人機境，多驗、少給、切塊、一直看。</text:span><text:span text:style-name="T96"/></text:p>
          </table:table-cell>
          <table:covered-table-cell/>
        </table:table-row>
      </table:table>
      <text:h text:style-name="P2" text:outline-level="3"><text:span text:style-name="T153">▍</text:span><text:span text:style-name="T154"> Zero Trust </text:span><text:span text:style-name="T155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6" loext:marker-style-name="T72"><text:span text:style-name="T77">Step</text:span><text:span text:style-name="T72"/></text:p>
            </table:table-cell>
            <table:table-cell table:style-name="表格142.A1" office:value-type="string">
              <text:p text:style-name="P6" loext:marker-style-name="T72"><text:span text:style-name="T71">動作</text:span><text:span text:style-name="T72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5" loext:marker-style-name="T112"><text:span text:style-name="T144">1 </text:span><text:span text:style-name="T113">發出存取請求</text:span></text:p>
          </table:table-cell>
          <table:table-cell table:style-name="表格142.A2" office:value-type="string">
            <text:p text:style-name="P25" loext:marker-style-name="T112"><text:span text:style-name="T113">使用者或設備嘗試存取某資源（系統 </text:span><text:span text:style-name="T144">/ </text:span><text:span text:style-name="T113">檔案 </text:span><text:span text:style-name="T144">/ </text:span><text:span text:style-name="T113">資料庫）</text:span></text:p>
          </table:table-cell>
        </table:table-row>
        <table:table-row table:style-name="表格142.1">
          <table:table-cell table:style-name="表格142.A3" office:value-type="string">
            <text:p text:style-name="P25" loext:marker-style-name="T112"><text:span text:style-name="T144">2 </text:span><text:span text:style-name="T113">身份驗證 </text:span><text:span text:style-name="T144">Identity</text:span></text:p>
          </table:table-cell>
          <table:table-cell table:style-name="表格142.A3" office:value-type="string">
            <text:p text:style-name="P25" loext:marker-style-name="T112"><text:span text:style-name="T113">確認身份：帳密 </text:span><text:span text:style-name="T144">+ MFA </text:span><text:span text:style-name="T113">驗證通過</text:span></text:p>
          </table:table-cell>
        </table:table-row>
        <table:table-row table:style-name="表格142.1">
          <table:table-cell table:style-name="表格142.A2" office:value-type="string">
            <text:p text:style-name="P25" loext:marker-style-name="T112"><text:span text:style-name="T144">3 </text:span><text:span text:style-name="T113">設備驗證 </text:span><text:span text:style-name="T144">Device</text:span></text:p>
          </table:table-cell>
          <table:table-cell table:style-name="表格142.A2" office:value-type="string">
            <text:p text:style-name="P25" loext:marker-style-name="T112"><text:span text:style-name="T113">檢查設備健康：防毒、更新、合規性符合要求</text:span><text:span text:style-name="T112"/></text:p>
          </table:table-cell>
        </table:table-row>
        <table:table-row table:style-name="表格142.1">
          <table:table-cell table:style-name="表格142.A3" office:value-type="string">
            <text:p text:style-name="P25" loext:marker-style-name="T112"><text:span text:style-name="T144">4 </text:span><text:span text:style-name="T113">情境評估 </text:span><text:span text:style-name="T144">Context</text:span></text:p>
          </table:table-cell>
          <table:table-cell table:style-name="表格142.A3" office:value-type="string">
            <text:p text:style-name="P25" loext:marker-style-name="T112"><text:span text:style-name="T113">分析存取時間、地點、行為模式，計算風險分數</text:span><text:span text:style-name="T112"/></text:p>
          </table:table-cell>
        </table:table-row>
        <table:table-row table:style-name="表格142.1">
          <table:table-cell table:style-name="表格142.A2" office:value-type="string">
            <text:p text:style-name="P25" loext:marker-style-name="T112"><text:span text:style-name="T144">5 </text:span><text:span text:style-name="T113">權限比對</text:span></text:p>
          </table:table-cell>
          <table:table-cell table:style-name="表格142.A2" office:value-type="string">
            <text:p text:style-name="P25" loext:marker-style-name="T112"><text:span text:style-name="T113">依最小權限原則，確認是否有權存取該資源</text:span><text:span text:style-name="T112"/></text:p>
          </table:table-cell>
        </table:table-row>
        <table:table-row table:style-name="表格142.1">
          <table:table-cell table:style-name="表格142.A3" office:value-type="string">
            <text:p text:style-name="P25" loext:marker-style-name="T112"><text:span text:style-name="T144">6 </text:span><text:span text:style-name="T113">授權或拒絕</text:span></text:p>
          </table:table-cell>
          <table:table-cell table:style-name="表格142.A3" office:value-type="string">
            <text:p text:style-name="P25" loext:marker-style-name="T112"><text:span text:style-name="T113">風險低且權限符合 → 授權；否則 → 要求補充驗證或拒絕</text:span><text:span text:style-name="T112"/></text:p>
          </table:table-cell>
        </table:table-row>
        <table:table-row table:style-name="表格142.1">
          <table:table-cell table:style-name="表格142.A2" office:value-type="string">
            <text:p text:style-name="P25" loext:marker-style-name="T112"><text:span text:style-name="T144">7 </text:span><text:span text:style-name="T113">持續監控</text:span></text:p>
          </table:table-cell>
          <table:table-cell table:style-name="表格142.A2" office:value-type="string">
            <text:p text:style-name="P25" loext:marker-style-name="T112"><text:span text:style-name="T113">授權後全程監控行為，發現異常立即告警或中斷連線</text:span><text:span text:style-name="T112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8"><text:span text:style-name="T151">⚠️ <text:s/></text:span><text:span text:style-name="T173">公職考試陷阱整理</text:span></text:p>
            <text:p text:style-name="P9"><text:span text:style-name="T133">ZT = </text:span><text:span text:style-name="T99">完全不相信員工？　</text:span><text:span text:style-name="T95">✗ 重點是「每次都驗證」，驗證通過員工仍可正常使用，只是不再預設信任。</text:span></text:p>
            <text:p text:style-name="P10"><text:soft-page-break/><text:span text:style-name="T99">只有外網才危險？　</text:span><text:span text:style-name="T95">✗ 內網也可能：帳號被盜、設備中毒、內部人員惡意操作，故內網也須驗證。</text:span></text:p>
            <text:p text:style-name="P10"><text:span text:style-name="T99">登入一次後就永久可信？　</text:span><text:span text:style-name="T95">✗ 持續驗證，單次登入不代表長期信任，高風險行為會觸發重新驗證。</text:span></text:p>
            <text:p text:style-name="P10"><text:span text:style-name="T133">Zero Trust </text:span><text:span text:style-name="T99">重視網路位置？（超常考）　</text:span><text:span text:style-name="T95">✗ 完全相反！重點從「位置」轉移到「身份 </text:span><text:span text:style-name="T129">/ </text:span><text:span text:style-name="T95">設備 </text:span><text:span text:style-name="T129">/ </text:span><text:span text:style-name="T95">情境」。</text:span></text:p>
          </table:table-cell>
          <table:covered-table-cell/>
        </table:table-row>
      </table:table>
      <text:h text:style-name="P13" text:outline-level="1" loext:marker-style-name="T68"><text:span text:style-name="T67">結語　</text:span><text:span text:style-name="T68">·</text:span><text:span text:style-name="T67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8"><text:span text:style-name="T151">✅ <text:s/></text:span><text:span text:style-name="T155">你已經完成一輪</text:span></text:p>
            <text:p text:style-name="P9" loext:marker-style-name="T96"><text:span text:style-name="T95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96"/></text:p>
          </table:table-cell>
        </table:table-row>
        <table:table-row table:style-name="表格143.1">
          <table:table-cell table:style-name="表格143.A2" office:value-type="string">
            <text:p text:style-name="P8"><text:span text:style-name="T151">🎯 <text:s/></text:span><text:span text:style-name="T201">五個高頻拿分重點</text:span></text:p>
            <text:p text:style-name="P9" loext:marker-style-name="T96"><text:span text:style-name="T129">① </text:span><text:span text:style-name="T95">分層先記責任：應用給人用、傳輸怎麼送、網路走哪條、連結同區網。</text:span></text:p>
            <text:p text:style-name="P10" loext:marker-style-name="T96"><text:span text:style-name="T129">② </text:span><text:span text:style-name="T95">計算題動手練：</text:span><text:span text:style-name="T129">VLSM</text:span><text:span text:style-name="T95">「需求</text:span><text:span text:style-name="T129">+2→</text:span><text:span text:style-name="T95">最小 </text:span><text:span text:style-name="T129">2ⁿ→/(32−n)</text:span><text:span text:style-name="T95">」、可用主機「</text:span><text:span text:style-name="T129">2^</text:span><text:span text:style-name="T95">主機</text:span><text:span text:style-name="T129">bit −2</text:span><text:span text:style-name="T95">」。</text:span></text:p>
            <text:p text:style-name="P10" loext:marker-style-name="T96"><text:span text:style-name="T129">③ </text:span><text:span text:style-name="T95">流程要會串：上網＝</text:span><text:span text:style-name="T129">DNS→ARP→NAT</text:span><text:span text:style-name="T95">；</text:span><text:span text:style-name="T129">TCP</text:span><text:span text:style-name="T95">＝握手→</text:span><text:span text:style-name="T129">Slow Start→CA→</text:span><text:span text:style-name="T95">丟包降速。</text:span></text:p>
            <text:p text:style-name="P10" loext:marker-style-name="T96"><text:span text:style-name="T129">④ </text:span><text:span text:style-name="T95">易混成對背：</text:span><text:span text:style-name="T129">FW/WAF/NGFW</text:span><text:span text:style-name="T95">、</text:span><text:span text:style-name="T129">IDS/IPS</text:span><text:span text:style-name="T95">、</text:span><text:span text:style-name="T129">HIDS/NIDS</text:span><text:span text:style-name="T95">、</text:span><text:span text:style-name="T129">SNMP/ICMP</text:span><text:span text:style-name="T95">、</text:span><text:span text:style-name="T129">EDR/MDR</text:span><text:span text:style-name="T95">、</text:span><text:span text:style-name="T129">RTO/RPO</text:span><text:span text:style-name="T95">、</text:span><text:span text:style-name="T129">Recursive/Iterative</text:span><text:span text:style-name="T95">。</text:span></text:p>
            <text:p text:style-name="P10" loext:marker-style-name="T96"><text:span text:style-name="T129">⑤ </text:span><text:span text:style-name="T95">陷阱反著記：</text:span><text:span text:style-name="T129">ARP </text:span><text:span text:style-name="T95">找路由器不是 </text:span><text:span text:style-name="T129">Google</text:span><text:span text:style-name="T95">、</text:span><text:span text:style-name="T129">BGP </text:span><text:span text:style-name="T95">政策不是距離、</text:span><text:span text:style-name="T129">WiFi </text:span><text:span text:style-name="T95">是 </text:span><text:span text:style-name="T129">CA </text:span><text:span text:style-name="T95">不是 </text:span><text:span text:style-name="T129">CD</text:span><text:span text:style-name="T95">、</text:span><text:span text:style-name="T129">IOC </text:span><text:span text:style-name="T95">是事後不是預測、</text:span><text:span text:style-name="T129">Zero Trust </text:span><text:span text:style-name="T95">看身份不看位置。</text:span></text:p>
          </table:table-cell>
        </table:table-row>
      </table:table>
      <text:p text:style-name="P21" loext:marker-style-name="T57"><text:span text:style-name="T56">祝　金榜題名　</text:span><text:span text:style-name="T64">·</text:span><text:span text:style-name="T56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33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2T00:41:46</meta:creation-date>
    <meta:initial-creator>Claude</meta:initial-creator>
    <dc:language>en-US</dc:language>
    <dc:date>2026-06-16T17:11:22</dc:date>
    <meta:editing-cycles>346</meta:editing-cycles>
    <dc:title>網路概論與資訊安全 完整整合筆記</dc:title>
    <meta:editing-duration>P2DT7H33M</meta:editing-duration>
    <meta:generator>MODA_ODF_Application_Tools/3.8.4.2$Windows_X86_64 LibreOffice_project/4fb77107d5af14329e08085efe4fa19b5633383a</meta:generator>
    <meta:document-statistic meta:table-count="143" meta:image-count="0" meta:object-count="0" meta:page-count="52" meta:paragraph-count="2302" meta:word-count="30571" meta:character-count="48355" meta:non-whitespace-character-count="43606"/>
    <meta:user-defined meta:name="AppVersion">15.0000</meta:user-defined>
  </office:meta>
</office:document-meta>
</file>