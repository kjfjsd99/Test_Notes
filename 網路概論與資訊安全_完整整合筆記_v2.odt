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ff00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fo:font-weight="bold" fo:background-color="#ffff00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5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17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20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2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3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5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7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9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30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31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2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5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6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7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8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9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0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541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42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43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544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545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546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547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548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549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550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513">BGP(Border Gateway Protocol) </text:span><text:span text:style-name="T20">不像 </text:span><text:span text:style-name="T42">OSPF </text:span><text:span text:style-name="T20">會自己算最短距離，它是在「</text:span><text:span text:style-name="T514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5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5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<text:span text:style-name="T516">TCP 179</text:span></text:p>
          </table:table-cell>
          <table:table-cell table:style-name="表格94.A2" office:value-type="string">
            <text:p text:style-name="P20" loext:marker-style-name="T106"><text:span text:style-name="T517">BGP </text:span><text:span text:style-name="T518">跑在 </text:span><text:span text:style-name="T517">TCP</text:span><text:span text:style-name="T109">，</text:span><text:span text:style-name="T518">埠號 </text:span><text:span text:style-name="T517">179</text:span><text:span text:style-name="T109">（不是 </text:span><text:span text:style-name="T519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9">TCP </text:span><text:span text:style-name="T109">的可靠重送與順序保證。考：</text:span><text:span text:style-name="T520">BGP </text:span><text:span text:style-name="T521">傳輸層協定 → </text:span><text:span text:style-name="T520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<text:span text:style-name="T516">Path Vector</text:span></text:p>
          </table:table-cell>
          <table:table-cell table:style-name="表格94.A3" office:value-type="string">
            <text:p text:style-name="P20" loext:marker-style-name="T106"><text:span text:style-name="T519">BGP </text:span><text:span text:style-name="T109">屬於 </text:span><text:span text:style-name="T519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22">把「整條 </text:span><text:span text:style-name="T523">AS </text:span><text:span text:style-name="T522">路徑」報給你</text:span><text:span text:style-name="T109">。</text:span><text:span text:style-name="T519">RIP</text:span><text:span text:style-name="T109">＝</text:span><text:span text:style-name="T519">Distance </text:span><text:soft-page-break/><text:span text:style-name="T519">Vector</text:span><text:span text:style-name="T109">、</text:span><text:span text:style-name="T519">OSPF</text:span><text:span text:style-name="T109">＝</text:span><text:span text:style-name="T519">Link State</text:span><text:span text:style-name="T109">、</text:span><text:span text:style-name="T519">BGP</text:span><text:span text:style-name="T109">＝</text:span><text:span text:style-name="T519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5"><text:span text:style-name="T516">AS-PATH</text:span><text:span text:style-name="T524">（</text:span><text:span text:style-name="T525">防迴圈</text:span><text:span text:style-name="T524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26">防 </text:span><text:span text:style-name="T527">Routing Loop</text:span></text:p>
          </table:table-cell>
          <table:table-cell table:style-name="表格94.A2" office:value-type="string">
            <text:p text:style-name="P20" loext:marker-style-name="T106"><text:span text:style-name="T520">AS </text:span><text:span text:style-name="T521">一看到 </text:span><text:span text:style-name="T520">AS-PATH </text:span><text:span text:style-name="T521">裡有「自己的 </text:span><text:span text:style-name="T520">AS </text:span><text:span text:style-name="T521">編號」就立刻丟棄，避免繞圈</text:span><text:span text:style-name="T109">。考「</text:span><text:span text:style-name="T519">AS-PATH </text:span><text:span text:style-name="T109">主要功能」→ </text:span><text:span text:style-name="T519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<text:span text:style-name="T516">Local Preference</text:span></text:p>
          </table:table-cell>
          <table:table-cell table:style-name="表格94.A3" office:value-type="string">
            <text:p text:style-name="P26"><text:span text:style-name="T528">數值越大越優先</text:span>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8">通用屬性中最重要！</text:span><text:span text:style-name="T109">是</text:span><text:span text:style-name="T522"> </text:span><text:span text:style-name="T523">AS </text:span><text:span text:style-name="T522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5"><text:span text:style-name="T516">AS-PATH</text:span><text:span text:style-name="T524">（</text:span><text:span text:style-name="T525">長度</text:span><text:span text:style-name="T524">）</text:span></text:p>
          </table:table-cell>
          <table:table-cell table:style-name="表格94.A2" office:value-type="string">
            <text:p text:style-name="P27"><text:span text:style-name="T529">路徑越短（經過 </text:span><text:span text:style-name="T530">AS </text:span><text:span text:style-name="T529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521">但要先比 </text:span><text:span text:style-name="T520">Weight</text:span><text:span text:style-name="T521">、</text:span><text:span text:style-name="T520">Local Pref</text:span><text:span text:style-name="T521">，前面平手才輪到它</text:span><text:span text:style-name="T109">——</text:span><text:span text:style-name="T531">別誤以為 </text:span><text:span text:style-name="T532">AS-PATH </text:span><text:span text:style-name="T531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<text:span text:style-name="T516">MED</text:span></text:p>
          </table:table-cell>
          <table:table-cell table:style-name="表格94.A3" office:value-type="string">
            <text:p text:style-name="P28"><text:span text:style-name="T529">數值越小越優先</text:span></text:p>
          </table:table-cell>
          <table:table-cell table:style-name="表格94.A3" office:value-type="string">
            <text:p text:style-name="P20" loext:marker-style-name="T106"><text:span text:style-name="T522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<text:span text:style-name="T516">eBGP vs iBGP</text:span></text:p>
          </table:table-cell>
          <table:table-cell table:style-name="表格94.A2" office:value-type="string">
            <text:p text:style-name="P29"><text:span text:style-name="T530">eBGP </text:span><text:span text:style-name="T529">優先於 </text:span><text:span text:style-name="T530">iBGP</text:span></text:p>
          </table:table-cell>
          <table:table-cell table:style-name="表格94.A2" office:value-type="string">
            <text:p text:style-name="P20" loext:marker-style-name="T106"><text:span text:style-name="T519">eBGP</text:span><text:span text:style-name="T109">＝外面直接告訴你；</text:span><text:span text:style-name="T519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5"><text:span text:style-name="T516">MED</text:span><text:span text:style-name="T524">（比較範圍）</text:span></text:p>
          </table:table-cell>
          <table:table-cell table:style-name="表格94.A3" office:value-type="string">
            <text:p text:style-name="P30"><text:span text:style-name="T529">只比較同一個「來源 </text:span><text:span text:style-name="T530">AS</text:span><text:span text:style-name="T529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533"> </text:span><text:span text:style-name="T534">不同 </text:span><text:span text:style-name="T535">AS </text:span><text:span text:style-name="T534">的 </text:span><text:span text:style-name="T535">MED </text:span><text:span text:style-name="T534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<text:span text:style-name="T516">Weight</text:span></text:p>
          </table:table-cell>
          <table:table-cell table:style-name="表格94.A2" office:value-type="string">
            <text:p text:style-name="P20" loext:marker-style-name="T106"><text:span text:style-name="T536">Cisco </text:span><text:span text:style-name="T537">私有</text:span><text:span text:style-name="T109">，</text:span><text:span text:style-name="T538">非 </text:span><text:span text:style-name="T539">BGP </text:span><text:span text:style-name="T538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9">BGP </text:span><text:span text:style-name="T109">標準屬性」選項別選 </text:span><text:span text:style-name="T519">Weight</text:span><text:span text:style-name="T109">（</text:span><text:span text:style-name="T519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42">BGP</text:span><text:span text:style-name="T20">＝</text:span><text:span text:style-name="T42">TCP 179</text:span><text:span text:style-name="T20">、</text:span><text:span text:style-name="T42">Path Vector</text:span><text:span text:style-name="T20">｜</text:span><text:span text:style-name="T42">AS-PATH</text:span><text:span text:style-name="T20">：防迴圈＋越短越好｜</text:span><text:span text:style-name="T42">Local Preference</text:span><text:span text:style-name="T20">：越大越好｜</text:span><text:span text:style-name="T42">MED</text:span><text:span text:style-name="T20">：越小越好＋只比同 </text:span><text:span text:style-name="T42">AS</text:span><text:span text:style-name="T20">｜</text:span><text:span text:style-name="T42">eBGP &gt; iBGP</text:span><text:span text:style-name="T20">｜</text:span><text:span text:style-name="T42">Weight</text:span><text:span text:style-name="T20">：</text:span><text:span text:style-name="T42">Cisco </text:span><text:span text:style-name="T20">私有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AS-PATH </text:span><text:span text:style-name="T250">是 </text:span><text:span text:style-name="T433">BGP </text:span><text:span text:style-name="T250">選路最重要的屬性　→　</text:span><text:span text:style-name="T20">✓ </text:span><text:span text:style-name="T42">Local Preference </text:span><text:span text:style-name="T20">才是最重要的通用屬性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AS-PATH </text:span><text:span text:style-name="T250">越短就一定會選那條　→　</text:span><text:span text:style-name="T20">✓ 只有前面的屬性（</text:span><text:span text:style-name="T42">Local Pref </text:span><text:span text:style-name="T20">等）完全相同時，才會比較 </text:span><text:span text:style-name="T42">AS-PATH</text:span><text:span text:style-name="T20">。</text:span></text:p>
            <text:p text:style-name="P12"><text:span text:style-name="T433">✗ BGP </text:span><text:span text:style-name="T250">會自己計算最短路徑　→　</text:span><text:span text:style-name="T20">✓ </text:span><text:span text:style-name="T42">BGP </text:span><text:span text:style-name="T20">不算距離，</text:span><text:span text:style-name="T42">OSPF </text:span><text:span text:style-name="T20">才做最短路徑計算。</text:span></text:p>
            <text:p text:style-name="P12"><text:span text:style-name="T433">✗ iBGP </text:span><text:span text:style-name="T250">比 </text:span><text:span text:style-name="T433">eBGP </text:span><text:span text:style-name="T250">優先　→　</text:span><text:span text:style-name="T20">✓ </text:span><text:span text:style-name="T42">eBGP </text:span><text:span text:style-name="T20">優先於 </text:span><text:span text:style-name="T42">iBGP</text:span><text:span text:style-name="T20">（外部路由更可信）。</text:span></text:p>
            <text:p text:style-name="P12"><text:span text:style-name="T433">✗ MED </text:span><text:span text:style-name="T250">可以跨不同 </text:span><text:span text:style-name="T433">AS </text:span><text:span text:style-name="T250">互相比較　→　</text:span><text:span text:style-name="T20">✓ </text:span><text:span text:style-name="T42">MED </text:span><text:span text:style-name="T20">只能比較來自同一個 </text:span><text:span text:style-name="T42">AS </text:span><text:span text:style-name="T20">的路由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你的電腦要連到健保署，有兩條對外線路（中華電信 </text:span><text:span text:style-name="T42">AS-PATH </text:span><text:span text:style-name="T20">長度 </text:span><text:span text:style-name="T42">2</text:span><text:span text:style-name="T20">、台灣固網 </text:span><text:span text:style-name="T42">AS-PATH </text:span><text:span text:style-name="T20">長度 </text:span><text:span text:style-name="T42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09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09">防火牆 </text:span><text:span text:style-name="T108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NAT</text:span><text:span text:style-name="T106"/></text:p>
          </table:table-cell>
          <table:table-cell table:style-name="表格96.A2" office:value-type="string">
            <text:p text:style-name="P20" loext:marker-style-name="T106"><text:span text:style-name="T109">把私有 </text:span><text:span text:style-name="T108">IP </text:span><text:span text:style-name="T109">換成公網 </text:span><text:span text:style-name="T108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BGP </text:span><text:span text:style-name="T109">選路</text:span></text:p>
          </table:table-cell>
          <table:table-cell table:style-name="表格96.A3" office:value-type="string">
            <text:p text:style-name="P20" loext:marker-style-name="T106"><text:span text:style-name="T109">比條件：若相同選 </text:span><text:span text:style-name="T108">AS-PATH </text:span><text:span text:style-name="T109">較短路</text:span><text:span text:style-name="T108">1</text:span><text:span text:style-name="T109">；若中華電信 </text:span><text:span text:style-name="T108">Local Pref </text:span><text:span text:style-name="T109">較高則不管長短走路</text:span><text:span text:style-name="T108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09">出 </text:span><text:span text:style-name="T108">ISP </text:span><text:span text:style-name="T109">跨 </text:span><text:span text:style-name="T108">AS</text:span></text:p>
          </table:table-cell>
          <table:table-cell table:style-name="表格96.A2" office:value-type="string">
            <text:p text:style-name="P20" loext:marker-style-name="T106"><text:span text:style-name="T109">封包經過多個 </text:span><text:span text:style-name="T108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167">BGP → </text:span><text:span text:style-name="T20">決定「要怎麼走」</text:span></text:p>
            <text:p text:style-name="P12" loext:marker-style-name="T21"><text:span text:style-name="T20">生活比喻：海關（防火牆）→ 換護照</text:span><text:span text:style-name="T42">/</text:span><text:span text:style-name="T20">身份（</text:span><text:span text:style-name="T42">NAT</text:span><text:span text:style-name="T20">）→ 選航班（</text:span><text:span text:style-name="T42">BGP</text:span><text:span text:style-name="T20">）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433">✗ </text:span><text:span text:style-name="T250">封包送不出去 → 一定是 </text:span><text:span text:style-name="T433">BGP </text:span><text:span text:style-name="T250">問題　→　</text:span><text:span text:style-name="T20">✓ 應依序排查：防火牆有沒有擋？</text:span><text:span text:style-name="T42">NAT </text:span><text:span text:style-name="T20">有沒有設？</text:span><text:span text:style-name="T42">BGP </text:span><text:span text:style-name="T20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250">走到錯誤的 </text:span><text:span text:style-name="T433">ISP → </text:span><text:span text:style-name="T250">是 </text:span><text:span text:style-name="T433">NAT </text:span><text:span text:style-name="T250">設定問題　→　</text:span><text:span text:style-name="T20">✓ 走到錯誤 </text:span><text:span text:style-name="T42">ISP </text:span><text:span text:style-name="T20">是 </text:span><text:span text:style-name="T42">BGP </text:span><text:span text:style-name="T20">選路問題（</text:span><text:span text:style-name="T42">Local Pref </text:span><text:span text:style-name="T20">或 </text:span><text:span text:style-name="T42">AS-PATH </text:span><text:span text:style-name="T20">設定不對）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42">SDN</text:span><text:span text:style-name="T20">（</text:span><text:span text:style-name="T42">Software Defined Networking</text:span><text:span text:style-name="T20">）的核心概念是：將「控制平面」與「資料平面」分離。傳統網路中路由器和交換器同時負責「決定資料走哪條路」和「實際傳送資料」，</text:span><text:span text:style-name="T42">SDN </text:span><text:span text:style-name="T20">則把「決策」抽出來交給集中式的 </text:span><text:span text:style-name="T42">Controller </text:span><text:span text:style-name="T20">統一管理。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168">控制平面（</text:span><text:span text:style-name="T167">Control Plane</text:span><text:span text:style-name="T168">）：</text:span><text:span text:style-name="T20">決定資料「怎麼走」——負責路由決策的大腦。</text:span></text:p>
            <text:p text:style-name="P12"><text:span text:style-name="T168">資料平面（</text:span><text:span text:style-name="T167">Data Plane</text:span><text:span text:style-name="T168">）：</text:span><text:span text:style-name="T20">負責資料「實際傳送」——執行指令的手腳。</text:span></text:p>
            <text:p text:style-name="P12"><text:span text:style-name="T167">🔑 </text:span><text:span text:style-name="T168">關鍵：</text:span><text:span text:style-name="T20">兩者分離，是 </text:span><text:span text:style-name="T42">SDN </text:span><text:span text:style-name="T20">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20" loext:marker-style-name="T106"><text:span text:style-name="T108">🟦 Application Layer </text:span><text:span text:style-name="T109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20" loext:marker-style-name="T106"><text:span text:style-name="T108">🟨 Control Layer </text:span><text:span text:style-name="T109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20" loext:marker-style-name="T106"><text:span text:style-name="T108">🟩 Infrastructure Layer </text:span><text:span text:style-name="T109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分平面＝控制／資料分離；三層＝</text:span><text:span text:style-name="T42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把流量「智慧分配」到多台伺服器，確保每台都不過載。</text:span><text:span text:style-name="T21"/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Round Robin</text:span><text:span text:style-name="T109">（輪詢）</text:span></text:p>
          </table:table-cell>
          <table:table-cell table:style-name="表格99.A2" office:value-type="string">
            <text:p text:style-name="P20" loext:marker-style-name="T106"><text:span text:style-name="T109">依序輪流分配，不考慮伺服器效能或負載</text:span><text:span text:style-name="T106"/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Weighted Round Robin</text:span><text:span text:style-name="T109">（加權輪詢）</text:span></text:p>
          </table:table-cell>
          <table:table-cell table:style-name="表格99.A3" office:value-type="string">
            <text:p text:style-name="P20" loext:marker-style-name="T106"><text:span text:style-name="T109">依各伺服器處理能力設「權重」，能力強分到更多</text:span><text:span text:style-name="T106"/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Session Stickiness</text:span><text:span text:style-name="T109">（會話黏著）</text:span></text:p>
          </table:table-cell>
          <table:table-cell table:style-name="表格99.A2" office:value-type="string">
            <text:p text:style-name="P20" loext:marker-style-name="T106"><text:span text:style-name="T109">同一使用者所有請求固定導向同一台，維持連線狀態</text:span><text:span text:style-name="T106"/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LB </text:span><text:span text:style-name="T20">輪、重、黏」→ 輪＝</text:span><text:span text:style-name="T42">Round Robin</text:span><text:span text:style-name="T20">（輪流）；重＝</text:span><text:span text:style-name="T42">Weighted RR</text:span><text:span text:style-name="T20">（加權）；黏＝</text:span><text:span text:style-name="T42">Stickiness</text:span><text:span text:style-name="T20">（固定同一台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內容傳遞網路）</text:span></text:h>
      <text:p text:style-name="P22" loext:marker-style-name="T21"><text:span text:style-name="T42">CDN</text:span><text:span text:style-name="T20">（</text:span><text:span text:style-name="T42">Content Delivery Network</text:span><text:span text:style-name="T20">）透過在全球各地部署「邊緣伺服器（</text:span><text:span text:style-name="T42">Edge Server</text:span><text:span text:style-name="T20">）」加速內容傳遞。當你開啟 </text:span><text:span text:style-name="T42">Google </text:span><text:span text:style-name="T20">或 </text:span><text:span text:style-name="T42">YouTube</text:span><text:span text:style-name="T20">，不需跨越太平洋連到美國總部，而是連到你附近的 </text:span><text:span text:style-name="T42">CDN </text:span><text:span text:style-name="T20">節點，大</text:span><text:soft-page-break/><text:span text:style-name="T20">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20">使用者輸入網址（</text:span><text:span text:style-name="T42">www.example.com</text:span><text:span text:style-name="T20">）</text:span></text:p>
            <text:p text:style-name="P12" loext:marker-style-name="T21"><text:span text:style-name="T42">Step 2 DNS </text:span><text:span text:style-name="T20">解析網址，找到對應 </text:span><text:span text:style-name="T42">CDN </text:span><text:span text:style-name="T20">的 </text:span><text:span text:style-name="T42">CNAME </text:span><text:span text:style-name="T20">記錄</text:span></text:p>
            <text:p text:style-name="P12" loext:marker-style-name="T21"><text:span text:style-name="T42">Step 3 CNAME </text:span><text:span text:style-name="T20">將請求轉向 </text:span><text:span text:style-name="T42">CDN </text:span><text:span text:style-name="T20">服務商（如 </text:span><text:span text:style-name="T42">cdn.example.net</text:span><text:span text:style-name="T20">）</text:span></text:p>
            <text:p text:style-name="P12" loext:marker-style-name="T21"><text:span text:style-name="T42">Step 4 CDN </text:span><text:span text:style-name="T20">根據使用者地理位置，選擇最近的 </text:span><text:span text:style-name="T42">Edge </text:span><text:span text:style-name="T20">伺服器</text:span></text:p>
            <text:p text:style-name="P12" loext:marker-style-name="T21"><text:span text:style-name="T42">Step 5 Edge </text:span><text:span text:style-name="T20">伺服器將快取內容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16">DNS </text:span><text:span text:style-name="T15">的一種記錄，作用是「網址指向另一個網址」（不是 </text:span><text:span text:style-name="T16">IP</text:span><text:span text:style-name="T15">）。範例：</text:span><text:span text:style-name="T16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15">部署在全球各地靠近使用者的伺服器，負責快取並就近回應請求，大幅減少延遲。</text:span><text:span text:style-name="T14"/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42">CNAME</text:span><text:span text:style-name="T20">＝網址→網址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09">高速傳輸（</text:span><text:span text:style-name="T108">eMBB</text:span><text:span text:style-name="T109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09">超低延遲（</text:span><text:span text:style-name="T108">URLLC</text:span><text:span text:style-name="T109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09">大量連線（</text:span><text:span text:style-name="T108">mMTC</text:span><text:span text:style-name="T109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可連數百萬台裝置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09">網路切片（</text:span><text:span text:style-name="T108">Network Slicing</text:span><text:span text:style-name="T109">）</text:span></text:p>
          </table:table-cell>
          <table:table-cell table:style-name="表格101.A3" office:value-type="string">
            <text:p text:style-name="P20" loext:marker-style-name="T106"><text:span text:style-name="T109">將同一物理網路虛擬化為多個獨立「切片」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5G </text:span><text:span text:style-name="T20">快、低、多、切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靠近使用者的 </text:span><text:span text:style-name="T108">Edge </text:span><text:span text:style-name="T109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108">CNAME = </text:span><text:span text:style-name="T109">網址 → 網址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08">WiFi </text:span><text:span text:style-name="T109">用 </text:span><text:span text:style-name="T108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oft-page-break/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用無線電波傳資料，若同時傳訊號會「撞在一起」。這個「決定誰先傳」的規則，就叫 </text:span><text:span text:style-name="T42">MAC </text:span><text:span text:style-name="T20">機制（</text:span><text:span text:style-name="T42">Media Access Control</text:span><text:span text:style-name="T20">）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34">WiFi</text:span><text:span text:style-name="T35">：先聽再講（</text:span><text:span text:style-name="T34">CSMA/CA</text:span><text:span text:style-name="T35">）</text:span></text:h>
      <text:p text:style-name="P22" loext:marker-style-name="T21"><text:span text:style-name="T42">WiFi </text:span><text:span text:style-name="T20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0" loext:marker-style-name="T14"><text:span text:style-name="T16">Carrier Sense </text:span><text:span text:style-name="T15">載波感測</text:span></text:p>
          </table:table-cell>
          <table:table-cell table:style-name="表格104.A2" office:value-type="string">
            <text:p text:style-name="P20" loext:marker-style-name="T14"><text:span text:style-name="T15">先聽頻道有沒有人在用</text:span><text:span text:style-name="T14"/></text:p>
          </table:table-cell>
        </table:table-row>
        <table:table-row table:style-name="表格104.1">
          <table:table-cell table:style-name="表格104.A3" office:value-type="string">
            <text:p text:style-name="P20" loext:marker-style-name="T14"><text:span text:style-name="T16">Multiple Access </text:span><text:span text:style-name="T15">多重存取</text:span></text:p>
          </table:table-cell>
          <table:table-cell table:style-name="表格104.A3" office:value-type="string">
            <text:p text:style-name="P20" loext:marker-style-name="T14"><text:span text:style-name="T15">大家共用同一個頻道</text:span><text:span text:style-name="T14"/></text:p>
          </table:table-cell>
        </table:table-row>
        <table:table-row table:style-name="表格104.1">
          <table:table-cell table:style-name="表格104.A2" office:value-type="string">
            <text:p text:style-name="P20" loext:marker-style-name="T14"><text:span text:style-name="T16">Collision Avoidance </text:span><text:span text:style-name="T15">碰撞避免</text:span></text:p>
          </table:table-cell>
          <table:table-cell table:style-name="表格104.A2" office:value-type="string">
            <text:p text:style-name="P20" loext:marker-style-name="T14"><text:span text:style-name="T15">盡量「避免」訊號互撞（而非偵測後再處理）</text:span><text:span text:style-name="T14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40">WiFi </text:span><text:span text:style-name="T541">高速基礎</text:span></text:p>
            <text:p text:style-name="P11" loext:marker-style-name="T21"><text:span text:style-name="T20">另：</text:span><text:span text:style-name="T42">OFDM</text:span><text:span text:style-name="T20">（正交分頻多工）— 將資料分成多個子頻道同時傳輸，讓頻寬利用率大幅提升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20">當很多人在搶頻道，某些資料（語音、視訊）需要優先通過，這就是 </text:span><text:span text:style-name="T42">EDCA</text:span><text:span text:style-name="T20">（</text:span><text:span text:style-name="T42">Enhanced Distributed Channel Access</text:span><text:span text:style-name="T20">）的功能。視訊通話</text:span><text:span text:style-name="T42">/</text:span><text:span text:style-name="T20">語音→少等、優先傳；網頁</text:span><text:span text:style-name="T42">/</text:span><text:span text:style-name="T20">大檔下載→稍微等一下也沒關係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Bluetooth</text:span><text:span text:style-name="T35">：老大排班（</text:span><text:span text:style-name="T34">Master-Slave</text:span><text:span text:style-name="T35">）</text:span></text:h>
      <text:p text:style-name="P22" loext:marker-style-name="T21"><text:span text:style-name="T42">Bluetooth </text:span><text:span text:style-name="T20">不靠「搶」，而是由 </text:span><text:span text:style-name="T42">Master </text:span><text:span text:style-name="T20">統一分配時間，</text:span><text:span text:style-name="T42">Slave </text:span><text:span text:style-name="T20">照順序傳資料（</text:span><text:span text:style-name="T42">0~1ms </text:span><text:span text:style-name="T20">耳機、</text:span><text:span text:style-name="T42">1~2ms </text:span><text:span text:style-name="T20">滑鼠、</text:span><text:span text:style-name="T42">2~3ms </text:span><text:span text:style-name="T20">鍵盤、</text:span><text:span text:style-name="T42">3~4ms </text:span><text:span text:style-name="T20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41">為什麼要排班？</text:span></text:p>
            <text:p text:style-name="P11" loext:marker-style-name="T21"><text:span text:style-name="T20">因為藍牙裝置大多是「即時設備」，延遲太久就沒用了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42">WiFi = </text:span><text:span text:style-name="T20">菜市場（自由競爭，亂搶）；</text:span><text:span text:style-name="T42">Bluetooth = </text:span><text:span text:style-name="T20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20" loext:marker-style-name="T14"><text:span text:style-name="T16">SCO</text:span><text:span text:style-name="T14"/>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20" loext:marker-style-name="T14"><text:span text:style-name="T16">e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text:s/></text:span><text:span text:style-name="T540">Bluetooth </text:span><text:span text:style-name="T541">抗干擾</text:span></text:p>
            <text:p text:style-name="P11" loext:marker-style-name="T21"><text:span text:style-name="T20">另：</text:span><text:span text:style-name="T42">FHSS</text:span><text:span text:style-name="T20">（跳頻展頻）— 在 </text:span><text:span text:style-name="T42">2.4GHz </text:span><text:span text:style-name="T20">頻段中每秒快速切換數百次（每秒約 </text:span><text:span text:style-name="T42">1600 </text:span><text:span text:style-name="T20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藍牙頻道像一條只有一個人能講話的走廊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42">Time Slot</text:span><text:span text:style-name="T20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0" loext:marker-style-name="T14"><text:span text:style-name="T15">核心機制</text:span><text:span text:style-name="T14"/></text:p>
          </table:table-cell>
          <table:table-cell table:style-name="表格107.A2" office:value-type="string">
            <text:p text:style-name="P20" loext:marker-style-name="T14"><text:span text:style-name="T16">CSMA/CA</text:span><text:span text:style-name="T15">（先偵聽再傳）</text:span></text:p>
          </table:table-cell>
          <table:table-cell table:style-name="表格107.A2" office:value-type="string">
            <text:p text:style-name="P20" loext:marker-style-name="T14"><text:span text:style-name="T16">Master-Slave</text:span><text:span text:style-name="T15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即時語音 </text:span><text:span text:style-name="T16">/ QoS</text:span></text:p>
          </table:table-cell>
          <table:table-cell table:style-name="表格107.A3" office:value-type="string">
            <text:p text:style-name="P20" loext:marker-style-name="T14"><text:span text:style-name="T16">EDCA</text:span><text:span text:style-name="T15">（</text:span><text:span text:style-name="T16">QoS </text:span><text:span text:style-name="T15">優先）</text:span></text:p>
          </table:table-cell>
          <table:table-cell table:style-name="表格107.A3" office:value-type="string">
            <text:p text:style-name="P20" loext:marker-style-name="T14"><text:span text:style-name="T16">SCO / eSCO</text:span><text:span text:style-name="T15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20" loext:marker-style-name="T14"><text:span text:style-name="T15">受干擾影響較大</text:span><text:span text:style-name="T14"/></text:p>
          </table:table-cell>
          <table:table-cell table:style-name="表格107.A3" office:value-type="string">
            <text:p text:style-name="P20" loext:marker-style-name="T14"><text:span text:style-name="T15">固定時槽非常穩定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4">L2CAP</text:span><text:span text:style-name="T35">：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負責：管理並分流不同類型的資料（語音、檔案、控制指令）；建立、管理、釋放「邏輯通道」；提供 </text:span><text:span text:style-name="T42">QoS </text:span><text:span text:style-name="T20">服務品質保證。一句話記憶：</text:span><text:span text:style-name="T42">L2CAP </text:span><text:span text:style-name="T20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邏輯通道</text:span><text:span text:style-name="T104"/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0" loext:marker-style-name="T106"><text:span text:style-name="T108">Connection-oriented</text:span><text:span text:style-name="T109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09">有建立連線、雙方確認，可靠、確保收到</text:span><text:span text:style-name="T106"/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0" loext:marker-style-name="T106"><text:span text:style-name="T108">Connectionless</text:span><text:span text:style-name="T109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09">直接送出、不確認，快速但可能遺失</text:span><text:span text:style-name="T106"/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0" loext:marker-style-name="T106"><text:span text:style-name="T108">Signaling Channel</text:span><text:span text:style-name="T109">（信令通道）</text:span></text:p>
          </table:table-cell>
          <table:table-cell table:style-name="表格108.A2" table:number-columns-spanned="2" office:value-type="string">
            <text:p text:style-name="P20" loext:marker-style-name="T106"><text:span text:style-name="T109">控制管理用，不傳資料只管控制</text:span><text:span text:style-name="T106"/></text:p>
          </table:table-cell>
          <table:covered-table-cell/>
          <table:table-cell table:style-name="表格108.A2" office:value-type="string">
            <text:p text:style-name="P20" loext:marker-style-name="T106"><text:span text:style-name="T109">建立</text:span><text:span text:style-name="T108">/</text:span><text:span text:style-name="T109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42">L2CAP </text:span><text:span text:style-name="T20">主要位於「資料鏈結層（</text:span><text:span text:style-name="T42">Data Link Layer</text:span><text:span text:style-name="T20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0" loext:marker-style-name="T14"><text:span text:style-name="T16">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傳統防火牆，只看封包「外面」的 </text:span><text:span text:style-name="T16">IP</text:span><text:span text:style-name="T15">、</text:span><text:span text:style-name="T16">Port</text:span><text:span text:style-name="T15">、</text:span><text:span text:style-name="T16">Protocol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WAF</text:span><text:span text:style-name="T14"/></text:p>
          </table:table-cell>
          <table:table-cell table:style-name="表格111.A3" office:value-type="string">
            <text:p text:style-name="P20" loext:marker-style-name="T14"><text:span text:style-name="T15">網站應用防火牆，會打開封包「裡面」，防 </text:span><text:span text:style-name="T16">SQL Injection</text:span><text:span text:style-name="T15">、</text:span><text:span text:style-name="T16">XSS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NG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次世代防火牆，比 </text:span><text:span text:style-name="T16">FW </text:span><text:span text:style-name="T15">更聰明，有 </text:span><text:span text:style-name="T16">DPI </text:span><text:span text:style-name="T15">深度檢查、</text:span><text:span text:style-name="T16">IPS</text:span><text:span text:style-name="T15">、</text:span><text:span text:style-name="T16">App </text:span><text:span text:style-name="T15">識別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DMZ</text:span><text:span text:style-name="T14"/></text:p>
          </table:table-cell>
          <table:table-cell table:style-name="表格111.A3" office:value-type="string">
            <text:p text:style-name="P20" loext:marker-style-name="T14"><text:span text:style-name="T15">隔離區，把對外服務（</text:span><text:span text:style-name="T16">Web</text:span><text:span text:style-name="T15">、</text:span><text:span text:style-name="T16">Mail</text:span><text:span text:style-name="T15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IOC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入侵指標（攻擊事後證據）：</text:span><text:span text:style-name="T16">Domain</text:span><text:span text:style-name="T15">（網）、</text:span><text:span text:style-name="T16">Hash</text:span><text:span text:style-name="T15">（檔）、</text:span><text:span text:style-name="T16">IP</text:span><text:span text:style-name="T15">（連）、</text:span><text:span text:style-name="T16">C2</text:span><text:span text:style-name="T15">（控）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Proxy</text:span><text:span text:style-name="T14"/></text:p>
          </table:table-cell>
          <table:table-cell table:style-name="表格111.A3" office:value-type="string">
            <text:p text:style-name="P20" loext:marker-style-name="T14"><text:span text:style-name="T15">正向代理，幫「使用者（</text:span><text:span text:style-name="T16">Client</text:span><text:span text:style-name="T15">）」隱藏 </text:span><text:span text:style-name="T16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Reverse Proxy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反向代理，幫「伺服器（</text:span><text:span text:style-name="T16">Server</text:span><text:span text:style-name="T15">）」負載平衡、隱藏主機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防火牆 </text:span><text:span text:style-name="T37">Firewall</text:span><text:span text:style-name="T38">（</text:span><text:span text:style-name="T37">FW</text:span><text:span text:style-name="T38">）</text:span></text:h>
      <text:p text:style-name="P22" loext:marker-style-name="T21"><text:span text:style-name="T20">最基本的網路防護設備，像公司門口的警衛。只看封包的「外部資訊」：</text:span><text:span text:style-name="T42">IP </text:span><text:span text:style-name="T20">位址（來者是誰）、</text:span><text:span text:style-name="T42">Port</text:span><text:span text:style-name="T20">（從哪個門進來）、</text:span><text:span text:style-name="T42">Protocol</text:span><text:span text:style-name="T20">（什麼類型）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網站應用防火牆 </text:span><text:span text:style-name="T37">WAF</text:span></text:h>
      <text:p text:style-name="P22" loext:marker-style-name="T21"><text:span text:style-name="T20">進階版防護，會「打開包包檢查內容」，專門防禦網站層面的攻擊：</text:span><text:span text:style-name="T42">SQL Injection</text:span><text:span text:style-name="T20">（注入惡意 </text:span><text:span text:style-name="T42">SQL </text:span><text:span text:style-name="T20">竊取資料庫）、</text:span><text:span text:style-name="T42">XSS</text:span><text:span text:style-name="T20">（插入惡意 </text:span><text:span text:style-name="T42">JavaScript</text:span><text:span text:style-name="T20">）、其他 </text:span><text:span text:style-name="T42">HTTP </text:span><text:span text:style-name="T20">層攻擊（</text:span><text:span text:style-name="T42">CSRF</text:span><text:span text:style-name="T20">、</text:span><text:span text:style-name="T42">Path Traversal</text:span><text:span text:style-name="T20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FW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WAF</text:span><text:span text:style-name="T12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20" loext:marker-style-name="T14"><text:span text:style-name="T15">封包外面（</text:span><text:span text:style-name="T16">IP/Port</text:span><text:span text:style-name="T15">）</text:span></text:p>
          </table:table-cell>
          <table:table-cell table:style-name="表格113.A2" office:value-type="string">
            <text:p text:style-name="P20" loext:marker-style-name="T14"><text:span text:style-name="T15">封包裡面（</text:span><text:span text:style-name="T16">HTTP </text:span><text:span text:style-name="T15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次世代防火牆 </text:span><text:span text:style-name="T37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42">DPI</text:span><text:span text:style-name="T20">（深度封包檢測）、</text:span><text:span text:style-name="T42">IPS</text:span><text:span text:style-name="T20">（入侵防禦）、</text:span><text:span text:style-name="T42">App </text:span><text:span text:style-name="T20">識別（知道你在用 </text:span><text:span text:style-name="T42">LINE </text:span><text:span text:style-name="T20">還是 </text:span><text:span text:style-name="T42">YouTube</text:span><text:span text:style-name="T20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專門放置需要對外公開的服務。生活比喻：</text:span><text:span text:style-name="T42">DMZ</text:span><text:span text:style-name="T20">＝大樓門口的接待室，訪客只能到接待室、無法進入辦公室；就算接待室被搗亂，也不影響裡面的員工與機密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42">IOC </text:span><text:span text:style-name="T20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網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Domain</text:span><text:span text:style-name="T109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檔</text:span><text:span text:style-name="T66"/></text:p>
          </table:table-cell>
          <table:table-cell table:style-name="表格116.A4" office:value-type="string">
            <text:p text:style-name="P20" loext:marker-style-name="T106"><text:span text:style-name="T109">惡意 </text:span><text:span text:style-name="T108">Hash</text:span><text:span text:style-name="T109">（雜湊值）</text:span></text:p>
          </table:table-cell>
          <table:table-cell table:style-name="表格116.A4" office:value-type="string">
            <text:p text:style-name="P20" loext:marker-style-name="T106"><text:span text:style-name="T109">惡意程式的唯一特徵碼，改檔名也能識別</text:span><text:span text:style-name="T106"/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連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IP </text:span><text:span text:style-name="T109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控</text:span><text:span text:style-name="T66"/></text:p>
          </table:table-cell>
          <table:table-cell table:style-name="表格116.A4" office:value-type="string">
            <text:p text:style-name="P20" loext:marker-style-name="T106"><text:span text:style-name="T108">C2 Server</text:span><text:span text:style-name="T109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 </text:span><text:span text:style-name="T20">駭客準備：建立釣魚網站（</text:span><text:span text:style-name="T42">Domain</text:span><text:span text:style-name="T20">）、製作惡意程式（</text:span><text:span text:style-name="T42">Hash</text:span><text:span text:style-name="T20">）、架設控制中心（</text:span><text:span text:style-name="T42">C2</text:span><text:span text:style-name="T20">）→ ② 發動攻擊：受害者點釣魚網站 → 下載惡意程式 → ③ 主機感染：電腦自動連回駭客主機（</text:span><text:span text:style-name="T42">IP</text:span><text:span text:style-name="T20">）或 </text:span><text:span text:style-name="T42">C2 → ④ </text:span><text:span text:style-name="T20">駭客控制：下指令、偷資料、橫向移動 → ⑤ 資安系統偵測：比對異常 </text:span><text:span text:style-name="T42">IP</text:span><text:span text:style-name="T20">、惡意 </text:span><text:span text:style-name="T42">Domain</text:span><text:span text:style-name="T20">、已知 </text:span><text:span text:style-name="T42">Hash</text:span><text:span text:style-name="T20">、</text:span><text:span text:style-name="T42">C2 </text:span><text:span text:style-name="T20">行為 → ⑥ 判定中毒 → </text:span><text:span text:style-name="T42">IOC </text:span><text:span text:style-name="T20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隱藏使用者真實 </text:span><text:span text:style-name="T16">IP</text:span><text:span text:style-name="T15">、</text:span><text:span text:style-name="T16">Cache </text:span><text:span text:style-name="T15">加速、企業控管員工能存取哪些網站。比喻：</text:span><text:soft-page-break/><text:span text:style-name="T15">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隱藏後端伺服器、</text:span><text:span text:style-name="T16">SSL </text:span><text:span text:style-name="T15">終止與安全防護。比喻：公</text:span><text:soft-page-break/><text:span text:style-name="T15">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20">使用者（</text:span><text:span text:style-name="T42">Client</text:span><text:span text:style-name="T20">）→ 🔵 </text:span><text:span text:style-name="T42">Proxy</text:span><text:span text:style-name="T20">（選用，隱藏 </text:span><text:span text:style-name="T42">IP/</text:span><text:span text:style-name="T20">上網控管）→ 🌍 </text:span><text:span text:style-name="T42">Internet → 🔥 FW/NGFW</text:span><text:span text:style-name="T20">（第一道防線，過濾 </text:span><text:span text:style-name="T42">IP/Port/</text:span><text:span text:style-name="T20">深度檢查）→ 🏝 </text:span><text:span text:style-name="T42">DMZ</text:span><text:span text:style-name="T20">（</text:span><text:span text:style-name="T42">Web/Mail/DNS </text:span><text:span text:style-name="T20">伺服器）→ 🛡 </text:span><text:span text:style-name="T42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42">Reverse Proxy</text:span><text:span text:style-name="T20">（負載平衡</text:span><text:span text:style-name="T42">/</text:span><text:span text:style-name="T20">隱藏後端）→ 🏢 內部 </text:span><text:span text:style-name="T42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20">把原本只是「資料」的輸入，惡意改造成可執行的「</text:span><text:span text:style-name="T42">SQL </text:span><text:span text:style-name="T20">指令」。</text:span></text:p>
            <text:p text:style-name="P12" loext:marker-style-name="T21"><text:span text:style-name="T20">駭客在帳號欄位輸入：</text:span><text:span text:style-name="T42">' OR 1=1 --</text:span><text:span text:style-name="T20">，拼入後變成：…</text:span><text:span text:style-name="T42">WHERE account='' OR 1=1 -- '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OR 1=1 </text:span><text:span text:style-name="T15">永遠成立，回傳全部使用者 ② </text:span><text:span text:style-name="T16">-- </text:span><text:span text:style-name="T15">把密碼驗證段註解掉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15">把使用者輸入視為「純資料」，不允許改變 </text:span><text:span text:style-name="T16">SQL </text:span><text:span text:style-name="T15">結構；</text:span><text:span text:style-name="T16">SQL </text:span><text:span text:style-name="T15">骨架固定，不因任何輸入而改變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256">防禦核心：</text:span><text:span text:style-name="T542">Prepared Statement</text:span><text:span text:style-name="T256">（預備語句）</text:span></text:p>
            <text:p text:style-name="P11"><text:span text:style-name="T257">概念：</text:span><text:span text:style-name="T20">先把 </text:span><text:span text:style-name="T42">SQL </text:span><text:span text:style-name="T20">骨架「鎖死」，使用者只能填入資料，完全無法修改 </text:span><text:span text:style-name="T42">SQL </text:span><text:span text:style-name="T20">結構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WHERE id='" + input + "'"</text:span><text:span text:style-name="T20">；輸入 </text:span><text:span text:style-name="T42">' OR 1=1 -- → </text:span><text:span text:style-name="T20">結構被竄改。</text:span></text:p>
            <text:p text:style-name="P12" loext:marker-style-name="T21"><text:span text:style-name="T42">✅ </text:span><text:span text:style-name="T20">安全寫法：</text:span><text:span text:style-name="T42">String sql = "SELECT * FROM users WHERE id=?"</text:span><text:span text:style-name="T20">；</text:span><text:span text:style-name="T42">? </text:span><text:span text:style-name="T20">是佔位符，</text:span><text:span text:style-name="T42">input </text:span><text:span text:style-name="T20">被視為純文字，</text:span><text:span text:style-name="T42">' OR 1=1 -- </text:span><text:span text:style-name="T20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Prepared Statement</text:span><text:span text:style-name="T106"/>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09">根本解決方案。</text:span><text:span text:style-name="T108">SQL </text:span><text:span text:style-name="T109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輸入驗證 </text:span><text:span text:style-name="T108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09">過濾或拒絕特殊字元（如單引號），輔助手段，但單靠此法仍可能被繞過。</text:span><text:span text:style-name="T106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WAF</text:span><text:span text:style-name="T109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19.A7" table:number-columns-spanned="2" office:value-type="string">
            <text:p text:style-name="P20" loext:marker-style-name="T106"><text:span text:style-name="T109">資料庫帳號只給應用程式必要的權限，避免帳號被拿下後資料全失。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Zero-Day Attack</text:span><text:span text:style-name="T38">（零時差攻擊）</text:span></text:h>
      <text:p text:style-name="P22" loext:marker-style-name="T21"><text:span text:style-name="T42">Zero-Day </text:span><text:span text:style-name="T20">指一個「尚未被開發商發現或公開」的安全漏洞，在廠商來得及發布修補程式（</text:span><text:span text:style-name="T42">Patch</text:span><text:span text:style-name="T20">）之前，駭客就已利用它展開攻擊。命名由來：「</text:span><text:span text:style-name="T42">Day Zero</text:span><text:span text:style-name="T20">」代表廠商只有 </text:span><text:span text:style-name="T42">0 </text:span><text:span text:style-name="T20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修補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偵測</text:span><text:span text:style-name="T106"/></text:p>
          </table:table-cell>
          <table:table-cell table:style-name="表格120.A5" office:value-type="string">
            <text:p text:style-name="P20" loext:marker-style-name="T106"><text:span text:style-name="T108">IDS / IPS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深度檢查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DPI</text:span><text:span text:style-name="T109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隔離</text:span><text:span text:style-name="T106"/></text:p>
          </table:table-cell>
          <table:table-cell table:style-name="表格120.A5" office:value-type="string">
            <text:p text:style-name="P20" loext:marker-style-name="T106"><text:span text:style-name="T109">網路分段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降低風險</text:span><text:span text:style-name="T106"/></text:p>
          </table:table-cell>
          <table:table-cell table:style-name="表格120.A2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偵測到異常流量後產生警報，不主動攔截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自動阻斷偵測到的攻擊流量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DPI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深入檢查封包內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WAF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專門針對 </text:span><text:span text:style-name="T108">Web </text:span><text:span text:style-name="T109">攻擊（</text:span><text:span text:style-name="T108">SQLi</text:span><text:span text:style-name="T109">、</text:span><text:span text:style-name="T108">XSS</text:span><text:span text:style-name="T109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42">IDS </text:span><text:span text:style-name="T20">只發警報（不攔截）；</text:span><text:span text:style-name="T42">IPS </text:span><text:span text:style-name="T20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 真正防禦是 </text:span><text:span text:style-name="T42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Prepared Statement </text:span><text:span text:style-name="T20">才是正道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👀 IDS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不主動阻擋</text:span><text:span text:style-name="T14"/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🚨 IPS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自動阻擋攻擊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SNMP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控網路設備狀態（</text:span><text:span text:style-name="T16">CPU</text:span><text:span text:style-name="T15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📶 ICMP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20" loext:marker-style-name="T14"><text:span text:style-name="T15">診斷網路連線（</text:span><text:span text:style-name="T16">Ping / Traceroute</text:span><text:span text:style-name="T15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HIDS vs NIDS</text:span><text:span text:style-name="T38">（</text:span><text:span text:style-name="T37">IDS </text:span><text:span text:style-name="T38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/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主機（電腦）內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網路節點（交換器旁）</text:span><text:span text:style-name="T14"/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15">系統 </text:span><text:span text:style-name="T16">Log</text:span><text:span text:style-name="T15">、使用者行為</text:span></text:p>
          </table:table-cell>
          <table:table-cell table:style-name="表格124.A3" office:value-type="string">
            <text:p text:style-name="P20" loext:marker-style-name="T14"><text:span text:style-name="T15">網路封包與流量</text:span><text:span text:style-name="T14"/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42">HIDS </text:span><text:span text:style-name="T20">看主機（</text:span><text:span text:style-name="T42">Log</text:span><text:span text:style-name="T20">）</text:span><text:span text:style-name="T42">· NIDS </text:span><text:span text:style-name="T20">看網路（封包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oft-page-break/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543"><text:span text:style-name="T544">題目</text:span><text:span text:style-name="T543"/></text:p>
            </table:table-cell>
            <table:table-cell table:style-name="表格127.A1" office:value-type="string">
              <text:p text:style-name="P21" loext:marker-style-name="T543"><text:span text:style-name="T544">答案</text:span><text:span text:style-name="T543"/></text:p>
            </table:table-cell>
            <table:table-cell table:style-name="表格127.A1" office:value-type="string">
              <text:p text:style-name="P21" loext:marker-style-name="T543"><text:span text:style-name="T544">解析</text:span><text:span text:style-name="T543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545"><text:span text:style-name="T546">Q1 </text:span><text:span text:style-name="T547">何者負責「過濾進出網路流量」？</text:span></text:p>
          </table:table-cell>
          <table:table-cell table:style-name="表格127.A2" office:value-type="string">
            <text:p text:style-name="P20" loext:marker-style-name="T545"><text:span text:style-name="T546">Firewall</text:span><text:span text:style-name="T545"/></text:p>
          </table:table-cell>
          <table:table-cell table:style-name="表格127.A2" office:value-type="string">
            <text:p text:style-name="P20" loext:marker-style-name="T545"><text:span text:style-name="T546">Firewall </text:span><text:span text:style-name="T547">是網路入口過濾工具，依規則決定放行。</text:span><text:span text:style-name="T546">IDS/IPS </text:span><text:span text:style-name="T547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45"><text:span text:style-name="T546">Q2 IDS </text:span><text:span text:style-name="T547">的主要功能為何？</text:span></text:p>
          </table:table-cell>
          <table:table-cell table:style-name="表格127.A3" office:value-type="string">
            <text:p text:style-name="P20" loext:marker-style-name="T545"><text:span text:style-name="T547">偵測並發出警報</text:span><text:span text:style-name="T545"/></text:p>
          </table:table-cell>
          <table:table-cell table:style-name="表格127.A3" office:value-type="string">
            <text:p text:style-name="P20" loext:marker-style-name="T545"><text:span text:style-name="T546">IDS </text:span><text:span text:style-name="T547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45"><text:span text:style-name="T546">Q3 IPS </text:span><text:span text:style-name="T547">與 </text:span><text:span text:style-name="T546">IDS </text:span><text:span text:style-name="T547">最大差別？</text:span></text:p>
          </table:table-cell>
          <table:table-cell table:style-name="表格127.A2" office:value-type="string">
            <text:p text:style-name="P20" loext:marker-style-name="T545"><text:span text:style-name="T546">IPS </text:span><text:span text:style-name="T547">會阻擋，</text:span><text:span text:style-name="T546">IDS </text:span><text:span text:style-name="T547">不會</text:span></text:p>
          </table:table-cell>
          <table:table-cell table:style-name="表格127.A2" office:value-type="string">
            <text:p text:style-name="P20" loext:marker-style-name="T545"><text:span text:style-name="T546">IPS = IDS </text:span><text:span text:style-name="T547">全功能 </text:span><text:span text:style-name="T546">+ </text:span><text:span text:style-name="T547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45"><text:span text:style-name="T546">Q4 </text:span><text:span text:style-name="T547">何者屬「主機型入侵偵測」？</text:span></text:p>
          </table:table-cell>
          <table:table-cell table:style-name="表格127.A3" office:value-type="string">
            <text:p text:style-name="P20" loext:marker-style-name="T545"><text:span text:style-name="T546">HIDS</text:span><text:span text:style-name="T545"/></text:p>
          </table:table-cell>
          <table:table-cell table:style-name="表格127.A3" office:value-type="string">
            <text:p text:style-name="P20" loext:marker-style-name="T545"><text:span text:style-name="T546">HIDS </text:span><text:span text:style-name="T547">安裝於主機內部，監控 </text:span><text:span text:style-name="T546">Log </text:span><text:span text:style-name="T547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45"><text:span text:style-name="T546">Q5 NIDS </text:span><text:span text:style-name="T547">主要監控什麼？</text:span></text:p>
          </table:table-cell>
          <table:table-cell table:style-name="表格127.A2" office:value-type="string">
            <text:p text:style-name="P20" loext:marker-style-name="T545"><text:span text:style-name="T547">網路封包</text:span><text:span text:style-name="T545"/></text:p>
          </table:table-cell>
          <table:table-cell table:style-name="表格127.A2" office:value-type="string">
            <text:p text:style-name="P20" loext:marker-style-name="T545"><text:span text:style-name="T546">NIDS </text:span><text:span text:style-name="T547">部署在網路節點，分析封包流量；</text:span><text:span text:style-name="T546">HIDS </text:span><text:span text:style-name="T547">才看 </text:span><text:span text:style-name="T546">Log</text:span><text:span text:style-name="T547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45"><text:span text:style-name="T546">Q6 SNMP </text:span><text:span text:style-name="T547">的主要用途？</text:span></text:p>
          </table:table-cell>
          <table:table-cell table:style-name="表格127.A3" office:value-type="string">
            <text:p text:style-name="P20" loext:marker-style-name="T545"><text:span text:style-name="T547">管理網路設備</text:span><text:span text:style-name="T545"/></text:p>
          </table:table-cell>
          <table:table-cell table:style-name="表格127.A3" office:value-type="string">
            <text:p text:style-name="P20" loext:marker-style-name="T545"><text:span text:style-name="T546">SNMP </text:span><text:span text:style-name="T547">監控與管理路由器、交換器狀態（</text:span><text:span text:style-name="T546">CPU</text:span><text:span text:style-name="T547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45"><text:span text:style-name="T546">Q7 ICMP </text:span><text:span text:style-name="T547">常用於哪種工具？</text:span></text:p>
          </table:table-cell>
          <table:table-cell table:style-name="表格127.A2" office:value-type="string">
            <text:p text:style-name="P20" loext:marker-style-name="T545"><text:span text:style-name="T546">Ping</text:span><text:span text:style-name="T545"/></text:p>
          </table:table-cell>
          <table:table-cell table:style-name="表格127.A2" office:value-type="string">
            <text:p text:style-name="P20" loext:marker-style-name="T545"><text:span text:style-name="T546">Ping </text:span><text:span text:style-name="T547">與 </text:span><text:span text:style-name="T546">Traceroute </text:span><text:span text:style-name="T547">都用 </text:span><text:span text:style-name="T546">ICMP </text:span><text:span text:style-name="T547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45"><text:span text:style-name="T546">Q8 ICMP </text:span><text:span text:style-name="T547">屬 </text:span><text:span text:style-name="T546">OSI </text:span><text:span text:style-name="T547">哪一層？</text:span></text:p>
          </table:table-cell>
          <table:table-cell table:style-name="表格127.A3" office:value-type="string">
            <text:p text:style-name="P20" loext:marker-style-name="T545"><text:span text:style-name="T546">Network Layer</text:span><text:span text:style-name="T545"/></text:p>
          </table:table-cell>
          <table:table-cell table:style-name="表格127.A3" office:value-type="string">
            <text:p text:style-name="P20" loext:marker-style-name="T545"><text:span text:style-name="T546">ICMP </text:span><text:span text:style-name="T547">是 </text:span><text:span text:style-name="T546">IP </text:span><text:span text:style-name="T547">的附屬協定，屬網路層；</text:span><text:span text:style-name="T546">SNMP </text:span><text:span text:style-name="T547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545"><text:span text:style-name="T546">Q9 </text:span><text:span text:style-name="T547">何者用 </text:span><text:span text:style-name="T546">UDP </text:span><text:span text:style-name="T547">且屬應用層？</text:span></text:p>
          </table:table-cell>
          <table:table-cell table:style-name="表格127.A2" office:value-type="string">
            <text:p text:style-name="P20" loext:marker-style-name="T545"><text:span text:style-name="T546">SNMP</text:span><text:span text:style-name="T545"/></text:p>
          </table:table-cell>
          <table:table-cell table:style-name="表格127.A2" office:value-type="string">
            <text:p text:style-name="P20" loext:marker-style-name="T545"><text:span text:style-name="T546">SNMP </text:span><text:span text:style-name="T547">用 </text:span><text:span text:style-name="T546">UDP</text:span><text:span text:style-name="T547">、屬應用層；</text:span><text:span text:style-name="T546">ICMP </text:span><text:span text:style-name="T547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545"><text:span text:style-name="T546">Q10 </text:span><text:span text:style-name="T547">下列何者正確？</text:span></text:p>
          </table:table-cell>
          <table:table-cell table:style-name="表格127.A3" office:value-type="string">
            <text:p text:style-name="P20" loext:marker-style-name="T545"><text:span text:style-name="T546">SNMP </text:span><text:span text:style-name="T547">用於設備管理</text:span></text:p>
          </table:table-cell>
          <table:table-cell table:style-name="表格127.A3" office:value-type="string">
            <text:p text:style-name="P20" loext:marker-style-name="T545"><text:span text:style-name="T546">IDS </text:span><text:span text:style-name="T547">不阻擋；</text:span><text:span text:style-name="T546">Firewall </text:span><text:span text:style-name="T547">不做行為分析；</text:span><text:span text:style-name="T546">ICMP </text:span><text:span text:style-name="T547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</text:span><text:soft-page-break/><text:span text:style-name="T20">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oft-page-break/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oft-page-break/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31" loext:marker-style-name="T548"><text:span text:style-name="T549">祝　金榜題名　</text:span><text:span text:style-name="T550">·</text:span><text:span text:style-name="T549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6T19:07:45.939319200</dc:date>
    <meta:editing-cycles>357</meta:editing-cycles>
    <dc:title>網路概論與資訊安全 完整整合筆記</dc:title>
    <meta:editing-duration>P2DT8H15M23S</meta:editing-duration>
    <meta:generator>LibreOffice/26.2.3.2$Windows_X86_64 LibreOffice_project/70e089b17412e4cb7773e41413306b17a2328c34</meta:generator>
    <meta:document-statistic meta:table-count="143" meta:image-count="0" meta:object-count="0" meta:page-count="52" meta:paragraph-count="2302" meta:word-count="30566" meta:character-count="48380" meta:non-whitespace-character-count="43622"/>
    <meta:user-defined meta:name="AppVersion">15.0000</meta:user-defined>
  </office:meta>
</office:document-meta>
</file>