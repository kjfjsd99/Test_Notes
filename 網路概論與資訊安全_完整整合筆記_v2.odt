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60000014BA9746C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7" style:family="table-row">
      <style:table-row-properties style:min-row-height="2.958cm" fo:keep-together="auto"/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2" style:family="table-row">
      <style:table-row-properties style:min-row-height="0.801cm" fo:keep-together="auto"/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3a7759"/>
    </style:style>
    <style:style style:name="P25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4942c0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fo:font-weight="bold" fo:background-color="#1b5e20" style:font-weight-asian="bold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fo:font-weight="bold" fo:background-color="#1b5e20" style:font-weight-asian="bold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d74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33691e" style:font-weight-asian="bold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0d47a1" style:font-weight-asian="bold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d740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b71c1c" style:font-weight-asian="bold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880e4f" style:font-weight-asian="bold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.5pt" fo:font-style="normal" fo:font-weight="bold" fo:background-color="#7c4d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pt" fo:font-style="normal" fo:font-weight="bold" fo:background-color="#d500f9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2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3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311b92" style:font-weight-asian="bold" style:font-weight-complex="bold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1a237e" style:font-weight-asian="bold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fo:background-color="#ffea0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d740" loext:opacity="100%" fo:font-weight="bold" fo:background-color="#e65100" style:font-weight-asian="bold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pt" fo:font-style="normal" fo:font-weight="bold" fo:background-color="#3d5afe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18ffff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eeee" loext:opacity="100%" fo:font-weight="bold" fo:background-color="#ff4081" style:font-weight-asian="bold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0000" loext:opacity="100%" style:font-name="Microsoft JhengHei" fo:font-size="9pt" fo:font-style="normal" fo:font-weight="bold" fo:background-color="#00e676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pt" fo:font-style="normal" fo:font-weight="bold" fo:background-color="#1b5e2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4a148c" style:font-weight-asian="bold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534ca"/>
    </style:style>
    <style:style style:name="P6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e65100" style:font-weight-asian="bold" style:font-weight-complex="bold"/>
    </style:style>
    <style:style style:name="P6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officeooo:paragraph-rsid="0114c74f"/>
    </style:style>
    <style:style style:name="P6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fo:font-weight="bold" fo:background-color="#b71c1c" style:font-weight-asian="bold" style:font-weight-complex="bold"/>
    </style:style>
    <style:style style:name="P70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  <style:text-properties officeooo:paragraph-rsid="01161c94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1b5e2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1a237e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c4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cbc" loext:opacity="100%" fo:font-weight="bold" fo:background-color="#e65100" style:font-weight-asian="bold" style:font-weight-complex="bold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64ffda" loext:opacity="100%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64ffda" loext:opacity="100%" fo:font-weight="bold" fo:background-color="#d500f9" style:font-weight-asian="bold" style:font-weight-complex="bold"/>
    </style:style>
    <style:style style:name="P7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2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7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8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9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6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7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8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4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5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1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8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1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3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7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2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2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0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1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5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9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3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5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6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8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7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2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3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7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6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7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8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5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6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7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8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9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0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1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2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3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5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6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8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9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0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5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6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7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9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0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2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3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6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7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8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1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2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3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9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0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62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3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4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5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6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7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8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7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8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9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0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5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6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7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8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9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0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2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1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2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9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0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1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2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3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4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5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7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19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1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2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23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4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5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6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7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8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29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0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1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2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3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4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5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6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1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2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3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4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5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46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7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8" style:family="text">
      <style:text-properties fo:color="#2b2b2b" loext:opacity="100%" fo:font-family="Arial" style:font-family-generic="swiss" fo:font-size="10.5pt" fo:font-style="normal" fo:font-weight="normal" officeooo:rsid="004849e1" style:font-family-asian="Arial" style:font-family-generic-asian="swiss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549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50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1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2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3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4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5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56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7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8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1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2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3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4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5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6" style:family="text">
      <style:text-properties fo:color="#ffea00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7" style:family="text">
      <style:text-properties fo:color="#ffea00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8" style:family="text">
      <style:text-properties fo:color="#c96a1e" loext:opacity="100%" style:font-name="Microsoft JhengHei" fo:font-size="12.5pt" fo:font-weight="bold" fo:background-color="#ffea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69" style:family="text">
      <style:text-properties fo:color="#e040f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70" style:family="text">
      <style:text-properties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71" style:family="text">
      <style:text-properties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2" style:family="text">
      <style:text-properties fo:color="#18ffff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3" style:family="text">
      <style:text-properties fo:color="#ffff00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4" style:family="text">
      <style:text-properties fo:color="#1f3a5c" loext:opacity="100%" fo:font-size="10.5pt" fo:font-weight="bold" fo:background-color="#ffd740" loext:char-shading-value="0" style:font-name-asian="Microsoft JhengHei2" style:font-size-asian="10.5pt" style:font-weight-asian="bold" style:font-name-complex="Microsoft JhengHei2" style:font-size-complex="10.5pt" style:font-weight-complex="bold"/>
    </style:style>
    <style:style style:name="T575" style:family="text">
      <style:text-properties fo:color="#1f3a5c" loext:opacity="100%" style:font-name="Microsoft JhengHei" fo:font-size="10.5pt" fo:font-weight="bold" fo:background-color="#ffd740" loext:char-shading-value="0" style:font-size-asian="10.5pt" style:font-weight-asian="bold" style:font-name-complex="Microsoft JhengHei2" style:font-size-complex="10.5pt" style:font-weight-complex="bold"/>
    </style:style>
    <style:style style:name="T576" style:family="text">
      <style:text-properties fo:color="#00e676" loext:opacity="100%" style:font-name="Microsoft JhengHei" fo:font-size="10.5pt" fo:font-style="normal" fo:font-weight="bold" fo:background-color="#2b2b2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7" style:family="text">
      <style:text-properties fo:color="#00e676" loext:opacity="100%" fo:font-size="10.5pt" fo:font-style="normal" fo:font-weight="bold" fo:background-color="#2b2b2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8" style:family="text">
      <style:text-properties fo:color="#ffcdd2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9" style:family="text">
      <style:text-properties fo:color="#ffcdd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0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81" style:family="text">
      <style:text-properties fo:color="#ffea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2" style:family="text">
      <style:text-properties fo:color="#ffea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3" style:family="text">
      <style:text-properties fo:font-size="11pt" fo:background-color="#ffd740" loext:char-shading-value="0" style:font-name-asian="Microsoft JhengHei2" style:font-size-asian="11pt" style:font-name-complex="Microsoft JhengHei2" style:font-size-complex="11pt"/>
    </style:style>
    <style:style style:name="T584" style:family="text">
      <style:text-properties fo:color="#c96a1e" loext:opacity="100%" style:font-name="Microsoft JhengHei" fo:font-size="12.5pt" fo:font-weight="bold" fo:background-color="#00e5ff" loext:char-shading-value="0" style:font-size-asian="12.5pt" style:font-weight-asian="bold" style:font-name-complex="Microsoft JhengHei2" style:font-size-complex="12.5pt" style:font-weight-complex="bold"/>
    </style:style>
    <style:style style:name="T585" style:family="text">
      <style:text-properties fo:color="#76ff03" loext:opacity="100%" style:font-name="Microsoft JhengHei" fo:font-size="10.5pt" fo:font-style="normal" fo:font-weight="bold" fo:background-color="#2e7d3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6" style:family="text">
      <style:text-properties fo:color="#64ffda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7" style:family="text">
      <style:text-properties fo:color="#18ffff" loext:opacity="100%" style:font-name="Microsoft JhengHei" fo:font-size="9pt" fo:font-style="normal" fo:font-weight="bold" fo:background-color="#01579b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8" style:family="text">
      <style:text-properties fo:color="#ffcc8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9" style:family="text">
      <style:text-properties fo:color="#ffcc8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90" style:family="text">
      <style:text-properties fo:color="#ffcdd2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1" style:family="text">
      <style:text-properties fo:color="#b2ff59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2" style:family="text">
      <style:text-properties fo:color="#b2ff59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3" style:family="text">
      <style:text-properties fo:color="#2b2b2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94" style:family="text">
      <style:text-properties fo:color="#2b2b2b" loext:opacity="100%" fo:font-size="8pt" fo:font-style="normal" style:font-name-asian="Microsoft JhengHei2" style:font-size-asian="8pt" style:font-style-asian="normal" style:font-name-complex="Microsoft JhengHei2" style:font-size-complex="8pt" style:font-style-complex="normal"/>
    </style:style>
    <style:style style:name="T595" style:family="text">
      <style:text-properties fo:color="#1f7a70" loext:opacity="100%" style:font-name="Microsoft JhengHei" fo:font-size="11pt" fo:font-weight="bold" fo:background-color="#ffea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596" style:family="text">
      <style:text-properties fo:color="#1f7a70" loext:opacity="100%" style:font-name="Microsoft JhengHei" fo:font-size="11pt" fo:font-weight="bold" fo:background-color="#ffea00" loext:char-shading-value="0" style:font-size-asian="11pt" style:font-weight-asian="bold" style:font-name-complex="Microsoft JhengHei2" style:font-size-complex="11pt" style:font-weight-complex="bold"/>
    </style:style>
    <style:style style:name="T597" style:family="text">
      <style:text-properties fo:color="#e1bee7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8" style:family="text">
      <style:text-properties fo:color="#e1bee7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9" style:family="text">
      <style:text-properties fo:color="#00e676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0" style:family="text">
      <style:text-properties fo:color="#00e676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1" style:family="text">
      <style:text-properties fo:color="#c5ca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c5ca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ffcc8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4" style:family="text">
      <style:text-properties fo:color="#ffcc8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5" style:family="text">
      <style:text-properties fo:color="#ffea00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6" style:family="text">
      <style:text-properties fo:color="#ffea00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7" style:family="text">
      <style:text-properties fo:color="#c6ff00" loext:opacity="100%" style:font-name="Microsoft JhengHei" fo:font-size="9.5pt" fo:font-style="normal" fo:font-weight="bold" fo:background-color="#33691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8" style:family="text">
      <style:text-properties fo:color="#c6ff00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9" style:family="text">
      <style:text-properties fo:color="#2f7a4d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610" style:family="text">
      <style:text-properties fo:color="#2f7a4d" loext:opacity="100%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11" style:family="text">
      <style:text-properties fo:color="#18ffff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2" style:family="text">
      <style:text-properties fo:color="#18ffff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14" style:family="text">
      <style:text-properties fo:color="#c6ff0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5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6" style:family="text">
      <style:text-properties fo:color="#ffff00" loext:opacity="100%" style:font-name="Microsoft JhengHei" fo:font-size="10.5pt" fo:font-style="normal" fo:font-weight="bold" fo:background-color="#f57f1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7" style:family="text">
      <style:text-properties fo:color="#ffff00" loext:opacity="100%" fo:font-size="10.5pt" fo:font-style="normal" fo:font-weight="bold" fo:background-color="#f57f1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8" style:family="text">
      <style:text-properties fo:color="#2b2b2b" loext:opacity="100%" style:font-name="Microsoft JhengHei" fo:font-size="7pt" fo:font-style="normal" fo:font-weight="bold" fo:background-color="#ffff00" loext:char-shading-value="0" style:font-name-asian="Microsoft JhengHei2" style:font-size-asian="7pt" style:font-style-asian="normal" style:font-weight-asian="bold" style:font-name-complex="Microsoft JhengHei2" style:font-size-complex="7pt" style:font-style-complex="normal" style:font-weight-complex="bold"/>
    </style:style>
    <style:style style:name="T619" style:family="text">
      <style:text-properties fo:color="#2b2b2b" loext:opacity="100%" style:font-name="Microsoft JhengHei" fo:font-size="9.5pt" fo:font-style="normal" fo:font-weight="normal" fo:background-color="#64ffda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620" style:family="text">
      <style:text-properties fo:color="#1f7a70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T621" style:family="text">
      <style:text-properties fo:color="#1f7a70" loext:opacity="100%" style:font-name="Microsoft JhengHei" fo:font-size="7pt" fo:font-weight="bold" fo:background-color="#ffff00" loext:char-shading-value="0" style:font-name-asian="Microsoft JhengHei2" style:font-size-asian="7pt" style:font-weight-asian="bold" style:font-name-complex="Microsoft JhengHei2" style:font-size-complex="7pt" style:font-weight-complex="bold"/>
    </style:style>
    <style:style style:name="T622" style:family="text">
      <style:text-properties fo:color="#eeeeee" loext:opacity="100%" style:font-name="Microsoft JhengHei" fo:font-size="11pt" fo:font-weight="bold" fo:background-color="#b71c1c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23" style:family="text">
      <style:text-properties fo:color="#eeeeee" loext:opacity="100%" style:font-name="Microsoft JhengHei" fo:font-size="11pt" fo:font-weight="bold" fo:background-color="#b71c1c" loext:char-shading-value="0" style:font-size-asian="11pt" style:font-weight-asian="bold" style:font-name-complex="Microsoft JhengHei2" style:font-size-complex="11pt" style:font-weight-complex="bold"/>
    </style:style>
    <style:style style:name="T624" style:family="text">
      <style:text-properties fo:color="#2b2b2b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5" style:family="text">
      <style:text-properties fo:color="#2b2b2b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6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27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28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9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0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1" style:family="text">
      <style:text-properties fo:color="#64ffda" loext:opacity="100%" fo:font-size="8.5pt" fo:font-style="normal" fo:font-weight="bold" fo:background-color="#d500f9" loext:char-shading-value="0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2" style:family="text">
      <style:text-properties fo:color="#64ffda" loext:opacity="100%" style:font-name="Microsoft JhengHei" fo:font-size="8.5pt" fo:font-style="normal" fo:font-weight="bold" fo:background-color="#d500f9" loext:char-shading-value="0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33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34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35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241">範圍：0~127<text:line-break/>可用：1~126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2">快速判斷一個 </text:span><text:span text:style-name="T243">IP </text:span><text:span text:style-name="T242">屬於哪個 </text:span><text:span text:style-name="T243">/26 </text:span><text:span text:style-name="T242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4">VLSM </text:span><text:span text:style-name="T171">把大網路切小</text:span><text:span text:style-name="T20">；</text:span><text:span text:style-name="T245">CIDR </text:span><text:span text:style-name="T246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7"><text:s/></text:span><text:span text:style-name="T248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9">2 </text:span><text:span text:style-name="T250">個 </text:span><text:span text:style-name="T249">/25 → 1 </text:span><text:span text:style-name="T250">個 </text:span><text:span text:style-name="T249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9">4 </text:span><text:span text:style-name="T250">個 </text:span><text:span text:style-name="T249">/24 → 1 </text:span><text:span text:style-name="T250">個 </text:span><text:span text:style-name="T249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1">反例（無法合併）：</text:span><text:span text:style-name="T252">192.168.1.0/24 </text:span><text:span text:style-name="T253">＋ </text:span><text:span text:style-name="T252">192.168.2.0/24 → </text:span><text:span text:style-name="T253">雖數量為 </text:span><text:span text:style-name="T252">2</text:span><text:span text:style-name="T253">，但起點 </text:span><text:span text:style-name="T252">.1 </text:span><text:span text:style-name="T253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4">2 </text:span><text:span text:style-name="T255">個 </text:span><text:span text:style-name="T254">/26 → /25</text:span><text:span text:style-name="T255">；</text:span><text:span text:style-name="T254">4 </text:span><text:span text:style-name="T255">個 </text:span><text:span text:style-name="T254">/26 → /24</text:span><text:span text:style-name="T255">；</text:span><text:span text:style-name="T254">2 </text:span><text:span text:style-name="T255">個 </text:span><text:span text:style-name="T254">/24 → /23</text:span><text:span text:style-name="T20">。</text:span></text:p>
          </table:table-cell>
        </table:table-row>
      </table:table>
      <text:h text:style-name="P23" text:outline-level="2" loext:marker-style-name="T34"><text:soft-page-break/>/23 的固定分組</text:h>
      <text:h text:style-name="P23" text:outline-level="2" loext:marker-style-name="T34"/>
      <text:h text:style-name="P23" text:outline-level="2" loext:marker-style-name="T34">✓ 0 + 1</text:h>
      <text:h text:style-name="P23" text:outline-level="2" loext:marker-style-name="T34">✓ 2 + 3</text:h>
      <text:h text:style-name="P23" text:outline-level="2" loext:marker-style-name="T34">✓ 4 + 5</text:h>
      <text:h text:style-name="P23" text:outline-level="2" loext:marker-style-name="T34">✓ 6 + 7</text:h>
      <text:h text:style-name="P23" text:outline-level="2" loext:marker-style-name="T34"/>
      <text:h text:style-name="P23" text:outline-level="2" loext:marker-style-name="T34">✗ 1 + 2</text:h>
      <text:h text:style-name="P23" text:outline-level="2" loext:marker-style-name="T34">✗ 3 + 4</text:h>
      <text:h text:style-name="P23" text:outline-level="2" loext:marker-style-name="T34">✗ 5 + 6</text:h>
      <text:h text:style-name="P23" text:outline-level="2" loext:marker-style-name="T34">柒、子網路三大概念與解題流程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6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7">考試標準解題流程</text:span></text:p>
            <text:p text:style-name="P11"><text:span text:style-name="T258">遇到 </text:span><text:span text:style-name="T259">VLSM </text:span><text:span text:style-name="T258">題：</text:span><text:span text:style-name="T207">確認起始網路</text:span><text:span text:style-name="T20"> → </text:span><text:span text:style-name="T260">需求由大到小</text:span><text:span text:style-name="T20"> → </text:span><text:span text:style-name="T261">各需求 </text:span><text:span text:style-name="T262">+2 </text:span><text:span text:style-name="T261">找 </text:span><text:span text:style-name="T262">2ⁿ </text:span><text:span text:style-name="T261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3">/</text:span><text:span text:style-name="T215">廣播位址</text:span><text:span text:style-name="T263">/</text:span><text:span text:style-name="T215">可用範圍</text:span><text:span text:style-name="T20">。</text:span></text:p>
            <text:p text:style-name="P12"><text:span text:style-name="T258">遇到 </text:span><text:span text:style-name="T259">CIDR </text:span><text:span text:style-name="T258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pan text:style-name="T35">捌、</text:span><text:span text:style-name="T34">MTU</text:span><text:span text:style-name="T35">（最大傳輸單位）</text:span><text:span text:style-name="T34">(</text:span><text:span text:style-name="T264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5">Maximum Transmission Unit</text:span><text:span text:style-name="T266">，</text:span><text:span text:style-name="T267">一條網路</text:span><text:span text:style-name="T266">「</text:span><text:span text:style-name="T268">一次最多</text:span><text:span text:style-name="T266">能傳送的</text:span><text:span text:style-name="T269">封包大小</text:span><text:span text:style-name="T266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70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1"><text:span text:style-name="T96">IPv4</text:span><text:span text:style-name="T271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2"><text:span text:style-name="T273">✅ </text:span><text:span text:style-name="T274">可以</text:span></text:p>
          </table:table-cell>
          <table:table-cell table:style-name="表格49.A3" office:value-type="string">
            <text:p text:style-name="P20" loext:marker-style-name="T275"><text:span text:style-name="T276">封包到 </text:span><text:span text:style-name="T277">Router </text:span><text:span text:style-name="T276">太大時，</text:span><text:span text:style-name="T277">Router </text:span><text:span text:style-name="T276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1"><text:span text:style-name="T96">IPv6</text:span><text:span text:style-name="T271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8"><text:span text:style-name="T279">❌ </text:span><text:span text:style-name="T280">不行</text:span></text:p>
          </table:table-cell>
          <table:table-cell table:style-name="表格49.A4" office:value-type="string">
            <text:p text:style-name="P20" loext:marker-style-name="T14"><text:span text:style-name="T281">Router </text:span><text:span text:style-name="T282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3">接收端靠此 </text:span><text:span text:style-name="T284">ID </text:span><text:span text:style-name="T283">判斷哪些 </text:span><text:span text:style-name="T284">fragment </text:span><text:span text:style-name="T283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5">最多可經過幾個 </text:span><text:span text:style-name="T286">Router</text:span><text:span text:style-name="T285">；每經過一個 −</text:span><text:span text:style-name="T286">1</text:span><text:span text:style-name="T20">，</text:span><text:span text:style-name="T215">歸零時 </text:span><text:span text:style-name="T263">Router </text:span><text:span text:style-name="T215">丟棄並回 </text:span><text:span text:style-name="T263">ICMP</text:span><text:span text:style-name="T215">「</text:span><text:span text:style-name="T263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1"><text:span text:style-name="T96">0 ÷ 8 = 0</text:span><text:span text:style-name="T271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7"><text:span text:style-name="T288">ICMP</text:span><text:span text:style-name="T287"/></text:p>
          </table:table-cell>
          <table:table-cell table:style-name="表格50.A3" table:number-columns-spanned="2" office:value-type="string">
            <text:p text:style-name="P20" loext:marker-style-name="T289"><text:span text:style-name="T290">ping</text:span><text:span text:style-name="T291">、</text:span><text:span text:style-name="T290">TTL </text:span><text:span text:style-name="T291">超時通知、</text:span><text:span text:style-name="T290">Fragmentation </text:span><text:span text:style-name="T291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2">&gt; </text:span><text:span text:style-name="T158">該路段 </text:span><text:span text:style-name="T292">MTU</text:span><text:span text:style-name="T42"> → ③ </text:span><text:span text:style-name="T293">Router </text:span><text:span text:style-name="T129">不能切，直接丟棄 </text:span><text:span text:style-name="T20">→ ④ </text:span><text:span text:style-name="T286">Router </text:span><text:span text:style-name="T285">回傳 </text:span><text:span text:style-name="T286">ICMP</text:span><text:span text:style-name="T285">「</text:span><text:span text:style-name="T286">Fragmentation Needed</text:span><text:span text:style-name="T285">」（含可用 </text:span><text:span text:style-name="T286">MTU </text:span><text:span text:style-name="T285">大小）</text:span><text:span text:style-name="T20">→ ⑤ </text:span><text:span text:style-name="T169">送端調整封包大小後</text:span><text:span text:style-name="T294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4"> </text:span><text:span text:style-name="T295">Path MTU Discovery</text:span><text:span text:style-name="T294">，自動找出</text:span><text:span text:style-name="T296">來源到目的地</text:span><text:span text:style-name="T294">整條路徑中</text:span><text:span text:style-name="T297">最小的 </text:span><text:span text:style-name="T298">MTU </text:span><text:span text:style-name="T297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9"><text:span text:style-name="T256">IPv4</text:span><text:span text:style-name="T299"/></text:p>
          </table:table-cell>
          <table:table-cell table:style-name="表格52.A2" office:value-type="string">
            <text:p text:style-name="P20" loext:marker-style-name="T300"><text:span text:style-name="T301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9"><text:span text:style-name="T256">IPv6</text:span><text:span text:style-name="T299"/></text:p>
          </table:table-cell>
          <table:table-cell table:style-name="表格52.A3" office:value-type="string">
            <text:p text:style-name="P20" loext:marker-style-name="T300"><text:span text:style-name="T301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2">MSS = MTU − IP Header − TCP Header </text:span><text:span text:style-name="T42">= </text:span><text:span text:style-name="T83">1500 − 20 − 20 = 1460 bytes</text:span><text:span text:style-name="T20">。</text:span><text:span text:style-name="T303">三向交握時雙方各自宣告 </text:span><text:span text:style-name="T304">MSS</text:span><text:span text:style-name="T303">，之後每段 ≤ </text:span><text:span text:style-name="T304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7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5">從源頭就避免 </text:span><text:span text:style-name="T302">Fragmentation </text:span><text:span text:style-name="T305">發生</text:span><text:span text:style-name="T20">。</text:span><text:span text:style-name="T284">TCP </text:span><text:span text:style-name="T283">做 </text:span><text:span text:style-name="T284">Segmentation </text:span><text:span text:style-name="T283">的主要目的之一，就是讓每個封包符合 </text:span><text:span text:style-name="T284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6">放入緩衝區 </text:span><text:span text:style-name="T20">→ </text:span><text:span text:style-name="T285">等同一 </text:span><text:span text:style-name="T286">ID </text:span><text:span text:style-name="T285">的所有 </text:span><text:span text:style-name="T286">Fragment </text:span><text:span text:style-name="T285">到齊 → 依</text:span><text:span text:style-name="T306"> </text:span><text:span text:style-name="T307">Offset </text:span><text:span text:style-name="T285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7">防禦方式</text:span></text:p>
            <text:p text:style-name="P11" loext:marker-style-name="T21"><text:span text:style-name="T20">防禦：</text:span><text:span text:style-name="T308">設定重組 </text:span><text:span text:style-name="T309">buffer </text:span><text:span text:style-name="T308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23" text:outline-level="2">拾伍、本篇白話比喻（寄貨版）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0"><text:span text:style-name="T301">Identification</text:span><text:span text:style-name="T300"/></text:p>
          </table:table-cell>
          <table:table-cell table:style-name="表格55.A2" office:value-type="string">
            <text:p text:style-name="P20" loext:marker-style-name="T299"><text:span text:style-name="T120">每箱貼上同一個「訂單號碼」</text:span><text:span text:style-name="T299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00"><text:span text:style-name="T301">Fragment Offset</text:span><text:span text:style-name="T300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ext:soft-page-break/>
        <table:table-row table:style-name="表格55.1">
          <table:table-cell table:style-name="表格55.A2" office:value-type="string">
            <text:p text:style-name="P20" loext:marker-style-name="T310"><text:span text:style-name="T311">PMTUD</text:span><text:span text:style-name="T310"/></text:p>
          </table:table-cell>
          <table:table-cell table:style-name="表格55.A2" office:value-type="string">
            <text:p text:style-name="P20" loext:marker-style-name="T312"><text:span text:style-name="T313">先試寄 → 被退 → 知道上限 → 調整大小再寄</text:span><text:span text:style-name="T312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4"><text:span text:style-name="T315">TTL</text:span><text:span text:style-name="T314"/></text:p>
          </table:table-cell>
          <table:table-cell table:style-name="表格55.A3" office:value-type="string">
            <text:p text:style-name="P20" loext:marker-style-name="T316"><text:span text:style-name="T87">貨物限轉 </text:span><text:span text:style-name="T317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0"><text:span text:style-name="T301">MSS</text:span><text:span text:style-name="T300"/></text:p>
          </table:table-cell>
          <table:table-cell table:style-name="表格55.A2" office:value-type="string">
            <text:p text:style-name="P20" loext:marker-style-name="T299"><text:span text:style-name="T120">你自己量好每箱重量，確保不超重</text:span><text:span text:style-name="T299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8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6">NAT </text:span><text:span text:style-name="T120">共用 </text:span><text:span text:style-name="T256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1">IP</text:span><text:span text:style-name="T70">，不需 </text:span><text:span text:style-name="T301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6">VPN</text:span></text:p>
          </table:table-cell>
          <table:table-cell table:style-name="表格57.A2" office:value-type="string">
            <text:p text:style-name="P20" loext:marker-style-name="T14"><text:span text:style-name="T319">支援 </text:span><text:span text:style-name="T320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1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9"><text:span text:style-name="T120">無法有效標記流量優先權</text:span><text:span text:style-name="T299"/></text:p>
          </table:table-cell>
          <table:table-cell table:style-name="表格57.A2" office:value-type="string">
            <text:p text:style-name="P20" loext:marker-style-name="T14"><text:span text:style-name="T301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6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1">Multicast</text:span><text:span text:style-name="T70">（群播）／ </text:span><text:span text:style-name="T301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7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1">裝置同時具備 </text:span><text:span text:style-name="T322">IPv4 </text:span><text:span text:style-name="T321">與 </text:span><text:span text:style-name="T322">IPv6 </text:span><text:span text:style-name="T321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3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1">將 </text:span><text:span text:style-name="T322">IPv6 </text:span><text:span text:style-name="T321">封包完整封裝進 </text:span><text:span text:style-name="T322">IPv4 </text:span><text:span text:style-name="T321">外殼，抵達目的地後拆除外層 </text:span><text:span text:style-name="T322">IPv4</text:span><text:span text:style-name="T321">、還原 </text:span><text:span text:style-name="T322">IPv6 </text:span><text:span text:style-name="T321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4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5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6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5">同時會中文 </text:span><text:span text:style-name="T326">+ </text:span><text:span text:style-name="T325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7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8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9">（</text:span><text:span text:style-name="T330">NAT</text:span><text:span text:style-name="T329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1">安全（</text:span><text:span text:style-name="T332">IPsec</text:span><text:span text:style-name="T331">）</text:span><text:span text:style-name="T20">＋ </text:span><text:span text:style-name="T215">快（固定 </text:span><text:span text:style-name="T263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3">Header </text:span><text:span text:style-name="T334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9">支援 </text:span><text:span text:style-name="T320">IPsec</text:span><text:span text:style-name="T15">／</text:span><text:span text:style-name="T319">固定 </text:span><text:span text:style-name="T320">40 bytes </text:span><text:span text:style-name="T319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7">資料在網路中「實際傳送」靠 </text:span><text:span text:style-name="T298">MAC</text:span><text:span text:style-name="T20">，</text:span><text:span text:style-name="T283">但我們只知道對方的 </text:span><text:span text:style-name="T284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5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6">我之前有沒有問過這個 </text:span><text:span text:style-name="T337">IP</text:span><text:span text:style-name="T336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5"> 對整個區網廣播</text:span><text:span text:style-name="T20">「誰是 </text:span><text:span text:style-name="T42">192.168.1.5</text:span><text:span text:style-name="T20">？</text:span><text:span text:style-name="T285">請告訴我你的 </text:span><text:span text:style-name="T286">MAC</text:span><text:span text:style-name="T285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50">把「</text:span><text:span text:style-name="T249">IP ↔ MAC</text:span><text:span text:style-name="T250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8"><text:span text:style-name="T339">ARP Spoofing</text:span><text:span text:style-name="T340">（</text:span><text:span text:style-name="T339">ARP </text:span><text:span text:style-name="T340">欺騙）</text:span></text:p>
          </table:table-cell>
          <table:table-cell table:style-name="表格62.A3" office:value-type="string">
            <text:p text:style-name="P20" loext:marker-style-name="T14"><text:span text:style-name="T341">攻擊者</text:span><text:span text:style-name="T342">假冒他人</text:span><text:span text:style-name="T341">的 </text:span><text:span text:style-name="T318">MAC</text:span><text:span text:style-name="T341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9"><text:span text:style-name="T256">arp -a</text:span><text:span text:style-name="T299"/></text:p>
          </table:table-cell>
          <table:table-cell table:style-name="表格62.A4" office:value-type="string">
            <text:p text:style-name="P20" loext:marker-style-name="T14"><text:span text:style-name="T343">查看本機的 </text:span><text:span text:style-name="T344">ARP </text:span><text:span text:style-name="T343">對應表</text:span><text:span text:style-name="T15">（</text:span><text:span text:style-name="T345">IP ↔ MAC </text:span><text:span text:style-name="T346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7"><text:span text:style-name="T320">ping [IP]</text:span><text:span text:style-name="T347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6">路由器幫你把「私有 </text:span><text:span text:style-name="T337">IP</text:span><text:span text:style-name="T336">」改成「公網 </text:span><text:span text:style-name="T337">IP</text:span><text:span text:style-name="T336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00"><text:span text:style-name="T301">Static NAT</text:span><text:span text:style-name="T300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8"><text:span text:style-name="T349">一個私有 </text:span><text:span text:style-name="T350">IP ↔ </text:span><text:span text:style-name="T349">一個公網 </text:span><text:span text:style-name="T350">IP</text:span></text:p>
          </table:table-cell>
          <table:table-cell table:style-name="表格63.A3" office:value-type="string">
            <text:p text:style-name="P20" loext:marker-style-name="T348"><text:span text:style-name="T349">固定對應</text:span><text:span text:style-name="T348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300"><text:span text:style-name="T301">Dynamic NAT</text:span><text:span text:style-name="T300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1"><text:span text:style-name="T352">多個私有 </text:span><text:span text:style-name="T353">IP </text:span><text:span text:style-name="T352">對應 </text:span><text:span text:style-name="T353">IP </text:span><text:span text:style-name="T352">池（</text:span><text:span text:style-name="T353">pool</text:span><text:span text:style-name="T352">）</text:span></text:p>
          </table:table-cell>
          <table:table-cell table:style-name="表格63.A4" office:value-type="string">
            <text:p text:style-name="P20" loext:marker-style-name="T351"><text:span text:style-name="T352">動態分配</text:span><text:span text:style-name="T351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8"><text:span text:style-name="T339">PAT</text:span><text:span text:style-name="T338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4"><text:span text:style-name="T355">多台共用一個公網 </text:span><text:span text:style-name="T356">IP</text:span></text:p>
          </table:table-cell>
          <table:table-cell table:style-name="表格63.A3" office:value-type="string">
            <text:p text:style-name="P20" loext:marker-style-name="T354"><text:span text:style-name="T355">靠 </text:span><text:span text:style-name="T356">Port </text:span><text:span text:style-name="T355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7">破壞 </text:span><text:span text:style-name="T298">End-to-End </text:span><text:span text:style-name="T297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8">P2P / VoIP </text:span><text:span text:style-name="T297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7">直連功能受限</text:span><text:span text:style-name="T20">。</text:span></text:p>
            <text:p text:style-name="P12"><text:span text:style-name="T297">增加延遲</text:span><text:span text:style-name="T46">：</text:span><text:span text:style-name="T358">每個封包都需要</text:span><text:span text:style-name="T359">多一道 </text:span><text:span text:style-name="T360">IP </text:span><text:span text:style-name="T359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1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4">Port</text:span><text:span text:style-name="T283">＝房間號碼</text:span><text:span text:style-name="T20">；</text:span><text:span text:style-name="T337">NAT </text:span><text:span text:style-name="T336">路由器＝大樓</text:span><text:span text:style-name="T20">；</text:span><text:span text:style-name="T284">Port Forwarding</text:span><text:span text:style-name="T283">＝門口指示牌「</text:span><text:span text:style-name="T284">80 </text:span><text:span text:style-name="T283">號房 → </text:span><text:span text:style-name="T284">192.168.1.2</text:span><text:span text:style-name="T283">」</text:span><text:span text:style-name="T20">。例：</text:span><text:span text:style-name="T42">220.x.x.x:80 → 192.168.1.2:80</text:span><text:span text:style-name="T20">（</text:span><text:span text:style-name="T362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6">每個服務都要手動設定，</text:span><text:span text:style-name="T265">IP </text:span><text:span text:style-name="T266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3">讓裝置自動跟</text:span><text:span text:style-name="T364">路由器</text:span><text:span text:style-name="T363">要求「幫我開一個 </text:span><text:span text:style-name="T365">Port</text:span><text:span text:style-name="T363">」，不需人工設定。</text:span><text:span text:style-name="T20">① </text:span><text:span text:style-name="T366">應用程式發 </text:span><text:span text:style-name="T367">UPnP </text:span><text:span text:style-name="T366">請求</text:span><text:span text:style-name="T20"> → ② </text:span><text:span text:style-name="T368">路由器</text:span><text:span text:style-name="T366">自動新增 </text:span><text:span text:style-name="T367">Port Forwarding </text:span><text:span text:style-name="T366">規則</text:span><text:span text:style-name="T20"> → ③</text:span><text:span text:style-name="T369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1">安全風險（重要）：</text:span><text:span text:style-name="T266">惡意程式也能透過 </text:span><text:span text:style-name="T265">UPnP </text:span><text:span text:style-name="T266">自動開 </text:span><text:span text:style-name="T265">Port</text:span><text:span text:style-name="T266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4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70">兩端都在各自 </text:span><text:span text:style-name="T371">NAT </text:span><text:span text:style-name="T370">後面，彼此都是私有 </text:span><text:span text:style-name="T371">IP</text:span><text:span text:style-name="T370">、互相找不到。</text:span><text:span text:style-name="T371">STUN </text:span><text:span text:style-name="T370">先幫每端「查清楚自己對外的公網 </text:span><text:span text:style-name="T371">IP + Port</text:span><text:span text:style-name="T370">」，再交換資訊</text:span><text:span text:style-name="T20">嘗試直接打通。</text:span></text:p>
            <text:p text:style-name="P12" loext:marker-style-name="T21"><text:span text:style-name="T42">① </text:span><text:span text:style-name="T372">問 </text:span><text:span text:style-name="T373">STUN </text:span><text:span text:style-name="T372">伺服器「我對外的 </text:span><text:span text:style-name="T373">IP </text:span><text:span text:style-name="T372">和 </text:span><text:span text:style-name="T373">Port </text:span><text:span text:style-name="T372">是什麼？」</text:span><text:span text:style-name="T20">② </text:span><text:span text:style-name="T373">STUN </text:span><text:span text:style-name="T372">回「你對外是 </text:span><text:span text:style-name="T373">220.x.x.x:12345</text:span><text:span text:style-name="T372">」</text:span><text:span text:style-name="T20">③ </text:span><text:span text:style-name="T154">朋友也做同樣的事</text:span><text:span text:style-name="T20"> → ④ </text:span><text:span text:style-name="T372">兩端透過第三方交換彼此公網位址</text:span><text:span text:style-name="T20"> → ⑤ </text:span><text:span text:style-name="T372">同時互相發送封包打洞（</text:span><text:span text:style-name="T373">Hole Punching</text:span><text:span text:style-name="T372">）</text:span><text:span text:style-name="T20">。</text:span></text:p>
            <text:p text:style-name="P12"><text:span text:style-name="T251">重要限制：</text:span><text:span text:style-name="T265">STUN </text:span><text:span text:style-name="T266">只對部分 </text:span><text:span text:style-name="T265">NAT </text:span><text:span text:style-name="T266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300"><text:span text:style-name="T70">手動設定路由器</text:span><text:span text:style-name="T300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300"><text:span text:style-name="T70">應用程式自動設定</text:span><text:span text:style-name="T300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300"><text:span text:style-name="T70">無需路由器設定</text:span><text:span text:style-name="T300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1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4">場景</text:span><text:span text:style-name="T174">：</text:span><text:span text:style-name="T375">你電腦 </text:span><text:span text:style-name="T376">192.168.1.2</text:span><text:span text:style-name="T375">／路由器內網 </text:span><text:span text:style-name="T376">IP 192.168.1.1</text:span><text:span text:style-name="T375">／路由器公網 </text:span><text:span text:style-name="T376">IP 220.x.x.x</text:span><text:span text:style-name="T375">／目標 </text:span><text:span text:style-name="T376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7">Google </text:span><text:span text:style-name="T378">的 </text:span><text:span text:style-name="T377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4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9">藉由ip位址</text:span><text:span text:style-name="T380">，</text:span><text:span text:style-name="T381">發現 </text:span><text:span text:style-name="T382">Google </text:span><text:span text:style-name="T383">不在同一個區網</text:span><text:span text:style-name="T381">，必須交給路由器幫忙送</text:span><text:span text:style-name="T108">)(</text:span><text:span text:style-name="T384">查詢路由器的 </text:span><text:span text:style-name="T385">MAC</text:span><text:span text:style-name="T384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6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7">IP </text:span><text:span text:style-name="T388">記錄最終目的地；</text:span><text:span text:style-name="T387">MAC </text:span><text:span text:style-name="T388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9">192.168.1.2 → 220.x.x.x</text:span><text:span text:style-name="T108">(</text:span><text:span text:style-name="T390">路由器收到後往 </text:span><text:span text:style-name="T391">Internet </text:span><text:span text:style-name="T390">送</text:span><text:span text:style-name="T109">；路由器負責跨網路傳遞</text:span><text:span text:style-name="T108">)(</text:span><text:span text:style-name="T390">私有 </text:span><text:span text:style-name="T391">IP </text:span><text:span text:style-name="T390">換成公網 </text:span><text:span text:style-name="T391">IP</text:span><text:span text:style-name="T390">，因</text:span><text:span text:style-name="T391">Internet </text:span><text:span text:style-name="T390">不認私有 </text:span><text:span text:style-name="T391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92">封包抵達目的地</text:span><text:span text:style-name="T108">(</text:span><text:span text:style-name="T393">Google </text:span><text:span text:style-name="T394">看到公網 </text:span><text:span text:style-name="T393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5">回傳給 </text:span><text:span text:style-name="T396">220.x.x.x</text:span><text:span text:style-name="T108">(</text:span><text:span text:style-name="T397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9">220.x.x.x → 192.168.1.2</text:span><text:span text:style-name="T108">(</text:span><text:span text:style-name="T382">NAT </text:span><text:span text:style-name="T381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8">✗ </text:span><text:span text:style-name="T399">以為 </text:span><text:span text:style-name="T398">ARP </text:span><text:span text:style-name="T399">是找 </text:span><text:span text:style-name="T398">Google </text:span><text:span text:style-name="T399">的 </text:span><text:span text:style-name="T398">MAC</text:span><text:span text:style-name="T251">　→　</text:span><text:span text:style-name="T400">✓ </text:span><text:span text:style-name="T401">ARP </text:span><text:span text:style-name="T400">找的是「路由器」的 </text:span><text:span text:style-name="T401">MAC</text:span><text:span text:style-name="T400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8">✗ </text:span><text:span text:style-name="T399">以為封包直接送到 </text:span><text:span text:style-name="T398">Google</text:span><text:span text:style-name="T251">　→　</text:span><text:span text:style-name="T400">✓ 封包先送給路由器，路由器再轉到 </text:span><text:span text:style-name="T401">Internet</text:span><text:span text:style-name="T20">。</text:span></text:p>
            <text:p text:style-name="P12"><text:span text:style-name="T398">✗ </text:span><text:span text:style-name="T399">以為 </text:span><text:span text:style-name="T398">IP </text:span><text:span text:style-name="T399">在傳輸過程中一直不變</text:span><text:span text:style-name="T251">　→　</text:span><text:span text:style-name="T400">✓ </text:span><text:span text:style-name="T401">NAT </text:span><text:span text:style-name="T400">會在去程改掉來源 </text:span><text:span text:style-name="T401">IP</text:span><text:span text:style-name="T400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7">考試標準答案（直接背）</text:span></text:p>
            <text:p text:style-name="P11" loext:marker-style-name="T21"><text:span text:style-name="T86">使用者輸入網址後</text:span><text:span text:style-name="T20">，</text:span><text:span text:style-name="T402">先透過 </text:span><text:span text:style-name="T403">DNS </text:span><text:span text:style-name="T402">將網域名稱解析為 </text:span><text:span text:style-name="T403">IP</text:span><text:span text:style-name="T20">；</text:span><text:span text:style-name="T369">接著主機利用 </text:span><text:span text:style-name="T404">ARP </text:span><text:span text:style-name="T369">取得路由器（預設閘道）的 </text:span><text:span text:style-name="T404">MAC</text:span><text:span text:style-name="T20">，</text:span><text:span text:style-name="T369">將封包傳送至路由器</text:span><text:span text:style-name="T20">；</text:span><text:span text:style-name="T405">路由器透過 </text:span><text:span text:style-name="T406">NAT </text:span><text:span text:style-name="T405">將私有 </text:span><text:span text:style-name="T406">IP </text:span><text:span text:style-name="T405">轉換為公網 </text:span><text:span text:style-name="T406">IP </text:span><text:span text:style-name="T405">後送往 </text:span><text:span text:style-name="T406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7"><text:span text:style-name="T408">用 </text:span><text:span text:style-name="T409">IP </text:span><text:span text:style-name="T408">找 </text:span><text:span text:style-name="T409">MAC</text:span></text:p>
          </table:table-cell>
          <table:table-cell table:style-name="表格67.A2" office:value-type="string">
            <text:p text:style-name="P20" loext:marker-style-name="T410"><text:span text:style-name="T411">私有 </text:span><text:span text:style-name="T412">IP </text:span><text:span text:style-name="T411">轉成公網 </text:span><text:span text:style-name="T412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9"><text:span text:style-name="T120">區域網路（</text:span><text:span text:style-name="T256">LAN</text:span><text:span text:style-name="T120">）內</text:span></text:p>
          </table:table-cell>
          <table:table-cell table:style-name="表格67.A3" office:value-type="string">
            <text:p text:style-name="P20" loext:marker-style-name="T300"><text:span text:style-name="T70">內網與 </text:span><text:span text:style-name="T301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3"><text:span text:style-name="T414">L2 / L3 </text:span><text:span text:style-name="T415">交界</text:span></text:p>
          </table:table-cell>
          <table:table-cell table:style-name="表格67.A2" office:value-type="string">
            <text:p text:style-name="P20" loext:marker-style-name="T416"><text:span text:style-name="T417">L3</text:span><text:span text:style-name="T418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9"><text:span text:style-name="T120">資料可能丟失</text:span><text:span text:style-name="T299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9"><text:span text:style-name="T120">順序可能亂掉</text:span><text:span text:style-name="T299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9"><text:span text:style-name="T120">對方來不及收</text:span><text:span text:style-name="T299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9"><text:span text:style-name="T120">網路可能塞車</text:span><text:span text:style-name="T299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9"><text:span text:style-name="T341">需要先建立連線</text:span><text:span text:style-name="T419"/></text:p>
          </table:table-cell>
          <table:table-cell table:style-name="表格70.A2" office:value-type="string">
            <text:p text:style-name="P20" loext:marker-style-name="T347"><text:span text:style-name="T319">無連線，直接送</text:span><text:span text:style-name="T347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300"><text:span text:style-name="T70">網頁、檔案傳輸、</text:span><text:span text:style-name="T301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9"><text:span text:style-name="T120">專業物流（簽收確認）</text:span><text:span text:style-name="T299"/></text:p>
          </table:table-cell>
          <table:table-cell table:style-name="表格70.A3" office:value-type="string">
            <text:p text:style-name="P20" loext:marker-style-name="T299"><text:span text:style-name="T120">亂丟紙飛機</text:span><text:span text:style-name="T299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20">避免「</text:span><text:span text:style-name="T421">舊封包誤觸發新連線</text:span><text:span text:style-name="T420">」</text:span><text:span text:style-name="T20">：若少一次確認，</text:span><text:span text:style-name="T363">延遲的舊 </text:span><text:span text:style-name="T365">SYN </text:span><text:span text:style-name="T363">封包可能讓 </text:span><text:span text:style-name="T365">Server </text:span><text:span text:style-name="T363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22">故意不完成第三次握手（</text:span><text:span text:style-name="T169">不回 </text:span><text:span text:style-name="T170">ACK</text:span><text:span text:style-name="T422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6">SYN</text:span><text:span text:style-name="T15">，每個都</text:span><text:span text:style-name="T70">假冒不同來源 </text:span><text:span text:style-name="T301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3">Server </text:span><text:span text:style-name="T424">建立「半連線（</text:span><text:span text:style-name="T423">Half-open Connection</text:span><text:span text:style-name="T424">）」</text:span><text:span text:style-name="T15">，</text:span><text:span text:style-name="T340">每個都佔記憶體等待 </text:span><text:span text:style-name="T339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5">攻擊者永遠不回 </text:span><text:span text:style-name="T426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7">rwnd</text:span><text:span text:style-name="T34"> </text:span><text:span text:style-name="T35">與 </text:span><text:span text:style-name="T427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8">對方 </text:span><text:span text:style-name="T429">buffer</text:span><text:span text:style-name="T428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1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30">實際傳送量 ＝ </text:span><text:span text:style-name="T431">min(rwnd, cwnd)</text:span><text:span text:style-name="T168">　</text:span><text:span text:style-name="T84">取兩者最小值</text:span><text:span text:style-name="T20">。</text:span><text:span text:style-name="T432">對方吃不下就看 </text:span><text:span text:style-name="T433">rwnd</text:span><text:span text:style-name="T432">；網路塞就看 </text:span><text:span text:style-name="T433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21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4">不用等 </text:span><text:span text:style-name="T435">ACK</text:span><text:span text:style-name="T434">，先連續送出多個封包讓封包都在網路上飛（</text:span><text:span text:style-name="T435">in-flight</text:span><text:span text:style-name="T434">），</text:span><text:span text:style-name="T435">ACK </text:span><text:span text:style-name="T434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6">✗ </text:span><text:span text:style-name="T251">常見錯誤：</text:span><text:span text:style-name="T20">視窗 </text:span><text:span text:style-name="T42">= cwnd</text:span><text:span text:style-name="T20">（擁塞視窗）。</text:span><text:span text:style-name="T258">✓ 正確：</text:span><text:span text:style-name="T363">視窗 </text:span><text:span text:style-name="T365">= min(cwnd, rwnd)</text:span><text:span text:style-name="T363">，</text:span><text:span text:style-name="T365">cwnd </text:span><text:span text:style-name="T363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7"><text:span text:style-name="T437">收到 </text:span><text:span text:style-name="T288">ACK 1</text:span></text:p>
          </table:table-cell>
          <table:table-cell table:style-name="表格74.A4" office:value-type="string">
            <text:p text:style-name="P20" loext:marker-style-name="T438"><text:span text:style-name="T439">封包 </text:span><text:span text:style-name="T440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7"><text:span text:style-name="T437">收到 </text:span><text:span text:style-name="T288">ACK 2</text:span></text:p>
          </table:table-cell>
          <table:table-cell table:style-name="表格74.A3" office:value-type="string">
            <text:p text:style-name="P20" loext:marker-style-name="T438"><text:span text:style-name="T439">封包 </text:span><text:span text:style-name="T440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3">ACK </text:span><text:span text:style-name="T372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6">每收到一個 </text:span><text:span text:style-name="T265">ACK</text:span><text:span text:style-name="T266">，</text:span><text:span text:style-name="T265">cwnd </text:span><text:span text:style-name="T266">就 </text:span><text:span text:style-name="T265">+1</text:span><text:span text:style-name="T20">；</text:span><text:span text:style-name="T336">送出 </text:span><text:span text:style-name="T337">N </text:span><text:span text:style-name="T336">個封包 → 收回 </text:span><text:span text:style-name="T337">N </text:span><text:span text:style-name="T336">個 </text:span><text:span text:style-name="T337">ACK → cwnd </text:span><text:span text:style-name="T336">增加 </text:span><text:span text:style-name="T337">N</text:span><text:span text:style-name="T20">，所以每輪自然翻倍。</text:span><text:span text:style-name="T42">(</text:span><text:span text:style-name="T365">Slow Start = </text:span><text:span text:style-name="T363">每一輪變 </text:span><text:span text:style-name="T365">2 </text:span><text:span text:style-name="T363">倍，</text:span><text:span text:style-name="T365">Congestion Avoidance = </text:span><text:span text:style-name="T363">每一輪只加 </text:span><text:span text:style-name="T365">1</text:span><text:span text:style-name="T42">(</text:span><text:span text:style-name="T20">「</text:span><text:span text:style-name="T441">Slow Start</text:span><text:span text:style-name="T442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4">cwnd </text:span><text:span text:style-name="T283">成長到門檻值（</text:span><text:span text:style-name="T284">ssthresh</text:span><text:span text:style-name="T283">）後，改為線性成長</text:span><text:span text:style-name="T20">（</text:span><text:span text:style-name="T266">每個 </text:span><text:span text:style-name="T265">RTT </text:span><text:span text:style-name="T266">只 </text:span><text:span text:style-name="T265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7"><text:span text:style-name="T288">cwnd &lt; ssthresh</text:span><text:span text:style-name="T287"/></text:p>
          </table:table-cell>
          <table:table-cell table:style-name="表格76.A2" office:value-type="string">
            <text:p text:style-name="P20" loext:marker-style-name="T287"><text:span text:style-name="T288">cwnd ≥ ssthresh</text:span><text:span text:style-name="T287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3">指數成長</text:span><text:span text:style-name="T15">（</text:span><text:span text:style-name="T444">每個 </text:span><text:span text:style-name="T445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5">線性成長</text:span><text:span text:style-name="T15">（</text:span><text:span text:style-name="T444">每個 </text:span><text:span text:style-name="T445">RTT +1</text:span><text:span text:style-name="T15">）</text:span><text:span text:style-name="T16">(</text:span><text:span text:style-name="T446">RTT </text:span><text:span text:style-name="T447">：</text:span><text:span text:style-name="T446">Round Trip Time</text:span><text:span text:style-name="T447">（往返時間）</text:span><text:span text:style-name="T446">= </text:span><text:span text:style-name="T447">封包出去 </text:span><text:span text:style-name="T446">+ ACK </text:span><text:span text:style-name="T447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8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9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50"><text:span text:style-name="T119">重新進入 </text:span><text:span text:style-name="T451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52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9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50"><text:span text:style-name="T119">進入 </text:span><text:span text:style-name="T451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6">Timeout </text:span><text:span text:style-name="T375">代表網路嚴重問題</text:span><text:span text:style-name="T20">，</text:span><text:span text:style-name="T453">cwnd </text:span><text:span text:style-name="T454">重設回 </text:span><text:span text:style-name="T453">1 </text:span><text:span text:style-name="T454">從頭來</text:span><text:span text:style-name="T20">；</text:span><text:span text:style-name="T455">3 </text:span><text:span text:style-name="T456">個重複 </text:span><text:span text:style-name="T455">ACK </text:span><text:span text:style-name="T456">只是單一封包遺失</text:span><text:span text:style-name="T20">，</text:span><text:span text:style-name="T453">cwnd </text:span><text:span text:style-name="T454">直接減半後繼續 </text:span><text:span text:style-name="T453">Congestion Avoidance</text:span><text:span text:style-name="T454">，不用從頭重來</text:span><text:span text:style-name="T20">。</text:span><text:span text:style-name="T42">(</text:span><text:span text:style-name="T457">Timeout → cwnd = 1</text:span><text:span text:style-name="T458">；</text:span><text:span text:style-name="T457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1">OK </text:span><text:span text:style-name="T16">→ CA </text:span><text:span text:style-name="T15">階段線性增加（</text:span><text:span text:style-name="T120">每 </text:span><text:span text:style-name="T256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6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9">AIMD </text:span><text:span text:style-name="T460">本質：用 </text:span><text:span text:style-name="T459">ACK </text:span><text:span text:style-name="T460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6">用 </text:span><text:span text:style-name="T265">ACK </text:span><text:span text:style-name="T266">當回饋不斷自我調節</text:span><text:span text:style-name="T20">。</text:span></text:p>
          </table:table-cell>
        </table:table-row>
      </table:table>
      <text:h text:style-name="P18" text:outline-level="2" loext:marker-style-name="T461"><text:soft-page-break/><text:span text:style-name="T461">TCP </text:span><text:span text:style-name="T462">七字口訣 <text:s text:c="2"/>握</text:span><text:span text:style-name="T461">(</text:span><text:span text:style-name="T462">三次握手</text:span><text:span text:style-name="T461">) → </text:span><text:span text:style-name="T462">衝</text:span><text:span text:style-name="T461">(Slow Start </text:span><text:span text:style-name="T462">指數成長</text:span><text:span text:style-name="T461">) → </text:span><text:span text:style-name="T462">穩</text:span><text:span text:style-name="T461">(CA </text:span><text:span text:style-name="T462">線性成長</text:span><text:span text:style-name="T461">) → </text:span><text:span text:style-name="T462">看</text:span><text:span text:style-name="T461">(min(rwnd,cwnd)) → </text:span><text:span text:style-name="T462">滑</text:span><text:span text:style-name="T461">(Sliding Window) → </text:span><text:span text:style-name="T462">救</text:span><text:span text:style-name="T461">(Timeout / 3 Dup ACK) → </text:span><text:span text:style-name="T462">循</text:span><text:span text:style-name="T461">(ACK </text:span><text:span text:style-name="T462">回饋循環</text:span><text:span text:style-name="T461">)</text:span></text:h>
      <text:h text:style-name="P25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22">持續用 </text:span><text:span text:style-name="T463">ACK </text:span><text:span text:style-name="T422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300"><text:span text:style-name="T301">A</text:span><text:span text:style-name="T300"/></text:p>
          </table:table-cell>
          <table:table-cell table:style-name="表格83.A2" office:value-type="string">
            <text:p text:style-name="P20" loext:marker-style-name="T299"><text:span text:style-name="T256">Address Record</text:span><text:span text:style-name="T299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8">IPv4 </text:span><text:span text:style-name="T341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300"><text:span text:style-name="T301">NS</text:span><text:span text:style-name="T300"/></text:p>
          </table:table-cell>
          <table:table-cell table:style-name="表格83.A3" office:value-type="string">
            <text:p text:style-name="P20" loext:marker-style-name="T299"><text:span text:style-name="T256">Name Server</text:span><text:span text:style-name="T299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4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300"><text:span text:style-name="T301">MX</text:span><text:span text:style-name="T300"/></text:p>
          </table:table-cell>
          <table:table-cell table:style-name="表格83.A2" office:value-type="string">
            <text:p text:style-name="P20" loext:marker-style-name="T299"><text:span text:style-name="T256">Mail Exchange</text:span><text:span text:style-name="T299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3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300"><text:span text:style-name="T301">CNAME</text:span><text:span text:style-name="T300"/></text:p>
          </table:table-cell>
          <table:table-cell table:style-name="表格83.A3" office:value-type="string">
            <text:p text:style-name="P20" loext:marker-style-name="T299"><text:span text:style-name="T256">Canonical Name</text:span><text:span text:style-name="T299"/></text:p>
          </table:table-cell>
          <table:table-cell table:style-name="表格83.A3" office:value-type="string">
            <text:p text:style-name="P20" loext:marker-style-name="T465"><text:span text:style-name="T447">設定網域別名，指向另一個網域</text:span><text:span text:style-name="T465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6">補充：</text:span><text:span text:style-name="T467">AAAA record → </text:span><text:span text:style-name="T466">回傳 </text:span><text:span text:style-name="T467">IPv6 </text:span><text:span text:style-name="T466">位址，見第三篇 </text:span><text:span text:style-name="T467">Dual Stack</text:span><text:span text:style-name="T466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8"><text:span text:style-name="T117">本機快取（</text:span><text:span text:style-name="T389">Cache</text:span><text:span text:style-name="T117">）</text:span></text:p>
          </table:table-cell>
          <table:table-cell table:style-name="表格84.A3" office:value-type="string">
            <text:p text:style-name="P20" loext:marker-style-name="T469"><text:span text:style-name="T394">先檢查電腦或瀏覽器有無記住此網址的 </text:span><text:span text:style-name="T393">IP</text:span><text:span text:style-name="T394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70"><text:span text:style-name="T387">Local DNS </text:span><text:span text:style-name="T388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71"><text:span text:style-name="T385">Root DNS </text:span><text:span text:style-name="T384">伺服器</text:span></text:p>
          </table:table-cell>
          <table:table-cell table:style-name="表格84.A3" office:value-type="string">
            <text:p text:style-name="P20" loext:marker-style-name="T106"><text:span text:style-name="T472">全球共 </text:span><text:span text:style-name="T473">13 </text:span><text:span text:style-name="T472">組根 </text:span><text:span text:style-name="T473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380"><text:span text:style-name="T382">TLD DNS </text:span><text:span text:style-name="T381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4">管理頂層網域（</text:span><text:span text:style-name="T475">.com</text:span><text:span text:style-name="T474">、</text:span><text:span text:style-name="T475">.tw</text:span><text:span text:style-name="T474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9">TLD </text:span><text:span text:style-name="T118">是 </text:span><text:span text:style-name="T449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6"><text:span text:style-name="T477">Authoritative DNS</text:span><text:span text:style-name="T476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5">DNS </text:span><text:span text:style-name="T363">幫你問完 ＝ </text:span><text:span text:style-name="T365">Recursive</text:span><text:span text:style-name="T363">（遞迴）</text:span><text:span text:style-name="T20">；</text:span><text:span text:style-name="T283">你自己去問 ＝ </text:span><text:span text:style-name="T284">Iterative</text:span><text:span text:style-name="T283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9"><text:span text:style-name="T256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300"><text:span text:style-name="T70">你自己逐層查詢</text:span><text:span text:style-name="T300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9"><text:span text:style-name="T120">你只問 </text:span><text:span text:style-name="T256">1 </text:span><text:span text:style-name="T120">次</text:span></text:p>
          </table:table-cell>
          <table:table-cell table:style-name="表格85.A4" office:value-type="string">
            <text:p text:style-name="P20" loext:marker-style-name="T300"><text:span text:style-name="T70">每層各問一次，共多次</text:span><text:span text:style-name="T300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8">Recursive</text:span><text:span text:style-name="T479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8">Iterative</text:span><text:span text:style-name="T479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9">一般使用者採 </text:span><text:span text:style-name="T404">Recursive</text:span><text:span text:style-name="T369">（簡單方便）</text:span><text:span text:style-name="T20">；</text:span><text:span text:style-name="T332">DNS </text:span><text:span text:style-name="T331">伺服器之間採 </text:span><text:span text:style-name="T332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70">對外完全開放、任何人都可以使用的 </text:span><text:span text:style-name="T371">DNS </text:span><text:span text:style-name="T370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80">攻擊者偽造 </text:span><text:span text:style-name="T481">DNS </text:span><text:span text:style-name="T480">回應</text:span><text:span text:style-name="T15">，</text:span><text:span text:style-name="T482">將惡意 </text:span><text:span text:style-name="T483">IP </text:span><text:span text:style-name="T482">植入 </text:span><text:span text:style-name="T483">DNS </text:span><text:span text:style-name="T482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4">攻擊者偽造受害者 </text:span><text:span text:style-name="T485">IP </text:span><text:span text:style-name="T89">發送查詢</text:span><text:span text:style-name="T15">，</text:span><text:span text:style-name="T483">DNS </text:span><text:span text:style-name="T482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6">數位簽章機制</text:span><text:span text:style-name="T20">，</text:span><text:span text:style-name="T171">讓接收方能驗證 </text:span><text:span text:style-name="T244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7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4">無法防禦 </text:span><text:span text:style-name="T488">DoS / DDoS </text:span><text:span text:style-name="T464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4"><text:span text:style-name="T206">DNSSEC</text:span><text:span text:style-name="T167"> = </text:span><text:span text:style-name="T430">驗證真偽，不是加密，不防 </text:span><text:span text:style-name="T431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7">申論題標準答案</text:span></text:p>
            <text:p text:style-name="P11"><text:span text:style-name="T258">一、</text:span><text:span text:style-name="T259">DNS </text:span><text:span text:style-name="T258">功能：</text:span><text:span text:style-name="T42">DNS </text:span><text:span text:style-name="T20">為網際網路中負責</text:span><text:span text:style-name="T305">將網域名稱轉換為 </text:span><text:span text:style-name="T302">IP </text:span><text:span text:style-name="T305">位址</text:span><text:span text:style-name="T20">的分散式系統。</text:span></text:p>
            <text:p text:style-name="P12"><text:span text:style-name="T258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8">三、</text:span><text:span text:style-name="T259">Recursive</text:span><text:span text:style-name="T258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8">四、</text:span><text:span text:style-name="T259">Iterative</text:span><text:span text:style-name="T258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8">五、</text:span><text:span text:style-name="T259">DNSSEC</text:span><text:span text:style-name="T258">：</text:span><text:span text:style-name="T20">透過</text:span><text:span text:style-name="T86">數位簽章</text:span><text:span text:style-name="T489">驗證 </text:span><text:span text:style-name="T490">DNS </text:span><text:span text:style-name="T489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8">無法防禦 </text:span><text:span text:style-name="T457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91">IGP</text:span><text:span text:style-name="T34"> vs </text:span><text:span text:style-name="T491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6">Interior Gateway Protocol</text:span><text:span text:style-name="T15">，在</text:span><text:span text:style-name="T341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6">Exterior Gateway Protocol</text:span><text:span text:style-name="T15">，</text:span><text:span text:style-name="T464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2">公司／校園內 → 用 </text:span><text:span text:style-name="T493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4">公司與公司間 → 用 </text:span><text:span text:style-name="T495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6">把網路切成多個區域（</text:span><text:span text:style-name="T497">Area</text:span><text:span text:style-name="T496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1">所有 </text:span><text:span text:style-name="T332">Area </text:span><text:span text:style-name="T331">都必須連到 </text:span><text:span text:style-name="T332">Area 0</text:span><text:span text:style-name="T331">（骨幹區域）</text:span><text:span text:style-name="T20">。</text:span><text:span text:style-name="T498">Area 0 </text:span><text:span text:style-name="T499">就像高速公路主幹道，其他 </text:span><text:span text:style-name="T498">Area </text:span><text:span text:style-name="T499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500">中間一定有「主幹道」就是 </text:span><text:span text:style-name="T501">Area 0</text:span><text:span text:style-name="T500">；所有大樓要互通都必須先連到 </text:span><text:span text:style-name="T501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2">Backbone</text:span></text:p>
          </table:table-cell>
          <table:table-cell table:style-name="表格92.A3" office:value-type="string">
            <text:p text:style-name="P20" loext:marker-style-name="T503"><text:span text:style-name="T504">在 </text:span><text:span text:style-name="T502">Area 0</text:span></text:p>
          </table:table-cell>
          <table:table-cell table:style-name="表格92.A3" office:value-type="string">
            <text:p text:style-name="P20" loext:marker-style-name="T106"><text:span text:style-name="T504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5"><text:span text:style-name="T506">高速公路主幹上的節點</text:span><text:span text:style-name="T505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7">ABR</text:span></text:p>
          </table:table-cell>
          <table:table-cell table:style-name="表格92.A2" office:value-type="string">
            <text:p text:style-name="P20" loext:marker-style-name="T508"><text:span text:style-name="T509">跨 </text:span><text:span text:style-name="T507">Area </text:span><text:span text:style-name="T509">橋樑</text:span></text:p>
          </table:table-cell>
          <table:table-cell table:style-name="表格92.A2" office:value-type="string">
            <text:p text:style-name="P20" loext:marker-style-name="T508"><text:span text:style-name="T509">同時連 </text:span><text:span text:style-name="T507">Area 0 </text:span><text:span text:style-name="T509">與其他 </text:span><text:span text:style-name="T507">Area</text:span><text:span text:style-name="T509">，是區域間唯一合法的橋</text:span></text:p>
          </table:table-cell>
          <table:table-cell table:style-name="表格92.A2" office:value-type="string">
            <text:p text:style-name="P20" loext:marker-style-name="T450"><text:span text:style-name="T119">不同部門之間的聯絡窗口</text:span><text:span text:style-name="T450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82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6">✗ ABR </text:span><text:span text:style-name="T251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6">✗ ASBR </text:span><text:span text:style-name="T251">是用來跨越不同 </text:span><text:span text:style-name="T436">Area</text:span><text:span text:style-name="T251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6">✗ </text:span><text:span text:style-name="T251">任意兩個 </text:span><text:span text:style-name="T436">Area </text:span><text:span text:style-name="T251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1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10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11">❁</text:span><text:span text:style-name="T20">假設你收到兩條路由：</text:span><text:span text:style-name="T512"><text:line-break/>Route A: AS-PATH = 100 200 300<text:line-break/>Route B: AS-PATH = 400 300<text:line-break/><text:line-break/></text:span><text:span text:style-name="T20">你先不要管 </text:span><text:span text:style-name="T512">Route </text:span><text:span text:style-name="T20">是什麼。</text:span><text:span text:style-name="T512"><text:line-break/><text:line-break/></text:span><text:span text:style-name="T20">只看 </text:span><text:span text:style-name="T512">AS-PATH</text:span><text:span text:style-name="T20">：</text:span><text:span text:style-name="T512">100 200 300 <text:s/></text:span><text:span text:style-name="T20">意思：我 ← </text:span><text:span text:style-name="T512">AS100 ← AS200 ← AS300<text:line-break/><text:line-break/></text:span><text:span text:style-name="T20">而</text:span><text:span text:style-name="T512">400 300 <text:s/></text:span><text:span text:style-name="T20">意思：我 ← </text:span><text:span text:style-name="T512">AS400 ← AS300<text:line-break/><text:line-break/></text:span><text:span text:style-name="T513">AS-PATH </text:span><text:span text:style-name="T375">就只是：這個路由消息經過了哪些 </text:span><text:span text:style-name="T513">AS </text:span><text:span text:style-name="T375">的名單。就這樣而已。</text:span><text:span text:style-name="T512"><text:line-break/><text:line-break/></text:span><text:span text:style-name="T20">然後 </text:span><text:span text:style-name="T514">BGP</text:span><text:span text:style-name="T512"> </text:span><text:span text:style-name="T20">看到：</text:span><text:span text:style-name="T512"><text:line-break/><text:line-break/>100 200 300 <text:s/></text:span><text:span text:style-name="T20">有 </text:span><text:span text:style-name="T512">3 </text:span><text:span text:style-name="T20">個 </text:span><text:span text:style-name="T512">AS</text:span><text:span text:style-name="T20">。</text:span><text:span text:style-name="T512"><text:line-break/><text:line-break/>400 300 <text:s/></text:span><text:span text:style-name="T20">有 </text:span><text:span text:style-name="T512">2 </text:span><text:span text:style-name="T20">個 </text:span><text:span text:style-name="T512">AS</text:span><text:span text:style-name="T20">。</text:span><text:span text:style-name="T512"><text:line-break/><text:line-break/></text:span><text:span text:style-name="T20">於是它想：</text:span><text:span text:style-name="T336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4">AS-PATH </text:span><text:span text:style-name="T369">純粹是 </text:span><text:span text:style-name="T404">BGP </text:span><text:span text:style-name="T369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6" loext:marker-style-name="T21"><text:span text:style-name="T170">BGP(Border Gateway Protocol) </text:span><text:span text:style-name="T20">不像 </text:span><text:span text:style-name="T42">OSPF </text:span><text:span text:style-name="T20">會自己算最短距離，它是在「</text:span><text:span text:style-name="T372">比條件、看政策</text:span><text:span text:style-name="T20">」。與其硬背排序表，不如先搞懂下面這 </text:span><text:span text:style-name="T512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5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5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7">TCP 179</text:p>
          </table:table-cell>
          <table:table-cell table:style-name="表格94.A2" office:value-type="string">
            <text:p text:style-name="P20" loext:marker-style-name="T106"><text:span text:style-name="T516">BGP </text:span><text:span text:style-name="T517">跑在 </text:span><text:span text:style-name="T516">TCP</text:span><text:span text:style-name="T109">，</text:span><text:span text:style-name="T517">埠號 </text:span><text:span text:style-name="T516">179</text:span><text:span text:style-name="T109">（不是 </text:span><text:span text:style-name="T518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8">TCP </text:span><text:span text:style-name="T109">的可靠重送與順序保證。考：</text:span><text:span text:style-name="T519">BGP </text:span><text:span text:style-name="T381">傳輸層協定 → </text:span><text:span text:style-name="T519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7">Path Vector</text:p>
          </table:table-cell>
          <table:table-cell table:style-name="表格94.A3" office:value-type="string">
            <text:p text:style-name="P20" loext:marker-style-name="T106"><text:span text:style-name="T518">BGP </text:span><text:span text:style-name="T109">屬於 </text:span><text:span text:style-name="T518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20">把「整條 </text:span><text:span text:style-name="T521">AS </text:span><text:span text:style-name="T520">路徑」報給你</text:span><text:span text:style-name="T109">。</text:span><text:span text:style-name="T518">RIP</text:span><text:span text:style-name="T109">＝</text:span><text:span text:style-name="T518">Distance </text:span><text:soft-page-break/><text:span text:style-name="T518">Vector</text:span><text:span text:style-name="T109">、</text:span><text:span text:style-name="T518">OSPF</text:span><text:span text:style-name="T109">＝</text:span><text:span text:style-name="T518">Link State</text:span><text:span text:style-name="T109">、</text:span><text:span text:style-name="T518">BGP</text:span><text:span text:style-name="T109">＝</text:span><text:span text:style-name="T518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8"><text:span text:style-name="T522">AS-PATH</text:span><text:span text:style-name="T523">（</text:span><text:span text:style-name="T524">防迴圈</text:span><text:span text:style-name="T523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09">防 </text:span><text:span text:style-name="T525">Routing Loop</text:span></text:p>
          </table:table-cell>
          <table:table-cell table:style-name="表格94.A2" office:value-type="string">
            <text:p text:style-name="P20" loext:marker-style-name="T106"><text:span text:style-name="T519">AS </text:span><text:span text:style-name="T381">一看到 </text:span><text:span text:style-name="T519">AS-PATH </text:span><text:span text:style-name="T381">裡有「自己的 </text:span><text:span text:style-name="T519">AS </text:span><text:span text:style-name="T381">編號」就立刻丟棄，避免繞圈</text:span><text:span text:style-name="T109">。考「</text:span><text:span text:style-name="T518">AS-PATH </text:span><text:span text:style-name="T109">主要功能」→ </text:span><text:span text:style-name="T518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7">Local Preference</text:p>
          </table:table-cell>
          <table:table-cell table:style-name="表格94.A3" office:value-type="string">
            <text:p text:style-name="P29">數值越大越優先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6">通用屬性中最重要！</text:span><text:span text:style-name="T109">是</text:span><text:span text:style-name="T520"> </text:span><text:span text:style-name="T521">AS </text:span><text:span text:style-name="T520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8"><text:span text:style-name="T522">AS-PATH</text:span><text:span text:style-name="T523">（</text:span><text:span text:style-name="T524">長度</text:span><text:span text:style-name="T523">）</text:span></text:p>
          </table:table-cell>
          <table:table-cell table:style-name="表格94.A2" office:value-type="string">
            <text:p text:style-name="P30"><text:span text:style-name="T527">路徑越短（經過 </text:span><text:span text:style-name="T528">AS </text:span><text:span text:style-name="T527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381">但要先比 </text:span><text:span text:style-name="T519">Weight</text:span><text:span text:style-name="T381">、</text:span><text:span text:style-name="T519">Local Pref</text:span><text:span text:style-name="T381">，前面平手才輪到它</text:span><text:span text:style-name="T109">——</text:span><text:span text:style-name="T392">別誤以為 </text:span><text:span text:style-name="T529">AS-PATH </text:span><text:span text:style-name="T392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7">MED</text:p>
          </table:table-cell>
          <table:table-cell table:style-name="表格94.A3" office:value-type="string">
            <text:p text:style-name="P31">數值越小越優先</text:p>
          </table:table-cell>
          <table:table-cell table:style-name="表格94.A3" office:value-type="string">
            <text:p text:style-name="P20" loext:marker-style-name="T106"><text:span text:style-name="T520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7">eBGP vs iBGP</text:p>
          </table:table-cell>
          <table:table-cell table:style-name="表格94.A2" office:value-type="string">
            <text:p text:style-name="P32"><text:span text:style-name="T528">eBGP </text:span><text:span text:style-name="T527">優先於 </text:span><text:span text:style-name="T528">iBGP</text:span></text:p>
          </table:table-cell>
          <table:table-cell table:style-name="表格94.A2" office:value-type="string">
            <text:p text:style-name="P20" loext:marker-style-name="T106"><text:span text:style-name="T518">eBGP</text:span><text:span text:style-name="T109">＝外面直接告訴你；</text:span><text:span text:style-name="T518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8"><text:span text:style-name="T522">MED</text:span><text:span text:style-name="T523">（比較範圍）</text:span></text:p>
          </table:table-cell>
          <table:table-cell table:style-name="表格94.A3" office:value-type="string">
            <text:p text:style-name="P33"><text:span text:style-name="T527">只比較同一個「來源 </text:span><text:span text:style-name="T528">AS</text:span><text:span text:style-name="T527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318"> </text:span><text:span text:style-name="T530">不同 </text:span><text:span text:style-name="T531">AS </text:span><text:span text:style-name="T530">的 </text:span><text:span text:style-name="T531">MED </text:span><text:span text:style-name="T530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7">Weight</text:p>
          </table:table-cell>
          <table:table-cell table:style-name="表格94.A2" office:value-type="string">
            <text:p text:style-name="P20" loext:marker-style-name="T106"><text:span text:style-name="T532">Cisco </text:span><text:span text:style-name="T533">私有</text:span><text:span text:style-name="T109">，</text:span><text:span text:style-name="T534">非 </text:span><text:span text:style-name="T535">BGP </text:span><text:span text:style-name="T534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8">BGP </text:span><text:span text:style-name="T109">標準屬性」選項別選 </text:span><text:span text:style-name="T518">Weight</text:span><text:span text:style-name="T109">（</text:span><text:span text:style-name="T518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85">BGP</text:span><text:span text:style-name="T86">＝</text:span><text:span text:style-name="T85">TCP 179</text:span><text:span text:style-name="T20">、</text:span><text:span text:style-name="T298">Path Vector</text:span><text:span text:style-name="T20">｜</text:span><text:span text:style-name="T536">AS-PATH</text:span><text:span text:style-name="T537">：防迴圈＋越短越好</text:span><text:span text:style-name="T20">｜</text:span><text:span text:style-name="T536">Local Preference</text:span><text:span text:style-name="T537">：越大越好</text:span><text:span text:style-name="T20">｜</text:span><text:span text:style-name="T536">MED</text:span><text:span text:style-name="T537">：越小越好</text:span><text:span text:style-name="T20">＋</text:span><text:span text:style-name="T128">只比同 </text:span><text:span text:style-name="T127">AS</text:span><text:span text:style-name="T20">｜</text:span><text:span text:style-name="T85">eBGP &gt; iBGP</text:span><text:span text:style-name="T20">｜</text:span><text:span text:style-name="T538">Weight</text:span><text:span text:style-name="T539">：</text:span><text:span text:style-name="T538">Cisco </text:span><text:span text:style-name="T539">私有</text:span><text:span text:style-name="T20">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6">✗ </text:span><text:span text:style-name="T398">AS-PATH </text:span><text:span text:style-name="T399">是 </text:span><text:span text:style-name="T398">BGP </text:span><text:span text:style-name="T399">選路最重要的屬性</text:span><text:span text:style-name="T251">　→　</text:span><text:span text:style-name="T20">✓ </text:span><text:span text:style-name="T284">Local Preference </text:span><text:span text:style-name="T283">才是最重要的通用屬性</text:span><text:span text:style-name="T20">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6">✗ </text:span><text:span text:style-name="T398">AS-PATH </text:span><text:span text:style-name="T399">越短就一定會選那條</text:span><text:span text:style-name="T251">　→　</text:span><text:span text:style-name="T20">✓ </text:span><text:span text:style-name="T369">只有前面的屬性（</text:span><text:span text:style-name="T404">Local Pref </text:span><text:span text:style-name="T369">等）完全相同時，才會比較 </text:span><text:span text:style-name="T404">AS-PATH</text:span><text:span text:style-name="T20">。</text:span></text:p>
            <text:p text:style-name="P12"><text:span text:style-name="T436">✗ </text:span><text:span text:style-name="T398">BGP </text:span><text:span text:style-name="T399">會自己計算最短路徑</text:span><text:span text:style-name="T251">　→　</text:span><text:span text:style-name="T20">✓ </text:span><text:span text:style-name="T42">BGP </text:span><text:span text:style-name="T20">不算距離，</text:span><text:span text:style-name="T493">OSPF </text:span><text:span text:style-name="T492">才做最短路徑計算</text:span><text:span text:style-name="T20">。</text:span></text:p>
            <text:p text:style-name="P12"><text:span text:style-name="T436">✗ </text:span><text:span text:style-name="T398">iBGP </text:span><text:span text:style-name="T399">比 </text:span><text:span text:style-name="T398">eBGP </text:span><text:span text:style-name="T399">優先</text:span><text:span text:style-name="T251">　→　</text:span><text:span text:style-name="T20">✓ </text:span><text:span text:style-name="T435">eBGP </text:span><text:span text:style-name="T434">優先於 </text:span><text:span text:style-name="T435">iBGP</text:span><text:span text:style-name="T20">（外部路由更可信）。</text:span></text:p>
            <text:p text:style-name="P12"><text:span text:style-name="T436">✗ </text:span><text:span text:style-name="T398">MED </text:span><text:span text:style-name="T399">可以跨不同 </text:span><text:span text:style-name="T398">AS </text:span><text:span text:style-name="T399">互相比較</text:span><text:span text:style-name="T251">　→　</text:span><text:span text:style-name="T20">✓</text:span><text:span text:style-name="T540"> </text:span><text:span text:style-name="T541">MED </text:span><text:span text:style-name="T540">只能比較來自同一個 </text:span><text:span text:style-name="T541">AS </text:span><text:span text:style-name="T540">的路由</text:span><text:span text:style-name="T20">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</text:span><text:span text:style-name="T84">你的電腦要連到健保署</text:span><text:span text:style-name="T20">，</text:span><text:span text:style-name="T86">有兩條對外線路</text:span><text:span text:style-name="T20">（</text:span><text:span text:style-name="T171">中華電信 </text:span><text:span text:style-name="T244">AS-PATH </text:span><text:span text:style-name="T171">長度 </text:span><text:span text:style-name="T244">2</text:span><text:span text:style-name="T20">、</text:span><text:span text:style-name="T158">台灣固網 </text:span><text:span text:style-name="T292">AS-PATH </text:span><text:span text:style-name="T158">長度 </text:span><text:span text:style-name="T292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62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62">防火牆 </text:span><text:span text:style-name="T163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</text:span><text:span text:style-name="T163">NAT</text:span></text:p>
          </table:table-cell>
          <table:table-cell table:style-name="表格96.A2" office:value-type="string">
            <text:p text:style-name="P20" loext:marker-style-name="T106"><text:span text:style-name="T109">把</text:span><text:span text:style-name="T534">私有 </text:span><text:span text:style-name="T477">IP </text:span><text:span text:style-name="T534">換成公網 </text:span><text:span text:style-name="T477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</text:span><text:span text:style-name="T163">BGP </text:span><text:span text:style-name="T162">選路</text:span></text:p>
          </table:table-cell>
          <table:table-cell table:style-name="表格96.A3" office:value-type="string">
            <text:p text:style-name="P20" loext:marker-style-name="T106"><text:span text:style-name="T109">比條件：</text:span><text:span text:style-name="T381">若相同選 </text:span><text:span text:style-name="T382">AS-PATH </text:span><text:span text:style-name="T381">較短路</text:span><text:span text:style-name="T382">1</text:span><text:span text:style-name="T109">；</text:span><text:span text:style-name="T542">若中華電信 </text:span><text:span text:style-name="T543">Local Pref </text:span><text:span text:style-name="T542">較高則不管長短走路</text:span><text:span text:style-name="T543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62">出 </text:span><text:span text:style-name="T163">ISP </text:span><text:span text:style-name="T162">跨 </text:span><text:span text:style-name="T163">AS</text:span></text:p>
          </table:table-cell>
          <table:table-cell table:style-name="表格96.A2" office:value-type="string">
            <text:p text:style-name="P20" loext:marker-style-name="T106"><text:span text:style-name="T388">封包經過多個 </text:span><text:span text:style-name="T387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544">BGP → </text:span><text:span text:style-name="T545">決定「要怎麼走」</text:span></text:p>
            <text:p text:style-name="P12" loext:marker-style-name="T21"><text:span text:style-name="T20">生活比喻：</text:span><text:span text:style-name="T84">海關（防火牆）</text:span><text:span text:style-name="T20">→ </text:span><text:span text:style-name="T84">換護照</text:span><text:span text:style-name="T83">/</text:span><text:span text:style-name="T84">身份（</text:span><text:span text:style-name="T83">NAT</text:span><text:span text:style-name="T84">）</text:span><text:span text:style-name="T20">→ </text:span><text:span text:style-name="T188">選航班（</text:span><text:span text:style-name="T187">BGP</text:span><text:span text:style-name="T188">）</text:span><text:span text:style-name="T20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546">✗ </text:span><text:span text:style-name="T547">封包送不出去</text:span><text:span text:style-name="T251"> → 一定是 </text:span><text:span text:style-name="T436">BGP </text:span><text:span text:style-name="T251">問題　→　</text:span><text:span text:style-name="T20">✓ 應依序排查：</text:span><text:span text:style-name="T84">防火牆有沒有擋？</text:span><text:span text:style-name="T83">NAT </text:span><text:span text:style-name="T84">有沒有設？</text:span><text:span text:style-name="T83">BGP </text:span><text:span text:style-name="T84">有沒有路？</text:span></text:p>
            <text:p text:style-name="P12"><text:span text:style-name="T436">✗ </text:span><text:span text:style-name="T251">有路但連不到 → 是 </text:span><text:span text:style-name="T436">BGP </text:span><text:span text:style-name="T251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6">✗ </text:span><text:span text:style-name="T547">走到錯誤的 </text:span><text:span text:style-name="T546">ISP </text:span><text:span text:style-name="T436">→ </text:span><text:span text:style-name="T251">是 </text:span><text:span text:style-name="T436">NAT </text:span><text:span text:style-name="T251">設定問題　→　</text:span><text:span text:style-name="T20">✓ </text:span><text:span text:style-name="T363">走到錯誤 </text:span><text:span text:style-name="T365">ISP </text:span><text:span text:style-name="T363">是 </text:span><text:span text:style-name="T365">BGP </text:span><text:span text:style-name="T363">選路問題（</text:span><text:span text:style-name="T365">Local Pref </text:span><text:span text:style-name="T363">或 </text:span><text:span text:style-name="T365">AS-PATH </text:span><text:span text:style-name="T363">設定不對）</text:span><text:span text:style-name="T20">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232">SDN</text:span><text:span text:style-name="T231">（</text:span><text:span text:style-name="T232">Software Defined Networking</text:span><text:span text:style-name="T231">）</text:span><text:span text:style-name="T20">的核心概念是：</text:span><text:span text:style-name="T154">將「控制平面」與「資料平面」分離</text:span><text:span text:style-name="T20">。</text:span><text:span text:style-name="T369">傳統網路</text:span><text:span text:style-name="T20">中</text:span><text:span text:style-name="T369">路由器和交換器同時負責「決定資料走哪條路」和「實際傳送資料」</text:span><text:span text:style-name="T20">，</text:span><text:span text:style-name="T126">SDN </text:span><text:span text:style-name="T125">則把「決策」抽出來交給集中式的 </text:span><text:span text:style-name="T126">Controller </text:span><text:span text:style-name="T125">統一管理。</text:span><text:span text:style-name="T20">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ext:p text:style-name="P34" loext:marker-style-name="T21"><text:span text:style-name="T20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548">→ </text:span><text:span text:style-name="T20">查轉送表 </text:span><text:span text:style-name="T548">→ </text:span><text:span text:style-name="T20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9746C1B.png" xlink:type="simple" xlink:show="embed" xlink:actuate="onLoad" draw:mime-type="image/png"/></draw:frame><text:span text:style-name="T20"><text:line-break/><text:line-break/></text:span></text:p>
      <text:p text:style-name="P34" loext:marker-style-name="T21"><text:span text:style-name="T20"/></text:p>
      <text:p text:style-name="P34" loext:marker-style-name="T21"><text:span text:style-name="T20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205">控制平面（</text:span><text:span text:style-name="T206">Control Plane</text:span><text:span text:style-name="T205">）：</text:span><text:span text:style-name="T231">決定資料「怎麼走」</text:span><text:span text:style-name="T20">——負責路由決策的大腦。</text:span></text:p>
            <text:p text:style-name="P12"><text:span text:style-name="T205">資料平面（</text:span><text:span text:style-name="T206">Data Plane</text:span><text:span text:style-name="T205">）：</text:span><text:span text:style-name="T231">負責資料「實際傳送」</text:span><text:span text:style-name="T20">——執行指令的手腳。</text:span></text:p>
            <text:p text:style-name="P12"><text:span text:style-name="T167">🔑 </text:span><text:span text:style-name="T168">關鍵：</text:span><text:span text:style-name="T84">兩者分離，是 </text:span><text:span text:style-name="T83">SDN </text:span><text:span text:style-name="T84">最核心的設計原則</text:span><text:span text:style-name="T20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35"><text:span text:style-name="T549">🟦 Application Layer </text:span><text:span text:style-name="T527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36"><text:span text:style-name="T549">🟨 Control Layer </text:span><text:span text:style-name="T527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37"><text:span text:style-name="T549">🟩 Infrastructure Layer </text:span><text:span text:style-name="T527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</text:span><text:span text:style-name="T84">分平面＝控制／資料分離</text:span><text:span text:style-name="T20">；</text:span><text:span text:style-name="T550">三層＝</text:span><text:span text:style-name="T551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</text:span><text:span text:style-name="T186">把流量「智慧分配」到多台伺</text:span><text:soft-page-break/><text:span text:style-name="T186">服器，確保每台都不過載</text:span><text:span text:style-name="T20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</text:span><text:span text:style-name="T163">Round Robin</text:span><text:span text:style-name="T162">（輪詢）</text:span></text:p>
          </table:table-cell>
          <table:table-cell table:style-name="表格99.A2" office:value-type="string">
            <text:p text:style-name="P20" loext:marker-style-name="T106"><text:span text:style-name="T552">依序輪流分配</text:span><text:span text:style-name="T109">，</text:span><text:span text:style-name="T553">不考慮伺服器效能或負載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</text:span><text:span text:style-name="T163">Weighted Round Robin</text:span><text:span text:style-name="T162">（加權輪詢）</text:span></text:p>
          </table:table-cell>
          <table:table-cell table:style-name="表格99.A3" office:value-type="string">
            <text:p text:style-name="P20" loext:marker-style-name="T106"><text:span text:style-name="T552">依各伺服器處理能力設「權重」</text:span><text:span text:style-name="T109">，</text:span><text:span text:style-name="T397">能力強分到更多</text:span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</text:span><text:span text:style-name="T163">Session Stickiness</text:span><text:span text:style-name="T162">（會話黏著）</text:span></text:p>
          </table:table-cell>
          <table:table-cell table:style-name="表格99.A2" office:value-type="string">
            <text:p text:style-name="P20" loext:marker-style-name="T106"><text:span text:style-name="T554">同一使用者所有請求固定導向同一台</text:span><text:span text:style-name="T109">，</text:span><text:span text:style-name="T506">維持連線狀態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85">「</text:span><text:span text:style-name="T286">LB </text:span><text:span text:style-name="T285">輪、重、黏」</text:span><text:span text:style-name="T20">→ </text:span><text:span text:style-name="T84">輪＝</text:span><text:span text:style-name="T83">Round Robin</text:span><text:span text:style-name="T84">（輪流）；重＝</text:span><text:span text:style-name="T83">Weighted RR</text:span><text:span text:style-name="T84">（加權）；黏＝</text:span><text:span text:style-name="T83">Stickiness</text:span><text:span text:style-name="T84">（固定同一台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</text:span><text:span text:style-name="T555">內容傳遞網路</text:span><text:span text:style-name="T35">）</text:span></text:h>
      <text:p text:style-name="P22" loext:marker-style-name="T21"><text:span text:style-name="T85">CDN</text:span><text:span text:style-name="T86">（</text:span><text:span text:style-name="T85">Content Delivery Network</text:span><text:span text:style-name="T86">）</text:span><text:span text:style-name="T20">透過</text:span><text:span text:style-name="T84">在全球各地部署</text:span><text:span text:style-name="T20">「</text:span><text:span text:style-name="T283">邊緣伺服器（</text:span><text:span text:style-name="T284">Edge Server</text:span><text:span text:style-name="T283">）</text:span><text:span text:style-name="T20">」加速內容傳遞。</text:span><text:span text:style-name="T336">當你開啟 </text:span><text:span text:style-name="T337">Google </text:span><text:span text:style-name="T336">或 </text:span><text:span text:style-name="T337">YouTube</text:span><text:span text:style-name="T336">，不需跨越太平洋連到美國總部，而是連到你附近的 </text:span><text:span text:style-name="T337">CDN </text:span><text:span text:style-name="T336">節點</text:span><text:span text:style-name="T20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186">使用者輸入網址</text:span><text:span text:style-name="T20">（</text:span><text:span text:style-name="T42">www.example.com</text:span><text:span text:style-name="T20">）</text:span></text:p>
            <text:p text:style-name="P12" loext:marker-style-name="T21"><text:span text:style-name="T42">Step 2 </text:span><text:span text:style-name="T556">DNS </text:span><text:span text:style-name="T557">解析網址</text:span><text:span text:style-name="T20">，</text:span><text:span text:style-name="T558">找到對應 </text:span><text:span text:style-name="T559">CDN </text:span><text:span text:style-name="T558">的 </text:span><text:span text:style-name="T559">CNAME </text:span><text:span text:style-name="T558">記錄</text:span></text:p>
            <text:p text:style-name="P12" loext:marker-style-name="T21"><text:span text:style-name="T42">Step 3 </text:span><text:span text:style-name="T560">CNAME </text:span><text:span text:style-name="T561">將請求轉向 </text:span><text:span text:style-name="T560">CDN </text:span><text:span text:style-name="T561">服務商</text:span><text:span text:style-name="T20">（如 </text:span><text:span text:style-name="T42">cdn.example.net</text:span><text:span text:style-name="T20">）</text:span></text:p>
            <text:p text:style-name="P12" loext:marker-style-name="T21"><text:span text:style-name="T42">Step 4 </text:span><text:span text:style-name="T457">CDN </text:span><text:span text:style-name="T458">根據使用者地理位置，選擇最近的 </text:span><text:span text:style-name="T457">Edge </text:span><text:span text:style-name="T458">伺服器</text:span></text:p>
            <text:p text:style-name="P12" loext:marker-style-name="T21"><text:span text:style-name="T42">Step 5 Edge </text:span><text:span text:style-name="T20">伺服器將</text:span><text:span text:style-name="T266">快取內容</text:span><text:span text:style-name="T20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256">DNS </text:span><text:span text:style-name="T120">的一種記錄</text:span><text:span text:style-name="T15">，作用是「</text:span><text:span text:style-name="T562">網址指向另一個網址</text:span><text:span text:style-name="T15">」（不是 </text:span><text:span text:style-name="T16">IP</text:span><text:span text:style-name="T15">）。範例：</text:span><text:span text:style-name="T563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343">部署在全球各地靠近使用者的伺服器</text:span><text:span text:style-name="T15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560">CNAME</text:span><text:span text:style-name="T561">＝網址→網址</text:span><text:span text:style-name="T20">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62">高速傳輸（</text:span><text:span text:style-name="T163">eMBB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62">超低延遲（</text:span><text:span text:style-name="T163">URLLC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62">大量連線（</text:span><text:span text:style-name="T163">mMTC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</text:span><text:span text:style-name="T381">可連數百萬台裝置</text:span><text:span text:style-name="T109">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62">網路切片（</text:span><text:span text:style-name="T163">Network Slicing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564">將同一物理網路虛擬化為多個獨立「切片」</text:span><text:span text:style-name="T109">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57">5G </text:span><text:span text:style-name="T458">快、低、多、切</text:span><text:span text:style-name="T20">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oft-page-break/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</text:span><text:span text:style-name="T554">靠近使用者的 </text:span><text:span text:style-name="T565">Edge </text:span><text:span text:style-name="T554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451">CNAME = </text:span><text:span text:style-name="T119">網址 → 網址</text:span><text:span text:style-name="T109">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11">WiFi </text:span><text:span text:style-name="T110">用 </text:span><text:span text:style-name="T111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</text:span><text:span text:style-name="T86">用無線電波傳資料</text:span><text:span text:style-name="T20">，</text:span><text:span text:style-name="T128">若同時傳訊號會「撞在一起」</text:span><text:span text:style-name="T20">。</text:span><text:span text:style-name="T566">這個「決定誰先傳」的規則，就叫 </text:span><text:span text:style-name="T567">MAC </text:span><text:span text:style-name="T566">機制（</text:span><text:span text:style-name="T567">Media Access Control</text:span><text:span text:style-name="T566">）</text:span><text:span text:style-name="T20">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568">WiFi</text:span><text:span text:style-name="T555">：先聽再講（</text:span><text:span text:style-name="T568">CSMA/CA</text:span><text:span text:style-name="T555">）</text:span></text:h>
      <text:p text:style-name="P22" loext:marker-style-name="T21"><text:span text:style-name="T435">WiFi </text:span><text:span text:style-name="T434">採用「先聽再講」的競爭機制</text:span><text:span text:style-name="T20">，就像一群人用對講機：① </text:span><text:span text:style-name="T86">先聽頻道有沒有人在傳</text:span><text:span text:style-name="T20">；② </text:span><text:span text:style-name="T86">沒人傳才開始傳</text:span><text:span text:style-name="T20">；③ </text:span><text:span text:style-name="T86">有人在傳就等一段隨機時間再試</text:span><text:span text:style-name="T20">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7"><text:span text:style-name="T569">Carrier Sense</text:span><text:span text:style-name="T570"> </text:span><text:span text:style-name="T571">載波感測</text:span></text:p>
          </table:table-cell>
          <table:table-cell table:style-name="表格104.A2" office:value-type="string">
            <text:p text:style-name="P38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9"><text:span text:style-name="T569">Multiple Access </text:span><text:span text:style-name="T572">多重存取</text:span></text:p>
          </table:table-cell>
          <table:table-cell table:style-name="表格104.A3" office:value-type="string">
            <text:p text:style-name="P40">大家共用同一個頻道</text:p>
          </table:table-cell>
        </table:table-row>
        <table:table-row table:style-name="表格104.1">
          <table:table-cell table:style-name="表格104.A2" office:value-type="string">
            <text:p text:style-name="P41"><text:span text:style-name="T569">Collision Avoidance </text:span><text:span text:style-name="T573">碰撞避免</text:span></text:p>
          </table:table-cell>
          <table:table-cell table:style-name="表格104.A2" office:value-type="string">
            <text:p text:style-name="P42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74">WiFi </text:span><text:span text:style-name="T575">高速基礎</text:span></text:p>
            <text:p text:style-name="P11" loext:marker-style-name="T21"><text:span text:style-name="T20">另：</text:span><text:span text:style-name="T286">OFDM</text:span><text:span text:style-name="T285">（正交分頻多工）</text:span><text:span text:style-name="T20">— </text:span><text:span text:style-name="T370">將資料分成多個子頻道同時傳輸，讓頻寬利用率大幅提升</text:span><text:span text:style-name="T20">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86">當很多人在搶頻道，某些資料（語音、視訊）需要優先通過</text:span><text:span text:style-name="T20">，這就是 </text:span><text:span text:style-name="T406">EDCA</text:span><text:span text:style-name="T405">（</text:span><text:span text:style-name="T406">Enhanced Distributed Channel Access</text:span><text:span text:style-name="T405">）</text:span><text:span text:style-name="T20">的功能。</text:span><text:span text:style-name="T576">視訊通話</text:span><text:span text:style-name="T577">/</text:span><text:span text:style-name="T576">語音→少等、優先傳</text:span><text:span text:style-name="T20">；</text:span><text:span text:style-name="T363">網頁</text:span><text:span text:style-name="T365">/</text:span><text:span text:style-name="T363">大檔下載→稍微等一下也沒關係</text:span><text:span text:style-name="T20">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568">Bluetooth</text:span><text:span text:style-name="T555">：老大排班（</text:span><text:span text:style-name="T568">Master-Slave</text:span><text:span text:style-name="T555">）</text:span></text:h>
      <text:p text:style-name="P22" loext:marker-style-name="T21"><text:span text:style-name="T578">Bluetooth </text:span><text:span text:style-name="T579">不靠「搶」，而是由 </text:span><text:span text:style-name="T578">Master </text:span><text:span text:style-name="T579">統一分配時間</text:span><text:span text:style-name="T20">，</text:span><text:span text:style-name="T127">Slave </text:span><text:span text:style-name="T128">照順序傳資料</text:span><text:span text:style-name="T20">（</text:span><text:span text:style-name="T244">0~1ms </text:span><text:span text:style-name="T171">耳機、</text:span><text:span text:style-name="T244">1~2ms </text:span><text:span text:style-name="T171">滑鼠、</text:span><text:span text:style-name="T244">2~3ms </text:span><text:span text:style-name="T171">鍵盤、</text:span><text:span text:style-name="T244">3~4ms </text:span><text:span text:style-name="T171">再回耳機…</text:span><text:span text:style-name="T20">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80">為什麼要排班？</text:span></text:p>
            <text:p text:style-name="P11" loext:marker-style-name="T21"><text:span text:style-name="T20">因為</text:span><text:span text:style-name="T169">藍牙裝置大多是「即時設備」，延遲太久就沒用了</text:span><text:span text:style-name="T20">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581">WiFi = </text:span><text:span text:style-name="T582">菜市場（自由競爭，亂搶）；</text:span><text:span text:style-name="T581">Bluetooth = </text:span><text:span text:style-name="T582">公司會議室預約（固定排班，有秩序</text:span><text:span text:style-name="T20">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43">SCO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43">eSCO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/text:span><text:span text:style-name="T583"><text:s/></text:span><text:span text:style-name="T574">Bluetooth </text:span><text:span text:style-name="T575">抗干擾</text:span></text:p>
            <text:p text:style-name="P11" loext:marker-style-name="T21"><text:span text:style-name="T20">另：</text:span><text:span text:style-name="T286">FHSS</text:span><text:span text:style-name="T285">（跳頻展頻）— 在 </text:span><text:span text:style-name="T286">2.4GHz </text:span><text:span text:style-name="T285">頻段中每秒快速切換數百次</text:span><text:span text:style-name="T20">（每秒約 </text:span><text:span text:style-name="T42">1600 </text:span><text:span text:style-name="T20">次）</text:span><text:span text:style-name="T285">頻道</text:span><text:span text:style-name="T20">，</text:span><text:span text:style-name="T128">避免與其他設備干擾，提升穩定性</text:span><text:span text:style-name="T20">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</text:span><text:span text:style-name="T372">藍牙頻道像一條只有一個人能講話的走廊</text:span><text:span text:style-name="T20">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298">Time Slot</text:span><text:span text:style-name="T297">（時槽）＝將時間切成固定小區段</text:span><text:span text:style-name="T20">，</text:span><text:span text:style-name="T372">由不同裝置依序使用，避免碰撞並確保即時性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4">核心機制</text:p>
          </table:table-cell>
          <table:table-cell table:style-name="表格107.A2" office:value-type="string">
            <text:p text:style-name="P45"><text:span text:style-name="T570">CSMA/CA</text:span><text:span text:style-name="T571">（先偵聽再傳）</text:span></text:p>
          </table:table-cell>
          <table:table-cell table:style-name="表格107.A2" office:value-type="string">
            <text:p text:style-name="P46"><text:span text:style-name="T570">Master-Slave</text:span><text:span text:style-name="T571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47"><text:span text:style-name="T15">即時語音 </text:span><text:span text:style-name="T16">/ QoS</text:span></text:p>
          </table:table-cell>
          <table:table-cell table:style-name="表格107.A3" office:value-type="string">
            <text:p text:style-name="P48"><text:span text:style-name="T570">EDCA</text:span><text:span text:style-name="T571">（</text:span><text:span text:style-name="T570">QoS </text:span><text:span text:style-name="T571">優先）</text:span></text:p>
          </table:table-cell>
          <table:table-cell table:style-name="表格107.A3" office:value-type="string">
            <text:p text:style-name="P49"><text:span text:style-name="T570">SCO / eSCO</text:span><text:span text:style-name="T571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50">受干擾影響較大</text:p>
          </table:table-cell>
          <table:table-cell table:style-name="表格107.A3" office:value-type="string">
            <text:p text:style-name="P50">固定時槽非常穩定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335">L2CAP</text:span><text:span text:style-name="T35">：</text:span><text:span text:style-name="T584">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</text:span><text:span text:style-name="T585">負責：管理並分流不同類型的資料（語音、檔案、控制指令）</text:span><text:span text:style-name="T20">；</text:span><text:span text:style-name="T586">建立、管理、釋放「邏輯通道」</text:span><text:span text:style-name="T20">；</text:span><text:span text:style-name="T499">提供 </text:span><text:span text:style-name="T498">QoS </text:span><text:span text:style-name="T499">服務品質保證</text:span><text:span text:style-name="T20">。一句話記憶：</text:span><text:span text:style-name="T376">L2CAP </text:span><text:span text:style-name="T375">＝ 藍牙的資料管理中心</text:span><text:span text:style-name="T20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</text:span><text:span text:style-name="T587">邏輯通道</text:span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8"><text:span text:style-name="T522">Connection-oriented</text:span><text:span text:style-name="T523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110">有建立連線、雙方確認</text:span><text:span text:style-name="T109">，可靠、確保收到</text:span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28"><text:span text:style-name="T522">Connectionless</text:span><text:span text:style-name="T523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110">直接送出、不確認</text:span><text:span text:style-name="T109">，快速但可能遺失</text:span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28"><text:span text:style-name="T522">Signaling Channel</text:span><text:span text:style-name="T523">（信令通道）</text:span></text:p>
          </table:table-cell>
          <table:table-cell table:style-name="表格108.A2" table:number-columns-spanned="2" office:value-type="string">
            <text:p text:style-name="P51">控制管理用，不傳資料只管控制</text:p>
          </table:table-cell>
          <table:covered-table-cell/>
          <table:table-cell table:style-name="表格108.A2" office:value-type="string">
            <text:p text:style-name="P20" loext:marker-style-name="T106"><text:span text:style-name="T588">建立</text:span><text:span text:style-name="T589">/</text:span><text:span text:style-name="T588">釋放連線</text:span><text:span text:style-name="T109">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170">L2CAP </text:span><text:span text:style-name="T169">主要位於「資料鏈結層（</text:span><text:span text:style-name="T170">Data Link Layer</text:span><text:span text:style-name="T169">）」</text:span><text:span text:style-name="T20">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3">FW</text:p>
          </table:table-cell>
          <table:table-cell table:style-name="表格111.A2" office:value-type="string">
            <text:p text:style-name="P20" loext:marker-style-name="T14"><text:span text:style-name="T15">傳統防火牆，只看</text:span><text:span text:style-name="T590">封包「外面」</text:span><text:span text:style-name="T15">的 </text:span><text:span text:style-name="T591">IP</text:span><text:span text:style-name="T592">、</text:span><text:span text:style-name="T591">Port</text:span><text:span text:style-name="T592">、</text:span><text:span text:style-name="T591">Protocol</text:span></text:p>
          </table:table-cell>
        </table:table-row>
        <table:table-row table:style-name="表格111.1">
          <table:table-cell table:style-name="表格111.A3" office:value-type="string">
            <text:p text:style-name="P28"><text:span text:style-name="T593">WAF(</text:span><text:span text:style-name="T594">Web Application Firewall</text:span><text:span text:style-name="T593">)</text:span></text:p>
          </table:table-cell>
          <table:table-cell table:style-name="表格111.A3" office:value-type="string">
            <text:p text:style-name="P20" loext:marker-style-name="T14"><text:span text:style-name="T15">網站應用防火牆，會打開</text:span><text:span text:style-name="T447">封包「裡面」(HTTP/HTTPS 應用層內容)</text:span><text:span text:style-name="T15">，</text:span><text:span text:style-name="T79">防 </text:span><text:span text:style-name="T78">SQL Injection</text:span><text:span text:style-name="T79">、</text:span><text:span text:style-name="T78">XSS</text:span></text:p>
          </table:table-cell>
        </table:table-row>
        <table:table-row table:style-name="表格111.1">
          <table:table-cell table:style-name="表格111.A2" office:value-type="string">
            <text:p text:style-name="P43">NGFW</text:p>
          </table:table-cell>
          <table:table-cell table:style-name="表格111.A2" office:value-type="string">
            <text:p text:style-name="P20" loext:marker-style-name="T14"><text:span text:style-name="T15">次世代防火牆，</text:span><text:span text:style-name="T120">比 </text:span><text:span text:style-name="T256">FW </text:span><text:span text:style-name="T120">更聰明</text:span><text:span text:style-name="T15">，有 </text:span><text:span text:style-name="T78">DPI </text:span><text:span text:style-name="T79">深度檢查、</text:span><text:span text:style-name="T78">IPS</text:span><text:span text:style-name="T79">、</text:span><text:span text:style-name="T78">App </text:span><text:span text:style-name="T79">識別</text:span></text:p>
          </table:table-cell>
        </table:table-row>
        <table:table-row table:style-name="表格111.1">
          <table:table-cell table:style-name="表格111.A3" office:value-type="string">
            <text:p text:style-name="P43">DMZ</text:p>
          </table:table-cell>
          <table:table-cell table:style-name="表格111.A3" office:value-type="string">
            <text:p text:style-name="P20" loext:marker-style-name="T14"><text:span text:style-name="T15">隔離區，</text:span><text:span text:style-name="T425">把對外服務（</text:span><text:span text:style-name="T426">Web</text:span><text:span text:style-name="T425">、</text:span><text:span text:style-name="T426">Mail</text:span><text:span text:style-name="T425">）放這裡</text:span><text:span text:style-name="T15">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43">IOC</text:p>
          </table:table-cell>
          <table:table-cell table:style-name="表格111.A2" office:value-type="string">
            <text:p text:style-name="P20" loext:marker-style-name="T14"><text:span text:style-name="T120">入侵指標（攻擊事後證據）</text:span><text:span text:style-name="T15">：</text:span><text:span text:style-name="T75">Domain</text:span><text:span text:style-name="T76">（網）、</text:span><text:span text:style-name="T75">Hash</text:span><text:span text:style-name="T76">（檔）、</text:span><text:span text:style-name="T75">IP</text:span><text:span text:style-name="T76">（連）、</text:span><text:span text:style-name="T75">C2</text:span><text:span text:style-name="T76">（控）</text:span></text:p>
          </table:table-cell>
        </table:table-row>
        <table:table-row table:style-name="表格111.1">
          <table:table-cell table:style-name="表格111.A3" office:value-type="string">
            <text:p text:style-name="P43">Proxy</text:p>
          </table:table-cell>
          <table:table-cell table:style-name="表格111.A3" office:value-type="string">
            <text:p text:style-name="P20" loext:marker-style-name="T14"><text:span text:style-name="T319">正向代理，幫「使用者（</text:span><text:span text:style-name="T320">Client</text:span><text:span text:style-name="T319">）」隱藏 </text:span><text:span text:style-name="T320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43">Reverse Proxy</text:p>
          </table:table-cell>
          <table:table-cell table:style-name="表格111.A2" office:value-type="string">
            <text:p text:style-name="P20" loext:marker-style-name="T14"><text:span text:style-name="T319">反向代理，幫「伺服器</text:span><text:span text:style-name="T15">（</text:span><text:span text:style-name="T16">Server</text:span><text:span text:style-name="T15">）」負載平衡、</text:span><text:span text:style-name="T319">隱藏主機</text:span></text:p>
          </table:table-cell>
        </table:table-row>
      </table:table>
      <text:h text:style-name="P19" text:outline-level="3"><text:span text:style-name="T36">▍</text:span><text:span text:style-name="T595"> </text:span><text:span text:style-name="T596">防火牆 </text:span><text:span text:style-name="T595">Firewall</text:span><text:span text:style-name="T596">（</text:span><text:span text:style-name="T595">FW</text:span><text:span text:style-name="T596">）</text:span></text:h>
      <text:p text:style-name="P22" loext:marker-style-name="T21"><text:span text:style-name="T20">最基本的網路防護設備，像公司門口的警衛。只看封包的「外部資訊」：</text:span><text:span text:style-name="T284">IP </text:span><text:span text:style-name="T283">位址（來者是誰）、</text:span><text:span text:style-name="T284">Port</text:span><text:span text:style-name="T283">（從哪個門進來）、</text:span><text:span text:style-name="T284">Protocol</text:span><text:span text:style-name="T283">（什麼類型）</text:span><text:span text:style-name="T20">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6">網站應用防火牆 </text:span><text:span text:style-name="T595">WAF</text:span></text:h>
      <text:p text:style-name="P22" loext:marker-style-name="T21"><text:span text:style-name="T20">進階版防護，會「打開包包檢查內容」，專門防禦網站層面的攻擊：</text:span><text:span text:style-name="T365">SQL Injection</text:span><text:span text:style-name="T363">（注入惡意 </text:span><text:span text:style-name="T365">SQL </text:span><text:span text:style-name="T363">竊取資料庫）、</text:span><text:span text:style-name="T365">XSS</text:span><text:span text:style-name="T363">（插入惡意 </text:span><text:span text:style-name="T365">JavaScript</text:span><text:span text:style-name="T363">）、其他 </text:span><text:span text:style-name="T365">HTTP </text:span><text:span text:style-name="T363">層攻擊（</text:span><text:span text:style-name="T365">CSRF</text:span><text:span text:style-name="T363">、</text:span><text:span text:style-name="T365">Path Traversal</text:span><text:span text:style-name="T363">）</text:span><text:span text:style-name="T20">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52">FW</text:p>
            </table:table-cell>
            <table:table-cell table:style-name="表格113.A1" office:value-type="string">
              <text:p text:style-name="P53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54"><text:span text:style-name="T571">封包外面（</text:span><text:span text:style-name="T570">IP/Port</text:span><text:span text:style-name="T571">）</text:span></text:p>
          </table:table-cell>
          <table:table-cell table:style-name="表格113.A2" office:value-type="string">
            <text:p text:style-name="P55"><text:span text:style-name="T571">封包裡面（</text:span><text:span text:style-name="T570">HTTP </text:span><text:span text:style-name="T571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6">次世代防火牆 </text:span><text:span text:style-name="T595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284">DPI</text:span><text:span text:style-name="T283">（深度封包檢測）、</text:span><text:span text:style-name="T284">IPS</text:span><text:span text:style-name="T283">（入侵防禦）、</text:span><text:span text:style-name="T284">App </text:span><text:span text:style-name="T283">識別（知道你在用 </text:span><text:span text:style-name="T284">LINE </text:span><text:span text:style-name="T283">還是 </text:span><text:span text:style-name="T284">YouTube</text:span><text:span text:style-name="T283">）、使用者身份識別</text:span><text:span text:style-name="T20">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47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56">○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</text:span><text:span text:style-name="T128">專門放置需要對外公開的服務</text:span><text:span text:style-name="T20">。生活比喻：</text:span><text:span text:style-name="T597">DMZ</text:span><text:span text:style-name="T598">＝大樓門口的接待室，訪客只能到接待室、無法進入辦公室；就算接待室被搗亂，也不影響裡面的員工與機密</text:span><text:span text:style-name="T20">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</text:span><text:span text:style-name="T169">攻擊發生後所留下的已知痕跡與線索</text:span><text:span text:style-name="T20">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170">IOC </text:span><text:span text:style-name="T169">是「已發生攻擊的事後證據」</text:span><text:span text:style-name="T20">，</text:span><text:span text:style-name="T215">不是用來預測未來攻擊的工具！</text:span><text:span text:style-name="T20">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57">網</text:p>
          </table:table-cell>
          <table:table-cell table:style-name="表格116.A3" office:value-type="string">
            <text:p text:style-name="P35"><text:span text:style-name="T527">惡意 </text:span><text:span text:style-name="T549">Domain</text:span><text:span text:style-name="T527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57">檔</text:p>
          </table:table-cell>
          <table:table-cell table:style-name="表格116.A4" office:value-type="string">
            <text:p text:style-name="P58"><text:span text:style-name="T527">惡意 </text:span><text:span text:style-name="T549">Hash</text:span><text:span text:style-name="T527">（雜湊值）</text:span></text:p>
          </table:table-cell>
          <table:table-cell table:style-name="表格116.A4" office:value-type="string">
            <text:p text:style-name="P20" loext:marker-style-name="T106"><text:span text:style-name="T119">惡意程式的唯一特徵碼</text:span><text:span text:style-name="T109">，改檔名也能識別</text:span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57">連</text:p>
          </table:table-cell>
          <table:table-cell table:style-name="表格116.A3" office:value-type="string">
            <text:p text:style-name="P37"><text:span text:style-name="T527">惡意 </text:span><text:span text:style-name="T549">IP </text:span><text:span text:style-name="T527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57">控</text:p>
          </table:table-cell>
          <table:table-cell table:style-name="表格116.A4" office:value-type="string">
            <text:p text:style-name="P46"><text:span text:style-name="T549">C2 Server</text:span><text:span text:style-name="T527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7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</text:span><text:span text:style-name="T85"> </text:span><text:span text:style-name="T86">駭客準備：建立釣魚網站（</text:span><text:span text:style-name="T85">Domain</text:span><text:span text:style-name="T86">）、製作惡意程式（</text:span><text:span text:style-name="T85">Hash</text:span><text:span text:style-name="T86">）、架設控制中心（</text:span><text:span text:style-name="T85">C2</text:span><text:span text:style-name="T86">）</text:span><text:span text:style-name="T20">→ ② 發動攻擊：</text:span><text:span text:style-name="T84">受害者點釣魚網站 → 下載惡意程式</text:span><text:span text:style-name="T20"> → ③ </text:span><text:span text:style-name="T599">主機感染：電腦自動連回駭客主機（</text:span><text:span text:style-name="T600">IP</text:span><text:span text:style-name="T599">）或 </text:span><text:span text:style-name="T600">C2 </text:span><text:span text:style-name="T42">→ ④ </text:span><text:span text:style-name="T125">駭客控制：下指令、偷資料、橫向移動</text:span><text:span text:style-name="T20"> → ⑤ </text:span><text:span text:style-name="T601">資安系統偵測：比對異常 </text:span><text:span text:style-name="T602">IP</text:span><text:span text:style-name="T601">、惡意 </text:span><text:span text:style-name="T602">Domain</text:span><text:span text:style-name="T601">、已知 </text:span><text:span text:style-name="T602">Hash</text:span><text:span text:style-name="T601">、</text:span><text:span text:style-name="T602">C2 </text:span><text:span text:style-name="T601">行為 →</text:span><text:span text:style-name="T20"> ⑥</text:span><text:span text:style-name="T336"> 判定中毒 → </text:span><text:span text:style-name="T337">IOC </text:span><text:span text:style-name="T336">記錄建立 </text:span><text:span text:style-name="T20">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</text:span><text:span text:style-name="T169">網 → 檔 → 連 → 控</text:span><text:span text:style-name="T20">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oft-page-break/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</text:span><text:span text:style-name="T70">隱藏使用者真實</text:span><text:span text:style-name="T15"> </text:span><text:span text:style-name="T16">IP</text:span><text:span text:style-name="T15">、</text:span><text:span text:style-name="T16">Cache </text:span><text:span text:style-name="T15">加速、企業控管員工能存取哪些網站。比喻：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</text:span><text:span text:style-name="T70">隱藏後端伺服器</text:span><text:span text:style-name="T15">、</text:span><text:span text:style-name="T16">SSL </text:span><text:span text:style-name="T15">終止與安全防護。比喻：公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84">使用者（</text:span><text:span text:style-name="T83">Client</text:span><text:span text:style-name="T84">）</text:span><text:span text:style-name="T20">→ 🔵 </text:span><text:span text:style-name="T83">Proxy</text:span><text:span text:style-name="T20">（選用，隱藏 </text:span><text:span text:style-name="T42">IP/</text:span><text:span text:style-name="T20">上網控管）→ 🌍 </text:span><text:span text:style-name="T83">Internet </text:span><text:span text:style-name="T42">→ 🔥 </text:span><text:span text:style-name="T83">FW/NGFW</text:span><text:span text:style-name="T20">（第一道防線，過濾 </text:span><text:span text:style-name="T42">IP/Port/</text:span><text:span text:style-name="T20">深度檢查）→ 🏝 </text:span><text:span text:style-name="T83">DMZ</text:span><text:span text:style-name="T20">（</text:span><text:span text:style-name="T42">Web/Mail/DNS </text:span><text:span text:style-name="T20">伺服器）→ 🛡</text:span><text:span text:style-name="T82"> </text:span><text:span text:style-name="T83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185">R</text:span><text:span text:style-name="T83">everse Proxy</text:span><text:span text:style-name="T20">（負載平衡</text:span><text:span text:style-name="T42">/</text:span><text:span text:style-name="T20">隱藏後端）→ 🏢</text:span><text:span text:style-name="T84"> 內部 </text:span><text:span text:style-name="T83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603">把原本只是「資料」的輸入，惡意改造成可執行的「</text:span><text:span text:style-name="T604">SQL </text:span><text:span text:style-name="T603">指令」</text:span><text:span text:style-name="T20">。</text:span></text:p>
            <text:p text:style-name="P12" loext:marker-style-name="T21"><text:span text:style-name="T20">駭客在帳號欄位輸入：</text:span><text:span text:style-name="T42">' </text:span><text:span text:style-name="T170">OR 1=1 --</text:span><text:span text:style-name="T20">，拼入後變成：…</text:span><text:span text:style-name="T284">WHERE account='' OR 1=1 -- '</text:span><text:span text:style-name="T42">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</text:span><text:span text:style-name="T429">OR 1=1 </text:span><text:span text:style-name="T428">永遠成立，回傳全部使用者</text:span><text:span text:style-name="T15"> ② </text:span><text:span text:style-name="T605">-- </text:span><text:span text:style-name="T606">把密碼驗證段註解掉</text:span><text:span text:style-name="T15">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607">把使用者輸入視為「純資料」，不允許改變 </text:span><text:span text:style-name="T608">SQL </text:span><text:span text:style-name="T607">結構；</text:span><text:span text:style-name="T608">SQL </text:span><text:span text:style-name="T607">骨架固定，不因任何輸入而改變</text:span><text:span text:style-name="T15">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609">防禦核心：</text:span><text:span text:style-name="T610">Prepared Statement</text:span><text:span text:style-name="T609">（預備語句）</text:span></text:p>
            <text:p text:style-name="P11"><text:span text:style-name="T258">概念：</text:span><text:span text:style-name="T169">先把 </text:span><text:span text:style-name="T170">SQL </text:span><text:span text:style-name="T169">骨架「鎖死」</text:span><text:span text:style-name="T20">，</text:span><text:span text:style-name="T611">使用者只能填入資料，完全無法修改 </text:span><text:span text:style-name="T612">SQL </text:span><text:span text:style-name="T611">結構</text:span><text:span text:style-name="T20">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</text:span><text:span text:style-name="T83">WHERE id='" + input + "'"</text:span><text:span text:style-name="T84">；輸入 </text:span><text:span text:style-name="T83">' OR 1=1 -- → </text:span><text:span text:style-name="T84">結構被竄改</text:span><text:span text:style-name="T20">。</text:span></text:p>
            <text:p text:style-name="P12" loext:marker-style-name="T21"><text:span text:style-name="T42">✅ </text:span><text:span text:style-name="T20">安全寫法：</text:span><text:span text:style-name="T42">String sql = "SELECT * FROM users </text:span><text:span text:style-name="T83">WHERE id=?"</text:span><text:span text:style-name="T84">；</text:span><text:span text:style-name="T498">? </text:span><text:span text:style-name="T499">是佔位符，</text:span><text:span text:style-name="T498">input </text:span><text:span text:style-name="T499">被視為純文字，</text:span><text:span text:style-name="T498">' OR 1=1 -- </text:span><text:span text:style-name="T499">完全無效</text:span><text:span text:style-name="T20">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7">Prepared Statement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118">根本解決方案。</text:span><text:span text:style-name="T449">SQL </text:span><text:span text:style-name="T118">骨架與資料完全分離</text:span><text:span text:style-name="T109">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28"><text:span text:style-name="T523">輸入驗證 </text:span><text:span text:style-name="T522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118">過濾或拒絕特殊字元</text:span><text:span text:style-name="T109">（如單引號），輔助手段，但</text:span><text:span text:style-name="T381">單靠此法仍可能被繞過</text:span><text:span text:style-name="T109">。</text:span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28"><text:span text:style-name="T522">WAF</text:span><text:span text:style-name="T523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59">最小權限原則</text:p>
          </table:table-cell>
          <table:table-cell table:style-name="表格119.A7" table:number-columns-spanned="2" office:value-type="string">
            <text:p text:style-name="P20" loext:marker-style-name="T106"><text:span text:style-name="T118">資料庫帳號只給應用程式必要的權限</text:span><text:span text:style-name="T109">，避免帳號被拿下後資料全失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</text:span><text:span text:style-name="T613">Zero-Day Attack</text:span><text:span text:style-name="T228">（零時差攻擊）</text:span></text:h>
      <text:p text:style-name="P22" loext:marker-style-name="T21"><text:span text:style-name="T42">Zero-Day </text:span><text:span text:style-name="T20">指一個</text:span><text:span text:style-name="T614">「尚未被開發商發現或公開」的安全漏洞</text:span><text:span text:style-name="T20">，</text:span><text:span text:style-name="T283">在廠商來得及發布修補程式（</text:span><text:span text:style-name="T615">Patch</text:span><text:span text:style-name="T283">）之前，駭客就已利用它展開攻擊</text:span><text:span text:style-name="T20">。命名由來：</text:span><text:span text:style-name="T616">「</text:span><text:span text:style-name="T617">Day Zero</text:span><text:span text:style-name="T616">」代表廠商只有 </text:span><text:span text:style-name="T617">0 </text:span><text:span text:style-name="T616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60">修補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60">偵測</text:p>
          </table:table-cell>
          <table:table-cell table:style-name="表格120.A5" office:value-type="string">
            <text:p text:style-name="P61">IDS / IPS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60">深度檢查</text:p>
          </table:table-cell>
          <table:table-cell table:style-name="表格120.A2" office:value-type="string">
            <text:p text:style-name="P62"><text:span text:style-name="T549">DPI</text:span><text:span text:style-name="T527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60">隔離</text:p>
          </table:table-cell>
          <table:table-cell table:style-name="表格120.A5" office:value-type="string">
            <text:p text:style-name="P63">網路分段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60">降低風險</text:p>
          </table:table-cell>
          <table:table-cell table:style-name="表格120.A2" office:value-type="string">
            <text:p text:style-name="P59">最小權限原則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7">IDS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587">偵測到異常流量後產生警報</text:span><text:span text:style-name="T109">，</text:span><text:span text:style-name="T474">不主動攔截</text:span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7">IPS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64">自動阻斷偵測到的攻擊流量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27">DPI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</text:span><text:span text:style-name="T506">深入檢查封包內容</text:span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27">WAF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65"><text:span text:style-name="T527">專門針對 </text:span><text:span text:style-name="T549">Web </text:span><text:span text:style-name="T527">攻擊（</text:span><text:span text:style-name="T549">SQLi</text:span><text:span text:style-name="T527">、</text:span><text:span text:style-name="T549">XSS</text:span><text:span text:style-name="T527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170">IDS </text:span><text:span text:style-name="T169">只發警報（不攔截）；</text:span><text:span text:style-name="T170">IPS </text:span><text:span text:style-name="T169">主動阻擋（有副作用風險，可能誤擋正常流量）</text:span><text:span text:style-name="T20">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</text:span><text:span text:style-name="T169"> 真正防禦是 </text:span><text:span text:style-name="T170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</text:span><text:soft-page-break/><text:span text:style-name="T170">Prepared Statement </text:span><text:span text:style-name="T169">才是正道</text:span><text:span text:style-name="T20">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66" loext:marker-style-name="T14"><text:span text:style-name="T16">👀 </text:span><text:span text:style-name="T301">IDS</text:span><text:span text:style-name="T299">(</text:span><text:span text:style-name="T618">Intrusion Detection System</text:span><text:span text:style-name="T299">)</text:span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</text:span><text:span text:style-name="T341">不主動阻擋</text:span></text:p>
          </table:table-cell>
        </table:table-row>
        <table:table-row table:style-name="表格123.1">
          <table:table-cell table:style-name="表格123.A2" office:value-type="string">
            <text:p text:style-name="P66" loext:marker-style-name="T14"><text:span text:style-name="T16">🚨 </text:span><text:span text:style-name="T301">IPS</text:span><text:span text:style-name="T619">(</text:span><text:span text:style-name="T618">Intrusion Prevention System</text:span><text:span text:style-name="T299">)</text:span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</text:span><text:span text:style-name="T425">自動阻擋攻擊</text:span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</text:span><text:span text:style-name="T78">SNMP</text:span><text:span text:style-name="T299">(</text:span><text:span text:style-name="T618">Simple Network Management Protocol，簡易網路管理協定</text:span><text:span text:style-name="T299">)</text:span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67"><text:span text:style-name="T571">監控網路設備狀態（</text:span><text:span text:style-name="T570">CPU</text:span><text:span text:style-name="T571">、流量等）</text:span></text:p>
          </table:table-cell>
        </table:table-row>
        <table:table-row table:style-name="表格123.1">
          <table:table-cell table:style-name="表格123.A2" office:value-type="string">
            <text:p text:style-name="P68" loext:marker-style-name="T14"><text:span text:style-name="T16">📶 </text:span><text:span text:style-name="T78">ICMP</text:span><text:span text:style-name="T299">(</text:span><text:span text:style-name="T618">Internet Control Message Protocol，網際網路控制訊息協定</text:span><text:span text:style-name="T299">)</text:span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69"><text:span text:style-name="T571">診斷網路連線（</text:span><text:span text:style-name="T570">Ping / Traceroute</text:span><text:span text:style-name="T571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70" text:outline-level="3"><text:span text:style-name="T36">▍</text:span><text:span text:style-name="T37"> </text:span><text:span text:style-name="T613">HIDS</text:span><text:span text:style-name="T620">(</text:span><text:span text:style-name="T621">Host-based Intrusion Detection System</text:span><text:span text:style-name="T620">)</text:span><text:span text:style-name="T37"> vs </text:span><text:span text:style-name="T613">NIDS</text:span><text:span text:style-name="T620">(</text:span><text:span text:style-name="T621">Network Intrusion Detection System</text:span><text:span text:style-name="T620">)</text:span><text:span text:style-name="T38">（</text:span><text:span text:style-name="T622">IDS </text:span><text:span text:style-name="T623">的兩種部署</text:span><text:span text:style-name="T38">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>(</text:span><text:span text:style-name="T74">主機型入侵偵測系統</text:span><text:span text:style-name="T12">)</text:span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>(</text:span><text:span text:style-name="T74">網路型入侵偵測系統</text:span><text:span text:style-name="T12">)</text:span></text:p>
            </table:table-cell>
          </table:table-row>
        </table:table-header-rows>
        <table:table-row table:style-name="表格124.2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71">裝在主機（電腦）內部</text:p>
          </table:table-cell>
          <table:table-cell table:style-name="表格124.A2" office:value-type="string">
            <text:p text:style-name="P72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624">系統 </text:span><text:span text:style-name="T625">Log</text:span><text:span text:style-name="T15">、使用者行為</text:span></text:p>
          </table:table-cell>
          <table:table-cell table:style-name="表格124.A3" office:value-type="string">
            <text:p text:style-name="P73">網路封包與流量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127">HIDS </text:span><text:span text:style-name="T128">看主機（</text:span><text:span text:style-name="T127">Log</text:span><text:span text:style-name="T128">）</text:span><text:span text:style-name="T127">· NIDS </text:span><text:span text:style-name="T128">看網路（封包）</text:span><text:span text:style-name="T20">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71">管理與監控網路設備</text:p>
          </table:table-cell>
          <table:table-cell table:style-name="表格125.A2" office:value-type="string">
            <text:p text:style-name="P72">測試網路是否連通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35"><text:span text:style-name="T570">Application Layer</text:span><text:span text:style-name="T571">（應用層）</text:span></text:p>
          </table:table-cell>
          <table:table-cell table:style-name="表格125.A3" office:value-type="string">
            <text:p text:style-name="P74"><text:span text:style-name="T570">Network Layer</text:span><text:span text:style-name="T571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75">UDP</text:p>
          </table:table-cell>
          <table:table-cell table:style-name="表格125.A2" office:value-type="string">
            <text:p text:style-name="P76"><text:span text:style-name="T570">IP </text:span><text:span text:style-name="T571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77">大樓管理室的監控系統</text:p>
          </table:table-cell>
          <table:table-cell table:style-name="表格125.A2" office:value-type="string">
            <text:p text:style-name="P77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/text:p>
            <text:p text:style-name="P11" loext:marker-style-name="T21"><text:soft-page-break/><text:span text:style-name="T127">SNMP </text:span><text:span text:style-name="T128">管理設備（應用層 </text:span><text:span text:style-name="T127">/ UDP</text:span><text:span text:style-name="T128">）</text:span><text:span text:style-name="T127">· ICMP </text:span><text:span text:style-name="T128">診斷網路（網路層）</text:span><text:span text:style-name="T20">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6">① IDS </text:span><text:span text:style-name="T251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6">② Firewall </text:span><text:span text:style-name="T251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pan text:style-name="T436">③ HIDS </text:span><text:span text:style-name="T251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6">④ ICMP </text:span><text:span text:style-name="T251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6">⑤ ICMP </text:span><text:span text:style-name="T251">屬於 </text:span><text:span text:style-name="T436">Application Layer</text:span><text:span text:style-name="T251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6">⑥ IPS </text:span><text:span text:style-name="T251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626"><text:span text:style-name="T627">題目</text:span><text:span text:style-name="T626"/></text:p>
            </table:table-cell>
            <table:table-cell table:style-name="表格127.A1" office:value-type="string">
              <text:p text:style-name="P21" loext:marker-style-name="T626"><text:span text:style-name="T627">答案</text:span><text:span text:style-name="T626"/></text:p>
            </table:table-cell>
            <table:table-cell table:style-name="表格127.A1" office:value-type="string">
              <text:p text:style-name="P21" loext:marker-style-name="T626"><text:span text:style-name="T627">解析</text:span><text:span text:style-name="T626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628"><text:span text:style-name="T629">Q1 </text:span><text:span text:style-name="T630">何者負責「過濾進出網路流量」？</text:span></text:p>
          </table:table-cell>
          <table:table-cell table:style-name="表格127.A2" office:value-type="string">
            <text:p text:style-name="P20" loext:marker-style-name="T628"><text:span text:style-name="T629">Firewall</text:span><text:span text:style-name="T628"/></text:p>
          </table:table-cell>
          <table:table-cell table:style-name="表格127.A2" office:value-type="string">
            <text:p text:style-name="P20" loext:marker-style-name="T628"><text:span text:style-name="T629">Firewall </text:span><text:span text:style-name="T630">是網路入口過濾工具，依規則決定放行。</text:span><text:span text:style-name="T629">IDS/IPS </text:span><text:span text:style-name="T630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8"><text:span text:style-name="T629">Q2 IDS </text:span><text:span text:style-name="T630">的主要功能為何？</text:span></text:p>
          </table:table-cell>
          <table:table-cell table:style-name="表格127.A3" office:value-type="string">
            <text:p text:style-name="P20" loext:marker-style-name="T628"><text:span text:style-name="T630">偵測並發出警報</text:span><text:span text:style-name="T628"/></text:p>
          </table:table-cell>
          <table:table-cell table:style-name="表格127.A3" office:value-type="string">
            <text:p text:style-name="P20" loext:marker-style-name="T628"><text:span text:style-name="T629">IDS </text:span><text:span text:style-name="T630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8"><text:span text:style-name="T629">Q3 IPS </text:span><text:span text:style-name="T630">與 </text:span><text:span text:style-name="T629">IDS </text:span><text:span text:style-name="T630">最大差別？</text:span></text:p>
          </table:table-cell>
          <table:table-cell table:style-name="表格127.A2" office:value-type="string">
            <text:p text:style-name="P20" loext:marker-style-name="T628"><text:span text:style-name="T629">IPS </text:span><text:span text:style-name="T630">會阻擋，</text:span><text:span text:style-name="T629">IDS </text:span><text:span text:style-name="T630">不會</text:span></text:p>
          </table:table-cell>
          <table:table-cell table:style-name="表格127.A2" office:value-type="string">
            <text:p text:style-name="P20" loext:marker-style-name="T628"><text:span text:style-name="T629">IPS = IDS </text:span><text:span text:style-name="T630">全功能 </text:span><text:span text:style-name="T629">+ </text:span><text:span text:style-name="T630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8"><text:span text:style-name="T629">Q4 </text:span><text:span text:style-name="T630">何者屬「主機型入侵偵測」？</text:span></text:p>
          </table:table-cell>
          <table:table-cell table:style-name="表格127.A3" office:value-type="string">
            <text:p text:style-name="P20" loext:marker-style-name="T628"><text:span text:style-name="T629">HIDS</text:span><text:span text:style-name="T628"/></text:p>
          </table:table-cell>
          <table:table-cell table:style-name="表格127.A3" office:value-type="string">
            <text:p text:style-name="P20" loext:marker-style-name="T628"><text:span text:style-name="T629">HIDS </text:span><text:span text:style-name="T630">安裝於主機內部，監控 </text:span><text:span text:style-name="T629">Log </text:span><text:span text:style-name="T630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8"><text:span text:style-name="T629">Q5 NIDS </text:span><text:span text:style-name="T630">主要監控什麼？</text:span></text:p>
          </table:table-cell>
          <table:table-cell table:style-name="表格127.A2" office:value-type="string">
            <text:p text:style-name="P20" loext:marker-style-name="T628"><text:span text:style-name="T630">網路封包</text:span><text:span text:style-name="T628"/></text:p>
          </table:table-cell>
          <table:table-cell table:style-name="表格127.A2" office:value-type="string">
            <text:p text:style-name="P20" loext:marker-style-name="T628"><text:span text:style-name="T629">NIDS </text:span><text:span text:style-name="T630">部署在網路節點，分析封包流量；</text:span><text:span text:style-name="T629">HIDS </text:span><text:span text:style-name="T630">才看 </text:span><text:span text:style-name="T629">Log</text:span><text:span text:style-name="T630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8"><text:span text:style-name="T629">Q6 SNMP </text:span><text:span text:style-name="T630">的主要用途？</text:span></text:p>
          </table:table-cell>
          <table:table-cell table:style-name="表格127.A3" office:value-type="string">
            <text:p text:style-name="P20" loext:marker-style-name="T628"><text:span text:style-name="T630">管理網路設備</text:span><text:span text:style-name="T628"/></text:p>
          </table:table-cell>
          <table:table-cell table:style-name="表格127.A3" office:value-type="string">
            <text:p text:style-name="P20" loext:marker-style-name="T628"><text:span text:style-name="T629">SNMP </text:span><text:span text:style-name="T630">監控與管理路由器、交換器狀態（</text:span><text:span text:style-name="T629">CPU</text:span><text:span text:style-name="T630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8"><text:span text:style-name="T629">Q7 ICMP </text:span><text:span text:style-name="T630">常用於哪種工具？</text:span></text:p>
          </table:table-cell>
          <table:table-cell table:style-name="表格127.A2" office:value-type="string">
            <text:p text:style-name="P20" loext:marker-style-name="T628"><text:span text:style-name="T629">Ping</text:span><text:span text:style-name="T628"/></text:p>
          </table:table-cell>
          <table:table-cell table:style-name="表格127.A2" office:value-type="string">
            <text:p text:style-name="P20" loext:marker-style-name="T628"><text:span text:style-name="T629">Ping </text:span><text:span text:style-name="T630">與 </text:span><text:span text:style-name="T629">Traceroute </text:span><text:span text:style-name="T630">都用 </text:span><text:span text:style-name="T629">ICMP </text:span><text:span text:style-name="T630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8"><text:span text:style-name="T629">Q8 ICMP </text:span><text:span text:style-name="T630">屬 </text:span><text:span text:style-name="T629">OSI </text:span><text:span text:style-name="T630">哪一層？</text:span></text:p>
          </table:table-cell>
          <table:table-cell table:style-name="表格127.A3" office:value-type="string">
            <text:p text:style-name="P20" loext:marker-style-name="T628"><text:span text:style-name="T629">Network Layer</text:span><text:span text:style-name="T628"/></text:p>
          </table:table-cell>
          <table:table-cell table:style-name="表格127.A3" office:value-type="string">
            <text:p text:style-name="P20" loext:marker-style-name="T628"><text:span text:style-name="T631">ICMP </text:span><text:span text:style-name="T632">是 </text:span><text:span text:style-name="T631">IP </text:span><text:span text:style-name="T632">的附屬協定，屬網路層</text:span><text:span text:style-name="T630">；</text:span><text:span text:style-name="T629">SNMP </text:span><text:span text:style-name="T630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8"><text:span text:style-name="T629">Q9 </text:span><text:span text:style-name="T630">何者用 </text:span><text:span text:style-name="T629">UDP </text:span><text:span text:style-name="T630">且屬應用層？</text:span></text:p>
          </table:table-cell>
          <table:table-cell table:style-name="表格127.A2" office:value-type="string">
            <text:p text:style-name="P20" loext:marker-style-name="T628"><text:span text:style-name="T629">SNMP</text:span><text:span text:style-name="T628"/></text:p>
          </table:table-cell>
          <table:table-cell table:style-name="表格127.A2" office:value-type="string">
            <text:p text:style-name="P20" loext:marker-style-name="T628"><text:span text:style-name="T629">SNMP </text:span><text:span text:style-name="T630">用 </text:span><text:span text:style-name="T629">UDP</text:span><text:span text:style-name="T630">、屬應用層；</text:span><text:span text:style-name="T629">ICMP </text:span><text:span text:style-name="T630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8"><text:span text:style-name="T629">Q10 </text:span><text:span text:style-name="T630">下列何者正確？</text:span></text:p>
          </table:table-cell>
          <table:table-cell table:style-name="表格127.A3" office:value-type="string">
            <text:p text:style-name="P20" loext:marker-style-name="T628"><text:span text:style-name="T629">SNMP </text:span><text:span text:style-name="T630">用於設備管理</text:span></text:p>
          </table:table-cell>
          <table:table-cell table:style-name="表格127.A3" office:value-type="string">
            <text:p text:style-name="P20" loext:marker-style-name="T628"><text:span text:style-name="T629">IDS </text:span><text:span text:style-name="T630">不阻擋；</text:span><text:span text:style-name="T629">Firewall </text:span><text:span text:style-name="T630">不做行為分析；</text:span><text:span text:style-name="T629">ICMP </text:span><text:span text:style-name="T630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ext:soft-page-break/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ext:soft-page-break/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162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162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162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162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162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162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ext:soft-page-break/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4"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oft-page-break/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78" loext:marker-style-name="T633"><text:span text:style-name="T634">祝　金榜題名　</text:span><text:span text:style-name="T635">·</text:span><text:span text:style-name="T634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3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7-01T22:23:35.403508800</dc:date>
    <meta:editing-cycles>512</meta:editing-cycles>
    <dc:title>網路概論與資訊安全 完整整合筆記</dc:title>
    <meta:editing-duration>P3DT12H13M6S</meta:editing-duration>
    <meta:generator>LibreOffice/26.2.4.2$Windows_X86_64 LibreOffice_project/0229ac93fcf0d7cbc6376066c6f35021cef002dc</meta:generator>
    <meta:document-statistic meta:table-count="143" meta:image-count="1" meta:object-count="0" meta:page-count="53" meta:paragraph-count="2312" meta:word-count="30827" meta:character-count="48960" meta:non-whitespace-character-count="44132"/>
    <meta:user-defined meta:name="AppVersion">15.0000</meta:user-defined>
  </office:meta>
</office:document-meta>
</file>