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68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6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c400" style:font-weight-asian="bold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cbc" loext:opacity="100%" fo:font-weight="bold" fo:background-color="#e65100" style:font-weight-asian="bold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weight="bold" fo:background-color="#d500f9" style:font-weight-asian="bold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76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7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8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3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2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3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6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2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3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4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2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7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8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9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1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2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4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5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6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7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8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9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0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1" style:family="text">
      <style:text-properties fo:color="#2b2b2b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632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3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4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5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6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7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8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9" style:family="text">
      <style:text-properties fo:color="#64ffda" loext:opacity="100%" fo:font-size="8.5pt" fo:font-style="normal" fo:font-weight="bold" fo:background-color="#d500f9" loext:char-shading-value="0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40" style:family="text">
      <style:text-properties fo:color="#64ffda" loext:opacity="100%" style:font-name="Microsoft JhengHei" fo:font-size="8.5pt" fo:font-style="normal" fo:font-weight="bold" fo:background-color="#d500f9" loext:char-shading-value="0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41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2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43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44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4">這個「決定誰先傳」的規則，就叫 </text:span><text:span text:style-name="T565">MAC </text:span><text:span text:style-name="T564">機制（</text:span><text:span text:style-name="T565">Media Access Control</text:span><text:span text:style-name="T564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6">WiFi</text:span><text:span text:style-name="T553">：先聽再講（</text:span><text:span text:style-name="T566">CSMA/CA</text:span><text:span text:style-name="T553">）</text:span></text:h>
      <text:p text:style-name="P22" loext:marker-style-name="T21"><text:span text:style-name="T432">WiFi </text:span><text:span text:style-name="T431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7">Carrier Sense</text:span><text:span text:style-name="T568"> </text:span><text:span text:style-name="T569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7">Multiple Access </text:span><text:span text:style-name="T570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7">Collision Avoidance </text:span><text:span text:style-name="T571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2">WiFi </text:span><text:span text:style-name="T573">高速基礎</text:span></text:p>
            <text:p text:style-name="P11" loext:marker-style-name="T21"><text:span text:style-name="T20">另：</text:span><text:span text:style-name="T285">OFDM</text:span><text:span text:style-name="T284">（正交分頻多工）</text:span><text:span text:style-name="T20">— </text:span><text:span text:style-name="T369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3">EDCA</text:span><text:span text:style-name="T402">（</text:span><text:span text:style-name="T403">Enhanced Distributed Channel Access</text:span><text:span text:style-name="T402">）</text:span><text:span text:style-name="T20">的功能。</text:span><text:span text:style-name="T574">視訊通話</text:span><text:span text:style-name="T575">/</text:span><text:span text:style-name="T574">語音→少等、優先傳</text:span><text:span text:style-name="T20">；</text:span><text:span text:style-name="T362">網頁</text:span><text:span text:style-name="T364">/</text:span><text:span text:style-name="T362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6">Bluetooth</text:span><text:span text:style-name="T553">：老大排班（</text:span><text:span text:style-name="T566">Master-Slave</text:span><text:span text:style-name="T553">）</text:span></text:h>
      <text:p text:style-name="P22" loext:marker-style-name="T21"><text:span text:style-name="T576">Bluetooth </text:span><text:span text:style-name="T577">不靠「搶」，而是由 </text:span><text:span text:style-name="T576">Master </text:span><text:span text:style-name="T577">統一分配時間</text:span><text:span text:style-name="T20">，</text:span><text:span text:style-name="T127">Slave </text:span><text:span text:style-name="T128">照順序傳資料</text:span><text:span text:style-name="T20">（</text:span><text:span text:style-name="T243">0~1ms </text:span><text:span text:style-name="T171">耳機、</text:span><text:span text:style-name="T243">1~2ms </text:span><text:span text:style-name="T171">滑鼠、</text:span><text:span text:style-name="T243">2~3ms </text:span><text:span text:style-name="T171">鍵盤、</text:span><text:span text:style-name="T243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8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79">WiFi = </text:span><text:span text:style-name="T580">菜市場（自由競爭，亂搶）；</text:span><text:span text:style-name="T579">Bluetooth = </text:span><text:span text:style-name="T580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1"><text:s/></text:span><text:span text:style-name="T572">Bluetooth </text:span><text:span text:style-name="T573">抗干擾</text:span></text:p>
            <text:p text:style-name="P11" loext:marker-style-name="T21"><text:span text:style-name="T20">另：</text:span><text:span text:style-name="T285">FHSS</text:span><text:span text:style-name="T284">（跳頻展頻）— 在 </text:span><text:span text:style-name="T285">2.4GHz </text:span><text:span text:style-name="T284">頻段中每秒快速切換數百次</text:span><text:span text:style-name="T20">（每秒約 </text:span><text:span text:style-name="T42">1600 </text:span><text:span text:style-name="T20">次）</text:span><text:span text:style-name="T284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1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7">Time Slot</text:span><text:span text:style-name="T296">（時槽）＝將時間切成固定小區段</text:span><text:span text:style-name="T20">，</text:span><text:span text:style-name="T371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8">CSMA/CA</text:span><text:span text:style-name="T569">（先偵聽再傳）</text:span></text:p>
          </table:table-cell>
          <table:table-cell table:style-name="表格107.A2" office:value-type="string">
            <text:p text:style-name="P44"><text:span text:style-name="T568">Master-Slave</text:span><text:span text:style-name="T56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8">EDCA</text:span><text:span text:style-name="T569">（</text:span><text:span text:style-name="T568">QoS </text:span><text:span text:style-name="T569">優先）</text:span></text:p>
          </table:table-cell>
          <table:table-cell table:style-name="表格107.A3" office:value-type="string">
            <text:p text:style-name="P47"><text:span text:style-name="T568">SCO / eSCO</text:span><text:span text:style-name="T56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4">L2CAP</text:span><text:span text:style-name="T35">：</text:span><text:span text:style-name="T582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3">負責：管理並分流不同類型的資料（語音、檔案、控制指令）</text:span><text:span text:style-name="T20">；</text:span><text:span text:style-name="T584">建立、管理、釋放「邏輯通道」</text:span><text:span text:style-name="T20">；</text:span><text:span text:style-name="T497">提供 </text:span><text:span text:style-name="T496">QoS </text:span><text:span text:style-name="T497">服務品質保證</text:span><text:span text:style-name="T20">。一句話記憶：</text:span><text:span text:style-name="T375">L2CAP </text:span><text:span text:style-name="T374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5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6">建立</text:span><text:span text:style-name="T587">/</text:span><text:span text:style-name="T586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8">封包「外面」</text:span><text:span text:style-name="T15">的 </text:span><text:span text:style-name="T589">IP</text:span><text:span text:style-name="T590">、</text:span><text:span text:style-name="T589">Port</text:span><text:span text:style-name="T590">、</text:span><text:span text:style-name="T589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1">WAF(</text:span><text:span text:style-name="T592">Web Application Firewall</text:span><text:span text:style-name="T591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4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5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2">把對外服務（</text:span><text:span text:style-name="T423">Web</text:span><text:span text:style-name="T422">、</text:span><text:span text:style-name="T423">Mail</text:span><text:span text:style-name="T422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8">正向代理，幫「使用者（</text:span><text:span text:style-name="T319">Client</text:span><text:span text:style-name="T318">）」隱藏 </text:span><text:span text:style-name="T319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8">反向代理，幫「伺服器</text:span><text:span text:style-name="T15">（</text:span><text:span text:style-name="T16">Server</text:span><text:span text:style-name="T15">）」負載平衡、</text:span><text:span text:style-name="T318">隱藏主機</text:span></text:p>
          </table:table-cell>
        </table:table-row>
      </table:table>
      <text:h text:style-name="P19" text:outline-level="3"><text:span text:style-name="T36">▍</text:span><text:span text:style-name="T593"> </text:span><text:span text:style-name="T594">防火牆 </text:span><text:span text:style-name="T593">Firewall</text:span><text:span text:style-name="T594">（</text:span><text:span text:style-name="T593">FW</text:span><text:span text:style-name="T594">）</text:span></text:h>
      <text:p text:style-name="P22" loext:marker-style-name="T21"><text:span text:style-name="T20">最基本的網路防護設備，像公司門口的警衛。只看封包的「外部資訊」：</text:span><text:span text:style-name="T283">IP </text:span><text:span text:style-name="T282">位址（來者是誰）、</text:span><text:span text:style-name="T283">Port</text:span><text:span text:style-name="T282">（從哪個門進來）、</text:span><text:span text:style-name="T283">Protocol</text:span><text:span text:style-name="T282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網站應用防火牆 </text:span><text:span text:style-name="T593">WAF</text:span></text:h>
      <text:p text:style-name="P22" loext:marker-style-name="T21"><text:span text:style-name="T20">進階版防護，會「打開包包檢查內容」，專門防禦網站層面的攻擊：</text:span><text:span text:style-name="T364">SQL Injection</text:span><text:span text:style-name="T362">（注入惡意 </text:span><text:span text:style-name="T364">SQL </text:span><text:span text:style-name="T362">竊取資料庫）、</text:span><text:span text:style-name="T364">XSS</text:span><text:span text:style-name="T362">（插入惡意 </text:span><text:span text:style-name="T364">JavaScript</text:span><text:span text:style-name="T362">）、其他 </text:span><text:span text:style-name="T364">HTTP </text:span><text:span text:style-name="T362">層攻擊（</text:span><text:span text:style-name="T364">CSRF</text:span><text:span text:style-name="T362">、</text:span><text:span text:style-name="T364">Path Traversal</text:span><text:span text:style-name="T362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69">封包外面（</text:span><text:span text:style-name="T568">IP/Port</text:span><text:span text:style-name="T569">）</text:span></text:p>
          </table:table-cell>
          <table:table-cell table:style-name="表格113.A2" office:value-type="string">
            <text:p text:style-name="P53"><text:span text:style-name="T569">封包裡面（</text:span><text:span text:style-name="T568">HTTP </text:span><text:span text:style-name="T569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次世代防火牆 </text:span><text:span text:style-name="T593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3">DPI</text:span><text:span text:style-name="T282">（深度封包檢測）、</text:span><text:span text:style-name="T283">IPS</text:span><text:span text:style-name="T282">（入侵防禦）、</text:span><text:span text:style-name="T283">App </text:span><text:span text:style-name="T282">識別（知道你在用 </text:span><text:span text:style-name="T283">LINE </text:span><text:span text:style-name="T282">還是 </text:span><text:span text:style-name="T283">YouTube</text:span><text:span text:style-name="T282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5">DMZ</text:span><text:span text:style-name="T596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5">惡意 </text:span><text:span text:style-name="T547">Domain</text:span><text:span text:style-name="T525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5">惡意 </text:span><text:span text:style-name="T547">Hash</text:span><text:span text:style-name="T525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5">惡意 </text:span><text:span text:style-name="T547">IP </text:span><text:span text:style-name="T525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7">C2 Server</text:span><text:span text:style-name="T525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7">主機感染：電腦自動連回駭客主機（</text:span><text:span text:style-name="T598">IP</text:span><text:span text:style-name="T597">）或 </text:span><text:span text:style-name="T598">C2 </text:span><text:span text:style-name="T42">→ ④ </text:span><text:span text:style-name="T125">駭客控制：下指令、偷資料、橫向移動</text:span><text:span text:style-name="T20"> → ⑤ </text:span><text:span text:style-name="T599">資安系統偵測：比對異常 </text:span><text:span text:style-name="T600">IP</text:span><text:span text:style-name="T599">、惡意 </text:span><text:span text:style-name="T600">Domain</text:span><text:span text:style-name="T599">、已知 </text:span><text:span text:style-name="T600">Hash</text:span><text:span text:style-name="T599">、</text:span><text:span text:style-name="T600">C2 </text:span><text:span text:style-name="T599">行為 →</text:span><text:span text:style-name="T20"> ⑥</text:span><text:span text:style-name="T335"> 判定中毒 → </text:span><text:span text:style-name="T336">IOC </text:span><text:span text:style-name="T335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1">把原本只是「資料」的輸入，惡意改造成可執行的「</text:span><text:span text:style-name="T602">SQL </text:span><text:span text:style-name="T601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3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6">OR 1=1 </text:span><text:span text:style-name="T425">永遠成立，回傳全部使用者</text:span><text:span text:style-name="T15"> ② </text:span><text:span text:style-name="T603">-- </text:span><text:span text:style-name="T604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5">把使用者輸入視為「純資料」，不允許改變 </text:span><text:span text:style-name="T606">SQL </text:span><text:span text:style-name="T605">結構；</text:span><text:span text:style-name="T606">SQL </text:span><text:span text:style-name="T605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7">防禦核心：</text:span><text:span text:style-name="T608">Prepared Statement</text:span><text:span text:style-name="T607">（預備語句）</text:span></text:p>
            <text:p text:style-name="P11"><text:span text:style-name="T257">概念：</text:span><text:span text:style-name="T169">先把 </text:span><text:span text:style-name="T170">SQL </text:span><text:span text:style-name="T169">骨架「鎖死」</text:span><text:span text:style-name="T20">，</text:span><text:span text:style-name="T609">使用者只能填入資料，完全無法修改 </text:span><text:span text:style-name="T610">SQL </text:span><text:span text:style-name="T609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6">? </text:span><text:span text:style-name="T497">是佔位符，</text:span><text:span text:style-name="T496">input </text:span><text:span text:style-name="T497">被視為純文字，</text:span><text:span text:style-name="T496">' OR 1=1 -- </text:span><text:span text:style-name="T497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6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6"><text:span text:style-name="T521">輸入驗證 </text:span><text:span text:style-name="T520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8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<text:span text:style-name="T520">WAF</text:span><text:span text:style-name="T521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1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2">「尚未被開發商發現或公開」的安全漏洞</text:span><text:span text:style-name="T20">，</text:span><text:span text:style-name="T282">在廠商來得及發布修補程式（</text:span><text:span text:style-name="T613">Patch</text:span><text:span text:style-name="T282">）之前，駭客就已利用它展開攻擊</text:span><text:span text:style-name="T20">。命名由來：</text:span><text:span text:style-name="T614">「</text:span><text:span text:style-name="T615">Day Zero</text:span><text:span text:style-name="T614">」代表廠商只有 </text:span><text:span text:style-name="T615">0 </text:span><text:span text:style-name="T614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偵測</text:p>
          </table:table-cell>
          <table:table-cell table:style-name="表格120.A5" office:value-type="string">
            <text:p text:style-name="P59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深度檢查</text:p>
          </table:table-cell>
          <table:table-cell table:style-name="表格120.A2" office:value-type="string">
            <text:p text:style-name="P60"><text:span text:style-name="T547">DPI</text:span><text:span text:style-name="T525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隔離</text:p>
          </table:table-cell>
          <table:table-cell table:style-name="表格120.A5" office:value-type="string">
            <text:p text:style-name="P61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降低風險</text:p>
          </table:table-cell>
          <table:table-cell table:style-name="表格120.A2" office:value-type="string">
            <text:p text:style-name="P57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5">偵測到異常流量後產生警報</text:span><text:span text:style-name="T109">，</text:span><text:span text:style-name="T472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2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4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3"><text:span text:style-name="T525">專門針對 </text:span><text:span text:style-name="T547">Web </text:span><text:span text:style-name="T525">攻擊（</text:span><text:span text:style-name="T547">SQLi</text:span><text:span text:style-name="T525">、</text:span><text:span text:style-name="T547">XSS</text:span><text:span text:style-name="T525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4" loext:marker-style-name="T14"><text:span text:style-name="T16">👀 </text:span><text:span text:style-name="T616">IDS</text:span><text:span text:style-name="T617">(</text:span><text:span text:style-name="T618">Intrusion Detection System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619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4" loext:marker-style-name="T14"><text:span text:style-name="T16">🚨 </text:span><text:span text:style-name="T616">IPS</text:span><text:span text:style-name="T620">(</text:span><text:span text:style-name="T618">Intrusion Prevention System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621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622">SNMP</text:span><text:span text:style-name="T617">(</text:span><text:span text:style-name="T618">Simple Network Management Protocol，簡易網路管理協定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5"><text:span text:style-name="T569">監控網路設備狀態（</text:span><text:span text:style-name="T568">CPU</text:span><text:span text:style-name="T569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6" loext:marker-style-name="T14"><text:span text:style-name="T16">📶 </text:span><text:span text:style-name="T622">ICMP</text:span><text:span text:style-name="T617">(</text:span><text:span text:style-name="T618">Internet Control Message Protocol，網際網路控制訊息協定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7"><text:span text:style-name="T569">診斷網路連線（</text:span><text:span text:style-name="T568">Ping / Traceroute</text:span><text:span text:style-name="T569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8" text:outline-level="3"><text:span text:style-name="T36">▍</text:span><text:span text:style-name="T37"> </text:span><text:span text:style-name="T623">HIDS</text:span><text:span text:style-name="T624">(</text:span><text:span text:style-name="T625">Host-based Intrusion Detection System</text:span><text:span text:style-name="T624">)</text:span><text:span text:style-name="T37"> vs </text:span><text:span text:style-name="T623">NIDS</text:span><text:span text:style-name="T624">(</text:span><text:span text:style-name="T625">Network Intrusion Detection System</text:span><text:span text:style-name="T624">)</text:span><text:span text:style-name="T38">（</text:span><text:span text:style-name="T626">IDS </text:span><text:span text:style-name="T627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628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628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69"><text:span text:style-name="T569">裝在主機（電腦）內部</text:span></text:p>
          </table:table-cell>
          <table:table-cell table:style-name="表格124.A2" office:value-type="string">
            <text:p text:style-name="P70"><text:span text:style-name="T569">裝在網路節點（交換器旁）</text:span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9">系統 </text:span><text:span text:style-name="T630">Log</text:span><text:span text:style-name="T15">、使用者行為</text:span></text:p>
          </table:table-cell>
          <table:table-cell table:style-name="表格124.A3" office:value-type="string">
            <text:p text:style-name="P71"><text:span text:style-name="T631">網路封包與流量</text:span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632">HIDS </text:span><text:span text:style-name="T633">看主機（</text:span><text:span text:style-name="T632">Log</text:span><text:span text:style-name="T633">）</text:span><text:span text:style-name="T632">· NIDS </text:span><text:span text:style-name="T633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69"><text:span text:style-name="T569">管理與監控網路設備</text:span></text:p>
          </table:table-cell>
          <table:table-cell table:style-name="表格125.A2" office:value-type="string">
            <text:p text:style-name="P70"><text:span text:style-name="T569">測試網路是否連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72"><text:span text:style-name="T568">Application Layer</text:span><text:span text:style-name="T569">（應用層）</text:span></text:p>
          </table:table-cell>
          <table:table-cell table:style-name="表格125.A3" office:value-type="string">
            <text:p text:style-name="P73"><text:span text:style-name="T568">Network Layer</text:span><text:span text:style-name="T569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74"><text:span text:style-name="T568">UDP</text:span></text:p>
          </table:table-cell>
          <table:table-cell table:style-name="表格125.A2" office:value-type="string">
            <text:p text:style-name="P74"><text:span text:style-name="T568">IP </text:span><text:span text:style-name="T569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75"><text:span text:style-name="T631">大樓管理室的監控系統</text:span></text:p>
          </table:table-cell>
          <table:table-cell table:style-name="表格125.A2" office:value-type="string">
            <text:p text:style-name="P75"><text:span text:style-name="T631">網路連線的體溫計</text:span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632">SNMP </text:span><text:span text:style-name="T633">管理設備（應用層 </text:span><text:span text:style-name="T632">/ UDP</text:span><text:span text:style-name="T633">）</text:span><text:span text:style-name="T632">· ICMP </text:span><text:span text:style-name="T633">診斷網路（網路層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34"><text:span text:style-name="T635">題目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答案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解析</text:span><text:span text:style-name="T634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36"><text:span text:style-name="T637">Q1 </text:span><text:span text:style-name="T638">何者負責「過濾進出網路流量」？</text:span></text:p>
          </table:table-cell>
          <table:table-cell table:style-name="表格127.A2" office:value-type="string">
            <text:p text:style-name="P20" loext:marker-style-name="T636"><text:span text:style-name="T637">Firewall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Firewall </text:span><text:span text:style-name="T638">是網路入口過濾工具，依規則決定放行。</text:span><text:span text:style-name="T637">IDS/IPS </text:span><text:span text:style-name="T638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2 IDS </text:span><text:span text:style-name="T638">的主要功能為何？</text:span></text:p>
          </table:table-cell>
          <table:table-cell table:style-name="表格127.A3" office:value-type="string">
            <text:p text:style-name="P20" loext:marker-style-name="T636"><text:span text:style-name="T638">偵測並發出警報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3 IPS </text:span><text:span text:style-name="T638">與 </text:span><text:span text:style-name="T637">IDS </text:span><text:span text:style-name="T638">最大差別？</text:span></text:p>
          </table:table-cell>
          <table:table-cell table:style-name="表格127.A2" office:value-type="string">
            <text:p text:style-name="P20" loext:marker-style-name="T636"><text:span text:style-name="T637">IPS </text:span><text:span text:style-name="T638">會阻擋，</text:span><text:span text:style-name="T637">IDS </text:span><text:span text:style-name="T638">不會</text:span></text:p>
          </table:table-cell>
          <table:table-cell table:style-name="表格127.A2" office:value-type="string">
            <text:p text:style-name="P20" loext:marker-style-name="T636"><text:span text:style-name="T637">IPS = IDS </text:span><text:span text:style-name="T638">全功能 </text:span><text:span text:style-name="T637">+ </text:span><text:span text:style-name="T638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4 </text:span><text:span text:style-name="T638">何者屬「主機型入侵偵測」？</text:span></text:p>
          </table:table-cell>
          <table:table-cell table:style-name="表格127.A3" office:value-type="string">
            <text:p text:style-name="P20" loext:marker-style-name="T636"><text:span text:style-name="T637">HIDS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HIDS </text:span><text:span text:style-name="T638">安裝於主機內部，監控 </text:span><text:span text:style-name="T637">Log </text:span><text:span text:style-name="T638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5 NIDS </text:span><text:span text:style-name="T638">主要監控什麼？</text:span></text:p>
          </table:table-cell>
          <table:table-cell table:style-name="表格127.A2" office:value-type="string">
            <text:p text:style-name="P20" loext:marker-style-name="T636"><text:span text:style-name="T638">網路封包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NIDS </text:span><text:span text:style-name="T638">部署在網路節點，分析封包流量；</text:span><text:span text:style-name="T637">HIDS </text:span><text:span text:style-name="T638">才看 </text:span><text:span text:style-name="T637">Log</text:span><text:span text:style-name="T638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6 SNMP </text:span><text:span text:style-name="T638">的主要用途？</text:span></text:p>
          </table:table-cell>
          <table:table-cell table:style-name="表格127.A3" office:value-type="string">
            <text:p text:style-name="P20" loext:marker-style-name="T636"><text:span text:style-name="T638">管理網路設備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監控與管理路由器、交換器狀態（</text:span><text:span text:style-name="T637">CPU</text:span><text:span text:style-name="T638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7 ICMP </text:span><text:span text:style-name="T638">常用於哪種工具？</text:span></text:p>
          </table:table-cell>
          <table:table-cell table:style-name="表格127.A2" office:value-type="string">
            <text:p text:style-name="P20" loext:marker-style-name="T636"><text:span text:style-name="T637">Ping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Ping </text:span><text:span text:style-name="T638">與 </text:span><text:span text:style-name="T637">Traceroute </text:span><text:span text:style-name="T638">都用 </text:span><text:span text:style-name="T637">ICMP </text:span><text:span text:style-name="T638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8 ICMP </text:span><text:span text:style-name="T638">屬 </text:span><text:span text:style-name="T637">OSI </text:span><text:span text:style-name="T638">哪一層？</text:span></text:p>
          </table:table-cell>
          <table:table-cell table:style-name="表格127.A3" office:value-type="string">
            <text:p text:style-name="P20" loext:marker-style-name="T636"><text:span text:style-name="T637">Network Layer</text:span><text:span text:style-name="T636"/></text:p>
          </table:table-cell>
          <table:table-cell table:style-name="表格127.A3" office:value-type="string">
            <text:p text:style-name="P20" loext:marker-style-name="T636"><text:span text:style-name="T639">ICMP </text:span><text:span text:style-name="T640">是 </text:span><text:span text:style-name="T639">IP </text:span><text:span text:style-name="T640">的附屬協定，屬網路層</text:span><text:span text:style-name="T638">；</text:span><text:span text:style-name="T637">SNMP </text:span><text:span text:style-name="T638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9 </text:span><text:span text:style-name="T638">何者用 </text:span><text:span text:style-name="T637">UDP </text:span><text:span text:style-name="T638">且屬應用層？</text:span></text:p>
          </table:table-cell>
          <table:table-cell table:style-name="表格127.A2" office:value-type="string">
            <text:p text:style-name="P20" loext:marker-style-name="T636"><text:span text:style-name="T637">SNMP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SNMP </text:span><text:span text:style-name="T638">用 </text:span><text:span text:style-name="T637">UDP</text:span><text:span text:style-name="T638">、屬應用層；</text:span><text:span text:style-name="T637">ICMP </text:span><text:span text:style-name="T638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10 </text:span><text:span text:style-name="T638">下列何者正確？</text:span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用於設備管理</text:span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不阻擋；</text:span><text:span text:style-name="T637">Firewall </text:span><text:span text:style-name="T638">不做行為分析；</text:span><text:span text:style-name="T637">ICMP </text:span><text:span text:style-name="T638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641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641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641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641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641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641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6" loext:marker-style-name="T642"><text:span text:style-name="T643">祝　金榜題名　</text:span><text:span text:style-name="T644">·</text:span><text:span text:style-name="T643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9T00:41:50.482219100</dc:date>
    <meta:editing-cycles>509</meta:editing-cycles>
    <dc:title>網路概論與資訊安全 完整整合筆記</dc:title>
    <meta:editing-duration>P3DT8H50M56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82" meta:character-count="48883" meta:non-whitespace-character-count="44078"/>
    <meta:user-defined meta:name="AppVersion">15.0000</meta:user-defined>
  </office:meta>
</office:document-meta>
</file>