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2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76ff03" style:font-weight-asian="bold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18ffff" style:font-weight-asian="bold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ff00" style:font-weight-asian="bold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7c4dff" style:font-weight-asian="bold" style:font-weight-complex="bold"/>
    </style:style>
    <style:style style:name="P49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7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5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5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4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0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1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4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5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7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1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2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5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6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7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1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3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4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5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1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4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7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48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1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2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4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6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1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3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7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8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9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70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2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73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74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5" style:family="text">
      <style:text-properties fo:color="#2b2b2b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6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7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8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9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80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2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6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7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8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9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0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1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2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3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4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95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6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9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600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604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605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606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07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08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09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10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11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12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13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108">0</text:span><text:span text:style-name="T109">～</text:span><text:span text:style-name="T115">12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1">快速判斷一個 </text:span><text:span text:style-name="T242">IP </text:span><text:span text:style-name="T241">屬於哪個 </text:span><text:span text:style-name="T242">/26 </text:span><text:span text:style-name="T241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3">VLSM </text:span><text:span text:style-name="T171">把大網路切小</text:span><text:span text:style-name="T20">；</text:span><text:span text:style-name="T244">CIDR </text:span><text:span text:style-name="T245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6"><text:s/></text:span><text:span text:style-name="T247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8">2 </text:span><text:span text:style-name="T249">個 </text:span><text:span text:style-name="T248">/25 → 1 </text:span><text:span text:style-name="T249">個 </text:span><text:span text:style-name="T248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8">4 </text:span><text:span text:style-name="T249">個 </text:span><text:span text:style-name="T248">/24 → 1 </text:span><text:span text:style-name="T249">個 </text:span><text:span text:style-name="T248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0">反例（無法合併）：</text:span><text:span text:style-name="T251">192.168.1.0/24 </text:span><text:span text:style-name="T252">＋ </text:span><text:span text:style-name="T251">192.168.2.0/24 → </text:span><text:span text:style-name="T252">雖數量為 </text:span><text:span text:style-name="T251">2</text:span><text:span text:style-name="T252">，但起點 </text:span><text:span text:style-name="T251">.1 </text:span><text:span text:style-name="T252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3">2 </text:span><text:span text:style-name="T254">個 </text:span><text:span text:style-name="T253">/26 → /25</text:span><text:span text:style-name="T254">；</text:span><text:span text:style-name="T253">4 </text:span><text:span text:style-name="T254">個 </text:span><text:span text:style-name="T253">/26 → /24</text:span><text:span text:style-name="T254">；</text:span><text:span text:style-name="T253">2 </text:span><text:span text:style-name="T254">個 </text:span><text:span text:style-name="T253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5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6">考試標準解題流程</text:span></text:p>
            <text:p text:style-name="P11"><text:span text:style-name="T257">遇到 </text:span><text:span text:style-name="T258">VLSM </text:span><text:span text:style-name="T257">題：</text:span><text:span text:style-name="T207">確認起始網路</text:span><text:span text:style-name="T20"> → </text:span><text:span text:style-name="T259">需求由大到小</text:span><text:span text:style-name="T20"> → </text:span><text:span text:style-name="T260">各需求 </text:span><text:span text:style-name="T261">+2 </text:span><text:span text:style-name="T260">找 </text:span><text:span text:style-name="T261">2ⁿ </text:span><text:span text:style-name="T260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2">/</text:span><text:span text:style-name="T215">廣播位址</text:span><text:span text:style-name="T262">/</text:span><text:span text:style-name="T215">可用範圍</text:span><text:span text:style-name="T20">。</text:span></text:p>
            <text:p text:style-name="P12"><text:span text:style-name="T257">遇到 </text:span><text:span text:style-name="T258">CIDR </text:span><text:span text:style-name="T257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捌、</text:span><text:span text:style-name="T34">MTU</text:span><text:span text:style-name="T35">（最大傳輸單位）</text:span><text:span text:style-name="T34">(</text:span><text:span text:style-name="T263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4">Maximum Transmission Unit</text:span><text:span text:style-name="T265">，</text:span><text:span text:style-name="T266">一條網路</text:span><text:span text:style-name="T265">「</text:span><text:span text:style-name="T267">一次最多</text:span><text:span text:style-name="T265">能傳送的</text:span><text:span text:style-name="T268">封包大小</text:span><text:span text:style-name="T265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69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0"><text:span text:style-name="T96">IPv4</text:span><text:span text:style-name="T270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1"><text:span text:style-name="T272">✅ </text:span><text:span text:style-name="T273">可以</text:span></text:p>
          </table:table-cell>
          <table:table-cell table:style-name="表格49.A3" office:value-type="string">
            <text:p text:style-name="P20" loext:marker-style-name="T274"><text:span text:style-name="T275">封包到 </text:span><text:span text:style-name="T276">Router </text:span><text:span text:style-name="T275">太大時，</text:span><text:span text:style-name="T276">Router </text:span><text:span text:style-name="T275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0"><text:span text:style-name="T96">IPv6</text:span><text:span text:style-name="T270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7"><text:span text:style-name="T278">❌ </text:span><text:span text:style-name="T279">不行</text:span></text:p>
          </table:table-cell>
          <table:table-cell table:style-name="表格49.A4" office:value-type="string">
            <text:p text:style-name="P20" loext:marker-style-name="T14"><text:span text:style-name="T280">Router </text:span><text:span text:style-name="T281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2">接收端靠此 </text:span><text:span text:style-name="T283">ID </text:span><text:span text:style-name="T282">判斷哪些 </text:span><text:span text:style-name="T283">fragment </text:span><text:span text:style-name="T282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4">最多可經過幾個 </text:span><text:span text:style-name="T285">Router</text:span><text:span text:style-name="T284">；每經過一個 −</text:span><text:span text:style-name="T285">1</text:span><text:span text:style-name="T20">，</text:span><text:span text:style-name="T215">歸零時 </text:span><text:span text:style-name="T262">Router </text:span><text:span text:style-name="T215">丟棄並回 </text:span><text:span text:style-name="T262">ICMP</text:span><text:span text:style-name="T215">「</text:span><text:span text:style-name="T262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0"><text:span text:style-name="T96">0 ÷ 8 = 0</text:span><text:span text:style-name="T270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6"><text:span text:style-name="T287">ICMP</text:span><text:span text:style-name="T286"/></text:p>
          </table:table-cell>
          <table:table-cell table:style-name="表格50.A3" table:number-columns-spanned="2" office:value-type="string">
            <text:p text:style-name="P20" loext:marker-style-name="T288"><text:span text:style-name="T289">ping</text:span><text:span text:style-name="T290">、</text:span><text:span text:style-name="T289">TTL </text:span><text:span text:style-name="T290">超時通知、</text:span><text:span text:style-name="T289">Fragmentation </text:span><text:span text:style-name="T290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oft-page-break/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1">&gt; </text:span><text:span text:style-name="T158">該路段 </text:span><text:span text:style-name="T291">MTU</text:span><text:span text:style-name="T42"> → ③ </text:span><text:span text:style-name="T292">Router </text:span><text:span text:style-name="T129">不能切，直接丟棄 </text:span><text:span text:style-name="T20">→ ④ </text:span><text:span text:style-name="T285">Router </text:span><text:span text:style-name="T284">回傳 </text:span><text:span text:style-name="T285">ICMP</text:span><text:span text:style-name="T284">「</text:span><text:span text:style-name="T285">Fragmentation Needed</text:span><text:span text:style-name="T284">」（含可用 </text:span><text:span text:style-name="T285">MTU </text:span><text:span text:style-name="T284">大小）</text:span><text:span text:style-name="T20">→ ⑤ </text:span><text:span text:style-name="T169">送端調整封包大小後</text:span><text:span text:style-name="T293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3"> </text:span><text:span text:style-name="T294">Path MTU Discovery</text:span><text:span text:style-name="T293">，自動找出</text:span><text:span text:style-name="T295">來源到目的地</text:span><text:span text:style-name="T293">整條路徑中</text:span><text:span text:style-name="T296">最小的 </text:span><text:span text:style-name="T297">MTU </text:span><text:span text:style-name="T296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8"><text:span text:style-name="T255">IPv4</text:span><text:span text:style-name="T298"/></text:p>
          </table:table-cell>
          <table:table-cell table:style-name="表格52.A2" office:value-type="string">
            <text:p text:style-name="P20" loext:marker-style-name="T299"><text:span text:style-name="T300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8"><text:span text:style-name="T255">IPv6</text:span><text:span text:style-name="T298"/></text:p>
          </table:table-cell>
          <table:table-cell table:style-name="表格52.A3" office:value-type="string">
            <text:p text:style-name="P20" loext:marker-style-name="T299"><text:span text:style-name="T300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1">MSS = MTU − IP Header − TCP Header </text:span><text:span text:style-name="T42">= </text:span><text:span text:style-name="T83">1500 − 20 − 20 = 1460 bytes</text:span><text:span text:style-name="T20">。</text:span><text:span text:style-name="T302">三向交握時雙方各自宣告 </text:span><text:span text:style-name="T303">MSS</text:span><text:span text:style-name="T302">，之後每段 ≤ </text:span><text:span text:style-name="T303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6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4">從源頭就避免 </text:span><text:span text:style-name="T301">Fragmentation </text:span><text:span text:style-name="T304">發生</text:span><text:span text:style-name="T20">。</text:span><text:span text:style-name="T283">TCP </text:span><text:span text:style-name="T282">做 </text:span><text:span text:style-name="T283">Segmentation </text:span><text:span text:style-name="T282">的主要目的之一，就是讓每個封包符合 </text:span><text:span text:style-name="T283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5">放入緩衝區 </text:span><text:span text:style-name="T20">→ </text:span><text:span text:style-name="T284">等同一 </text:span><text:span text:style-name="T285">ID </text:span><text:span text:style-name="T284">的所有 </text:span><text:span text:style-name="T285">Fragment </text:span><text:span text:style-name="T284">到齊 → 依</text:span><text:span text:style-name="T305"> </text:span><text:span text:style-name="T306">Offset </text:span><text:span text:style-name="T284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6">防禦方式</text:span></text:p>
            <text:p text:style-name="P11" loext:marker-style-name="T21"><text:span text:style-name="T20">防禦：</text:span><text:span text:style-name="T307">設定重組 </text:span><text:span text:style-name="T308">buffer </text:span><text:span text:style-name="T307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Identification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每箱貼上同一個「訂單號碼」</text:span><text:span text:style-name="T298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299"><text:span text:style-name="T300">Fragment Offset</text:span><text:span text:style-name="T299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9"><text:span text:style-name="T310">PMTUD</text:span><text:span text:style-name="T309"/></text:p>
          </table:table-cell>
          <table:table-cell table:style-name="表格55.A2" office:value-type="string">
            <text:p text:style-name="P20" loext:marker-style-name="T311"><text:span text:style-name="T312">先試寄 → 被退 → 知道上限 → 調整大小再寄</text:span><text:span text:style-name="T311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3"><text:span text:style-name="T314">TTL</text:span><text:span text:style-name="T313"/></text:p>
          </table:table-cell>
          <table:table-cell table:style-name="表格55.A3" office:value-type="string">
            <text:p text:style-name="P20" loext:marker-style-name="T315"><text:span text:style-name="T87">貨物限轉 </text:span><text:span text:style-name="T316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MSS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你自己量好每箱重量，確保不超重</text:span><text:span text:style-name="T298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7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5">NAT </text:span><text:span text:style-name="T120">共用 </text:span><text:span text:style-name="T255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0">IP</text:span><text:span text:style-name="T70">，不需 </text:span><text:span text:style-name="T300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5">VPN</text:span></text:p>
          </table:table-cell>
          <table:table-cell table:style-name="表格57.A2" office:value-type="string">
            <text:p text:style-name="P20" loext:marker-style-name="T14"><text:span text:style-name="T318">支援 </text:span><text:span text:style-name="T319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0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8"><text:span text:style-name="T120">無法有效標記流量優先權</text:span><text:span text:style-name="T298"/></text:p>
          </table:table-cell>
          <table:table-cell table:style-name="表格57.A2" office:value-type="string">
            <text:p text:style-name="P20" loext:marker-style-name="T14"><text:span text:style-name="T300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5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0">Multicast</text:span><text:span text:style-name="T70">（群播）／ </text:span><text:span text:style-name="T300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6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0">裝置同時具備 </text:span><text:span text:style-name="T321">IPv4 </text:span><text:span text:style-name="T320">與 </text:span><text:span text:style-name="T321">IPv6 </text:span><text:span text:style-name="T320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2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0">將 </text:span><text:span text:style-name="T321">IPv6 </text:span><text:span text:style-name="T320">封包完整封裝進 </text:span><text:span text:style-name="T321">IPv4 </text:span><text:span text:style-name="T320">外殼，抵達目的地後拆除外層 </text:span><text:span text:style-name="T321">IPv4</text:span><text:span text:style-name="T320">、還原 </text:span><text:span text:style-name="T321">IPv6 </text:span><text:span text:style-name="T320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3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4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5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4">同時會中文 </text:span><text:span text:style-name="T325">+ </text:span><text:span text:style-name="T324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6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7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8">（</text:span><text:span text:style-name="T329">NAT</text:span><text:span text:style-name="T328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0">安全（</text:span><text:span text:style-name="T331">IPsec</text:span><text:span text:style-name="T330">）</text:span><text:span text:style-name="T20">＋ </text:span><text:span text:style-name="T215">快（固定 </text:span><text:span text:style-name="T262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2">Header </text:span><text:span text:style-name="T333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8">支援 </text:span><text:span text:style-name="T319">IPsec</text:span><text:span text:style-name="T15">／</text:span><text:span text:style-name="T318">固定 </text:span><text:span text:style-name="T319">40 bytes </text:span><text:span text:style-name="T318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6">資料在網路中「實際傳送」靠 </text:span><text:span text:style-name="T297">MAC</text:span><text:span text:style-name="T20">，</text:span><text:span text:style-name="T282">但我們只知道對方的 </text:span><text:span text:style-name="T283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4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5">我之前有沒有問過這個 </text:span><text:span text:style-name="T336">IP</text:span><text:span text:style-name="T335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4"> 對整個區網廣播</text:span><text:span text:style-name="T20">「誰是 </text:span><text:span text:style-name="T42">192.168.1.5</text:span><text:span text:style-name="T20">？</text:span><text:span text:style-name="T284">請告訴我你的 </text:span><text:span text:style-name="T285">MAC</text:span><text:span text:style-name="T284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49">把「</text:span><text:span text:style-name="T248">IP ↔ MAC</text:span><text:span text:style-name="T249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7"><text:span text:style-name="T338">ARP Spoofing</text:span><text:span text:style-name="T339">（</text:span><text:span text:style-name="T338">ARP </text:span><text:span text:style-name="T339">欺騙）</text:span></text:p>
          </table:table-cell>
          <table:table-cell table:style-name="表格62.A3" office:value-type="string">
            <text:p text:style-name="P20" loext:marker-style-name="T14"><text:span text:style-name="T340">攻擊者</text:span><text:span text:style-name="T341">假冒他人</text:span><text:span text:style-name="T340">的 </text:span><text:span text:style-name="T317">MAC</text:span><text:span text:style-name="T340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8"><text:span text:style-name="T255">arp -a</text:span><text:span text:style-name="T298"/></text:p>
          </table:table-cell>
          <table:table-cell table:style-name="表格62.A4" office:value-type="string">
            <text:p text:style-name="P20" loext:marker-style-name="T14"><text:span text:style-name="T342">查看本機的 </text:span><text:span text:style-name="T343">ARP </text:span><text:span text:style-name="T342">對應表</text:span><text:span text:style-name="T15">（</text:span><text:span text:style-name="T344">IP ↔ MAC </text:span><text:span text:style-name="T345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6"><text:span text:style-name="T319">ping [IP]</text:span><text:span text:style-name="T346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5">路由器幫你把「私有 </text:span><text:span text:style-name="T336">IP</text:span><text:span text:style-name="T335">」改成「公網 </text:span><text:span text:style-name="T336">IP</text:span><text:span text:style-name="T335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299"><text:span text:style-name="T300">Static NAT</text:span><text:span text:style-name="T299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7"><text:span text:style-name="T348">一個私有 </text:span><text:span text:style-name="T349">IP ↔ </text:span><text:span text:style-name="T348">一個公網 </text:span><text:span text:style-name="T349">IP</text:span></text:p>
          </table:table-cell>
          <table:table-cell table:style-name="表格63.A3" office:value-type="string">
            <text:p text:style-name="P20" loext:marker-style-name="T347"><text:span text:style-name="T348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299"><text:span text:style-name="T300">Dynamic NAT</text:span><text:span text:style-name="T299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0"><text:span text:style-name="T351">多個私有 </text:span><text:span text:style-name="T352">IP </text:span><text:span text:style-name="T351">對應 </text:span><text:span text:style-name="T352">IP </text:span><text:span text:style-name="T351">池（</text:span><text:span text:style-name="T352">pool</text:span><text:span text:style-name="T351">）</text:span></text:p>
          </table:table-cell>
          <table:table-cell table:style-name="表格63.A4" office:value-type="string">
            <text:p text:style-name="P20" loext:marker-style-name="T350"><text:span text:style-name="T351">動態分配</text:span><text:span text:style-name="T350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7"><text:span text:style-name="T338">PAT</text:span><text:span text:style-name="T337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3"><text:span text:style-name="T354">多台共用一個公網 </text:span><text:span text:style-name="T355">IP</text:span></text:p>
          </table:table-cell>
          <table:table-cell table:style-name="表格63.A3" office:value-type="string">
            <text:p text:style-name="P20" loext:marker-style-name="T353"><text:span text:style-name="T354">靠 </text:span><text:span text:style-name="T355">Port </text:span><text:span text:style-name="T354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6">破壞 </text:span><text:span text:style-name="T297">End-to-End </text:span><text:span text:style-name="T296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7">P2P / VoIP </text:span><text:span text:style-name="T296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6">直連功能受限</text:span><text:span text:style-name="T20">。</text:span></text:p>
            <text:p text:style-name="P12"><text:span text:style-name="T296">增加延遲</text:span><text:span text:style-name="T46">：</text:span><text:span text:style-name="T357">每個封包都需要</text:span><text:span text:style-name="T358">多一道 </text:span><text:span text:style-name="T359">IP </text:span><text:span text:style-name="T358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0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3">Port</text:span><text:span text:style-name="T282">＝房間號碼</text:span><text:span text:style-name="T20">；</text:span><text:span text:style-name="T336">NAT </text:span><text:span text:style-name="T335">路由器＝大樓</text:span><text:span text:style-name="T20">；</text:span><text:span text:style-name="T283">Port Forwarding</text:span><text:span text:style-name="T282">＝門口指示牌「</text:span><text:span text:style-name="T283">80 </text:span><text:span text:style-name="T282">號房 → </text:span><text:span text:style-name="T283">192.168.1.2</text:span><text:span text:style-name="T282">」</text:span><text:span text:style-name="T20">。例：</text:span><text:span text:style-name="T42">220.x.x.x:80 → 192.168.1.2:80</text:span><text:span text:style-name="T20">（</text:span><text:span text:style-name="T361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5">每個服務都要手動設定，</text:span><text:span text:style-name="T264">IP </text:span><text:span text:style-name="T265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2">讓裝置自動跟</text:span><text:span text:style-name="T363">路由器</text:span><text:span text:style-name="T362">要求「幫我開一個 </text:span><text:span text:style-name="T364">Port</text:span><text:span text:style-name="T362">」，不需人工設定。</text:span><text:span text:style-name="T20">① </text:span><text:span text:style-name="T365">應用程式發 </text:span><text:span text:style-name="T366">UPnP </text:span><text:span text:style-name="T365">請求</text:span><text:span text:style-name="T20"> → ② </text:span><text:span text:style-name="T367">路由器</text:span><text:span text:style-name="T365">自動新增 </text:span><text:span text:style-name="T366">Port Forwarding </text:span><text:span text:style-name="T365">規則</text:span><text:span text:style-name="T20"> → ③</text:span><text:span text:style-name="T368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0">安全風險（重要）：</text:span><text:span text:style-name="T265">惡意程式也能透過 </text:span><text:span text:style-name="T264">UPnP </text:span><text:span text:style-name="T265">自動開 </text:span><text:span text:style-name="T264">Port</text:span><text:span text:style-name="T265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3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69">兩端都在各自 </text:span><text:span text:style-name="T370">NAT </text:span><text:span text:style-name="T369">後面，彼此都是私有 </text:span><text:span text:style-name="T370">IP</text:span><text:span text:style-name="T369">、互相找不到。</text:span><text:span text:style-name="T370">STUN </text:span><text:span text:style-name="T369">先幫每端「查清楚自己對外的公網 </text:span><text:span text:style-name="T370">IP + Port</text:span><text:span text:style-name="T369">」，再交換資訊</text:span><text:span text:style-name="T20">嘗試直接打通。</text:span></text:p>
            <text:p text:style-name="P12" loext:marker-style-name="T21"><text:span text:style-name="T42">① </text:span><text:span text:style-name="T371">問 </text:span><text:span text:style-name="T372">STUN </text:span><text:span text:style-name="T371">伺服器「我對外的 </text:span><text:span text:style-name="T372">IP </text:span><text:span text:style-name="T371">和 </text:span><text:span text:style-name="T372">Port </text:span><text:span text:style-name="T371">是什麼？」</text:span><text:span text:style-name="T20">② </text:span><text:span text:style-name="T372">STUN </text:span><text:span text:style-name="T371">回「你對外是 </text:span><text:span text:style-name="T372">220.x.x.x:12345</text:span><text:span text:style-name="T371">」</text:span><text:span text:style-name="T20">③ </text:span><text:span text:style-name="T154">朋友也做同樣的事</text:span><text:span text:style-name="T20"> → ④ </text:span><text:span text:style-name="T371">兩端透過第三方交換彼此公網位址</text:span><text:span text:style-name="T20"> → ⑤ </text:span><text:span text:style-name="T371">同時互相發送封包打洞（</text:span><text:span text:style-name="T372">Hole Punching</text:span><text:span text:style-name="T371">）</text:span><text:span text:style-name="T20">。</text:span></text:p>
            <text:p text:style-name="P12"><text:span text:style-name="T250">重要限制：</text:span><text:span text:style-name="T264">STUN </text:span><text:span text:style-name="T265">只對部分 </text:span><text:span text:style-name="T264">NAT </text:span><text:span text:style-name="T265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299"><text:span text:style-name="T70">手動設定路由器</text:span><text:span text:style-name="T299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299"><text:span text:style-name="T70">應用程式自動設定</text:span><text:span text:style-name="T299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299"><text:span text:style-name="T70">無需路由器設定</text:span><text:span text:style-name="T299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0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3">場景</text:span><text:span text:style-name="T174">：</text:span><text:span text:style-name="T374">你電腦 </text:span><text:span text:style-name="T375">192.168.1.2</text:span><text:span text:style-name="T374">／路由器內網 </text:span><text:span text:style-name="T375">IP 192.168.1.1</text:span><text:span text:style-name="T374">／路由器公網 </text:span><text:span text:style-name="T375">IP 220.x.x.x</text:span><text:span text:style-name="T374">／目標 </text:span><text:span text:style-name="T375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6">Google </text:span><text:span text:style-name="T377">的 </text:span><text:span text:style-name="T376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8">發現 </text:span><text:span text:style-name="T379">Google </text:span><text:span text:style-name="T380">不在同一個區網</text:span><text:span text:style-name="T378">，必須交給路由器幫忙送</text:span><text:span text:style-name="T108">)(</text:span><text:span text:style-name="T381">查詢路由器的 </text:span><text:span text:style-name="T382">MAC</text:span><text:span text:style-name="T381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3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4">IP </text:span><text:span text:style-name="T385">記</text:span><text:soft-page-break/><text:span text:style-name="T385">錄最終目的地；</text:span><text:span text:style-name="T384">MAC </text:span><text:span text:style-name="T385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6">192.168.1.2 → 220.x.x.x</text:span><text:span text:style-name="T108">(</text:span><text:span text:style-name="T387">路由器收到後往 </text:span><text:span text:style-name="T388">Internet </text:span><text:span text:style-name="T387">送</text:span><text:span text:style-name="T109">；路由器負責跨網路傳遞</text:span><text:span text:style-name="T108">)(</text:span><text:span text:style-name="T387">私有 </text:span><text:span text:style-name="T388">IP </text:span><text:span text:style-name="T387">換成公網 </text:span><text:span text:style-name="T388">IP</text:span><text:span text:style-name="T387">，因</text:span><text:span text:style-name="T388">Internet </text:span><text:span text:style-name="T387">不認私有 </text:span><text:span text:style-name="T388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89">封包抵達目的地</text:span><text:span text:style-name="T108">(</text:span><text:span text:style-name="T390">Google </text:span><text:span text:style-name="T391">看到公網 </text:span><text:span text:style-name="T390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2">回傳給 </text:span><text:span text:style-name="T393">220.x.x.x</text:span><text:span text:style-name="T108">(</text:span><text:span text:style-name="T394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6">220.x.x.x → 192.168.1.2</text:span><text:span text:style-name="T108">(</text:span><text:span text:style-name="T379">NAT </text:span><text:span text:style-name="T378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5">✗ </text:span><text:span text:style-name="T396">以為 </text:span><text:span text:style-name="T395">ARP </text:span><text:span text:style-name="T396">是找 </text:span><text:span text:style-name="T395">Google </text:span><text:span text:style-name="T396">的 </text:span><text:span text:style-name="T395">MAC</text:span><text:span text:style-name="T250">　→　</text:span><text:span text:style-name="T397">✓ </text:span><text:span text:style-name="T398">ARP </text:span><text:span text:style-name="T397">找的是「路由器」的 </text:span><text:span text:style-name="T398">MAC</text:span><text:span text:style-name="T397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5">✗ </text:span><text:span text:style-name="T396">以為封包直接送到 </text:span><text:span text:style-name="T395">Google</text:span><text:span text:style-name="T250">　→　</text:span><text:span text:style-name="T397">✓ 封包先送給路由器，路由器再轉到 </text:span><text:span text:style-name="T398">Internet</text:span><text:span text:style-name="T20">。</text:span></text:p>
            <text:p text:style-name="P12"><text:span text:style-name="T395">✗ </text:span><text:span text:style-name="T396">以為 </text:span><text:span text:style-name="T395">IP </text:span><text:span text:style-name="T396">在傳輸過程中一直不變</text:span><text:span text:style-name="T250">　→　</text:span><text:span text:style-name="T397">✓ </text:span><text:span text:style-name="T398">NAT </text:span><text:span text:style-name="T397">會在去程改掉來源 </text:span><text:span text:style-name="T398">IP</text:span><text:span text:style-name="T397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6">考試標準答案（直接背）</text:span></text:p>
            <text:p text:style-name="P11" loext:marker-style-name="T21"><text:span text:style-name="T86">使用者輸入網址後</text:span><text:span text:style-name="T20">，</text:span><text:span text:style-name="T399">先透過 </text:span><text:span text:style-name="T400">DNS </text:span><text:span text:style-name="T399">將網域名稱解析為 </text:span><text:span text:style-name="T400">IP</text:span><text:span text:style-name="T20">；</text:span><text:span text:style-name="T368">接著主機利用 </text:span><text:span text:style-name="T401">ARP </text:span><text:span text:style-name="T368">取得路由器（預設閘道）的 </text:span><text:span text:style-name="T401">MAC</text:span><text:span text:style-name="T20">，</text:span><text:span text:style-name="T368">將封包傳送至路由器</text:span><text:span text:style-name="T20">；</text:span><text:span text:style-name="T402">路由器透過 </text:span><text:span text:style-name="T403">NAT </text:span><text:span text:style-name="T402">將私有 </text:span><text:span text:style-name="T403">IP </text:span><text:span text:style-name="T402">轉換為公網 </text:span><text:span text:style-name="T403">IP </text:span><text:span text:style-name="T402">後送往 </text:span><text:span text:style-name="T403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4"><text:span text:style-name="T405">用 </text:span><text:span text:style-name="T406">IP </text:span><text:span text:style-name="T405">找 </text:span><text:span text:style-name="T406">MAC</text:span></text:p>
          </table:table-cell>
          <table:table-cell table:style-name="表格67.A2" office:value-type="string">
            <text:p text:style-name="P20" loext:marker-style-name="T407"><text:span text:style-name="T408">私有 </text:span><text:span text:style-name="T409">IP </text:span><text:span text:style-name="T408">轉成公網 </text:span><text:span text:style-name="T409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8"><text:span text:style-name="T120">區域網路（</text:span><text:span text:style-name="T255">LAN</text:span><text:span text:style-name="T120">）內</text:span></text:p>
          </table:table-cell>
          <table:table-cell table:style-name="表格67.A3" office:value-type="string">
            <text:p text:style-name="P20" loext:marker-style-name="T299"><text:span text:style-name="T70">內網與 </text:span><text:span text:style-name="T300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0"><text:span text:style-name="T411">L2 / L3 </text:span><text:span text:style-name="T412">交界</text:span></text:p>
          </table:table-cell>
          <table:table-cell table:style-name="表格67.A2" office:value-type="string">
            <text:p text:style-name="P20" loext:marker-style-name="T413"><text:span text:style-name="T414">L3</text:span><text:span text:style-name="T415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8"><text:span text:style-name="T120">資料可能丟失</text:span><text:span text:style-name="T298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順序可能亂掉</text:span><text:span text:style-name="T298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8"><text:span text:style-name="T120">對方來不及收</text:span><text:span text:style-name="T298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網路可能塞車</text:span><text:span text:style-name="T298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6"><text:span text:style-name="T340">需要先建立連線</text:span><text:span text:style-name="T416"/></text:p>
          </table:table-cell>
          <table:table-cell table:style-name="表格70.A2" office:value-type="string">
            <text:p text:style-name="P20" loext:marker-style-name="T346"><text:span text:style-name="T318">無連線，直接送</text:span><text:span text:style-name="T346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299"><text:span text:style-name="T70">網頁、檔案傳輸、</text:span><text:span text:style-name="T300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8"><text:span text:style-name="T120">專業物流（簽收確認）</text:span><text:span text:style-name="T298"/></text:p>
          </table:table-cell>
          <table:table-cell table:style-name="表格70.A3" office:value-type="string">
            <text:p text:style-name="P20" loext:marker-style-name="T298"><text:span text:style-name="T120">亂丟紙飛機</text:span><text:span text:style-name="T298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7">避免「</text:span><text:span text:style-name="T418">舊封包誤觸發新連線</text:span><text:span text:style-name="T417">」</text:span><text:span text:style-name="T20">：若少一次確認，</text:span><text:span text:style-name="T362">延遲的舊 </text:span><text:span text:style-name="T364">SYN </text:span><text:span text:style-name="T362">封包可能讓 </text:span><text:span text:style-name="T364">Server </text:span><text:span text:style-name="T362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19">故意不完成第三次握手（</text:span><text:span text:style-name="T169">不回 </text:span><text:span text:style-name="T170">ACK</text:span><text:span text:style-name="T419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5">SYN</text:span><text:span text:style-name="T15">，每個都</text:span><text:span text:style-name="T70">假冒不同來源 </text:span><text:span text:style-name="T300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0">Server </text:span><text:span text:style-name="T421">建立「半連線（</text:span><text:span text:style-name="T420">Half-open Connection</text:span><text:span text:style-name="T421">）」</text:span><text:span text:style-name="T15">，</text:span><text:span text:style-name="T339">每個都佔記憶體等待 </text:span><text:span text:style-name="T338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2">攻擊者永遠不回 </text:span><text:span text:style-name="T423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4">rwnd</text:span><text:span text:style-name="T34"> </text:span><text:span text:style-name="T35">與 </text:span><text:span text:style-name="T42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5">對方 </text:span><text:span text:style-name="T426">buffer</text:span><text:span text:style-name="T425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0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7">實際傳送量 ＝ </text:span><text:span text:style-name="T428">min(rwnd, cwnd)</text:span><text:span text:style-name="T168">　</text:span><text:span text:style-name="T84">取兩者最小值</text:span><text:span text:style-name="T20">。</text:span><text:span text:style-name="T429">對方吃不下就看 </text:span><text:span text:style-name="T430">rwnd</text:span><text:span text:style-name="T429">；網路塞就看 </text:span><text:span text:style-name="T430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8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1">不用等 </text:span><text:span text:style-name="T432">ACK</text:span><text:span text:style-name="T431">，先連續送出多個封包讓封包都在網路上飛（</text:span><text:span text:style-name="T432">in-flight</text:span><text:span text:style-name="T431">），</text:span><text:span text:style-name="T432">ACK </text:span><text:span text:style-name="T431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3">✗ </text:span><text:span text:style-name="T250">常見錯誤：</text:span><text:span text:style-name="T20">視窗 </text:span><text:span text:style-name="T42">= cwnd</text:span><text:span text:style-name="T20">（擁塞視窗）。</text:span><text:span text:style-name="T257">✓ 正確：</text:span><text:span text:style-name="T362">視窗 </text:span><text:span text:style-name="T364">= min(cwnd, rwnd)</text:span><text:span text:style-name="T362">，</text:span><text:span text:style-name="T364">cwnd </text:span><text:span text:style-name="T36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6"><text:span text:style-name="T434">收到 </text:span><text:span text:style-name="T287">ACK 1</text:span></text:p>
          </table:table-cell>
          <table:table-cell table:style-name="表格74.A4" office:value-type="string">
            <text:p text:style-name="P20" loext:marker-style-name="T435"><text:span text:style-name="T436">封包 </text:span><text:span text:style-name="T437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6"><text:span text:style-name="T434">收到 </text:span><text:span text:style-name="T287">ACK 2</text:span></text:p>
          </table:table-cell>
          <table:table-cell table:style-name="表格74.A3" office:value-type="string">
            <text:p text:style-name="P20" loext:marker-style-name="T435"><text:span text:style-name="T436">封包 </text:span><text:span text:style-name="T437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2">ACK </text:span><text:span text:style-name="T371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5">每收到一個 </text:span><text:span text:style-name="T264">ACK</text:span><text:span text:style-name="T265">，</text:span><text:span text:style-name="T264">cwnd </text:span><text:span text:style-name="T265">就 </text:span><text:span text:style-name="T264">+1</text:span><text:span text:style-name="T20">；</text:span><text:span text:style-name="T335">送出 </text:span><text:span text:style-name="T336">N </text:span><text:span text:style-name="T335">個封包 → 收回 </text:span><text:span text:style-name="T336">N </text:span><text:span text:style-name="T335">個 </text:span><text:span text:style-name="T336">ACK → cwnd </text:span><text:span text:style-name="T335">增加 </text:span><text:span text:style-name="T336">N</text:span><text:span text:style-name="T20">，所以每輪自然翻倍。</text:span><text:span text:style-name="T42">(</text:span><text:span text:style-name="T364">Slow Start = </text:span><text:span text:style-name="T362">每一輪變 </text:span><text:span text:style-name="T364">2 </text:span><text:span text:style-name="T362">倍，</text:span><text:span text:style-name="T364">Congestion Avoidance = </text:span><text:span text:style-name="T362">每一輪只加 </text:span><text:span text:style-name="T364">1</text:span><text:span text:style-name="T42">(</text:span><text:span text:style-name="T20">「</text:span><text:span text:style-name="T438">Slow Start</text:span><text:span text:style-name="T439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3">cwnd </text:span><text:span text:style-name="T282">成長到門檻值（</text:span><text:span text:style-name="T283">ssthresh</text:span><text:span text:style-name="T282">）後，改為線性成長</text:span><text:span text:style-name="T20">（</text:span><text:span text:style-name="T265">每個 </text:span><text:span text:style-name="T264">RTT </text:span><text:span text:style-name="T265">只 </text:span><text:span text:style-name="T264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6"><text:span text:style-name="T287">cwnd &lt; ssthresh</text:span><text:span text:style-name="T286"/></text:p>
          </table:table-cell>
          <table:table-cell table:style-name="表格76.A2" office:value-type="string">
            <text:p text:style-name="P20" loext:marker-style-name="T286"><text:span text:style-name="T287">cwnd ≥ ssthresh</text:span><text:span text:style-name="T286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0">指數成長</text:span><text:span text:style-name="T15">（</text:span><text:span text:style-name="T441">每個 </text:span><text:span text:style-name="T442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2">線性成長</text:span><text:span text:style-name="T15">（</text:span><text:span text:style-name="T441">每個 </text:span><text:span text:style-name="T442">RTT +1</text:span><text:span text:style-name="T15">）</text:span><text:span text:style-name="T16">(</text:span><text:span text:style-name="T443">RTT </text:span><text:span text:style-name="T444">：</text:span><text:span text:style-name="T443">Round Trip Time</text:span><text:span text:style-name="T444">（往返時間）</text:span><text:span text:style-name="T443">= </text:span><text:span text:style-name="T444">封包出去 </text:span><text:span text:style-name="T443">+ ACK </text:span><text:span text:style-name="T444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5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7"><text:span text:style-name="T119">重新進入 </text:span><text:span text:style-name="T448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49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7"><text:span text:style-name="T119">進入 </text:span><text:span text:style-name="T448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5">Timeout </text:span><text:span text:style-name="T374">代表網路嚴重問題</text:span><text:span text:style-name="T20">，</text:span><text:span text:style-name="T450">cwnd </text:span><text:span text:style-name="T451">重設回 </text:span><text:span text:style-name="T450">1 </text:span><text:span text:style-name="T451">從頭來</text:span><text:span text:style-name="T20">；</text:span><text:span text:style-name="T452">3 </text:span><text:span text:style-name="T453">個重複 </text:span><text:span text:style-name="T452">ACK </text:span><text:span text:style-name="T453">只是單一封包遺失</text:span><text:span text:style-name="T20">，</text:span><text:span text:style-name="T450">cwnd </text:span><text:span text:style-name="T451">直接減半後繼續 </text:span><text:span text:style-name="T450">Congestion Avoidance</text:span><text:span text:style-name="T451">，不用從頭重來</text:span><text:span text:style-name="T20">。</text:span><text:span text:style-name="T42">(</text:span><text:span text:style-name="T454">Timeout → cwnd = 1</text:span><text:span text:style-name="T455">；</text:span><text:span text:style-name="T454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0">OK </text:span><text:span text:style-name="T16">→ CA </text:span><text:span text:style-name="T15">階段線性增加（</text:span><text:span text:style-name="T120">每 </text:span><text:span text:style-name="T255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5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6">AIMD </text:span><text:span text:style-name="T457">本質：用 </text:span><text:span text:style-name="T456">ACK </text:span><text:span text:style-name="T457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5">用 </text:span><text:span text:style-name="T264">ACK </text:span><text:span text:style-name="T265">當回饋不斷自我調節</text:span><text:span text:style-name="T20">。</text:span></text:p>
          </table:table-cell>
        </table:table-row>
      </table:table>
      <text:h text:style-name="P18" text:outline-level="2" loext:marker-style-name="T458"><text:soft-page-break/><text:span text:style-name="T458">TCP </text:span><text:span text:style-name="T459">七字口訣 <text:s text:c="2"/>握</text:span><text:span text:style-name="T458">(</text:span><text:span text:style-name="T459">三次握手</text:span><text:span text:style-name="T458">) → </text:span><text:span text:style-name="T459">衝</text:span><text:span text:style-name="T458">(Slow Start </text:span><text:span text:style-name="T459">指數成長</text:span><text:span text:style-name="T458">) → </text:span><text:span text:style-name="T459">穩</text:span><text:span text:style-name="T458">(CA </text:span><text:span text:style-name="T459">線性成長</text:span><text:span text:style-name="T458">) → </text:span><text:span text:style-name="T459">看</text:span><text:span text:style-name="T458">(min(rwnd,cwnd)) → </text:span><text:span text:style-name="T459">滑</text:span><text:span text:style-name="T458">(Sliding Window) → </text:span><text:span text:style-name="T459">救</text:span><text:span text:style-name="T458">(Timeout / 3 Dup ACK) → </text:span><text:span text:style-name="T459">循</text:span><text:span text:style-name="T458">(ACK </text:span><text:span text:style-name="T459">回饋循環</text:span><text:span text:style-name="T458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19">持續用 </text:span><text:span text:style-name="T460">ACK </text:span><text:span text:style-name="T419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299"><text:span text:style-name="T300">A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Address Record</text:span><text:span text:style-name="T298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7">IPv4 </text:span><text:span text:style-name="T340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NS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Name Server</text:span><text:span text:style-name="T298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1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299"><text:span text:style-name="T300">MX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Mail Exchange</text:span><text:span text:style-name="T298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0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CNAME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Canonical Name</text:span><text:span text:style-name="T298"/></text:p>
          </table:table-cell>
          <table:table-cell table:style-name="表格83.A3" office:value-type="string">
            <text:p text:style-name="P20" loext:marker-style-name="T462"><text:span text:style-name="T444">設定網域別名，指向另一個網域</text:span><text:span text:style-name="T462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3">補充：</text:span><text:span text:style-name="T464">AAAA record → </text:span><text:span text:style-name="T463">回傳 </text:span><text:span text:style-name="T464">IPv6 </text:span><text:span text:style-name="T463">位址，見第三篇 </text:span><text:span text:style-name="T464">Dual Stack</text:span><text:span text:style-name="T463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5"><text:span text:style-name="T117">本機快取（</text:span><text:span text:style-name="T386">Cache</text:span><text:span text:style-name="T117">）</text:span></text:p>
          </table:table-cell>
          <table:table-cell table:style-name="表格84.A3" office:value-type="string">
            <text:p text:style-name="P20" loext:marker-style-name="T466"><text:span text:style-name="T391">先檢查電腦或瀏覽器有無記住此網址的 </text:span><text:span text:style-name="T390">IP</text:span><text:span text:style-name="T391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7"><text:span text:style-name="T384">Local DNS </text:span><text:span text:style-name="T385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8"><text:span text:style-name="T382">Root DNS </text:span><text:span text:style-name="T381">伺服器</text:span></text:p>
          </table:table-cell>
          <table:table-cell table:style-name="表格84.A3" office:value-type="string">
            <text:p text:style-name="P20" loext:marker-style-name="T106"><text:span text:style-name="T469">全球共 </text:span><text:span text:style-name="T470">13 </text:span><text:span text:style-name="T469">組根 </text:span><text:span text:style-name="T470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1"><text:span text:style-name="T379">TLD DNS </text:span><text:span text:style-name="T378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2">管理頂層網域（</text:span><text:span text:style-name="T473">.com</text:span><text:span text:style-name="T472">、</text:span><text:span text:style-name="T473">.tw</text:span><text:span text:style-name="T472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6">TLD </text:span><text:span text:style-name="T118">是 </text:span><text:span text:style-name="T446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4"><text:span text:style-name="T475">Authoritative DNS</text:span><text:span text:style-name="T474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4">DNS </text:span><text:span text:style-name="T362">幫你問完 ＝ </text:span><text:span text:style-name="T364">Recursive</text:span><text:span text:style-name="T362">（遞迴）</text:span><text:span text:style-name="T20">；</text:span><text:span text:style-name="T282">你自己去問 ＝ </text:span><text:span text:style-name="T283">Iterative</text:span><text:span text:style-name="T282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8"><text:span text:style-name="T255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299"><text:span text:style-name="T70">你自己逐層查詢</text:span><text:span text:style-name="T299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8"><text:span text:style-name="T120">你只問 </text:span><text:span text:style-name="T255">1 </text:span><text:span text:style-name="T120">次</text:span></text:p>
          </table:table-cell>
          <table:table-cell table:style-name="表格85.A4" office:value-type="string">
            <text:p text:style-name="P20" loext:marker-style-name="T299"><text:span text:style-name="T70">每層各問一次，共多次</text:span><text:span text:style-name="T299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6">Recursive</text:span><text:span text:style-name="T477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6">Iterative</text:span><text:span text:style-name="T477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8">一般使用者採 </text:span><text:span text:style-name="T401">Recursive</text:span><text:span text:style-name="T368">（簡單方便）</text:span><text:span text:style-name="T20">；</text:span><text:span text:style-name="T331">DNS </text:span><text:span text:style-name="T330">伺服器之間採 </text:span><text:span text:style-name="T331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69">對外完全開放、任何人都可以使用的 </text:span><text:span text:style-name="T370">DNS </text:span><text:span text:style-name="T369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8">攻擊者偽造 </text:span><text:span text:style-name="T479">DNS </text:span><text:span text:style-name="T478">回應</text:span><text:span text:style-name="T15">，</text:span><text:span text:style-name="T480">將惡意 </text:span><text:span text:style-name="T481">IP </text:span><text:span text:style-name="T480">植入 </text:span><text:span text:style-name="T481">DNS </text:span><text:span text:style-name="T480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2">攻擊者偽造受害者 </text:span><text:span text:style-name="T483">IP </text:span><text:span text:style-name="T89">發送查詢</text:span><text:span text:style-name="T15">，</text:span><text:span text:style-name="T481">DNS </text:span><text:span text:style-name="T480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4">數位簽章機制</text:span><text:span text:style-name="T20">，</text:span><text:span text:style-name="T171">讓接收方能驗證 </text:span><text:span text:style-name="T243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5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1">無法防禦 </text:span><text:span text:style-name="T486">DoS / DDoS </text:span><text:span text:style-name="T461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3"><text:span text:style-name="T206">DNSSEC</text:span><text:span text:style-name="T167"> = </text:span><text:span text:style-name="T427">驗證真偽，不是加密，不防 </text:span><text:span text:style-name="T428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6">申論題標準答案</text:span></text:p>
            <text:p text:style-name="P11"><text:span text:style-name="T257">一、</text:span><text:span text:style-name="T258">DNS </text:span><text:span text:style-name="T257">功能：</text:span><text:span text:style-name="T42">DNS </text:span><text:span text:style-name="T20">為網際網路中負責</text:span><text:span text:style-name="T304">將網域名稱轉換為 </text:span><text:span text:style-name="T301">IP </text:span><text:span text:style-name="T304">位址</text:span><text:span text:style-name="T20">的分散式系統。</text:span></text:p>
            <text:p text:style-name="P12"><text:span text:style-name="T257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7">三、</text:span><text:span text:style-name="T258">Recursive</text:span><text:span text:style-name="T257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7">四、</text:span><text:span text:style-name="T258">Iterative</text:span><text:span text:style-name="T257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7">五、</text:span><text:span text:style-name="T258">DNSSEC</text:span><text:span text:style-name="T257">：</text:span><text:span text:style-name="T20">透過</text:span><text:span text:style-name="T86">數位簽章</text:span><text:span text:style-name="T487">驗證 </text:span><text:span text:style-name="T488">DNS </text:span><text:span text:style-name="T487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5">無法防禦 </text:span><text:span text:style-name="T454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89">IGP</text:span><text:span text:style-name="T34"> vs </text:span><text:span text:style-name="T489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5">Interior Gateway Protocol</text:span><text:span text:style-name="T15">，在</text:span><text:span text:style-name="T340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5">Exterior Gateway Protocol</text:span><text:span text:style-name="T15">，</text:span><text:span text:style-name="T461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0">公司／校園內 → 用 </text:span><text:span text:style-name="T491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2">公司與公司間 → 用 </text:span><text:span text:style-name="T493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4">把網路切成多個區域（</text:span><text:span text:style-name="T495">Area</text:span><text:span text:style-name="T494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0">所有 </text:span><text:span text:style-name="T331">Area </text:span><text:span text:style-name="T330">都必須連到 </text:span><text:span text:style-name="T331">Area 0</text:span><text:span text:style-name="T330">（骨幹區域）</text:span><text:span text:style-name="T20">。</text:span><text:span text:style-name="T496">Area 0 </text:span><text:span text:style-name="T497">就像高速公路主幹道，其他 </text:span><text:span text:style-name="T496">Area </text:span><text:span text:style-name="T497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8">中間一定有「主幹道」就是 </text:span><text:span text:style-name="T499">Area 0</text:span><text:span text:style-name="T498">；所有大樓要互通都必須先連到 </text:span><text:span text:style-name="T499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0">Backbone</text:span></text:p>
          </table:table-cell>
          <table:table-cell table:style-name="表格92.A3" office:value-type="string">
            <text:p text:style-name="P20" loext:marker-style-name="T501"><text:span text:style-name="T502">在 </text:span><text:span text:style-name="T500">Area 0</text:span></text:p>
          </table:table-cell>
          <table:table-cell table:style-name="表格92.A3" office:value-type="string">
            <text:p text:style-name="P20" loext:marker-style-name="T106"><text:span text:style-name="T502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3"><text:span text:style-name="T504">高速公路主幹上的節點</text:span><text:span text:style-name="T503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5">ABR</text:span></text:p>
          </table:table-cell>
          <table:table-cell table:style-name="表格92.A2" office:value-type="string">
            <text:p text:style-name="P20" loext:marker-style-name="T506"><text:span text:style-name="T507">跨 </text:span><text:span text:style-name="T505">Area </text:span><text:span text:style-name="T507">橋樑</text:span></text:p>
          </table:table-cell>
          <table:table-cell table:style-name="表格92.A2" office:value-type="string">
            <text:p text:style-name="P20" loext:marker-style-name="T506"><text:span text:style-name="T507">同時連 </text:span><text:span text:style-name="T505">Area 0 </text:span><text:span text:style-name="T507">與其他 </text:span><text:span text:style-name="T505">Area</text:span><text:span text:style-name="T507">，是區域間唯一合法的橋</text:span></text:p>
          </table:table-cell>
          <table:table-cell table:style-name="表格92.A2" office:value-type="string">
            <text:p text:style-name="P20" loext:marker-style-name="T447"><text:span text:style-name="T119">不同部門之間的聯絡窗口</text:span><text:span text:style-name="T447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79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3">✗ ABR </text:span><text:span text:style-name="T250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3">✗ ASBR </text:span><text:span text:style-name="T250">是用來跨越不同 </text:span><text:span text:style-name="T433">Area</text:span><text:span text:style-name="T250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3">✗ </text:span><text:span text:style-name="T250">任意兩個 </text:span><text:span text:style-name="T433">Area </text:span><text:span text:style-name="T250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0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8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09">❁</text:span><text:span text:style-name="T20">假設你收到兩條路由：</text:span><text:span text:style-name="T510"><text:line-break/>Route A: AS-PATH = 100 200 300<text:line-break/>Route B: AS-PATH = 400 300<text:line-break/><text:line-break/></text:span><text:span text:style-name="T20">你先不要管 </text:span><text:span text:style-name="T510">Route </text:span><text:span text:style-name="T20">是什麼。</text:span><text:span text:style-name="T510"><text:line-break/><text:line-break/></text:span><text:span text:style-name="T20">只看 </text:span><text:span text:style-name="T510">AS-PATH</text:span><text:span text:style-name="T20">：</text:span><text:span text:style-name="T510">100 200 300 <text:s/></text:span><text:span text:style-name="T20">意思：我 ← </text:span><text:span text:style-name="T510">AS100 ← AS200 ← AS300<text:line-break/><text:line-break/></text:span><text:span text:style-name="T20">而</text:span><text:span text:style-name="T510">400 300 <text:s/></text:span><text:span text:style-name="T20">意思：我 ← </text:span><text:span text:style-name="T510">AS400 ← AS300<text:line-break/><text:line-break/></text:span><text:span text:style-name="T511">AS-PATH </text:span><text:span text:style-name="T374">就只是：這個路由消息經過了哪些 </text:span><text:span text:style-name="T511">AS </text:span><text:span text:style-name="T374">的名單。就這樣而已。</text:span><text:span text:style-name="T510"><text:line-break/><text:line-break/></text:span><text:span text:style-name="T20">然後 </text:span><text:span text:style-name="T512">BGP</text:span><text:span text:style-name="T510"> </text:span><text:span text:style-name="T20">看到：</text:span><text:span text:style-name="T510"><text:line-break/><text:line-break/>100 200 300 <text:s/></text:span><text:span text:style-name="T20">有 </text:span><text:span text:style-name="T510">3 </text:span><text:span text:style-name="T20">個 </text:span><text:span text:style-name="T510">AS</text:span><text:span text:style-name="T20">。</text:span><text:span text:style-name="T510"><text:line-break/><text:line-break/>400 300 <text:s/></text:span><text:span text:style-name="T20">有 </text:span><text:span text:style-name="T510">2 </text:span><text:span text:style-name="T20">個 </text:span><text:span text:style-name="T510">AS</text:span><text:span text:style-name="T20">。</text:span><text:span text:style-name="T510"><text:line-break/><text:line-break/></text:span><text:span text:style-name="T20">於是它想：</text:span><text:span text:style-name="T335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1">AS-PATH </text:span><text:span text:style-name="T368">純粹是 </text:span><text:span text:style-name="T401">BGP </text:span><text:span text:style-name="T368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1">比條件、看政策</text:span><text:span text:style-name="T20">」。與其硬背排序表，不如先搞懂下面這 </text:span><text:span text:style-name="T510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3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3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TCP 179</text:p>
          </table:table-cell>
          <table:table-cell table:style-name="表格94.A2" office:value-type="string">
            <text:p text:style-name="P20" loext:marker-style-name="T106"><text:span text:style-name="T514">BGP </text:span><text:span text:style-name="T515">跑在 </text:span><text:span text:style-name="T514">TCP</text:span><text:span text:style-name="T109">，</text:span><text:span text:style-name="T515">埠號 </text:span><text:span text:style-name="T514">179</text:span><text:span text:style-name="T109">（不是 </text:span><text:span text:style-name="T516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6">TCP </text:span><text:span text:style-name="T109">的可靠重送與順序保證。考：</text:span><text:span text:style-name="T517">BGP </text:span><text:span text:style-name="T378">傳輸層協定 → </text:span><text:span text:style-name="T517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Path Vector</text:p>
          </table:table-cell>
          <table:table-cell table:style-name="表格94.A3" office:value-type="string">
            <text:p text:style-name="P20" loext:marker-style-name="T106"><text:span text:style-name="T516">BGP </text:span><text:span text:style-name="T109">屬於 </text:span><text:span text:style-name="T516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18">把「整條 </text:span><text:span text:style-name="T519">AS </text:span><text:span text:style-name="T518">路徑」報給你</text:span><text:span text:style-name="T109">。</text:span><text:span text:style-name="T516">RIP</text:span><text:span text:style-name="T109">＝</text:span><text:span text:style-name="T516">Distance </text:span><text:soft-page-break/><text:span text:style-name="T516">Vector</text:span><text:span text:style-name="T109">、</text:span><text:span text:style-name="T516">OSPF</text:span><text:span text:style-name="T109">＝</text:span><text:span text:style-name="T516">Link State</text:span><text:span text:style-name="T109">、</text:span><text:span text:style-name="T516">BGP</text:span><text:span text:style-name="T109">＝</text:span><text:span text:style-name="T516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防迴圈</text:span><text:span text:style-name="T521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7">防 </text:span><text:span text:style-name="T523">Routing Loop</text:span></text:p>
          </table:table-cell>
          <table:table-cell table:style-name="表格94.A2" office:value-type="string">
            <text:p text:style-name="P20" loext:marker-style-name="T106"><text:span text:style-name="T517">AS </text:span><text:span text:style-name="T378">一看到 </text:span><text:span text:style-name="T517">AS-PATH </text:span><text:span text:style-name="T378">裡有「自己的 </text:span><text:span text:style-name="T517">AS </text:span><text:span text:style-name="T378">編號」就立刻丟棄，避免繞圈</text:span><text:span text:style-name="T109">。考「</text:span><text:span text:style-name="T516">AS-PATH </text:span><text:span text:style-name="T109">主要功能」→ </text:span><text:span text:style-name="T516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Local Preference</text:p>
          </table:table-cell>
          <table:table-cell table:style-name="表格94.A3" office:value-type="string">
            <text:p text:style-name="P27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4">通用屬性中最重要！</text:span><text:span text:style-name="T109">是</text:span><text:span text:style-name="T518"> </text:span><text:span text:style-name="T519">AS </text:span><text:span text:style-name="T518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長度</text:span><text:span text:style-name="T521">）</text:span></text:p>
          </table:table-cell>
          <table:table-cell table:style-name="表格94.A2" office:value-type="string">
            <text:p text:style-name="P28"><text:span text:style-name="T525">路徑越短（經過 </text:span><text:span text:style-name="T526">AS </text:span><text:span text:style-name="T525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78">但要先比 </text:span><text:span text:style-name="T517">Weight</text:span><text:span text:style-name="T378">、</text:span><text:span text:style-name="T517">Local Pref</text:span><text:span text:style-name="T378">，前面平手才輪到它</text:span><text:span text:style-name="T109">——</text:span><text:span text:style-name="T389">別誤以為 </text:span><text:span text:style-name="T527">AS-PATH </text:span><text:span text:style-name="T389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MED</text:p>
          </table:table-cell>
          <table:table-cell table:style-name="表格94.A3" office:value-type="string">
            <text:p text:style-name="P29">數值越小越優先</text:p>
          </table:table-cell>
          <table:table-cell table:style-name="表格94.A3" office:value-type="string">
            <text:p text:style-name="P20" loext:marker-style-name="T106"><text:span text:style-name="T518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eBGP vs iBGP</text:p>
          </table:table-cell>
          <table:table-cell table:style-name="表格94.A2" office:value-type="string">
            <text:p text:style-name="P30"><text:span text:style-name="T526">eBGP </text:span><text:span text:style-name="T525">優先於 </text:span><text:span text:style-name="T526">iBGP</text:span></text:p>
          </table:table-cell>
          <table:table-cell table:style-name="表格94.A2" office:value-type="string">
            <text:p text:style-name="P20" loext:marker-style-name="T106"><text:span text:style-name="T516">eBGP</text:span><text:span text:style-name="T109">＝外面直接告訴你；</text:span><text:span text:style-name="T516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6"><text:span text:style-name="T520">MED</text:span><text:span text:style-name="T521">（比較範圍）</text:span></text:p>
          </table:table-cell>
          <table:table-cell table:style-name="表格94.A3" office:value-type="string">
            <text:p text:style-name="P31"><text:span text:style-name="T525">只比較同一個「來源 </text:span><text:span text:style-name="T526">AS</text:span><text:span text:style-name="T525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7"> </text:span><text:span text:style-name="T528">不同 </text:span><text:span text:style-name="T529">AS </text:span><text:span text:style-name="T528">的 </text:span><text:span text:style-name="T529">MED </text:span><text:span text:style-name="T528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Weight</text:p>
          </table:table-cell>
          <table:table-cell table:style-name="表格94.A2" office:value-type="string">
            <text:p text:style-name="P20" loext:marker-style-name="T106"><text:span text:style-name="T530">Cisco </text:span><text:span text:style-name="T531">私有</text:span><text:span text:style-name="T109">，</text:span><text:span text:style-name="T532">非 </text:span><text:span text:style-name="T533">BGP </text:span><text:span text:style-name="T532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6">BGP </text:span><text:span text:style-name="T109">標準屬性」選項別選 </text:span><text:span text:style-name="T516">Weight</text:span><text:span text:style-name="T109">（</text:span><text:span text:style-name="T516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7">Path Vector</text:span><text:span text:style-name="T20">｜</text:span><text:span text:style-name="T534">AS-PATH</text:span><text:span text:style-name="T535">：防迴圈＋越短越好</text:span><text:span text:style-name="T20">｜</text:span><text:span text:style-name="T534">Local Preference</text:span><text:span text:style-name="T535">：越大越好</text:span><text:span text:style-name="T20">｜</text:span><text:span text:style-name="T534">MED</text:span><text:span text:style-name="T535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6">Weight</text:span><text:span text:style-name="T537">：</text:span><text:span text:style-name="T536">Cisco </text:span><text:span text:style-name="T537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3">✗ </text:span><text:span text:style-name="T395">AS-PATH </text:span><text:span text:style-name="T396">是 </text:span><text:span text:style-name="T395">BGP </text:span><text:span text:style-name="T396">選路最重要的屬性</text:span><text:span text:style-name="T250">　→　</text:span><text:span text:style-name="T20">✓ </text:span><text:span text:style-name="T283">Local Preference </text:span><text:span text:style-name="T282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3">✗ </text:span><text:span text:style-name="T395">AS-PATH </text:span><text:span text:style-name="T396">越短就一定會選那條</text:span><text:span text:style-name="T250">　→　</text:span><text:span text:style-name="T20">✓ </text:span><text:span text:style-name="T368">只有前面的屬性（</text:span><text:span text:style-name="T401">Local Pref </text:span><text:span text:style-name="T368">等）完全相同時，才會比較 </text:span><text:span text:style-name="T401">AS-PATH</text:span><text:span text:style-name="T20">。</text:span></text:p>
            <text:p text:style-name="P12"><text:span text:style-name="T433">✗ </text:span><text:span text:style-name="T395">BGP </text:span><text:span text:style-name="T396">會自己計算最短路徑</text:span><text:span text:style-name="T250">　→　</text:span><text:span text:style-name="T20">✓ </text:span><text:span text:style-name="T42">BGP </text:span><text:span text:style-name="T20">不算距離，</text:span><text:span text:style-name="T491">OSPF </text:span><text:span text:style-name="T490">才做最短路徑計算</text:span><text:span text:style-name="T20">。</text:span></text:p>
            <text:p text:style-name="P12"><text:span text:style-name="T433">✗ </text:span><text:span text:style-name="T395">iBGP </text:span><text:span text:style-name="T396">比 </text:span><text:span text:style-name="T395">eBGP </text:span><text:span text:style-name="T396">優先</text:span><text:span text:style-name="T250">　→　</text:span><text:span text:style-name="T20">✓ </text:span><text:span text:style-name="T432">eBGP </text:span><text:span text:style-name="T431">優先於 </text:span><text:span text:style-name="T432">iBGP</text:span><text:span text:style-name="T20">（外部路由更可信）。</text:span></text:p>
            <text:p text:style-name="P12"><text:span text:style-name="T433">✗ </text:span><text:span text:style-name="T395">MED </text:span><text:span text:style-name="T396">可以跨不同 </text:span><text:span text:style-name="T395">AS </text:span><text:span text:style-name="T396">互相比較</text:span><text:span text:style-name="T250">　→　</text:span><text:span text:style-name="T20">✓</text:span><text:span text:style-name="T538"> </text:span><text:span text:style-name="T539">MED </text:span><text:span text:style-name="T538">只能比較來自同一個 </text:span><text:span text:style-name="T539">AS </text:span><text:span text:style-name="T538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3">AS-PATH </text:span><text:span text:style-name="T171">長度 </text:span><text:span text:style-name="T243">2</text:span><text:span text:style-name="T20">、</text:span><text:span text:style-name="T158">台灣固網 </text:span><text:span text:style-name="T291">AS-PATH </text:span><text:span text:style-name="T158">長度 </text:span><text:span text:style-name="T291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2">私有 </text:span><text:span text:style-name="T475">IP </text:span><text:span text:style-name="T532">換成公網 </text:span><text:span text:style-name="T475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78">若相同選 </text:span><text:span text:style-name="T379">AS-PATH </text:span><text:span text:style-name="T378">較短路</text:span><text:span text:style-name="T379">1</text:span><text:span text:style-name="T109">；</text:span><text:span text:style-name="T540">若中華電信 </text:span><text:span text:style-name="T541">Local Pref </text:span><text:span text:style-name="T540">較高則不管長短走路</text:span><text:span text:style-name="T541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5">封包經過多個 </text:span><text:span text:style-name="T384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2">BGP → </text:span><text:span text:style-name="T543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4">✗ </text:span><text:span text:style-name="T545">封包送不出去</text:span><text:span text:style-name="T250"> → 一定是 </text:span><text:span text:style-name="T433">BGP </text:span><text:span text:style-name="T250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3">✗ </text:span><text:span text:style-name="T250">有路但連不到 → 是 </text:span><text:span text:style-name="T433">BGP </text:span><text:span text:style-name="T250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3">✗ </text:span><text:span text:style-name="T545">走到錯誤的 </text:span><text:span text:style-name="T544">ISP </text:span><text:span text:style-name="T433">→ </text:span><text:span text:style-name="T250">是 </text:span><text:span text:style-name="T433">NAT </text:span><text:span text:style-name="T250">設定問題　→　</text:span><text:span text:style-name="T20">✓ </text:span><text:span text:style-name="T362">走到錯誤 </text:span><text:span text:style-name="T364">ISP </text:span><text:span text:style-name="T362">是 </text:span><text:span text:style-name="T364">BGP </text:span><text:span text:style-name="T362">選路問題（</text:span><text:span text:style-name="T364">Local Pref </text:span><text:span text:style-name="T362">或 </text:span><text:span text:style-name="T364">AS-PATH </text:span><text:span text:style-name="T362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8">傳統網路</text:span><text:span text:style-name="T20">中</text:span><text:span text:style-name="T368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2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6">→ </text:span><text:span text:style-name="T20">查轉送表 </text:span><text:span text:style-name="T546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2" loext:marker-style-name="T21"><text:span text:style-name="T20"/></text:p>
      <text:p text:style-name="P32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3"><text:span text:style-name="T547">🟦 Application Layer </text:span><text:span text:style-name="T525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4"><text:span text:style-name="T547">🟨 Control Layer </text:span><text:span text:style-name="T525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5"><text:span text:style-name="T547">🟩 Infrastructure Layer </text:span><text:span text:style-name="T525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48">三層＝</text:span><text:span text:style-name="T549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0">依序輪流分配</text:span><text:span text:style-name="T109">，</text:span><text:span text:style-name="T551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0">依各伺服器處理能力設「權重」</text:span><text:span text:style-name="T109">，</text:span><text:span text:style-name="T394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2">同一使用者所有請求固定導向同一台</text:span><text:span text:style-name="T109">，</text:span><text:span text:style-name="T504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4">「</text:span><text:span text:style-name="T285">LB </text:span><text:span text:style-name="T284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3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2">邊緣伺服器（</text:span><text:span text:style-name="T283">Edge Server</text:span><text:span text:style-name="T282">）</text:span><text:span text:style-name="T20">」加速內容傳遞。</text:span><text:span text:style-name="T335">當你開啟 </text:span><text:span text:style-name="T336">Google </text:span><text:span text:style-name="T335">或 </text:span><text:span text:style-name="T336">YouTube</text:span><text:span text:style-name="T335">，不需跨越太平洋連到美國總部，而是連到你附近的 </text:span><text:span text:style-name="T336">CDN </text:span><text:span text:style-name="T335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4">DNS </text:span><text:span text:style-name="T555">解析網址</text:span><text:span text:style-name="T20">，</text:span><text:span text:style-name="T556">找到對應 </text:span><text:span text:style-name="T557">CDN </text:span><text:span text:style-name="T556">的 </text:span><text:span text:style-name="T557">CNAME </text:span><text:span text:style-name="T556">記錄</text:span></text:p>
            <text:p text:style-name="P12" loext:marker-style-name="T21"><text:span text:style-name="T42">Step 3 </text:span><text:span text:style-name="T558">CNAME </text:span><text:span text:style-name="T559">將請求轉向 </text:span><text:span text:style-name="T558">CDN </text:span><text:span text:style-name="T559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4">CDN </text:span><text:span text:style-name="T455">根據使用者地理位置，選擇最近的 </text:span><text:span text:style-name="T454">Edge </text:span><text:span text:style-name="T455">伺服器</text:span></text:p>
            <text:p text:style-name="P12" loext:marker-style-name="T21"><text:span text:style-name="T42">Step 5 Edge </text:span><text:span text:style-name="T20">伺服器將</text:span><text:span text:style-name="T265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5">DNS </text:span><text:span text:style-name="T120">的一種記錄</text:span><text:span text:style-name="T15">，作用是「</text:span><text:span text:style-name="T560">網址指向另一個網址</text:span><text:span text:style-name="T15">」（不是 </text:span><text:span text:style-name="T16">IP</text:span><text:span text:style-name="T15">）。範例：</text:span><text:span text:style-name="T561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2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58">CNAME</text:span><text:span text:style-name="T559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78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2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4">5G </text:span><text:span text:style-name="T455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2">靠近使用者的 </text:span><text:span text:style-name="T563">Edge </text:span><text:span text:style-name="T552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48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564">用無線電波傳資料</text:span><text:span text:style-name="T20">，</text:span><text:span text:style-name="T565">若同時傳訊號會「撞在一起」</text:span><text:span text:style-name="T20">。</text:span><text:span text:style-name="T566">這個「決定誰先傳」的規則，就叫 </text:span><text:span text:style-name="T567">MAC </text:span><text:span text:style-name="T566">機制（</text:span><text:span text:style-name="T567">Media Access Control</text:span><text:span text:style-name="T566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8">WiFi</text:span><text:span text:style-name="T569">：先聽再講（</text:span><text:span text:style-name="T568">CSMA/CA</text:span><text:span text:style-name="T569">）</text:span></text:h>
      <text:p text:style-name="P22" loext:marker-style-name="T21"><text:span text:style-name="T570">WiFi </text:span><text:span text:style-name="T571">採用「先聽再講」的競爭機制</text:span><text:span text:style-name="T20">，就像一群人用對講機：① </text:span><text:span text:style-name="T564">先聽頻道有沒有人在傳</text:span><text:span text:style-name="T20">；② </text:span><text:span text:style-name="T564">沒人傳才開始傳</text:span><text:span text:style-name="T20">；③ </text:span><text:span text:style-name="T564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6"><text:span text:style-name="T572">Carrier Sense</text:span><text:span text:style-name="T573"> </text:span><text:span text:style-name="T574">載波感測</text:span></text:p>
          </table:table-cell>
          <table:table-cell table:style-name="表格104.A2" office:value-type="string">
            <text:p text:style-name="P37"><text:span text:style-name="T575">先聽頻道有沒有人在用</text:span></text:p>
          </table:table-cell>
        </table:table-row>
        <table:table-row table:style-name="表格104.1">
          <table:table-cell table:style-name="表格104.A3" office:value-type="string">
            <text:p text:style-name="P38"><text:span text:style-name="T572">Multiple Access </text:span><text:span text:style-name="T576">多重存取</text:span></text:p>
          </table:table-cell>
          <table:table-cell table:style-name="表格104.A3" office:value-type="string">
            <text:p text:style-name="P39"><text:span text:style-name="T575">大家共用同一個頻道</text:span></text:p>
          </table:table-cell>
        </table:table-row>
        <table:table-row table:style-name="表格104.1">
          <table:table-cell table:style-name="表格104.A2" office:value-type="string">
            <text:p text:style-name="P40"><text:span text:style-name="T572">Collision Avoidance </text:span><text:span text:style-name="T577">碰撞避免</text:span></text:p>
          </table:table-cell>
          <table:table-cell table:style-name="表格104.A2" office:value-type="string">
            <text:p text:style-name="P41"><text:span text:style-name="T575">盡量「避免」訊號互撞（而非偵測後再處理）</text:span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8">WiFi </text:span><text:span text:style-name="T579">高速基礎</text:span></text:p>
            <text:p text:style-name="P11" loext:marker-style-name="T21"><text:span text:style-name="T20">另：</text:span><text:span text:style-name="T580">OFDM</text:span><text:span text:style-name="T581">（正交分頻多工）</text:span><text:span text:style-name="T20">— </text:span><text:span text:style-name="T582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564">當很多人在搶頻道，某些資料（語音、視訊）需要優先通過</text:span><text:span text:style-name="T20">，這就是 </text:span><text:span text:style-name="T583">EDCA</text:span><text:span text:style-name="T584">（</text:span><text:span text:style-name="T583">Enhanced Distributed Channel Access</text:span><text:span text:style-name="T584">）</text:span><text:span text:style-name="T20">的功能。</text:span><text:span text:style-name="T585">視訊通話</text:span><text:span text:style-name="T586">/</text:span><text:span text:style-name="T585">語音→少等、優先傳</text:span><text:span text:style-name="T20">；</text:span><text:span text:style-name="T587">網頁</text:span><text:span text:style-name="T588">/</text:span><text:span text:style-name="T587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8">Bluetooth</text:span><text:span text:style-name="T569">：老大排班（</text:span><text:span text:style-name="T568">Master-Slave</text:span><text:span text:style-name="T569">）</text:span></text:h>
      <text:p text:style-name="P22" loext:marker-style-name="T21"><text:span text:style-name="T589">Bluetooth </text:span><text:span text:style-name="T590">不靠「搶」，而是由 </text:span><text:span text:style-name="T589">Master </text:span><text:span text:style-name="T590">統一分配時間</text:span><text:span text:style-name="T20">，</text:span><text:span text:style-name="T591">Slave </text:span><text:span text:style-name="T565">照順序傳資料</text:span><text:span text:style-name="T20">（</text:span><text:span text:style-name="T592">0~1ms </text:span><text:span text:style-name="T593">耳機、</text:span><text:span text:style-name="T592">1~2ms </text:span><text:span text:style-name="T593">滑鼠、</text:span><text:span text:style-name="T592">2~3ms </text:span><text:span text:style-name="T593">鍵盤、</text:span><text:span text:style-name="T592">3~4ms </text:span><text:span text:style-name="T593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94">為什麼要排班？</text:span></text:p>
            <text:p text:style-name="P11" loext:marker-style-name="T21"><text:span text:style-name="T20">因為</text:span><text:span text:style-name="T595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96">WiFi = </text:span><text:span text:style-name="T597">菜市場（自由競爭，亂搶）；</text:span><text:span text:style-name="T596">Bluetooth = </text:span><text:span text:style-name="T597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2"><text:span text:style-name="T598">SCO</text:span>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2"><text:span text:style-name="T598">eSCO</text:span>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99"><text:s/></text:span><text:span text:style-name="T578">Bluetooth </text:span><text:span text:style-name="T579">抗干擾</text:span></text:p>
            <text:p text:style-name="P11" loext:marker-style-name="T21"><text:span text:style-name="T20">另：</text:span><text:span text:style-name="T580">FHSS</text:span><text:span text:style-name="T581">（跳頻展頻）— 在 </text:span><text:span text:style-name="T580">2.4GHz </text:span><text:span text:style-name="T581">頻段中每秒快速切換數百次</text:span><text:span text:style-name="T20">（每秒約 </text:span><text:span text:style-name="T42">1600 </text:span><text:span text:style-name="T20">次）</text:span><text:span text:style-name="T581">頻道</text:span><text:span text:style-name="T20">，</text:span><text:span text:style-name="T565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600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601">Time Slot</text:span><text:span text:style-name="T602">（時槽）＝將時間切成固定小區段</text:span><text:span text:style-name="T20">，</text:span><text:span text:style-name="T600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3"><text:span text:style-name="T15">核心機制</text:span></text:p>
          </table:table-cell>
          <table:table-cell table:style-name="表格107.A2" office:value-type="string">
            <text:p text:style-name="P44"><text:span text:style-name="T573">CSMA/CA</text:span><text:span text:style-name="T574">（先偵聽再傳）</text:span></text:p>
          </table:table-cell>
          <table:table-cell table:style-name="表格107.A2" office:value-type="string">
            <text:p text:style-name="P45"><text:span text:style-name="T573">Master-Slave</text:span><text:span text:style-name="T574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3"><text:span text:style-name="T15">即時語音 </text:span><text:span text:style-name="T16">/ QoS</text:span></text:p>
          </table:table-cell>
          <table:table-cell table:style-name="表格107.A3" office:value-type="string">
            <text:p text:style-name="P46"><text:span text:style-name="T573">EDCA</text:span><text:span text:style-name="T574">（</text:span><text:span text:style-name="T573">QoS </text:span><text:span text:style-name="T574">優先）</text:span></text:p>
          </table:table-cell>
          <table:table-cell table:style-name="表格107.A3" office:value-type="string">
            <text:p text:style-name="P47"><text:span text:style-name="T573">SCO / eSCO</text:span><text:span text:style-name="T574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48"><text:span text:style-name="T574">受干擾影響較大</text:span></text:p>
          </table:table-cell>
          <table:table-cell table:style-name="表格107.A3" office:value-type="string">
            <text:p text:style-name="P48"><text:span text:style-name="T574">固定時槽非常穩定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603">L2CAP</text:span><text:span text:style-name="T35">：</text:span><text:span text:style-name="T604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負責：管理並分流不同類型的資料（語音、檔案、控制指令）；建立、管理、釋放「邏輯通道」；提供 </text:span><text:span text:style-name="T42">QoS </text:span><text:span text:style-name="T20">服務品質保證。一句話記憶：</text:span><text:span text:style-name="T42">L2CAP </text:span><text:span text:style-name="T20">＝ 藍牙的資料管理中心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邏輯通道</text:span><text:span text:style-name="T104"/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0" loext:marker-style-name="T106"><text:span text:style-name="T108">Connection-oriented</text:span><text:span text:style-name="T109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09">有建立連線、雙方確認，可靠、確保收到</text:span><text:span text:style-name="T106"/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0" loext:marker-style-name="T106"><text:span text:style-name="T108">Connectionless</text:span><text:span text:style-name="T109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09">直接送出、不確認，快速但可能遺失</text:span><text:span text:style-name="T106"/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0" loext:marker-style-name="T106"><text:span text:style-name="T108">Signaling Channel</text:span><text:span text:style-name="T109">（信令通道）</text:span></text:p>
          </table:table-cell>
          <table:table-cell table:style-name="表格108.A2" table:number-columns-spanned="2" office:value-type="string">
            <text:p text:style-name="P20" loext:marker-style-name="T106"><text:span text:style-name="T109">控制管理用，不傳資料只管控制</text:span><text:span text:style-name="T106"/></text:p>
          </table:table-cell>
          <table:covered-table-cell/>
          <table:table-cell table:style-name="表格108.A2" office:value-type="string">
            <text:p text:style-name="P20" loext:marker-style-name="T106"><text:span text:style-name="T109">建立</text:span><text:span text:style-name="T108">/</text:span><text:span text:style-name="T109">釋放連線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42">L2CAP </text:span><text:span text:style-name="T20">主要位於「資料鏈結層（</text:span><text:span text:style-name="T42">Data Link Layer</text:span><text:span text:style-name="T20">）」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0" loext:marker-style-name="T14"><text:span text:style-name="T16">FW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傳統防火牆，只看封包「外面」的 </text:span><text:span text:style-name="T16">IP</text:span><text:span text:style-name="T15">、</text:span><text:span text:style-name="T16">Port</text:span><text:span text:style-name="T15">、</text:span><text:span text:style-name="T16">Protocol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WAF</text:span><text:span text:style-name="T14"/></text:p>
          </table:table-cell>
          <table:table-cell table:style-name="表格111.A3" office:value-type="string">
            <text:p text:style-name="P20" loext:marker-style-name="T14"><text:span text:style-name="T15">網站應用防火牆，會打開封包「裡面」，防 </text:span><text:span text:style-name="T16">SQL Injection</text:span><text:span text:style-name="T15">、</text:span><text:span text:style-name="T16">XSS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NGFW</text:span><text:span text:style-name="T14"/></text:p>
          </table:table-cell>
          <table:table-cell table:style-name="表格111.A2" office:value-type="string">
            <text:p text:style-name="P20" loext:marker-style-name="T14"><text:span text:style-name="T15">次世代防火牆，比 </text:span><text:span text:style-name="T16">FW </text:span><text:span text:style-name="T15">更聰明，有 </text:span><text:span text:style-name="T16">DPI </text:span><text:span text:style-name="T15">深度檢查、</text:span><text:span text:style-name="T16">IPS</text:span><text:span text:style-name="T15">、</text:span><text:span text:style-name="T16">App </text:span><text:span text:style-name="T15">識別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DMZ</text:span><text:span text:style-name="T14"/></text:p>
          </table:table-cell>
          <table:table-cell table:style-name="表格111.A3" office:value-type="string">
            <text:p text:style-name="P20" loext:marker-style-name="T14"><text:span text:style-name="T15">隔離區，把對外服務（</text:span><text:span text:style-name="T16">Web</text:span><text:span text:style-name="T15">、</text:span><text:span text:style-name="T16">Mail</text:span><text:span text:style-name="T15">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IOC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入侵指標（攻擊事後證據）：</text:span><text:span text:style-name="T16">Domain</text:span><text:span text:style-name="T15">（網）、</text:span><text:span text:style-name="T16">Hash</text:span><text:span text:style-name="T15">（檔）、</text:span><text:span text:style-name="T16">IP</text:span><text:span text:style-name="T15">（連）、</text:span><text:span text:style-name="T16">C2</text:span><text:span text:style-name="T15">（控）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Proxy</text:span><text:span text:style-name="T14"/></text:p>
          </table:table-cell>
          <table:table-cell table:style-name="表格111.A3" office:value-type="string">
            <text:p text:style-name="P20" loext:marker-style-name="T14"><text:span text:style-name="T15">正向代理，幫「使用者（</text:span><text:span text:style-name="T16">Client</text:span><text:span text:style-name="T15">）」隱藏 </text:span><text:span text:style-name="T16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Reverse Proxy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反向代理，幫「伺服器（</text:span><text:span text:style-name="T16">Server</text:span><text:span text:style-name="T15">）」負載平衡、隱藏主機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防火牆 </text:span><text:span text:style-name="T37">Firewall</text:span><text:span text:style-name="T38">（</text:span><text:span text:style-name="T37">FW</text:span><text:span text:style-name="T38">）</text:span></text:h>
      <text:p text:style-name="P22" loext:marker-style-name="T21"><text:span text:style-name="T20">最基本的網路防護設備，像公司門口的警衛。只看封包的「外部資訊」：</text:span><text:span text:style-name="T42">IP </text:span><text:span text:style-name="T20">位址（來者是誰）、</text:span><text:span text:style-name="T42">Port</text:span><text:span text:style-name="T20">（從哪個門進來）、</text:span><text:span text:style-name="T42">Protocol</text:span><text:span text:style-name="T20">（什麼類型）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網站應用防火牆 </text:span><text:span text:style-name="T37">WAF</text:span></text:h>
      <text:p text:style-name="P22" loext:marker-style-name="T21"><text:span text:style-name="T20">進階版防護，會「打開包包檢查內容」，專門防禦網站層面的攻擊：</text:span><text:span text:style-name="T42">SQL Injection</text:span><text:span text:style-name="T20">（注入惡意 </text:span><text:span text:style-name="T42">SQL </text:span><text:span text:style-name="T20">竊取資料庫）、</text:span><text:span text:style-name="T42">XSS</text:span><text:span text:style-name="T20">（插入惡意 </text:span><text:span text:style-name="T42">JavaScript</text:span><text:span text:style-name="T20">）、其他 </text:span><text:span text:style-name="T42">HTTP </text:span><text:span text:style-name="T20">層攻擊（</text:span><text:span text:style-name="T42">CSRF</text:span><text:span text:style-name="T20">、</text:span><text:span text:style-name="T42">Path Traversal</text:span><text:span text:style-name="T20">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21" loext:marker-style-name="T12"><text:span text:style-name="T43">FW</text:span><text:span text:style-name="T12"/></text:p>
            </table:table-cell>
            <table:table-cell table:style-name="表格113.A1" office:value-type="string">
              <text:p text:style-name="P21" loext:marker-style-name="T12"><text:span text:style-name="T43">WAF</text:span><text:span text:style-name="T12"/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20" loext:marker-style-name="T14"><text:span text:style-name="T15">封包外面（</text:span><text:span text:style-name="T16">IP/Port</text:span><text:span text:style-name="T15">）</text:span></text:p>
          </table:table-cell>
          <table:table-cell table:style-name="表格113.A2" office:value-type="string">
            <text:p text:style-name="P20" loext:marker-style-name="T14"><text:span text:style-name="T15">封包裡面（</text:span><text:span text:style-name="T16">HTTP </text:span><text:span text:style-name="T15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次世代防火牆 </text:span><text:span text:style-name="T37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42">DPI</text:span><text:span text:style-name="T20">（深度封包檢測）、</text:span><text:span text:style-name="T42">IPS</text:span><text:span text:style-name="T20">（入侵防禦）、</text:span><text:span text:style-name="T42">App </text:span><text:span text:style-name="T20">識別（知道你在用 </text:span><text:span text:style-name="T42">LINE </text:span><text:span text:style-name="T20">還是 </text:span><text:span text:style-name="T42">YouTube</text:span><text:span text:style-name="T20">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專門放置需要對外公開的服務。生活比喻：</text:span><text:span text:style-name="T42">DMZ</text:span><text:span text:style-name="T20">＝大樓門口的接待室，訪客只能到接待室、無法進入辦公室；就算接待室被搗亂，也不影響裡面的員工與機密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42">IOC </text:span><text:span text:style-name="T20">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8" loext:marker-style-name="T66"><text:span text:style-name="T67">網</text:span><text:span text:style-name="T66"/></text:p>
          </table:table-cell>
          <table:table-cell table:style-name="表格116.A3" office:value-type="string">
            <text:p text:style-name="P20" loext:marker-style-name="T106"><text:span text:style-name="T109">惡意 </text:span><text:span text:style-name="T108">Domain</text:span><text:span text:style-name="T109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8" loext:marker-style-name="T66"><text:span text:style-name="T67">檔</text:span><text:span text:style-name="T66"/></text:p>
          </table:table-cell>
          <table:table-cell table:style-name="表格116.A4" office:value-type="string">
            <text:p text:style-name="P20" loext:marker-style-name="T106"><text:span text:style-name="T109">惡意 </text:span><text:span text:style-name="T108">Hash</text:span><text:span text:style-name="T109">（雜湊值）</text:span></text:p>
          </table:table-cell>
          <table:table-cell table:style-name="表格116.A4" office:value-type="string">
            <text:p text:style-name="P20" loext:marker-style-name="T106"><text:span text:style-name="T109">惡意程式的唯一特徵碼，改檔名也能識別</text:span><text:span text:style-name="T106"/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8" loext:marker-style-name="T66"><text:span text:style-name="T67">連</text:span><text:span text:style-name="T66"/></text:p>
          </table:table-cell>
          <table:table-cell table:style-name="表格116.A3" office:value-type="string">
            <text:p text:style-name="P20" loext:marker-style-name="T106"><text:span text:style-name="T109">惡意 </text:span><text:span text:style-name="T108">IP </text:span><text:span text:style-name="T109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8" loext:marker-style-name="T66"><text:span text:style-name="T67">控</text:span><text:span text:style-name="T66"/></text:p>
          </table:table-cell>
          <table:table-cell table:style-name="表格116.A4" office:value-type="string">
            <text:p text:style-name="P20" loext:marker-style-name="T106"><text:span text:style-name="T108">C2 Server</text:span><text:span text:style-name="T109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 </text:span><text:span text:style-name="T20">駭客準備：建立釣魚網站（</text:span><text:span text:style-name="T42">Domain</text:span><text:span text:style-name="T20">）、製作惡意程式（</text:span><text:span text:style-name="T42">Hash</text:span><text:span text:style-name="T20">）、架設控制中心（</text:span><text:span text:style-name="T42">C2</text:span><text:span text:style-name="T20">）→ ② 發動攻擊：受害者點釣魚網站 → 下載惡意程式 → ③ 主機感染：電腦自動連回駭客主機（</text:span><text:span text:style-name="T42">IP</text:span><text:span text:style-name="T20">）或 </text:span><text:span text:style-name="T42">C2 → ④ </text:span><text:span text:style-name="T20">駭客控制：下指令、偷資料、橫向移動 → ⑤ 資安系統偵測：比對異常 </text:span><text:span text:style-name="T42">IP</text:span><text:span text:style-name="T20">、惡意 </text:span><text:span text:style-name="T42">Domain</text:span><text:span text:style-name="T20">、已知 </text:span><text:span text:style-name="T42">Hash</text:span><text:span text:style-name="T20">、</text:span><text:span text:style-name="T42">C2 </text:span><text:span text:style-name="T20">行為 → ⑥ 判定中毒 → </text:span><text:span text:style-name="T42">IOC </text:span><text:span text:style-name="T20">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隱藏使用者真實 </text:span><text:span text:style-name="T16">IP</text:span><text:span text:style-name="T15">、</text:span><text:span text:style-name="T16">Cache </text:span><text:span text:style-name="T15">加速、企業控管員工能存取哪些網站。比喻：</text:span><text:soft-page-break/><text:span text:style-name="T15">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隱藏後端伺服器、</text:span><text:span text:style-name="T16">SSL </text:span><text:span text:style-name="T15">終止與安全防護。比喻：公</text:span><text:soft-page-break/><text:span text:style-name="T15">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20">使用者（</text:span><text:span text:style-name="T42">Client</text:span><text:span text:style-name="T20">）→ 🔵 </text:span><text:span text:style-name="T42">Proxy</text:span><text:span text:style-name="T20">（選用，隱藏 </text:span><text:span text:style-name="T42">IP/</text:span><text:span text:style-name="T20">上網控管）→ 🌍 </text:span><text:span text:style-name="T42">Internet → 🔥 FW/NGFW</text:span><text:span text:style-name="T20">（第一道防線，過濾 </text:span><text:span text:style-name="T42">IP/Port/</text:span><text:span text:style-name="T20">深度檢查）→ 🏝 </text:span><text:span text:style-name="T42">DMZ</text:span><text:span text:style-name="T20">（</text:span><text:span text:style-name="T42">Web/Mail/DNS </text:span><text:span text:style-name="T20">伺服器）→ 🛡 </text:span><text:span text:style-name="T42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42">Reverse Proxy</text:span><text:span text:style-name="T20">（負載平衡</text:span><text:span text:style-name="T42">/</text:span><text:span text:style-name="T20">隱藏後端）→ 🏢 內部 </text:span><text:span text:style-name="T42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20">把原本只是「資料」的輸入，惡意改造成可執行的「</text:span><text:span text:style-name="T42">SQL </text:span><text:span text:style-name="T20">指令」。</text:span></text:p>
            <text:p text:style-name="P12" loext:marker-style-name="T21"><text:span text:style-name="T20">駭客在帳號欄位輸入：</text:span><text:span text:style-name="T42">' OR 1=1 --</text:span><text:span text:style-name="T20">，拼入後變成：…</text:span><text:span text:style-name="T42">WHERE account='' OR 1=1 -- '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OR 1=1 </text:span><text:span text:style-name="T15">永遠成立，回傳全部使用者 ② </text:span><text:span text:style-name="T16">-- </text:span><text:span text:style-name="T15">把密碼驗證段註解掉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15">把使用者輸入視為「純資料」，不允許改變 </text:span><text:span text:style-name="T16">SQL </text:span><text:span text:style-name="T15">結構；</text:span><text:span text:style-name="T16">SQL </text:span><text:span text:style-name="T15">骨架固定，不因任何輸入而改變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256">防禦核心：</text:span><text:span text:style-name="T605">Prepared Statement</text:span><text:span text:style-name="T256">（預備語句）</text:span></text:p>
            <text:p text:style-name="P11"><text:span text:style-name="T257">概念：</text:span><text:span text:style-name="T20">先把 </text:span><text:span text:style-name="T42">SQL </text:span><text:span text:style-name="T20">骨架「鎖死」，使用者只能填入資料，完全無法修改 </text:span><text:span text:style-name="T42">SQL </text:span><text:span text:style-name="T20">結構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WHERE id='" + input + "'"</text:span><text:span text:style-name="T20">；輸入 </text:span><text:span text:style-name="T42">' OR 1=1 -- → </text:span><text:span text:style-name="T20">結構被竄改。</text:span></text:p>
            <text:p text:style-name="P12" loext:marker-style-name="T21"><text:span text:style-name="T42">✅ </text:span><text:span text:style-name="T20">安全寫法：</text:span><text:span text:style-name="T42">String sql = "SELECT * FROM users WHERE id=?"</text:span><text:span text:style-name="T20">；</text:span><text:span text:style-name="T42">? </text:span><text:span text:style-name="T20">是佔位符，</text:span><text:span text:style-name="T42">input </text:span><text:span text:style-name="T20">被視為純文字，</text:span><text:span text:style-name="T42">' OR 1=1 -- </text:span><text:span text:style-name="T20">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0" loext:marker-style-name="T106"><text:span text:style-name="T108">Prepared Statement</text:span><text:span text:style-name="T106"/>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09">根本解決方案。</text:span><text:span text:style-name="T108">SQL </text:span><text:span text:style-name="T109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0" loext:marker-style-name="T106"><text:span text:style-name="T109">輸入驗證 </text:span><text:span text:style-name="T108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09">過濾或拒絕特殊字元（如單引號），輔助手段，但單靠此法仍可能被繞過。</text:span><text:span text:style-name="T106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0" loext:marker-style-name="T106"><text:span text:style-name="T108">WAF</text:span><text:span text:style-name="T109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0" loext:marker-style-name="T106"><text:span text:style-name="T109">最小權限原則</text:span><text:span text:style-name="T106"/></text:p>
          </table:table-cell>
          <table:table-cell table:style-name="表格119.A7" table:number-columns-spanned="2" office:value-type="string">
            <text:p text:style-name="P20" loext:marker-style-name="T106"><text:span text:style-name="T109">資料庫帳號只給應用程式必要的權限，避免帳號被拿下後資料全失。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Zero-Day Attack</text:span><text:span text:style-name="T38">（零時差攻擊）</text:span></text:h>
      <text:p text:style-name="P22" loext:marker-style-name="T21"><text:span text:style-name="T42">Zero-Day </text:span><text:span text:style-name="T20">指一個「尚未被開發商發現或公開」的安全漏洞，在廠商來得及發布修補程式（</text:span><text:span text:style-name="T42">Patch</text:span><text:span text:style-name="T20">）之前，駭客就已利用它展開攻擊。命名由來：「</text:span><text:span text:style-name="T42">Day Zero</text:span><text:span text:style-name="T20">」代表廠商只有 </text:span><text:span text:style-name="T42">0 </text:span><text:span text:style-name="T20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修補</text:span><text:span text:style-name="T106"/>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0" loext:marker-style-name="T106"><text:span text:style-name="T109">偵測</text:span><text:span text:style-name="T106"/></text:p>
          </table:table-cell>
          <table:table-cell table:style-name="表格120.A5" office:value-type="string">
            <text:p text:style-name="P20" loext:marker-style-name="T106"><text:span text:style-name="T108">IDS / IPS</text:span><text:span text:style-name="T106"/>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深度檢查</text:span><text:span text:style-name="T106"/></text:p>
          </table:table-cell>
          <table:table-cell table:style-name="表格120.A2" office:value-type="string">
            <text:p text:style-name="P20" loext:marker-style-name="T106"><text:span text:style-name="T108">DPI</text:span><text:span text:style-name="T109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0" loext:marker-style-name="T106"><text:span text:style-name="T109">隔離</text:span><text:span text:style-name="T106"/></text:p>
          </table:table-cell>
          <table:table-cell table:style-name="表格120.A5" office:value-type="string">
            <text:p text:style-name="P20" loext:marker-style-name="T106"><text:span text:style-name="T109">網路分段</text:span><text:span text:style-name="T106"/>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降低風險</text:span><text:span text:style-name="T106"/></text:p>
          </table:table-cell>
          <table:table-cell table:style-name="表格120.A2" office:value-type="string">
            <text:p text:style-name="P20" loext:marker-style-name="T106"><text:span text:style-name="T109">最小權限原則</text:span><text:span text:style-name="T106"/>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偵測到異常流量後產生警報，不主動攔截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自動阻斷偵測到的攻擊流量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0" loext:marker-style-name="T106"><text:span text:style-name="T108">DPI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深入檢查封包內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0" loext:marker-style-name="T106"><text:span text:style-name="T108">WAF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專門針對 </text:span><text:span text:style-name="T108">Web </text:span><text:span text:style-name="T109">攻擊（</text:span><text:span text:style-name="T108">SQLi</text:span><text:span text:style-name="T109">、</text:span><text:span text:style-name="T108">XSS</text:span><text:span text:style-name="T109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42">IDS </text:span><text:span text:style-name="T20">只發警報（不攔截）；</text:span><text:span text:style-name="T42">IPS </text:span><text:span text:style-name="T20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 真正防禦是 </text:span><text:span text:style-name="T42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Prepared Statement </text:span><text:span text:style-name="T20">才是正道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👀 IDS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不主動阻擋</text:span><text:span text:style-name="T14"/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🚨 IPS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自動阻擋攻擊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SNMP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控網路設備狀態（</text:span><text:span text:style-name="T16">CPU</text:span><text:span text:style-name="T15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📶 ICMP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20" loext:marker-style-name="T14"><text:span text:style-name="T15">診斷網路連線（</text:span><text:span text:style-name="T16">Ping / Traceroute</text:span><text:span text:style-name="T15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HIDS vs NIDS</text:span><text:span text:style-name="T38">（</text:span><text:span text:style-name="T37">IDS </text:span><text:span text:style-name="T38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/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主機（電腦）內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網路節點（交換器旁）</text:span><text:span text:style-name="T14"/>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15">系統 </text:span><text:span text:style-name="T16">Log</text:span><text:span text:style-name="T15">、使用者行為</text:span></text:p>
          </table:table-cell>
          <table:table-cell table:style-name="表格124.A3" office:value-type="string">
            <text:p text:style-name="P20" loext:marker-style-name="T14"><text:span text:style-name="T15">網路封包與流量</text:span><text:span text:style-name="T14"/>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42">HIDS </text:span><text:span text:style-name="T20">看主機（</text:span><text:span text:style-name="T42">Log</text:span><text:span text:style-name="T20">）</text:span><text:span text:style-name="T42">· NIDS </text:span><text:span text:style-name="T20">看網路（封包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管理與監控網路設備</text:span><text:span text:style-name="T14"/></text:p>
          </table:table-cell>
          <table:table-cell table:style-name="表格125.A2" office:value-type="string">
            <text:p text:style-name="P20" loext:marker-style-name="T14"><text:span text:style-name="T15">測試網路是否連通</text:span><text:span text:style-name="T14"/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20" loext:marker-style-name="T14"><text:span text:style-name="T16">Application Layer</text:span><text:span text:style-name="T15">（應用層）</text:span></text:p>
          </table:table-cell>
          <table:table-cell table:style-name="表格125.A3" office:value-type="string">
            <text:p text:style-name="P20" loext:marker-style-name="T14"><text:span text:style-name="T16">Network Layer</text:span><text:span text:style-name="T15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20" loext:marker-style-name="T14"><text:span text:style-name="T16">UDP</text:span><text:span text:style-name="T14"/></text:p>
          </table:table-cell>
          <table:table-cell table:style-name="表格125.A2" office:value-type="string">
            <text:p text:style-name="P20" loext:marker-style-name="T14"><text:span text:style-name="T16">IP </text:span><text:span text:style-name="T15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20" loext:marker-style-name="T14"><text:span text:style-name="T15">大樓管理室的監控系統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網路連線的體溫計</text:span><text:span text:style-name="T14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pan text:style-name="T42">SNMP </text:span><text:span text:style-name="T20">管理設備（應用層 </text:span><text:span text:style-name="T42">/ UDP</text:span><text:span text:style-name="T20">）</text:span><text:span text:style-name="T42">· ICMP </text:span><text:span text:style-name="T20">診斷網路（網路層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3">① IDS </text:span><text:span text:style-name="T250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3">② Firewall </text:span><text:span text:style-name="T250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oft-page-break/><text:span text:style-name="T433">③ HIDS </text:span><text:span text:style-name="T250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3">④ ICMP </text:span><text:span text:style-name="T250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3">⑤ ICMP </text:span><text:span text:style-name="T250">屬於 </text:span><text:span text:style-name="T433">Application Layer</text:span><text:span text:style-name="T250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3">⑥ IPS </text:span><text:span text:style-name="T250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06"><text:span text:style-name="T607">題目</text:span><text:span text:style-name="T606"/></text:p>
            </table:table-cell>
            <table:table-cell table:style-name="表格127.A1" office:value-type="string">
              <text:p text:style-name="P21" loext:marker-style-name="T606"><text:span text:style-name="T607">答案</text:span><text:span text:style-name="T606"/></text:p>
            </table:table-cell>
            <table:table-cell table:style-name="表格127.A1" office:value-type="string">
              <text:p text:style-name="P21" loext:marker-style-name="T606"><text:span text:style-name="T607">解析</text:span><text:span text:style-name="T606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08"><text:span text:style-name="T609">Q1 </text:span><text:span text:style-name="T610">何者負責「過濾進出網路流量」？</text:span></text:p>
          </table:table-cell>
          <table:table-cell table:style-name="表格127.A2" office:value-type="string">
            <text:p text:style-name="P20" loext:marker-style-name="T608"><text:span text:style-name="T609">Firewall</text:span><text:span text:style-name="T608"/></text:p>
          </table:table-cell>
          <table:table-cell table:style-name="表格127.A2" office:value-type="string">
            <text:p text:style-name="P20" loext:marker-style-name="T608"><text:span text:style-name="T609">Firewall </text:span><text:span text:style-name="T610">是網路入口過濾工具，依規則決定放行。</text:span><text:span text:style-name="T609">IDS/IPS </text:span><text:span text:style-name="T610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08"><text:span text:style-name="T609">Q2 IDS </text:span><text:span text:style-name="T610">的主要功能為何？</text:span></text:p>
          </table:table-cell>
          <table:table-cell table:style-name="表格127.A3" office:value-type="string">
            <text:p text:style-name="P20" loext:marker-style-name="T608"><text:span text:style-name="T610">偵測並發出警報</text:span><text:span text:style-name="T608"/></text:p>
          </table:table-cell>
          <table:table-cell table:style-name="表格127.A3" office:value-type="string">
            <text:p text:style-name="P20" loext:marker-style-name="T608"><text:span text:style-name="T609">IDS </text:span><text:span text:style-name="T610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08"><text:span text:style-name="T609">Q3 IPS </text:span><text:span text:style-name="T610">與 </text:span><text:span text:style-name="T609">IDS </text:span><text:span text:style-name="T610">最大差別？</text:span></text:p>
          </table:table-cell>
          <table:table-cell table:style-name="表格127.A2" office:value-type="string">
            <text:p text:style-name="P20" loext:marker-style-name="T608"><text:span text:style-name="T609">IPS </text:span><text:span text:style-name="T610">會阻擋，</text:span><text:span text:style-name="T609">IDS </text:span><text:span text:style-name="T610">不會</text:span></text:p>
          </table:table-cell>
          <table:table-cell table:style-name="表格127.A2" office:value-type="string">
            <text:p text:style-name="P20" loext:marker-style-name="T608"><text:span text:style-name="T609">IPS = IDS </text:span><text:span text:style-name="T610">全功能 </text:span><text:span text:style-name="T609">+ </text:span><text:span text:style-name="T610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08"><text:span text:style-name="T609">Q4 </text:span><text:span text:style-name="T610">何者屬「主機型入侵偵測」？</text:span></text:p>
          </table:table-cell>
          <table:table-cell table:style-name="表格127.A3" office:value-type="string">
            <text:p text:style-name="P20" loext:marker-style-name="T608"><text:span text:style-name="T609">HIDS</text:span><text:span text:style-name="T608"/></text:p>
          </table:table-cell>
          <table:table-cell table:style-name="表格127.A3" office:value-type="string">
            <text:p text:style-name="P20" loext:marker-style-name="T608"><text:span text:style-name="T609">HIDS </text:span><text:span text:style-name="T610">安裝於主機內部，監控 </text:span><text:span text:style-name="T609">Log </text:span><text:span text:style-name="T610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08"><text:span text:style-name="T609">Q5 NIDS </text:span><text:span text:style-name="T610">主要監控什麼？</text:span></text:p>
          </table:table-cell>
          <table:table-cell table:style-name="表格127.A2" office:value-type="string">
            <text:p text:style-name="P20" loext:marker-style-name="T608"><text:span text:style-name="T610">網路封包</text:span><text:span text:style-name="T608"/></text:p>
          </table:table-cell>
          <table:table-cell table:style-name="表格127.A2" office:value-type="string">
            <text:p text:style-name="P20" loext:marker-style-name="T608"><text:span text:style-name="T609">NIDS </text:span><text:span text:style-name="T610">部署在網路節點，分析封包流量；</text:span><text:span text:style-name="T609">HIDS </text:span><text:span text:style-name="T610">才看 </text:span><text:span text:style-name="T609">Log</text:span><text:span text:style-name="T610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08"><text:span text:style-name="T609">Q6 SNMP </text:span><text:span text:style-name="T610">的主要用途？</text:span></text:p>
          </table:table-cell>
          <table:table-cell table:style-name="表格127.A3" office:value-type="string">
            <text:p text:style-name="P20" loext:marker-style-name="T608"><text:span text:style-name="T610">管理網路設備</text:span><text:span text:style-name="T608"/></text:p>
          </table:table-cell>
          <table:table-cell table:style-name="表格127.A3" office:value-type="string">
            <text:p text:style-name="P20" loext:marker-style-name="T608"><text:span text:style-name="T609">SNMP </text:span><text:span text:style-name="T610">監控與管理路由器、交換器狀態（</text:span><text:span text:style-name="T609">CPU</text:span><text:span text:style-name="T610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08"><text:span text:style-name="T609">Q7 ICMP </text:span><text:span text:style-name="T610">常用於哪種工具？</text:span></text:p>
          </table:table-cell>
          <table:table-cell table:style-name="表格127.A2" office:value-type="string">
            <text:p text:style-name="P20" loext:marker-style-name="T608"><text:span text:style-name="T609">Ping</text:span><text:span text:style-name="T608"/></text:p>
          </table:table-cell>
          <table:table-cell table:style-name="表格127.A2" office:value-type="string">
            <text:p text:style-name="P20" loext:marker-style-name="T608"><text:span text:style-name="T609">Ping </text:span><text:span text:style-name="T610">與 </text:span><text:span text:style-name="T609">Traceroute </text:span><text:span text:style-name="T610">都用 </text:span><text:span text:style-name="T609">ICMP </text:span><text:span text:style-name="T610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08"><text:span text:style-name="T609">Q8 ICMP </text:span><text:span text:style-name="T610">屬 </text:span><text:span text:style-name="T609">OSI </text:span><text:span text:style-name="T610">哪一層？</text:span></text:p>
          </table:table-cell>
          <table:table-cell table:style-name="表格127.A3" office:value-type="string">
            <text:p text:style-name="P20" loext:marker-style-name="T608"><text:span text:style-name="T609">Network Layer</text:span><text:span text:style-name="T608"/></text:p>
          </table:table-cell>
          <table:table-cell table:style-name="表格127.A3" office:value-type="string">
            <text:p text:style-name="P20" loext:marker-style-name="T608"><text:span text:style-name="T609">ICMP </text:span><text:span text:style-name="T610">是 </text:span><text:span text:style-name="T609">IP </text:span><text:span text:style-name="T610">的附屬協定，屬網路層；</text:span><text:span text:style-name="T609">SNMP </text:span><text:span text:style-name="T610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08"><text:span text:style-name="T609">Q9 </text:span><text:span text:style-name="T610">何者用 </text:span><text:span text:style-name="T609">UDP </text:span><text:span text:style-name="T610">且屬應用層？</text:span></text:p>
          </table:table-cell>
          <table:table-cell table:style-name="表格127.A2" office:value-type="string">
            <text:p text:style-name="P20" loext:marker-style-name="T608"><text:span text:style-name="T609">SNMP</text:span><text:span text:style-name="T608"/></text:p>
          </table:table-cell>
          <table:table-cell table:style-name="表格127.A2" office:value-type="string">
            <text:p text:style-name="P20" loext:marker-style-name="T608"><text:span text:style-name="T609">SNMP </text:span><text:span text:style-name="T610">用 </text:span><text:span text:style-name="T609">UDP</text:span><text:span text:style-name="T610">、屬應用層；</text:span><text:span text:style-name="T609">ICMP </text:span><text:span text:style-name="T610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08"><text:span text:style-name="T609">Q10 </text:span><text:span text:style-name="T610">下列何者正確？</text:span></text:p>
          </table:table-cell>
          <table:table-cell table:style-name="表格127.A3" office:value-type="string">
            <text:p text:style-name="P20" loext:marker-style-name="T608"><text:span text:style-name="T609">SNMP </text:span><text:span text:style-name="T610">用於設備管理</text:span></text:p>
          </table:table-cell>
          <table:table-cell table:style-name="表格127.A3" office:value-type="string">
            <text:p text:style-name="P20" loext:marker-style-name="T608"><text:span text:style-name="T609">IDS </text:span><text:span text:style-name="T610">不阻擋；</text:span><text:span text:style-name="T609">Firewall </text:span><text:span text:style-name="T610">不做行為分析；</text:span><text:span text:style-name="T609">ICMP </text:span><text:span text:style-name="T610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09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09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09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09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09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09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</text:span><text:soft-page-break/><text:span text:style-name="T20">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3"><text:soft-page-break/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oft-page-break/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49" loext:marker-style-name="T611"><text:span text:style-name="T612">祝　金榜題名　</text:span><text:span text:style-name="T613">·</text:span><text:span text:style-name="T612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17T20:23:00.037457900</dc:date>
    <meta:editing-cycles>432</meta:editing-cycles>
    <dc:title>網路概論與資訊安全 完整整合筆記</dc:title>
    <meta:editing-duration>P2DT20H14M43S</meta:editing-duration>
    <meta:generator>LibreOffice/26.2.3.2$Windows_X86_64 LibreOffice_project/70e089b17412e4cb7773e41413306b17a2328c34</meta:generator>
    <meta:document-statistic meta:table-count="143" meta:image-count="1" meta:object-count="0" meta:page-count="52" meta:paragraph-count="2304" meta:word-count="30715" meta:character-count="48594" meta:non-whitespace-character-count="43808"/>
    <meta:user-defined meta:name="AppVersion">15.0000</meta:user-defined>
  </office:meta>
</office:document-meta>
</file>