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60000014BACF965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Standard">
      <style:paragraph-properties fo:margin-top="2.822cm" fo:margin-bottom="0cm" style:contextual-spacing="false"/>
    </style:style>
    <style:style style:name="P3" style:family="paragraph" style:parent-style-name="Standard">
      <style:paragraph-properties fo:margin-top="0cm" fo:margin-bottom="0.388cm" style:contextual-spacing="false"/>
    </style:style>
    <style:style style:name="P4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5" style:family="paragraph" style:parent-style-name="Standard">
      <style:paragraph-properties fo:margin-top="0cm" fo:margin-bottom="0.353cm" style:contextual-spacing="false"/>
    </style:style>
    <style:style style:name="P6" style:family="paragraph" style:parent-style-name="Standard">
      <style:paragraph-properties fo:margin-top="0.035cm" fo:margin-bottom="0.106cm" style:contextual-spacing="false" fo:line-height="0.459cm"/>
    </style:style>
    <style:style style:name="P7" style:family="paragraph" style:parent-style-name="Standard">
      <style:paragraph-properties fo:margin-top="0cm" fo:margin-bottom="0.042cm" style:contextual-spacing="false" fo:line-height="0.455cm"/>
    </style:style>
    <style:style style:name="P8" style:family="paragraph" style:parent-style-name="Standard">
      <style:paragraph-properties fo:margin-top="0.042cm" fo:margin-bottom="0.042cm" style:contextual-spacing="false" fo:line-height="0.455cm"/>
    </style:style>
    <style:style style:name="P9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2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font-weight="bold" fo:background-color="#ffd740" style:font-weight-asian="bold" style:font-weight-complex="bold"/>
    </style:style>
    <style:style style:name="P1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8bbd0" loext:opacity="100%" fo:font-weight="bold" fo:background-color="#880e4f" style:font-weight-asian="bold" style:font-weight-complex="bold"/>
    </style:style>
    <style:style style:name="P1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ea00" loext:opacity="100%" fo:font-weight="bold" fo:background-color="#3d5afe" style:font-weight-asian="bold" style:font-weight-complex="bold"/>
    </style:style>
    <style:style style:name="P1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fo:font-weight="bold" fo:background-color="#5d4037" style:font-weight-asian="bold" style:font-weight-complex="bold"/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P21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22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23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P26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27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2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29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30" style:family="paragraph" style:parent-style-name="Standard">
      <style:paragraph-properties fo:margin-top="0.042cm" fo:margin-bottom="0.042cm" style:contextual-spacing="false" fo:line-height="0.455cm"/>
    </style:style>
    <style:style style:name="P31" style:family="paragraph" style:parent-style-name="Standard">
      <style:paragraph-properties fo:margin-top="0cm" fo:margin-bottom="0.042cm" style:contextual-spacing="false" fo:line-height="0.455cm"/>
    </style:style>
    <style:style style:name="P32" style:family="paragraph" style:parent-style-name="Standard">
      <style:paragraph-properties fo:margin-top="0cm" fo:margin-bottom="0.212cm" style:contextual-spacing="false" fo:break-before="page"/>
    </style:style>
    <style:style style:name="P33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4" style:family="paragraph" style:parent-style-name="Standard">
      <style:paragraph-properties fo:margin-top="0.035cm" fo:margin-bottom="0.106cm" style:contextual-spacing="false" fo:line-height="0.459cm"/>
    </style:style>
    <style:style style:name="P35" style:family="paragraph" style:parent-style-name="Standard">
      <style:paragraph-properties fo:margin-top="0.071cm" fo:margin-bottom="0.106cm" style:contextual-spacing="false" fo:line-height="0.466cm" fo:text-align="start" style:justify-single-word="false"/>
    </style:style>
    <style:style style:name="P36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officeooo:paragraph-rsid="0017bb8d"/>
    </style:style>
    <style:style style:name="P37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officeooo:paragraph-rsid="004942c0"/>
    </style:style>
    <style:style style:name="P3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cdd2" loext:opacity="100%" fo:font-weight="bold" fo:background-color="#b71c1c" style:font-weight-asian="bold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fo:font-weight="bold" fo:background-color="#1a237e" style:font-weight-asian="bold" style:font-weight-complex="bold"/>
    </style:style>
    <style:style style:name="P4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fo:font-weight="bold" fo:background-color="#1b5e20" style:font-weight-asian="bold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T3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4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5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6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7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8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9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10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style style:name="T14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16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7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8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1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20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23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4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8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29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0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1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32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33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6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7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8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9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0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1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47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48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49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50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51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52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53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60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1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2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63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64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" style:family="text">
      <style:text-properties fo:color="#1f3a5c" loext:opacity="100%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68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9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72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73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4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5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6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7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78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79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8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82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83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4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5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6" style:family="text">
      <style:text-properties fo:color="#2b2b2b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7" style:family="text">
      <style:text-properties fo:color="#2b2b2b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8" style:family="text">
      <style:text-properties fo:color="#2b2b2b" loext:opacity="100%" style:font-name="Microsoft JhengHei" fo:font-size="9.5pt" fo:font-style="normal" fo:font-weight="normal" fo:background-color="#ff4081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9" style:family="text">
      <style:text-properties fo:color="#2b2b2b" loext:opacity="100%" style:font-name="Microsoft JhengHei" fo:font-size="9.5pt" fo:font-style="normal" fo:font-weight="normal" fo:background-color="#ff4081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0" style:family="text">
      <style:text-properties fo:color="#2b2b2b" loext:opacity="100%" style:font-name="Microsoft JhengHei" fo:font-size="9.5pt" fo:font-style="normal" fo:font-weight="normal" fo:background-color="#2979ff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1" style:family="text">
      <style:text-properties fo:color="#2b2b2b" loext:opacity="100%" style:font-name="Microsoft JhengHei" fo:font-size="9.5pt" fo:font-style="normal" fo:font-weight="normal" fo:background-color="#2979ff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2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7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5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6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7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8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9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0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2" style:family="text">
      <style:text-properties fo:color="#2b2b2b" loext:opacity="100%" style:font-name="Microsoft JhengHei" fo:font-size="10.5pt" fo:font-style="normal" fo:font-weight="normal" fo:background-color="#18ffff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3" style:family="text">
      <style:text-properties fo:color="#2b2b2b" loext:opacity="100%" style:font-name="Microsoft JhengHei" fo:font-size="10.5pt" fo:font-style="normal" fo:font-weight="normal" fo:background-color="#18ffff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4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5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6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7" style:family="text">
      <style:text-properties fo:color="#2b2b2b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8" style:family="text">
      <style:text-properties fo:color="#2b2b2b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9" style:family="text">
      <style:text-properties fo:color="#2b2b2b" loext:opacity="100%" style:font-name="Microsoft JhengHei" fo:font-size="10.5pt" fo:font-style="normal" fo:font-weight="normal" fo:background-color="#3d5af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0" style:family="text">
      <style:text-properties fo:color="#2b2b2b" loext:opacity="100%" style:font-name="Microsoft JhengHei" fo:font-size="10.5pt" fo:font-style="normal" fo:font-weight="normal" fo:background-color="#3d5af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1" style:family="text">
      <style:text-properties fo:color="#2b2b2b" loext:opacity="100%" style:font-name="Microsoft JhengHei" fo:font-size="10.5pt" fo:font-style="normal" fo:font-weight="normal" fo:background-color="#1b5e2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2" style:family="text">
      <style:text-properties fo:color="#2b2b2b" loext:opacity="100%" style:font-name="Microsoft JhengHei" fo:font-size="10.5pt" fo:font-style="normal" fo:font-weight="normal" fo:background-color="#1b5e2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3" style:family="text">
      <style:text-properties fo:color="#2b2b2b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4" style:family="text">
      <style:text-properties fo:color="#2b2b2b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5" style:family="text">
      <style:text-properties fo:color="#2b2b2b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6" style:family="text">
      <style:text-properties fo:color="#2b2b2b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7" style:family="text">
      <style:text-properties fo:color="#2b2b2b" loext:opacity="100%" style:font-name="Microsoft JhengHei" fo:font-size="10.5pt" fo:font-style="normal" fo:font-weight="normal" fo:background-color="#bf360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8" style:family="text">
      <style:text-properties fo:color="#2b2b2b" loext:opacity="100%" style:font-name="Microsoft JhengHei" fo:font-size="10.5pt" fo:font-style="normal" fo:font-weight="normal" fo:background-color="#bf360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9" style:family="text">
      <style:text-properties fo:color="#2b2b2b" loext:opacity="100%" style:font-name="Microsoft JhengHei" fo:font-size="10.5pt" fo:font-style="normal" fo:font-weight="normal" fo:background-color="#ff3d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0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2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3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4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5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7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0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1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43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44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5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6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7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48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49" style:family="text">
      <style:text-properties fo:color="#2b2b2b" loext:opacity="100%" style:font-name="Microsoft JhengHei" fo:font-size="9pt" fo:font-style="normal" fo:font-weight="normal" fo:background-color="#ffd74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0" style:family="text">
      <style:text-properties fo:color="#2b2b2b" loext:opacity="100%" style:font-name="Microsoft JhengHei" fo:font-size="9pt" fo:font-style="normal" fo:font-weight="normal" fo:background-color="#ffd74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1" style:family="text">
      <style:text-properties fo:color="#2b2b2b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2" style:family="text">
      <style:text-properties fo:color="#2b2b2b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3" style:family="text">
      <style:text-properties fo:color="#2b2b2b" loext:opacity="100%" style:font-name="Microsoft JhengHei" fo:font-size="9pt" fo:font-style="normal" fo:font-weight="normal" fo:background-color="#76ff03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4" style:family="text">
      <style:text-properties fo:color="#2b2b2b" loext:opacity="100%" style:font-name="Microsoft JhengHei" fo:font-size="9pt" fo:font-style="normal" fo:font-weight="normal" fo:background-color="#76ff03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5" style:family="text">
      <style:text-properties fo:color="#2b2b2b" loext:opacity="100%" style:font-name="Microsoft JhengHei" fo:font-size="9pt" fo:font-style="normal" fo:font-weight="normal" fo:background-color="#18ffff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6" style:family="text">
      <style:text-properties fo:color="#2b2b2b" loext:opacity="100%" style:font-name="Microsoft JhengHei" fo:font-size="9pt" fo:font-style="normal" fo:font-weight="normal" fo:background-color="#18ffff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7" style:family="text">
      <style:text-properties fo:color="#2b2b2b" loext:opacity="100%" style:font-name="Microsoft JhengHei" fo:font-size="9pt" fo:font-style="normal" fo:font-weight="normal" fo:background-color="#311b92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8" style:family="text">
      <style:text-properties fo:color="#2b2b2b" loext:opacity="100%" style:font-name="Microsoft JhengHei" fo:font-size="9pt" fo:font-style="normal" fo:font-weight="normal" fo:background-color="#311b92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9" style:family="text">
      <style:text-properties fo:color="#2b2b2b" loext:opacity="100%" style:font-name="Microsoft JhengHei" fo:font-size="9pt" fo:font-style="normal" fo:font-weight="normal" fo:background-color="#ff4081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0" style:family="text">
      <style:text-properties fo:color="#2b2b2b" loext:opacity="100%" style:font-name="Microsoft JhengHei" fo:font-size="9pt" fo:font-style="normal" fo:font-weight="normal" fo:background-color="#ff4081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1" style:family="text">
      <style:text-properties fo:color="#2b2b2b" loext:opacity="100%" style:font-name="Microsoft JhengHei" fo:font-size="9pt" fo:font-style="normal" fo:font-weight="normal" fo:background-color="#f57c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2" style:family="text">
      <style:text-properties fo:color="#2b2b2b" loext:opacity="100%" style:font-name="Microsoft JhengHei" fo:font-size="9pt" fo:font-style="normal" fo:font-weight="normal" fo:background-color="#f57c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3" style:family="text">
      <style:text-properties fo:color="#2b2b2b" loext:opacity="100%" style:font-name="Microsoft JhengHei" fo:font-size="9pt" fo:font-style="normal" fo:font-weight="normal" fo:background-color="#4a148c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4" style:family="text">
      <style:text-properties fo:color="#2b2b2b" loext:opacity="100%" style:font-name="Microsoft JhengHei" fo:font-size="9pt" fo:font-style="normal" fo:font-weight="normal" fo:background-color="#4a148c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5" style:family="text">
      <style:text-properties fo:color="#2b2b2b" loext:opacity="100%" style:font-name="Microsoft JhengHei" fo:font-size="9pt" fo:font-style="normal" fo:font-weight="normal" fo:background-color="#64ffda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6" style:family="text">
      <style:text-properties fo:color="#2b2b2b" loext:opacity="100%" style:font-name="Microsoft JhengHei" fo:font-size="9pt" fo:font-style="normal" fo:font-weight="normal" fo:background-color="#64ffda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7" style:family="text">
      <style:text-properties fo:color="#2b2b2b" loext:opacity="100%" style:font-name="Microsoft JhengHei" fo:font-size="9pt" fo:font-style="normal" fo:font-weight="normal" fo:background-color="#ffff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8" style:family="text">
      <style:text-properties fo:color="#2b2b2b" loext:opacity="100%" style:font-name="Microsoft JhengHei" fo:font-size="9pt" fo:font-style="normal" fo:font-weight="normal" fo:background-color="#ffff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9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1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3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4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5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6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7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8" style:family="text">
      <style:text-properties fo:color="#2b2b2b" loext:opacity="100%" style:font-name="Microsoft JhengHei" fo:font-size="9pt" fo:font-style="normal" fo:font-weight="bold" fo:background-color="#f57c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9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180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81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82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3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4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5" style:family="text">
      <style:text-properties fo:color="#2b2b2b" loext:opacity="100%" fo:font-size="9.5pt" fo:font-style="normal" fo:font-weight="normal" fo:background-color="#0000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6" style:family="text">
      <style:text-properties fo:color="#2b2b2b" loext:opacity="100%" fo:font-size="9.5pt" fo:font-style="normal" fo:font-weight="normal" fo:background-color="#0000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7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8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9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6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7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8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9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0" style:family="text">
      <style:text-properties fo:color="#2b2b2b" loext:opacity="100%" fo:font-size="10.5pt" fo:font-style="normal" fo:font-weight="normal" fo:background-color="#18f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1" style:family="text">
      <style:text-properties fo:color="#2b2b2b" loext:opacity="100%" fo:font-size="10.5pt" fo:font-style="normal" fo:font-weight="normal" fo:background-color="#18f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2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3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4" style:family="text">
      <style:text-properties fo:color="#2b2b2b" loext:opacity="100%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5" style:family="text">
      <style:text-properties fo:color="#2b2b2b" loext:opacity="100%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6" style:family="text">
      <style:text-properties fo:color="#2b2b2b" loext:opacity="100%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7" style:family="text">
      <style:text-properties fo:color="#2b2b2b" loext:opacity="100%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8" style:family="text">
      <style:text-properties fo:color="#2b2b2b" loext:opacity="100%" fo:font-size="10.5pt" fo:font-style="normal" fo:font-weight="normal" fo:background-color="#1b5e2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9" style:family="text">
      <style:text-properties fo:color="#2b2b2b" loext:opacity="100%" fo:font-size="10.5pt" fo:font-style="normal" fo:font-weight="normal" fo:background-color="#1b5e2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0" style:family="text">
      <style:text-properties fo:color="#2b2b2b" loext:opacity="100%" fo:font-size="10.5pt" fo:font-style="normal" fo:font-weight="normal" fo:background-color="#004d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1" style:family="text">
      <style:text-properties fo:color="#2b2b2b" loext:opacity="100%" fo:font-size="10.5pt" fo:font-style="normal" fo:font-weight="normal" fo:background-color="#004d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2" style:family="text">
      <style:text-properties fo:color="#2b2b2b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3" style:family="text">
      <style:text-properties fo:color="#2b2b2b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227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28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29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0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1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2" style:family="text">
      <style:text-properties fo:color="#2b2b2b" loext:opacity="100%" fo:font-size="9pt" fo:font-style="normal" fo:font-weight="normal" fo:background-color="#ff4081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3" style:family="text">
      <style:text-properties fo:color="#2b2b2b" loext:opacity="100%" fo:font-size="9pt" fo:font-style="normal" fo:font-weight="normal" fo:background-color="#ff4081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4" style:family="text">
      <style:text-properties fo:color="#2b2b2b" loext:opacity="100%" fo:font-size="9pt" fo:font-style="normal" fo:font-weight="normal" fo:background-color="#64ffda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5" style:family="text">
      <style:text-properties fo:color="#2b2b2b" loext:opacity="100%" fo:font-size="9pt" fo:font-style="normal" fo:font-weight="normal" fo:background-color="#64ffda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6" style:family="text">
      <style:text-properties fo:color="#2b2b2b" loext:opacity="100%" fo:font-size="9pt" fo:font-style="normal" fo:font-weight="normal" fo:background-color="#ffff0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7" style:family="text">
      <style:text-properties fo:color="#2b2b2b" loext:opacity="100%" fo:font-size="9pt" fo:font-style="normal" fo:font-weight="normal" fo:background-color="#ffff0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8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39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0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2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3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244" style:family="text">
      <style:text-properties fo:color="#2b2b2b" loext:opacity="100%" style:font-name="OpenSymbol" fo:font-size="10.5pt" fo:font-style="normal" fo:font-weight="normal" style:font-name-asian="OpenSymbol1" style:font-size-asian="10.5pt" style:font-style-asian="normal" style:font-weight-asian="normal" style:font-name-complex="OpenSymbol1" style:font-size-complex="10.5pt" style:font-style-complex="normal" style:font-weight-complex="normal"/>
    </style:style>
    <style:style style:name="T245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246" style:family="text">
      <style:text-properties fo:color="#2b2b2b" loext:opacity="100%" style:font-name="Arial" fo:font-size="10.5pt" fo:font-style="normal" fo:font-weight="normal" officeooo:rsid="004849e1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47" style:family="text">
      <style:text-properties fo:font-size="11pt" style:font-name-asian="Microsoft JhengHei2" style:font-size-asian="11pt" style:font-name-complex="Microsoft JhengHei2" style:font-size-complex="11pt"/>
    </style:style>
    <style:style style:name="T248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9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250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51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2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53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54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6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7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58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59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60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61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62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4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70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1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2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3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4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79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0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1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2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3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4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8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7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8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89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90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92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9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94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96" style:family="text">
      <style:text-properties fo:color="#2f7a4d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97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98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99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00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1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0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0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1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2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5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6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7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1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2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3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4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5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6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7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8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9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30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31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32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33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34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5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8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9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0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1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3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4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5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6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7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8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9" style:family="text">
      <style:text-properties fo:color="#18ffff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50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51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352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7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8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2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18ffff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73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5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6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8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9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1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ff3d00" loext:opacity="100%" style:font-name="Microsoft JhengHei" fo:font-size="9pt" fo:font-style="normal" fo:font-weight="normal" fo:background-color="#64ffda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386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7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8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9" style:family="text">
      <style:text-properties fo:color="#ff3d00" loext:opacity="100%" style:font-name="Microsoft JhengHei" fo:font-size="10.5pt" fo:font-style="normal" fo:font-weight="normal" fo:background-color="#18ffff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90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91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3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4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6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7" style:family="text">
      <style:text-properties fo:color="#ff3d00" loext:opacity="100%" fo:font-size="9pt" fo:font-style="normal" fo:font-weight="normal" fo:background-color="#64ffda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398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ff3d00" loext:opacity="100%" fo:font-size="10.5pt" fo:font-style="normal" fo:font-weight="normal" fo:background-color="#18f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02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3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4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7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8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0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1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2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413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14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5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6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7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9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2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5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6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7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9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0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1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2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3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4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3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39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0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1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2" style:family="text">
      <style:text-properties fo:color="#76ff03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44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4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45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6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7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8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9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0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56" style:family="text">
      <style:text-properties fo:color="#76ff03" loext:opacity="100%" style:font-name="Microsoft JhengHei" fo:font-size="10.5pt" fo:font-style="normal" fo:font-weight="normal" fo:background-color="#1b5e2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57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8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9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1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4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5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8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9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0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1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2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3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4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5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6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78" style:family="text">
      <style:text-properties fo:color="#76ff03" loext:opacity="100%" fo:font-size="10.5pt" fo:font-style="normal" fo:font-weight="normal" fo:background-color="#1b5e2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79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5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86" style:family="text">
      <style:text-properties fo:color="#00e676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487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0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7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8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9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1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4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5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6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7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8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0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1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4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5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6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7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8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1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2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3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5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6" style:family="text">
      <style:text-properties fo:color="#ffff00" loext:opacity="100%" style:font-name="Microsoft JhengHei" fo:font-size="9pt" fo:font-style="normal" fo:font-weight="bold" fo:background-color="#f57c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7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8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9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0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1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3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4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1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2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4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545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46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47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8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9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0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1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2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3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5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6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0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1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2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3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4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7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0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1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2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3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4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5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6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79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0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1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2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3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6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7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8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9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0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1" style:family="text">
      <style:text-properties fo:color="#ffea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2" style:family="text">
      <style:text-properties fo:color="#ffea00" loext:opacity="100%" style:font-name="Microsoft JhengHei" fo:font-size="10.5pt" fo:font-style="normal" fo:font-weight="normal" fo:background-color="#3d5af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93" style:family="text">
      <style:text-properties fo:color="#ffea00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94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5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6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7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8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9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0" style:family="text">
      <style:text-properties fo:color="#ffea00" loext:opacity="100%" style:font-name="Microsoft JhengHei" fo:font-size="9.5pt" fo:font-style="normal" fo:font-weight="normal" fo:background-color="#2979ff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01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02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3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4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5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6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607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8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9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0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1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2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4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5" style:family="text">
      <style:text-properties fo:color="#ffea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6" style:family="text">
      <style:text-properties fo:color="#ffea00" loext:opacity="100%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17" style:family="text">
      <style:text-properties fo:color="#ffea00" loext:opacity="100%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18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9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0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1" style:family="text">
      <style:text-properties fo:color="#ffea0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2" style:family="text">
      <style:text-properties fo:color="#ffea00" loext:opacity="100%" fo:font-size="9.5pt" fo:font-style="normal" fo:font-weight="normal" fo:background-color="#0000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23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4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5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6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7" style:family="text">
      <style:text-properties fo:color="#eeeeee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8" style:family="text">
      <style:text-properties fo:color="#eeeeee" loext:opacity="100%" style:font-name="Microsoft JhengHei" fo:font-size="10.5pt" fo:font-style="normal" fo:font-weight="bold" fo:background-color="transparent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9" style:family="text">
      <style:text-properties fo:color="#eeeeee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0" style:family="text">
      <style:text-properties fo:color="#eeeeee" loext:opacity="100%" style:font-name="Microsoft JhengHei" fo:font-size="9pt" fo:font-style="normal" fo:font-weight="normal" fo:background-color="#ff4081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631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32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3" style:family="text">
      <style:text-properties fo:color="#eeeeee" loext:opacity="100%" fo:font-size="9pt" fo:font-style="normal" fo:font-weight="normal" fo:background-color="#ff4081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634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35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6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7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8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9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0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41" style:family="text">
      <style:text-properties fo:color="#64ffda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42" style:family="text">
      <style:text-properties fo:color="#64ffda" loext:opacity="100%" style:font-name="Microsoft JhengHei" fo:font-size="10.5pt" fo:font-style="normal" fo:font-weight="normal" fo:background-color="#18ffff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43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4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5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6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7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48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49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50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1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2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3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4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5" style:family="text">
      <style:text-properties fo:color="#64ffda" loext:opacity="100%" fo:font-size="10.5pt" fo:font-style="normal" fo:font-weight="normal" fo:background-color="#004d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6" style:family="text">
      <style:text-properties fo:color="#64ffda" loext:opacity="100%" fo:font-size="10.5pt" fo:font-style="normal" fo:font-weight="normal" fo:background-color="#18f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7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5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59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6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1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2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3" style:family="text">
      <style:text-properties fo:color="#b2ff59" loext:opacity="100%" style:font-name="Microsoft JhengHei" fo:font-size="9pt" fo:font-style="normal" fo:font-weight="normal" fo:background-color="#4a148c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664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65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6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7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8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9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0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1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2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3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4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5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6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7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8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79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0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81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2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84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5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6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7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8" style:family="text">
      <style:text-properties fo:color="#d1c4e9" loext:opacity="100%" style:font-name="Microsoft JhengHei" fo:font-size="9pt" fo:font-style="normal" fo:font-weight="normal" fo:background-color="#311b92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689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0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1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2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93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94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9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6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7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98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99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00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1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2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3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4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5" style:family="text">
      <style:text-properties fo:color="#f8bbd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6" style:family="text">
      <style:text-properties fo:color="#f8bbd0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07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8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9" style:family="text">
      <style:text-properties fo:color="#f8bbd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0" style:family="text">
      <style:text-properties fo:color="#f8bbd0" loext:opacity="100%" style:font-name="Microsoft JhengHei" fo:font-size="9.5pt" fo:font-style="normal" fo:font-weight="normal" fo:background-color="#ff4081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711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1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3" style:family="text">
      <style:text-properties fo:color="#f8bbd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4" style:family="text">
      <style:text-properties fo:color="#f8bbd0" loext:opacity="100%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15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6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17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8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9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0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1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2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3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24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25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26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727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728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729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0" style:family="text">
      <style:text-properties fo:color="#f5f5f5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31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2" style:family="text">
      <style:text-properties fo:color="#f5f5f5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3" style:family="text">
      <style:text-properties fo:color="#f5f5f5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34" style:family="text">
      <style:text-properties fo:color="#f5f5f5" loext:opacity="100%" style:font-name="Microsoft JhengHei" fo:font-size="10.5pt" fo:font-style="normal" fo:font-weight="normal" fo:background-color="#ff3d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35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6" style:family="text">
      <style:text-properties fo:color="#ff9100" loext:opacity="100%" fo:font-size="9pt" fo:font-style="normal" fo:font-weight="normal" fo:background-color="#64ffda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737" style:family="text">
      <style:text-properties fo:color="#ff9100" loext:opacity="100%" style:font-name="Microsoft JhengHei" fo:font-size="9pt" fo:font-style="normal" fo:font-weight="normal" fo:background-color="#64ffda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1" loext:marker-style-name="T21"><text:span text:style-name="T22">公職考試 </text:span><text:span text:style-name="T39">· </text:span><text:span text:style-name="T22">資訊類</text:span></text:p>
      <text:p text:style-name="P22" loext:marker-style-name="T46"><text:span text:style-name="T47">網路概論 與 資訊安全</text:span><text:span text:style-name="T46"/></text:p>
      <text:p text:style-name="P23" loext:marker-style-name="T48"><text:span text:style-name="T49">完整整合筆記 </text:span><text:span text:style-name="T62">· </text:span><text:span text:style-name="T49">最終版</text:span></text:p>
      <text:p text:style-name="P24" loext:marker-style-name="T3"><text:span text:style-name="T14">OSI / TCP/IP ‧ IP </text:span><text:span text:style-name="T4">子網 ‧ </text:span><text:span text:style-name="T14">IPv6 ‧ ARP/NAT ‧ TCP ‧ DNS ‧ </text:span><text:span text:style-name="T4">路由 ‧ </text:span><text:span text:style-name="T14">SDN/CDN/5G ‧ </text:span><text:span text:style-name="T4">無線 ‧ 資安全攻防</text:span></text:p>
      <text:p text:style-name="P3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26" loext:marker-style-name="T69"><text:span text:style-name="T70">涵蓋十大主題</text:span><text:span text:style-name="T69"/></text:p>
            </table:table-cell>
            <table:table-cell table:style-name="表格1.A1" office:value-type="string">
              <text:p text:style-name="P26" loext:marker-style-name="T69"><text:span text:style-name="T70">前置速記</text:span><text:span text:style-name="T69"/></text:p>
            </table:table-cell>
            <table:table-cell table:style-name="表格1.A1" office:value-type="string">
              <text:p text:style-name="P26" loext:marker-style-name="T69"><text:span text:style-name="T70">全程對照</text:span><text:span text:style-name="T69"/></text:p>
            </table:table-cell>
            <table:table-cell table:style-name="表格1.A1" office:value-type="string">
              <text:p text:style-name="P26" loext:marker-style-name="T69"><text:span text:style-name="T70">考試導向</text:span><text:span text:style-name="T69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28" loext:marker-style-name="T83"><text:span text:style-name="T84">十篇章節</text:span><text:span text:style-name="T83"/></text:p>
          </table:table-cell>
          <table:table-cell table:style-name="表格1.A2" office:value-type="string">
            <text:p text:style-name="P28" loext:marker-style-name="T83"><text:span text:style-name="T84">口訣 </text:span><text:span text:style-name="T182">+ </text:span><text:span text:style-name="T84">表格</text:span></text:p>
          </table:table-cell>
          <table:table-cell table:style-name="表格1.A2" office:value-type="string">
            <text:p text:style-name="P28" loext:marker-style-name="T83"><text:span text:style-name="T84">陷阱 </text:span><text:span text:style-name="T182">+ </text:span><text:span text:style-name="T84">正解</text:span></text:p>
          </table:table-cell>
          <table:table-cell table:style-name="表格1.A2" office:value-type="string">
            <text:p text:style-name="P28" loext:marker-style-name="T83"><text:span text:style-name="T84">申論 </text:span><text:span text:style-name="T182">+ </text:span><text:span text:style-name="T84">選擇</text:span></text:p>
          </table:table-cell>
        </table:table-row>
      </table:table>
      <text:p text:style-name="P5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><text:span text:style-name="T247">📖 <text:s/></text:span><text:span text:style-name="T23">讀這份筆記的方法</text:span></text:p>
            <text:p text:style-name="P7"><text:span text:style-name="T24">使用方式：</text:span><text:span text:style-name="T106">第〇篇「考前速記總表」收錄全書所有口訣與必背表格，考前衝刺只看這篇即可；</text:span></text:p>
            <text:p text:style-name="P8" loext:marker-style-name="T107"><text:span text:style-name="T106">第一～十篇為完整詳解，建立觀念與申論寫法時閱讀。每篇皆附「常見陷阱」與「考試標準答案」。</text:span><text:span text:style-name="T107"/></text:p>
          </table:table-cell>
        </table:table-row>
      </table:table>
      <text:p text:style-name="P32" loext:marker-style-name="T50"><text:span text:style-name="T51">目　錄</text:span><text:span text:style-name="T50"/></text:p>
      <text:p text:style-name="P33" loext:marker-style-name="T5"><text:span text:style-name="T15">Table of Contents</text:span><text:span text:style-name="T5"/></text:p>
      <text:p text:style-name="P9"><text:span text:style-name="T23">第 〇 篇　考前速記總表 — 口訣 </text:span><text:span text:style-name="T40">× </text:span><text:span text:style-name="T23">必背表格</text:span><text:span text:style-name="T18"><text:tab/>3</text:span></text:p>
      <text:p text:style-name="P9"><text:span text:style-name="T9">　　</text:span><text:span text:style-name="T19">Part A</text:span><text:span text:style-name="T9">　口訣大全（依主題分類）</text:span><text:span text:style-name="T18"><text:tab/>3</text:span></text:p>
      <text:p text:style-name="P9"><text:span text:style-name="T9">　　</text:span><text:span text:style-name="T19">Part B</text:span><text:span text:style-name="T9">　必背表格精選</text:span><text:span text:style-name="T18"><text:tab/>5</text:span></text:p>
      <text:p text:style-name="P10"><text:span text:style-name="T52">第 一 篇　網路基礎架構：</text:span><text:span text:style-name="T63">OSI / TCP-IP · </text:span><text:span text:style-name="T52">協定 </text:span><text:span text:style-name="T63">· ARP · Traceroute</text:span><text:span text:style-name="T18"><text:tab/>9</text:span></text:p>
      <text:p text:style-name="P9"><text:span text:style-name="T52">第 二 篇　</text:span><text:span text:style-name="T63">IP </text:span><text:span text:style-name="T52">位址與封包處理：分類 </text:span><text:span text:style-name="T63">· CIDR · VLSM · Fragmentation</text:span><text:span text:style-name="T18"><text:tab/>13</text:span></text:p>
      <text:p text:style-name="P9"><text:span text:style-name="T52">第 三 篇　</text:span><text:span text:style-name="T63">IPv4 → IPv6 </text:span><text:span text:style-name="T52">過渡技術</text:span><text:span text:style-name="T18"><text:tab/>19</text:span></text:p>
      <text:p text:style-name="P9"><text:span text:style-name="T52">第 四 篇　</text:span><text:span text:style-name="T63">ARP</text:span><text:span text:style-name="T52">、</text:span><text:span text:style-name="T63">NAT </text:span><text:span text:style-name="T52">與完整上網流程</text:span><text:span text:style-name="T18"><text:tab/>21</text:span></text:p>
      <text:p text:style-name="P9"><text:span text:style-name="T52">第 五 篇　</text:span><text:span text:style-name="T63">TCP </text:span><text:span text:style-name="T52">傳輸控制深入</text:span><text:span text:style-name="T18"><text:tab/>24</text:span></text:p>
      <text:p text:style-name="P9"><text:span text:style-name="T52">第 六 篇　</text:span><text:span text:style-name="T63">DNS </text:span><text:span text:style-name="T52">與 </text:span><text:span text:style-name="T63">DNSSEC</text:span><text:span text:style-name="T18"><text:tab/>28</text:span></text:p>
      <text:p text:style-name="P9"><text:span text:style-name="T52">第 七 篇　路由協定：</text:span><text:span text:style-name="T63">OSPF </text:span><text:span text:style-name="T52">與 </text:span><text:span text:style-name="T63">BGP</text:span><text:span text:style-name="T18"><text:tab/>31</text:span></text:p>
      <text:p text:style-name="P9"><text:span text:style-name="T52">第 八 篇　網路系統進階：</text:span><text:span text:style-name="T63">SDN · LB · CDN · 5G</text:span><text:span text:style-name="T18"><text:tab/>34</text:span></text:p>
      <text:p text:style-name="P9"><text:span text:style-name="T52">第 九 篇　無線通訊：</text:span><text:span text:style-name="T63">WiFi vs Bluetooth</text:span><text:span text:style-name="T18"><text:tab/>37</text:span></text:p>
      <text:p text:style-name="P9"><text:span text:style-name="T52">第 十 篇　資訊安全：設備 </text:span><text:span text:style-name="T63">· </text:span><text:span text:style-name="T52">攻防 </text:span><text:span text:style-name="T63">· </text:span><text:span text:style-name="T52">企業資安 </text:span><text:span text:style-name="T63">· Zero Trust</text:span><text:span text:style-name="T18"><text:tab/>40</text:span></text:p>
      <text:p text:style-name="P10"><text:span text:style-name="T23">結　語　考前最後叮嚀</text:span><text:span text:style-name="T18"><text:tab/>51</text:span></text:p>
      <text:h text:style-name="P17" text:outline-level="1" loext:marker-style-name="T71"><text:span text:style-name="T72">第 〇 篇　考前速記總表 — 口訣 </text:span><text:span text:style-name="T71">× </text:span><text:span text:style-name="T72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6"><text:span text:style-name="T247">⚡ <text:s/></text:span><text:span text:style-name="T52">本篇用途</text:span></text:p>
            <text:p text:style-name="P7" loext:marker-style-name="T107"><text:span text:style-name="T106">這一篇把全書最關鍵的「記憶口訣」與「必背表格」依主題集中，方便考前快速複習；每一條後方括號為對應的詳解篇章。</text:span><text:span text:style-name="T107"/></text:p>
          </table:table-cell>
        </table:table-row>
      </table:table>
      <text:h text:style-name="P11" text:outline-level="2" loext:marker-style-name="T27"><text:span text:style-name="T27">Part A</text:span><text:span text:style-name="T28">　口訣大全（依主題分類）</text:span></text:h>
      <text:h text:style-name="P12" text:outline-level="3"><text:span text:style-name="T249">▍</text:span><text:span text:style-name="T250"> </text:span><text:span text:style-name="T251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62">TCP/IP </text:span><text:span text:style-name="T254">四層心法：</text:span><text:span text:style-name="T106">應用層→給人用（</text:span><text:span text:style-name="T194">HTTP/DNS/DHCP/SSH/MQTT</text:span><text:span text:style-name="T106">）｜傳輸層→怎麼送（</text:span><text:span text:style-name="T194">TCP </text:span><text:span text:style-name="T106">穩、</text:span><text:span text:style-name="T194">UDP </text:span><text:span text:style-name="T106">快）｜網路層→走哪條路（</text:span><text:span text:style-name="T194">IP/ICMP</text:span><text:span text:style-name="T106">）｜連結層→同一區網怎麼接（</text:span><text:span text:style-name="T194">Ethernet/ARP</text:span><text:span text:style-name="T106">）</text:span></text:p>
            <text:p text:style-name="P8"><text:span text:style-name="T262">OSI vs TCP/IP</text:span><text:span text:style-name="T254">：</text:span><text:span text:style-name="T194">OSI 7 </text:span><text:span text:style-name="T106">層（理論）、</text:span><text:span text:style-name="T194">TCP/IP 4 </text:span><text:span text:style-name="T106">層（實際）；差別在 </text:span><text:span text:style-name="T194">TCP/IP </text:span><text:span text:style-name="T106">把 </text:span><text:span text:style-name="T194">Session</text:span><text:span text:style-name="T106">＋</text:span><text:span text:style-name="T194">Presentation </text:span><text:span text:style-name="T106">併入 </text:span><text:span text:style-name="T194">Application</text:span><text:span text:style-name="T106">。</text:span></text:p>
            <text:p text:style-name="P8"><text:span text:style-name="T262">TCP vs UDP</text:span><text:span text:style-name="T254">：</text:span><text:span text:style-name="T194">TCP</text:span><text:span text:style-name="T106">「穩定優先」（保證送達、會重傳）；</text:span><text:span text:style-name="T194">UDP</text:span><text:span text:style-name="T106">「速度優先」（不保證、不重傳）。</text:span></text:p>
            <text:p text:style-name="P8"><text:span text:style-name="T254">三件事：</text:span><text:span text:style-name="T194">IP→</text:span><text:span text:style-name="T106">定位（目的地是誰）｜</text:span><text:span text:style-name="T194">Routing→</text:span><text:span text:style-name="T106">選路（怎麼走最快）｜</text:span><text:span text:style-name="T194">ICMP→</text:span><text:span text:style-name="T106">回報（出錯通知你）。</text:span></text:p>
            <text:p text:style-name="P8"><text:span text:style-name="T262">Traceroute</text:span><text:span text:style-name="T254">＝</text:span><text:span text:style-name="T194">TTL </text:span><text:span text:style-name="T106">遞增 ＋ </text:span><text:span text:style-name="T194">ICMP </text:span><text:span text:style-name="T106">回報，逐步「炸出」完整路徑。</text:span></text:p>
            <text:p text:style-name="P8"><text:span text:style-name="T262">ARP</text:span><text:span text:style-name="T254">＝</text:span><text:span text:style-name="T106">用 </text:span><text:span text:style-name="T194">IP </text:span><text:span text:style-name="T106">找 </text:span><text:span text:style-name="T194">MAC</text:span><text:span text:style-name="T106">，只在同一個 </text:span><text:span text:style-name="T194">LAN </text:span><text:span text:style-name="T106">內使用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二、</text:span><text:span text:style-name="T250">IP </text:span><text:span text:style-name="T251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62">VLSM </text:span><text:span text:style-name="T254">黃金公式：</text:span><text:span text:style-name="T106">需求 ＋</text:span><text:span text:style-name="T194">2 → </text:span><text:span text:style-name="T106">找最小 </text:span><text:span text:style-name="T194">2ⁿ → </text:span><text:span text:style-name="T106">前綴 </text:span><text:span text:style-name="T194">/(32−n)</text:span><text:span text:style-name="T106">。</text:span></text:p>
            <text:p text:style-name="P8"><text:span text:style-name="T254">可用主機數：</text:span><text:span text:style-name="T194">2^(</text:span><text:span text:style-name="T106">主機 </text:span><text:span text:style-name="T194">bit) − 2</text:span><text:span text:style-name="T106">（扣掉網路位址與廣播位址）。</text:span></text:p>
            <text:p text:style-name="P8"><text:span text:style-name="T262">CIDR </text:span><text:span text:style-name="T254">合併：</text:span><text:span text:style-name="T106">連續 ＋ 數量 </text:span><text:span text:style-name="T194">2ⁿ </text:span><text:span text:style-name="T106">＋ 起點對齊 → 合併 </text:span><text:span text:style-name="T194">2ⁿ </text:span><text:span text:style-name="T106">個子網則「前綴減 </text:span><text:span text:style-name="T194">n</text:span><text:span text:style-name="T106">」。</text:span></text:p>
            <text:p text:style-name="P8"><text:span text:style-name="T254">前綴速背：</text:span><text:span text:style-name="T194">/25=126</text:span><text:span text:style-name="T106">、</text:span><text:span text:style-name="T194">/26=62</text:span><text:span text:style-name="T106">、</text:span><text:span text:style-name="T194">/27=30</text:span><text:span text:style-name="T106">、</text:span><text:span text:style-name="T194">/28=14</text:span><text:span text:style-name="T106">、</text:span><text:span text:style-name="T194">/29=6</text:span><text:span text:style-name="T106">、</text:span><text:span text:style-name="T194">/30=2</text:span><text:span text:style-name="T106">。</text:span></text:p>
            <text:p text:style-name="P8"><text:span text:style-name="T254">封包切割：</text:span><text:span text:style-name="T106">封包 </text:span><text:span text:style-name="T194">&gt; MTU </text:span><text:span text:style-name="T106">就切（</text:span><text:span text:style-name="T194">Fragmentation</text:span><text:span text:style-name="T106">）；</text:span><text:span text:style-name="T194">Fragment Offset </text:span><text:span text:style-name="T106">＝ 起始位置 </text:span><text:span text:style-name="T194">÷ 8</text:span><text:span text:style-name="T106">。</text:span></text:p>
            <text:p text:style-name="P8"><text:span text:style-name="T254">誰能切：</text:span><text:span text:style-name="T194">IPv4</text:span><text:span text:style-name="T106">＝</text:span><text:span text:style-name="T194">Router </text:span><text:span text:style-name="T106">或 </text:span><text:span text:style-name="T194">Source </text:span><text:span text:style-name="T106">可切；</text:span><text:span text:style-name="T194">IPv6</text:span><text:span text:style-name="T106">＝只有 </text:span><text:span text:style-name="T194">Source </text:span><text:span text:style-name="T106">切，必搭 </text:span><text:span text:style-name="T194">PMTUD</text:span><text:span text:style-name="T106">。</text:span></text:p>
            <text:p text:style-name="P8"><text:span text:style-name="T262">Protocol </text:span><text:span text:style-name="T254">值：</text:span><text:span text:style-name="T194">ICMP=1</text:span><text:span text:style-name="T106">、</text:span><text:span text:style-name="T194">TCP=6</text:span><text:span text:style-name="T106">、</text:span><text:span text:style-name="T194">UDP=17</text:span><text:span text:style-name="T106">｜</text:span><text:span text:style-name="T194">DF=1 </text:span><text:span text:style-name="T106">禁止切、</text:span><text:span text:style-name="T194">MF=1 </text:span><text:span text:style-name="T106">後面還有分段｜</text:span><text:span text:style-name="T194">MSS</text:span><text:span text:style-name="T106">＝</text:span><text:span text:style-name="T194">MTU−20−20</text:span><text:span text:style-name="T106">＝</text:span><text:span text:style-name="T194">1460</text:span><text:span text:style-name="T106">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三、</text:span><text:span text:style-name="T250">IPv4 → IPv6</text:span><text:span text:style-name="T251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62">IPv6 </text:span><text:span text:style-name="T254">特點：</text:span><text:span text:style-name="T106">大（</text:span><text:span text:style-name="T194">128 bit</text:span><text:span text:style-name="T106">）＋ 安全（</text:span><text:span text:style-name="T194">IPsec</text:span><text:span text:style-name="T106">）＋ 快（固定 </text:span><text:span text:style-name="T194">Header</text:span><text:span text:style-name="T106">）＋ 自動（</text:span><text:span text:style-name="T194">SLAAC</text:span><text:span text:style-name="T106">）＋ 乾淨（無 </text:span><text:span text:style-name="T194">Broadcast</text:span><text:span text:style-name="T106">）。</text:span></text:p>
            <text:p text:style-name="P8"><text:span text:style-name="T254">三種過渡技術：</text:span><text:span text:style-name="T106">雙語（</text:span><text:span text:style-name="T194">Dual Stack</text:span><text:span text:style-name="T106">）＋ 偽裝（</text:span><text:span text:style-name="T194">Tunneling</text:span><text:span text:style-name="T106">）＋ 翻譯（</text:span><text:span text:style-name="T194">Translation</text:span><text:span text:style-name="T106">）。</text:span></text:p>
            <text:p text:style-name="P8"><text:span text:style-name="T254">生活比喻：</text:span><text:span text:style-name="T194">Dual Stack</text:span><text:span text:style-name="T106">＝同時會中英文；</text:span><text:span text:style-name="T194">Tunneling</text:span><text:span text:style-name="T106">＝英文信裝進中文信封偷渡；</text:span><text:span text:style-name="T194">Translation</text:span><text:span text:style-name="T106">＝現場請翻譯口譯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四、</text:span><text:span text:style-name="T250">ARP</text:span><text:span text:style-name="T251">、</text:span><text:span text:style-name="T250">NAT </text:span><text:span text:style-name="T251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上網流程：</text:span><text:span text:style-name="T194">DNS → ARP → L2 </text:span><text:span text:style-name="T106">封包 → </text:span><text:span text:style-name="T194">NAT</text:span><text:span text:style-name="T106">（去程）→ </text:span><text:span text:style-name="T194">Internet → NAT</text:span><text:span text:style-name="T106">（回程）→ 你。</text:span></text:p>
            <text:p text:style-name="P8"><text:span text:style-name="T254">核心觀念：</text:span><text:span text:style-name="T194">IP</text:span><text:span text:style-name="T106">＝最終目的地（全程不變）；</text:span><text:span text:style-name="T194">MAC</text:span><text:span text:style-name="T106">＝下一站（每跳更換）。</text:span></text:p>
            <text:p text:style-name="P8"><text:span text:style-name="T254">最大地雷：</text:span><text:span text:style-name="T194">ARP </text:span><text:span text:style-name="T106">找的是「路由器（預設閘道）」的 </text:span><text:span text:style-name="T194">MAC</text:span><text:span text:style-name="T106">，不是 </text:span><text:span text:style-name="T194">Google </text:span><text:span text:style-name="T106">的 </text:span><text:span text:style-name="T194">MAC</text:span><text:span text:style-name="T106">。</text:span></text:p>
            <text:p text:style-name="P8"><text:span text:style-name="T262">PAT</text:span><text:span text:style-name="T254">：</text:span><text:span text:style-name="T106">多台共用一個公網 </text:span><text:span text:style-name="T194">IP</text:span><text:span text:style-name="T106">，靠 </text:span><text:span text:style-name="T194">Port </text:span><text:span text:style-name="T106">號碼區分（最重要）。</text:span></text:p>
          </table:table-cell>
        </table:table-row>
      </table:table>
      <text:h text:style-name="P12" text:outline-level="3"><text:soft-page-break/><text:span text:style-name="T249">▍</text:span><text:span text:style-name="T250"> </text:span><text:span text:style-name="T251">五、</text:span><text:span text:style-name="T250">TCP </text:span><text:span text:style-name="T251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三次握手：</text:span><text:span text:style-name="T194">SYN → SYN</text:span><text:span text:style-name="T106">＋</text:span><text:span text:style-name="T194">ACK → ACK</text:span><text:span text:style-name="T106">，確認雙向都能通訊。</text:span></text:p>
            <text:p text:style-name="P8"><text:span text:style-name="T254">傳送量公式：</text:span><text:span text:style-name="T106">實際傳送量 ＝ </text:span><text:span text:style-name="T194">min(rwnd, cwnd)</text:span><text:span text:style-name="T106">。</text:span><text:span text:style-name="T194">rwnd</text:span><text:span text:style-name="T106">＝接收端限制、</text:span><text:span text:style-name="T194">cwnd</text:span><text:span text:style-name="T106">＝網路限制。</text:span></text:p>
            <text:p text:style-name="P8"><text:span text:style-name="T254">擁塞控制節奏：</text:span><text:span text:style-name="T194">Slow Start</text:span><text:span text:style-name="T106">（指數成長）→ </text:span><text:span text:style-name="T194">Congestion Avoidance</text:span><text:span text:style-name="T106">（線性成長）→ 丟包（減速）。</text:span></text:p>
            <text:p text:style-name="P8"><text:span text:style-name="T254">丟包處理：</text:span><text:span text:style-name="T194">Timeout → cwnd </text:span><text:span text:style-name="T106">重設為 </text:span><text:span text:style-name="T194">1 </text:span><text:span text:style-name="T106">回 </text:span><text:span text:style-name="T194">Slow Start</text:span><text:span text:style-name="T106">；</text:span><text:span text:style-name="T194">3 </text:span><text:span text:style-name="T106">個重複 </text:span><text:span text:style-name="T194">ACK → cwnd </text:span><text:span text:style-name="T106">減半續 </text:span><text:span text:style-name="T194">CA</text:span><text:span text:style-name="T106">。</text:span></text:p>
            <text:p text:style-name="P8"><text:span text:style-name="T262">AIMD</text:span><text:span text:style-name="T254">：</text:span><text:span text:style-name="T106">沒丟包 每 </text:span><text:span text:style-name="T194">RTT</text:span><text:span text:style-name="T106">＋</text:span><text:span text:style-name="T194">1</text:span><text:span text:style-name="T106">（加法增長）；丟包 </text:span><text:span text:style-name="T194">×0.5</text:span><text:span text:style-name="T106">（乘法減少）。</text:span></text:p>
            <text:p text:style-name="P8"><text:span text:style-name="T262">SYN Flood</text:span><text:span text:style-name="T254">：</text:span><text:span text:style-name="T106">大量半連線（</text:span><text:span text:style-name="T194">Half-open</text:span><text:span text:style-name="T106">）耗盡 </text:span><text:span text:style-name="T194">Server </text:span><text:span text:style-name="T106">資源 → </text:span><text:span text:style-name="T194">DoS</text:span><text:span text:style-name="T106">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六、</text:span><text:span text:style-name="T250">DNS </text:span><text:span text:style-name="T251">與 </text:span><text:span text:style-name="T250">DNSSEC</text:span><text:span text:style-name="T251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查詢流程：</text:span><text:span text:style-name="T194">Cache → Local → Root → TLD → Authoritative → </text:span><text:span text:style-name="T106">取得 </text:span><text:span text:style-name="T194">IP</text:span><text:span text:style-name="T106">。</text:span></text:p>
            <text:p text:style-name="P8"><text:span text:style-name="T262">Recursive</text:span><text:span text:style-name="T254">：</text:span><text:span text:style-name="T106">「代查到底」（</text:span><text:span text:style-name="T194">DNS </text:span><text:span text:style-name="T106">幫你問完，你只問一次）。</text:span></text:p>
            <text:p text:style-name="P8"><text:span text:style-name="T262">Iterative</text:span><text:span text:style-name="T254">：</text:span><text:span text:style-name="T106">「逐層詢問」（你自己一層一層問）。</text:span></text:p>
            <text:p text:style-name="P8"><text:span text:style-name="T262">DNSSEC</text:span><text:span text:style-name="T254">：</text:span><text:span text:style-name="T106">驗證真偽，不是加密、不防 </text:span><text:span text:style-name="T194">DDoS</text:span><text:span text:style-name="T106">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七、路由協定 </text:span><text:span text:style-name="T250">OSPF / BGP</text:span><text:span text:style-name="T251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範圍分類：</text:span><text:span text:style-name="T106">公司／校園內 → </text:span><text:span text:style-name="T194">IGP</text:span><text:span text:style-name="T106">（</text:span><text:span text:style-name="T194">OSPF</text:span><text:span text:style-name="T106">、</text:span><text:span text:style-name="T194">RIP</text:span><text:span text:style-name="T106">）；公司與公司間 → </text:span><text:span text:style-name="T194">EGP</text:span><text:span text:style-name="T106">（</text:span><text:span text:style-name="T194">BGP</text:span><text:span text:style-name="T106">）。</text:span></text:p>
            <text:p text:style-name="P8"><text:span text:style-name="T262">OSPF </text:span><text:span text:style-name="T254">規定：</text:span><text:span text:style-name="T106">所有 </text:span><text:span text:style-name="T194">Area </text:span><text:span text:style-name="T106">一定要連到 </text:span><text:span text:style-name="T194">Area 0</text:span><text:span text:style-name="T106">（骨幹）才能互通。</text:span></text:p>
            <text:p text:style-name="P8"><text:span text:style-name="T262">OSPF </text:span><text:span text:style-name="T254">四種 </text:span><text:span text:style-name="T262">Router</text:span><text:span text:style-name="T254">：</text:span><text:span text:style-name="T194">Internal</text:span><text:span text:style-name="T106">（不出 </text:span><text:span text:style-name="T194">Area</text:span><text:span text:style-name="T106">）／</text:span><text:span text:style-name="T194">Backbone</text:span><text:span text:style-name="T106">（在 </text:span><text:span text:style-name="T194">Area 0</text:span><text:span text:style-name="T106">）／</text:span><text:span text:style-name="T194">ABR</text:span><text:span text:style-name="T106">（跨 </text:span><text:span text:style-name="T194">Area </text:span><text:span text:style-name="T106">橋樑）／</text:span><text:span text:style-name="T194">ASBR</text:span><text:span text:style-name="T106">（跨 </text:span><text:span text:style-name="T194">AS </text:span><text:span text:style-name="T106">入口）。</text:span></text:p>
            <text:p text:style-name="P8"><text:span text:style-name="T262">BGP </text:span><text:span text:style-name="T254">選路順序：</text:span><text:span text:style-name="T194">Weight &gt; Local Pref &gt; </text:span><text:span text:style-name="T106">自己產生 </text:span><text:span text:style-name="T194">&gt; AS-PATH &gt; Origin &gt; MED &gt; eBGP &gt; IGP cost &gt; Router ID</text:span><text:span text:style-name="T106">。</text:span></text:p>
            <text:p text:style-name="P8"><text:span text:style-name="T262">BGP </text:span><text:span text:style-name="T254">本質：</text:span><text:span text:style-name="T106">政策導向（不是距離導向）；</text:span><text:span text:style-name="T194">Local Preference </text:span><text:span text:style-name="T106">才是最重要的「通用」屬性（</text:span><text:span text:style-name="T194">Weight </text:span><text:span text:style-name="T106">為 </text:span><text:span text:style-name="T194">Cisco </text:span><text:span text:style-name="T106">私有）。</text:span></text:p>
            <text:p text:style-name="P8"><text:span text:style-name="T254">三層分工：</text:span><text:span text:style-name="T106">防火牆→「能不能走」｜</text:span><text:span text:style-name="T194">NAT→</text:span><text:span text:style-name="T106">「你是誰」｜</text:span><text:span text:style-name="T194">BGP→</text:span><text:span text:style-name="T106">「怎麼走」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八、網路系統進階 </text:span><text:span text:style-name="T250">SDN / LB / CDN / 5G</text:span><text:span text:style-name="T251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62">SDN</text:span><text:span text:style-name="T254">：</text:span><text:span text:style-name="T106">「分平面、三層 </text:span><text:span text:style-name="T194">App-</text:span><text:span text:style-name="T106">控</text:span><text:span text:style-name="T194">-</text:span><text:span text:style-name="T106">基」＝控制／資料分離；</text:span><text:span text:style-name="T194">Application → Control → Infrastructure</text:span><text:span text:style-name="T106">。</text:span></text:p>
            <text:p text:style-name="P8"><text:span text:style-name="T262">Load Balancing</text:span><text:span text:style-name="T254">：</text:span><text:span text:style-name="T106">「</text:span><text:span text:style-name="T194">LB </text:span><text:span text:style-name="T106">輪、重、黏」＝</text:span><text:span text:style-name="T194">Round Robin</text:span><text:span text:style-name="T106">（輪流）／</text:span><text:span text:style-name="T194">Weighted RR</text:span><text:span text:style-name="T106">（加權）／</text:span><text:span text:style-name="T194">Stickiness</text:span><text:span text:style-name="T106">（同人同台）。</text:span></text:p>
            <text:p text:style-name="P8"><text:span text:style-name="T262">CDN</text:span><text:span text:style-name="T254">：</text:span><text:span text:style-name="T106">「網址轉轉轉（</text:span><text:span text:style-name="T194">CNAME</text:span><text:span text:style-name="T106">），資料找最近（</text:span><text:span text:style-name="T194">Edge</text:span><text:span text:style-name="T106">）」；</text:span><text:span text:style-name="T194">CNAME</text:span><text:span text:style-name="T106">＝網址→網址（非 </text:span><text:span text:style-name="T194">IP</text:span><text:span text:style-name="T106">）。</text:span></text:p>
            <text:p text:style-name="P8"><text:span text:style-name="T262">5G</text:span><text:span text:style-name="T254">：</text:span><text:span text:style-name="T106">「快、低、多、切」＝</text:span><text:span text:style-name="T194">eMBB</text:span><text:span text:style-name="T106">（高速）／</text:span><text:span text:style-name="T194">URLLC</text:span><text:span text:style-name="T106">（超低延遲）／</text:span><text:span text:style-name="T194">mMTC</text:span><text:span text:style-name="T106">（大量連線）／</text:span><text:span text:style-name="T194">Network Slicing</text:span><text:span text:style-name="T106">（切片）。</text:span></text:p>
            <text:p text:style-name="P8"><text:span text:style-name="T262">10 </text:span><text:span text:style-name="T254">秒總背：</text:span><text:span text:style-name="T194">SDN </text:span><text:span text:style-name="T106">分離三層、</text:span><text:span text:style-name="T194">LB </text:span><text:span text:style-name="T106">輪重黏、</text:span><text:span text:style-name="T194">CDN CNAME→</text:span><text:span text:style-name="T106">最近、</text:span><text:span text:style-name="T194">5G </text:span><text:span text:style-name="T106">快低多切、</text:span><text:span text:style-name="T194">WiFi </text:span><text:span text:style-name="T106">聽、</text:span><text:span text:style-name="T194">BT </text:span><text:span text:style-name="T106">跳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九、無線通訊 </text:span><text:span text:style-name="T250">WiFi vs Bluetooth</text:span><text:span text:style-name="T251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一句總綱：</text:span><text:span text:style-name="T106">「</text:span><text:span text:style-name="T194">WiFi </text:span><text:span text:style-name="T106">先聽再說（</text:span><text:span text:style-name="T194">CSMA/CA</text:span><text:span text:style-name="T106">），</text:span><text:span text:style-name="T194">Bluetooth </text:span><text:span text:style-name="T106">一直換頻道（</text:span><text:span text:style-name="T194">FHSS</text:span><text:span text:style-name="T106">）」。</text:span></text:p>
            <text:p text:style-name="P8"><text:span text:style-name="T254">本質對比：</text:span><text:span text:style-name="T194">WiFi</text:span><text:span text:style-name="T106">＝搶頻道（菜市場）；</text:span><text:span text:style-name="T194">BT</text:span><text:span text:style-name="T106">＝排班（會議室預約）；時槽＝時間格子；</text:span><text:span text:style-name="T194">SCO</text:span><text:span text:style-name="T106">＝語音；</text:span><text:span text:style-name="T194">L2CAP</text:span><text:span text:style-name="T106">＝三通道。</text:span></text:p>
            <text:p text:style-name="P8"><text:span text:style-name="T254">最大陷阱：</text:span><text:span text:style-name="T106">有線 </text:span><text:span text:style-name="T194">Ethernet</text:span><text:span text:style-name="T106">＝</text:span><text:span text:style-name="T194">CD</text:span><text:span text:style-name="T106">（</text:span><text:span text:style-name="T194">Detect </text:span><text:span text:style-name="T106">偵測）；無線 </text:span><text:span text:style-name="T194">WiFi</text:span><text:span text:style-name="T106">＝</text:span><text:span text:style-name="T194">CA</text:span><text:span text:style-name="T106">（</text:span><text:span text:style-name="T194">Avoid </text:span><text:span text:style-name="T106">避免）。</text:span></text:p>
            <text:p text:style-name="P8"><text:span text:style-name="T262">QoS</text:span><text:span text:style-name="T254">／語音：</text:span><text:span text:style-name="T194">WiFi QoS</text:span><text:span text:style-name="T106">＝</text:span><text:span text:style-name="T194">EDCA</text:span><text:span text:style-name="T106">（急診室分級）；藍牙即時語音＝</text:span><text:span text:style-name="T194">SCO</text:span><text:span text:style-name="T106">／</text:span><text:span text:style-name="T194">eSCO</text:span><text:span text:style-name="T106">；</text:span><text:span text:style-name="T194">L2CAP </text:span><text:span text:style-name="T106">位於 </text:span><text:span text:style-name="T194">Data </text:span><text:soft-page-break/><text:span text:style-name="T194">Link </text:span><text:span text:style-name="T106">層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設備萬用口訣：</text:span><text:span text:style-name="T194">FW </text:span><text:span text:style-name="T106">封外、</text:span><text:span text:style-name="T194">WAF </text:span><text:span text:style-name="T106">看內、</text:span><text:span text:style-name="T194">NGFW </text:span><text:span text:style-name="T106">最強、</text:span><text:span text:style-name="T194">DMZ </text:span><text:span text:style-name="T106">隔離、</text:span><text:span text:style-name="T194">IOC </text:span><text:span text:style-name="T106">壞人、</text:span><text:span text:style-name="T194">Proxy </text:span><text:span text:style-name="T106">幫客、</text:span><text:span text:style-name="T194">Reverse </text:span><text:span text:style-name="T106">幫服。</text:span></text:p>
            <text:p text:style-name="P8"><text:span text:style-name="T262">IOC </text:span><text:span text:style-name="T254">四線索：</text:span><text:span text:style-name="T106">網（</text:span><text:span text:style-name="T194">Domain</text:span><text:span text:style-name="T106">）→ 檔（</text:span><text:span text:style-name="T194">Hash</text:span><text:span text:style-name="T106">）→ 連（</text:span><text:span text:style-name="T194">IP</text:span><text:span text:style-name="T106">）→ 控（</text:span><text:span text:style-name="T194">C2</text:span><text:span text:style-name="T106">）。</text:span></text:p>
            <text:p text:style-name="P8"><text:span text:style-name="T254">封包闖關順序：</text:span><text:span text:style-name="T194">Client → Proxy → Internet → FW/NGFW → DMZ → WAF → Reverse Proxy → </text:span><text:span text:style-name="T106">內部 </text:span><text:span text:style-name="T194">Server</text:span><text:span text:style-name="T106">。</text:span></text:p>
            <text:p text:style-name="P8"><text:span text:style-name="T254">三防分工：</text:span><text:span text:style-name="T194">Firewall </text:span><text:span text:style-name="T106">擋入口、</text:span><text:span text:style-name="T194">IDS </text:span><text:span text:style-name="T106">只看、</text:span><text:span text:style-name="T194">IPS </text:span><text:span text:style-name="T106">看＋擋；</text:span><text:span text:style-name="T194">HIDS </text:span><text:span text:style-name="T106">看主機（</text:span><text:span text:style-name="T194">Log</text:span><text:span text:style-name="T106">）、</text:span><text:span text:style-name="T194">NIDS </text:span><text:span text:style-name="T106">看網路（封包）。</text:span></text:p>
            <text:p text:style-name="P8"><text:span text:style-name="T254">易混兩協定：</text:span><text:span text:style-name="T194">SNMP </text:span><text:span text:style-name="T106">管理設備（應用層／</text:span><text:span text:style-name="T194">UDP</text:span><text:span text:style-name="T106">）、</text:span><text:span text:style-name="T194">ICMP </text:span><text:span text:style-name="T106">診斷網路（網路層）。</text:span></text:p>
            <text:p text:style-name="P8"><text:span text:style-name="T262">SQL Injection</text:span><text:span text:style-name="T254">：</text:span><text:span text:style-name="T106">攻擊＝</text:span><text:span text:style-name="T194">' OR 1=1 --</text:span><text:span text:style-name="T106">；防禦核心＝</text:span><text:span text:style-name="T194">Prepared Statement</text:span><text:span text:style-name="T106">（預備語句）。</text:span></text:p>
            <text:p text:style-name="P8"><text:span text:style-name="T262">Zero-Day</text:span><text:span text:style-name="T254">：</text:span><text:span text:style-name="T106">最怕「沒有 </text:span><text:span text:style-name="T194">Signature</text:span><text:span text:style-name="T106">」；防禦＝</text:span><text:span text:style-name="T194">Patch </text:span><text:span text:style-name="T106">更新 ＋ </text:span><text:span text:style-name="T194">IDS/IPS </text:span><text:span text:style-name="T106">＋ 網路分段。</text:span></text:p>
            <text:p text:style-name="P8"><text:span text:style-name="T254">企業資安三階段：</text:span><text:span text:style-name="T106">事前預防 → 事中偵測 → 事後復原。</text:span><text:span text:style-name="T194">RTO</text:span><text:span text:style-name="T106">＝停機時間、</text:span><text:span text:style-name="T194">RPO</text:span><text:span text:style-name="T106">＝資料損失量。</text:span></text:p>
            <text:p text:style-name="P8"><text:span text:style-name="T262">EDR/MDR</text:span><text:span text:style-name="T254">：</text:span><text:span text:style-name="T194">EDR</text:span><text:span text:style-name="T106">＝自己買工具守、</text:span><text:span text:style-name="T194">MDR</text:span><text:span text:style-name="T106">＝請公司幫你守、</text:span><text:span text:style-name="T194">ATT&amp;CK</text:span><text:span text:style-name="T106">＝駭客招式教材、數位韌性＝撐住快速復原。</text:span></text:p>
            <text:p text:style-name="P8"><text:span text:style-name="T262">SSDLC</text:span><text:span text:style-name="T254">：</text:span><text:span text:style-name="T194">Define→Design→Develop→Test→Deploy→Maintain</text:span><text:span text:style-name="T106">，精神是「左移（</text:span><text:span text:style-name="T194">Shift Left</text:span><text:span text:style-name="T106">）」。</text:span></text:p>
            <text:p text:style-name="P8"><text:span text:style-name="T262">Zero Trust</text:span><text:span text:style-name="T254">：</text:span><text:span text:style-name="T106">永不信任，始終驗證；查「人（</text:span><text:span text:style-name="T194">Identity</text:span><text:span text:style-name="T106">）機（</text:span><text:span text:style-name="T194">Device</text:span><text:span text:style-name="T106">）境（</text:span><text:span text:style-name="T194">Context</text:span><text:span text:style-name="T106">）」；配 </text:span><text:span text:style-name="T194">MFA</text:span><text:span text:style-name="T106">＋最小權限＋微分段＋持續監控。</text:span></text:p>
          </table:table-cell>
        </table:table-row>
      </table:table>
      <text:h text:style-name="P11" text:outline-level="2" loext:marker-style-name="T27"><text:span text:style-name="T27">Part B</text:span><text:span text:style-name="T28">　必背表格精選（考前掃一遍）</text:span></text:h>
      <text:h text:style-name="P12" text:outline-level="3"><text:span text:style-name="T249">▍</text:span><text:span text:style-name="T250"> ① </text:span><text:span text:style-name="T251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26" loext:marker-style-name="T69"><text:span text:style-name="T70">前綴</text:span><text:span text:style-name="T69"/></text:p>
            </table:table-cell>
            <table:table-cell table:style-name="表格14.A1" office:value-type="string">
              <text:p text:style-name="P26" loext:marker-style-name="T69"><text:span text:style-name="T70">主機 </text:span><text:span text:style-name="T79">bit</text:span></text:p>
            </table:table-cell>
            <table:table-cell table:style-name="表格14.A1" office:value-type="string">
              <text:p text:style-name="P26" loext:marker-style-name="T69"><text:span text:style-name="T79">IP </text:span><text:span text:style-name="T70">總數</text:span></text:p>
            </table:table-cell>
            <table:table-cell table:style-name="表格14.A1" office:value-type="string">
              <text:p text:style-name="P26" loext:marker-style-name="T69"><text:span text:style-name="T70">可用主機</text:span><text:span text:style-name="T69"/></text:p>
            </table:table-cell>
            <table:table-cell table:style-name="表格14.A1" office:value-type="string">
              <text:p text:style-name="P26" loext:marker-style-name="T69"><text:span text:style-name="T70">區塊步長</text:span><text:span text:style-name="T69"/></text:p>
            </table:table-cell>
            <table:table-cell table:style-name="表格14.A1" office:value-type="string">
              <text:p text:style-name="P26" loext:marker-style-name="T69"><text:span text:style-name="T70">廣播尾數範例</text:span><text:span text:style-name="T69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9" loext:marker-style-name="T83"><text:span text:style-name="T182">/24</text:span><text:span text:style-name="T83"/></text:p>
          </table:table-cell>
          <table:table-cell table:style-name="表格14.A2" office:value-type="string">
            <text:p text:style-name="P28" loext:marker-style-name="T83"><text:span text:style-name="T182">8</text:span><text:span text:style-name="T83"/></text:p>
          </table:table-cell>
          <table:table-cell table:style-name="表格14.A2" office:value-type="string">
            <text:p text:style-name="P29" loext:marker-style-name="T83"><text:span text:style-name="T182">256</text:span><text:span text:style-name="T83"/></text:p>
          </table:table-cell>
          <table:table-cell table:style-name="表格14.A2" office:value-type="string">
            <text:p text:style-name="P28" loext:marker-style-name="T33"><text:span text:style-name="T41">254</text:span><text:span text:style-name="T33"/></text:p>
          </table:table-cell>
          <table:table-cell table:style-name="表格14.A2" office:value-type="string">
            <text:p text:style-name="P29" loext:marker-style-name="T83"><text:span text:style-name="T182">+256</text:span><text:span text:style-name="T83"/></text:p>
          </table:table-cell>
          <table:table-cell table:style-name="表格14.A2" office:value-type="string">
            <text:p text:style-name="P29" loext:marker-style-name="T83"><text:span text:style-name="T182">255</text:span><text:span text:style-name="T83"/></text:p>
          </table:table-cell>
        </table:table-row>
        <table:table-row table:style-name="表格14.1">
          <table:table-cell table:style-name="表格14.A3" office:value-type="string">
            <text:p text:style-name="P29" loext:marker-style-name="T83"><text:span text:style-name="T182">/25</text:span><text:span text:style-name="T83"/></text:p>
          </table:table-cell>
          <table:table-cell table:style-name="表格14.A3" office:value-type="string">
            <text:p text:style-name="P28" loext:marker-style-name="T83"><text:span text:style-name="T182">7</text:span><text:span text:style-name="T83"/></text:p>
          </table:table-cell>
          <table:table-cell table:style-name="表格14.A3" office:value-type="string">
            <text:p text:style-name="P29" loext:marker-style-name="T83"><text:span text:style-name="T182">128</text:span><text:span text:style-name="T83"/></text:p>
          </table:table-cell>
          <table:table-cell table:style-name="表格14.A3" office:value-type="string">
            <text:p text:style-name="P28" loext:marker-style-name="T33"><text:span text:style-name="T41">126</text:span><text:span text:style-name="T33"/></text:p>
          </table:table-cell>
          <table:table-cell table:style-name="表格14.A3" office:value-type="string">
            <text:p text:style-name="P29" loext:marker-style-name="T83"><text:span text:style-name="T182">+128</text:span><text:span text:style-name="T83"/></text:p>
          </table:table-cell>
          <table:table-cell table:style-name="表格14.A3" office:value-type="string">
            <text:p text:style-name="P29" loext:marker-style-name="T83"><text:span text:style-name="T182">127, 255</text:span><text:span text:style-name="T83"/></text:p>
          </table:table-cell>
        </table:table-row>
        <table:table-row table:style-name="表格14.1">
          <table:table-cell table:style-name="表格14.A2" office:value-type="string">
            <text:p text:style-name="P29" loext:marker-style-name="T83"><text:span text:style-name="T182">/26</text:span><text:span text:style-name="T83"/></text:p>
          </table:table-cell>
          <table:table-cell table:style-name="表格14.A2" office:value-type="string">
            <text:p text:style-name="P28" loext:marker-style-name="T83"><text:span text:style-name="T182">6</text:span><text:span text:style-name="T83"/></text:p>
          </table:table-cell>
          <table:table-cell table:style-name="表格14.A2" office:value-type="string">
            <text:p text:style-name="P29" loext:marker-style-name="T83"><text:span text:style-name="T182">64</text:span><text:span text:style-name="T83"/></text:p>
          </table:table-cell>
          <table:table-cell table:style-name="表格14.A2" office:value-type="string">
            <text:p text:style-name="P28" loext:marker-style-name="T33"><text:span text:style-name="T41">62</text:span><text:span text:style-name="T33"/></text:p>
          </table:table-cell>
          <table:table-cell table:style-name="表格14.A2" office:value-type="string">
            <text:p text:style-name="P29" loext:marker-style-name="T83"><text:span text:style-name="T182">+64</text:span><text:span text:style-name="T83"/></text:p>
          </table:table-cell>
          <table:table-cell table:style-name="表格14.A2" office:value-type="string">
            <text:p text:style-name="P29" loext:marker-style-name="T83"><text:span text:style-name="T182">63, 127, 191, 255</text:span><text:span text:style-name="T83"/></text:p>
          </table:table-cell>
        </table:table-row>
        <table:table-row table:style-name="表格14.1">
          <table:table-cell table:style-name="表格14.A3" office:value-type="string">
            <text:p text:style-name="P29" loext:marker-style-name="T83"><text:span text:style-name="T182">/27</text:span><text:span text:style-name="T83"/></text:p>
          </table:table-cell>
          <table:table-cell table:style-name="表格14.A3" office:value-type="string">
            <text:p text:style-name="P28" loext:marker-style-name="T83"><text:span text:style-name="T182">5</text:span><text:span text:style-name="T83"/></text:p>
          </table:table-cell>
          <table:table-cell table:style-name="表格14.A3" office:value-type="string">
            <text:p text:style-name="P29" loext:marker-style-name="T83"><text:span text:style-name="T182">32</text:span><text:span text:style-name="T83"/></text:p>
          </table:table-cell>
          <table:table-cell table:style-name="表格14.A3" office:value-type="string">
            <text:p text:style-name="P28" loext:marker-style-name="T33"><text:span text:style-name="T41">30</text:span><text:span text:style-name="T33"/></text:p>
          </table:table-cell>
          <table:table-cell table:style-name="表格14.A3" office:value-type="string">
            <text:p text:style-name="P29" loext:marker-style-name="T83"><text:span text:style-name="T182">+32</text:span><text:span text:style-name="T83"/></text:p>
          </table:table-cell>
          <table:table-cell table:style-name="表格14.A3" office:value-type="string">
            <text:p text:style-name="P29" loext:marker-style-name="T83"><text:span text:style-name="T182">31, 63, 95 …</text:span><text:span text:style-name="T83"/></text:p>
          </table:table-cell>
        </table:table-row>
        <table:table-row table:style-name="表格14.1">
          <table:table-cell table:style-name="表格14.A2" office:value-type="string">
            <text:p text:style-name="P29" loext:marker-style-name="T83"><text:span text:style-name="T182">/28</text:span><text:span text:style-name="T83"/></text:p>
          </table:table-cell>
          <table:table-cell table:style-name="表格14.A2" office:value-type="string">
            <text:p text:style-name="P28" loext:marker-style-name="T83"><text:span text:style-name="T182">4</text:span><text:span text:style-name="T83"/></text:p>
          </table:table-cell>
          <table:table-cell table:style-name="表格14.A2" office:value-type="string">
            <text:p text:style-name="P29" loext:marker-style-name="T83"><text:span text:style-name="T182">16</text:span><text:span text:style-name="T83"/></text:p>
          </table:table-cell>
          <table:table-cell table:style-name="表格14.A2" office:value-type="string">
            <text:p text:style-name="P28" loext:marker-style-name="T33"><text:span text:style-name="T41">14</text:span><text:span text:style-name="T33"/></text:p>
          </table:table-cell>
          <table:table-cell table:style-name="表格14.A2" office:value-type="string">
            <text:p text:style-name="P29" loext:marker-style-name="T83"><text:span text:style-name="T182">+16</text:span><text:span text:style-name="T83"/></text:p>
          </table:table-cell>
          <table:table-cell table:style-name="表格14.A2" office:value-type="string">
            <text:p text:style-name="P29" loext:marker-style-name="T83"><text:span text:style-name="T182">15, 31, 47 …</text:span><text:span text:style-name="T83"/></text:p>
          </table:table-cell>
        </table:table-row>
        <table:table-row table:style-name="表格14.1">
          <table:table-cell table:style-name="表格14.A3" office:value-type="string">
            <text:p text:style-name="P29" loext:marker-style-name="T83"><text:span text:style-name="T182">/29</text:span><text:span text:style-name="T83"/></text:p>
          </table:table-cell>
          <table:table-cell table:style-name="表格14.A3" office:value-type="string">
            <text:p text:style-name="P28" loext:marker-style-name="T83"><text:span text:style-name="T182">3</text:span><text:span text:style-name="T83"/></text:p>
          </table:table-cell>
          <table:table-cell table:style-name="表格14.A3" office:value-type="string">
            <text:p text:style-name="P29" loext:marker-style-name="T83"><text:span text:style-name="T182">8</text:span><text:span text:style-name="T83"/></text:p>
          </table:table-cell>
          <table:table-cell table:style-name="表格14.A3" office:value-type="string">
            <text:p text:style-name="P28" loext:marker-style-name="T33"><text:span text:style-name="T41">6</text:span><text:span text:style-name="T33"/></text:p>
          </table:table-cell>
          <table:table-cell table:style-name="表格14.A3" office:value-type="string">
            <text:p text:style-name="P29" loext:marker-style-name="T83"><text:span text:style-name="T182">+8</text:span><text:span text:style-name="T83"/></text:p>
          </table:table-cell>
          <table:table-cell table:style-name="表格14.A3" office:value-type="string">
            <text:p text:style-name="P29" loext:marker-style-name="T83"><text:span text:style-name="T182">7, 15, 23 …</text:span><text:span text:style-name="T83"/></text:p>
          </table:table-cell>
        </table:table-row>
        <table:table-row table:style-name="表格14.1">
          <table:table-cell table:style-name="表格14.A2" office:value-type="string">
            <text:p text:style-name="P29" loext:marker-style-name="T83"><text:span text:style-name="T182">/30</text:span><text:span text:style-name="T83"/></text:p>
          </table:table-cell>
          <table:table-cell table:style-name="表格14.A2" office:value-type="string">
            <text:p text:style-name="P28" loext:marker-style-name="T83"><text:span text:style-name="T182">2</text:span><text:span text:style-name="T83"/></text:p>
          </table:table-cell>
          <table:table-cell table:style-name="表格14.A2" office:value-type="string">
            <text:p text:style-name="P29" loext:marker-style-name="T83"><text:span text:style-name="T182">4</text:span><text:span text:style-name="T83"/></text:p>
          </table:table-cell>
          <table:table-cell table:style-name="表格14.A2" office:value-type="string">
            <text:p text:style-name="P28" loext:marker-style-name="T33"><text:span text:style-name="T41">2</text:span><text:span text:style-name="T33"/></text:p>
          </table:table-cell>
          <table:table-cell table:style-name="表格14.A2" office:value-type="string">
            <text:p text:style-name="P29" loext:marker-style-name="T83"><text:span text:style-name="T182">+4</text:span><text:span text:style-name="T83"/></text:p>
          </table:table-cell>
          <table:table-cell table:style-name="表格14.A2" office:value-type="string">
            <text:p text:style-name="P29" loext:marker-style-name="T83"><text:span text:style-name="T182">3, 7, 11 …</text:span><text:span text:style-name="T83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7"><text:span text:style-name="T265">例外 </text:span><text:span text:style-name="T270">/31</text:span><text:span text:style-name="T265">：</text:span><text:span text:style-name="T106">點對點連線（</text:span><text:span text:style-name="T194">RFC 3021</text:span><text:span text:style-name="T106">），</text:span><text:span text:style-name="T194">2 </text:span><text:span text:style-name="T106">個 </text:span><text:span text:style-name="T194">IP </text:span><text:span text:style-name="T106">全部可用，無網路位址與廣播位址。</text:span><text:span text:style-name="T194">/32 </text:span><text:span text:style-name="T106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② TCP vs UDP</text:span><text:span text:style-name="T251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4" loext:marker-style-name="T73"><text:span text:style-name="T74">比較項目</text:span><text:span text:style-name="T73"/></text:p>
            </table:table-cell>
            <table:table-cell table:style-name="表格15.A1" office:value-type="string">
              <text:p text:style-name="P4" loext:marker-style-name="T73"><text:span text:style-name="T80">TCP</text:span><text:span text:style-name="T74">（穩定）</text:span></text:p>
            </table:table-cell>
            <table:table-cell table:style-name="表格15.A1" office:value-type="string">
              <text:p text:style-name="P4" loext:marker-style-name="T73"><text:span text:style-name="T80">UDP</text:span><text:span text:style-name="T74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9" loext:marker-style-name="T142"><text:span text:style-name="T143">連線方式</text:span><text:span text:style-name="T142"/></text:p>
          </table:table-cell>
          <table:table-cell table:style-name="表格15.A2" office:value-type="string">
            <text:p text:style-name="P29" loext:marker-style-name="T142"><text:span text:style-name="T143">三次握手才開始</text:span><text:span text:style-name="T142"/></text:p>
          </table:table-cell>
          <table:table-cell table:style-name="表格15.A2" office:value-type="string">
            <text:p text:style-name="P29" loext:marker-style-name="T142"><text:span text:style-name="T143">無連線，直接送</text:span><text:span text:style-name="T142"/></text:p>
          </table:table-cell>
        </table:table-row>
        <table:table-row table:style-name="表格15.1">
          <table:table-cell table:style-name="表格15.A3" office:value-type="string">
            <text:p text:style-name="P29" loext:marker-style-name="T142"><text:span text:style-name="T143">可靠性</text:span><text:span text:style-name="T142"/></text:p>
          </table:table-cell>
          <table:table-cell table:style-name="表格15.A3" office:value-type="string">
            <text:p text:style-name="P29" loext:marker-style-name="T142"><text:span text:style-name="T143">保證送達、會重傳</text:span><text:span text:style-name="T142"/></text:p>
          </table:table-cell>
          <table:table-cell table:style-name="表格15.A3" office:value-type="string">
            <text:p text:style-name="P29" loext:marker-style-name="T142"><text:span text:style-name="T143">不保證、不重傳</text:span><text:span text:style-name="T142"/></text:p>
          </table:table-cell>
        </table:table-row>
        <table:table-row table:style-name="表格15.1">
          <table:table-cell table:style-name="表格15.A2" office:value-type="string">
            <text:p text:style-name="P29" loext:marker-style-name="T142"><text:span text:style-name="T143">順序</text:span><text:span text:style-name="T142"/></text:p>
          </table:table-cell>
          <table:table-cell table:style-name="表格15.A2" office:value-type="string">
            <text:p text:style-name="P29" loext:marker-style-name="T142"><text:span text:style-name="T143">保證順序</text:span><text:span text:style-name="T142"/></text:p>
          </table:table-cell>
          <table:table-cell table:style-name="表格15.A2" office:value-type="string">
            <text:p text:style-name="P29" loext:marker-style-name="T142"><text:span text:style-name="T143">不保證順序</text:span><text:span text:style-name="T142"/></text:p>
          </table:table-cell>
        </table:table-row>
        <table:table-row table:style-name="表格15.1">
          <table:table-cell table:style-name="表格15.A3" office:value-type="string">
            <text:p text:style-name="P29" loext:marker-style-name="T142"><text:span text:style-name="T143">速度</text:span><text:span text:style-name="T142"/></text:p>
          </table:table-cell>
          <table:table-cell table:style-name="表格15.A3" office:value-type="string">
            <text:p text:style-name="P29" loext:marker-style-name="T142"><text:span text:style-name="T143">較慢（有控制機制）</text:span><text:span text:style-name="T142"/></text:p>
          </table:table-cell>
          <table:table-cell table:style-name="表格15.A3" office:value-type="string">
            <text:p text:style-name="P29" loext:marker-style-name="T142"><text:span text:style-name="T143">較快（無額外開銷）</text:span><text:span text:style-name="T142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9" loext:marker-style-name="T142"><text:span text:style-name="T143">適用</text:span><text:span text:style-name="T142"/></text:p>
          </table:table-cell>
          <table:table-cell table:style-name="表格15.A2" office:value-type="string">
            <text:p text:style-name="P29" loext:marker-style-name="T142"><text:span text:style-name="T143">網頁、</text:span><text:span text:style-name="T226">Email</text:span><text:span text:style-name="T143">、</text:span><text:span text:style-name="T226">FTP</text:span><text:span text:style-name="T143">、檔案</text:span></text:p>
          </table:table-cell>
          <table:table-cell table:style-name="表格15.A2" office:value-type="string">
            <text:p text:style-name="P29" loext:marker-style-name="T142"><text:span text:style-name="T143">串流、遊戲、</text:span><text:span text:style-name="T226">VoIP</text:span><text:span text:style-name="T143">、</text:span><text:span text:style-name="T226">DNS</text:span></text:p>
          </table:table-cell>
        </table:table-row>
        <table:table-row table:style-name="表格15.1">
          <table:table-cell table:style-name="表格15.A3" office:value-type="string">
            <text:p text:style-name="P29" loext:marker-style-name="T142"><text:span text:style-name="T143">一句話</text:span><text:span text:style-name="T142"/></text:p>
          </table:table-cell>
          <table:table-cell table:style-name="表格15.A3" office:value-type="string">
            <text:p text:style-name="P29" loext:marker-style-name="T257"><text:span text:style-name="T258">「穩定優先」</text:span><text:span text:style-name="T257"/></text:p>
          </table:table-cell>
          <table:table-cell table:style-name="表格15.A3" office:value-type="string">
            <text:p text:style-name="P29" loext:marker-style-name="T35"><text:span text:style-name="T36">「速度優先」</text:span><text:span text:style-name="T35"/></text:p>
          </table:table-cell>
        </table:table-row>
      </table:table>
      <text:h text:style-name="P12" text:outline-level="3"><text:span text:style-name="T249">▍</text:span><text:span text:style-name="T250"> ③ IPv4 vs IPv6 </text:span><text:span text:style-name="T251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4" loext:marker-style-name="T69"><text:span text:style-name="T70">比較項目</text:span><text:span text:style-name="T69"/></text:p>
            </table:table-cell>
            <table:table-cell table:style-name="表格16.A1" office:value-type="string">
              <text:p text:style-name="P4" loext:marker-style-name="T69"><text:span text:style-name="T79">✗ IPv4 </text:span><text:span text:style-name="T70">問題</text:span></text:p>
            </table:table-cell>
            <table:table-cell table:style-name="表格16.A1" office:value-type="string">
              <text:p text:style-name="P4" loext:marker-style-name="T69"><text:span text:style-name="T79">✓ IPv6 </text:span><text:span text:style-name="T70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9" loext:marker-style-name="T83"><text:span text:style-name="T84">位址長度</text:span><text:span text:style-name="T83"/></text:p>
          </table:table-cell>
          <table:table-cell table:style-name="表格16.A2" office:value-type="string">
            <text:p text:style-name="P29" loext:marker-style-name="T83"><text:span text:style-name="T182">32 bit</text:span><text:span text:style-name="T84">，約 </text:span><text:span text:style-name="T182">43 </text:span><text:span text:style-name="T84">億個，已不足</text:span></text:p>
          </table:table-cell>
          <table:table-cell table:style-name="表格16.A2" office:value-type="string">
            <text:p text:style-name="P29" loext:marker-style-name="T83"><text:span text:style-name="T182">128 bit</text:span><text:span text:style-name="T84">，約 </text:span><text:span text:style-name="T182">3.4×10³⁸</text:span><text:span text:style-name="T84">，近乎無限</text:span></text:p>
          </table:table-cell>
        </table:table-row>
        <table:table-row table:style-name="表格16.1">
          <table:table-cell table:style-name="表格16.A3" office:value-type="string">
            <text:p text:style-name="P29" loext:marker-style-name="T83"><text:span text:style-name="T182">NAT</text:span><text:span text:style-name="T83"/></text:p>
          </table:table-cell>
          <table:table-cell table:style-name="表格16.A3" office:value-type="string">
            <text:p text:style-name="P29" loext:marker-style-name="T83"><text:span text:style-name="T84">需 </text:span><text:span text:style-name="T182">NAT </text:span><text:span text:style-name="T84">共用 </text:span><text:span text:style-name="T182">IP</text:span><text:span text:style-name="T84">，破壞 </text:span><text:span text:style-name="T182">E2E</text:span></text:p>
          </table:table-cell>
          <table:table-cell table:style-name="表格16.A3" office:value-type="string">
            <text:p text:style-name="P29" loext:marker-style-name="T83"><text:span text:style-name="T84">每裝置獨立公開 </text:span><text:span text:style-name="T182">IP</text:span><text:span text:style-name="T84">，恢復 </text:span><text:span text:style-name="T182">E2E</text:span></text:p>
          </table:table-cell>
        </table:table-row>
        <table:table-row table:style-name="表格16.1">
          <table:table-cell table:style-name="表格16.A2" office:value-type="string">
            <text:p text:style-name="P29" loext:marker-style-name="T83"><text:span text:style-name="T84">安全性</text:span><text:span text:style-name="T83"/></text:p>
          </table:table-cell>
          <table:table-cell table:style-name="表格16.A2" office:value-type="string">
            <text:p text:style-name="P29" loext:marker-style-name="T83"><text:span text:style-name="T84">無內建加密／驗證</text:span><text:span text:style-name="T83"/></text:p>
          </table:table-cell>
          <table:table-cell table:style-name="表格16.A2" office:value-type="string">
            <text:p text:style-name="P29" loext:marker-style-name="T83"><text:span text:style-name="T84">支援 </text:span><text:span text:style-name="T182">IPsec</text:span><text:span text:style-name="T84">（</text:span><text:span text:style-name="T182">RFC 6434 </text:span><text:span text:style-name="T84">後改建議）</text:span></text:p>
          </table:table-cell>
        </table:table-row>
        <table:table-row table:style-name="表格16.1">
          <table:table-cell table:style-name="表格16.A3" office:value-type="string">
            <text:p text:style-name="P29" loext:marker-style-name="T83"><text:span text:style-name="T182">Header</text:span><text:span text:style-name="T83"/></text:p>
          </table:table-cell>
          <table:table-cell table:style-name="表格16.A3" office:value-type="string">
            <text:p text:style-name="P29" loext:marker-style-name="T83"><text:span text:style-name="T84">可變長度含 </text:span><text:span text:style-name="T182">Options</text:span><text:span text:style-name="T84">，效率低</text:span></text:p>
          </table:table-cell>
          <table:table-cell table:style-name="表格16.A3" office:value-type="string">
            <text:p text:style-name="P29" loext:marker-style-name="T83"><text:span text:style-name="T84">固定 </text:span><text:span text:style-name="T182">40 bytes</text:span><text:span text:style-name="T84">，轉送更快</text:span></text:p>
          </table:table-cell>
        </table:table-row>
        <table:table-row table:style-name="表格16.1">
          <table:table-cell table:style-name="表格16.A2" office:value-type="string">
            <text:p text:style-name="P29" loext:marker-style-name="T83"><text:span text:style-name="T182">QoS</text:span><text:span text:style-name="T83"/></text:p>
          </table:table-cell>
          <table:table-cell table:style-name="表格16.A2" office:value-type="string">
            <text:p text:style-name="P29" loext:marker-style-name="T83"><text:span text:style-name="T84">無法標記優先權</text:span><text:span text:style-name="T83"/></text:p>
          </table:table-cell>
          <table:table-cell table:style-name="表格16.A2" office:value-type="string">
            <text:p text:style-name="P29" loext:marker-style-name="T83"><text:span text:style-name="T182">Flow Label </text:span><text:span text:style-name="T84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9" loext:marker-style-name="T83"><text:span text:style-name="T84">廣播</text:span><text:span text:style-name="T83"/></text:p>
          </table:table-cell>
          <table:table-cell table:style-name="表格16.A3" office:value-type="string">
            <text:p text:style-name="P29" loext:marker-style-name="T83"><text:span text:style-name="T182">Broadcast </text:span><text:span text:style-name="T84">發給所有人</text:span></text:p>
          </table:table-cell>
          <table:table-cell table:style-name="表格16.A3" office:value-type="string">
            <text:p text:style-name="P29" loext:marker-style-name="T83"><text:span text:style-name="T84">改用 </text:span><text:span text:style-name="T182">Multicast</text:span><text:span text:style-name="T84">／</text:span><text:span text:style-name="T182">Anycast</text:span></text:p>
          </table:table-cell>
        </table:table-row>
        <table:table-row table:style-name="表格16.1">
          <table:table-cell table:style-name="表格16.A2" office:value-type="string">
            <text:p text:style-name="P29" loext:marker-style-name="T83"><text:span text:style-name="T182">IP </text:span><text:span text:style-name="T84">配置</text:span></text:p>
          </table:table-cell>
          <table:table-cell table:style-name="表格16.A2" office:value-type="string">
            <text:p text:style-name="P29" loext:marker-style-name="T83"><text:span text:style-name="T84">手動或 </text:span><text:span text:style-name="T182">DHCP</text:span><text:span text:style-name="T84">，繁瑣</text:span></text:p>
          </table:table-cell>
          <table:table-cell table:style-name="表格16.A2" office:value-type="string">
            <text:p text:style-name="P29" loext:marker-style-name="T83"><text:span text:style-name="T182">SLAAC </text:span><text:span text:style-name="T84">無狀態自動配置</text:span></text:p>
          </table:table-cell>
        </table:table-row>
      </table:table>
      <text:h text:style-name="P12" text:outline-level="3"><text:span text:style-name="T249">▍</text:span><text:span text:style-name="T250"> ④ TCP </text:span><text:span text:style-name="T251">丟包處理（第五篇 </text:span><text:span text:style-name="T250">· </text:span><text:span text:style-name="T251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4" loext:marker-style-name="T69"><text:span text:style-name="T70">丟包偵測</text:span><text:span text:style-name="T69"/></text:p>
            </table:table-cell>
            <table:table-cell table:style-name="表格17.A1" office:value-type="string">
              <text:p text:style-name="P4" loext:marker-style-name="T69"><text:span text:style-name="T70">代表意義</text:span><text:span text:style-name="T69"/></text:p>
            </table:table-cell>
            <table:table-cell table:style-name="表格17.A1" office:value-type="string">
              <text:p text:style-name="P4" loext:marker-style-name="T69"><text:span text:style-name="T79">ssthresh</text:span><text:span text:style-name="T69"/></text:p>
            </table:table-cell>
            <table:table-cell table:style-name="表格17.A1" office:value-type="string">
              <text:p text:style-name="P4" loext:marker-style-name="T69"><text:span text:style-name="T79">cwnd</text:span><text:span text:style-name="T69"/></text:p>
            </table:table-cell>
            <table:table-cell table:style-name="表格17.A1" office:value-type="string">
              <text:p text:style-name="P4" loext:marker-style-name="T69"><text:span text:style-name="T70">下一階段</text:span><text:span text:style-name="T69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9" loext:marker-style-name="T83"><text:span text:style-name="T182">Timeout</text:span><text:span text:style-name="T84">（逾時）</text:span></text:p>
          </table:table-cell>
          <table:table-cell table:style-name="表格17.A2" office:value-type="string">
            <text:p text:style-name="P29" loext:marker-style-name="T83"><text:span text:style-name="T84">網路嚴重擁塞</text:span><text:span text:style-name="T83"/></text:p>
          </table:table-cell>
          <table:table-cell table:style-name="表格17.A2" office:value-type="string">
            <text:p text:style-name="P29" loext:marker-style-name="T83"><text:span text:style-name="T182">= cwnd / 2</text:span><text:span text:style-name="T83"/></text:p>
          </table:table-cell>
          <table:table-cell table:style-name="表格17.A2" office:value-type="string">
            <text:p text:style-name="P29" loext:marker-style-name="T274"><text:span text:style-name="T275">重設為 </text:span><text:span text:style-name="T282">1</text:span></text:p>
          </table:table-cell>
          <table:table-cell table:style-name="表格17.A2" office:value-type="string">
            <text:p text:style-name="P29" loext:marker-style-name="T83"><text:span text:style-name="T84">重回 </text:span><text:span text:style-name="T182">Slow Start</text:span></text:p>
          </table:table-cell>
        </table:table-row>
        <table:table-row table:style-name="表格17.1">
          <table:table-cell table:style-name="表格17.A3" office:value-type="string">
            <text:p text:style-name="P29" loext:marker-style-name="T83"><text:span text:style-name="T182">3 </text:span><text:span text:style-name="T84">個重複 </text:span><text:span text:style-name="T182">ACK</text:span></text:p>
          </table:table-cell>
          <table:table-cell table:style-name="表格17.A3" office:value-type="string">
            <text:p text:style-name="P29" loext:marker-style-name="T83"><text:span text:style-name="T84">單一封包遺失</text:span><text:span text:style-name="T83"/></text:p>
          </table:table-cell>
          <table:table-cell table:style-name="表格17.A3" office:value-type="string">
            <text:p text:style-name="P29" loext:marker-style-name="T83"><text:span text:style-name="T182">= cwnd / 2</text:span><text:span text:style-name="T83"/></text:p>
          </table:table-cell>
          <table:table-cell table:style-name="表格17.A3" office:value-type="string">
            <text:p text:style-name="P29" loext:marker-style-name="T33"><text:span text:style-name="T41">= ssthresh</text:span><text:span text:style-name="T34">（減半）</text:span></text:p>
          </table:table-cell>
          <table:table-cell table:style-name="表格17.A3" office:value-type="string">
            <text:p text:style-name="P29" loext:marker-style-name="T83"><text:span text:style-name="T84">續 </text:span><text:span text:style-name="T182">Congestion Avoidance</text:span></text:p>
          </table:table-cell>
        </table:table-row>
      </table:table>
      <text:h text:style-name="P12" text:outline-level="3"><text:span text:style-name="T249">▍</text:span><text:span text:style-name="T250"> ⑤ BGP </text:span><text:span text:style-name="T251">選路九步（前面贏就停 </text:span><text:span text:style-name="T250">· </text:span><text:span text:style-name="T251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6" loext:marker-style-name="T69"><text:span text:style-name="T70">順序</text:span><text:span text:style-name="T69"/></text:p>
            </table:table-cell>
            <table:table-cell table:style-name="表格18.A1" office:value-type="string">
              <text:p text:style-name="P26" loext:marker-style-name="T69"><text:span text:style-name="T70">屬性</text:span><text:span text:style-name="T69"/></text:p>
            </table:table-cell>
            <table:table-cell table:style-name="表格18.A1" office:value-type="string">
              <text:p text:style-name="P26" loext:marker-style-name="T69"><text:span text:style-name="T70">規則／備註</text:span><text:span text:style-name="T69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8" loext:marker-style-name="T83"><text:span text:style-name="T182">①</text:span><text:span text:style-name="T83"/></text:p>
          </table:table-cell>
          <table:table-cell table:style-name="表格18.A2" office:value-type="string">
            <text:p text:style-name="P29" loext:marker-style-name="T83"><text:span text:style-name="T182">Weight</text:span><text:span text:style-name="T83"/></text:p>
          </table:table-cell>
          <table:table-cell table:style-name="表格18.A2" office:value-type="string">
            <text:p text:style-name="P29" loext:marker-style-name="T83"><text:span text:style-name="T84">數值越高越優先 ⚠️ </text:span><text:span text:style-name="T182">Cisco </text:span><text:span text:style-name="T84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3"><text:span text:style-name="T182">②</text:span><text:span text:style-name="T83"/></text:p>
          </table:table-cell>
          <table:table-cell table:style-name="表格18.A3" office:value-type="string">
            <text:p text:style-name="P29" loext:marker-style-name="T33"><text:span text:style-name="T41">Local Preference</text:span><text:span text:style-name="T33"/></text:p>
          </table:table-cell>
          <table:table-cell table:style-name="表格18.A3" office:value-type="string">
            <text:p text:style-name="P29" loext:marker-style-name="T33"><text:span text:style-name="T34">數值越高越優先 ✅ 最重要的「通用」屬性</text:span><text:span text:style-name="T33"/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3"><text:span text:style-name="T182">③</text:span><text:span text:style-name="T83"/></text:p>
          </table:table-cell>
          <table:table-cell table:style-name="表格18.A2" office:value-type="string">
            <text:p text:style-name="P29" loext:marker-style-name="T83"><text:span text:style-name="T84">本地產生</text:span><text:span text:style-name="T83"/></text:p>
          </table:table-cell>
          <table:table-cell table:style-name="表格18.A2" office:value-type="string">
            <text:p text:style-name="P29" loext:marker-style-name="T83"><text:span text:style-name="T182">network / aggregate </text:span><text:span text:style-name="T84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3"><text:span text:style-name="T182">④</text:span><text:span text:style-name="T83"/></text:p>
          </table:table-cell>
          <table:table-cell table:style-name="表格18.A3" office:value-type="string">
            <text:p text:style-name="P29" loext:marker-style-name="T83"><text:span text:style-name="T182">AS-PATH</text:span><text:span text:style-name="T83"/></text:p>
          </table:table-cell>
          <table:table-cell table:style-name="表格18.A3" office:value-type="string">
            <text:p text:style-name="P29" loext:marker-style-name="T83"><text:span text:style-name="T84">路徑越短（經過 </text:span><text:span text:style-name="T182">AS </text:span><text:span text:style-name="T84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3"><text:span text:style-name="T182">⑤</text:span><text:span text:style-name="T83"/></text:p>
          </table:table-cell>
          <table:table-cell table:style-name="表格18.A2" office:value-type="string">
            <text:p text:style-name="P29" loext:marker-style-name="T83"><text:span text:style-name="T182">Origin</text:span><text:span text:style-name="T83"/></text:p>
          </table:table-cell>
          <table:table-cell table:style-name="表格18.A2" office:value-type="string">
            <text:p text:style-name="P29" loext:marker-style-name="T83"><text:span text:style-name="T182">IGP &gt; EGP &gt; Incomplete</text:span><text:span text:style-name="T83"/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3"><text:span text:style-name="T182">⑥</text:span><text:span text:style-name="T83"/></text:p>
          </table:table-cell>
          <table:table-cell table:style-name="表格18.A3" office:value-type="string">
            <text:p text:style-name="P29" loext:marker-style-name="T83"><text:span text:style-name="T182">MED</text:span><text:span text:style-name="T83"/></text:p>
          </table:table-cell>
          <table:table-cell table:style-name="表格18.A3" office:value-type="string">
            <text:p text:style-name="P29" loext:marker-style-name="T83"><text:span text:style-name="T84">數值越小越優先（只比同一 </text:span><text:span text:style-name="T182">AS </text:span><text:span text:style-name="T84">來的路由）</text:span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3"><text:span text:style-name="T182">⑦</text:span><text:span text:style-name="T83"/></text:p>
          </table:table-cell>
          <table:table-cell table:style-name="表格18.A2" office:value-type="string">
            <text:p text:style-name="P29" loext:marker-style-name="T83"><text:span text:style-name="T182">eBGP vs iBGP</text:span><text:span text:style-name="T83"/></text:p>
          </table:table-cell>
          <table:table-cell table:style-name="表格18.A2" office:value-type="string">
            <text:p text:style-name="P29" loext:marker-style-name="T83"><text:span text:style-name="T182">eBGP </text:span><text:span text:style-name="T84">優先於 </text:span><text:span text:style-name="T182">iBGP</text:span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3"><text:span text:style-name="T182">⑧</text:span><text:span text:style-name="T83"/></text:p>
          </table:table-cell>
          <table:table-cell table:style-name="表格18.A3" office:value-type="string">
            <text:p text:style-name="P29" loext:marker-style-name="T83"><text:span text:style-name="T182">IGP cost</text:span><text:span text:style-name="T83"/></text:p>
          </table:table-cell>
          <table:table-cell table:style-name="表格18.A3" office:value-type="string">
            <text:p text:style-name="P29" loext:marker-style-name="T83"><text:span text:style-name="T84">到 </text:span><text:span text:style-name="T182">next-hop </text:span><text:span text:style-name="T84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3"><text:span text:style-name="T182">⑨</text:span><text:span text:style-name="T83"/></text:p>
          </table:table-cell>
          <table:table-cell table:style-name="表格18.A2" office:value-type="string">
            <text:p text:style-name="P29" loext:marker-style-name="T83"><text:span text:style-name="T182">Router ID</text:span><text:span text:style-name="T83"/></text:p>
          </table:table-cell>
          <table:table-cell table:style-name="表格18.A2" office:value-type="string">
            <text:p text:style-name="P29" loext:marker-style-name="T83"><text:span text:style-name="T182">Router ID </text:span><text:span text:style-name="T84">最小者優先（最後決勝點）</text:span></text:p>
          </table:table-cell>
        </table:table-row>
      </table:table>
      <text:h text:style-name="P12" text:outline-level="3"><text:span text:style-name="T249">▍</text:span><text:span text:style-name="T250"> ⑥ OSPF </text:span><text:span text:style-name="T251">四種 </text:span><text:span text:style-name="T250">Router</text:span><text:span text:style-name="T251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4" loext:marker-style-name="T69"><text:span text:style-name="T70">類型</text:span><text:span text:style-name="T69"/></text:p>
            </table:table-cell>
            <table:table-cell table:style-name="表格19.A1" office:value-type="string">
              <text:p text:style-name="P4" loext:marker-style-name="T69"><text:span text:style-name="T70">本質</text:span><text:span text:style-name="T69"/></text:p>
            </table:table-cell>
            <table:table-cell table:style-name="表格19.A1" office:value-type="string">
              <text:p text:style-name="P4" loext:marker-style-name="T69"><text:span text:style-name="T70">核心記憶點</text:span><text:span text:style-name="T69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9" loext:marker-style-name="T83"><text:span text:style-name="T182">Internal</text:span><text:span text:style-name="T83"/></text:p>
          </table:table-cell>
          <table:table-cell table:style-name="表格19.A2" office:value-type="string">
            <text:p text:style-name="P29" loext:marker-style-name="T83"><text:span text:style-name="T84">不出 </text:span><text:span text:style-name="T182">Area</text:span></text:p>
          </table:table-cell>
          <table:table-cell table:style-name="表格19.A2" office:value-type="string">
            <text:p text:style-name="P29" loext:marker-style-name="T83"><text:span text:style-name="T84">只負責自己這一區，對外一無所知</text:span><text:span text:style-name="T83"/></text:p>
          </table:table-cell>
        </table:table-row>
        <table:table-row table:style-name="表格19.1">
          <table:table-cell table:style-name="表格19.A3" office:value-type="string">
            <text:p text:style-name="P29" loext:marker-style-name="T83"><text:span text:style-name="T182">Backbone</text:span><text:span text:style-name="T83"/></text:p>
          </table:table-cell>
          <table:table-cell table:style-name="表格19.A3" office:value-type="string">
            <text:p text:style-name="P29" loext:marker-style-name="T83"><text:span text:style-name="T84">在 </text:span><text:span text:style-name="T182">Area 0</text:span></text:p>
          </table:table-cell>
          <table:table-cell table:style-name="表格19.A3" office:value-type="string">
            <text:p text:style-name="P29" loext:marker-style-name="T83"><text:span text:style-name="T84">城市主幹道節點，跨區流量必經</text:span><text:span text:style-name="T83"/></text:p>
          </table:table-cell>
        </table:table-row>
        <table:table-row table:style-name="表格19.1">
          <table:table-cell table:style-name="表格19.A2" office:value-type="string">
            <text:p text:style-name="P29" loext:marker-style-name="T83"><text:span text:style-name="T182">ABR</text:span><text:span text:style-name="T83"/></text:p>
          </table:table-cell>
          <table:table-cell table:style-name="表格19.A2" office:value-type="string">
            <text:p text:style-name="P29" loext:marker-style-name="T83"><text:span text:style-name="T84">跨 </text:span><text:span text:style-name="T182">Area </text:span><text:span text:style-name="T84">橋樑</text:span></text:p>
          </table:table-cell>
          <table:table-cell table:style-name="表格19.A2" office:value-type="string">
            <text:p text:style-name="P29" loext:marker-style-name="T83"><text:span text:style-name="T84">一端連 </text:span><text:span text:style-name="T182">Area 0</text:span><text:span text:style-name="T84">、一端連其他 </text:span><text:span text:style-name="T182">Area</text:span><text:span text:style-name="T84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9" loext:marker-style-name="T83"><text:span text:style-name="T182">ASBR</text:span><text:span text:style-name="T83"/></text:p>
          </table:table-cell>
          <table:table-cell table:style-name="表格19.A3" office:value-type="string">
            <text:p text:style-name="P29" loext:marker-style-name="T83"><text:span text:style-name="T84">跨 </text:span><text:span text:style-name="T182">AS </text:span><text:span text:style-name="T84">入口</text:span></text:p>
          </table:table-cell>
          <table:table-cell table:style-name="表格19.A3" office:value-type="string">
            <text:p text:style-name="P29" loext:marker-style-name="T83"><text:span text:style-name="T84">把外部路由（</text:span><text:span text:style-name="T182">BGP </text:span><text:span text:style-name="T84">等）帶進 </text:span><text:span text:style-name="T182">OSPF</text:span><text:span text:style-name="T84">，是對外的大門</text:span></text:p>
          </table:table-cell>
        </table:table-row>
      </table:table>
      <text:h text:style-name="P12" text:outline-level="3"><text:span text:style-name="T249">▍</text:span><text:span text:style-name="T250"> ⑦ </text:span><text:span text:style-name="T251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6" loext:marker-style-name="T69"><text:span text:style-name="T70">能力</text:span><text:span text:style-name="T69"/></text:p>
            </table:table-cell>
            <table:table-cell table:style-name="表格20.A1" office:value-type="string">
              <text:p text:style-name="P26" loext:marker-style-name="T69"><text:span text:style-name="T79">FW</text:span><text:span text:style-name="T69"/></text:p>
            </table:table-cell>
            <table:table-cell table:style-name="表格20.A1" office:value-type="string">
              <text:p text:style-name="P26" loext:marker-style-name="T69"><text:span text:style-name="T79">WAF</text:span><text:span text:style-name="T69"/></text:p>
            </table:table-cell>
            <table:table-cell table:style-name="表格20.A1" office:value-type="string">
              <text:p text:style-name="P26" loext:marker-style-name="T69"><text:span text:style-name="T79">NGFW</text:span><text:span text:style-name="T69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9" loext:marker-style-name="T83"><text:span text:style-name="T182">IP / Port </text:span><text:span text:style-name="T84">過濾</text:span></text:p>
          </table:table-cell>
          <table:table-cell table:style-name="表格20.A2" office:value-type="string">
            <text:p text:style-name="P28" loext:marker-style-name="T288"><text:span text:style-name="T293">○</text:span><text:span text:style-name="T288"/></text:p>
          </table:table-cell>
          <table:table-cell table:style-name="表格20.A2" office:value-type="string">
            <text:p text:style-name="P28" loext:marker-style-name="T288"><text:span text:style-name="T293">○</text:span><text:span text:style-name="T288"/></text:p>
          </table:table-cell>
          <table:table-cell table:style-name="表格20.A2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20.1">
          <table:table-cell table:style-name="表格20.A3" office:value-type="string">
            <text:p text:style-name="P29" loext:marker-style-name="T83"><text:span text:style-name="T182">HTTP </text:span><text:span text:style-name="T84">內容檢查</text:span></text:p>
          </table:table-cell>
          <table:table-cell table:style-name="表格20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20.A3" office:value-type="string">
            <text:p text:style-name="P28" loext:marker-style-name="T288"><text:span text:style-name="T293">○</text:span><text:span text:style-name="T288"/></text:p>
          </table:table-cell>
          <table:table-cell table:style-name="表格20.A3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20.1">
          <table:table-cell table:style-name="表格20.A2" office:value-type="string">
            <text:p text:style-name="P29" loext:marker-style-name="T83"><text:span text:style-name="T182">DPI </text:span><text:span text:style-name="T84">深度檢查</text:span></text:p>
          </table:table-cell>
          <table:table-cell table:style-name="表格20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20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20.A2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20.1">
          <table:table-cell table:style-name="表格20.A3" office:value-type="string">
            <text:p text:style-name="P29" loext:marker-style-name="T83"><text:span text:style-name="T182">App </text:span><text:span text:style-name="T84">識別 </text:span><text:span text:style-name="T182">/ IPS</text:span></text:p>
          </table:table-cell>
          <table:table-cell table:style-name="表格20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20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20.A3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20.1">
          <table:table-cell table:style-name="表格20.A2" office:value-type="string">
            <text:p text:style-name="P29" loext:marker-style-name="T83"><text:span text:style-name="T182">OSI </text:span><text:span text:style-name="T84">層</text:span></text:p>
          </table:table-cell>
          <table:table-cell table:style-name="表格20.A2" office:value-type="string">
            <text:p text:style-name="P28" loext:marker-style-name="T83"><text:span text:style-name="T182">L3 / L4</text:span><text:span text:style-name="T83"/></text:p>
          </table:table-cell>
          <table:table-cell table:style-name="表格20.A2" office:value-type="string">
            <text:p text:style-name="P28" loext:marker-style-name="T33"><text:span text:style-name="T41">L7</text:span><text:span text:style-name="T33"/></text:p>
          </table:table-cell>
          <table:table-cell table:style-name="表格20.A2" office:value-type="string">
            <text:p text:style-name="P28" loext:marker-style-name="T83"><text:span text:style-name="T182">L3–L7</text:span><text:span text:style-name="T83"/></text:p>
          </table:table-cell>
        </table:table-row>
      </table:table>
      <text:h text:style-name="P12" text:outline-level="3"><text:span text:style-name="T249">▍</text:span><text:span text:style-name="T250"> ⑧ </text:span><text:span text:style-name="T251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4" loext:marker-style-name="T69"><text:span text:style-name="T70">工具</text:span><text:span text:style-name="T69"/></text:p>
            </table:table-cell>
            <table:table-cell table:style-name="表格21.A1" office:value-type="string">
              <text:p text:style-name="P4" loext:marker-style-name="T69"><text:span text:style-name="T70">角色</text:span><text:span text:style-name="T69"/></text:p>
            </table:table-cell>
            <table:table-cell table:style-name="表格21.A1" office:value-type="string">
              <text:p text:style-name="P4" loext:marker-style-name="T69"><text:span text:style-name="T70">關鍵差異</text:span><text:span text:style-name="T69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9" loext:marker-style-name="T83"><text:span text:style-name="T182">Firewall</text:span><text:span text:style-name="T83"/></text:p>
          </table:table-cell>
          <table:table-cell table:style-name="表格21.A2" office:value-type="string">
            <text:p text:style-name="P29" loext:marker-style-name="T83"><text:span text:style-name="T84">大門警衛</text:span><text:span text:style-name="T83"/></text:p>
          </table:table-cell>
          <table:table-cell table:style-name="表格21.A2" office:value-type="string">
            <text:p text:style-name="P29" loext:marker-style-name="T83"><text:span text:style-name="T84">依 </text:span><text:span text:style-name="T182">IP / Port / </text:span><text:span text:style-name="T84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9" loext:marker-style-name="T83"><text:span text:style-name="T182">IDS</text:span><text:span text:style-name="T83"/></text:p>
          </table:table-cell>
          <table:table-cell table:style-name="表格21.A3" office:value-type="string">
            <text:p text:style-name="P29" loext:marker-style-name="T83"><text:span text:style-name="T84">監視器（只看）</text:span><text:span text:style-name="T83"/></text:p>
          </table:table-cell>
          <table:table-cell table:style-name="表格21.A3" office:value-type="string">
            <text:p text:style-name="P29" loext:marker-style-name="T83"><text:span text:style-name="T84">偵測異常 → 只發警報，不阻擋</text:span><text:span text:style-name="T83"/></text:p>
          </table:table-cell>
        </table:table-row>
        <table:table-row table:style-name="表格21.1">
          <table:table-cell table:style-name="表格21.A2" office:value-type="string">
            <text:p text:style-name="P29" loext:marker-style-name="T83"><text:span text:style-name="T182">IPS</text:span><text:span text:style-name="T83"/></text:p>
          </table:table-cell>
          <table:table-cell table:style-name="表格21.A2" office:value-type="string">
            <text:p text:style-name="P29" loext:marker-style-name="T83"><text:span text:style-name="T84">監視器＋警衛</text:span><text:span text:style-name="T83"/></text:p>
          </table:table-cell>
          <table:table-cell table:style-name="表格21.A2" office:value-type="string">
            <text:p text:style-name="P29" loext:marker-style-name="T83"><text:span text:style-name="T84">偵測異常 → 自動阻擋（</text:span><text:span text:style-name="T182">IDS </text:span><text:span text:style-name="T84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9" loext:marker-style-name="T83"><text:span text:style-name="T182">HIDS</text:span><text:span text:style-name="T83"/></text:p>
          </table:table-cell>
          <table:table-cell table:style-name="表格21.A3" office:value-type="string">
            <text:p text:style-name="P29" loext:marker-style-name="T83"><text:span text:style-name="T84">主機型</text:span><text:span text:style-name="T83"/></text:p>
          </table:table-cell>
          <table:table-cell table:style-name="表格21.A3" office:value-type="string">
            <text:p text:style-name="P29" loext:marker-style-name="T83"><text:span text:style-name="T84">看主機 </text:span><text:span text:style-name="T182">Log</text:span><text:span text:style-name="T84">／系統行為</text:span></text:p>
          </table:table-cell>
        </table:table-row>
        <table:table-row table:style-name="表格21.1">
          <table:table-cell table:style-name="表格21.A2" office:value-type="string">
            <text:p text:style-name="P29" loext:marker-style-name="T83"><text:span text:style-name="T182">NIDS</text:span><text:span text:style-name="T83"/></text:p>
          </table:table-cell>
          <table:table-cell table:style-name="表格21.A2" office:value-type="string">
            <text:p text:style-name="P29" loext:marker-style-name="T83"><text:span text:style-name="T84">網路型</text:span><text:span text:style-name="T83"/></text:p>
          </table:table-cell>
          <table:table-cell table:style-name="表格21.A2" office:value-type="string">
            <text:p text:style-name="P29" loext:marker-style-name="T83"><text:span text:style-name="T84">看網路封包／流量</text:span><text:span text:style-name="T83"/></text:p>
          </table:table-cell>
        </table:table-row>
        <table:table-row table:style-name="表格21.1">
          <table:table-cell table:style-name="表格21.A3" office:value-type="string">
            <text:p text:style-name="P29" loext:marker-style-name="T83"><text:span text:style-name="T182">SNMP</text:span><text:span text:style-name="T83"/></text:p>
          </table:table-cell>
          <table:table-cell table:style-name="表格21.A3" office:value-type="string">
            <text:p text:style-name="P29" loext:marker-style-name="T83"><text:span text:style-name="T84">管理室</text:span><text:span text:style-name="T83"/></text:p>
          </table:table-cell>
          <table:table-cell table:style-name="表格21.A3" office:value-type="string">
            <text:p text:style-name="P29" loext:marker-style-name="T83"><text:span text:style-name="T84">管理設備狀態（應用層／</text:span><text:span text:style-name="T182">UDP</text:span><text:span text:style-name="T84">）</text:span></text:p>
          </table:table-cell>
        </table:table-row>
        <table:table-row table:style-name="表格21.1">
          <table:table-cell table:style-name="表格21.A2" office:value-type="string">
            <text:p text:style-name="P29" loext:marker-style-name="T83"><text:span text:style-name="T182">ICMP</text:span><text:span text:style-name="T83"/></text:p>
          </table:table-cell>
          <table:table-cell table:style-name="表格21.A2" office:value-type="string">
            <text:p text:style-name="P29" loext:marker-style-name="T83"><text:span text:style-name="T84">網路測試員</text:span><text:span text:style-name="T83"/></text:p>
          </table:table-cell>
          <table:table-cell table:style-name="表格21.A2" office:value-type="string">
            <text:p text:style-name="P29" loext:marker-style-name="T83"><text:span text:style-name="T84">診斷網路連線（網路層／</text:span><text:span text:style-name="T182">Ping</text:span><text:span text:style-name="T84">）</text:span></text:p>
          </table:table-cell>
        </table:table-row>
      </table:table>
      <text:h text:style-name="P12" text:outline-level="3"><text:span text:style-name="T249">▍</text:span><text:span text:style-name="T250"> ⑨ IOC </text:span><text:span text:style-name="T251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6" loext:marker-style-name="T69"><text:span text:style-name="T70">口訣</text:span><text:span text:style-name="T69"/></text:p>
            </table:table-cell>
            <table:table-cell table:style-name="表格22.A1" office:value-type="string">
              <text:p text:style-name="P26" loext:marker-style-name="T69"><text:span text:style-name="T79">IOC </text:span><text:span text:style-name="T70">類型</text:span></text:p>
            </table:table-cell>
            <table:table-cell table:style-name="表格22.A1" office:value-type="string">
              <text:p text:style-name="P26" loext:marker-style-name="T69"><text:span text:style-name="T70">白話</text:span><text:span text:style-name="T69"/></text:p>
            </table:table-cell>
            <table:table-cell table:style-name="表格22.A1" office:value-type="string">
              <text:p text:style-name="P26" loext:marker-style-name="T69"><text:span text:style-name="T70">對應防禦</text:span><text:span text:style-name="T69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8" loext:marker-style-name="T297"><text:span text:style-name="T298">網</text:span><text:span text:style-name="T297"/></text:p>
          </table:table-cell>
          <table:table-cell table:style-name="表格22.A2" office:value-type="string">
            <text:p text:style-name="P29" loext:marker-style-name="T83"><text:span text:style-name="T84">惡意 </text:span><text:span text:style-name="T182">Domain</text:span></text:p>
          </table:table-cell>
          <table:table-cell table:style-name="表格22.A2" office:value-type="string">
            <text:p text:style-name="P29" loext:marker-style-name="T83"><text:span text:style-name="T84">釣魚網站網址</text:span><text:span text:style-name="T83"/></text:p>
          </table:table-cell>
          <table:table-cell table:style-name="表格22.A2" office:value-type="string">
            <text:p text:style-name="P29" loext:marker-style-name="T83"><text:span text:style-name="T182">DNS </text:span><text:span text:style-name="T84">封鎖網域</text:span></text:p>
          </table:table-cell>
        </table:table-row>
        <table:table-row table:style-name="表格22.1">
          <table:table-cell table:style-name="表格22.A3" office:value-type="string">
            <text:p text:style-name="P28" loext:marker-style-name="T297"><text:span text:style-name="T298">檔</text:span><text:span text:style-name="T297"/></text:p>
          </table:table-cell>
          <table:table-cell table:style-name="表格22.A3" office:value-type="string">
            <text:p text:style-name="P29" loext:marker-style-name="T83"><text:span text:style-name="T84">惡意 </text:span><text:span text:style-name="T182">Hash</text:span></text:p>
          </table:table-cell>
          <table:table-cell table:style-name="表格22.A3" office:value-type="string">
            <text:p text:style-name="P29" loext:marker-style-name="T83"><text:span text:style-name="T84">惡意程式特徵碼（改名也認得）</text:span><text:span text:style-name="T83"/></text:p>
          </table:table-cell>
          <table:table-cell table:style-name="表格22.A3" office:value-type="string">
            <text:p text:style-name="P29" loext:marker-style-name="T83"><text:span text:style-name="T84">防毒比對特徵</text:span><text:span text:style-name="T83"/></text:p>
          </table:table-cell>
        </table:table-row>
        <table:table-row table:style-name="表格22.1">
          <table:table-cell table:style-name="表格22.A2" office:value-type="string">
            <text:p text:style-name="P28" loext:marker-style-name="T297"><text:span text:style-name="T298">連</text:span><text:span text:style-name="T297"/></text:p>
          </table:table-cell>
          <table:table-cell table:style-name="表格22.A2" office:value-type="string">
            <text:p text:style-name="P29" loext:marker-style-name="T83"><text:span text:style-name="T84">惡意 </text:span><text:span text:style-name="T182">IP</text:span></text:p>
          </table:table-cell>
          <table:table-cell table:style-name="表格22.A2" office:value-type="string">
            <text:p text:style-name="P29" loext:marker-style-name="T83"><text:span text:style-name="T84">感染後對外異常連線目標</text:span><text:span text:style-name="T83"/></text:p>
          </table:table-cell>
          <table:table-cell table:style-name="表格22.A2" office:value-type="string">
            <text:p text:style-name="P29" loext:marker-style-name="T83"><text:span text:style-name="T182">FW / NGFW </text:span><text:span text:style-name="T84">封鎖</text:span></text:p>
          </table:table-cell>
        </table:table-row>
        <table:table-row table:style-name="表格22.1">
          <table:table-cell table:style-name="表格22.A3" office:value-type="string">
            <text:p text:style-name="P28" loext:marker-style-name="T297"><text:span text:style-name="T298">控</text:span><text:span text:style-name="T297"/></text:p>
          </table:table-cell>
          <table:table-cell table:style-name="表格22.A3" office:value-type="string">
            <text:p text:style-name="P29" loext:marker-style-name="T83"><text:span text:style-name="T182">C2 Server</text:span><text:span text:style-name="T83"/></text:p>
          </table:table-cell>
          <table:table-cell table:style-name="表格22.A3" office:value-type="string">
            <text:p text:style-name="P29" loext:marker-style-name="T83"><text:span text:style-name="T84">駭客遠端操控總部</text:span><text:span text:style-name="T83"/></text:p>
          </table:table-cell>
          <table:table-cell table:style-name="表格22.A3" office:value-type="string">
            <text:p text:style-name="P29" loext:marker-style-name="T83"><text:span text:style-name="T182">SIEM / IDS </text:span><text:span text:style-name="T84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7"><text:span text:style-name="T265">必記：</text:span><text:span text:style-name="T194">IOC </text:span><text:span text:style-name="T106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⑩ DNS </text:span><text:span text:style-name="T251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4" loext:marker-style-name="T73"><text:span text:style-name="T74">項目</text:span><text:span text:style-name="T73"/></text:p>
            </table:table-cell>
            <table:table-cell table:style-name="表格23.A1" office:value-type="string">
              <text:p text:style-name="P4" loext:marker-style-name="T73"><text:span text:style-name="T80">Recursive </text:span><text:span text:style-name="T74">遞迴</text:span></text:p>
            </table:table-cell>
            <table:table-cell table:style-name="表格23.A1" office:value-type="string">
              <text:p text:style-name="P4" loext:marker-style-name="T73"><text:span text:style-name="T80">Iterative </text:span><text:span text:style-name="T74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9" loext:marker-style-name="T142"><text:span text:style-name="T143">口訣</text:span><text:span text:style-name="T142"/></text:p>
          </table:table-cell>
          <table:table-cell table:style-name="表格23.A2" office:value-type="string">
            <text:p text:style-name="P29" loext:marker-style-name="T257"><text:span text:style-name="T258">代查到底</text:span><text:span text:style-name="T257"/></text:p>
          </table:table-cell>
          <table:table-cell table:style-name="表格23.A2" office:value-type="string">
            <text:p text:style-name="P29" loext:marker-style-name="T35"><text:span text:style-name="T36">逐層詢問</text:span><text:span text:style-name="T35"/></text:p>
          </table:table-cell>
        </table:table-row>
        <table:table-row table:style-name="表格23.1">
          <table:table-cell table:style-name="表格23.A3" office:value-type="string">
            <text:p text:style-name="P29" loext:marker-style-name="T142"><text:span text:style-name="T143">誰去問</text:span><text:span text:style-name="T142"/></text:p>
          </table:table-cell>
          <table:table-cell table:style-name="表格23.A3" office:value-type="string">
            <text:p text:style-name="P29" loext:marker-style-name="T142"><text:span text:style-name="T226">DNS </text:span><text:span text:style-name="T143">伺服器代你問完</text:span></text:p>
          </table:table-cell>
          <table:table-cell table:style-name="表格23.A3" office:value-type="string">
            <text:p text:style-name="P29" loext:marker-style-name="T142"><text:span text:style-name="T143">你自己逐層查詢</text:span><text:span text:style-name="T142"/></text:p>
          </table:table-cell>
        </table:table-row>
        <table:table-row table:style-name="表格23.1">
          <table:table-cell table:style-name="表格23.A2" office:value-type="string">
            <text:p text:style-name="P29" loext:marker-style-name="T142"><text:span text:style-name="T143">問幾次</text:span><text:span text:style-name="T142"/></text:p>
          </table:table-cell>
          <table:table-cell table:style-name="表格23.A2" office:value-type="string">
            <text:p text:style-name="P29" loext:marker-style-name="T142"><text:span text:style-name="T143">只問 </text:span><text:span text:style-name="T226">1 </text:span><text:span text:style-name="T143">次</text:span></text:p>
          </table:table-cell>
          <table:table-cell table:style-name="表格23.A2" office:value-type="string">
            <text:p text:style-name="P29" loext:marker-style-name="T142"><text:span text:style-name="T143">每層各問一次，共多次</text:span><text:span text:style-name="T142"/></text:p>
          </table:table-cell>
        </table:table-row>
        <table:table-row table:style-name="表格23.1">
          <table:table-cell table:style-name="表格23.A3" office:value-type="string">
            <text:p text:style-name="P29" loext:marker-style-name="T142"><text:span text:style-name="T143">常見場合</text:span><text:span text:style-name="T142"/></text:p>
          </table:table-cell>
          <table:table-cell table:style-name="表格23.A3" office:value-type="string">
            <text:p text:style-name="P29" loext:marker-style-name="T142"><text:span text:style-name="T143">一般使用者 → </text:span><text:span text:style-name="T226">Local DNS</text:span></text:p>
          </table:table-cell>
          <table:table-cell table:style-name="表格23.A3" office:value-type="string">
            <text:p text:style-name="P29" loext:marker-style-name="T142"><text:span text:style-name="T226">DNS </text:span><text:span text:style-name="T143">伺服器之間互查</text:span></text:p>
          </table:table-cell>
        </table:table-row>
      </table:table>
      <text:h text:style-name="P12" text:outline-level="3"><text:soft-page-break/><text:span text:style-name="T249">▍</text:span><text:span text:style-name="T250"> ⑪ </text:span><text:span text:style-name="T251">企業資安關鍵對：</text:span><text:span text:style-name="T250">RTO/RPO</text:span><text:span text:style-name="T251">、</text:span><text:span text:style-name="T250">EDR/MDR</text:span><text:span text:style-name="T251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4" loext:marker-style-name="T69"><text:span text:style-name="T70">指標 </text:span><text:span text:style-name="T79">/ </text:span><text:span text:style-name="T70">名詞</text:span></text:p>
            </table:table-cell>
            <table:table-cell table:style-name="表格24.A1" office:value-type="string">
              <text:p text:style-name="P4" loext:marker-style-name="T69"><text:span text:style-name="T70">意義</text:span><text:span text:style-name="T69"/></text:p>
            </table:table-cell>
            <table:table-cell table:style-name="表格24.A1" office:value-type="string">
              <text:p text:style-name="P4" loext:marker-style-name="T69"><text:span text:style-name="T70">一句話記憶</text:span><text:span text:style-name="T69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9" loext:marker-style-name="T83"><text:span text:style-name="T182">RTO</text:span><text:span text:style-name="T83"/></text:p>
          </table:table-cell>
          <table:table-cell table:style-name="表格24.A2" office:value-type="string">
            <text:p text:style-name="P29" loext:marker-style-name="T83"><text:span text:style-name="T182">Recovery Time Objective </text:span><text:span text:style-name="T84">復原時間目標</text:span></text:p>
          </table:table-cell>
          <table:table-cell table:style-name="表格24.A2" office:value-type="string">
            <text:p text:style-name="P29" loext:marker-style-name="T53"><text:span text:style-name="T54">停機時間（能停多久）</text:span><text:span text:style-name="T53"/></text:p>
          </table:table-cell>
        </table:table-row>
        <table:table-row table:style-name="表格24.1">
          <table:table-cell table:style-name="表格24.A3" office:value-type="string">
            <text:p text:style-name="P29" loext:marker-style-name="T83"><text:span text:style-name="T182">RPO</text:span><text:span text:style-name="T83"/></text:p>
          </table:table-cell>
          <table:table-cell table:style-name="表格24.A3" office:value-type="string">
            <text:p text:style-name="P29" loext:marker-style-name="T83"><text:span text:style-name="T182">Recovery Point Objective </text:span><text:span text:style-name="T84">復原點目標</text:span></text:p>
          </table:table-cell>
          <table:table-cell table:style-name="表格24.A3" office:value-type="string">
            <text:p text:style-name="P29" loext:marker-style-name="T53"><text:span text:style-name="T54">資料損失量（能丟幾小時）</text:span><text:span text:style-name="T53"/></text:p>
          </table:table-cell>
        </table:table-row>
        <table:table-row table:style-name="表格24.1">
          <table:table-cell table:style-name="表格24.A2" office:value-type="string">
            <text:p text:style-name="P29" loext:marker-style-name="T83"><text:span text:style-name="T182">EDR</text:span><text:span text:style-name="T83"/></text:p>
          </table:table-cell>
          <table:table-cell table:style-name="表格24.A2" office:value-type="string">
            <text:p text:style-name="P29" loext:marker-style-name="T83"><text:span text:style-name="T182">Endpoint Detection &amp; Response</text:span><text:span text:style-name="T83"/></text:p>
          </table:table-cell>
          <table:table-cell table:style-name="表格24.A2" office:value-type="string">
            <text:p text:style-name="P29" loext:marker-style-name="T83"><text:span text:style-name="T84">自己買工具守（需內部資安人員）</text:span><text:span text:style-name="T83"/></text:p>
          </table:table-cell>
        </table:table-row>
        <table:table-row table:style-name="表格24.1">
          <table:table-cell table:style-name="表格24.A3" office:value-type="string">
            <text:p text:style-name="P29" loext:marker-style-name="T83"><text:span text:style-name="T182">MDR</text:span><text:span text:style-name="T83"/></text:p>
          </table:table-cell>
          <table:table-cell table:style-name="表格24.A3" office:value-type="string">
            <text:p text:style-name="P29" loext:marker-style-name="T83"><text:span text:style-name="T182">Managed Detection &amp; Response</text:span><text:span text:style-name="T83"/></text:p>
          </table:table-cell>
          <table:table-cell table:style-name="表格24.A3" office:value-type="string">
            <text:p text:style-name="P29" loext:marker-style-name="T83"><text:span text:style-name="T84">請資安公司委外守（</text:span><text:span text:style-name="T182">24</text:span><text:span text:style-name="T84">／</text:span><text:span text:style-name="T182">7</text:span><text:span text:style-name="T84">，適合中小企業）</text:span></text:p>
          </table:table-cell>
        </table:table-row>
      </table:table>
      <text:h text:style-name="P12" text:outline-level="3"><text:span text:style-name="T249">▍</text:span><text:span text:style-name="T250"> ⑫ </text:span><text:span text:style-name="T251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26" loext:marker-style-name="T69"><text:span text:style-name="T79">Protocol </text:span><text:span text:style-name="T70">值</text:span></text:p>
            </table:table-cell>
            <table:table-cell table:style-name="表格25.A1" office:value-type="string">
              <text:p text:style-name="P26" loext:marker-style-name="T69"><text:span text:style-name="T79">DF Flag</text:span><text:span text:style-name="T69"/></text:p>
            </table:table-cell>
            <table:table-cell table:style-name="表格25.A1" office:value-type="string">
              <text:p text:style-name="P26" loext:marker-style-name="T69"><text:span text:style-name="T79">MF Flag</text:span><text:span text:style-name="T69"/></text:p>
            </table:table-cell>
            <table:table-cell table:style-name="表格25.A1" office:value-type="string">
              <text:p text:style-name="P26" loext:marker-style-name="T69"><text:span text:style-name="T70">關鍵公式</text:span><text:span text:style-name="T69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9" loext:marker-style-name="T83"><text:span text:style-name="T182">ICMP=1 / TCP=6 / UDP=17</text:span><text:span text:style-name="T83"/></text:p>
          </table:table-cell>
          <table:table-cell table:style-name="表格25.A2" office:value-type="string">
            <text:p text:style-name="P29" loext:marker-style-name="T83"><text:span text:style-name="T182">DF=1</text:span><text:span text:style-name="T84">：禁止切，太大就丟＋</text:span><text:span text:style-name="T182">ICMP</text:span></text:p>
          </table:table-cell>
          <table:table-cell table:style-name="表格25.A2" office:value-type="string">
            <text:p text:style-name="P29" loext:marker-style-name="T83"><text:span text:style-name="T182">MF=1</text:span><text:span text:style-name="T84">：後面還有分段（最後段</text:span><text:span text:style-name="T182">=0</text:span><text:span text:style-name="T84">）</text:span></text:p>
          </table:table-cell>
          <table:table-cell table:style-name="表格25.A2" office:value-type="string">
            <text:p text:style-name="P29" loext:marker-style-name="T33"><text:span text:style-name="T41">Offset=</text:span><text:span text:style-name="T34">起始</text:span><text:span text:style-name="T41">÷8</text:span><text:span text:style-name="T34">；</text:span><text:span text:style-name="T41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6"><text:span text:style-name="T247">✅ <text:s/></text:span><text:span text:style-name="T52">提醒</text:span></text:p>
            <text:p text:style-name="P7" loext:marker-style-name="T107"><text:span text:style-name="T106">以上即全書精華。接下來各篇為完整觀念詳解、生活比喻、申論寫法與考試陷阱，務必至少讀過一遍以建立理解，再用本篇反覆速記。</text:span><text:span text:style-name="T107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71"><text:span text:style-name="T72">第 一 篇　網路基礎架構：</text:span><text:span text:style-name="T71">OSI / TCP-IP · </text:span><text:span text:style-name="T72">協定 </text:span><text:span text:style-name="T71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6"><text:span text:style-name="T247">🌐 <text:s/></text:span><text:span text:style-name="T52">本篇重點</text:span></text:p>
            <text:p text:style-name="P7" loext:marker-style-name="T107"><text:span text:style-name="T106">本篇先建立整個網路的「分層」骨架，再逐層認識常見協定，最後切入網路層三大工作與兩個必考工具（</text:span><text:span text:style-name="T194">ARP</text:span><text:span text:style-name="T106">、</text:span><text:span text:style-name="T194">Traceroute</text:span><text:span text:style-name="T106">）。理解每一層的「責任」，比死背名詞更重要。</text:span></text:p>
          </table:table-cell>
        </table:table-row>
      </table:table>
      <text:h text:style-name="P11" text:outline-level="2" loext:marker-style-name="T27"><text:span text:style-name="T28">一、用「寄信」理解分層（修正版）</text:span><text:span text:style-name="T27"/></text:h>
      <text:p text:style-name="P35" loext:marker-style-name="T107"><text:span text:style-name="T106">每一層就像寄信流程中各自獨立的環節，各司其職、互不干涉：</text:span><text:span text:style-name="T107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4" loext:marker-style-name="T69"><text:span text:style-name="T79">TCP/IP </text:span><text:span text:style-name="T70">層</text:span></text:p>
            </table:table-cell>
            <table:table-cell table:style-name="表格27.A1" office:value-type="string">
              <text:p text:style-name="P4" loext:marker-style-name="T69"><text:span text:style-name="T70">郵寄比喻</text:span><text:span text:style-name="T69"/></text:p>
            </table:table-cell>
            <table:table-cell table:style-name="表格27.A1" office:value-type="string">
              <text:p text:style-name="P4" loext:marker-style-name="T69"><text:span text:style-name="T70">實際負責的事</text:span><text:span text:style-name="T69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9" loext:marker-style-name="T83"><text:span text:style-name="T182">🟢 </text:span><text:span text:style-name="T84">應用層 </text:span><text:span text:style-name="T182">Application</text:span></text:p>
          </table:table-cell>
          <table:table-cell table:style-name="表格27.A2" office:value-type="string">
            <text:p text:style-name="P29" loext:marker-style-name="T83"><text:span text:style-name="T84">決定「</text:span><text:span text:style-name="T92">寄什麼內容</text:span><text:span text:style-name="T84">」（信的內容與格式）</text:span></text:p>
          </table:table-cell>
          <table:table-cell table:style-name="表格27.A2" office:value-type="string">
            <text:p text:style-name="P29" loext:marker-style-name="T83"><text:span text:style-name="T182">HTTP</text:span><text:span text:style-name="T84">、</text:span><text:span text:style-name="T182">DNS</text:span><text:span text:style-name="T84">、</text:span><text:span text:style-name="T182">DHCP</text:span><text:span text:style-name="T84">、</text:span><text:span text:style-name="T182">SSH …</text:span><text:span text:style-name="T84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9" loext:marker-style-name="T83"><text:span text:style-name="T182">🟡 </text:span><text:span text:style-name="T84">傳輸層 </text:span><text:span text:style-name="T182">Transport</text:span></text:p>
          </table:table-cell>
          <table:table-cell table:style-name="表格27.A3" office:value-type="string">
            <text:p text:style-name="P29" loext:marker-style-name="T312"><text:span text:style-name="T313">切分、編頁碼、確認收件</text:span><text:span text:style-name="T312"/></text:p>
          </table:table-cell>
          <table:table-cell table:style-name="表格27.A3" office:value-type="string">
            <text:p text:style-name="P29" loext:marker-style-name="T83"><text:span text:style-name="T182">TCP / UDP</text:span><text:span text:style-name="T84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9" loext:marker-style-name="T83"><text:span text:style-name="T182">🔵 </text:span><text:span text:style-name="T84">網路層 </text:span><text:span text:style-name="T182">Network</text:span></text:p>
          </table:table-cell>
          <table:table-cell table:style-name="表格27.A2" office:value-type="string">
            <text:p text:style-name="P29" loext:marker-style-name="T83"><text:span text:style-name="T317">寫地址＋規劃路線</text:span><text:span text:style-name="T84">（郵遞區號＋郵局選路）</text:span></text:p>
          </table:table-cell>
          <table:table-cell table:style-name="表格27.A2" office:value-type="string">
            <text:p text:style-name="P29" loext:marker-style-name="T318"><text:span text:style-name="T352">IP </text:span><text:span text:style-name="T319">路由、</text:span><text:span text:style-name="T352">ICMP</text:span><text:span text:style-name="T319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9" loext:marker-style-name="T83"><text:span text:style-name="T182">🟠 </text:span><text:span text:style-name="T84">連結層 </text:span><text:span text:style-name="T182">Link</text:span></text:p>
          </table:table-cell>
          <table:table-cell table:style-name="表格27.A3" office:value-type="string">
            <text:p text:style-name="P29" loext:marker-style-name="T83"><text:span text:style-name="T84">當前路段的區域配送</text:span><text:span text:style-name="T83"/></text:p>
          </table:table-cell>
          <table:table-cell table:style-name="表格27.A3" office:value-type="string">
            <text:p text:style-name="P29" loext:marker-style-name="T377"><text:span text:style-name="T391">Ethernet</text:span><text:span text:style-name="T378">、</text:span><text:span text:style-name="T391">ARP</text:span><text:span text:style-name="T378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6"><text:span text:style-name="T247">⚠️ <text:s/></text:span><text:span text:style-name="T269">舊版三大比喻的錯誤</text:span></text:p>
            <text:p text:style-name="P7"><text:span text:style-name="T214">❌ </text:span><text:span text:style-name="T130">舊：「寫地址 → 應用層」　</text:span><text:span text:style-name="T194">IP </text:span><text:span text:style-name="T106">位址屬於網路層；應用層負責的是「內容與格式」，不是地址。</text:span></text:p>
            <text:p text:style-name="P8"><text:span text:style-name="T214">❌ </text:span><text:span text:style-name="T130">舊：「打包 → 傳輸層」　</text:span><text:span text:style-name="T106">傳輸層還負責切割、編號、重傳、流量控制，遠不只「打包」。</text:span></text:p>
            <text:p text:style-name="P8"><text:span text:style-name="T214">❌ </text:span><text:span text:style-name="T130">舊：「實際搬運 → 連結層」　</text:span><text:span text:style-name="T106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</text:span><text:span text:style-name="T27">OSI 7 </text:span><text:span text:style-name="T28">層 </text:span><text:span text:style-name="T27">vs TCP/IP 4 </text:span><text:span text:style-name="T28">層（完整對照）</text:span></text:h>
      <text:p text:style-name="P35" loext:marker-style-name="T107"><text:span text:style-name="T215">OSI </text:span><text:span text:style-name="T131">是理論模型（</text:span><text:span text:style-name="T215">7 </text:span><text:span text:style-name="T131">層）</text:span><text:span text:style-name="T106">；</text:span><text:span text:style-name="T217">TCP/IP </text:span><text:span text:style-name="T133">是實際使用的模型（</text:span><text:span text:style-name="T217">4 </text:span><text:span text:style-name="T133">層）</text:span><text:span text:style-name="T106">。</text:span><text:span text:style-name="T194">TCP/IP </text:span><text:span text:style-name="T106">將 </text:span><text:span text:style-name="T194">OSI </text:span><text:span text:style-name="T106">的 </text:span><text:span text:style-name="T194">Session </text:span><text:span text:style-name="T106">層與 </text:span><text:span text:style-name="T194">Presentation </text:span><text:span text:style-name="T106">層併入 </text:span><text:span text:style-name="T194">Application </text:span><text:span text:style-name="T106">層，並把 </text:span><text:span text:style-name="T194">Physical </text:span><text:span text:style-name="T106">併入 </text:span><text:span text:style-name="T194">Link</text:span><text:span text:style-name="T106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6" loext:marker-style-name="T69"><text:span text:style-name="T70">層號</text:span><text:span text:style-name="T69"/></text:p>
            </table:table-cell>
            <table:table-cell table:style-name="表格28.A1" office:value-type="string">
              <text:p text:style-name="P26" loext:marker-style-name="T69"><text:span text:style-name="T79">OSI </text:span><text:span text:style-name="T70">層名</text:span></text:p>
            </table:table-cell>
            <table:table-cell table:style-name="表格28.A1" office:value-type="string">
              <text:p text:style-name="P26" loext:marker-style-name="T69"><text:span text:style-name="T70">主要功能</text:span><text:span text:style-name="T69"/></text:p>
            </table:table-cell>
            <table:table-cell table:style-name="表格28.A1" office:value-type="string">
              <text:p text:style-name="P26" loext:marker-style-name="T69"><text:span text:style-name="T79">TCP/IP </text:span><text:span text:style-name="T70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8" loext:marker-style-name="T83"><text:span text:style-name="T182">7</text:span><text:span text:style-name="T83"/></text:p>
          </table:table-cell>
          <table:table-cell table:style-name="表格28.A2" office:value-type="string">
            <text:p text:style-name="P29" loext:marker-style-name="T83"><text:span text:style-name="T182">Application </text:span><text:span text:style-name="T94">應</text:span><text:span text:style-name="T84">用層</text:span></text:p>
          </table:table-cell>
          <table:table-cell table:style-name="表格28.A2" office:value-type="string">
            <text:p text:style-name="P29" loext:marker-style-name="T83"><text:span text:style-name="T84">使用者直接操作：</text:span><text:span text:style-name="T182">HTTP</text:span><text:span text:style-name="T84">、</text:span><text:span text:style-name="T182">DNS</text:span><text:span text:style-name="T84">、</text:span><text:span text:style-name="T182">DHCP</text:span></text:p>
          </table:table-cell>
          <table:table-cell table:style-name="表格28.A2" office:value-type="string">
            <text:p text:style-name="P29" loext:marker-style-name="T83"><text:span text:style-name="T182">Application</text:span><text:span text:style-name="T83"/></text:p>
          </table:table-cell>
        </table:table-row>
        <table:table-row table:style-name="表格28.1">
          <table:table-cell table:style-name="表格28.A3" office:value-type="string">
            <text:p text:style-name="P28" loext:marker-style-name="T83"><text:span text:style-name="T182">6</text:span><text:span text:style-name="T83"/></text:p>
          </table:table-cell>
          <table:table-cell table:style-name="表格28.A3" office:value-type="string">
            <text:p text:style-name="P29" loext:marker-style-name="T83"><text:span text:style-name="T182">Presentation </text:span><text:span text:style-name="T94">表</text:span><text:span text:style-name="T84">示層</text:span></text:p>
          </table:table-cell>
          <table:table-cell table:style-name="表格28.A3" office:value-type="string">
            <text:p text:style-name="P29" loext:marker-style-name="T402"><text:span text:style-name="T403">資料格式轉換、加解密、壓縮</text:span><text:span text:style-name="T402"/></text:p>
          </table:table-cell>
          <table:table-cell table:style-name="表格28.A3" office:value-type="string">
            <text:p text:style-name="P29" loext:marker-style-name="T83"><text:span text:style-name="T182">↑ </text:span><text:span text:style-name="T84">併入 </text:span><text:span text:style-name="T182">Application</text:span></text:p>
          </table:table-cell>
        </table:table-row>
        <table:table-row table:style-name="表格28.1">
          <table:table-cell table:style-name="表格28.A2" office:value-type="string">
            <text:p text:style-name="P28" loext:marker-style-name="T83"><text:span text:style-name="T182">5</text:span><text:span text:style-name="T83"/></text:p>
          </table:table-cell>
          <table:table-cell table:style-name="表格28.A2" office:value-type="string">
            <text:p text:style-name="P29" loext:marker-style-name="T83"><text:span text:style-name="T182">Session </text:span><text:span text:style-name="T94">會</text:span><text:span text:style-name="T84">話層</text:span></text:p>
          </table:table-cell>
          <table:table-cell table:style-name="表格28.A2" office:value-type="string">
            <text:p text:style-name="P29" loext:marker-style-name="T420"><text:span text:style-name="T421">連線的建立、維持與終止</text:span><text:span text:style-name="T420"/></text:p>
          </table:table-cell>
          <table:table-cell table:style-name="表格28.A2" office:value-type="string">
            <text:p text:style-name="P29" loext:marker-style-name="T83"><text:span text:style-name="T182">↑ </text:span><text:span text:style-name="T84">併入 </text:span><text:span text:style-name="T182">Application</text:span></text:p>
          </table:table-cell>
        </table:table-row>
        <table:table-row table:style-name="表格28.1">
          <table:table-cell table:style-name="表格28.A3" office:value-type="string">
            <text:p text:style-name="P28" loext:marker-style-name="T83"><text:span text:style-name="T182">4</text:span><text:span text:style-name="T83"/></text:p>
          </table:table-cell>
          <table:table-cell table:style-name="表格28.A3" office:value-type="string">
            <text:p text:style-name="P29" loext:marker-style-name="T83"><text:span text:style-name="T182">Transport </text:span><text:span text:style-name="T94">傳</text:span><text:span text:style-name="T84">輸層</text:span></text:p>
          </table:table-cell>
          <table:table-cell table:style-name="表格28.A3" office:value-type="string">
            <text:p text:style-name="P29" loext:marker-style-name="T83"><text:span text:style-name="T84">端對端傳輸控制（</text:span><text:span text:style-name="T182">TCP / UDP</text:span><text:span text:style-name="T84">）</text:span></text:p>
          </table:table-cell>
          <table:table-cell table:style-name="表格28.A3" office:value-type="string">
            <text:p text:style-name="P29" loext:marker-style-name="T83"><text:span text:style-name="T182">Transport</text:span><text:span text:style-name="T83"/></text:p>
          </table:table-cell>
        </table:table-row>
        <table:table-row table:style-name="表格28.1">
          <table:table-cell table:style-name="表格28.A2" office:value-type="string">
            <text:p text:style-name="P28" loext:marker-style-name="T83"><text:span text:style-name="T182">3</text:span><text:span text:style-name="T83"/></text:p>
          </table:table-cell>
          <table:table-cell table:style-name="表格28.A2" office:value-type="string">
            <text:p text:style-name="P29" loext:marker-style-name="T83"><text:span text:style-name="T182">Network </text:span><text:span text:style-name="T94">網</text:span><text:span text:style-name="T84">路層</text:span></text:p>
          </table:table-cell>
          <table:table-cell table:style-name="表格28.A2" office:value-type="string">
            <text:p text:style-name="P29" loext:marker-style-name="T377"><text:span text:style-name="T391">IP </text:span><text:span text:style-name="T378">路由、</text:span><text:span text:style-name="T391">ICMP </text:span><text:span text:style-name="T378">錯誤回報</text:span></text:p>
          </table:table-cell>
          <table:table-cell table:style-name="表格28.A2" office:value-type="string">
            <text:p text:style-name="P29" loext:marker-style-name="T83"><text:span text:style-name="T182">Internet</text:span><text:span text:style-name="T83"/></text:p>
          </table:table-cell>
        </table:table-row>
        <table:table-row table:style-name="表格28.1">
          <table:table-cell table:style-name="表格28.A3" office:value-type="string">
            <text:p text:style-name="P28" loext:marker-style-name="T83"><text:span text:style-name="T182">2</text:span><text:span text:style-name="T83"/></text:p>
          </table:table-cell>
          <table:table-cell table:style-name="表格28.A3" office:value-type="string">
            <text:p text:style-name="P29" loext:marker-style-name="T83"><text:span text:style-name="T182">Data Link </text:span><text:span text:style-name="T424">資</text:span><text:span text:style-name="T84">料鏈結層</text:span></text:p>
          </table:table-cell>
          <table:table-cell table:style-name="表格28.A3" office:value-type="string">
            <text:p text:style-name="P29" loext:marker-style-name="T428"><text:span text:style-name="T457">MAC </text:span><text:span text:style-name="T429">位址、區域網路傳輸（</text:span><text:span text:style-name="T457">ARP</text:span><text:span text:style-name="T429">）</text:span></text:p>
          </table:table-cell>
          <table:table-cell table:style-name="表格28.A3" office:value-type="string">
            <text:p text:style-name="P29" loext:marker-style-name="T83"><text:span text:style-name="T182">Link</text:span><text:span text:style-name="T83"/></text:p>
          </table:table-cell>
        </table:table-row>
        <table:table-row table:style-name="表格28.1">
          <table:table-cell table:style-name="表格28.A2" office:value-type="string">
            <text:p text:style-name="P28" loext:marker-style-name="T83"><text:span text:style-name="T182">1</text:span><text:span text:style-name="T83"/></text:p>
          </table:table-cell>
          <table:table-cell table:style-name="表格28.A2" office:value-type="string">
            <text:p text:style-name="P29" loext:marker-style-name="T83"><text:span text:style-name="T182">Physical </text:span><text:span text:style-name="T94">實</text:span><text:span text:style-name="T84">體層</text:span></text:p>
          </table:table-cell>
          <table:table-cell table:style-name="表格28.A2" office:value-type="string">
            <text:p text:style-name="P29" loext:marker-style-name="T83"><text:span text:style-name="T84">電訊號、光訊號、無線電波</text:span><text:span text:style-name="T83"/></text:p>
          </table:table-cell>
          <table:table-cell table:style-name="表格28.A2" office:value-type="string">
            <text:p text:style-name="P29" loext:marker-style-name="T83"><text:span text:style-name="T182">↑ </text:span><text:span text:style-name="T84">併入 </text:span><text:span text:style-name="T182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6"><text:span text:style-name="T247">⚡ <text:s/></text:span><text:span text:style-name="T251">速記</text:span></text:p>
            <text:p text:style-name="P7" loext:marker-style-name="T107"><text:span text:style-name="T215">OSI → 7 </text:span><text:span text:style-name="T131">層（理論）</text:span><text:span text:style-name="T106">，</text:span><text:span text:style-name="T217">TCP/IP → 4 </text:span><text:span text:style-name="T133">層（實際）</text:span><text:span text:style-name="T106">；差別在於 </text:span><text:span text:style-name="T194">TCP/IP </text:span><text:span text:style-name="T106">少了獨立的 </text:span><text:span text:style-name="T194">Session </text:span><text:span text:style-name="T106">與 </text:span><text:span text:style-name="T194">Presentation </text:span><text:span text:style-name="T106">兩層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26" loext:marker-style-name="T69"><text:span text:style-name="T79">🟢 Application </text:span><text:span text:style-name="T70">應用層</text:span></text:p>
            </table:table-cell>
            <table:table-cell table:style-name="表格29.A1" office:value-type="string">
              <text:p text:style-name="P26" loext:marker-style-name="T69"><text:span text:style-name="T79">🟡 Transport </text:span><text:span text:style-name="T70">傳輸層</text:span></text:p>
            </table:table-cell>
            <table:table-cell table:style-name="表格29.A1" office:value-type="string">
              <text:p text:style-name="P26" loext:marker-style-name="T69"><text:span text:style-name="T79">🔵 Network </text:span><text:span text:style-name="T70">網路層</text:span></text:p>
            </table:table-cell>
            <table:table-cell table:style-name="表格29.A1" office:value-type="string">
              <text:p text:style-name="P26" loext:marker-style-name="T69"><text:span text:style-name="T79">🟠 Link </text:span><text:span text:style-name="T70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9" loext:marker-style-name="T83"><text:span text:style-name="T182">HTTP / HTTPS</text:span><text:span text:style-name="T84">、</text:span><text:span text:style-name="T182">DNS</text:span><text:span text:style-name="T84">、</text:span><text:span text:style-name="T182">DHCP</text:span><text:span text:style-name="T84">、</text:span><text:span text:style-name="T182">SSH</text:span><text:span text:style-name="T84">、</text:span><text:span text:style-name="T182">MQTT</text:span><text:span text:style-name="T84">、</text:span><text:span text:style-name="T183">OSPF*</text:span></text:p>
          </table:table-cell>
          <table:table-cell table:style-name="表格29.A2" office:value-type="string">
            <text:p text:style-name="P29" loext:marker-style-name="T479"><text:span text:style-name="T496">TCP</text:span><text:span text:style-name="T480">（可靠傳輸）、</text:span><text:span text:style-name="T496">UDP</text:span><text:span text:style-name="T480">（高速傳輸）</text:span></text:p>
          </table:table-cell>
          <table:table-cell table:style-name="表格29.A2" office:value-type="string">
            <text:p text:style-name="P29" loext:marker-style-name="T83"><text:span text:style-name="T182">IP</text:span><text:span text:style-name="T84">（路由定址）、</text:span><text:span text:style-name="T506">ICMP</text:span><text:span text:style-name="T509">（錯誤回報 </text:span><text:span text:style-name="T506">/ ping</text:span><text:span text:style-name="T509">）</text:span></text:p>
          </table:table-cell>
          <table:table-cell table:style-name="表格29.A2" office:value-type="string">
            <text:p text:style-name="P29" loext:marker-style-name="T83"><text:span text:style-name="T182">Ethernet</text:span><text:span text:style-name="T84">（有線網路）、</text:span><text:span text:style-name="T392">ARP</text:span><text:span text:style-name="T379">（</text:span><text:span text:style-name="T392">IP → MAC</text:span><text:span text:style-name="T379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7"><text:span text:style-name="T270">OSPF </text:span><text:span text:style-name="T265">分層備註：</text:span><text:span text:style-name="T194">OSPF </text:span><text:span text:style-name="T106">在 </text:span><text:span text:style-name="T194">OSI </text:span><text:span text:style-name="T106">模型屬第 </text:span><text:span text:style-name="T194">3 </text:span><text:span text:style-name="T106">層（</text:span><text:span text:style-name="T194">Network</text:span><text:span text:style-name="T106">）；但在 </text:span><text:span text:style-name="T194">TCP/IP </text:span><text:span text:style-name="T106">模型中，因為它直接跑在 </text:span><text:span text:style-name="T194">IP </text:span><text:span text:style-name="T106">上（不透過 </text:span><text:span text:style-name="T194">TCP/UDP</text:span><text:span text:style-name="T106">），通常歸為 </text:span><text:span text:style-name="T194">Application </text:span><text:span text:style-name="T106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常見協定詳解：</text:span><text:span text:style-name="T27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" loext:marker-style-name="T75"><text:span text:style-name="T76">協定</text:span><text:span text:style-name="T75"/></text:p>
            </table:table-cell>
            <table:table-cell table:style-name="表格30.A1" office:value-type="string">
              <text:p text:style-name="P4" loext:marker-style-name="T75"><text:span text:style-name="T76">層級</text:span><text:span text:style-name="T75"/></text:p>
            </table:table-cell>
            <table:table-cell table:style-name="表格30.A1" office:value-type="string">
              <text:p text:style-name="P4" loext:marker-style-name="T75"><text:span text:style-name="T76">做什麼（白話）</text:span><text:span text:style-name="T75"/></text:p>
            </table:table-cell>
            <table:table-cell table:style-name="表格30.A1" office:value-type="string">
              <text:p text:style-name="P4" loext:marker-style-name="T75"><text:span text:style-name="T76">生活比喻</text:span><text:span text:style-name="T75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9" loext:marker-style-name="T147"><text:span text:style-name="T228">DHCP</text:span><text:span text:style-name="T230"> Dynamic Host Configuration Protocol</text:span></text:p>
          </table:table-cell>
          <table:table-cell table:style-name="表格30.A2" office:value-type="string">
            <text:p text:style-name="P29" loext:marker-style-name="T147"><text:span text:style-name="T148">應用層</text:span><text:span text:style-name="T147"/></text:p>
          </table:table-cell>
          <table:table-cell table:style-name="表格30.A2" office:value-type="string">
            <text:p text:style-name="P29" loext:marker-style-name="T147"><text:span text:style-name="T169">連上 </text:span><text:span text:style-name="T238">WiFi </text:span><text:span text:style-name="T169">時不必手動設定 </text:span><text:span text:style-name="T238">IP</text:span><text:span text:style-name="T148">，</text:span><text:span text:style-name="T230">DHCP </text:span><text:span text:style-name="T148">伺服器</text:span><text:span text:style-name="T381">自動分配一個 </text:span><text:span text:style-name="T394">IP </text:span><text:span text:style-name="T381">給你</text:span><text:span text:style-name="T148">。</text:span></text:p>
          </table:table-cell>
          <table:table-cell table:style-name="表格30.A2" office:value-type="string">
            <text:p text:style-name="P29" loext:marker-style-name="T147"><text:span text:style-name="T148">進飯店前台自動安排房號</text:span><text:span text:style-name="T147"/></text:p>
          </table:table-cell>
        </table:table-row>
        <table:table-row table:style-name="表格30.1">
          <table:table-cell table:style-name="表格30.A3" office:value-type="string">
            <text:p text:style-name="P29" loext:marker-style-name="T147"><text:span text:style-name="T228">SSH</text:span><text:span text:style-name="T230"> Secure Shell</text:span></text:p>
          </table:table-cell>
          <table:table-cell table:style-name="表格30.A3" office:value-type="string">
            <text:p text:style-name="P29" loext:marker-style-name="T147"><text:span text:style-name="T148">應用層</text:span><text:span text:style-name="T147"/></text:p>
          </table:table-cell>
          <table:table-cell table:style-name="表格30.A3" office:value-type="string">
            <text:p text:style-name="P29" loext:marker-style-name="T147"><text:span text:style-name="T485">透過加密通道遠端操控</text:span><text:span text:style-name="T148">另一台 </text:span><text:span text:style-name="T230">Linux</text:span><text:span text:style-name="T148">／伺服器的終端機。</text:span></text:p>
          </table:table-cell>
          <table:table-cell table:style-name="表格30.A3" office:value-type="string">
            <text:p text:style-name="P29" loext:marker-style-name="T147"><text:span text:style-name="T148">加密版的遠端遙控器</text:span><text:span text:style-name="T147"/></text:p>
          </table:table-cell>
        </table:table-row>
        <table:table-row table:style-name="表格30.1">
          <table:table-cell table:style-name="表格30.A2" office:value-type="string">
            <text:p text:style-name="P29" loext:marker-style-name="T147"><text:span text:style-name="T228">MQTT</text:span><text:span text:style-name="T230"> Message Queuing Telemetry Transport</text:span></text:p>
          </table:table-cell>
          <table:table-cell table:style-name="表格30.A2" office:value-type="string">
            <text:p text:style-name="P29" loext:marker-style-name="T147"><text:span text:style-name="T148">應用層</text:span><text:span text:style-name="T147"/></text:p>
          </table:table-cell>
          <table:table-cell table:style-name="表格30.A2" office:value-type="string">
            <text:p text:style-name="P29" loext:marker-style-name="T147"><text:span text:style-name="T463">IoT </text:span><text:span text:style-name="T437">裝置常用的輕量傳訊協定</text:span><text:span text:style-name="T148">，採</text:span><text:span text:style-name="T518">「發布／訂閱」模式</text:span><text:span text:style-name="T148">，非常省流量。</text:span></text:p>
          </table:table-cell>
          <table:table-cell table:style-name="表格30.A2" office:value-type="string">
            <text:p text:style-name="P29" loext:marker-style-name="T147"><text:span text:style-name="T148">溫度感測器發布「</text:span><text:span text:style-name="T230">30°C</text:span><text:span text:style-name="T148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9" loext:marker-style-name="T147"><text:span text:style-name="T228">OSPF</text:span><text:span text:style-name="T230"> Open Shortest Path First</text:span></text:p>
          </table:table-cell>
          <table:table-cell table:style-name="表格30.A3" office:value-type="string">
            <text:p text:style-name="P29" loext:marker-style-name="T147"><text:span text:style-name="T148">視模型而定 ⚠️</text:span><text:span text:style-name="T147"/></text:p>
          </table:table-cell>
          <table:table-cell table:style-name="表格30.A3" office:value-type="string">
            <text:p text:style-name="P29" loext:marker-style-name="T147"><text:span text:style-name="T326">路由器之間使用</text:span><text:span text:style-name="T148">，</text:span><text:span text:style-name="T382">自動計算封包走哪條路徑最短、最快</text:span><text:span text:style-name="T148">。</text:span></text:p>
          </table:table-cell>
          <table:table-cell table:style-name="表格30.A3" office:value-type="string">
            <text:p text:style-name="P29" loext:marker-style-name="T147"><text:span text:style-name="T230">Google Maps </text:span><text:span text:style-name="T148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6"><text:span text:style-name="T247">💡 <text:s/></text:span><text:span text:style-name="T251">快速判斷層級的技巧</text:span></text:p>
            <text:p text:style-name="P7"><text:span text:style-name="T254">使用者／應用服務</text:span><text:span text:style-name="T106">（</text:span><text:span text:style-name="T194">SSH</text:span><text:span text:style-name="T106">、</text:span><text:span text:style-name="T194">DHCP</text:span><text:span text:style-name="T106">、</text:span><text:span text:style-name="T194">MQTT</text:span><text:span text:style-name="T106">、</text:span><text:span text:style-name="T194">HTTP</text:span><text:span text:style-name="T106">）→ 幾乎都是應用層。</text:span></text:p>
            <text:p text:style-name="P8"><text:span text:style-name="T254">幫路由器決定走哪條路</text:span><text:span text:style-name="T106">（</text:span><text:span text:style-name="T194">OSPF</text:span><text:span text:style-name="T106">、</text:span><text:span text:style-name="T194">RIP</text:span><text:span text:style-name="T106">、</text:span><text:span text:style-name="T194">BGP</text:span><text:span text:style-name="T106">）→ 在 </text:span><text:span text:style-name="T194">OSI </text:span><text:span text:style-name="T106">屬網路層，</text:span><text:span text:style-name="T194">TCP/IP </text:span><text:span text:style-name="T106">多歸應用層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五、網路層深度解析：</text:span><text:span text:style-name="T27">IP · Routing · ICMP</text:span></text:h>
      <text:p text:style-name="P35" loext:marker-style-name="T107"><text:span text:style-name="T106">網路層（第 </text:span><text:span text:style-name="T194">3 </text:span><text:span text:style-name="T106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26" loext:marker-style-name="T69"><text:span text:style-name="T79">📍 IP</text:span><text:span text:style-name="T70">（位址）</text:span></text:p>
            </table:table-cell>
            <table:table-cell table:style-name="表格31.A1" office:value-type="string">
              <text:p text:style-name="P26" loext:marker-style-name="T69"><text:span text:style-name="T79">🗺️ Routing</text:span><text:span text:style-name="T70">（路由）</text:span></text:p>
            </table:table-cell>
            <table:table-cell table:style-name="表格31.A1" office:value-type="string">
              <text:p text:style-name="P26" loext:marker-style-name="T69"><text:span text:style-name="T79">🚨 ICMP</text:span><text:span text:style-name="T70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9" loext:marker-style-name="T83"><text:span text:style-name="T92">決定「目的地在哪」</text:span><text:span text:style-name="T84">。每台設備都有 </text:span><text:span text:style-name="T182">IP</text:span><text:span text:style-name="T84">，就像門牌；</text:span><text:span text:style-name="T182">IP </text:span><text:span text:style-name="T84">負責標記「我要送去哪裡」。</text:span></text:p>
          </table:table-cell>
          <table:table-cell table:style-name="表格31.A2" office:value-type="string">
            <text:p text:style-name="P29" loext:marker-style-name="T83"><text:span text:style-name="T92">決定「怎麼走最快」</text:span><text:span text:style-name="T84">。</text:span><text:span text:style-name="T96">封包經過很多路由器</text:span><text:span text:style-name="T84">，</text:span><text:span text:style-name="T480">每台都問「下一站往哪送？」</text:span><text:span text:style-name="T352">OSPF </text:span><text:span text:style-name="T319">等協定算出最短路徑。</text:span></text:p>
          </table:table-cell>
          <table:table-cell table:style-name="表格31.A2" office:value-type="string">
            <text:p text:style-name="P29" loext:marker-style-name="T83"><text:span text:style-name="T92">回報「出了什麼問題」</text:span><text:span text:style-name="T84">。找不到主機、路不通、</text:span><text:span text:style-name="T182">TTL </text:span><text:span text:style-name="T84">歸零 → </text:span><text:span text:style-name="T378">各自回傳對應 </text:span><text:span text:style-name="T391">ICMP </text:span><text:span text:style-name="T378">訊息</text:span><text:span text:style-name="T84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6"><text:span text:style-name="T247">🔍 <text:s/></text:span><text:span text:style-name="T63">ping </text:span><text:span text:style-name="T52">是什麼？為什麼跟 </text:span><text:span text:style-name="T63">ICMP </text:span><text:span text:style-name="T52">有關？</text:span></text:p>
            <text:p text:style-name="P7" loext:marker-style-name="T55"><text:span text:style-name="T64">ping google.com </text:span><text:span text:style-name="T56">的運作</text:span><text:span text:style-name="T57">：</text:span></text:p>
            <text:p text:style-name="P8" loext:marker-style-name="T107"><text:span text:style-name="T194">① </text:span><text:span text:style-name="T106">你的電腦發出 </text:span><text:span text:style-name="T215">ICMP Echo Request</text:span><text:span text:style-name="T106">（「你在嗎？」）</text:span></text:p>
            <text:p text:style-name="P8" loext:marker-style-name="T107"><text:span text:style-name="T194">② </text:span><text:span text:style-name="T106">目標主機回傳 </text:span><text:span text:style-name="T215">ICMP Echo Reply</text:span><text:span text:style-name="T106">（「我在！」）</text:span></text:p>
            <text:p text:style-name="P8" loext:marker-style-name="T107"><text:span text:style-name="T194">③ </text:span><text:span text:style-name="T406">顯示來回時間（</text:span><text:span text:style-name="T414">ms</text:span><text:span text:style-name="T406">），數字越小代表網路越暢通</text:span></text:p>
            <text:p text:style-name="P8"><text:span text:style-name="T270">⚠️ </text:span><text:span text:style-name="T265">重點：</text:span><text:span text:style-name="T398">ping </text:span><text:span text:style-name="T386">完全使用 </text:span><text:span text:style-name="T398">ICMP</text:span><text:span text:style-name="T386">，不走 </text:span><text:span text:style-name="T398">TCP </text:span><text:span text:style-name="T386">也不走 </text:span><text:span text:style-name="T398">UDP</text:span><text:span text:style-name="T106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6"><text:span text:style-name="T247">⚡ <text:s/></text:span><text:span text:style-name="T251">三個概念一次記清楚</text:span></text:p>
            <text:p text:style-name="P7"><text:span text:style-name="T262">📍 IP → </text:span><text:span text:style-name="T106">定位（目的地是誰）　</text:span><text:span text:style-name="T254">🗺️ </text:span><text:span text:style-name="T262">Routing → </text:span><text:span text:style-name="T487">選路（怎麼走最快）</text:span><text:span text:style-name="T106">　</text:span><text:span text:style-name="T254">🚨 </text:span><text:span text:style-name="T263">ICMP → </text:span><text:span text:style-name="T386">回報（出錯了通知你）</text:span></text:p>
          </table:table-cell>
          <table:covered-table-cell/>
          <table:covered-table-cell/>
        </table:table-row>
      </table:table>
      <text:h text:style-name="P11" text:outline-level="2"><text:soft-page-break/><text:span text:style-name="T28">六、</text:span><text:span text:style-name="T27">TCP vs UDP </text:span><text:span text:style-name="T28">差異比較</text:span></text:h>
      <text:p text:style-name="P35" loext:marker-style-name="T107"><text:span text:style-name="T106">傳輸層最核心的兩個協定，差異在於「是否保證送達」（更深入的擁塞控制見第五篇）。</text:span><text:span text:style-name="T107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4" loext:marker-style-name="T73"><text:span text:style-name="T74">比較項目</text:span><text:span text:style-name="T73"/></text:p>
            </table:table-cell>
            <table:table-cell table:style-name="表格32.A1" office:value-type="string">
              <text:p text:style-name="P4" loext:marker-style-name="T73"><text:span text:style-name="T80">TCP</text:span><text:span text:style-name="T73"/></text:p>
            </table:table-cell>
            <table:table-cell table:style-name="表格32.A1" office:value-type="string">
              <text:p text:style-name="P4" loext:marker-style-name="T73"><text:span text:style-name="T80">UDP</text:span><text:span text:style-name="T73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9" loext:marker-style-name="T142"><text:span text:style-name="T143">連線方式</text:span><text:span text:style-name="T142"/></text:p>
          </table:table-cell>
          <table:table-cell table:style-name="表格32.A2" office:value-type="string">
            <text:p text:style-name="P29" loext:marker-style-name="T142"><text:span text:style-name="T143">需要握手（三向交握）</text:span><text:span text:style-name="T142"/></text:p>
          </table:table-cell>
          <table:table-cell table:style-name="表格32.A2" office:value-type="string">
            <text:p text:style-name="P29" loext:marker-style-name="T142"><text:span text:style-name="T143">無連線，直接送出</text:span><text:span text:style-name="T142"/></text:p>
          </table:table-cell>
        </table:table-row>
        <table:table-row table:style-name="表格32.1">
          <table:table-cell table:style-name="表格32.A3" office:value-type="string">
            <text:p text:style-name="P29" loext:marker-style-name="T142"><text:span text:style-name="T143">可靠性</text:span><text:span text:style-name="T142"/></text:p>
          </table:table-cell>
          <table:table-cell table:style-name="表格32.A3" office:value-type="string">
            <text:p text:style-name="P29" loext:marker-style-name="T332"><text:span text:style-name="T333">保證送達，遺失會重傳</text:span><text:span text:style-name="T332"/></text:p>
          </table:table-cell>
          <table:table-cell table:style-name="表格32.A3" office:value-type="string">
            <text:p text:style-name="P29" loext:marker-style-name="T443"><text:span text:style-name="T444">不保證，遺失不補</text:span><text:span text:style-name="T443"/></text:p>
          </table:table-cell>
        </table:table-row>
        <table:table-row table:style-name="表格32.1">
          <table:table-cell table:style-name="表格32.A2" office:value-type="string">
            <text:p text:style-name="P29" loext:marker-style-name="T142"><text:span text:style-name="T143">速度</text:span><text:span text:style-name="T142"/></text:p>
          </table:table-cell>
          <table:table-cell table:style-name="表格32.A2" office:value-type="string">
            <text:p text:style-name="P29" loext:marker-style-name="T144"><text:span text:style-name="T145">較慢（有確認機制）</text:span><text:span text:style-name="T144"/></text:p>
          </table:table-cell>
          <table:table-cell table:style-name="表格32.A2" office:value-type="string">
            <text:p text:style-name="P29" loext:marker-style-name="T144"><text:span text:style-name="T145">較快（無確認機制）</text:span><text:span text:style-name="T144"/></text:p>
          </table:table-cell>
        </table:table-row>
        <table:table-row table:style-name="表格32.1">
          <table:table-cell table:style-name="表格32.A3" office:value-type="string">
            <text:p text:style-name="P29" loext:marker-style-name="T142"><text:span text:style-name="T143">使用情境</text:span><text:span text:style-name="T142"/></text:p>
          </table:table-cell>
          <table:table-cell table:style-name="表格32.A3" office:value-type="string">
            <text:p text:style-name="P29" loext:marker-style-name="T142"><text:span text:style-name="T226">HTTP</text:span><text:span text:style-name="T143">、</text:span><text:span text:style-name="T226">Email</text:span><text:span text:style-name="T143">、</text:span><text:span text:style-name="T226">FTP</text:span></text:p>
          </table:table-cell>
          <table:table-cell table:style-name="表格32.A3" office:value-type="string">
            <text:p text:style-name="P29" loext:marker-style-name="T142"><text:span text:style-name="T143">串流影音、</text:span><text:span text:style-name="T226">VoIP</text:span><text:span text:style-name="T143">、</text:span><text:span text:style-name="T226">DNS</text:span></text:p>
          </table:table-cell>
        </table:table-row>
        <table:table-row table:style-name="表格32.1">
          <table:table-cell table:style-name="表格32.A2" office:value-type="string">
            <text:p text:style-name="P29" loext:marker-style-name="T142"><text:span text:style-name="T143">一句話</text:span><text:span text:style-name="T142"/></text:p>
          </table:table-cell>
          <table:table-cell table:style-name="表格32.A2" office:value-type="string">
            <text:p text:style-name="P29" loext:marker-style-name="T259"><text:span text:style-name="T260">「穩定優先」</text:span><text:span text:style-name="T259"/></text:p>
          </table:table-cell>
          <table:table-cell table:style-name="表格32.A2" office:value-type="string">
            <text:p text:style-name="P29" loext:marker-style-name="T37"><text:span text:style-name="T38">「速度優先」</text:span><text:span text:style-name="T37"/></text:p>
          </table:table-cell>
        </table:table-row>
      </table:table>
      <text:h text:style-name="P11" text:outline-level="2" loext:marker-style-name="T27"><text:span text:style-name="T28">七、</text:span><text:span text:style-name="T27">ARP — </text:span><text:span text:style-name="T28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6"><text:span text:style-name="T247">🔗 <text:s/></text:span><text:span text:style-name="T63">ARP </text:span><text:span text:style-name="T52">重點</text:span></text:p>
            <text:p text:style-name="P7"><text:span text:style-name="T65">ARP </text:span><text:span text:style-name="T57">做什麼？　</text:span><text:span text:style-name="T131">在</text:span><text:span text:style-name="T515">同一個</text:span><text:span text:style-name="T131">區域網路（</text:span><text:span text:style-name="T215">LAN</text:span><text:span text:style-name="T131">）中</text:span><text:span text:style-name="T106">，</text:span><text:span text:style-name="T408">將「</text:span><text:span text:style-name="T416">IP </text:span><text:span text:style-name="T408">位址（邏輯位址）」轉換成「</text:span><text:span text:style-name="T416">MAC </text:span><text:span text:style-name="T408">位址（實體位址）」</text:span><text:span text:style-name="T106">。</text:span></text:p>
            <text:p text:style-name="P8"><text:span text:style-name="T57">為何屬於 </text:span><text:span text:style-name="T65">Link </text:span><text:span text:style-name="T57">層？　</text:span><text:span text:style-name="T398">ARP </text:span><text:span text:style-name="T386">的作用範圍僅限於同一區域網路內，</text:span><text:span text:style-name="T516">無法跨越路由器</text:span><text:span text:style-name="T106">，因此歸屬 </text:span><text:span text:style-name="T194">Link</text:span><text:span text:style-name="T106">（連結）層。</text:span></text:p>
            <text:p text:style-name="P8" loext:marker-style-name="T55"><text:span text:style-name="T57">運作流程：</text:span><text:span text:style-name="T55"/></text:p>
            <text:p text:style-name="P8" loext:marker-style-name="T107"><text:span text:style-name="T194">① </text:span><text:span text:style-name="T135">裝置 </text:span><text:span text:style-name="T219">A </text:span><text:span text:style-name="T135">廣播詢問：</text:span><text:span text:style-name="T106">「</text:span><text:span text:style-name="T131">誰的 </text:span><text:span text:style-name="T215">IP</text:span><text:span text:style-name="T194"> </text:span><text:span text:style-name="T106">是 </text:span><text:span text:style-name="T194">192.168.1.5</text:span><text:span text:style-name="T106">？」</text:span></text:p>
            <text:p text:style-name="P8" loext:marker-style-name="T107"><text:span text:style-name="T194">② </text:span><text:span text:style-name="T136">裝置 </text:span><text:span text:style-name="T220">B </text:span><text:span text:style-name="T136">回應：</text:span><text:span text:style-name="T106">「</text:span><text:span text:style-name="T133">是我！</text:span><text:span text:style-name="T217">MAC </text:span><text:span text:style-name="T133">是</text:span><text:span text:style-name="T106"> </text:span><text:span text:style-name="T194">AA:BB:CC:DD:EE:FF</text:span><text:span text:style-name="T106">」</text:span></text:p>
            <text:p text:style-name="P8" loext:marker-style-name="T107"><text:span text:style-name="T194">③ </text:span><text:span text:style-name="T106">裝置 </text:span><text:span text:style-name="T194">A </text:span><text:span text:style-name="T106">記錄此對應至 </text:span><text:span text:style-name="T194">ARP </text:span><text:span text:style-name="T106">快取，下次直接使用</text:span></text:p>
          </table:table-cell>
        </table:table-row>
      </table:table>
      <text:p text:style-name="P35" loext:marker-style-name="T6"><text:span text:style-name="T7">（</text:span><text:span text:style-name="T16">ARP </text:span><text:span text:style-name="T7">完整流程、</text:span><text:span text:style-name="T16">ARP Spoofing </text:span><text:span text:style-name="T7">與完整上網流程，詳見第四篇。）</text:span></text:p>
      <text:h text:style-name="P11" text:outline-level="2" loext:marker-style-name="T27"><text:span text:style-name="T28">八、</text:span><text:span text:style-name="T27">Traceroute </text:span><text:span text:style-name="T28">原理詳解（</text:span><text:span text:style-name="T27">TTL </text:span><text:span text:style-name="T28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7"><text:span text:style-name="T24">目的：</text:span><text:span text:style-name="T562">找出封包從來源到目的地</text:span><text:span text:style-name="T314">，</text:span><text:span text:style-name="T566">中間經過哪些路由器</text:span><text:span text:style-name="T106">（完整路徑偵測）。</text:span></text:p>
            <text:p text:style-name="P8"><text:span text:style-name="T567">TTL</text:span><text:span text:style-name="T572">（</text:span><text:span text:style-name="T567">Time To Live</text:span><text:span text:style-name="T572">）</text:span><text:span text:style-name="T24">：</text:span><text:span text:style-name="T406">封包的「存活計數器」。每經過一個路由器就減 </text:span><text:span text:style-name="T414">1</text:span><text:span text:style-name="T106">；</text:span><text:span text:style-name="T334">歸零時路由器丟棄封包</text:span><text:span text:style-name="T106">，並</text:span><text:span text:style-name="T445">回傳 </text:span><text:span text:style-name="T467">ICMP Time Exceeded </text:span><text:span text:style-name="T445">給發送方</text:span><text:span text:style-name="T106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" loext:marker-style-name="T75"><text:span text:style-name="T76">封包次數</text:span><text:span text:style-name="T75"/></text:p>
          </table:table-cell>
          <table:table-cell table:style-name="表格34.A2" office:value-type="string">
            <text:p text:style-name="P4" loext:marker-style-name="T75"><text:span text:style-name="T81">TTL </text:span><text:span text:style-name="T76">值</text:span></text:p>
          </table:table-cell>
          <table:table-cell table:style-name="表格34.A2" office:value-type="string">
            <text:p text:style-name="P4" loext:marker-style-name="T75"><text:span text:style-name="T76">發生什麼事</text:span><text:span text:style-name="T75"/></text:p>
          </table:table-cell>
          <table:table-cell table:style-name="表格34.A2" office:value-type="string">
            <text:p text:style-name="P4" loext:marker-style-name="T75"><text:span text:style-name="T76">取得資訊</text:span><text:span text:style-name="T75"/></text:p>
          </table:table-cell>
        </table:table-row>
        <table:table-row table:style-name="表格34.1">
          <table:table-cell table:style-name="表格34.A3" office:value-type="string">
            <text:p text:style-name="P29" loext:marker-style-name="T147"><text:span text:style-name="T148">第 </text:span><text:span text:style-name="T230">1 </text:span><text:span text:style-name="T148">次</text:span></text:p>
          </table:table-cell>
          <table:table-cell table:style-name="表格34.A3" office:value-type="string">
            <text:p text:style-name="P29" loext:marker-style-name="T147"><text:span text:style-name="T230">TTL = 1</text:span><text:span text:style-name="T147"/></text:p>
          </table:table-cell>
          <table:table-cell table:style-name="表格34.A3" office:value-type="string">
            <text:p text:style-name="P29" loext:marker-style-name="T147"><text:span text:style-name="T172">抵達第 </text:span><text:span text:style-name="T240">1 </text:span><text:span text:style-name="T172">個 </text:span><text:span text:style-name="T240">Router </text:span><text:span text:style-name="T230">→ TTL </text:span><text:span text:style-name="T148">歸零 → 回傳 </text:span><text:span text:style-name="T230">ICMP Time Exceeded</text:span></text:p>
          </table:table-cell>
          <table:table-cell table:style-name="表格34.A3" office:value-type="string">
            <text:p text:style-name="P29" loext:marker-style-name="T171"><text:span text:style-name="T169">得知第 </text:span><text:span text:style-name="T238">1 </text:span><text:span text:style-name="T169">站位置</text:span></text:p>
          </table:table-cell>
        </table:table-row>
        <table:table-row table:style-name="表格34.1">
          <table:table-cell table:style-name="表格34.A4" office:value-type="string">
            <text:p text:style-name="P29" loext:marker-style-name="T147"><text:span text:style-name="T148">第 </text:span><text:span text:style-name="T230">2 </text:span><text:span text:style-name="T148">次</text:span></text:p>
          </table:table-cell>
          <table:table-cell table:style-name="表格34.A4" office:value-type="string">
            <text:p text:style-name="P29" loext:marker-style-name="T147"><text:span text:style-name="T230">TTL = 2</text:span><text:span text:style-name="T147"/></text:p>
          </table:table-cell>
          <table:table-cell table:style-name="表格34.A4" office:value-type="string">
            <text:p text:style-name="P29" loext:marker-style-name="T147"><text:span text:style-name="T172">通過第 </text:span><text:span text:style-name="T240">1 </text:span><text:span text:style-name="T172">站 → 抵達第 </text:span><text:span text:style-name="T240">2 </text:span><text:span text:style-name="T172">個 </text:span><text:span text:style-name="T240">Router</text:span><text:span text:style-name="T230"> → TTL </text:span><text:span text:style-name="T148">歸零 → 回傳 </text:span><text:span text:style-name="T230">ICMP</text:span></text:p>
          </table:table-cell>
          <table:table-cell table:style-name="表格34.A4" office:value-type="string">
            <text:p text:style-name="P29" loext:marker-style-name="T171"><text:span text:style-name="T169">得知第 </text:span><text:span text:style-name="T238">2 </text:span><text:span text:style-name="T169">站位置</text:span></text:p>
          </table:table-cell>
        </table:table-row>
        <table:table-row table:style-name="表格34.1">
          <table:table-cell table:style-name="表格34.A3" office:value-type="string">
            <text:p text:style-name="P29" loext:marker-style-name="T147"><text:span text:style-name="T148">第 </text:span><text:span text:style-name="T230">N </text:span><text:span text:style-name="T148">次</text:span></text:p>
          </table:table-cell>
          <table:table-cell table:style-name="表格34.A3" office:value-type="string">
            <text:p text:style-name="P29" loext:marker-style-name="T147"><text:span text:style-name="T230">TTL = N</text:span><text:span text:style-name="T147"/></text:p>
          </table:table-cell>
          <table:table-cell table:style-name="表格34.A3" office:value-type="string">
            <text:p text:style-name="P29" loext:marker-style-name="T147"><text:span text:style-name="T148">以此類推，每次多走一站</text:span><text:span text:style-name="T147"/></text:p>
          </table:table-cell>
          <table:table-cell table:style-name="表格34.A3" office:value-type="string">
            <text:p text:style-name="P29" loext:marker-style-name="T147"><text:span text:style-name="T148">逐步還原完整路徑</text:span><text:span text:style-name="T147"/></text:p>
          </table:table-cell>
        </table:table-row>
        <table:table-row table:style-name="表格34.1">
          <table:table-cell table:style-name="表格34.A4" office:value-type="string">
            <text:p text:style-name="P29" loext:marker-style-name="T147"><text:span text:style-name="T148">最後</text:span><text:span text:style-name="T147"/></text:p>
          </table:table-cell>
          <table:table-cell table:style-name="表格34.A4" office:value-type="string">
            <text:p text:style-name="P29" loext:marker-style-name="T147"><text:span text:style-name="T230">TTL = </text:span><text:span text:style-name="T148">距離</text:span></text:p>
          </table:table-cell>
          <table:table-cell table:style-name="表格34.A4" office:value-type="string">
            <text:p text:style-name="P29" loext:marker-style-name="T147"><text:span text:style-name="T148">封包抵達目的地，回傳正常應答</text:span><text:span text:style-name="T147"/></text:p>
          </table:table-cell>
          <table:table-cell table:style-name="表格34.A4" office:value-type="string">
            <text:p text:style-name="P29" loext:marker-style-name="T147"><text:span text:style-name="T148">路徑偵測完成 ✓</text:span><text:span text:style-name="T147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6"><text:span text:style-name="T247">⚡ <text:s/></text:span><text:span text:style-name="T251">一句話記憶</text:span></text:p>
            <text:p text:style-name="P7" loext:marker-style-name="T107"><text:span text:style-name="T398">Traceroute = TTL </text:span><text:span text:style-name="T386">遞增 ＋ </text:span><text:span text:style-name="T398">ICMP </text:span><text:span text:style-name="T386">回報</text:span><text:span text:style-name="T106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九、本篇考試必背心法</text:span><text:span text:style-name="T27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6"><text:span text:style-name="T247">🔥 <text:s/></text:span><text:span text:style-name="T306">TCP/IP </text:span><text:span text:style-name="T299">四層心法（背這個就夠）</text:span></text:p>
            <text:p text:style-name="P7"><text:span text:style-name="T307">🟢 Application</text:span><text:span text:style-name="T300">（應用層） → </text:span><text:span text:style-name="T106">給人用（</text:span><text:span text:style-name="T194">HTTP</text:span><text:span text:style-name="T106">、</text:span><text:span text:style-name="T194">DNS</text:span><text:span text:style-name="T106">、</text:span><text:span text:style-name="T194">DHCP</text:span><text:span text:style-name="T106">、</text:span><text:span text:style-name="T194">SSH</text:span><text:span text:style-name="T106">、</text:span><text:span text:style-name="T194">MQTT</text:span><text:span text:style-name="T106">）</text:span></text:p>
            <text:p text:style-name="P8"><text:soft-page-break/><text:span text:style-name="T307">🟡 Transport</text:span><text:span text:style-name="T300">（傳輸層） → </text:span><text:span text:style-name="T106">怎麼送（</text:span><text:span text:style-name="T194">TCP</text:span><text:span text:style-name="T106">＝穩定 </text:span><text:span text:style-name="T194">/ UDP</text:span><text:span text:style-name="T106">＝快速）</text:span><text:span text:style-name="T194">(</text:span><text:span text:style-name="T313">切分、編頁碼、確認收件</text:span><text:span text:style-name="T194">)</text:span></text:p>
            <text:p text:style-name="P8"><text:span text:style-name="T307">🔵 Network</text:span><text:span text:style-name="T300">（網路層） → </text:span><text:span text:style-name="T106">走哪條路（</text:span><text:span text:style-name="T194">IP</text:span><text:span text:style-name="T106">、</text:span><text:span text:style-name="T194">ICMP</text:span><text:span text:style-name="T106">）</text:span></text:p>
            <text:p text:style-name="P8"><text:span text:style-name="T307">🟠 Link</text:span><text:span text:style-name="T300">（連結層） → </text:span><text:span text:style-name="T106">同一區網怎麼接（</text:span><text:span text:style-name="T194">Ethernet</text:span><text:span text:style-name="T106">、</text:span><text:span text:style-name="T194">ARP</text:span><text:span text:style-name="T106">）</text:span><text:span text:style-name="T194">(</text:span><text:span text:style-name="T64">ARP</text:span><text:span text:style-name="T65"> </text:span><text:span text:style-name="T57">：</text:span><text:span text:style-name="T131">在</text:span><text:span text:style-name="T515">同一個</text:span><text:span text:style-name="T131">區域網路（</text:span><text:span text:style-name="T215">LAN</text:span><text:span text:style-name="T131">）中</text:span><text:span text:style-name="T106">，</text:span><text:span text:style-name="T408">將「</text:span><text:span text:style-name="T416">IP </text:span><text:span text:style-name="T408">位址（邏輯位址）」轉換成「</text:span><text:span text:style-name="T416">MAC </text:span><text:span text:style-name="T408">位址（實體位址）」</text:span><text:span text:style-name="T194">)</text:span></text:p>
          </table:table-cell>
        </table:table-row>
      </table:table>
      <text:h text:style-name="P17" text:outline-level="1" loext:marker-style-name="T71"><text:span text:style-name="T72">第 二 篇　</text:span><text:span text:style-name="T71">IP </text:span><text:span text:style-name="T72">位址與封包處理：分類 </text:span><text:span text:style-name="T71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6"><text:span text:style-name="T247">📐 <text:s/></text:span><text:span text:style-name="T52">本篇重點</text:span></text:p>
            <text:p text:style-name="P7" loext:marker-style-name="T107"><text:span text:style-name="T106">本篇分兩大主軸：前半談「</text:span><text:span text:style-name="T217">IP </text:span><text:span text:style-name="T133">位址如何劃分</text:span><text:span text:style-name="T106">」（分類、</text:span><text:span text:style-name="T194">CIDR</text:span><text:span text:style-name="T106">、子網計算、</text:span><text:span text:style-name="T194">VLSM</text:span><text:span text:style-name="T106">、</text:span><text:span text:style-name="T194">CIDR </text:span><text:span text:style-name="T106">合併）；後半談「</text:span><text:span text:style-name="T133">封包如何被切割傳送</text:span><text:span text:style-name="T106">」（</text:span><text:span text:style-name="T194">MTU</text:span><text:span text:style-name="T106">、</text:span><text:span text:style-name="T194">Fragmentation</text:span><text:span text:style-name="T106">、</text:span><text:span text:style-name="T194">IP Header</text:span><text:span text:style-name="T106">、</text:span><text:span text:style-name="T194">DF/MF</text:span><text:span text:style-name="T106">、</text:span><text:span text:style-name="T194">PMTUD</text:span><text:span text:style-name="T106">、</text:span><text:span text:style-name="T194">MSS</text:span><text:span text:style-name="T106">、</text:span><text:span text:style-name="T194">Frag DoS</text:span><text:span text:style-name="T106">）。子網計算是計算題必考，務必動手練。</text:span></text:p>
          </table:table-cell>
        </table:table-row>
      </table:table>
      <text:h text:style-name="P11" text:outline-level="2" loext:marker-style-name="T27"><text:span text:style-name="T28">壹、</text:span><text:span text:style-name="T27">IP </text:span><text:span text:style-name="T28">位址基礎</text:span></text:h>
      <text:p text:style-name="P35" loext:marker-style-name="T107"><text:span text:style-name="T215">IP </text:span><text:span text:style-name="T131">位址（</text:span><text:span text:style-name="T215">IPv4</text:span><text:span text:style-name="T131">）是</text:span><text:span text:style-name="T336">一組 </text:span><text:span text:style-name="T358">32 </text:span><text:span text:style-name="T336">個 </text:span><text:span text:style-name="T358">bit</text:span><text:span text:style-name="T106">，用來</text:span><text:span text:style-name="T488">識別網路上每一台設備的「地址」</text:span><text:span text:style-name="T106">。</text:span><text:span text:style-name="T131">為了人類方便閱讀</text:span><text:span text:style-name="T106">，</text:span><text:span text:style-name="T133">這 </text:span><text:span text:style-name="T217">32 </text:span><text:span text:style-name="T133">個 </text:span><text:span text:style-name="T217">bit </text:span><text:span text:style-name="T133">被分成 </text:span><text:span text:style-name="T217">4 </text:span><text:span text:style-name="T133">組</text:span><text:span text:style-name="T106">、</text:span><text:span text:style-name="T386">每組 </text:span><text:span text:style-name="T398">8 </text:span><text:span text:style-name="T386">個 </text:span><text:span text:style-name="T398">bit</text:span><text:span text:style-name="T386">（一個 </text:span><text:span text:style-name="T398">Octet</text:span><text:span text:style-name="T386">），再轉成十進位</text:span><text:span text:style-name="T106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26" loext:marker-style-name="T73"><text:span text:style-name="T80">Octet 1</text:span><text:span text:style-name="T73"/></text:p>
            </table:table-cell>
            <table:table-cell table:style-name="表格37.A1" office:value-type="string">
              <text:p text:style-name="P26" loext:marker-style-name="T73"><text:span text:style-name="T80">Octet 2</text:span><text:span text:style-name="T73"/></text:p>
            </table:table-cell>
            <table:table-cell table:style-name="表格37.A1" office:value-type="string">
              <text:p text:style-name="P26" loext:marker-style-name="T73"><text:span text:style-name="T80">Octet 3</text:span><text:span text:style-name="T73"/></text:p>
            </table:table-cell>
            <table:table-cell table:style-name="表格37.A1" office:value-type="string">
              <text:p text:style-name="P26" loext:marker-style-name="T73"><text:span text:style-name="T80">Octet 4</text:span><text:span text:style-name="T73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9" loext:marker-style-name="T142"><text:span text:style-name="T226">192</text:span><text:span text:style-name="T142"/></text:p>
          </table:table-cell>
          <table:table-cell table:style-name="表格37.A2" office:value-type="string">
            <text:p text:style-name="P29" loext:marker-style-name="T142"><text:span text:style-name="T226">168</text:span><text:span text:style-name="T142"/></text:p>
          </table:table-cell>
          <table:table-cell table:style-name="表格37.A2" office:value-type="string">
            <text:p text:style-name="P29" loext:marker-style-name="T142"><text:span text:style-name="T226">1</text:span><text:span text:style-name="T142"/></text:p>
          </table:table-cell>
          <table:table-cell table:style-name="表格37.A2" office:value-type="string">
            <text:p text:style-name="P29" loext:marker-style-name="T142"><text:span text:style-name="T226">0</text:span><text:span text:style-name="T142"/></text:p>
          </table:table-cell>
        </table:table-row>
      </table:table>
      <text:p text:style-name="P35" loext:marker-style-name="T10"><text:span text:style-name="T20">→ </text:span><text:span text:style-name="T336">總共 </text:span><text:span text:style-name="T358">4 × 8 = 32 </text:span><text:span text:style-name="T336">個 </text:span><text:span text:style-name="T358">bit</text:span><text:span text:style-name="T11">，</text:span><text:span text:style-name="T581">每組數字範圍 </text:span><text:span text:style-name="T582">0</text:span><text:span text:style-name="T581">～</text:span><text:span text:style-name="T582">255</text:span><text:span text:style-name="T11">（因為 </text:span><text:span text:style-name="T582">2⁸ = 256 </text:span><text:span text:style-name="T581">種組合</text:span><text:span text:style-name="T11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6"><text:span text:style-name="T247">💡 <text:s/></text:span><text:span text:style-name="T269">為什麼 </text:span><text:span text:style-name="T273">IP </text:span><text:span text:style-name="T269">數量一定是 </text:span><text:span text:style-name="T273">2 </text:span><text:span text:style-name="T269">的次方？</text:span></text:p>
            <text:p text:style-name="P7" loext:marker-style-name="T107"><text:span text:style-name="T133">每一個 </text:span><text:span text:style-name="T217">bit </text:span><text:span text:style-name="T133">只有 </text:span><text:span text:style-name="T217">0 </text:span><text:span text:style-name="T133">或 </text:span><text:span text:style-name="T217">1 </text:span><text:span text:style-name="T133">兩種狀態</text:span><text:span text:style-name="T106">。若有 </text:span><text:span text:style-name="T194">n </text:span><text:span text:style-name="T106">個 </text:span><text:span text:style-name="T194">bit </text:span><text:span text:style-name="T106">可自由變化，可能的組合數 ＝ </text:span><text:span text:style-name="T194">2ⁿ</text:span><text:span text:style-name="T106">。</text:span></text:p>
            <text:p text:style-name="P8" loext:marker-style-name="T107"><text:span text:style-name="T106">因此</text:span><text:span text:style-name="T314">子網路的 </text:span><text:span text:style-name="T316">IP </text:span><text:span text:style-name="T314">總數一定是 </text:span><text:span text:style-name="T316">2</text:span><text:span text:style-name="T314">、</text:span><text:span text:style-name="T316">4</text:span><text:span text:style-name="T314">、</text:span><text:span text:style-name="T316">8</text:span><text:span text:style-name="T314">、</text:span><text:span text:style-name="T316">16</text:span><text:span text:style-name="T314">、</text:span><text:span text:style-name="T316">32</text:span><text:span text:style-name="T314">、</text:span><text:span text:style-name="T316">64</text:span><text:span text:style-name="T314">、</text:span><text:span text:style-name="T316">128</text:span><text:span text:style-name="T314">、</text:span><text:span text:style-name="T316">256… </text:span><text:span text:style-name="T314">等 </text:span><text:span text:style-name="T316">2 </text:span><text:span text:style-name="T314">的次方</text:span><text:span text:style-name="T106">，不可能是 </text:span><text:span text:style-name="T194">100 </text:span><text:span text:style-name="T106">或 </text:span><text:span text:style-name="T194">50</text:span><text:span text:style-name="T106">。這就是</text:span><text:span text:style-name="T583">計算子網時必須「找最接近的 </text:span><text:span text:style-name="T607">2ⁿ</text:span><text:span text:style-name="T583">」</text:span><text:span text:style-name="T106">的根本原因。</text:span></text:p>
          </table:table-cell>
        </table:table-row>
      </table:table>
      <text:h text:style-name="P11" text:outline-level="2" loext:marker-style-name="T27"><text:span text:style-name="T28">貳、</text:span><text:span text:style-name="T27">IP </text:span><text:span text:style-name="T28">分類（</text:span><text:span text:style-name="T27">A / B / C </text:span><text:span text:style-name="T28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4" loext:marker-style-name="T69"><text:span text:style-name="T70">類別</text:span><text:span text:style-name="T69"/></text:p>
            </table:table-cell>
            <table:table-cell table:style-name="表格39.A1" office:value-type="string">
              <text:p text:style-name="P4" loext:marker-style-name="T69"><text:span text:style-name="T70">第一組數字範圍</text:span><text:span text:style-name="T69"/></text:p>
            </table:table-cell>
            <table:table-cell table:style-name="表格39.A1" office:value-type="string">
              <text:p text:style-name="P4" loext:marker-style-name="T69"><text:span text:style-name="T70">預設遮罩</text:span><text:span text:style-name="T69"/></text:p>
            </table:table-cell>
            <table:table-cell table:style-name="表格39.A1" office:value-type="string">
              <text:p text:style-name="P4" loext:marker-style-name="T69"><text:span text:style-name="T70">用途</text:span><text:span text:style-name="T69"/></text:p>
            </table:table-cell>
            <table:table-cell table:style-name="表格39.A1" office:value-type="string">
              <text:p text:style-name="P4" loext:marker-style-name="T69"><text:span text:style-name="T70">每網路主機數</text:span><text:span text:style-name="T69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9" loext:marker-style-name="T83"><text:span text:style-name="T182">A </text:span><text:span text:style-name="T84">類</text:span></text:p>
          </table:table-cell>
          <table:table-cell table:style-name="表格39.A2" office:value-type="string">
            <text:p text:style-name="P29" loext:marker-style-name="T377"><text:span text:style-name="T391">1 </text:span><text:span text:style-name="T378">～ </text:span><text:span text:style-name="T391">126</text:span></text:p>
          </table:table-cell>
          <table:table-cell table:style-name="表格39.A2" office:value-type="string">
            <text:p text:style-name="P29" loext:marker-style-name="T422"><text:span text:style-name="T423">/8</text:span><text:span text:style-name="T422"/></text:p>
          </table:table-cell>
          <table:table-cell table:style-name="表格39.A2" office:value-type="string">
            <text:p text:style-name="P29" loext:marker-style-name="T83"><text:span text:style-name="T84">超大型網路</text:span><text:span text:style-name="T83"/></text:p>
          </table:table-cell>
          <table:table-cell table:style-name="表格39.A2" office:value-type="string">
            <text:p text:style-name="P29" loext:marker-style-name="T83"><text:span text:style-name="T84">約 </text:span><text:span text:style-name="T182">1,677 </text:span><text:span text:style-name="T84">萬</text:span></text:p>
          </table:table-cell>
        </table:table-row>
        <table:table-row table:style-name="表格39.1">
          <table:table-cell table:style-name="表格39.A3" office:value-type="string">
            <text:p text:style-name="P29" loext:marker-style-name="T83"><text:span text:style-name="T182">B </text:span><text:span text:style-name="T84">類</text:span></text:p>
          </table:table-cell>
          <table:table-cell table:style-name="表格39.A3" office:value-type="string">
            <text:p text:style-name="P29" loext:marker-style-name="T377"><text:span text:style-name="T391">128 </text:span><text:span text:style-name="T378">～ </text:span><text:span text:style-name="T391">191</text:span></text:p>
          </table:table-cell>
          <table:table-cell table:style-name="表格39.A3" office:value-type="string">
            <text:p text:style-name="P29" loext:marker-style-name="T422"><text:span text:style-name="T423">/16</text:span><text:span text:style-name="T422"/></text:p>
          </table:table-cell>
          <table:table-cell table:style-name="表格39.A3" office:value-type="string">
            <text:p text:style-name="P29" loext:marker-style-name="T83"><text:span text:style-name="T84">中型網路</text:span><text:span text:style-name="T83"/></text:p>
          </table:table-cell>
          <table:table-cell table:style-name="表格39.A3" office:value-type="string">
            <text:p text:style-name="P29" loext:marker-style-name="T83"><text:span text:style-name="T84">約 </text:span><text:span text:style-name="T182">6.5 </text:span><text:span text:style-name="T84">萬</text:span></text:p>
          </table:table-cell>
        </table:table-row>
        <table:table-row table:style-name="表格39.1">
          <table:table-cell table:style-name="表格39.A2" office:value-type="string">
            <text:p text:style-name="P29" loext:marker-style-name="T83"><text:span text:style-name="T182">C </text:span><text:span text:style-name="T84">類</text:span></text:p>
          </table:table-cell>
          <table:table-cell table:style-name="表格39.A2" office:value-type="string">
            <text:p text:style-name="P29" loext:marker-style-name="T377"><text:span text:style-name="T391">192 </text:span><text:span text:style-name="T378">～ </text:span><text:span text:style-name="T391">223</text:span></text:p>
          </table:table-cell>
          <table:table-cell table:style-name="表格39.A2" office:value-type="string">
            <text:p text:style-name="P29" loext:marker-style-name="T422"><text:span text:style-name="T423">/24</text:span><text:span text:style-name="T422"/></text:p>
          </table:table-cell>
          <table:table-cell table:style-name="表格39.A2" office:value-type="string">
            <text:p text:style-name="P29" loext:marker-style-name="T83"><text:span text:style-name="T84">小型網路</text:span><text:span text:style-name="T83"/></text:p>
          </table:table-cell>
          <table:table-cell table:style-name="表格39.A2" office:value-type="string">
            <text:p text:style-name="P29" loext:marker-style-name="T83"><text:span text:style-name="T182">254</text:span><text:span text:style-name="T83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7"><text:span text:style-name="T271">127.x.x.x </text:span><text:span text:style-name="T266">為何不在 </text:span><text:span text:style-name="T271">A </text:span><text:span text:style-name="T266">類？　</text:span><text:span text:style-name="T195">127.0.0.1 </text:span><text:span text:style-name="T108">是回送位址（</text:span><text:span text:style-name="T195">Loopback</text:span><text:span text:style-name="T108">），保留給本機自我測試</text:span><text:span text:style-name="T106">；</text:span><text:span text:style-name="T607">ping 127.0.0.1 </text:span><text:span text:style-name="T583">可測本機協定是否正常，故 </text:span><text:span text:style-name="T607">A </text:span><text:span text:style-name="T583">類跳過 </text:span><text:span text:style-name="T607">127</text:span><text:span text:style-name="T106">，只到 </text:span><text:span text:style-name="T194">126</text:span><text:span text:style-name="T106">。</text:span></text:p>
            <text:p text:style-name="P8"><text:span text:style-name="T265">其他保留位址：</text:span><text:span text:style-name="T221">0.x.x.x</text:span><text:span text:style-name="T137">＝代表「這個網路本身」</text:span><text:span text:style-name="T106">；</text:span><text:span text:style-name="T220">224</text:span><text:span text:style-name="T136">～</text:span><text:span text:style-name="T220">239</text:span><text:span text:style-name="T136">＝</text:span><text:span text:style-name="T220">D </text:span><text:span text:style-name="T136">類（群播 </text:span><text:span text:style-name="T220">Multicast</text:span><text:span text:style-name="T136">）</text:span><text:span text:style-name="T106">；</text:span><text:span text:style-name="T217">240</text:span><text:span text:style-name="T133">～</text:span><text:span text:style-name="T217">255</text:span><text:span text:style-name="T133">＝</text:span><text:span text:style-name="T217">E </text:span><text:span text:style-name="T133">類（實驗用）</text:span><text:span text:style-name="T106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參、</text:span><text:span text:style-name="T27">CIDR </text:span><text:span text:style-name="T28">表示法（斜線 </text:span><text:span text:style-name="T27">/</text:span><text:span text:style-name="T28">幾）</text:span></text:h>
      <text:p text:style-name="P35" loext:marker-style-name="T107"><text:span text:style-name="T215">CIDR</text:span><text:span text:style-name="T131">（無類別網域間路由）</text:span><text:span text:style-name="T106">以</text:span><text:span text:style-name="T336">「</text:span><text:span text:style-name="T358">IP + / + </text:span><text:span text:style-name="T336">數字」精確表示網路大小</text:span><text:span text:style-name="T106">，例如 </text:span><text:span text:style-name="T194">192.168.1.0/24</text:span><text:span text:style-name="T106">。</text:span><text:span text:style-name="T398">/ </text:span><text:span text:style-name="T386">後面的數字 ＝ 前幾個 </text:span><text:span text:style-name="T398">bit </text:span><text:span text:style-name="T386">是「網路部分」（固定不變）</text:span><text:span text:style-name="T106">，</text:span><text:span text:style-name="T314">剩下的才是「主機部分」（可變）</text:span><text:span text:style-name="T106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4" loext:marker-style-name="T69"><text:span text:style-name="T70">表示法</text:span><text:span text:style-name="T69"/></text:p>
            </table:table-cell>
            <table:table-cell table:style-name="表格40.A1" office:value-type="string">
              <text:p text:style-name="P4" loext:marker-style-name="T69"><text:span text:style-name="T70">網路 </text:span><text:span text:style-name="T79">bit</text:span></text:p>
            </table:table-cell>
            <table:table-cell table:style-name="表格40.A1" office:value-type="string">
              <text:p text:style-name="P4" loext:marker-style-name="T69"><text:span text:style-name="T70">主機 </text:span><text:span text:style-name="T79">bit</text:span></text:p>
            </table:table-cell>
            <table:table-cell table:style-name="表格40.A1" office:value-type="string">
              <text:p text:style-name="P4" loext:marker-style-name="T69"><text:span text:style-name="T79">IP </text:span><text:span text:style-name="T70">總數</text:span></text:p>
            </table:table-cell>
            <table:table-cell table:style-name="表格40.A1" office:value-type="string">
              <text:p text:style-name="P4" loext:marker-style-name="T69"><text:span text:style-name="T70">對應哪段固定</text:span><text:span text:style-name="T69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9" loext:marker-style-name="T422"><text:span text:style-name="T423">/8</text:span><text:span text:style-name="T422"/></text:p>
          </table:table-cell>
          <table:table-cell table:style-name="表格40.A2" office:value-type="string">
            <text:p text:style-name="P29" loext:marker-style-name="T430"><text:span text:style-name="T458">8</text:span><text:span text:style-name="T430"/></text:p>
          </table:table-cell>
          <table:table-cell table:style-name="表格40.A2" office:value-type="string">
            <text:p text:style-name="P29" loext:marker-style-name="T320"><text:span text:style-name="T353">24</text:span><text:span text:style-name="T320"/></text:p>
          </table:table-cell>
          <table:table-cell table:style-name="表格40.A2" office:value-type="string">
            <text:p text:style-name="P29" loext:marker-style-name="T510"><text:span text:style-name="T506">16,777,216</text:span><text:span text:style-name="T510"/></text:p>
          </table:table-cell>
          <table:table-cell table:style-name="表格40.A2" office:value-type="string">
            <text:p text:style-name="P29" loext:marker-style-name="T83"><text:span text:style-name="T84">第 </text:span><text:span text:style-name="T182">1 </text:span><text:span text:style-name="T84">組（</text:span><text:span text:style-name="T182">A </text:span><text:span text:style-name="T84">類）</text:span></text:p>
          </table:table-cell>
        </table:table-row>
        <table:table-row table:style-name="表格40.1">
          <table:table-cell table:style-name="表格40.A3" office:value-type="string">
            <text:p text:style-name="P29" loext:marker-style-name="T422"><text:span text:style-name="T423">/16</text:span><text:span text:style-name="T422"/></text:p>
          </table:table-cell>
          <table:table-cell table:style-name="表格40.A3" office:value-type="string">
            <text:p text:style-name="P29" loext:marker-style-name="T430"><text:span text:style-name="T458">16</text:span><text:span text:style-name="T430"/></text:p>
          </table:table-cell>
          <table:table-cell table:style-name="表格40.A3" office:value-type="string">
            <text:p text:style-name="P29" loext:marker-style-name="T320"><text:span text:style-name="T353">16</text:span><text:span text:style-name="T320"/></text:p>
          </table:table-cell>
          <table:table-cell table:style-name="表格40.A3" office:value-type="string">
            <text:p text:style-name="P29" loext:marker-style-name="T510"><text:span text:style-name="T506">65,536</text:span><text:span text:style-name="T510"/></text:p>
          </table:table-cell>
          <table:table-cell table:style-name="表格40.A3" office:value-type="string">
            <text:p text:style-name="P29" loext:marker-style-name="T83"><text:span text:style-name="T84">第 </text:span><text:span text:style-name="T182">1-2 </text:span><text:span text:style-name="T84">組（</text:span><text:span text:style-name="T182">B </text:span><text:span text:style-name="T84">類）</text:span></text:p>
          </table:table-cell>
        </table:table-row>
        <table:table-row table:style-name="表格40.1">
          <table:table-cell table:style-name="表格40.A2" office:value-type="string">
            <text:p text:style-name="P29" loext:marker-style-name="T422"><text:span text:style-name="T423">/24</text:span><text:span text:style-name="T422"/></text:p>
          </table:table-cell>
          <table:table-cell table:style-name="表格40.A2" office:value-type="string">
            <text:p text:style-name="P29" loext:marker-style-name="T430"><text:span text:style-name="T458">24</text:span><text:span text:style-name="T430"/></text:p>
          </table:table-cell>
          <table:table-cell table:style-name="表格40.A2" office:value-type="string">
            <text:p text:style-name="P29" loext:marker-style-name="T320"><text:span text:style-name="T353">8</text:span><text:span text:style-name="T320"/></text:p>
          </table:table-cell>
          <table:table-cell table:style-name="表格40.A2" office:value-type="string">
            <text:p text:style-name="P29" loext:marker-style-name="T510"><text:span text:style-name="T506">256</text:span><text:span text:style-name="T510"/></text:p>
          </table:table-cell>
          <table:table-cell table:style-name="表格40.A2" office:value-type="string">
            <text:p text:style-name="P29" loext:marker-style-name="T83"><text:span text:style-name="T84">第 </text:span><text:span text:style-name="T182">1-3 </text:span><text:span text:style-name="T84">組（</text:span><text:span text:style-name="T182">C </text:span><text:span text:style-name="T84">類）</text:span></text:p>
          </table:table-cell>
        </table:table-row>
        <table:table-row table:style-name="表格40.1">
          <table:table-cell table:style-name="表格40.A3" office:value-type="string">
            <text:p text:style-name="P29" loext:marker-style-name="T422"><text:span text:style-name="T423">/25</text:span><text:span text:style-name="T422"/></text:p>
          </table:table-cell>
          <table:table-cell table:style-name="表格40.A3" office:value-type="string">
            <text:p text:style-name="P29" loext:marker-style-name="T430"><text:span text:style-name="T458">25</text:span><text:span text:style-name="T430"/></text:p>
          </table:table-cell>
          <table:table-cell table:style-name="表格40.A3" office:value-type="string">
            <text:p text:style-name="P29" loext:marker-style-name="T320"><text:span text:style-name="T353">7</text:span><text:span text:style-name="T320"/></text:p>
          </table:table-cell>
          <table:table-cell table:style-name="表格40.A3" office:value-type="string">
            <text:p text:style-name="P29" loext:marker-style-name="T510"><text:span text:style-name="T506">128</text:span><text:span text:style-name="T510"/></text:p>
          </table:table-cell>
          <table:table-cell table:style-name="表格40.A3" office:value-type="string">
            <text:p text:style-name="P29" loext:marker-style-name="T83"><text:span text:style-name="T84">第 </text:span><text:span text:style-name="T182">1-3 </text:span><text:span text:style-name="T84">組 </text:span><text:span text:style-name="T182">+ </text:span><text:span text:style-name="T84">第 </text:span><text:span text:style-name="T182">4 </text:span><text:span text:style-name="T84">組前 </text:span><text:span text:style-name="T182">1 bit</text:span></text:p>
          </table:table-cell>
        </table:table-row>
        <table:table-row table:style-name="表格40.1">
          <table:table-cell table:style-name="表格40.A2" office:value-type="string">
            <text:p text:style-name="P29" loext:marker-style-name="T422"><text:span text:style-name="T423">/26</text:span><text:span text:style-name="T422"/></text:p>
          </table:table-cell>
          <table:table-cell table:style-name="表格40.A2" office:value-type="string">
            <text:p text:style-name="P29" loext:marker-style-name="T431"><text:span text:style-name="T459">26</text:span><text:span text:style-name="T431"/></text:p>
          </table:table-cell>
          <table:table-cell table:style-name="表格40.A2" office:value-type="string">
            <text:p text:style-name="P29" loext:marker-style-name="T321"><text:span text:style-name="T354">6</text:span><text:span text:style-name="T321"/></text:p>
          </table:table-cell>
          <table:table-cell table:style-name="表格40.A2" office:value-type="string">
            <text:p text:style-name="P29" loext:marker-style-name="T510"><text:span text:style-name="T506">64</text:span><text:span text:style-name="T510"/></text:p>
          </table:table-cell>
          <table:table-cell table:style-name="表格40.A2" office:value-type="string">
            <text:p text:style-name="P29" loext:marker-style-name="T83"><text:span text:style-name="T84">第 </text:span><text:span text:style-name="T182">1-3 </text:span><text:span text:style-name="T84">組 </text:span><text:span text:style-name="T182">+ </text:span><text:span text:style-name="T84">第 </text:span><text:span text:style-name="T182">4 </text:span><text:span text:style-name="T84">組前 </text:span><text:span text:style-name="T182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9" loext:marker-style-name="T422"><text:span text:style-name="T423">/27</text:span><text:span text:style-name="T422"/></text:p>
          </table:table-cell>
          <table:table-cell table:style-name="表格40.A3" office:value-type="string">
            <text:p text:style-name="P29" loext:marker-style-name="T431"><text:span text:style-name="T459">27</text:span><text:span text:style-name="T431"/></text:p>
          </table:table-cell>
          <table:table-cell table:style-name="表格40.A3" office:value-type="string">
            <text:p text:style-name="P29" loext:marker-style-name="T321"><text:span text:style-name="T354">5</text:span><text:span text:style-name="T321"/></text:p>
          </table:table-cell>
          <table:table-cell table:style-name="表格40.A3" office:value-type="string">
            <text:p text:style-name="P29" loext:marker-style-name="T510"><text:span text:style-name="T506">32</text:span><text:span text:style-name="T510"/></text:p>
          </table:table-cell>
          <table:table-cell table:style-name="表格40.A3" office:value-type="string">
            <text:p text:style-name="P29" loext:marker-style-name="T83"><text:span text:style-name="T84">第 </text:span><text:span text:style-name="T182">1-3 </text:span><text:span text:style-name="T84">組 </text:span><text:span text:style-name="T182">+ </text:span><text:span text:style-name="T84">第 </text:span><text:span text:style-name="T182">4 </text:span><text:span text:style-name="T84">組前 </text:span><text:span text:style-name="T182">3 bit</text:span></text:p>
          </table:table-cell>
        </table:table-row>
        <table:table-row table:style-name="表格40.1">
          <table:table-cell table:style-name="表格40.A2" office:value-type="string">
            <text:p text:style-name="P29" loext:marker-style-name="T422"><text:span text:style-name="T423">/28</text:span><text:span text:style-name="T422"/></text:p>
          </table:table-cell>
          <table:table-cell table:style-name="表格40.A2" office:value-type="string">
            <text:p text:style-name="P29" loext:marker-style-name="T431"><text:span text:style-name="T459">28</text:span><text:span text:style-name="T431"/></text:p>
          </table:table-cell>
          <table:table-cell table:style-name="表格40.A2" office:value-type="string">
            <text:p text:style-name="P29" loext:marker-style-name="T321"><text:span text:style-name="T354">4</text:span><text:span text:style-name="T321"/></text:p>
          </table:table-cell>
          <table:table-cell table:style-name="表格40.A2" office:value-type="string">
            <text:p text:style-name="P29" loext:marker-style-name="T510"><text:span text:style-name="T506">16</text:span><text:span text:style-name="T510"/></text:p>
          </table:table-cell>
          <table:table-cell table:style-name="表格40.A2" office:value-type="string">
            <text:p text:style-name="P29" loext:marker-style-name="T83"><text:span text:style-name="T84">第 </text:span><text:span text:style-name="T182">1-3 </text:span><text:span text:style-name="T84">組 </text:span><text:span text:style-name="T182">+ </text:span><text:span text:style-name="T84">第 </text:span><text:span text:style-name="T182">4 </text:span><text:span text:style-name="T84">組前 </text:span><text:span text:style-name="T182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6"><text:span text:style-name="T247">▸ <text:s/></text:span><text:span text:style-name="T52">用 </text:span><text:span text:style-name="T63">bit </text:span><text:span text:style-name="T52">切割理解 </text:span><text:span text:style-name="T63">/26</text:span></text:p>
            <text:p text:style-name="P7" loext:marker-style-name="T107"><text:span text:style-name="T106">以 </text:span><text:span text:style-name="T194">192.168.1.0</text:span><text:span text:style-name="T195">/26</text:span><text:span text:style-name="T194"> </text:span><text:span text:style-name="T106">為例：</text:span></text:p>
            <text:p text:style-name="P8"><text:span text:style-name="T65">11000000 . 10101000 . 00000001 . 00</text:span><text:span text:style-name="T45">|000000</text:span></text:p>
            <text:p text:style-name="P8" loext:marker-style-name="T107"><text:span text:style-name="T194">└── </text:span><text:span text:style-name="T133">前 </text:span><text:span text:style-name="T217">26 bit</text:span><text:span text:style-name="T133">（固定＝網路）</text:span><text:span text:style-name="T106">──┘ └ </text:span><text:span text:style-name="T336">後 </text:span><text:span text:style-name="T358">6 bit</text:span><text:span text:style-name="T336">（可變＝主機）</text:span><text:span text:style-name="T106">┘</text:span></text:p>
            <text:p text:style-name="P8" loext:marker-style-name="T107"><text:span text:style-name="T194">→ </text:span><text:span text:style-name="T626">主機 </text:span><text:span text:style-name="T632">bit </text:span><text:span text:style-name="T626">有 </text:span><text:span text:style-name="T632">6 </text:span><text:span text:style-name="T626">個 → </text:span><text:span text:style-name="T632">2⁶ = 64 </text:span><text:span text:style-name="T626">個 </text:span><text:span text:style-name="T632">IP</text:span><text:span text:style-name="T106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肆、為什麼可用主機數要「−</text:span><text:span text:style-name="T27">2</text:span><text:span text:style-name="T28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4" loext:marker-style-name="T69"><text:span text:style-name="T70">名稱</text:span><text:span text:style-name="T69"/></text:p>
            </table:table-cell>
            <table:table-cell table:style-name="表格41.A1" office:value-type="string">
              <text:p text:style-name="P4" loext:marker-style-name="T69"><text:span text:style-name="T70">位置</text:span><text:span text:style-name="T69"/></text:p>
            </table:table-cell>
            <table:table-cell table:style-name="表格41.A1" office:value-type="string">
              <text:p text:style-name="P4" loext:marker-style-name="T69"><text:span text:style-name="T70">用途</text:span><text:span text:style-name="T69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9" loext:marker-style-name="T527"><text:span text:style-name="T528">網路位址 </text:span><text:span text:style-name="T547">Network Address</text:span></text:p>
          </table:table-cell>
          <table:table-cell table:style-name="表格41.A2" office:value-type="string">
            <text:p text:style-name="P29" loext:marker-style-name="T377"><text:span text:style-name="T378">第一個 </text:span><text:span text:style-name="T391">IP</text:span><text:span text:style-name="T378">（最小）</text:span></text:p>
          </table:table-cell>
          <table:table-cell table:style-name="表格41.A2" office:value-type="string">
            <text:p text:style-name="P29" loext:marker-style-name="T83"><text:span text:style-name="T84">代表這整個子網路本身，不能分配給設備</text:span><text:span text:style-name="T83"/></text:p>
          </table:table-cell>
        </table:table-row>
        <table:table-row table:style-name="表格41.1">
          <table:table-cell table:style-name="表格41.A3" office:value-type="string">
            <text:p text:style-name="P29" loext:marker-style-name="T527"><text:span text:style-name="T528">廣播位址 </text:span><text:span text:style-name="T547">Broadcast Address</text:span></text:p>
          </table:table-cell>
          <table:table-cell table:style-name="表格41.A3" office:value-type="string">
            <text:p text:style-name="P29" loext:marker-style-name="T377"><text:span text:style-name="T378">最後一個 </text:span><text:span text:style-name="T391">IP</text:span><text:span text:style-name="T378">（最大）</text:span></text:p>
          </table:table-cell>
          <table:table-cell table:style-name="表格41.A3" office:value-type="string">
            <text:p text:style-name="P29" loext:marker-style-name="T83"><text:span text:style-name="T403">送到此位址＝網路內所有設備都收到</text:span><text:span text:style-name="T84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7" loext:marker-style-name="T301"><text:span text:style-name="T302">可用主機數 ＝ </text:span><text:span text:style-name="T308">IP </text:span><text:span text:style-name="T302">總數 − </text:span><text:span text:style-name="T308">2</text:span></text:p>
            <text:p text:style-name="P8" loext:marker-style-name="T107"><text:span text:style-name="T106">【</text:span><text:span text:style-name="T194">/24 </text:span><text:span text:style-name="T106">示範】</text:span><text:span text:style-name="T215">192.168.1.0</text:span><text:span text:style-name="T131">＝網路位址（不能用）</text:span><text:span text:style-name="T106">… </text:span><text:span text:style-name="T220">192.168.1.255</text:span><text:span text:style-name="T136">＝廣播位址（不能用）</text:span><text:span text:style-name="T106">→ </text:span><text:span text:style-name="T573">共 </text:span><text:span text:style-name="T568">256 </text:span><text:span text:style-name="T573">個，可用 </text:span><text:span text:style-name="T568">254 </text:span><text:span text:style-name="T573">個</text:span><text:span text:style-name="T106">。</text:span></text:p>
            <text:p text:style-name="P8" loext:marker-style-name="T107"><text:span text:style-name="T106">【</text:span><text:span text:style-name="T194">/26 </text:span><text:span text:style-name="T106">示範</text:span><text:span text:style-name="T194">·</text:span><text:span text:style-name="T106">最常考】</text:span><text:span text:style-name="T215">192.168.1.0</text:span><text:span text:style-name="T131">＝網路位址</text:span><text:span text:style-name="T106"> … </text:span><text:span text:style-name="T220">192.168.1.63</text:span><text:span text:style-name="T136">＝廣播位址</text:span><text:span text:style-name="T106"> → </text:span><text:span text:style-name="T573">共 </text:span><text:span text:style-name="T568">64 </text:span><text:span text:style-name="T573">個（</text:span><text:span text:style-name="T568">2⁶</text:span><text:span text:style-name="T573">），可用 </text:span><text:span text:style-name="T568">62 </text:span><text:span text:style-name="T573">個</text:span><text:span text:style-name="T106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7"><text:span text:style-name="T267">唯一例外 </text:span><text:span text:style-name="T272">/31</text:span><text:span text:style-name="T267">（點對點，</text:span><text:span text:style-name="T272">RFC 3021</text:span><text:span text:style-name="T267">）：</text:span><text:span text:style-name="T446">只有 </text:span><text:span text:style-name="T468">2 </text:span><text:span text:style-name="T446">個 </text:span><text:span text:style-name="T468">IP</text:span><text:span text:style-name="T455">，</text:span><text:span text:style-name="T446">兩個都可用作主機</text:span><text:span text:style-name="T336">，沒有網路位址和廣播位址</text:span><text:span text:style-name="T106">。考試若未特別提到，預設仍要 −</text:span><text:span text:style-name="T194">2</text:span><text:span text:style-name="T106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伍、</text:span><text:span text:style-name="T27">VLSM</text:span><text:span text:style-name="T28">（可變長度子網路遮罩）</text:span></text:h>
      <text:p text:style-name="P35" loext:marker-style-name="T107"><text:span text:style-name="T194">VLSM </text:span><text:span text:style-name="T106">的做法：</text:span><text:span text:style-name="T131">依各部門「實際需求」分配</text:span><text:span text:style-name="T490">剛剛好大小</text:span><text:span text:style-name="T131">的子網路，</text:span><text:span text:style-name="T535">不多給、不浪費</text:span><text:span text:style-name="T106">。例如 </text:span><text:span text:style-name="T194">A </text:span><text:span text:style-name="T106">部門 </text:span><text:span text:style-name="T194">100 </text:span><text:span text:style-name="T106">台、</text:span><text:span text:style-name="T194">B </text:span><text:span text:style-name="T106">部門 </text:span><text:span text:style-name="T194">50 </text:span><text:span text:style-name="T106">台、</text:span><text:span text:style-name="T194">C </text:span><text:span text:style-name="T106">部門 </text:span><text:span text:style-name="T194">10 </text:span><text:span text:style-name="T106">台，</text:span><text:span text:style-name="T447">若全用 </text:span><text:span text:style-name="T469">/24 </text:span><text:span text:style-name="T447">會浪費大量 </text:span><text:span text:style-name="T469">IP</text:span><text:span text:style-name="T106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6"><text:span text:style-name="T247">📋 <text:s/></text:span><text:span text:style-name="T261">VLSM </text:span><text:span text:style-name="T251">標準流程（三步驟）</text:span></text:p>
            <text:p text:style-name="P7" loext:marker-style-name="T255"><text:span text:style-name="T262">①</text:span><text:span text:style-name="T264"> </text:span><text:span text:style-name="T256">將需求由大到小排序</text:span></text:p>
            <text:p text:style-name="P8"><text:span text:style-name="T262">② </text:span><text:span text:style-name="T256">計算每個需求所需前綴</text:span><text:span text:style-name="T254">：</text:span><text:span text:style-name="T515">需求 </text:span><text:span text:style-name="T517">+ 2 → </text:span><text:span text:style-name="T515">找最小 </text:span><text:span text:style-name="T517">2ⁿ → </text:span><text:span text:style-name="T515">前綴 </text:span><text:span text:style-name="T517">= 32 − n</text:span></text:p>
            <text:p text:style-name="P8" loext:marker-style-name="T255"><text:span text:style-name="T262">③ </text:span><text:span text:style-name="T254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7"><text:span text:style-name="T265">為什麼要「由大到小」？　</text:span><text:span text:style-name="T106">因為「對齊（</text:span><text:span text:style-name="T194">Alignment</text:span><text:span text:style-name="T106">）」：</text:span><text:span text:style-name="T336">子網路的起始位址必須是其大小的整數倍</text:span><text:span text:style-name="T106">。</text:span><text:span text:style-name="T635">大小 </text:span><text:span text:style-name="T650">128 </text:span><text:span text:style-name="T635">的子網只能從 </text:span><text:span text:style-name="T650">0</text:span><text:span text:style-name="T635">、</text:span><text:span text:style-name="T650">128… </text:span><text:span text:style-name="T635">開始；大小 </text:span><text:span text:style-name="T650">64 </text:span><text:span text:style-name="T635">的只能從 </text:span><text:span text:style-name="T650">0</text:span><text:span text:style-name="T635">、</text:span><text:span text:style-name="T650">64</text:span><text:span text:style-name="T635">、</text:span><text:span text:style-name="T650">128… </text:span><text:span text:style-name="T635">開始</text:span><text:span text:style-name="T106">。</text:span></text:p>
            <text:p text:style-name="P8"><text:span text:style-name="T265">反面示範：</text:span><text:span text:style-name="T106">若先切小的 </text:span><text:span text:style-name="T194">C</text:span><text:span text:style-name="T106">（</text:span><text:span text:style-name="T194">/28</text:span><text:span text:style-name="T106">，</text:span><text:span text:style-name="T194">0</text:span><text:span text:style-name="T106">～</text:span><text:span text:style-name="T194">15</text:span><text:span text:style-name="T106">），</text:span><text:span text:style-name="T491">再切大的 </text:span><text:span text:style-name="T499">A</text:span><text:span text:style-name="T491">（</text:span><text:span text:style-name="T499">/25</text:span><text:span text:style-name="T491">，</text:span><text:span text:style-name="T499">128 </text:span><text:span text:style-name="T491">個），最近可用對齊位址是 </text:span><text:span text:style-name="T499">128</text:span><text:span text:style-name="T194"> → </text:span><text:span text:style-name="T337">中間 </text:span><text:span text:style-name="T360">16</text:span><text:span text:style-name="T337">～</text:span><text:span text:style-name="T360">127 </text:span><text:span text:style-name="T337">共 </text:span><text:span text:style-name="T360">112 </text:span><text:span text:style-name="T337">個 </text:span><text:span text:style-name="T360">IP </text:span><text:span text:style-name="T337">全浪費！</text:span><text:span text:style-name="T106">正解：</text:span><text:span text:style-name="T386">先切大的，大的天然對齊，小的再從後面切</text:span><text:span text:style-name="T106">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2">前綴計算公式詳解</text:span><text:span text:style-name="T251">（以</text:span><text:span text:style-name="T544">需要 </text:span><text:span text:style-name="T545">100 </text:span><text:span text:style-name="T544">台主機為例</text:span><text:span text:style-name="T251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7" loext:marker-style-name="T107"><text:span text:style-name="T194">① </text:span><text:span text:style-name="T133">加 </text:span><text:span text:style-name="T217">2</text:span><text:span text:style-name="T133">（預留網路 </text:span><text:span text:style-name="T217">+ </text:span><text:span text:style-name="T133">廣播）</text:span><text:span text:style-name="T106">：</text:span><text:span text:style-name="T195">100 + 2 = 102</text:span></text:p>
            <text:p text:style-name="P8" loext:marker-style-name="T107"><text:span text:style-name="T194">② </text:span><text:span text:style-name="T110">找「大於等於 </text:span><text:span text:style-name="T197">102</text:span><text:span text:style-name="T110">」的最小 </text:span><text:span text:style-name="T197">2ⁿ</text:span><text:span text:style-name="T106">：</text:span><text:span text:style-name="T194">2⁶ = 64</text:span><text:span text:style-name="T106">（太小）、</text:span><text:span text:style-name="T358">2⁷ = 128</text:span><text:span text:style-name="T336">（夠）→ </text:span><text:span text:style-name="T358">n = 7</text:span></text:p>
            <text:p text:style-name="P8" loext:marker-style-name="T107"><text:span text:style-name="T194">③ </text:span><text:span text:style-name="T386">前綴 </text:span><text:span text:style-name="T398">= 32 − n = 32 − 7 = 25</text:span><text:span text:style-name="T194"> →</text:span><text:span text:style-name="T477"> </text:span><text:span text:style-name="T448">使用 </text:span><text:span text:style-name="T470">/25</text:span><text:span text:style-name="T448">（驗證：</text:span><text:span text:style-name="T470">2⁷ = 128</text:span><text:span text:style-name="T448">，可用 </text:span><text:span text:style-name="T470">126 ≥ 100 ✔</text:span><text:span text:style-name="T448">）</text:span></text:p>
            <text:p text:style-name="P8" loext:marker-style-name="T25"><text:span text:style-name="T26">公式一句話</text:span><text:span text:style-name="T24">：</text:span><text:span text:style-name="T574">需求 </text:span><text:span text:style-name="T569">+2 → </text:span><text:span text:style-name="T574">找最小 </text:span><text:span text:style-name="T569">2ⁿ</text:span><text:span text:style-name="T45"> → </text:span><text:span text:style-name="T358">/(32−n)</text:span></text:p>
          </table:table-cell>
        </table:table-row>
      </table:table>
      <text:h text:style-name="P12" text:outline-level="3"><text:soft-page-break/><text:span text:style-name="T249">▍</text:span><text:span text:style-name="T250"> </text:span><text:span text:style-name="T251">完整範例：起始 </text:span><text:span text:style-name="T250">192.168.1.0/24</text:span><text:span text:style-name="T251">，需求 </text:span><text:span text:style-name="T250">A=100</text:span><text:span text:style-name="T251">、</text:span><text:span text:style-name="T250">B=50</text:span><text:span text:style-name="T251">、</text:span><text:span text:style-name="T250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" loext:marker-style-name="T75"><text:span text:style-name="T76">部門</text:span><text:span text:style-name="T75"/></text:p>
            </table:table-cell>
            <table:table-cell table:style-name="表格44.A1" office:value-type="string">
              <text:p text:style-name="P4" loext:marker-style-name="T75"><text:span text:style-name="T76">需求</text:span><text:span text:style-name="T75"/></text:p>
            </table:table-cell>
            <table:table-cell table:style-name="表格44.A1" office:value-type="string">
              <text:p text:style-name="P4" loext:marker-style-name="T75"><text:span text:style-name="T81">+2</text:span><text:span text:style-name="T75"/></text:p>
            </table:table-cell>
            <table:table-cell table:style-name="表格44.A1" office:value-type="string">
              <text:p text:style-name="P4" loext:marker-style-name="T75"><text:span text:style-name="T81">2ⁿ</text:span><text:span text:style-name="T75"/></text:p>
            </table:table-cell>
            <table:table-cell table:style-name="表格44.A1" office:value-type="string">
              <text:p text:style-name="P4" loext:marker-style-name="T75"><text:span text:style-name="T76">前綴</text:span><text:span text:style-name="T75"/></text:p>
            </table:table-cell>
            <table:table-cell table:style-name="表格44.A1" office:value-type="string">
              <text:p text:style-name="P4" loext:marker-style-name="T75"><text:span text:style-name="T76">切割結果（範圍）</text:span><text:span text:style-name="T75"/></text:p>
            </table:table-cell>
            <table:table-cell table:style-name="表格44.A1" office:value-type="string">
              <text:p text:style-name="P4" loext:marker-style-name="T75"><text:span text:style-name="T76">可用 </text:span><text:span text:style-name="T81">/ </text:span><text:span text:style-name="T76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9" loext:marker-style-name="T147"><text:span text:style-name="T230">A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00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02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28</text:span><text:span text:style-name="T148">（</text:span><text:span text:style-name="T230">2</text:span><text:span text:style-name="T238">⁷</text:span><text:span text:style-name="T148">）</text:span></text:p>
          </table:table-cell>
          <table:table-cell table:style-name="表格44.A2" office:value-type="string">
            <text:p text:style-name="P29" loext:marker-style-name="T174"><text:span text:style-name="T240">/25</text:span><text:span text:style-name="T174"/></text:p>
          </table:table-cell>
          <table:table-cell table:style-name="表格44.A2" office:value-type="string">
            <text:p text:style-name="P29" loext:marker-style-name="T147"><text:span text:style-name="T230">192.168.1.0</text:span><text:span text:style-name="T240">/25</text:span><text:span text:style-name="T148">（</text:span><text:span text:style-name="T230">0</text:span><text:span text:style-name="T148">～</text:span><text:span text:style-name="T463">127</text:span><text:span text:style-name="T148">）</text:span></text:p>
          </table:table-cell>
          <table:table-cell table:style-name="表格44.A2" office:value-type="string">
            <text:p text:style-name="P29" loext:marker-style-name="T147"><text:span text:style-name="T230">126 ≥ 100 ✔</text:span><text:span text:style-name="T147"/></text:p>
          </table:table-cell>
        </table:table-row>
        <table:table-row table:style-name="表格44.1">
          <table:table-cell table:style-name="表格44.A3" office:value-type="string">
            <text:p text:style-name="P29" loext:marker-style-name="T147"><text:span text:style-name="T230">B</text:span><text:span text:style-name="T147"/></text:p>
          </table:table-cell>
          <table:table-cell table:style-name="表格44.A3" office:value-type="string">
            <text:p text:style-name="P29" loext:marker-style-name="T147"><text:span text:style-name="T230">50</text:span><text:span text:style-name="T147"/></text:p>
          </table:table-cell>
          <table:table-cell table:style-name="表格44.A3" office:value-type="string">
            <text:p text:style-name="P29" loext:marker-style-name="T147"><text:span text:style-name="T230">52</text:span><text:span text:style-name="T147"/></text:p>
          </table:table-cell>
          <table:table-cell table:style-name="表格44.A3" office:value-type="string">
            <text:p text:style-name="P29" loext:marker-style-name="T147"><text:span text:style-name="T230">64</text:span><text:span text:style-name="T148">（</text:span><text:span text:style-name="T230">2</text:span><text:span text:style-name="T238">⁶</text:span><text:span text:style-name="T148">）</text:span></text:p>
          </table:table-cell>
          <table:table-cell table:style-name="表格44.A3" office:value-type="string">
            <text:p text:style-name="P29" loext:marker-style-name="T174"><text:span text:style-name="T240">/26</text:span><text:span text:style-name="T174"/></text:p>
          </table:table-cell>
          <table:table-cell table:style-name="表格44.A3" office:value-type="string">
            <text:p text:style-name="P29" loext:marker-style-name="T147"><text:span text:style-name="T230">192.168.1.128</text:span><text:span text:style-name="T240">/26</text:span><text:span text:style-name="T148">（</text:span><text:span text:style-name="T230">128</text:span><text:span text:style-name="T148">～</text:span><text:span text:style-name="T463">191</text:span><text:span text:style-name="T148">）</text:span></text:p>
          </table:table-cell>
          <table:table-cell table:style-name="表格44.A3" office:value-type="string">
            <text:p text:style-name="P29" loext:marker-style-name="T147"><text:span text:style-name="T230">62 ≥ 50 ✔</text:span><text:span text:style-name="T147"/></text:p>
          </table:table-cell>
        </table:table-row>
        <table:table-row table:style-name="表格44.1">
          <table:table-cell table:style-name="表格44.A2" office:value-type="string">
            <text:p text:style-name="P29" loext:marker-style-name="T147"><text:span text:style-name="T230">C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0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2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6</text:span><text:span text:style-name="T148">（</text:span><text:span text:style-name="T230">2</text:span><text:span text:style-name="T238">⁴</text:span><text:span text:style-name="T148">）</text:span></text:p>
          </table:table-cell>
          <table:table-cell table:style-name="表格44.A2" office:value-type="string">
            <text:p text:style-name="P29" loext:marker-style-name="T174"><text:span text:style-name="T240">/28</text:span><text:span text:style-name="T174"/></text:p>
          </table:table-cell>
          <table:table-cell table:style-name="表格44.A2" office:value-type="string">
            <text:p text:style-name="P29" loext:marker-style-name="T147"><text:span text:style-name="T230">192.168.1.192</text:span><text:span text:style-name="T240">/28</text:span><text:span text:style-name="T148">（</text:span><text:span text:style-name="T230">192</text:span><text:span text:style-name="T148">～</text:span><text:span text:style-name="T463">207</text:span><text:span text:style-name="T148">）</text:span></text:p>
          </table:table-cell>
          <table:table-cell table:style-name="表格44.A2" office:value-type="string">
            <text:p text:style-name="P29" loext:marker-style-name="T147"><text:span text:style-name="T230">14 ≥ 10 ✔</text:span><text:span text:style-name="T147"/></text:p>
          </table:table-cell>
        </table:table-row>
      </table:table>
      <text:p text:style-name="P35" loext:marker-style-name="T10"><text:span text:style-name="T11">剩餘 </text:span><text:span text:style-name="T20">192.168.1.208 </text:span><text:span text:style-name="T11">～ </text:span><text:span text:style-name="T20">.255</text:span><text:span text:style-name="T11">（</text:span><text:span text:style-name="T20">48 </text:span><text:span text:style-name="T11">個 </text:span><text:span text:style-name="T20">IP</text:span><text:span text:style-name="T11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6"><text:span text:style-name="T247">💡 <text:s/></text:span><text:span text:style-name="T299">考試技巧</text:span></text:p>
            <text:p text:style-name="P7" loext:marker-style-name="T107"><text:span text:style-name="T449">快速判斷一個 </text:span><text:span text:style-name="T471">IP </text:span><text:span text:style-name="T449">屬於哪個 </text:span><text:span text:style-name="T471">/26 </text:span><text:span text:style-name="T449">子網</text:span><text:span text:style-name="T106">（</text:span><text:span text:style-name="T336">每段 </text:span><text:span text:style-name="T358">64 </text:span><text:span text:style-name="T336">個，起點 </text:span><text:span text:style-name="T358">0</text:span><text:span text:style-name="T336">、</text:span><text:span text:style-name="T358">64</text:span><text:span text:style-name="T336">、</text:span><text:span text:style-name="T358">128</text:span><text:span text:style-name="T336">、</text:span><text:span text:style-name="T358">192</text:span><text:span text:style-name="T106">）：</text:span><text:span text:style-name="T131">看最後一個 </text:span><text:span text:style-name="T215">Octet </text:span><text:span text:style-name="T131">落在哪個區間 </text:span><text:span text:style-name="T106">→</text:span></text:p>
            <text:p text:style-name="P8" loext:marker-style-name="T107"><text:span text:style-name="T217">0</text:span><text:span text:style-name="T133">～</text:span><text:span text:style-name="T217">63</text:span><text:span text:style-name="T194"> → x.0/26</text:span><text:span text:style-name="T106">　｜　</text:span><text:span text:style-name="T217">64</text:span><text:span text:style-name="T133">～</text:span><text:span text:style-name="T217">127</text:span><text:span text:style-name="T194"> → x.64/26</text:span><text:span text:style-name="T106">　｜　</text:span><text:span text:style-name="T217">128</text:span><text:span text:style-name="T133">～</text:span><text:span text:style-name="T217">191</text:span><text:span text:style-name="T194"> → x.128/26</text:span><text:span text:style-name="T106">　｜　</text:span><text:span text:style-name="T217">192</text:span><text:span text:style-name="T133">～</text:span><text:span text:style-name="T217">255</text:span><text:span text:style-name="T194"> → x.192/26</text:span></text:p>
          </table:table-cell>
        </table:table-row>
      </table:table>
      <text:h text:style-name="P11" text:outline-level="2" loext:marker-style-name="T27"><text:span text:style-name="T28">陸、</text:span><text:span text:style-name="T27">CIDR</text:span><text:span text:style-name="T28">（路由聚合 </text:span><text:span text:style-name="T27">/ </text:span><text:span text:style-name="T28">超網合併）</text:span></text:h>
      <text:p text:style-name="P35" loext:marker-style-name="T107"><text:span text:style-name="T194">CIDR </text:span><text:span text:style-name="T106">的合併功能是 </text:span><text:span text:style-name="T194">VLSM </text:span><text:span text:style-name="T106">的「反向操作」：</text:span><text:span text:style-name="T500">VLSM </text:span><text:span text:style-name="T488">把大網路切小</text:span><text:span text:style-name="T106">；</text:span><text:span text:style-name="T472">CIDR </text:span><text:span text:style-name="T450">合併把小網路合成一個大網路表示</text:span><text:span text:style-name="T106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6"><text:span text:style-name="T247">🔑 </text:span><text:span text:style-name="T248"><text:s/></text:span><text:span text:style-name="T253">合併三條件（缺一不可）</text:span></text:p>
            <text:p text:style-name="P7"><text:span text:style-name="T262">① </text:span><text:span text:style-name="T256">連續（</text:span><text:span text:style-name="T264">Contiguous</text:span><text:span text:style-name="T256">）</text:span><text:span text:style-name="T254">：</text:span><text:span text:style-name="T358">IP </text:span><text:span text:style-name="T336">範圍必須緊鄰</text:span><text:span text:style-name="T106">，</text:span><text:span text:style-name="T386">中間不能有空缺</text:span><text:span text:style-name="T106">。</text:span></text:p>
            <text:p text:style-name="P8"><text:span text:style-name="T262">② </text:span><text:span text:style-name="T256">數量是 </text:span><text:span text:style-name="T264">2ⁿ</text:span><text:span text:style-name="T254">：</text:span><text:span text:style-name="T194">2</text:span><text:span text:style-name="T106">、</text:span><text:span text:style-name="T194">4</text:span><text:span text:style-name="T106">、</text:span><text:span text:style-name="T194">8…</text:span><text:span text:style-name="T106">。</text:span></text:p>
            <text:p text:style-name="P8"><text:span text:style-name="T262">③ </text:span><text:span text:style-name="T256">起始位址對齊</text:span><text:span text:style-name="T254">：</text:span><text:span text:style-name="T106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6"><text:span text:style-name="T247">▸ <text:s/></text:span><text:span text:style-name="T52">合併範例與反例</text:span></text:p>
            <text:p text:style-name="P7"><text:span text:style-name="T130">範例：</text:span><text:span text:style-name="T473">2 </text:span><text:span text:style-name="T451">個 </text:span><text:span text:style-name="T473">/25 → 1 </text:span><text:span text:style-name="T451">個 </text:span><text:span text:style-name="T473">/24</text:span><text:span text:style-name="T130">　</text:span><text:span text:style-name="T194">192.168.1</text:span><text:span text:style-name="T215">.0</text:span><text:span text:style-name="T194">/25 </text:span><text:span text:style-name="T106">＋ </text:span><text:span text:style-name="T194">192.168.1</text:span><text:span text:style-name="T215">.128</text:span><text:span text:style-name="T194">/25 → ① </text:span><text:span text:style-name="T106">緊鄰✔ ② </text:span><text:span text:style-name="T194">2 </text:span><text:span text:style-name="T106">個（</text:span><text:span text:style-name="T194">2¹</text:span><text:span text:style-name="T106">）✔ ③ 起點 </text:span><text:span text:style-name="T194">.0</text:span><text:span text:style-name="T106">，</text:span><text:span text:style-name="T194">0÷256=0✔ → </text:span><text:span text:style-name="T106">合併為 </text:span><text:span text:style-name="T194">192.168.1</text:span><text:span text:style-name="T215">.0</text:span><text:span text:style-name="T194">/24</text:span><text:span text:style-name="T106">。</text:span></text:p>
            <text:p text:style-name="P8"><text:span text:style-name="T130">範例：</text:span><text:span text:style-name="T473">4 </text:span><text:span text:style-name="T451">個 </text:span><text:span text:style-name="T473">/24 → 1 </text:span><text:span text:style-name="T451">個 </text:span><text:span text:style-name="T473">/22</text:span><text:span text:style-name="T130">　</text:span><text:span text:style-name="T194">192.168</text:span><text:span text:style-name="T217">.0/1/2/3</text:span><text:span text:style-name="T194">.0/</text:span><text:span text:style-name="T195">24</text:span><text:span text:style-name="T194"> → </text:span><text:span text:style-name="T106">連續✔、</text:span><text:span text:style-name="T194">4 </text:span><text:span text:style-name="T106">個（</text:span><text:span text:style-name="T194">2²</text:span><text:span text:style-name="T106">）✔、對齊✔ → 合併為 </text:span><text:span text:style-name="T194">192.168</text:span><text:span text:style-name="T197">.0</text:span><text:span text:style-name="T194">.0/</text:span><text:span text:style-name="T195">22</text:span><text:span text:style-name="T106">。</text:span></text:p>
            <text:p text:style-name="P8"><text:span text:style-name="T279">反例（無法合併）：</text:span><text:span text:style-name="T552">192.168.1.0/24 </text:span><text:span text:style-name="T536">＋ </text:span><text:span text:style-name="T552">192.168.2.0/24 → </text:span><text:span text:style-name="T536">雖數量為 </text:span><text:span text:style-name="T552">2</text:span><text:span text:style-name="T536">，但起點 </text:span><text:span text:style-name="T552">.1 </text:span><text:span text:style-name="T536">不對齊</text:span><text:span text:style-name="T106">（</text:span><text:span text:style-name="T194">/23 </text:span><text:span text:style-name="T106">起點只能是偶數倍 </text:span><text:span text:style-name="T194">.0 </text:span><text:span text:style-name="T106">或 </text:span><text:span text:style-name="T194">.2</text:span><text:span text:style-name="T106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7"><text:span text:style-name="T300">合併後前綴公式：</text:span><text:span text:style-name="T106">合併 </text:span><text:span text:style-name="T194">2ⁿ </text:span><text:span text:style-name="T106">個子網 → 前綴減 </text:span><text:span text:style-name="T194">n</text:span><text:span text:style-name="T106">（</text:span><text:span text:style-name="T386">每合併一倍，</text:span><text:span text:style-name="T398">/ </text:span><text:span text:style-name="T386">的數字減 </text:span><text:span text:style-name="T398">1</text:span><text:span text:style-name="T106">）。</text:span></text:p>
            <text:p text:style-name="P8" loext:marker-style-name="T107"><text:span text:style-name="T608">2 </text:span><text:span text:style-name="T584">個 </text:span><text:span text:style-name="T608">/26 → /25</text:span><text:span text:style-name="T584">；</text:span><text:span text:style-name="T608">4 </text:span><text:span text:style-name="T584">個 </text:span><text:span text:style-name="T608">/26 → /24</text:span><text:span text:style-name="T584">；</text:span><text:span text:style-name="T608">2 </text:span><text:span text:style-name="T584">個 </text:span><text:span text:style-name="T608">/24 → /23</text:span><text:span text:style-name="T106">。</text:span></text:p>
          </table:table-cell>
        </table:table-row>
      </table:table>
      <text:h text:style-name="P11" text:outline-level="2" loext:marker-style-name="T27"><text:span text:style-name="T28">柒、子網路三大概念與解題流程</text:span><text:span text:style-name="T27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4" loext:marker-style-name="T69"><text:span text:style-name="T70">概念</text:span><text:span text:style-name="T69"/></text:p>
            </table:table-cell>
            <table:table-cell table:style-name="表格47.A1" office:value-type="string">
              <text:p text:style-name="P4" loext:marker-style-name="T69"><text:span text:style-name="T70">關鍵字</text:span><text:span text:style-name="T69"/></text:p>
            </table:table-cell>
            <table:table-cell table:style-name="表格47.A1" office:value-type="string">
              <text:p text:style-name="P4" loext:marker-style-name="T69"><text:span text:style-name="T70">核心規則</text:span><text:span text:style-name="T69"/></text:p>
            </table:table-cell>
            <table:table-cell table:style-name="表格47.A1" office:value-type="string">
              <text:p text:style-name="P4" loext:marker-style-name="T69"><text:span text:style-name="T70">比喻</text:span><text:span text:style-name="T69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9" loext:marker-style-name="T83"><text:span text:style-name="T182">IP </text:span><text:span text:style-name="T84">分類</text:span></text:p>
          </table:table-cell>
          <table:table-cell table:style-name="表格47.A2" office:value-type="string">
            <text:p text:style-name="P29" loext:marker-style-name="T83"><text:span text:style-name="T182">A/B/C </text:span><text:span text:style-name="T84">類</text:span></text:p>
          </table:table-cell>
          <table:table-cell table:style-name="表格47.A2" office:value-type="string">
            <text:p text:style-name="P29" loext:marker-style-name="T377"><text:span text:style-name="T378">看第一組數字判斷類別</text:span><text:span text:style-name="T377"/></text:p>
          </table:table-cell>
          <table:table-cell table:style-name="表格47.A2" office:value-type="string">
            <text:p text:style-name="P29" loext:marker-style-name="T83"><text:span text:style-name="T84">土地大小分類</text:span><text:span text:style-name="T83"/></text:p>
          </table:table-cell>
        </table:table-row>
        <table:table-row table:style-name="表格47.1">
          <table:table-cell table:style-name="表格47.A3" office:value-type="string">
            <text:p text:style-name="P29" loext:marker-style-name="T83"><text:span text:style-name="T182">VLSM</text:span><text:span text:style-name="T83"/></text:p>
          </table:table-cell>
          <table:table-cell table:style-name="表格47.A3" office:value-type="string">
            <text:p text:style-name="P29" loext:marker-style-name="T83"><text:span text:style-name="T84">切子網路</text:span><text:span text:style-name="T83"/></text:p>
          </table:table-cell>
          <table:table-cell table:style-name="表格47.A3" office:value-type="string">
            <text:p text:style-name="P29" loext:marker-style-name="T83"><text:span text:style-name="T92">由大到小</text:span><text:span text:style-name="T84">；</text:span><text:span text:style-name="T319">需求</text:span><text:span text:style-name="T352">+2→2ⁿ→/(32−n)</text:span></text:p>
          </table:table-cell>
          <table:table-cell table:style-name="表格47.A3" office:value-type="string">
            <text:p text:style-name="P29" loext:marker-style-name="T83"><text:span text:style-name="T84">把大地切成不同大小的小塊</text:span><text:span text:style-name="T83"/></text:p>
          </table:table-cell>
        </table:table-row>
        <table:table-row table:style-name="表格47.1">
          <table:table-cell table:style-name="表格47.A2" office:value-type="string">
            <text:p text:style-name="P29" loext:marker-style-name="T83"><text:span text:style-name="T182">CIDR </text:span><text:span text:style-name="T84">合併</text:span></text:p>
          </table:table-cell>
          <table:table-cell table:style-name="表格47.A2" office:value-type="string">
            <text:p text:style-name="P29" loext:marker-style-name="T83"><text:span text:style-name="T84">聚合路由</text:span><text:span text:style-name="T83"/></text:p>
          </table:table-cell>
          <table:table-cell table:style-name="表格47.A2" office:value-type="string">
            <text:p text:style-name="P29" loext:marker-style-name="T83"><text:span text:style-name="T378">連續</text:span><text:span text:style-name="T84"> </text:span><text:span text:style-name="T182">+ </text:span><text:span text:style-name="T84">數量 </text:span><text:span text:style-name="T182">2ⁿ + </text:span><text:span text:style-name="T84">對齊；</text:span><text:span text:style-name="T96">前綴減 </text:span><text:span text:style-name="T187">n</text:span></text:p>
          </table:table-cell>
          <table:table-cell table:style-name="表格47.A2" office:value-type="string">
            <text:p text:style-name="P29" loext:marker-style-name="T83"><text:span text:style-name="T84">把相鄰小地合成大地</text:span><text:span text:style-name="T83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6"><text:span text:style-name="T247">🎯 <text:s/></text:span><text:span text:style-name="T289">考試標準解題流程</text:span></text:p>
            <text:p text:style-name="P7"><text:span text:style-name="T290">遇到 </text:span><text:span text:style-name="T294">VLSM </text:span><text:span text:style-name="T290">題：</text:span><text:span text:style-name="T573">確認起始網路</text:span><text:span text:style-name="T106"> → </text:span><text:span text:style-name="T563">需求由大到小</text:span><text:span text:style-name="T106"> → </text:span><text:span text:style-name="T338">各需求 </text:span><text:span text:style-name="T361">+2 </text:span><text:span text:style-name="T338">找 </text:span><text:span text:style-name="T361">2ⁿ </text:span><text:span text:style-name="T338">算前綴</text:span><text:span text:style-name="T106"> → </text:span><text:span text:style-name="T447">大的先切</text:span><text:span text:style-name="T106">依序往後 → </text:span><text:span text:style-name="T535">驗證網路位址</text:span><text:span text:style-name="T553">/</text:span><text:span text:style-name="T535">廣播位址</text:span><text:span text:style-name="T553">/</text:span><text:span text:style-name="T535">可用範圍</text:span><text:span text:style-name="T106">。</text:span></text:p>
            <text:p text:style-name="P8"><text:span text:style-name="T290">遇到 </text:span><text:span text:style-name="T294">CIDR </text:span><text:span text:style-name="T290">合併題：</text:span><text:span text:style-name="T106">列出網路確認連續 → 確認數量 </text:span><text:span text:style-name="T194">2ⁿ → </text:span><text:span text:style-name="T106">確認起點對齊（起點</text:span><text:span text:style-name="T194">÷</text:span><text:span text:style-name="T106">合併後大小</text:span><text:span text:style-name="T194">=</text:span><text:span text:style-name="T106">整數）→ 前綴 </text:span><text:span text:style-name="T194">= </text:span><text:span text:style-name="T106">原前綴 − </text:span><text:span text:style-name="T194">n</text:span><text:span text:style-name="T106">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捌、</text:span><text:span text:style-name="T27">MTU</text:span><text:span text:style-name="T28">（最大傳輸單位）</text:span><text:span text:style-name="T27">(</text:span><text:span text:style-name="T412">一條網路，一次最多</text:span><text:span text:style-name="T27">)</text:span></text:h>
      <text:p text:style-name="P35" loext:marker-style-name="T107"><text:span text:style-name="T215">MTU</text:span><text:span text:style-name="T194"> </text:span><text:span text:style-name="T106">＝ </text:span><text:span text:style-name="T554">Maximum Transmission Unit</text:span><text:span text:style-name="T537">，</text:span><text:span text:style-name="T339">一條網路</text:span><text:span text:style-name="T537">「</text:span><text:span text:style-name="T492">一次最多</text:span><text:span text:style-name="T537">能傳送的</text:span><text:span text:style-name="T410">封包大小</text:span><text:span text:style-name="T537">」</text:span><text:span text:style-name="T106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4" loext:marker-style-name="T69"><text:span text:style-name="T70">網路類型</text:span><text:span text:style-name="T69"/></text:p>
            </table:table-cell>
            <table:table-cell table:style-name="表格48.A1" office:value-type="string">
              <text:p text:style-name="P4" loext:marker-style-name="T69"><text:span text:style-name="T79">MTU </text:span><text:span text:style-name="T70">值</text:span></text:p>
            </table:table-cell>
            <table:table-cell table:style-name="表格48.A1" office:value-type="string">
              <text:p text:style-name="P4" loext:marker-style-name="T69"><text:span text:style-name="T70">說明</text:span><text:span text:style-name="T69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9" loext:marker-style-name="T83"><text:span text:style-name="T182">Ethernet</text:span><text:span text:style-name="T84">（乙太網）</text:span></text:p>
          </table:table-cell>
          <table:table-cell table:style-name="表格48.A2" office:value-type="string">
            <text:p text:style-name="P29" loext:marker-style-name="T83"><text:span text:style-name="T182">1500 bytes</text:span><text:span text:style-name="T83"/></text:p>
          </table:table-cell>
          <table:table-cell table:style-name="表格48.A2" office:value-type="string">
            <text:p text:style-name="P29" loext:marker-style-name="T83"><text:span text:style-name="T84">最常見，</text:span><text:span text:style-name="T182">99% </text:span><text:span text:style-name="T84">環境</text:span></text:p>
          </table:table-cell>
        </table:table-row>
        <table:table-row table:style-name="表格48.1">
          <table:table-cell table:style-name="表格48.A3" office:value-type="string">
            <text:p text:style-name="P29" loext:marker-style-name="T83"><text:span text:style-name="T182">Wi-Fi (802.11)</text:span><text:span text:style-name="T83"/></text:p>
          </table:table-cell>
          <table:table-cell table:style-name="表格48.A3" office:value-type="string">
            <text:p text:style-name="P29" loext:marker-style-name="T83"><text:span text:style-name="T182">2304 bytes</text:span><text:span text:style-name="T83"/></text:p>
          </table:table-cell>
          <table:table-cell table:style-name="表格48.A3" office:value-type="string">
            <text:p text:style-name="P29" loext:marker-style-name="T83"><text:span text:style-name="T84">無線區域網路</text:span><text:span text:style-name="T83"/></text:p>
          </table:table-cell>
        </table:table-row>
        <table:table-row table:style-name="表格48.1">
          <table:table-cell table:style-name="表格48.A2" office:value-type="string">
            <text:p text:style-name="P29" loext:marker-style-name="T83"><text:span text:style-name="T182">PPPoE</text:span><text:span text:style-name="T84">（</text:span><text:span text:style-name="T182">ADSL</text:span><text:span text:style-name="T84">）</text:span></text:p>
          </table:table-cell>
          <table:table-cell table:style-name="表格48.A2" office:value-type="string">
            <text:p text:style-name="P29" loext:marker-style-name="T83"><text:span text:style-name="T182">1492 bytes</text:span><text:span text:style-name="T83"/></text:p>
          </table:table-cell>
          <table:table-cell table:style-name="表格48.A2" office:value-type="string">
            <text:p text:style-name="P29" loext:marker-style-name="T83"><text:span text:style-name="T84">需扣掉 </text:span><text:span text:style-name="T182">PPPoE header</text:span></text:p>
          </table:table-cell>
        </table:table-row>
        <table:table-row table:style-name="表格48.1">
          <table:table-cell table:style-name="表格48.A3" office:value-type="string">
            <text:p text:style-name="P29" loext:marker-style-name="T83"><text:span text:style-name="T182">Loopback</text:span><text:span text:style-name="T84">（本機）</text:span></text:p>
          </table:table-cell>
          <table:table-cell table:style-name="表格48.A3" office:value-type="string">
            <text:p text:style-name="P29" loext:marker-style-name="T83"><text:span text:style-name="T182">65536 bytes</text:span><text:span text:style-name="T83"/></text:p>
          </table:table-cell>
          <table:table-cell table:style-name="表格48.A3" office:value-type="string">
            <text:p text:style-name="P29" loext:marker-style-name="T83"><text:span text:style-name="T84">本機內部通訊</text:span><text:span text:style-name="T83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6"><text:span text:style-name="T247">❗ <text:s/></text:span><text:span text:style-name="T269">重點</text:span></text:p>
            <text:p text:style-name="P7" loext:marker-style-name="T107"><text:span text:style-name="T386">若封包大小 </text:span><text:span text:style-name="T398">&gt; MTU</text:span><text:span text:style-name="T386">，就必須「切開」才能傳送</text:span><text:span text:style-name="T106">，這個動作就叫 </text:span><text:span text:style-name="T568">Fragmentation</text:span><text:span text:style-name="T573">（分段）</text:span><text:span text:style-name="T106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玖、</text:span><text:span text:style-name="T27">Fragmentation</text:span><text:span text:style-name="T28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6"><text:span text:style-name="T247">📦 <text:s/></text:span><text:span text:style-name="T52">怎麼切？</text:span></text:p>
            <text:p text:style-name="P7" loext:marker-style-name="T107"><text:span text:style-name="T106">範例：送出 </text:span><text:span text:style-name="T194">4000 bytes</text:span><text:span text:style-name="T106">、</text:span><text:span text:style-name="T217">MTU = 1500</text:span><text:span text:style-name="T106">（</text:span><text:span text:style-name="T336">每段扣掉 </text:span><text:span text:style-name="T358">20 bytes IP Header</text:span><text:span text:style-name="T106">，</text:span><text:span text:style-name="T131">剩 </text:span><text:span text:style-name="T215">1480 </text:span><text:span text:style-name="T131">可放資料</text:span><text:span text:style-name="T106">）</text:span></text:p>
            <text:p text:style-name="P8" loext:marker-style-name="T409"><text:span text:style-name="T408">第 </text:span><text:span text:style-name="T416">1 </text:span><text:span text:style-name="T408">段：</text:span><text:span text:style-name="T416">1480 bytes</text:span><text:span text:style-name="T408">｜第 </text:span><text:span text:style-name="T416">2 </text:span><text:span text:style-name="T408">段：</text:span><text:span text:style-name="T416">1480 bytes</text:span><text:span text:style-name="T408">｜第 </text:span><text:span text:style-name="T416">3 </text:span><text:span text:style-name="T408">段：</text:span><text:span text:style-name="T416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4" loext:marker-style-name="T69"><text:span text:style-name="T70">版本</text:span><text:span text:style-name="T69"/></text:p>
          </table:table-cell>
          <table:table-cell table:style-name="表格49.A2" office:value-type="string">
            <text:p text:style-name="P4" loext:marker-style-name="T69"><text:span text:style-name="T70">誰負責分段</text:span><text:span text:style-name="T69"/></text:p>
          </table:table-cell>
          <table:table-cell table:style-name="表格49.A2" office:value-type="string">
            <text:p text:style-name="P4" loext:marker-style-name="T69"><text:span text:style-name="T79">Router </text:span><text:span text:style-name="T70">可切？</text:span></text:p>
          </table:table-cell>
          <table:table-cell table:style-name="表格49.A2" office:value-type="string">
            <text:p text:style-name="P4" loext:marker-style-name="T69"><text:span text:style-name="T70">說明</text:span><text:span text:style-name="T69"/></text:p>
          </table:table-cell>
        </table:table-row>
        <table:table-row table:style-name="表格49.1">
          <table:table-cell table:style-name="表格49.A3" office:value-type="string">
            <text:p text:style-name="P29" loext:marker-style-name="T85"><text:span text:style-name="T183">IPv4</text:span><text:span text:style-name="T85"/></text:p>
          </table:table-cell>
          <table:table-cell table:style-name="表格49.A3" office:value-type="string">
            <text:p text:style-name="P29" loext:marker-style-name="T83"><text:span text:style-name="T182">Router </text:span><text:span text:style-name="T84">或 </text:span><text:span text:style-name="T182">Source</text:span></text:p>
          </table:table-cell>
          <table:table-cell table:style-name="表格49.A3" office:value-type="string">
            <text:p text:style-name="P29" loext:marker-style-name="T291"><text:span text:style-name="T295">✅ </text:span><text:span text:style-name="T292">可以</text:span></text:p>
          </table:table-cell>
          <table:table-cell table:style-name="表格49.A3" office:value-type="string">
            <text:p text:style-name="P29" loext:marker-style-name="T481"><text:span text:style-name="T482">封包到 </text:span><text:span text:style-name="T497">Router </text:span><text:span text:style-name="T482">太大時，</text:span><text:span text:style-name="T497">Router </text:span><text:span text:style-name="T482">直接幫你切</text:span></text:p>
          </table:table-cell>
        </table:table-row>
        <table:table-row table:style-name="表格49.1">
          <table:table-cell table:style-name="表格49.A4" office:value-type="string">
            <text:p text:style-name="P29" loext:marker-style-name="T85"><text:span text:style-name="T183">IPv6</text:span><text:span text:style-name="T85"/></text:p>
          </table:table-cell>
          <table:table-cell table:style-name="表格49.A4" office:value-type="string">
            <text:p text:style-name="P29" loext:marker-style-name="T83"><text:span text:style-name="T84">僅 </text:span><text:span text:style-name="T182">Source</text:span><text:span text:style-name="T84">（送端）</text:span></text:p>
          </table:table-cell>
          <table:table-cell table:style-name="表格49.A4" office:value-type="string">
            <text:p text:style-name="P29" loext:marker-style-name="T276"><text:span text:style-name="T283">❌ </text:span><text:span text:style-name="T277">不行</text:span></text:p>
          </table:table-cell>
          <table:table-cell table:style-name="表格49.A4" office:value-type="string">
            <text:p text:style-name="P29" loext:marker-style-name="T83"><text:span text:style-name="T618">Router </text:span><text:span text:style-name="T594">不分段</text:span><text:span text:style-name="T84">，</text:span><text:span text:style-name="T480">由送端自行處理</text:span><text:span text:style-name="T84">，搭配 </text:span><text:span text:style-name="T182">PMTUD</text:span></text:p>
          </table:table-cell>
        </table:table-row>
      </table:table>
      <text:h text:style-name="P11" text:outline-level="2" loext:marker-style-name="T27"><text:span text:style-name="T28">拾、</text:span><text:span text:style-name="T27">IP Header </text:span><text:span text:style-name="T28">關鍵欄位</text:span></text:h>
      <text:p text:style-name="P35" loext:marker-style-name="T107"><text:span text:style-name="T106">每個封包都有一個「說明書」（</text:span><text:span text:style-name="T194">IP Header</text:span><text:span text:style-name="T106">），無選項時長度固定 </text:span><text:span text:style-name="T194">20 bytes</text:span><text:span text:style-name="T106">。最重要的 </text:span><text:span text:style-name="T194">5 </text:span><text:span text:style-name="T106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7"><text:span text:style-name="T65">(1) </text:span><text:span text:style-name="T64">Total Length</text:span><text:span text:style-name="T57">：</text:span><text:span text:style-name="T106">封包總大小（</text:span><text:span text:style-name="T194">Header + Data</text:span><text:span text:style-name="T106">），最大 </text:span><text:span text:style-name="T194">65535 bytes</text:span><text:span text:style-name="T106">（</text:span><text:span text:style-name="T194">16 bits</text:span><text:span text:style-name="T106">）。</text:span></text:p>
            <text:p text:style-name="P8"><text:span text:style-name="T65">(2) </text:span><text:span text:style-name="T64">Identification</text:span><text:span text:style-name="T57">：</text:span><text:span text:style-name="T336">同一原始封包的所有分段共用同一 </text:span><text:span text:style-name="T358">ID</text:span><text:span text:style-name="T106">；</text:span><text:span text:style-name="T452">接收端靠此 </text:span><text:span text:style-name="T474">ID </text:span><text:span text:style-name="T452">判斷哪些 </text:span><text:span text:style-name="T474">fragment </text:span><text:span text:style-name="T452">要拼在一起</text:span><text:span text:style-name="T106">。</text:span></text:p>
            <text:p text:style-name="P8"><text:span text:style-name="T65">(3) </text:span><text:span text:style-name="T64">Fragment Offset</text:span><text:span text:style-name="T57">：</text:span><text:span text:style-name="T386">這段資料在原始封包中的「起始位置」</text:span><text:span text:style-name="T106">。⚠️ 單位是 </text:span><text:span text:style-name="T194">8 bytes</text:span><text:span text:style-name="T106">（欄位僅 </text:span><text:span text:style-name="T194">13 bits</text:span><text:span text:style-name="T106">）→ </text:span><text:span text:style-name="T398">Offset = </text:span><text:span text:style-name="T386">起始位置 </text:span><text:span text:style-name="T398">÷ 8</text:span><text:span text:style-name="T106">。</text:span></text:p>
            <text:p text:style-name="P8"><text:span text:style-name="T65">(4) </text:span><text:span text:style-name="T64">TTL</text:span><text:span text:style-name="T57">：</text:span><text:span text:style-name="T585">最多可經過幾個 </text:span><text:span text:style-name="T609">Router</text:span><text:span text:style-name="T585">；每經過一個 −</text:span><text:span text:style-name="T609">1</text:span><text:span text:style-name="T106">，</text:span><text:span text:style-name="T535">歸零時 </text:span><text:span text:style-name="T553">Router </text:span><text:span text:style-name="T535">丟棄並回 </text:span><text:span text:style-name="T553">ICMP</text:span><text:span text:style-name="T535">「</text:span><text:span text:style-name="T553">Time Exceeded</text:span><text:span text:style-name="T535">」</text:span><text:span text:style-name="T106">。常見初始值 </text:span><text:span text:style-name="T194">Linux=64</text:span><text:span text:style-name="T106">、</text:span><text:span text:style-name="T194">Windows=128</text:span><text:span text:style-name="T106">。</text:span><text:span text:style-name="T194">traceroute </text:span><text:span text:style-name="T106">即利用 </text:span><text:span text:style-name="T194">TTL</text:span><text:span text:style-name="T106">。</text:span></text:p>
            <text:p text:style-name="P8"><text:span text:style-name="T65">(5) </text:span><text:span text:style-name="T64">Protocol</text:span><text:span text:style-name="T57">：</text:span><text:span text:style-name="T106">告訴 </text:span><text:span text:style-name="T194">OS </text:span><text:span text:style-name="T106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4" loext:marker-style-name="T69"><text:span text:style-name="T70">計算範例（</text:span><text:span text:style-name="T79">MTU=1500, Header=20, </text:span><text:span text:style-name="T70">資料</text:span><text:span text:style-name="T79">=4000</text:span><text:span text:style-name="T70">）</text:span></text:p>
          </table:table-cell>
          <table:covered-table-cell/>
          <table:covered-table-cell/>
          <table:table-cell table:style-name="表格50.A2" office:value-type="string">
            <text:p text:style-name="P4" loext:marker-style-name="T69"><text:span text:style-name="T79">Offset </text:span><text:span text:style-name="T70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9" loext:marker-style-name="T83"><text:span text:style-name="T84">第 </text:span><text:span text:style-name="T182">1 </text:span><text:span text:style-name="T84">段：資料 </text:span><text:span text:style-name="T182">1480 bytes</text:span></text:p>
          </table:table-cell>
          <table:covered-table-cell/>
          <table:covered-table-cell/>
          <table:table-cell table:style-name="表格50.A3" office:value-type="string">
            <text:p text:style-name="P29" loext:marker-style-name="T85"><text:span text:style-name="T183">0 ÷ 8 = 0</text:span><text:span text:style-name="T85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9" loext:marker-style-name="T83"><text:span text:style-name="T84">第 </text:span><text:span text:style-name="T182">2 </text:span><text:span text:style-name="T84">段：資料 </text:span><text:span text:style-name="T182">1480 bytes</text:span></text:p>
          </table:table-cell>
          <table:covered-table-cell/>
          <table:covered-table-cell/>
          <table:table-cell table:style-name="表格50.A4" office:value-type="string">
            <text:p text:style-name="P29" loext:marker-style-name="T83"><text:span text:style-name="T183">1480 ÷ 8 </text:span><text:span text:style-name="T182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9" loext:marker-style-name="T83"><text:span text:style-name="T84">第 </text:span><text:span text:style-name="T182">3 </text:span><text:span text:style-name="T84">段：資料 </text:span><text:span text:style-name="T182">1040 bytes</text:span></text:p>
          </table:table-cell>
          <table:covered-table-cell/>
          <table:covered-table-cell/>
          <table:table-cell table:style-name="表格50.A3" office:value-type="string">
            <text:p text:style-name="P29" loext:marker-style-name="T83"><text:span text:style-name="T183">2960 ÷ 8</text:span><text:span text:style-name="T182"> = 370</text:span></text:p>
          </table:table-cell>
        </table:table-row>
        <table:table-row table:style-name="表格50.1">
          <table:table-cell table:style-name="表格50.A2" office:value-type="string">
            <text:p text:style-name="P26" loext:marker-style-name="T69"><text:span text:style-name="T79">Protocol </text:span><text:span text:style-name="T70">值</text:span></text:p>
          </table:table-cell>
          <table:table-cell table:style-name="表格50.A2" office:value-type="string">
            <text:p text:style-name="P26" loext:marker-style-name="T69"><text:span text:style-name="T70">對應協定</text:span><text:span text:style-name="T69"/></text:p>
          </table:table-cell>
          <table:table-cell table:style-name="表格50.A2" table:number-columns-spanned="2" office:value-type="string">
            <text:p text:style-name="P26" loext:marker-style-name="T69"><text:span text:style-name="T70">常見用途</text:span><text:span text:style-name="T69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9" loext:marker-style-name="T83"><text:span text:style-name="T182">1</text:span><text:span text:style-name="T83"/></text:p>
          </table:table-cell>
          <table:table-cell table:style-name="表格50.A3" office:value-type="string">
            <text:p text:style-name="P29" loext:marker-style-name="T99"><text:span text:style-name="T189">ICMP</text:span><text:span text:style-name="T99"/></text:p>
          </table:table-cell>
          <table:table-cell table:style-name="表格50.A3" table:number-columns-spanned="2" office:value-type="string">
            <text:p text:style-name="P29" loext:marker-style-name="T404"><text:span text:style-name="T418">ping</text:span><text:span text:style-name="T405">、</text:span><text:span text:style-name="T418">TTL </text:span><text:span text:style-name="T405">超時通知、</text:span><text:span text:style-name="T418">Fragmentation </text:span><text:span text:style-name="T405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9" loext:marker-style-name="T83"><text:span text:style-name="T182">6</text:span><text:span text:style-name="T83"/></text:p>
          </table:table-cell>
          <table:table-cell table:style-name="表格50.A4" office:value-type="string">
            <text:p text:style-name="P29" loext:marker-style-name="T83"><text:span text:style-name="T182">TCP</text:span><text:span text:style-name="T83"/></text:p>
          </table:table-cell>
          <table:table-cell table:style-name="表格50.A4" table:number-columns-spanned="2" office:value-type="string">
            <text:p text:style-name="P29" loext:marker-style-name="T83"><text:span text:style-name="T182">HTTP</text:span><text:span text:style-name="T84">、</text:span><text:span text:style-name="T182">HTTPS</text:span><text:span text:style-name="T84">、</text:span><text:span text:style-name="T182">SSH</text:span><text:span text:style-name="T84">、</text:span><text:span text:style-name="T182">FTP </text:span><text:span text:style-name="T84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9" loext:marker-style-name="T83"><text:span text:style-name="T182">17</text:span><text:span text:style-name="T83"/></text:p>
          </table:table-cell>
          <table:table-cell table:style-name="表格50.A3" office:value-type="string">
            <text:p text:style-name="P29" loext:marker-style-name="T83"><text:span text:style-name="T182">UDP</text:span><text:span text:style-name="T83"/></text:p>
          </table:table-cell>
          <table:table-cell table:style-name="表格50.A3" table:number-columns-spanned="2" office:value-type="string">
            <text:p text:style-name="P29" loext:marker-style-name="T83"><text:span text:style-name="T182">DNS</text:span><text:span text:style-name="T84">、</text:span><text:span text:style-name="T182">DHCP</text:span><text:span text:style-name="T84">、影音串流等速度優先</text:span></text:p>
          </table:table-cell>
          <table:covered-table-cell/>
        </table:table-row>
      </table:table>
      <text:h text:style-name="P11" text:outline-level="2"><text:soft-page-break/><text:span text:style-name="T28">拾壹、</text:span><text:span text:style-name="T27">Fragmentation Flags</text:span><text:span text:style-name="T28">（</text:span><text:span text:style-name="T27">DF / MF</text:span><text:span text:style-name="T28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4" loext:marker-style-name="T69"><text:span text:style-name="T79">Flag</text:span><text:span text:style-name="T69"/></text:p>
            </table:table-cell>
            <table:table-cell table:style-name="表格51.A1" office:value-type="string">
              <text:p text:style-name="P4" loext:marker-style-name="T69"><text:span text:style-name="T70">全名</text:span><text:span text:style-name="T69"/></text:p>
            </table:table-cell>
            <table:table-cell table:style-name="表格51.A1" office:value-type="string">
              <text:p text:style-name="P4" loext:marker-style-name="T69"><text:span text:style-name="T70">值 </text:span><text:span text:style-name="T79">= 1 </text:span><text:span text:style-name="T70">代表</text:span></text:p>
            </table:table-cell>
            <table:table-cell table:style-name="表格51.A1" office:value-type="string">
              <text:p text:style-name="P4" loext:marker-style-name="T69"><text:span text:style-name="T70">值 </text:span><text:span text:style-name="T79">= 0 </text:span><text:span text:style-name="T70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9" loext:marker-style-name="T377"><text:span text:style-name="T391">DF</text:span><text:span text:style-name="T377"/></text:p>
          </table:table-cell>
          <table:table-cell table:style-name="表格51.A2" office:value-type="string">
            <text:p text:style-name="P29" loext:marker-style-name="T377"><text:span text:style-name="T391">Don't Fragment</text:span><text:span text:style-name="T377"/></text:p>
          </table:table-cell>
          <table:table-cell table:style-name="表格51.A2" office:value-type="string">
            <text:p text:style-name="P29" loext:marker-style-name="T83"><text:span text:style-name="T182">❌ </text:span><text:span text:style-name="T84">不准切！超大就丟並回 </text:span><text:span text:style-name="T182">ICMP</text:span></text:p>
          </table:table-cell>
          <table:table-cell table:style-name="表格51.A2" office:value-type="string">
            <text:p text:style-name="P29" loext:marker-style-name="T83"><text:span text:style-name="T84">允許分段（一般封包）</text:span><text:span text:style-name="T83"/></text:p>
          </table:table-cell>
        </table:table-row>
        <table:table-row table:style-name="表格51.1">
          <table:table-cell table:style-name="表格51.A3" office:value-type="string">
            <text:p text:style-name="P29" loext:marker-style-name="T318"><text:span text:style-name="T352">MF</text:span><text:span text:style-name="T318"/></text:p>
          </table:table-cell>
          <table:table-cell table:style-name="表格51.A3" office:value-type="string">
            <text:p text:style-name="P29" loext:marker-style-name="T318"><text:span text:style-name="T352">More Fragments</text:span><text:span text:style-name="T318"/></text:p>
          </table:table-cell>
          <table:table-cell table:style-name="表格51.A3" office:value-type="string">
            <text:p text:style-name="P29" loext:marker-style-name="T83"><text:span text:style-name="T84">後面還有更多分段</text:span><text:span text:style-name="T83"/></text:p>
          </table:table-cell>
          <table:table-cell table:style-name="表格51.A3" office:value-type="string">
            <text:p text:style-name="P29" loext:marker-style-name="T83"><text:span text:style-name="T84">這是最後一段（或未分段）</text:span><text:span text:style-name="T83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6"><text:span text:style-name="T247">▸ <text:s/></text:span><text:span text:style-name="T63">DF = 1 </text:span><text:span text:style-name="T52">的完整流程</text:span></text:p>
            <text:p text:style-name="P7" loext:marker-style-name="T107"><text:span text:style-name="T194">① </text:span><text:span text:style-name="T106">送出封包（</text:span><text:span text:style-name="T215">DF=1</text:span><text:span text:style-name="T131">，不准切</text:span><text:span text:style-name="T106">）→ ② 到某 </text:span><text:span text:style-name="T194">Router</text:span><text:span text:style-name="T106">，發現</text:span><text:span text:style-name="T334">封包 </text:span><text:span text:style-name="T362">&gt; </text:span><text:span text:style-name="T334">該路段 </text:span><text:span text:style-name="T362">MTU</text:span><text:span text:style-name="T194"> → ③ </text:span><text:span text:style-name="T502">Router </text:span><text:span text:style-name="T487">不能切，直接丟棄 </text:span><text:span text:style-name="T106">→ ④ </text:span><text:span text:style-name="T609">Router </text:span><text:span text:style-name="T585">回傳 </text:span><text:span text:style-name="T609">ICMP</text:span><text:span text:style-name="T585">「</text:span><text:span text:style-name="T609">Fragmentation Needed</text:span><text:span text:style-name="T585">」（含可用 </text:span><text:span text:style-name="T609">MTU </text:span><text:span text:style-name="T585">大小）</text:span><text:span text:style-name="T106">→ ⑤ </text:span><text:span text:style-name="T336">送端調整封包大小後</text:span><text:span text:style-name="T539">重送</text:span><text:span text:style-name="T106">。這就是 </text:span><text:span text:style-name="T217">PMTUD </text:span><text:span text:style-name="T133">的核心機制</text:span><text:span text:style-name="T106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拾貳、</text:span><text:span text:style-name="T27">PMTUD</text:span><text:span text:style-name="T28">（路徑 </text:span><text:span text:style-name="T27">MTU </text:span><text:span text:style-name="T28">探測）</text:span></text:h>
      <text:p text:style-name="P35" loext:marker-style-name="T107"><text:span text:style-name="T215">PMTUD </text:span><text:span text:style-name="T106">＝</text:span><text:span text:style-name="T539"> </text:span><text:span text:style-name="T555">Path MTU Discovery</text:span><text:span text:style-name="T539">，自動找出</text:span><text:span text:style-name="T662">來源到目的地</text:span><text:span text:style-name="T539">整條路徑中</text:span><text:span text:style-name="T587">最小的 </text:span><text:span text:style-name="T611">MTU </text:span><text:span text:style-name="T587">值</text:span><text:span text:style-name="T106">。</text:span><text:span text:style-name="T136">網路路徑可能途經不同網路</text:span><text:span text:style-name="T106">（</text:span><text:span text:style-name="T194">Ethernet → PPPoE → Wi-Fi</text:span><text:span text:style-name="T106">），封包必須符合「最小的那個 </text:span><text:span text:style-name="T194">MTU</text:span><text:span text:style-name="T106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4" loext:marker-style-name="T69"><text:span text:style-name="T70">版本</text:span><text:span text:style-name="T69"/></text:p>
            </table:table-cell>
            <table:table-cell table:style-name="表格52.A1" office:value-type="string">
              <text:p text:style-name="P4" loext:marker-style-name="T69"><text:span text:style-name="T79">Router </text:span><text:span text:style-name="T70">可分段？</text:span></text:p>
            </table:table-cell>
            <table:table-cell table:style-name="表格52.A1" office:value-type="string">
              <text:p text:style-name="P4" loext:marker-style-name="T69"><text:span text:style-name="T79">PMTUD </text:span><text:span text:style-name="T70">必要性</text:span></text:p>
            </table:table-cell>
            <table:table-cell table:style-name="表格52.A1" office:value-type="string">
              <text:p text:style-name="P4" loext:marker-style-name="T69"><text:span text:style-name="T79">Router </text:span><text:span text:style-name="T70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9" loext:marker-style-name="T98"><text:span text:style-name="T187">IPv4</text:span><text:span text:style-name="T98"/></text:p>
          </table:table-cell>
          <table:table-cell table:style-name="表格52.A2" office:value-type="string">
            <text:p text:style-name="P29" loext:marker-style-name="T93"><text:span text:style-name="T190">✅ </text:span><text:span text:style-name="T92">可以（但不推薦）</text:span></text:p>
          </table:table-cell>
          <table:table-cell table:style-name="表格52.A2" office:value-type="string">
            <text:p text:style-name="P29" loext:marker-style-name="T83"><text:span text:style-name="T84">可選，但建議使用</text:span><text:span text:style-name="T83"/></text:p>
          </table:table-cell>
          <table:table-cell table:style-name="表格52.A2" office:value-type="string">
            <text:p text:style-name="P29" loext:marker-style-name="T83"><text:span text:style-name="T182">ICMP Fragmentation Needed</text:span><text:span text:style-name="T83"/></text:p>
          </table:table-cell>
        </table:table-row>
        <table:table-row table:style-name="表格52.1">
          <table:table-cell table:style-name="表格52.A3" office:value-type="string">
            <text:p text:style-name="P29" loext:marker-style-name="T98"><text:span text:style-name="T187">IPv6</text:span><text:span text:style-name="T98"/></text:p>
          </table:table-cell>
          <table:table-cell table:style-name="表格52.A3" office:value-type="string">
            <text:p text:style-name="P29" loext:marker-style-name="T93"><text:span text:style-name="T190">❌ </text:span><text:span text:style-name="T92">不行</text:span></text:p>
          </table:table-cell>
          <table:table-cell table:style-name="表格52.A3" office:value-type="string">
            <text:p text:style-name="P29" loext:marker-style-name="T83"><text:span text:style-name="T182">⚠️ </text:span><text:span text:style-name="T84">必須使用</text:span></text:p>
          </table:table-cell>
          <table:table-cell table:style-name="表格52.A3" office:value-type="string">
            <text:p text:style-name="P29" loext:marker-style-name="T83"><text:span text:style-name="T182">ICMPv6 Packet Too Big</text:span><text:span text:style-name="T83"/></text:p>
          </table:table-cell>
        </table:table-row>
      </table:table>
      <text:h text:style-name="P11" text:outline-level="2" loext:marker-style-name="T27"><text:span text:style-name="T28">拾參、</text:span><text:span text:style-name="T27">TCP </text:span><text:span text:style-name="T28">如何避免 </text:span><text:span text:style-name="T27">Fragmentation</text:span><text:span text:style-name="T28">？</text:span></text:h>
      <text:p text:style-name="P35" loext:marker-style-name="T107"><text:span text:style-name="T398">TCP </text:span><text:span text:style-name="T386">不依賴 </text:span><text:span text:style-name="T398">IP </text:span><text:span text:style-name="T386">層切封包，而是「自己先控制好大小」</text:span><text:span text:style-name="T106">，</text:span><text:span text:style-name="T131">讓 </text:span><text:span text:style-name="T215">IP </text:span><text:span text:style-name="T131">層根本不需要切</text:span><text:span text:style-name="T106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7"><text:span text:style-name="T65">MSS</text:span><text:span text:style-name="T57">（</text:span><text:span text:style-name="T65">Maximum Segment Size</text:span><text:span text:style-name="T57">）：</text:span><text:span text:style-name="T364">MSS = MTU − IP Header − TCP Header </text:span><text:span text:style-name="T194">= </text:span><text:span text:style-name="T215">1500 − 20 − 20 = 1460 bytes</text:span><text:span text:style-name="T106">。</text:span><text:span text:style-name="T493">三向交握時雙方各自宣告 </text:span><text:span text:style-name="T503">MSS</text:span><text:span text:style-name="T493">，之後每段 ≤ </text:span><text:span text:style-name="T503">MSS</text:span><text:span text:style-name="T106">，</text:span><text:span text:style-name="T131">讓 </text:span><text:span text:style-name="T215">IP </text:span><text:span text:style-name="T131">層不需分段</text:span><text:span text:style-name="T106">。</text:span></text:p>
            <text:p text:style-name="P8"><text:span text:style-name="T57">搭配 </text:span><text:span text:style-name="T65">DF=1 + PMTUD</text:span><text:span text:style-name="T57">：</text:span><text:span text:style-name="T194">TCP </text:span><text:span text:style-name="T106">連線設 </text:span><text:span text:style-name="T194">DF=1 </text:span><text:span text:style-name="T106">禁止 </text:span><text:span text:style-name="T194">Router </text:span><text:span text:style-name="T106">分段；</text:span><text:span text:style-name="T336">若收到 </text:span><text:span text:style-name="T358">ICMP</text:span><text:span text:style-name="T336">「</text:span><text:span text:style-name="T358">Fragmentation Needed</text:span><text:span text:style-name="T336">」，自動調低 </text:span><text:span text:style-name="T358">MSS </text:span><text:span text:style-name="T336">重試</text:span><text:span text:style-name="T106">，最終找到整條路徑都能通過的最佳 </text:span><text:span text:style-name="T194">MSS</text:span><text:span text:style-name="T106">。</text:span></text:p>
          </table:table-cell>
        </table:table-row>
        <table:table-row table:style-name="表格53.1">
          <table:table-cell table:style-name="表格53.A2" office:value-type="string">
            <text:p text:style-name="P6"><text:span text:style-name="T247">✅ <text:s/></text:span><text:span text:style-name="T289">結論</text:span></text:p>
            <text:p text:style-name="P7" loext:marker-style-name="T107"><text:span text:style-name="T568">TCP = </text:span><text:span text:style-name="T573">主動控制大小（</text:span><text:span text:style-name="T568">MSS</text:span><text:span text:style-name="T573">）＋ </text:span><text:span text:style-name="T568">DF=1 </text:span><text:span text:style-name="T573">＋ </text:span><text:span text:style-name="T568">PMTUD</text:span><text:span text:style-name="T106">，</text:span><text:span text:style-name="T340">從源頭就避免 </text:span><text:span text:style-name="T364">Fragmentation </text:span><text:span text:style-name="T340">發生</text:span><text:span text:style-name="T106">。</text:span><text:span text:style-name="T474">TCP </text:span><text:span text:style-name="T452">做 </text:span><text:span text:style-name="T474">Segmentation </text:span><text:span text:style-name="T452">的主要目的之一，就是讓每個封包符合 </text:span><text:span text:style-name="T474">MTU</text:span><text:span text:style-name="T106">，從而避免 </text:span><text:span text:style-name="T194">IP </text:span><text:span text:style-name="T106">再做 </text:span><text:span text:style-name="T194">Fragmentation</text:span><text:span text:style-name="T106">。</text:span></text:p>
          </table:table-cell>
        </table:table-row>
      </table:table>
      <text:h text:style-name="P11" text:outline-level="2" loext:marker-style-name="T27"><text:span text:style-name="T28">拾肆、</text:span><text:span text:style-name="T27">Fragmentation DoS </text:span><text:span text:style-name="T28">攻擊</text:span></text:h>
      <text:p text:style-name="P35" loext:marker-style-name="T107"><text:span text:style-name="T336">攻擊者利用「接收端重組封包很耗資源」這個特性</text:span><text:span text:style-name="T106">，</text:span><text:span text:style-name="T386">刻意製造大量異常 </text:span><text:span text:style-name="T398">Fragment</text:span><text:span text:style-name="T106">。正常重組流程：收到 </text:span><text:span text:style-name="T194">Fragment </text:span><text:span text:style-name="T537">放入緩衝區 </text:span><text:span text:style-name="T106">→ </text:span><text:span text:style-name="T585">等同一 </text:span><text:span text:style-name="T609">ID </text:span><text:span text:style-name="T585">的所有 </text:span><text:span text:style-name="T609">Fragment </text:span><text:span text:style-name="T585">到齊 → 依</text:span><text:span text:style-name="T387"> </text:span><text:span text:style-name="T399">Offset </text:span><text:span text:style-name="T585">排序 → 拼回原始封包</text:span><text:span text:style-name="T106">；每步都消耗 </text:span><text:span text:style-name="T194">RAM </text:span><text:span text:style-name="T106">與 </text:span><text:span text:style-name="T194">CPU</text:span><text:span text:style-name="T106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" loext:marker-style-name="T75"><text:span text:style-name="T76">攻擊手法</text:span><text:span text:style-name="T75"/></text:p>
            </table:table-cell>
            <table:table-cell table:style-name="表格54.A1" office:value-type="string">
              <text:p text:style-name="P4" loext:marker-style-name="T75"><text:span text:style-name="T76">做法</text:span><text:span text:style-name="T75"/></text:p>
            </table:table-cell>
            <table:table-cell table:style-name="表格54.A1" office:value-type="string">
              <text:p text:style-name="P4" loext:marker-style-name="T75"><text:span text:style-name="T76">後果</text:span><text:span text:style-name="T7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9" loext:marker-style-name="T171"><text:span text:style-name="T238">1 </text:span><text:span text:style-name="T169">不完整 </text:span><text:span text:style-name="T238">Fragment</text:span></text:p>
          </table:table-cell>
          <table:table-cell table:style-name="表格54.A2" office:value-type="string">
            <text:p text:style-name="P29" loext:marker-style-name="T147"><text:span text:style-name="T148">只送部分分段（缺其中一段）</text:span><text:span text:style-name="T147"/></text:p>
          </table:table-cell>
          <table:table-cell table:style-name="表格54.A2" office:value-type="string">
            <text:p text:style-name="P29" loext:marker-style-name="T147"><text:span text:style-name="T148">接收端一直等待不敢丟棄 → </text:span><text:span text:style-name="T230">RAM </text:span><text:span text:style-name="T148">持續被占用</text:span></text:p>
          </table:table-cell>
        </table:table-row>
        <table:table-row table:style-name="表格54.1">
          <table:table-cell table:style-name="表格54.A3" office:value-type="string">
            <text:p text:style-name="P29" loext:marker-style-name="T171"><text:span text:style-name="T238">2 Offset </text:span><text:span text:style-name="T169">重疊</text:span></text:p>
          </table:table-cell>
          <table:table-cell table:style-name="表格54.A3" office:value-type="string">
            <text:p text:style-name="P29" loext:marker-style-name="T147"><text:span text:style-name="T148">送出 </text:span><text:span text:style-name="T230">Offset </text:span><text:span text:style-name="T148">互相重疊的 </text:span><text:span text:style-name="T230">Fragment</text:span></text:p>
          </table:table-cell>
          <table:table-cell table:style-name="表格54.A3" office:value-type="string">
            <text:p text:style-name="P29" loext:marker-style-name="T147"><text:span text:style-name="T172">接收端須判斷哪個才是正確資料 </text:span><text:span text:style-name="T148">→ </text:span><text:span text:style-name="T230">CPU </text:span><text:span text:style-name="T148">暴增</text:span></text:p>
          </table:table-cell>
        </table:table-row>
        <table:table-row table:style-name="表格54.1">
          <table:table-cell table:style-name="表格54.A2" office:value-type="string">
            <text:p text:style-name="P29" loext:marker-style-name="T171"><text:span text:style-name="T238">3 </text:span><text:span text:style-name="T169">大量碎片</text:span></text:p>
          </table:table-cell>
          <table:table-cell table:style-name="表格54.A2" office:value-type="string">
            <text:p text:style-name="P29" loext:marker-style-name="T147"><text:span text:style-name="T148">送出數萬個 </text:span><text:span text:style-name="T230">Fragment</text:span><text:span text:style-name="T148">（同一 </text:span><text:span text:style-name="T230">ID</text:span><text:span text:style-name="T148">）</text:span></text:p>
          </table:table-cell>
          <table:table-cell table:style-name="表格54.A2" office:value-type="string">
            <text:p text:style-name="P29" loext:marker-style-name="T147"><text:span text:style-name="T148">開大量 </text:span><text:span text:style-name="T230">buffer</text:span><text:span text:style-name="T148">、持續重組 → </text:span><text:span text:style-name="T230">RAM </text:span><text:span text:style-name="T148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6"><text:span text:style-name="T247">🛡️ <text:s/></text:span><text:span text:style-name="T289">防禦方式</text:span></text:p>
            <text:p text:style-name="P7" loext:marker-style-name="T107"><text:span text:style-name="T106">防禦：</text:span><text:span text:style-name="T139">設定重組 </text:span><text:span text:style-name="T223">buffer </text:span><text:span text:style-name="T139">上限</text:span><text:span text:style-name="T106">避免無限占用記憶體；</text:span><text:span text:style-name="T137">丟棄等待過久或異常的 </text:span><text:span text:style-name="T221">Fragment</text:span><text:span text:style-name="T106">；</text:span><text:span text:style-name="T136">部署 </text:span><text:span text:style-name="T220">IDS / Firewall </text:span><text:span text:style-name="T136">偵測異常分段</text:span><text:span text:style-name="T106">模式。</text:span></text:p>
          </table:table-cell>
          <table:covered-table-cell/>
          <table:covered-table-cell/>
        </table:table-row>
      </table:table>
      <text:h text:style-name="P11" text:outline-level="2"><text:soft-page-break/><text:span text:style-name="T2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4" loext:marker-style-name="T69"><text:span text:style-name="T70">技術概念</text:span><text:span text:style-name="T69"/></text:p>
            </table:table-cell>
            <table:table-cell table:style-name="表格55.A1" office:value-type="string">
              <text:p text:style-name="P4" loext:marker-style-name="T69"><text:span text:style-name="T70">白話比喻</text:span><text:span text:style-name="T69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9" loext:marker-style-name="T83"><text:span text:style-name="T182">MTU</text:span><text:span text:style-name="T83"/></text:p>
          </table:table-cell>
          <table:table-cell table:style-name="表格55.A2" office:value-type="string">
            <text:p text:style-name="P29" loext:marker-style-name="T83"><text:span text:style-name="T84">一個貨運箱子最多裝 </text:span><text:span text:style-name="T182">1500g</text:span></text:p>
          </table:table-cell>
        </table:table-row>
        <table:table-row table:style-name="表格55.1">
          <table:table-cell table:style-name="表格55.A3" office:value-type="string">
            <text:p text:style-name="P29" loext:marker-style-name="T83"><text:span text:style-name="T182">Fragmentation</text:span><text:span text:style-name="T83"/></text:p>
          </table:table-cell>
          <table:table-cell table:style-name="表格55.A3" office:value-type="string">
            <text:p text:style-name="P29" loext:marker-style-name="T83"><text:span text:style-name="T84">東西太重 → 分成好幾箱</text:span><text:span text:style-name="T83"/></text:p>
          </table:table-cell>
        </table:table-row>
        <table:table-row table:style-name="表格55.1">
          <table:table-cell table:style-name="表格55.A2" office:value-type="string">
            <text:p text:style-name="P29" loext:marker-style-name="T93"><text:span text:style-name="T190">Identification</text:span><text:span text:style-name="T93"/></text:p>
          </table:table-cell>
          <table:table-cell table:style-name="表格55.A2" office:value-type="string">
            <text:p text:style-name="P29" loext:marker-style-name="T98"><text:span text:style-name="T96">每箱貼上同一個「訂單號碼」</text:span><text:span text:style-name="T98"/></text:p>
          </table:table-cell>
        </table:table-row>
        <table:table-row table:style-name="表格55.1">
          <table:table-cell table:style-name="表格55.A3" office:value-type="string">
            <text:p text:style-name="P29" loext:marker-style-name="T93"><text:span text:style-name="T190">Fragment Offset</text:span><text:span text:style-name="T93"/></text:p>
          </table:table-cell>
          <table:table-cell table:style-name="表格55.A3" office:value-type="string">
            <text:p text:style-name="P29" loext:marker-style-name="T83"><text:span text:style-name="T84">每箱寫上「我是第幾克開始的貨」</text:span><text:span text:style-name="T83"/></text:p>
          </table:table-cell>
        </table:table-row>
        <table:table-row table:style-name="表格55.1">
          <table:table-cell table:style-name="表格55.A2" office:value-type="string">
            <text:p text:style-name="P29" loext:marker-style-name="T83"><text:span text:style-name="T182">IPv4 / IPv6</text:span><text:span text:style-name="T83"/></text:p>
          </table:table-cell>
          <table:table-cell table:style-name="表格55.A2" office:value-type="string">
            <text:p text:style-name="P29" loext:marker-style-name="T83"><text:span text:style-name="T182">IPv4</text:span><text:span text:style-name="T84">：郵局可幫你分箱（但最好自己分）／ </text:span><text:span text:style-name="T182">IPv6</text:span><text:span text:style-name="T84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9" loext:marker-style-name="T83"><text:span text:style-name="T182">DF = 1</text:span><text:span text:style-name="T83"/></text:p>
          </table:table-cell>
          <table:table-cell table:style-name="表格55.A3" office:value-type="string">
            <text:p text:style-name="P29" loext:marker-style-name="T83"><text:span text:style-name="T84">貼上「禁止拆箱」標籤 → 太重就退件</text:span><text:span text:style-name="T83"/></text:p>
          </table:table-cell>
        </table:table-row>
        <table:table-row table:style-name="表格55.1">
          <table:table-cell table:style-name="表格55.A2" office:value-type="string">
            <text:p text:style-name="P29" loext:marker-style-name="T432"><text:span text:style-name="T460">PMTUD</text:span><text:span text:style-name="T432"/></text:p>
          </table:table-cell>
          <table:table-cell table:style-name="表格55.A2" office:value-type="string">
            <text:p text:style-name="P29" loext:marker-style-name="T101"><text:span text:style-name="T102">先試寄 → 被退 → 知道上限 → 調整大小再寄</text:span><text:span text:style-name="T101"/></text:p>
          </table:table-cell>
        </table:table-row>
        <table:table-row table:style-name="表格55.1">
          <table:table-cell table:style-name="表格55.A3" office:value-type="string">
            <text:p text:style-name="P29" loext:marker-style-name="T322"><text:span text:style-name="T355">TTL</text:span><text:span text:style-name="T322"/></text:p>
          </table:table-cell>
          <table:table-cell table:style-name="表格55.A3" office:value-type="string">
            <text:p text:style-name="P29" loext:marker-style-name="T95"><text:span text:style-name="T94">貨物限轉 </text:span><text:span text:style-name="T191">64 </text:span><text:span text:style-name="T94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9" loext:marker-style-name="T93"><text:span text:style-name="T190">MSS</text:span><text:span text:style-name="T93"/></text:p>
          </table:table-cell>
          <table:table-cell table:style-name="表格55.A2" office:value-type="string">
            <text:p text:style-name="P29" loext:marker-style-name="T98"><text:span text:style-name="T96">你自己量好每箱重量，確保不超重</text:span><text:span text:style-name="T98"/></text:p>
          </table:table-cell>
        </table:table-row>
      </table:table>
      <text:h text:style-name="P17" text:outline-level="1" loext:marker-style-name="T71"><text:span text:style-name="T72">第 三 篇　</text:span><text:span text:style-name="T71">IPv4 → IPv6 </text:span><text:span text:style-name="T72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6"><text:span text:style-name="T247">💡 <text:s/></text:span><text:span text:style-name="T52">為什麼要從 </text:span><text:span text:style-name="T63">IPv4 </text:span><text:span text:style-name="T52">換到 </text:span><text:span text:style-name="T63">IPv6</text:span><text:span text:style-name="T52">？</text:span></text:p>
            <text:p text:style-name="P7" loext:marker-style-name="T107"><text:span text:style-name="T194">IPv4 </text:span><text:span text:style-name="T106">在設計之初無法預料網路規模的爆炸性成長。隨著智慧型手機、</text:span><text:span text:style-name="T194">IoT </text:span><text:span text:style-name="T106">裝置大量普及，</text:span><text:span text:style-name="T194">IPv4 </text:span><text:span text:style-name="T106">位址已幾近耗盡，並衍生多項架構缺陷，因此 </text:span><text:span text:style-name="T194">IPv6 </text:span><text:span text:style-name="T106">誕生以從根本解決這些問題。但 </text:span><text:span text:style-name="T194">IPv4 </text:span><text:span text:style-name="T106">不會一夕消失，兩種協定長期並存，因此需要過渡技術。</text:span></text:p>
          </table:table-cell>
        </table:table-row>
      </table:table>
      <text:h text:style-name="P11" text:outline-level="2" loext:marker-style-name="T27"><text:span text:style-name="T28">一、</text:span><text:span text:style-name="T27">IPv4 vs IPv6 </text:span><text:span text:style-name="T28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4" loext:marker-style-name="T69"><text:span text:style-name="T70">比較項目</text:span><text:span text:style-name="T69"/></text:p>
            </table:table-cell>
            <table:table-cell table:style-name="表格57.A1" office:value-type="string">
              <text:p text:style-name="P4" loext:marker-style-name="T69"><text:span text:style-name="T79">✗ IPv4 </text:span><text:span text:style-name="T70">問題</text:span></text:p>
            </table:table-cell>
            <table:table-cell table:style-name="表格57.A1" office:value-type="string">
              <text:p text:style-name="P4" loext:marker-style-name="T69"><text:span text:style-name="T79">✓ IPv6 </text:span><text:span text:style-name="T70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9" loext:marker-style-name="T83"><text:span text:style-name="T84">位址長度</text:span><text:span text:style-name="T83"/></text:p>
          </table:table-cell>
          <table:table-cell table:style-name="表格57.A2" office:value-type="string">
            <text:p text:style-name="P29" loext:marker-style-name="T83"><text:span text:style-name="T352">32 bit</text:span><text:span text:style-name="T84">，約 </text:span><text:span text:style-name="T182">43 </text:span><text:span text:style-name="T84">億個 </text:span><text:span text:style-name="T182">IP</text:span><text:span text:style-name="T84">，已嚴重不足</text:span></text:p>
          </table:table-cell>
          <table:table-cell table:style-name="表格57.A2" office:value-type="string">
            <text:p text:style-name="P29" loext:marker-style-name="T83"><text:span text:style-name="T461">128 bit</text:span><text:span text:style-name="T84">，約 </text:span><text:span text:style-name="T182">3.4×10³⁸ </text:span><text:span text:style-name="T84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9" loext:marker-style-name="T83"><text:span text:style-name="T182">NAT </text:span><text:span text:style-name="T84">位址轉換</text:span></text:p>
          </table:table-cell>
          <table:table-cell table:style-name="表格57.A3" office:value-type="string">
            <text:p text:style-name="P29" loext:marker-style-name="T83"><text:span text:style-name="T96">需 </text:span><text:span text:style-name="T187">NAT </text:span><text:span text:style-name="T96">共用 </text:span><text:span text:style-name="T187">IP</text:span><text:span text:style-name="T84">，破壞 </text:span><text:span text:style-name="T182">End-to-End</text:span></text:p>
          </table:table-cell>
          <table:table-cell table:style-name="表格57.A3" office:value-type="string">
            <text:p text:style-name="P29" loext:marker-style-name="T83"><text:span text:style-name="T92">每裝置獨立公開 </text:span><text:span text:style-name="T190">IP</text:span><text:span text:style-name="T92">，不需 </text:span><text:span text:style-name="T190">NAT</text:span><text:span text:style-name="T84">，恢復 </text:span><text:span text:style-name="T182">E2E</text:span></text:p>
          </table:table-cell>
        </table:table-row>
        <table:table-row table:style-name="表格57.1">
          <table:table-cell table:style-name="表格57.A2" office:value-type="string">
            <text:p text:style-name="P29" loext:marker-style-name="T83"><text:span text:style-name="T84">安全性</text:span><text:span text:style-name="T83"/></text:p>
          </table:table-cell>
          <table:table-cell table:style-name="表格57.A2" office:value-type="string">
            <text:p text:style-name="P29" loext:marker-style-name="T83"><text:span text:style-name="T84">無內建加密／驗證，</text:span><text:span text:style-name="T96">須另裝 </text:span><text:span text:style-name="T187">VPN</text:span></text:p>
          </table:table-cell>
          <table:table-cell table:style-name="表格57.A2" office:value-type="string">
            <text:p text:style-name="P29" loext:marker-style-name="T83"><text:span text:style-name="T323">支援 </text:span><text:span text:style-name="T356">IPsec</text:span><text:span text:style-name="T92">（加密＋驗證）</text:span><text:span text:style-name="T84">※ </text:span><text:span text:style-name="T182">RFC 6434 </text:span><text:span text:style-name="T84">後改建議</text:span></text:p>
          </table:table-cell>
        </table:table-row>
        <table:table-row table:style-name="表格57.1">
          <table:table-cell table:style-name="表格57.A3" office:value-type="string">
            <text:p text:style-name="P29" loext:marker-style-name="T83"><text:span text:style-name="T182">Header </text:span><text:span text:style-name="T84">結構</text:span></text:p>
          </table:table-cell>
          <table:table-cell table:style-name="表格57.A3" office:value-type="string">
            <text:p text:style-name="P29" loext:marker-style-name="T83"><text:span text:style-name="T96">可變長度</text:span><text:span text:style-name="T84">含 </text:span><text:span text:style-name="T182">Options</text:span><text:span text:style-name="T84">，</text:span><text:span text:style-name="T182">Router </text:span><text:span text:style-name="T84">效率低</text:span></text:p>
          </table:table-cell>
          <table:table-cell table:style-name="表格57.A3" office:value-type="string">
            <text:p text:style-name="P29" loext:marker-style-name="T83"><text:span text:style-name="T92">固定 </text:span><text:span text:style-name="T190">40 bytes </text:span><text:span text:style-name="T84">基本 </text:span><text:span text:style-name="T182">Header</text:span><text:span text:style-name="T84">，轉送更快</text:span></text:p>
          </table:table-cell>
        </table:table-row>
        <table:table-row table:style-name="表格57.1">
          <table:table-cell table:style-name="表格57.A2" office:value-type="string">
            <text:p text:style-name="P29" loext:marker-style-name="T83"><text:span text:style-name="T84">服務品質 </text:span><text:span text:style-name="T182">QoS</text:span></text:p>
          </table:table-cell>
          <table:table-cell table:style-name="表格57.A2" office:value-type="string">
            <text:p text:style-name="P29" loext:marker-style-name="T98"><text:span text:style-name="T96">無法有效標記流量優先權</text:span><text:span text:style-name="T98"/></text:p>
          </table:table-cell>
          <table:table-cell table:style-name="表格57.A2" office:value-type="string">
            <text:p text:style-name="P29" loext:marker-style-name="T83"><text:span text:style-name="T190">Flow Label </text:span><text:span text:style-name="T92">欄位</text:span><text:span text:style-name="T84">，</text:span><text:span text:style-name="T403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9" loext:marker-style-name="T83"><text:span text:style-name="T84">廣播方式</text:span><text:span text:style-name="T83"/></text:p>
          </table:table-cell>
          <table:table-cell table:style-name="表格57.A3" office:value-type="string">
            <text:p text:style-name="P29" loext:marker-style-name="T83"><text:span text:style-name="T187">Broadcast</text:span><text:span text:style-name="T84">：一次發給所有人，浪費頻寬</text:span></text:p>
          </table:table-cell>
          <table:table-cell table:style-name="表格57.A3" office:value-type="string">
            <text:p text:style-name="P29" loext:marker-style-name="T83"><text:span text:style-name="T84">改用</text:span><text:span text:style-name="T92"> </text:span><text:span text:style-name="T190">Multicast</text:span><text:span text:style-name="T92">（群播）／ </text:span><text:span text:style-name="T190">Anycast</text:span><text:span text:style-name="T92">（任播）</text:span></text:p>
          </table:table-cell>
        </table:table-row>
        <table:table-row table:style-name="表格57.1">
          <table:table-cell table:style-name="表格57.A2" office:value-type="string">
            <text:p text:style-name="P29" loext:marker-style-name="T83"><text:span text:style-name="T182">IP </text:span><text:span text:style-name="T84">配置方式</text:span></text:p>
          </table:table-cell>
          <table:table-cell table:style-name="表格57.A2" office:value-type="string">
            <text:p text:style-name="P29" loext:marker-style-name="T83"><text:span text:style-name="T94">需手動設定或 </text:span><text:span text:style-name="T191">DHCP</text:span><text:span text:style-name="T84">，管理繁瑣</text:span></text:p>
          </table:table-cell>
          <table:table-cell table:style-name="表格57.A2" office:value-type="string">
            <text:p text:style-name="P29" loext:marker-style-name="T83"><text:span text:style-name="T182">SLAAC </text:span><text:span text:style-name="T84">無狀態自動配置，</text:span><text:span text:style-name="T378">插網路即取得 </text:span><text:span text:style-name="T391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6"><text:span text:style-name="T247">📌 <text:s/></text:span><text:span text:style-name="T269">補充：</text:span><text:span text:style-name="T273">IPsec </text:span><text:span text:style-name="T269">強制 </text:span><text:span text:style-name="T273">vs </text:span><text:span text:style-name="T269">建議</text:span></text:p>
            <text:p text:style-name="P7" loext:marker-style-name="T107"><text:span text:style-name="T194">IPv6 </text:span><text:span text:style-name="T106">早期規範（</text:span><text:span text:style-name="T194">RFC 2460</text:span><text:span text:style-name="T106">）將 </text:span><text:span text:style-name="T194">IPsec </text:span><text:span text:style-name="T106">列為「強制」；</text:span><text:span text:style-name="T194">2011 </text:span><text:span text:style-name="T106">年 </text:span><text:span text:style-name="T194">RFC 6434 </text:span><text:span text:style-name="T106">修訂後改為「建議（</text:span><text:span text:style-name="T194">SHOULD</text:span><text:span text:style-name="T106">）」。考試普遍仍以「原生支援 </text:span><text:span text:style-name="T194">IPsec</text:span><text:span text:style-name="T106">」作為 </text:span><text:span text:style-name="T194">IPv6 </text:span><text:span text:style-name="T106">改進特色，此處標注供參考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三種 </text:span><text:span text:style-name="T27">IPv4 → IPv6 </text:span><text:span text:style-name="T28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7" loext:marker-style-name="T255"><text:span text:style-name="T262">① </text:span><text:span text:style-name="T264">Dual Stack</text:span><text:span text:style-name="T256">（雙協定堆疊）</text:span><text:span text:style-name="T254">— 最常用、最推薦</text:span></text:p>
            <text:p text:style-name="P8" loext:marker-style-name="T107"><text:span text:style-name="T494">裝置同時具備 </text:span><text:span text:style-name="T504">IPv4 </text:span><text:span text:style-name="T494">與 </text:span><text:span text:style-name="T504">IPv6 </text:span><text:span text:style-name="T494">兩套協定堆疊</text:span><text:span text:style-name="T106">。</text:span><text:span text:style-name="T215">DNS A record → </text:span><text:span text:style-name="T131">回傳 </text:span><text:span text:style-name="T215">IPv4</text:span><text:span text:style-name="T131">；</text:span><text:span text:style-name="T215">DNS AAAA record → </text:span><text:span text:style-name="T131">回傳 </text:span><text:span text:style-name="T215">IPv6</text:span><text:span text:style-name="T106">。連線時優先選用 </text:span><text:span text:style-name="T194">IPv6</text:span><text:span text:style-name="T106">，對端不支援則自動退回 </text:span><text:span text:style-name="T194">IPv4</text:span><text:span text:style-name="T106">。不需任何封包轉換，效能損耗最低。</text:span></text:p>
            <text:p text:style-name="P8" loext:marker-style-name="T107"><text:span text:style-name="T106">流程：輸入 </text:span><text:span text:style-name="T194">google.com → DNS </text:span><text:span text:style-name="T106">回傳 </text:span><text:span text:style-name="T194">A</text:span><text:span text:style-name="T106">＋</text:span><text:span text:style-name="T194">AAAA → </text:span><text:span text:style-name="T106">優先選 </text:span><text:span text:style-name="T194">IPv6 → </text:span><text:span text:style-name="T106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7" loext:marker-style-name="T268"><text:span text:style-name="T270">②</text:span><text:span text:style-name="T272"> Tunneling</text:span><text:span text:style-name="T267">（隧道技術）</text:span><text:span text:style-name="T265">— 過渡期橋接方案</text:span></text:p>
            <text:p text:style-name="P8" loext:marker-style-name="T107"><text:span text:style-name="T106">中間網路只支援 </text:span><text:span text:style-name="T194">IPv4</text:span><text:span text:style-name="T106">，無法直接傳送 </text:span><text:span text:style-name="T194">IPv6 </text:span><text:span text:style-name="T106">封包。解法：</text:span><text:span text:style-name="T494">將 </text:span><text:span text:style-name="T504">IPv6 </text:span><text:span text:style-name="T494">封包完整封裝進 </text:span><text:span text:style-name="T504">IPv4 </text:span><text:span text:style-name="T494">外殼，抵達目的地後拆除外層 </text:span><text:span text:style-name="T504">IPv4</text:span><text:span text:style-name="T494">、還原 </text:span><text:span text:style-name="T504">IPv6 </text:span><text:span text:style-name="T494">封包</text:span><text:span text:style-name="T106">。常見技術：</text:span><text:span text:style-name="T194">6in4</text:span><text:span text:style-name="T106">、</text:span><text:span text:style-name="T194">6to4</text:span><text:span text:style-name="T106">、</text:span><text:span text:style-name="T194">Teredo</text:span><text:span text:style-name="T106">、</text:span><text:span text:style-name="T194">ISATAP</text:span><text:span text:style-name="T106">。</text:span></text:p>
            <text:p text:style-name="P8" loext:marker-style-name="T107"><text:span text:style-name="T106">示意：</text:span><text:span text:style-name="T194">[ IPv4 </text:span><text:span text:style-name="T106">外層 </text:span><text:span text:style-name="T194">Header ][ IPv6 </text:span><text:span text:style-name="T106">封包（完整保留）</text:span><text:span text:style-name="T194">] → </text:span><text:span text:style-name="T106">目的地拆除外殼 → 還原 </text:span><text:span text:style-name="T194">IPv6</text:span><text:span text:style-name="T106">。</text:span></text:p>
          </table:table-cell>
        </table:table-row>
        <table:table-row table:style-name="表格58.1">
          <table:table-cell table:style-name="表格58.A3" office:value-type="string">
            <text:p text:style-name="P7" loext:marker-style-name="T304"><text:span text:style-name="T307">③ </text:span><text:span text:style-name="T308">Translation</text:span><text:span text:style-name="T302">（</text:span><text:span text:style-name="T308">NAT64</text:span><text:span text:style-name="T302">）</text:span><text:span text:style-name="T300">— 協定轉換、互通最後手段</text:span></text:p>
            <text:p text:style-name="P8" loext:marker-style-name="T107"><text:span text:style-name="T106">適用場景：</text:span><text:span text:style-name="T194">IPv6-only </text:span><text:span text:style-name="T106">裝置需與 </text:span><text:span text:style-name="T194">IPv4-only </text:span><text:span text:style-name="T106">裝置直接通訊。</text:span><text:span text:style-name="T340">透過轉換閘道器即時將封包表頭轉換為對方格式</text:span><text:span text:style-name="T106">。代表技術：</text:span><text:span text:style-name="T194">NAT64 + DNS64</text:span><text:span text:style-name="T106">。</text:span><text:span text:style-name="T334">複雜度最高，有額外效能損耗</text:span><text:span text:style-name="T106">。</text:span></text:p>
            <text:p text:style-name="P8" loext:marker-style-name="T107"><text:span text:style-name="T106">示意：</text:span><text:span text:style-name="T194">IPv6 </text:span><text:span text:style-name="T106">裝置 → </text:span><text:span text:style-name="T194">[ NAT64 </text:span><text:span text:style-name="T537">轉換閘道</text:span><text:span text:style-name="T106"> </text:span><text:span text:style-name="T194">] → IPv4 </text:span><text:span text:style-name="T106">裝置（雙向互轉）。</text:span></text:p>
          </table:table-cell>
        </table:table-row>
      </table:table>
      <text:h text:style-name="P11" text:outline-level="2" loext:marker-style-name="T27"><text:span text:style-name="T28">三、生活比喻（一次記住）</text:span><text:span text:style-name="T27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4" loext:marker-style-name="T73"><text:span text:style-name="T74">技術</text:span><text:span text:style-name="T73"/></text:p>
            </table:table-cell>
            <table:table-cell table:style-name="表格59.A1" office:value-type="string">
              <text:p text:style-name="P4" loext:marker-style-name="T73"><text:span text:style-name="T74">生活比喻</text:span><text:span text:style-name="T73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9" loext:marker-style-name="T142"><text:span text:style-name="T226">Dual Stack</text:span><text:soft-page-break/><text:span text:style-name="T142"/></text:p>
          </table:table-cell>
          <table:table-cell table:style-name="表格59.A2" office:value-type="string">
            <text:p text:style-name="P29" loext:marker-style-name="T142"><text:span text:style-name="T143">你</text:span><text:span text:style-name="T146">同時會中文 </text:span><text:span text:style-name="T227">+ </text:span><text:span text:style-name="T146">英文</text:span><text:span text:style-name="T143">，遇到誰說哪個</text:span></text:p>
          </table:table-cell>
        </table:table-row>
        <table:table-row table:style-name="表格59.1">
          <table:table-cell table:style-name="表格59.A3" office:value-type="string">
            <text:p text:style-name="P29" loext:marker-style-name="T142"><text:span text:style-name="T226">Tunneling</text:span><text:span text:style-name="T142"/></text:p>
          </table:table-cell>
          <table:table-cell table:style-name="表格59.A3" office:value-type="string">
            <text:p text:style-name="P29" loext:marker-style-name="T142"><text:span text:style-name="T390">把英文信裝進中文信封偷渡過去</text:span><text:span text:style-name="T143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9" loext:marker-style-name="T142"><text:span text:style-name="T226">Translation</text:span><text:span text:style-name="T142"/></text:p>
          </table:table-cell>
          <table:table-cell table:style-name="表格59.A2" office:value-type="string">
            <text:p text:style-name="P29" loext:marker-style-name="T142"><text:span text:style-name="T601">現場請翻譯員</text:span><text:span text:style-name="T143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6"><text:span text:style-name="T247">🏠 <text:s/></text:span><text:span text:style-name="T52">用「寄信</text:span><text:span text:style-name="T63">/</text:span><text:span text:style-name="T52">門牌」理解</text:span></text:p>
            <text:p text:style-name="P7"><text:span text:style-name="T414">IPv4 </text:span><text:span text:style-name="T406">的困境：整棟公寓共用一個門牌</text:span><text:span text:style-name="T540">（</text:span><text:span text:style-name="T556">NAT</text:span><text:span text:style-name="T540">）</text:span><text:span text:style-name="T106">，郵差只送到大門，裡面誰是誰要另外猜；地址快用光還在借號碼。</text:span></text:p>
            <text:p text:style-name="P8"><text:span text:style-name="T358">IPv6 </text:span><text:span text:style-name="T336">的世界：每個人都有獨立門牌（公開 </text:span><text:span text:style-name="T358">IP</text:span><text:span text:style-name="T336">）</text:span><text:span text:style-name="T106">，地址多到用不完，郵件直接送到本人手上，不需中間人轉達。</text:span></text:p>
          </table:table-cell>
          <table:covered-table-cell/>
        </table:table-row>
      </table:table>
      <text:h text:style-name="P11" text:outline-level="2" loext:marker-style-name="T27"><text:span text:style-name="T28">四、考試速記版</text:span><text:span text:style-name="T27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6"><text:span text:style-name="T247">🧠 <text:s/></text:span><text:span text:style-name="T299">一句話記憶法</text:span></text:p>
            <text:p text:style-name="P7"><text:span text:style-name="T307">IPv6 </text:span><text:span text:style-name="T300">特點：</text:span><text:span text:style-name="T106">大（</text:span><text:span text:style-name="T194">128 bit</text:span><text:span text:style-name="T106">）＋ </text:span><text:span text:style-name="T454">安全（</text:span><text:span text:style-name="T476">IPsec</text:span><text:span text:style-name="T454">）</text:span><text:span text:style-name="T106">＋ </text:span><text:span text:style-name="T535">快（固定 </text:span><text:span text:style-name="T553">Header</text:span><text:span text:style-name="T535">）</text:span><text:span text:style-name="T106">＋ 自動（</text:span><text:span text:style-name="T194">SLAAC</text:span><text:span text:style-name="T106">）＋ 乾淨（無 </text:span><text:span text:style-name="T194">Broadcast</text:span><text:span text:style-name="T106">）。</text:span></text:p>
            <text:p text:style-name="P8"><text:span text:style-name="T302">過渡技術</text:span><text:span text:style-name="T300">：</text:span><text:span text:style-name="T106">雙語（</text:span><text:span text:style-name="T215">Dual Stack</text:span><text:span text:style-name="T106">）＋ 偽裝（</text:span><text:span text:style-name="T215">Tunneling</text:span><text:span text:style-name="T106">）＋ 翻譯（</text:span><text:span text:style-name="T215">Translation</text:span><text:span text:style-name="T106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26" loext:marker-style-name="T69"><text:span text:style-name="T79">IPv4 </text:span><text:span text:style-name="T70">七大問題</text:span></text:p>
          </table:table-cell>
          <table:table-cell table:style-name="表格60.A2" office:value-type="string">
            <text:p text:style-name="P26" loext:marker-style-name="T69"><text:span text:style-name="T79">IPv6 </text:span><text:span text:style-name="T70">七大改進</text:span></text:p>
          </table:table-cell>
        </table:table-row>
        <table:table-row table:style-name="表格60.1">
          <table:table-cell table:style-name="表格60.A3" office:value-type="string">
            <text:p text:style-name="P29" loext:marker-style-name="T83"><text:span text:style-name="T84">位址不足（</text:span><text:span text:style-name="T182">32 bit</text:span><text:span text:style-name="T84">）／需 </text:span><text:span text:style-name="T182">NAT </text:span><text:span text:style-name="T84">破壞 </text:span><text:span text:style-name="T182">E2E</text:span><text:span text:style-name="T84">／無加密驗證／</text:span><text:span text:style-name="T548">Header </text:span><text:span text:style-name="T529">可變效率低</text:span><text:span text:style-name="T84">／缺 </text:span><text:span text:style-name="T182">QoS</text:span><text:span text:style-name="T84">／用 </text:span><text:span text:style-name="T182">Broadcast </text:span><text:span text:style-name="T84">浪費／</text:span><text:span text:style-name="T182">IP </text:span><text:span text:style-name="T84">需手動設定</text:span></text:p>
          </table:table-cell>
          <table:table-cell table:style-name="表格60.A3" office:value-type="string">
            <text:p text:style-name="P29" loext:marker-style-name="T83"><text:span text:style-name="T182">128 bit </text:span><text:span text:style-name="T84">近乎無限／不需 </text:span><text:span text:style-name="T182">NAT </text:span><text:span text:style-name="T84">恢復 </text:span><text:span text:style-name="T182">E2E</text:span><text:span text:style-name="T84">／</text:span><text:span text:style-name="T323">支援 </text:span><text:span text:style-name="T356">IPsec</text:span><text:span text:style-name="T84">／</text:span><text:span text:style-name="T323">固定 </text:span><text:span text:style-name="T356">40 bytes </text:span><text:span text:style-name="T323">轉送快</text:span><text:span text:style-name="T84">／</text:span><text:span text:style-name="T182">Flow Label </text:span><text:span text:style-name="T84">支援 </text:span><text:span text:style-name="T182">QoS</text:span><text:span text:style-name="T84">／改用 </text:span><text:span text:style-name="T182">Multicast/Anycast</text:span><text:span text:style-name="T84">／</text:span><text:span text:style-name="T182">SLAAC </text:span><text:span text:style-name="T84">自動配置</text:span></text:p>
          </table:table-cell>
        </table:table-row>
      </table:table>
      <text:h text:style-name="P17" text:outline-level="1" loext:marker-style-name="T71"><text:span text:style-name="T72">第 四 篇　</text:span><text:span text:style-name="T71">ARP</text:span><text:span text:style-name="T72">、</text:span><text:span text:style-name="T71">NAT </text:span><text:span text:style-name="T72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6"><text:span text:style-name="T247">🔑 <text:s/></text:span><text:span text:style-name="T52">最基礎的比喻，先懂這個</text:span></text:p>
            <text:p text:style-name="P7" loext:marker-style-name="T107"><text:span text:style-name="T194">IP </text:span><text:span text:style-name="T106">位址決定「最終送到哪台電腦」；</text:span><text:span text:style-name="T194">MAC </text:span><text:span text:style-name="T106">位址決定「目前這一跳要交給哪個網路設備」。</text:span></text:p>
            <text:p text:style-name="P8" loext:marker-style-name="T107"><text:span text:style-name="T587">資料在網路中「實際傳送」靠 </text:span><text:span text:style-name="T611">MAC</text:span><text:span text:style-name="T106">，</text:span><text:span text:style-name="T452">但我們只知道對方的 </text:span><text:span text:style-name="T474">IP</text:span><text:span text:style-name="T194">——</text:span><text:span text:style-name="T106">所以</text:span><text:span text:style-name="T406">需要一個轉換機制</text:span><text:span text:style-name="T106">，這就是 </text:span><text:span text:style-name="T194">ARP </text:span><text:span text:style-name="T106">的工作。</text:span></text:p>
          </table:table-cell>
        </table:table-row>
      </table:table>
      <text:h text:style-name="P11" text:outline-level="2" loext:marker-style-name="T27"><text:span text:style-name="T28">一、</text:span><text:span text:style-name="T27">ARP</text:span><text:span text:style-name="T28">（</text:span><text:span text:style-name="T27">Address Resolution Protocol</text:span><text:span text:style-name="T28">）：</text:span><text:span text:style-name="T29">IP → MAC</text:span></text:h>
      <text:p text:style-name="P35" loext:marker-style-name="T107"><text:span text:style-name="T106">一句話定義：</text:span><text:span text:style-name="T217">ARP</text:span><text:span text:style-name="T194"> </text:span><text:span text:style-name="T106">＝ </text:span><text:span text:style-name="T386">用 </text:span><text:span text:style-name="T398">IP </text:span><text:span text:style-name="T386">找 </text:span><text:span text:style-name="T398">MAC</text:span><text:span text:style-name="T106">，</text:span><text:span text:style-name="T336">只在同一個區域網路（</text:span><text:span text:style-name="T358">LAN</text:span><text:span text:style-name="T336">）內使用</text:span><text:span text:style-name="T106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6"><text:span text:style-name="T247">📋 <text:s/></text:span><text:span text:style-name="T63">ARP </text:span><text:span text:style-name="T52">運作流程（考試必考）</text:span></text:p>
            <text:p text:style-name="P7"><text:span text:style-name="T65">① </text:span><text:span text:style-name="T56">查 </text:span><text:span text:style-name="T64">ARP Cache</text:span><text:span text:style-name="T56">（筆記本）</text:span><text:span text:style-name="T57">：</text:span><text:span text:style-name="T106">先查自己的記錄「</text:span><text:span text:style-name="T636">我之前有沒有問過這個 </text:span><text:span text:style-name="T651">IP</text:span><text:span text:style-name="T636">？</text:span><text:span text:style-name="T106">」有 → 直接用。</text:span></text:p>
            <text:p text:style-name="P8"><text:span text:style-name="T65">② </text:span><text:span text:style-name="T56">發出 </text:span><text:span text:style-name="T64">ARP Request</text:span><text:span text:style-name="T56">（廣播）</text:span><text:span text:style-name="T57">：</text:span><text:span text:style-name="T106">沒記錄 →</text:span><text:span text:style-name="T585"> 對整個區網廣播</text:span><text:span text:style-name="T106">「誰是 </text:span><text:span text:style-name="T194">192.168.1.5</text:span><text:span text:style-name="T106">？</text:span><text:span text:style-name="T585">請告訴我你的 </text:span><text:span text:style-name="T609">MAC</text:span><text:span text:style-name="T585">！</text:span><text:span text:style-name="T106">」所有機器都收到。</text:span></text:p>
            <text:p text:style-name="P8"><text:span text:style-name="T65">③ </text:span><text:span text:style-name="T56">收到 </text:span><text:span text:style-name="T64">ARP Reply</text:span><text:span text:style-name="T56">（單播回應）</text:span><text:span text:style-name="T57">：</text:span><text:span text:style-name="T316">IP </text:span><text:span text:style-name="T314">是 </text:span><text:span text:style-name="T316">192.168.1.5 </text:span><text:span text:style-name="T314">的機器回應「我是！</text:span><text:span text:style-name="T316">MAC </text:span><text:span text:style-name="T314">是 </text:span><text:span text:style-name="T316">AA:BB:CC</text:span><text:span text:style-name="T314">」</text:span><text:span text:style-name="T106">，其餘機器靜默忽略。</text:span></text:p>
            <text:p text:style-name="P8"><text:span text:style-name="T65">④ </text:span><text:span text:style-name="T56">存進 </text:span><text:span text:style-name="T64">ARP Cache</text:span><text:span text:style-name="T57">：</text:span><text:span text:style-name="T451">把「</text:span><text:span text:style-name="T473">IP ↔ MAC</text:span><text:span text:style-name="T451">」對應記下</text:span><text:span text:style-name="T106">，</text:span><text:span text:style-name="T336">下次直接用</text:span><text:span text:style-name="T106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4" loext:marker-style-name="T69"><text:span text:style-name="T70">項目</text:span><text:span text:style-name="T69"/></text:p>
          </table:table-cell>
          <table:table-cell table:style-name="表格62.A2" office:value-type="string">
            <text:p text:style-name="P4" loext:marker-style-name="T69"><text:span text:style-name="T70">內容</text:span><text:span text:style-name="T69"/></text:p>
          </table:table-cell>
        </table:table-row>
        <table:table-row table:style-name="表格62.1">
          <table:table-cell table:style-name="表格62.A3" office:value-type="string">
            <text:p text:style-name="P29" loext:marker-style-name="T530"><text:span text:style-name="T549">ARP Spoofing</text:span><text:span text:style-name="T531">（</text:span><text:span text:style-name="T549">ARP </text:span><text:span text:style-name="T531">欺騙）</text:span></text:p>
          </table:table-cell>
          <table:table-cell table:style-name="表格62.A3" office:value-type="string">
            <text:p text:style-name="P29" loext:marker-style-name="T83"><text:span text:style-name="T433">攻擊者</text:span><text:span text:style-name="T595">假冒他人</text:span><text:span text:style-name="T433">的 </text:span><text:span text:style-name="T461">MAC</text:span><text:span text:style-name="T433">，讓封包被送到錯的地方</text:span><text:span text:style-name="T84"> → 中間人攻擊（</text:span><text:span text:style-name="T182">MITM</text:span><text:span text:style-name="T84">）</text:span></text:p>
          </table:table-cell>
        </table:table-row>
        <table:table-row table:style-name="表格62.1">
          <table:table-cell table:style-name="表格62.A4" office:value-type="string">
            <text:p text:style-name="P29" loext:marker-style-name="T98"><text:span text:style-name="T187">arp -a</text:span><text:span text:style-name="T98"/></text:p>
          </table:table-cell>
          <table:table-cell table:style-name="表格62.A4" office:value-type="string">
            <text:p text:style-name="P29" loext:marker-style-name="T83"><text:span text:style-name="T596">查看本機的 </text:span><text:span text:style-name="T619">ARP </text:span><text:span text:style-name="T596">對應表</text:span><text:span text:style-name="T84">（</text:span><text:span text:style-name="T192">IP ↔ MAC </text:span><text:span text:style-name="T103">清單</text:span><text:span text:style-name="T84">）</text:span></text:p>
          </table:table-cell>
        </table:table-row>
        <table:table-row table:style-name="表格62.1">
          <table:table-cell table:style-name="表格62.A3" office:value-type="string">
            <text:p text:style-name="P29" loext:marker-style-name="T324"><text:span text:style-name="T356">ping [IP]</text:span><text:span text:style-name="T324"/></text:p>
          </table:table-cell>
          <table:table-cell table:style-name="表格62.A3" office:value-type="string">
            <text:p text:style-name="P29" loext:marker-style-name="T83"><text:span text:style-name="T378">觸發 </text:span><text:span text:style-name="T391">ARP </text:span><text:span text:style-name="T378">運作</text:span><text:span text:style-name="T84">，</text:span><text:span text:style-name="T319">讓電腦主動查詢對應 </text:span><text:span text:style-name="T352">MAC</text:span></text:p>
          </table:table-cell>
        </table:table-row>
      </table:table>
      <text:h text:style-name="P11" text:outline-level="2" loext:marker-style-name="T27"><text:span text:style-name="T28">二、</text:span><text:span text:style-name="T27">NAT</text:span><text:span text:style-name="T28">（</text:span><text:span text:style-name="T27">Network Address Translation</text:span><text:span text:style-name="T28">）：私網 → 公網</text:span></text:h>
      <text:p text:style-name="P35" loext:marker-style-name="T107"><text:span text:style-name="T106">一句話定義：</text:span><text:span text:style-name="T215">NAT</text:span><text:span text:style-name="T194"> </text:span><text:span text:style-name="T106">＝ </text:span><text:span text:style-name="T636">路由器幫你把「私有 </text:span><text:span text:style-name="T651">IP</text:span><text:span text:style-name="T636">」改成「公網 </text:span><text:span text:style-name="T651">IP</text:span><text:span text:style-name="T636">」</text:span><text:span text:style-name="T106">，讓內部機器能夠上網。</text:span><text:span text:style-name="T314">私有 </text:span><text:span text:style-name="T316">IP</text:span><text:span text:style-name="T314">（如 </text:span><text:span text:style-name="T316">192.168.1.2</text:span><text:span text:style-name="T314">）外網看不到，只在家裡用</text:span><text:span text:style-name="T106">；路由器的公網 </text:span><text:span text:style-name="T194">IP</text:span><text:span text:style-name="T106">（</text:span><text:span text:style-name="T194">220.x.x.x</text:span><text:span text:style-name="T106">，</text:span><text:span text:style-name="T194">ISP </text:span><text:span text:style-name="T106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6"><text:span text:style-name="T247">▸ <text:s/></text:span><text:span text:style-name="T63">NAT </text:span><text:span text:style-name="T52">運作流程</text:span></text:p>
            <text:p text:style-name="P7" loext:marker-style-name="T107"><text:span text:style-name="T194">① </text:span><text:span text:style-name="T106">你的電腦（</text:span><text:span text:style-name="T194">192.168.1.2</text:span><text:span text:style-name="T106">）發送資料給 </text:span><text:span text:style-name="T194">Google → ② </text:span><text:span text:style-name="T406">封包抵達路由器</text:span><text:span text:style-name="T106">，</text:span><text:span text:style-name="T358">NAT </text:span><text:span text:style-name="T336">把來源 </text:span><text:span text:style-name="T358">IP </text:span><text:span text:style-name="T336">改成公網 </text:span><text:span text:style-name="T358">IP</text:span><text:span text:style-name="T336">（</text:span><text:span text:style-name="T358">220.x.x.x</text:span><text:span text:style-name="T336">）</text:span><text:span text:style-name="T535">對外偽裝身份</text:span><text:span text:style-name="T106"> → ③ </text:span><text:span text:style-name="T194">Google </text:span><text:span text:style-name="T106">收到，回應給公網 </text:span><text:span text:style-name="T194">IP</text:span><text:span text:style-name="T106">（</text:span><text:span text:style-name="T194">220.x.x.x</text:span><text:span text:style-name="T106">）→ ④ 路由器把目的地 </text:span><text:span text:style-name="T194">IP </text:span><text:span text:style-name="T106">換回 </text:span><text:span text:style-name="T194">192.168.1.2</text:span><text:span text:style-name="T106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4" loext:marker-style-name="T69"><text:span text:style-name="T70">類型</text:span><text:span text:style-name="T69"/></text:p>
          </table:table-cell>
          <table:table-cell table:style-name="表格63.A2" office:value-type="string">
            <text:p text:style-name="P4" loext:marker-style-name="T69"><text:span text:style-name="T70">中文</text:span><text:span text:style-name="T69"/></text:p>
          </table:table-cell>
          <table:table-cell table:style-name="表格63.A2" office:value-type="string">
            <text:p text:style-name="P4" loext:marker-style-name="T69"><text:span text:style-name="T70">說明</text:span><text:span text:style-name="T69"/></text:p>
          </table:table-cell>
          <table:table-cell table:style-name="表格63.A2" office:value-type="string">
            <text:p text:style-name="P4" loext:marker-style-name="T69"><text:span text:style-name="T70">特點</text:span><text:span text:style-name="T69"/></text:p>
          </table:table-cell>
        </table:table-row>
        <table:table-row table:style-name="表格63.1">
          <table:table-cell table:style-name="表格63.A3" office:value-type="string">
            <text:p text:style-name="P29" loext:marker-style-name="T93"><text:span text:style-name="T190">Static NAT</text:span><text:span text:style-name="T93"/></text:p>
          </table:table-cell>
          <table:table-cell table:style-name="表格63.A3" office:value-type="string">
            <text:p text:style-name="P29" loext:marker-style-name="T83"><text:span text:style-name="T84">靜態 </text:span><text:span text:style-name="T182">NAT</text:span></text:p>
          </table:table-cell>
          <table:table-cell table:style-name="表格63.A3" office:value-type="string">
            <text:p text:style-name="P29" loext:marker-style-name="T483"><text:span text:style-name="T484">一個私有 </text:span><text:span text:style-name="T498">IP ↔ </text:span><text:span text:style-name="T484">一個公網 </text:span><text:span text:style-name="T498">IP</text:span></text:p>
          </table:table-cell>
          <table:table-cell table:style-name="表格63.A3" office:value-type="string">
            <text:p text:style-name="P29" loext:marker-style-name="T483"><text:span text:style-name="T484">固定對應</text:span><text:span text:style-name="T483"/></text:p>
          </table:table-cell>
        </table:table-row>
        <table:table-row table:style-name="表格63.1">
          <table:table-cell table:style-name="表格63.A4" office:value-type="string">
            <text:p text:style-name="P29" loext:marker-style-name="T93"><text:span text:style-name="T190">Dynamic NAT</text:span><text:span text:style-name="T93"/></text:p>
          </table:table-cell>
          <table:table-cell table:style-name="表格63.A4" office:value-type="string">
            <text:p text:style-name="P29" loext:marker-style-name="T83"><text:span text:style-name="T84">動態 </text:span><text:span text:style-name="T182">NAT</text:span></text:p>
          </table:table-cell>
          <table:table-cell table:style-name="表格63.A4" office:value-type="string">
            <text:p text:style-name="P29" loext:marker-style-name="T665"><text:span text:style-name="T666">多個私有 </text:span><text:span text:style-name="T669">IP </text:span><text:span text:style-name="T666">對應 </text:span><text:span text:style-name="T669">IP </text:span><text:span text:style-name="T666">池（</text:span><text:span text:style-name="T669">pool</text:span><text:span text:style-name="T666">）</text:span></text:p>
          </table:table-cell>
          <table:table-cell table:style-name="表格63.A4" office:value-type="string">
            <text:p text:style-name="P29" loext:marker-style-name="T665"><text:span text:style-name="T666">動態分配</text:span><text:span text:style-name="T665"/></text:p>
          </table:table-cell>
        </table:table-row>
        <table:table-row table:style-name="表格63.1">
          <table:table-cell table:style-name="表格63.A3" office:value-type="string">
            <text:p text:style-name="P29" loext:marker-style-name="T530"><text:span text:style-name="T549">PAT</text:span><text:span text:style-name="T530"/></text:p>
          </table:table-cell>
          <table:table-cell table:style-name="表格63.A3" office:value-type="string">
            <text:p text:style-name="P29" loext:marker-style-name="T83"><text:span text:style-name="T84">連接埠位址轉換</text:span><text:span text:style-name="T83"/></text:p>
          </table:table-cell>
          <table:table-cell table:style-name="表格63.A3" office:value-type="string">
            <text:p text:style-name="P29" loext:marker-style-name="T671"><text:span text:style-name="T672">多台共用一個公網 </text:span><text:span text:style-name="T673">IP</text:span></text:p>
          </table:table-cell>
          <table:table-cell table:style-name="表格63.A3" office:value-type="string">
            <text:p text:style-name="P29" loext:marker-style-name="T671"><text:span text:style-name="T672">靠 </text:span><text:span text:style-name="T673">Port </text:span><text:span text:style-name="T672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6"><text:span text:style-name="T247">⚠️ <text:s/></text:span><text:span text:style-name="T273">NAT </text:span><text:span text:style-name="T269">的缺點（考試超愛）</text:span></text:p>
            <text:p text:style-name="P7"><text:span text:style-name="T587">破壞 </text:span><text:span text:style-name="T611">End-to-End </text:span><text:span text:style-name="T587">連線</text:span><text:span text:style-name="T265">（最重要）：</text:span><text:span text:style-name="T106">原本你↔對方是真正點對點；</text:span><text:span text:style-name="T131">有 </text:span><text:span text:style-name="T215">NAT </text:span><text:span text:style-name="T131">後變成你→</text:span><text:span text:style-name="T215">NAT→</text:span><text:span text:style-name="T131">對方，多一層轉換，不再是端對端</text:span><text:span text:style-name="T106">。</text:span></text:p>
            <text:p text:style-name="P8"><text:span text:style-name="T611">P2P / VoIP </text:span><text:span text:style-name="T587">難以運作</text:span><text:span text:style-name="T265">：</text:span><text:span text:style-name="T336">外部機器找不到你（被藏在 </text:span><text:span text:style-name="T358">NAT </text:span><text:span text:style-name="T336">後）</text:span><text:span text:style-name="T106">，</text:span><text:span text:style-name="T194">P2P </text:span><text:span text:style-name="T106">下載、</text:span><text:span text:style-name="T194">VoIP </text:span><text:span text:style-name="T106">通話等</text:span><text:span text:style-name="T667">直連功能受限</text:span><text:span text:style-name="T106">。</text:span></text:p>
            <text:p text:style-name="P8"><text:span text:style-name="T587">增加延遲</text:span><text:span text:style-name="T265">：</text:span><text:span text:style-name="T425">每個封包都需要</text:span><text:span text:style-name="T674">多一道 </text:span><text:span text:style-name="T675">IP </text:span><text:span text:style-name="T674">轉換處理</text:span><text:span text:style-name="T106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oft-page-break/><text:span text:style-name="T28">三、解決 </text:span><text:span text:style-name="T27">NAT </text:span><text:span text:style-name="T28">限制的三種方法</text:span></text:h>
      <text:p text:style-name="P35" loext:marker-style-name="T107"><text:span text:style-name="T131">核心問題</text:span><text:span text:style-name="T106">：</text:span><text:span text:style-name="T406">外面的人只看到一個公網 </text:span><text:span text:style-name="T414">IP</text:span><text:span text:style-name="T106">，但</text:span><text:span text:style-name="T676">內部有多台機器，路由器不知道要轉給哪一台</text:span><text:span text:style-name="T106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7" loext:marker-style-name="T55"><text:span text:style-name="T57">方法一：</text:span><text:span text:style-name="T64">Port Forwarding</text:span><text:span text:style-name="T56">（手動指定轉發）</text:span></text:p>
            <text:p text:style-name="P8" loext:marker-style-name="T107"><text:span text:style-name="T106">比喻：</text:span><text:span text:style-name="T474">Port</text:span><text:span text:style-name="T452">＝房間號碼</text:span><text:span text:style-name="T106">；</text:span><text:span text:style-name="T651">NAT </text:span><text:span text:style-name="T636">路由器＝大樓</text:span><text:span text:style-name="T106">；</text:span><text:span text:style-name="T474">Port Forwarding</text:span><text:span text:style-name="T452">＝門口指示牌「</text:span><text:span text:style-name="T474">80 </text:span><text:span text:style-name="T452">號房 → </text:span><text:span text:style-name="T474">192.168.1.2</text:span><text:span text:style-name="T452">」</text:span><text:span text:style-name="T106">。例：</text:span><text:span text:style-name="T194">220.x.x.x:80 → 192.168.1.2:80</text:span><text:span text:style-name="T106">（</text:span><text:span text:style-name="T640">網頁</text:span><text:span text:style-name="T106">）；</text:span><text:span text:style-name="T194">220.x.x.x:25565 → 192.168.1.2:25565</text:span><text:span text:style-name="T106">（</text:span><text:span text:style-name="T194">Minecraft</text:span><text:span text:style-name="T106">）。</text:span></text:p>
            <text:p text:style-name="P8"><text:span text:style-name="T130">優點：</text:span><text:span text:style-name="T106">設定直接、穩定，可精確控制。</text:span><text:span text:style-name="T130">缺點：</text:span><text:span text:style-name="T537">每個服務都要手動設定，</text:span><text:span text:style-name="T554">IP </text:span><text:span text:style-name="T537">改變要重設</text:span><text:span text:style-name="T106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7" loext:marker-style-name="T255"><text:span text:style-name="T254">方法二：</text:span><text:span text:style-name="T264">UPnP</text:span><text:span text:style-name="T256">（自動版 </text:span><text:span text:style-name="T264">Port Forwarding</text:span><text:span text:style-name="T256">）</text:span></text:p>
            <text:p text:style-name="P8" loext:marker-style-name="T107"><text:span text:style-name="T342">讓裝置自動跟</text:span><text:span text:style-name="T564">路由器</text:span><text:span text:style-name="T342">要求「幫我開一個 </text:span><text:span text:style-name="T366">Port</text:span><text:span text:style-name="T342">」，不需人工設定。</text:span><text:span text:style-name="T106">① </text:span><text:span text:style-name="T638">應用程式發 </text:span><text:span text:style-name="T653">UPnP </text:span><text:span text:style-name="T638">請求</text:span><text:span text:style-name="T106"> → ② </text:span><text:span text:style-name="T565">路由器</text:span><text:span text:style-name="T638">自動新增 </text:span><text:span text:style-name="T653">Port Forwarding </text:span><text:span text:style-name="T638">規則</text:span><text:span text:style-name="T106"> → ③</text:span><text:span text:style-name="T344"> 服務結束後自動清除</text:span><text:span text:style-name="T106">（理想情況）。</text:span></text:p>
            <text:p text:style-name="P8"><text:span text:style-name="T130">優點：</text:span><text:span text:style-name="T106">全自動、對一般用戶友善。</text:span><text:span text:style-name="T279">安全風險（重要）：</text:span><text:span text:style-name="T537">惡意程式也能透過 </text:span><text:span text:style-name="T554">UPnP </text:span><text:span text:style-name="T537">自動開 </text:span><text:span text:style-name="T554">Port</text:span><text:span text:style-name="T537">，可能讓攻擊者直接連入內網</text:span><text:span text:style-name="T106">。建議不需要時關閉 </text:span><text:span text:style-name="T194">UPnP</text:span><text:span text:style-name="T106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" loext:marker-style-name="T304"><text:span text:style-name="T300">方法三：</text:span><text:span text:style-name="T308">STUN</text:span><text:span text:style-name="T302">（打洞技術）</text:span></text:p>
            <text:p text:style-name="P8" loext:marker-style-name="T107"><text:span text:style-name="T131">使用情境</text:span><text:span text:style-name="T106">：</text:span><text:span text:style-name="T677">兩端都在各自 </text:span><text:span text:style-name="T681">NAT </text:span><text:span text:style-name="T677">後面，彼此都是私有 </text:span><text:span text:style-name="T681">IP</text:span><text:span text:style-name="T677">、互相找不到。</text:span><text:span text:style-name="T681">STUN </text:span><text:span text:style-name="T677">先幫每端「查清楚自己對外的公網 </text:span><text:span text:style-name="T681">IP + Port</text:span><text:span text:style-name="T677">」，再交換資訊</text:span><text:span text:style-name="T106">嘗試直接打通。</text:span></text:p>
            <text:p text:style-name="P8" loext:marker-style-name="T107"><text:span text:style-name="T194">① </text:span><text:span text:style-name="T684">問 </text:span><text:span text:style-name="T689">STUN </text:span><text:span text:style-name="T684">伺服器「我對外的 </text:span><text:span text:style-name="T689">IP </text:span><text:span text:style-name="T684">和 </text:span><text:span text:style-name="T689">Port </text:span><text:span text:style-name="T684">是什麼？」</text:span><text:span text:style-name="T106">② </text:span><text:span text:style-name="T689">STUN </text:span><text:span text:style-name="T684">回「你對外是 </text:span><text:span text:style-name="T689">220.x.x.x:12345</text:span><text:span text:style-name="T684">」</text:span><text:span text:style-name="T106">③ </text:span><text:span text:style-name="T314">朋友也做同樣的事</text:span><text:span text:style-name="T106"> → ④ </text:span><text:span text:style-name="T684">兩端透過第三方交換彼此公網位址</text:span><text:span text:style-name="T106"> → ⑤ </text:span><text:span text:style-name="T684">同時互相發送封包打洞（</text:span><text:span text:style-name="T689">Hole Punching</text:span><text:span text:style-name="T684">）</text:span><text:span text:style-name="T106">。</text:span></text:p>
            <text:p text:style-name="P8"><text:span text:style-name="T279">重要限制：</text:span><text:span text:style-name="T554">STUN </text:span><text:span text:style-name="T537">只對部分 </text:span><text:span text:style-name="T554">NAT </text:span><text:span text:style-name="T537">類型有效</text:span><text:span text:style-name="T106">；若兩端都是 </text:span><text:span text:style-name="T194">Symmetric NAT</text:span><text:span text:style-name="T106">，打洞會失敗，需改用 </text:span><text:span text:style-name="T194">TURN </text:span><text:span text:style-name="T106">伺服器作為中繼轉發。（</text:span><text:span text:style-name="T194">WebRTC </text:span><text:span text:style-name="T106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4" loext:marker-style-name="T69"><text:span text:style-name="T70">方法</text:span><text:span text:style-name="T69"/></text:p>
          </table:table-cell>
          <table:table-cell table:style-name="表格64.A4" office:value-type="string">
            <text:p text:style-name="P4" loext:marker-style-name="T69"><text:span text:style-name="T70">設定方式</text:span><text:span text:style-name="T69"/></text:p>
          </table:table-cell>
          <table:table-cell table:style-name="表格64.A4" office:value-type="string">
            <text:p text:style-name="P4" loext:marker-style-name="T69"><text:span text:style-name="T70">典型場景</text:span><text:span text:style-name="T69"/></text:p>
          </table:table-cell>
          <table:table-cell table:style-name="表格64.A4" office:value-type="string">
            <text:p text:style-name="P4" loext:marker-style-name="T69"><text:span text:style-name="T70">主要限制</text:span><text:span text:style-name="T69"/></text:p>
          </table:table-cell>
        </table:table-row>
        <table:table-row table:style-name="表格64.1">
          <table:table-cell table:style-name="表格64.A5" office:value-type="string">
            <text:p text:style-name="P29" loext:marker-style-name="T83"><text:span text:style-name="T182">Port Forwarding</text:span><text:span text:style-name="T83"/></text:p>
          </table:table-cell>
          <table:table-cell table:style-name="表格64.A5" office:value-type="string">
            <text:p text:style-name="P29" loext:marker-style-name="T93"><text:span text:style-name="T92">手動設定路由器</text:span><text:span text:style-name="T93"/></text:p>
          </table:table-cell>
          <table:table-cell table:style-name="表格64.A5" office:value-type="string">
            <text:p text:style-name="P29" loext:marker-style-name="T83"><text:span text:style-name="T84">架設網頁／遊戲伺服器</text:span><text:span text:style-name="T83"/></text:p>
          </table:table-cell>
          <table:table-cell table:style-name="表格64.A5" office:value-type="string">
            <text:p text:style-name="P29" loext:marker-style-name="T83"><text:span text:style-name="T84">需要手動維護</text:span><text:span text:style-name="T83"/></text:p>
          </table:table-cell>
        </table:table-row>
        <table:table-row table:style-name="表格64.1">
          <table:table-cell table:style-name="表格64.A6" office:value-type="string">
            <text:p text:style-name="P29" loext:marker-style-name="T83"><text:span text:style-name="T182">UPnP</text:span><text:span text:style-name="T83"/></text:p>
          </table:table-cell>
          <table:table-cell table:style-name="表格64.A6" office:value-type="string">
            <text:p text:style-name="P29" loext:marker-style-name="T93"><text:span text:style-name="T92">應用程式自動設定</text:span><text:span text:style-name="T93"/></text:p>
          </table:table-cell>
          <table:table-cell table:style-name="表格64.A6" office:value-type="string">
            <text:p text:style-name="P29" loext:marker-style-name="T83"><text:span text:style-name="T84">一般遊戲、視訊軟體</text:span><text:span text:style-name="T83"/></text:p>
          </table:table-cell>
          <table:table-cell table:style-name="表格64.A6" office:value-type="string">
            <text:p text:style-name="P29" loext:marker-style-name="T83"><text:span text:style-name="T84">惡意程式可濫用</text:span><text:span text:style-name="T83"/></text:p>
          </table:table-cell>
        </table:table-row>
        <table:table-row table:style-name="表格64.1">
          <table:table-cell table:style-name="表格64.A5" office:value-type="string">
            <text:p text:style-name="P29" loext:marker-style-name="T83"><text:span text:style-name="T182">STUN</text:span><text:span text:style-name="T83"/></text:p>
          </table:table-cell>
          <table:table-cell table:style-name="表格64.A5" office:value-type="string">
            <text:p text:style-name="P29" loext:marker-style-name="T93"><text:span text:style-name="T92">無需路由器設定</text:span><text:span text:style-name="T93"/></text:p>
          </table:table-cell>
          <table:table-cell table:style-name="表格64.A5" office:value-type="string">
            <text:p text:style-name="P29" loext:marker-style-name="T83"><text:span text:style-name="T182">WebRTC</text:span><text:span text:style-name="T84">、</text:span><text:span text:style-name="T182">P2P </text:span><text:span text:style-name="T84">通話</text:span></text:p>
          </table:table-cell>
          <table:table-cell table:style-name="表格64.A5" office:value-type="string">
            <text:p text:style-name="P29" loext:marker-style-name="T83"><text:span text:style-name="T182">Symmetric NAT </text:span><text:span text:style-name="T84">會失敗</text:span></text:p>
          </table:table-cell>
        </table:table-row>
      </table:table>
      <text:h text:style-name="P11" text:outline-level="2" loext:marker-style-name="T27"><text:span text:style-name="T28">四、完整上網流程（</text:span><text:span text:style-name="T27">ARP + NAT </text:span><text:span text:style-name="T28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6"><text:span text:style-name="T247">🎯 <text:s/></text:span><text:span text:style-name="T299">最重要的核心觀念（先記住）</text:span></text:p>
            <text:p text:style-name="P7"><text:span text:style-name="T307">IP </text:span><text:span text:style-name="T300">位址＝</text:span><text:span text:style-name="T106">決定封包的最終目的地（整條路的終點），像信封上的收件地址。</text:span></text:p>
            <text:p text:style-name="P8"><text:span text:style-name="T307">MAC </text:span><text:span text:style-name="T300">位址＝</text:span><text:span text:style-name="T106">決定「下一站」要交給哪台機器，像快遞員每次只看下一站。</text:span></text:p>
            <text:p text:style-name="P8"><text:span text:style-name="T279">關鍵理解：</text:span><text:span text:style-name="T106">封包在傳送途中，</text:span><text:span text:style-name="T194">IP </text:span><text:span text:style-name="T106">不變（始終是 </text:span><text:span text:style-name="T194">Google </text:span><text:span text:style-name="T106">的 </text:span><text:span text:style-name="T194">IP</text:span><text:span text:style-name="T106">），但 </text:span><text:span text:style-name="T194">MAC </text:span><text:span text:style-name="T106">每一跳都會更換。</text:span></text:p>
          </table:table-cell>
        </table:table-row>
      </table:table>
      <text:p text:style-name="P35" loext:marker-style-name="T10"><text:span text:style-name="T12">場景</text:span><text:span text:style-name="T11">：</text:span><text:span text:style-name="T691">你電腦 </text:span><text:span text:style-name="T695">192.168.1.2</text:span><text:span text:style-name="T691">／路由器內網 </text:span><text:span text:style-name="T695">IP 192.168.1.1</text:span><text:span text:style-name="T691">／路由器公網 </text:span><text:span text:style-name="T695">IP 220.x.x.x</text:span><text:span text:style-name="T691">／目標 </text:span><text:span text:style-name="T695">google.com</text:span><text:span text:style-name="T11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" loext:marker-style-name="T75"><text:span text:style-name="T76">步驟</text:span><text:span text:style-name="T75"/></text:p>
            </table:table-cell>
            <table:table-cell table:style-name="表格66.A1" office:value-type="string">
              <text:p text:style-name="P4" loext:marker-style-name="T75"><text:span text:style-name="T76">動作</text:span><text:span text:style-name="T75"/></text:p>
            </table:table-cell>
            <table:table-cell table:style-name="表格66.A1" office:value-type="string">
              <text:p text:style-name="P4" loext:marker-style-name="T75"><text:span text:style-name="T76">使用技術</text:span><text:span text:style-name="T75"/></text:p>
            </table:table-cell>
            <table:table-cell table:style-name="表格66.A1" office:value-type="string">
              <text:p text:style-name="P4" loext:marker-style-name="T75"><text:span text:style-name="T76">關鍵重點</text:span><text:span text:style-name="T75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9" loext:marker-style-name="T147"><text:span text:style-name="T230">① DNS</text:span><text:span text:style-name="T147"/></text:p>
          </table:table-cell>
          <table:table-cell table:style-name="表格66.A2" office:value-type="string">
            <text:p text:style-name="P29" loext:marker-style-name="T147"><text:span text:style-name="T230">google.com → 142.250.xxx.xxx(</text:span><text:span text:style-name="T242">Google </text:span><text:span text:style-name="T175">的 </text:span><text:span text:style-name="T242">IP</text:span><text:span text:style-name="T230">)</text:span></text:p>
            <text:p text:style-name="P29" loext:marker-style-name="T147"><text:span text:style-name="T230">(</text:span><text:span text:style-name="T148">電腦必須知道目的地在哪</text:span><text:span text:style-name="T230">)</text:span></text:p>
          </table:table-cell>
          <table:table-cell table:style-name="表格66.A2" office:value-type="string">
            <text:p text:style-name="P29" loext:marker-style-name="T147"><text:span text:style-name="T230">DNS</text:span><text:span text:style-name="T147"/></text:p>
          </table:table-cell>
          <table:table-cell table:style-name="表格66.A2" office:value-type="string">
            <text:p text:style-name="P29" loext:marker-style-name="T147"><text:span text:style-name="T148">網路只認 </text:span><text:span text:style-name="T230">IP</text:span><text:span text:style-name="T148">，不認名字</text:span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47"><text:span text:style-name="T230">② ARP</text:span><text:span text:style-name="T147"/></text:p>
          </table:table-cell>
          <table:table-cell table:style-name="表格66.A3" office:value-type="string">
            <text:p text:style-name="P29" loext:marker-style-name="T147"><text:span text:style-name="T148">找路由器（</text:span><text:span text:style-name="T230">192.168.1.1</text:span><text:span text:style-name="T148">）的 </text:span><text:span text:style-name="T230">MAC(</text:span><text:span text:style-name="T438">發現 </text:span><text:span text:style-name="T464">Google </text:span><text:span text:style-name="T602">不在同一個區網</text:span><text:span text:style-name="T438">，必須交給路由器幫忙送</text:span><text:span text:style-name="T230">)(</text:span><text:span text:style-name="T643">查詢路由器的 </text:span><text:span text:style-name="T657">MAC</text:span><text:span text:style-name="T643">，下一站是路由器</text:span><text:span text:style-name="T230">)</text:span></text:p>
          </table:table-cell>
          <table:table-cell table:style-name="表格66.A3" office:value-type="string">
            <text:p text:style-name="P29" loext:marker-style-name="T147"><text:span text:style-name="T230">ARP</text:span><text:span text:style-name="T147"/></text:p>
          </table:table-cell>
          <table:table-cell table:style-name="表格66.A3" office:value-type="string">
            <text:p text:style-name="P29" loext:marker-style-name="T147"><text:span text:style-name="T148">找的是「路由器」，不是 </text:span><text:span text:style-name="T230">Google</text:span><text:span text:style-name="T148">！</text:span></text:p>
          </table:table-cell>
        </table:table-row>
        <table:table-row table:style-name="表格66.1">
          <table:table-cell table:style-name="表格66.A2" office:value-type="string">
            <text:p text:style-name="P29" loext:marker-style-name="T147"><text:span text:style-name="T230">③ </text:span><text:span text:style-name="T520">送封包</text:span></text:p>
          </table:table-cell>
          <table:table-cell table:style-name="表格66.A2" office:value-type="string">
            <text:p text:style-name="P29" loext:marker-style-name="T147"><text:span text:style-name="T230">IP=Google</text:span><text:span text:style-name="T148">；</text:span><text:span text:style-name="T230">MAC=</text:span><text:span text:style-name="T148">路由器</text:span><text:span text:style-name="T230">(</text:span><text:span text:style-name="T373">IP </text:span><text:span text:style-name="T327">記</text:span><text:soft-page-break/><text:span text:style-name="T327">錄最終目的地；</text:span><text:span text:style-name="T373">MAC </text:span><text:span text:style-name="T327">記錄下一站</text:span><text:span text:style-name="T230">)</text:span></text:p>
          </table:table-cell>
          <table:table-cell table:style-name="表格66.A2" office:value-type="string">
            <text:p text:style-name="P29" loext:marker-style-name="T147"><text:span text:style-name="T230">L2 </text:span><text:span text:style-name="T148">傳輸</text:span></text:p>
          </table:table-cell>
          <table:table-cell table:style-name="表格66.A2" office:value-type="string">
            <text:p text:style-name="P29" loext:marker-style-name="T147"><text:span text:style-name="T230">IP=</text:span><text:span text:style-name="T148">終點；</text:span><text:span text:style-name="T230">MAC=</text:span><text:span text:style-name="T148">下一站</text:span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47"><text:span text:style-name="T230">④ NAT </text:span><text:span text:style-name="T148">去程</text:span></text:p>
          </table:table-cell>
          <table:table-cell table:style-name="表格66.A3" office:value-type="string">
            <text:p text:style-name="P29" loext:marker-style-name="T147"><text:span text:style-name="T559">192.168.1.2 → 220.x.x.x</text:span><text:span text:style-name="T230">(</text:span><text:span text:style-name="T645">路由器收到後往 </text:span><text:span text:style-name="T658">Internet </text:span><text:span text:style-name="T645">送</text:span><text:span text:style-name="T148">；路由器負責跨網路傳遞</text:span><text:span text:style-name="T230">)(</text:span><text:span text:style-name="T645">私有 </text:span><text:span text:style-name="T658">IP </text:span><text:span text:style-name="T645">換成公網 </text:span><text:span text:style-name="T658">IP</text:span><text:span text:style-name="T645">，因</text:span><text:span text:style-name="T658">Internet </text:span><text:span text:style-name="T645">不認私有 </text:span><text:span text:style-name="T658">IP</text:span><text:span text:style-name="T230">)</text:span></text:p>
          </table:table-cell>
          <table:table-cell table:style-name="表格66.A3" office:value-type="string">
            <text:p text:style-name="P29" loext:marker-style-name="T147"><text:span text:style-name="T230">NAT</text:span><text:span text:style-name="T147"/></text:p>
          </table:table-cell>
          <table:table-cell table:style-name="表格66.A3" office:value-type="string">
            <text:p text:style-name="P29" loext:marker-style-name="T147"><text:span text:style-name="T148">換身份才能上 </text:span><text:span text:style-name="T230">Internet</text:span></text:p>
          </table:table-cell>
        </table:table-row>
        <table:table-row table:style-name="表格66.1">
          <table:table-cell table:style-name="表格66.A2" office:value-type="string">
            <text:p text:style-name="P29" loext:marker-style-name="T147"><text:span text:style-name="T230">⑤ </text:span><text:span text:style-name="T148">傳到 </text:span><text:span text:style-name="T230">Google</text:span></text:p>
          </table:table-cell>
          <table:table-cell table:style-name="表格66.A2" office:value-type="string">
            <text:p text:style-name="P29" loext:marker-style-name="T147"><text:span text:style-name="T413">封包抵達目的地</text:span><text:span text:style-name="T230">(</text:span><text:span text:style-name="T682">Google </text:span><text:span text:style-name="T678">看到公網 </text:span><text:span text:style-name="T682">IP</text:span><text:span text:style-name="T230">)</text:span></text:p>
          </table:table-cell>
          <table:table-cell table:style-name="表格66.A2" office:value-type="string">
            <text:p text:style-name="P29" loext:marker-style-name="T147"><text:span text:style-name="T230">Internet</text:span><text:span text:style-name="T147"/></text:p>
          </table:table-cell>
          <table:table-cell table:style-name="表格66.A2" office:value-type="string">
            <text:p text:style-name="P29" loext:marker-style-name="T147"><text:span text:style-name="T230">Google </text:span><text:span text:style-name="T148">只看到公網 </text:span><text:span text:style-name="T230">IP</text:span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47"><text:span text:style-name="T230">⑥ Google </text:span><text:span text:style-name="T148">回應</text:span></text:p>
          </table:table-cell>
          <table:table-cell table:style-name="表格66.A3" office:value-type="string">
            <text:p text:style-name="P29" loext:marker-style-name="T147"><text:span text:style-name="T521">回傳給 </text:span><text:span text:style-name="T560">220.x.x.x</text:span><text:span text:style-name="T230">(</text:span><text:span text:style-name="T686">回到路由器再回到你電腦</text:span><text:span text:style-name="T230">)</text:span></text:p>
          </table:table-cell>
          <table:table-cell table:style-name="表格66.A3" office:value-type="string">
            <text:p text:style-name="P29" loext:marker-style-name="T147"><text:span text:style-name="T230">Internet</text:span><text:span text:style-name="T147"/></text:p>
          </table:table-cell>
          <table:table-cell table:style-name="表格66.A3" office:value-type="string">
            <text:p text:style-name="P29" loext:marker-style-name="T147"><text:span text:style-name="T148">路由器收到回應</text:span><text:span text:style-name="T147"/></text:p>
          </table:table-cell>
        </table:table-row>
        <table:table-row table:style-name="表格66.1">
          <table:table-cell table:style-name="表格66.A2" office:value-type="string">
            <text:p text:style-name="P29" loext:marker-style-name="T147"><text:span text:style-name="T230">⑦ NAT </text:span><text:span text:style-name="T148">回程</text:span></text:p>
          </table:table-cell>
          <table:table-cell table:style-name="表格66.A2" office:value-type="string">
            <text:p text:style-name="P29" loext:marker-style-name="T147"><text:span text:style-name="T559">220.x.x.x → 192.168.1.2</text:span><text:span text:style-name="T230">(</text:span><text:span text:style-name="T464">NAT </text:span><text:span text:style-name="T438">依記錄轉回正確主機</text:span><text:span text:style-name="T230">)</text:span></text:p>
          </table:table-cell>
          <table:table-cell table:style-name="表格66.A2" office:value-type="string">
            <text:p text:style-name="P29" loext:marker-style-name="T147"><text:span text:style-name="T230">NAT</text:span><text:span text:style-name="T147"/></text:p>
          </table:table-cell>
          <table:table-cell table:style-name="表格66.A2" office:value-type="string">
            <text:p text:style-name="P29" loext:marker-style-name="T147"><text:span text:style-name="T148">查記錄，換回真正目標</text:span><text:span text:style-name="T147"/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47"><text:span text:style-name="T230">⑧ </text:span><text:span text:style-name="T148">收到網頁</text:span></text:p>
          </table:table-cell>
          <table:table-cell table:style-name="表格66.A3" office:value-type="string">
            <text:p text:style-name="P29" loext:marker-style-name="T147"><text:span text:style-name="T148">瀏覽器顯示頁面</text:span><text:span text:style-name="T147"/></text:p>
          </table:table-cell>
          <table:table-cell table:style-name="表格66.A3" office:value-type="string">
            <text:p text:style-name="P29" loext:marker-style-name="T147"><text:span text:style-name="T230">—</text:span><text:span text:style-name="T147"/></text:p>
          </table:table-cell>
          <table:table-cell table:style-name="表格66.A3" office:value-type="string">
            <text:p text:style-name="P29" loext:marker-style-name="T147"><text:span text:style-name="T148">一次完整通信結束</text:span><text:span text:style-name="T147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6"><text:span text:style-name="T247">💣 <text:s/></text:span><text:span text:style-name="T269">三個最容易搞錯的地方（考試地雷）</text:span></text:p>
            <text:p text:style-name="P7"><text:span text:style-name="T285">✗ </text:span><text:span text:style-name="T280">以為 </text:span><text:span text:style-name="T285">ARP </text:span><text:span text:style-name="T280">是找 </text:span><text:span text:style-name="T285">Google </text:span><text:span text:style-name="T280">的 </text:span><text:span text:style-name="T285">MAC</text:span><text:span text:style-name="T279">　→　</text:span><text:span text:style-name="T668">✓ </text:span><text:span text:style-name="T670">ARP </text:span><text:span text:style-name="T668">找的是「路由器」的 </text:span><text:span text:style-name="T670">MAC</text:span><text:span text:style-name="T668">！</text:span><text:span text:style-name="T106">因為 </text:span><text:span text:style-name="T194">ARP </text:span><text:span text:style-name="T106">只能在同一個 </text:span><text:span text:style-name="T194">LAN </text:span><text:span text:style-name="T106">內使用。</text:span></text:p>
            <text:p text:style-name="P8"><text:span text:style-name="T285">✗ </text:span><text:span text:style-name="T280">以為封包直接送到 </text:span><text:span text:style-name="T285">Google</text:span><text:span text:style-name="T279">　→　</text:span><text:span text:style-name="T668">✓ 封包先送給路由器，路由器再轉到 </text:span><text:span text:style-name="T670">Internet</text:span><text:span text:style-name="T106">。</text:span></text:p>
            <text:p text:style-name="P8"><text:span text:style-name="T285">✗ </text:span><text:span text:style-name="T280">以為 </text:span><text:span text:style-name="T285">IP </text:span><text:span text:style-name="T280">在傳輸過程中一直不變</text:span><text:span text:style-name="T279">　→　</text:span><text:span text:style-name="T668">✓ </text:span><text:span text:style-name="T670">NAT </text:span><text:span text:style-name="T668">會在去程改掉來源 </text:span><text:span text:style-name="T670">IP</text:span><text:span text:style-name="T668">，回程再改回去</text:span><text:span text:style-name="T106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6"><text:span text:style-name="T247">📝 <text:s/></text:span><text:span text:style-name="T289">考試標準答案（直接背）</text:span></text:p>
            <text:p text:style-name="P7" loext:marker-style-name="T107"><text:span text:style-name="T133">使用者輸入網址後</text:span><text:span text:style-name="T106">，</text:span><text:span text:style-name="T495">先透過 </text:span><text:span text:style-name="T505">DNS </text:span><text:span text:style-name="T495">將網域名稱解析為 </text:span><text:span text:style-name="T505">IP</text:span><text:span text:style-name="T106">；</text:span><text:span text:style-name="T344">接著主機利用 </text:span><text:span text:style-name="T368">ARP </text:span><text:span text:style-name="T344">取得路由器（預設閘道）的 </text:span><text:span text:style-name="T368">MAC</text:span><text:span text:style-name="T106">，</text:span><text:span text:style-name="T344">將封包傳送至路由器</text:span><text:span text:style-name="T106">；</text:span><text:span text:style-name="T575">路由器透過 </text:span><text:span text:style-name="T570">NAT </text:span><text:span text:style-name="T575">將私有 </text:span><text:span text:style-name="T570">IP </text:span><text:span text:style-name="T575">轉換為公網 </text:span><text:span text:style-name="T570">IP </text:span><text:span text:style-name="T575">後送往 </text:span><text:span text:style-name="T570">Internet</text:span><text:span text:style-name="T106">；</text:span><text:span text:style-name="T314">目的主機回應後，路由器再透過 </text:span><text:span text:style-name="T316">NAT </text:span><text:span text:style-name="T314">將封包轉回原內部主機</text:span><text:span text:style-name="T106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五、</text:span><text:span text:style-name="T27">ARP vs NAT </text:span><text:span text:style-name="T28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4"/>
            </table:table-cell>
            <table:table-cell table:style-name="表格67.A1" office:value-type="string">
              <text:p text:style-name="P4" loext:marker-style-name="T69"><text:span text:style-name="T79">ARP</text:span><text:span text:style-name="T69"/></text:p>
            </table:table-cell>
            <table:table-cell table:style-name="表格67.A1" office:value-type="string">
              <text:p text:style-name="P4" loext:marker-style-name="T69"><text:span text:style-name="T79">NAT</text:span><text:span text:style-name="T69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9" loext:marker-style-name="T83"><text:span text:style-name="T84">目的</text:span><text:span text:style-name="T83"/></text:p>
          </table:table-cell>
          <table:table-cell table:style-name="表格67.A2" office:value-type="string">
            <text:p text:style-name="P29" loext:marker-style-name="T435"><text:span text:style-name="T436">用 </text:span><text:span text:style-name="T462">IP </text:span><text:span text:style-name="T436">找 </text:span><text:span text:style-name="T462">MAC</text:span></text:p>
          </table:table-cell>
          <table:table-cell table:style-name="表格67.A2" office:value-type="string">
            <text:p text:style-name="P29" loext:marker-style-name="T700"><text:span text:style-name="T701">私有 </text:span><text:span text:style-name="T702">IP </text:span><text:span text:style-name="T701">轉成公網 </text:span><text:span text:style-name="T702">IP</text:span></text:p>
          </table:table-cell>
        </table:table-row>
        <table:table-row table:style-name="表格67.1">
          <table:table-cell table:style-name="表格67.A3" office:value-type="string">
            <text:p text:style-name="P29" loext:marker-style-name="T83"><text:span text:style-name="T84">使用範圍</text:span><text:span text:style-name="T83"/></text:p>
          </table:table-cell>
          <table:table-cell table:style-name="表格67.A3" office:value-type="string">
            <text:p text:style-name="P29" loext:marker-style-name="T98"><text:span text:style-name="T96">區域網路（</text:span><text:span text:style-name="T187">LAN</text:span><text:span text:style-name="T96">）內</text:span></text:p>
          </table:table-cell>
          <table:table-cell table:style-name="表格67.A3" office:value-type="string">
            <text:p text:style-name="P29" loext:marker-style-name="T93"><text:span text:style-name="T92">內網與 </text:span><text:span text:style-name="T190">Internet </text:span><text:span text:style-name="T92">之間</text:span></text:p>
          </table:table-cell>
        </table:table-row>
        <table:table-row table:style-name="表格67.1">
          <table:table-cell table:style-name="表格67.A2" office:value-type="string">
            <text:p text:style-name="P29" loext:marker-style-name="T83"><text:span text:style-name="T84">運作層級</text:span><text:span text:style-name="T83"/></text:p>
          </table:table-cell>
          <table:table-cell table:style-name="表格67.A2" office:value-type="string">
            <text:p text:style-name="P29" loext:marker-style-name="T511"><text:span text:style-name="T507">L2 / L3 </text:span><text:span text:style-name="T512">交界</text:span></text:p>
          </table:table-cell>
          <table:table-cell table:style-name="表格67.A2" office:value-type="string">
            <text:p text:style-name="P29" loext:marker-style-name="T513"><text:span text:style-name="T508">L3</text:span><text:span text:style-name="T514">（網路層）</text:span></text:p>
          </table:table-cell>
        </table:table-row>
        <table:table-row table:style-name="表格67.1">
          <table:table-cell table:style-name="表格67.A3" office:value-type="string">
            <text:p text:style-name="P29" loext:marker-style-name="T83"><text:span text:style-name="T84">誰執行</text:span><text:span text:style-name="T83"/></text:p>
          </table:table-cell>
          <table:table-cell table:style-name="表格67.A3" office:value-type="string">
            <text:p text:style-name="P29" loext:marker-style-name="T83"><text:span text:style-name="T84">端點裝置（電腦）</text:span><text:span text:style-name="T83"/></text:p>
          </table:table-cell>
          <table:table-cell table:style-name="表格67.A3" office:value-type="string">
            <text:p text:style-name="P29" loext:marker-style-name="T83"><text:span text:style-name="T84">路由器</text:span><text:span text:style-name="T83"/></text:p>
          </table:table-cell>
        </table:table-row>
        <table:table-row table:style-name="表格67.1">
          <table:table-cell table:style-name="表格67.A2" office:value-type="string">
            <text:p text:style-name="P29" loext:marker-style-name="T83"><text:span text:style-name="T84">主要用途</text:span><text:span text:style-name="T83"/></text:p>
          </table:table-cell>
          <table:table-cell table:style-name="表格67.A2" office:value-type="string">
            <text:p text:style-name="P29" loext:marker-style-name="T83"><text:span text:style-name="T84">在區網內傳送封包</text:span><text:span text:style-name="T83"/></text:p>
          </table:table-cell>
          <table:table-cell table:style-name="表格67.A2" office:value-type="string">
            <text:p text:style-name="P29" loext:marker-style-name="T83"><text:span text:style-name="T84">讓內部主機能夠上網</text:span><text:span text:style-name="T83"/></text:p>
          </table:table-cell>
        </table:table-row>
      </table:table>
      <text:h text:style-name="P17" text:outline-level="1" loext:marker-style-name="T71"><text:span text:style-name="T72">第 五 篇　</text:span><text:span text:style-name="T71">TCP </text:span><text:span text:style-name="T72">傳輸控制深入：握手 </text:span><text:span text:style-name="T71">· SYN Flood · </text:span><text:span text:style-name="T72">視窗 </text:span><text:span text:style-name="T71">· </text:span><text:span text:style-name="T72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6"><text:span text:style-name="T247">🚦 <text:s/></text:span><text:span text:style-name="T52">本篇重點</text:span></text:p>
            <text:p text:style-name="P7" loext:marker-style-name="T107"><text:span text:style-name="T106">網路的本質是把資料從 </text:span><text:span text:style-name="T194">A </text:span><text:span text:style-name="T106">電腦送到 </text:span><text:span text:style-name="T194">B </text:span><text:span text:style-name="T106">電腦，但中間有四個麻煩，</text:span><text:span text:style-name="T194">TCP </text:span><text:span text:style-name="T106">各自有對策。</text:span></text:p>
          </table:table-cell>
        </table:table-row>
      </table:table>
      <text:h text:style-name="P11" text:outline-level="2" loext:marker-style-name="T27"><text:span text:style-name="T28">一、網路的四個麻煩，</text:span><text:span text:style-name="T27">TCP </text:span><text:span text:style-name="T28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4" loext:marker-style-name="T69"><text:span text:style-name="T70">問題</text:span><text:span text:style-name="T69"/></text:p>
            </table:table-cell>
            <table:table-cell table:style-name="表格69.A1" office:value-type="string">
              <text:p text:style-name="P4" loext:marker-style-name="T69"><text:span text:style-name="T70">說明</text:span><text:span text:style-name="T69"/></text:p>
            </table:table-cell>
            <table:table-cell table:style-name="表格69.A1" office:value-type="string">
              <text:p text:style-name="P4" loext:marker-style-name="T69"><text:span text:style-name="T79">TCP </text:span><text:span text:style-name="T70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9" loext:marker-style-name="T98"><text:span text:style-name="T96">資料可能丟失</text:span><text:span text:style-name="T98"/></text:p>
          </table:table-cell>
          <table:table-cell table:style-name="表格69.A2" office:value-type="string">
            <text:p text:style-name="P29" loext:marker-style-name="T83"><text:span text:style-name="T84">封包在網路中消失</text:span><text:span text:style-name="T83"/></text:p>
          </table:table-cell>
          <table:table-cell table:style-name="表格69.A2" office:value-type="string">
            <text:p text:style-name="P29" loext:marker-style-name="T83"><text:span text:style-name="T92">重傳</text:span><text:span text:style-name="T84">機制（</text:span><text:span text:style-name="T182">Retransmission</text:span><text:span text:style-name="T84">）</text:span></text:p>
          </table:table-cell>
        </table:table-row>
        <table:table-row table:style-name="表格69.1">
          <table:table-cell table:style-name="表格69.A3" office:value-type="string">
            <text:p text:style-name="P29" loext:marker-style-name="T98"><text:span text:style-name="T96">順序可能亂掉</text:span><text:span text:style-name="T98"/></text:p>
          </table:table-cell>
          <table:table-cell table:style-name="表格69.A3" office:value-type="string">
            <text:p text:style-name="P29" loext:marker-style-name="T83"><text:span text:style-name="T84">封包走不同路徑先後到達</text:span><text:span text:style-name="T83"/></text:p>
          </table:table-cell>
          <table:table-cell table:style-name="表格69.A3" office:value-type="string">
            <text:p text:style-name="P29" loext:marker-style-name="T83"><text:span text:style-name="T92">序號</text:span><text:span text:style-name="T84">機制（</text:span><text:span text:style-name="T182">Sequence Number</text:span><text:span text:style-name="T84">）</text:span></text:p>
          </table:table-cell>
        </table:table-row>
        <table:table-row table:style-name="表格69.1">
          <table:table-cell table:style-name="表格69.A2" office:value-type="string">
            <text:p text:style-name="P29" loext:marker-style-name="T98"><text:span text:style-name="T96">對方來不及收</text:span><text:span text:style-name="T98"/></text:p>
          </table:table-cell>
          <table:table-cell table:style-name="表格69.A2" office:value-type="string">
            <text:p text:style-name="P29" loext:marker-style-name="T83"><text:span text:style-name="T84">接收端 </text:span><text:span text:style-name="T182">buffer </text:span><text:span text:style-name="T84">可能爆掉</text:span></text:p>
          </table:table-cell>
          <table:table-cell table:style-name="表格69.A2" office:value-type="string">
            <text:p text:style-name="P29" loext:marker-style-name="T83"><text:span text:style-name="T92">流量</text:span><text:span text:style-name="T84">控制（</text:span><text:span text:style-name="T182">Flow Control / rwnd</text:span><text:span text:style-name="T84">）</text:span></text:p>
          </table:table-cell>
        </table:table-row>
        <table:table-row table:style-name="表格69.1">
          <table:table-cell table:style-name="表格69.A3" office:value-type="string">
            <text:p text:style-name="P29" loext:marker-style-name="T98"><text:span text:style-name="T96">網路可能塞車</text:span><text:span text:style-name="T98"/></text:p>
          </table:table-cell>
          <table:table-cell table:style-name="表格69.A3" office:value-type="string">
            <text:p text:style-name="P29" loext:marker-style-name="T83"><text:span text:style-name="T84">路由器排隊太長</text:span><text:span text:style-name="T83"/></text:p>
          </table:table-cell>
          <table:table-cell table:style-name="表格69.A3" office:value-type="string">
            <text:p text:style-name="P29" loext:marker-style-name="T83"><text:span text:style-name="T92">擁塞</text:span><text:span text:style-name="T84">控制（</text:span><text:span text:style-name="T182">Congestion Control / cwnd</text:span><text:span text:style-name="T84">）</text:span></text:p>
          </table:table-cell>
        </table:table-row>
      </table:table>
      <text:h text:style-name="P11" text:outline-level="2" loext:marker-style-name="T27"><text:span text:style-name="T28">二、</text:span><text:span text:style-name="T27">TCP vs UDP</text:span><text:span text:style-name="T28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4" loext:marker-style-name="T69"><text:span text:style-name="T70">特性</text:span><text:span text:style-name="T69"/></text:p>
            </table:table-cell>
            <table:table-cell table:style-name="表格70.A1" office:value-type="string">
              <text:p text:style-name="P4" loext:marker-style-name="T69"><text:span text:style-name="T79">TCP</text:span><text:span text:style-name="T70">（可靠模式）</text:span></text:p>
            </table:table-cell>
            <table:table-cell table:style-name="表格70.A1" office:value-type="string">
              <text:p text:style-name="P4" loext:marker-style-name="T69"><text:span text:style-name="T79">UDP</text:span><text:span text:style-name="T70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9" loext:marker-style-name="T83"><text:span text:style-name="T84">連線方式</text:span><text:span text:style-name="T83"/></text:p>
          </table:table-cell>
          <table:table-cell table:style-name="表格70.A2" office:value-type="string">
            <text:p text:style-name="P29" loext:marker-style-name="T434"><text:span text:style-name="T433">需要先建立連線</text:span><text:span text:style-name="T434"/></text:p>
          </table:table-cell>
          <table:table-cell table:style-name="表格70.A2" office:value-type="string">
            <text:p text:style-name="P29" loext:marker-style-name="T324"><text:span text:style-name="T323">無連線，直接送</text:span><text:span text:style-name="T324"/></text:p>
          </table:table-cell>
        </table:table-row>
        <table:table-row table:style-name="表格70.1">
          <table:table-cell table:style-name="表格70.A3" office:value-type="string">
            <text:p text:style-name="P29" loext:marker-style-name="T83"><text:span text:style-name="T84">可靠性</text:span><text:span text:style-name="T83"/></text:p>
          </table:table-cell>
          <table:table-cell table:style-name="表格70.A3" office:value-type="string">
            <text:p text:style-name="P29" loext:marker-style-name="T83"><text:span text:style-name="T84">保證送達（會重傳）</text:span><text:span text:style-name="T83"/></text:p>
          </table:table-cell>
          <table:table-cell table:style-name="表格70.A3" office:value-type="string">
            <text:p text:style-name="P29" loext:marker-style-name="T83"><text:span text:style-name="T84">不保證送達</text:span><text:span text:style-name="T83"/></text:p>
          </table:table-cell>
        </table:table-row>
        <table:table-row table:style-name="表格70.1">
          <table:table-cell table:style-name="表格70.A2" office:value-type="string">
            <text:p text:style-name="P29" loext:marker-style-name="T83"><text:span text:style-name="T84">順序</text:span><text:span text:style-name="T83"/></text:p>
          </table:table-cell>
          <table:table-cell table:style-name="表格70.A2" office:value-type="string">
            <text:p text:style-name="P29" loext:marker-style-name="T83"><text:span text:style-name="T84">保證順序正確</text:span><text:span text:style-name="T83"/></text:p>
          </table:table-cell>
          <table:table-cell table:style-name="表格70.A2" office:value-type="string">
            <text:p text:style-name="P29" loext:marker-style-name="T83"><text:span text:style-name="T84">不保證順序</text:span><text:span text:style-name="T83"/></text:p>
          </table:table-cell>
        </table:table-row>
        <table:table-row table:style-name="表格70.1">
          <table:table-cell table:style-name="表格70.A3" office:value-type="string">
            <text:p text:style-name="P29" loext:marker-style-name="T83"><text:span text:style-name="T84">速度</text:span><text:span text:style-name="T83"/></text:p>
          </table:table-cell>
          <table:table-cell table:style-name="表格70.A3" office:value-type="string">
            <text:p text:style-name="P29" loext:marker-style-name="T83"><text:span text:style-name="T84">較慢（有控制機制）</text:span><text:span text:style-name="T83"/></text:p>
          </table:table-cell>
          <table:table-cell table:style-name="表格70.A3" office:value-type="string">
            <text:p text:style-name="P29" loext:marker-style-name="T83"><text:span text:style-name="T84">較快（無額外開銷）</text:span><text:span text:style-name="T83"/></text:p>
          </table:table-cell>
        </table:table-row>
        <table:table-row table:style-name="表格70.1">
          <table:table-cell table:style-name="表格70.A2" office:value-type="string">
            <text:p text:style-name="P29" loext:marker-style-name="T83"><text:span text:style-name="T84">適合場景</text:span><text:span text:style-name="T83"/></text:p>
          </table:table-cell>
          <table:table-cell table:style-name="表格70.A2" office:value-type="string">
            <text:p text:style-name="P29" loext:marker-style-name="T93"><text:span text:style-name="T92">網頁、檔案傳輸、</text:span><text:span text:style-name="T190">Email</text:span></text:p>
          </table:table-cell>
          <table:table-cell table:style-name="表格70.A2" office:value-type="string">
            <text:p text:style-name="P29" loext:marker-style-name="T83"><text:span text:style-name="T92">直播、遊戲</text:span><text:span text:style-name="T84">、</text:span><text:span text:style-name="T182">DNS </text:span><text:span text:style-name="T84">查詢</text:span></text:p>
          </table:table-cell>
        </table:table-row>
        <table:table-row table:style-name="表格70.1">
          <table:table-cell table:style-name="表格70.A3" office:value-type="string">
            <text:p text:style-name="P29" loext:marker-style-name="T83"><text:span text:style-name="T84">比喻</text:span><text:span text:style-name="T83"/></text:p>
          </table:table-cell>
          <table:table-cell table:style-name="表格70.A3" office:value-type="string">
            <text:p text:style-name="P29" loext:marker-style-name="T98"><text:span text:style-name="T96">專業物流（簽收確認）</text:span><text:span text:style-name="T98"/></text:p>
          </table:table-cell>
          <table:table-cell table:style-name="表格70.A3" office:value-type="string">
            <text:p text:style-name="P29" loext:marker-style-name="T98"><text:span text:style-name="T96">亂丟紙飛機</text:span><text:span text:style-name="T98"/></text:p>
          </table:table-cell>
        </table:table-row>
      </table:table>
      <text:h text:style-name="P11" text:outline-level="2" loext:marker-style-name="T27"><text:span text:style-name="T28">三、建立連線：三次握手（</text:span><text:span text:style-name="T27">Three-way Handshake</text:span><text:span text:style-name="T28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6"><text:span text:style-name="T247">🤝 <text:s/></text:span><text:span text:style-name="T52">握手流程</text:span></text:p>
            <text:p text:style-name="P7"><text:span text:style-name="T65">① Client → Server</text:span><text:span text:style-name="T57">：</text:span><text:span text:style-name="T64">SYN</text:span><text:span text:style-name="T57">　</text:span><text:span text:style-name="T106">「我可以傳資料給你嗎？我準備好了。」（</text:span><text:span text:style-name="T194">Synchronize </text:span><text:span text:style-name="T106">同步請求）</text:span></text:p>
            <text:p text:style-name="P8"><text:span text:style-name="T65">② Server → Client</text:span><text:span text:style-name="T57">：</text:span><text:span text:style-name="T64">SYN + ACK</text:span><text:span text:style-name="T57">　</text:span><text:span text:style-name="T106">「可以！我收到你的請求了，我也準備好了。」（確認＋同步）</text:span></text:p>
            <text:p text:style-name="P8"><text:span text:style-name="T65">③ Client → Server</text:span><text:span text:style-name="T57">：</text:span><text:span text:style-name="T64">ACK</text:span><text:span text:style-name="T57">　</text:span><text:span text:style-name="T106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6"><text:span text:style-name="T247">🎯 <text:s/></text:span><text:span text:style-name="T299">三次握手真正目的（考試必考）</text:span></text:p>
            <text:p text:style-name="P7" loext:marker-style-name="T107"><text:span text:style-name="T106">確認雙向都能傳資料（</text:span><text:span text:style-name="T194">Client → Server </text:span><text:span text:style-name="T106">和 </text:span><text:span text:style-name="T194">Server → Client </text:span><text:span text:style-name="T106">各自驗證）。</text:span></text:p>
            <text:p text:style-name="P8" loext:marker-style-name="T107"><text:span text:style-name="T703">避免「</text:span><text:span text:style-name="T576">舊封包誤觸發新連線</text:span><text:span text:style-name="T703">」</text:span><text:span text:style-name="T106">：若少一次確認，</text:span><text:span text:style-name="T342">延遲的舊 </text:span><text:span text:style-name="T366">SYN </text:span><text:span text:style-name="T342">封包可能讓 </text:span><text:span text:style-name="T366">Server </text:span><text:span text:style-name="T342">誤以為要建立新連線</text:span><text:span text:style-name="T106">。</text:span></text:p>
          </table:table-cell>
        </table:table-row>
      </table:table>
      <text:h text:style-name="P11" text:outline-level="2" loext:marker-style-name="T27"><text:span text:style-name="T28">四、攻擊：</text:span><text:span text:style-name="T27">SYN Flood</text:span></text:h>
      <text:p text:style-name="P35" loext:marker-style-name="T107"><text:span text:style-name="T106">攻擊原理：攻擊者大量發送 </text:span><text:span text:style-name="T194">SYN </text:span><text:span text:style-name="T106">封包，但</text:span><text:span text:style-name="T411">故意不完成第三次握手（</text:span><text:span text:style-name="T336">不回 </text:span><text:span text:style-name="T358">ACK</text:span><text:span text:style-name="T411">）</text:span><text:span text:style-name="T106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26" loext:marker-style-name="T69"><text:span text:style-name="T70">步驟</text:span><text:span text:style-name="T69"/></text:p>
            </table:table-cell>
            <table:table-cell table:style-name="表格72.A1" office:value-type="string">
              <text:p text:style-name="P26" loext:marker-style-name="T69"><text:span text:style-name="T70">發生什麼</text:span><text:span text:style-name="T69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9" loext:marker-style-name="T83"><text:span text:style-name="T182">1</text:span><text:span text:style-name="T83"/></text:p>
          </table:table-cell>
          <table:table-cell table:style-name="表格72.A2" office:value-type="string">
            <text:p text:style-name="P29" loext:marker-style-name="T83"><text:span text:style-name="T84">攻擊者</text:span><text:span text:style-name="T96">送出大量 </text:span><text:span text:style-name="T187">SYN</text:span><text:span text:style-name="T84">，每個都</text:span><text:span text:style-name="T92">假冒不同來源 </text:span><text:span text:style-name="T190">IP</text:span></text:p>
          </table:table-cell>
        </table:table-row>
        <table:table-row table:style-name="表格72.1">
          <table:table-cell table:style-name="表格72.A3" office:value-type="string">
            <text:p text:style-name="P29" loext:marker-style-name="T83"><text:span text:style-name="T182">2</text:span><text:span text:style-name="T83"/></text:p>
          </table:table-cell>
          <table:table-cell table:style-name="表格72.A3" office:value-type="string">
            <text:p text:style-name="P29" loext:marker-style-name="T83"><text:span text:style-name="T660">Server </text:span><text:span text:style-name="T647">建立「半連線（</text:span><text:span text:style-name="T660">Half-open Connection</text:span><text:span text:style-name="T647">）」</text:span><text:span text:style-name="T84">，</text:span><text:span text:style-name="T531">每個都佔記憶體等待 </text:span><text:span text:style-name="T549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9" loext:marker-style-name="T83"><text:span text:style-name="T182">3</text:span><text:span text:style-name="T83"/></text:p>
          </table:table-cell>
          <table:table-cell table:style-name="表格72.A2" office:value-type="string">
            <text:p text:style-name="P29" loext:marker-style-name="T83"><text:span text:style-name="T680">攻擊者永遠不回 </text:span><text:span text:style-name="T683">ACK</text:span><text:span text:style-name="T84">，</text:span><text:span text:style-name="T182">Server </text:span><text:span text:style-name="T84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9" loext:marker-style-name="T83"><text:span text:style-name="T182">4</text:span><text:span text:style-name="T83"/></text:p>
          </table:table-cell>
          <table:table-cell table:style-name="表格72.A3" office:value-type="string">
            <text:p text:style-name="P29" loext:marker-style-name="T83"><text:span text:style-name="T96">正常用戶連線失敗</text:span><text:span text:style-name="T84">，</text:span><text:span text:style-name="T182">Server </text:span><text:span text:style-name="T84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6"><text:span text:style-name="T247">⚠️ <text:s/></text:span><text:span text:style-name="T269">本質</text:span></text:p>
            <text:p text:style-name="P7" loext:marker-style-name="T107"><text:span text:style-name="T106">這是一種 </text:span><text:span text:style-name="T217">DoS</text:span><text:span text:style-name="T133">（拒絕服務）攻擊</text:span><text:span text:style-name="T106">，利用 </text:span><text:span text:style-name="T194">TCP </text:span><text:span text:style-name="T106">三次握手機制的不對稱性。</text:span></text:p>
          </table:table-cell>
          <table:covered-table-cell/>
        </table:table-row>
      </table:table>
      <text:h text:style-name="P11" text:outline-level="2" loext:marker-style-name="T27"><text:span text:style-name="T28">五、傳送速度的兩個限制：</text:span><text:span text:style-name="T546">rwnd</text:span><text:span text:style-name="T27"> </text:span><text:span text:style-name="T28">與 </text:span><text:span text:style-name="T546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26" loext:marker-style-name="T69"><text:span text:style-name="T79">rwnd</text:span><text:span text:style-name="T70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26" loext:marker-style-name="T69"><text:span text:style-name="T79">cwnd</text:span><text:span text:style-name="T70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9" loext:marker-style-name="T83"><text:span text:style-name="T84">接收端的限制。</text:span><text:span text:style-name="T648">對方 </text:span><text:span text:style-name="T661">buffer</text:span><text:span text:style-name="T648">（暫存區）還剩多少空間</text:span><text:span text:style-name="T84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9" loext:marker-style-name="T83"><text:span text:style-name="T84">網路的限制。發送端根據網路狀況自行估計，</text:span><text:span text:style-name="T433">目前網路最多能承受多少資料量</text:span><text:span text:style-name="T84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7"><text:span text:style-name="T305">實際傳送量 ＝ </text:span><text:span text:style-name="T310">min(rwnd, cwnd)</text:span><text:span text:style-name="T300">　</text:span><text:span text:style-name="T131">取兩者最小值</text:span><text:span text:style-name="T106">。</text:span><text:span text:style-name="T140">對方吃不下就看 </text:span><text:span text:style-name="T224">rwnd</text:span><text:span text:style-name="T140">；網路塞就看 </text:span><text:span text:style-name="T224">cwnd</text:span><text:span text:style-name="T106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26" loext:marker-style-name="T69"><text:span text:style-name="T70">情境</text:span><text:span text:style-name="T69"/></text:p>
          </table:table-cell>
          <table:table-cell table:style-name="表格73.A1" office:value-type="string">
            <text:p text:style-name="P26" loext:marker-style-name="T69"><text:span text:style-name="T79">cwnd</text:span><text:span text:style-name="T69"/></text:p>
          </table:table-cell>
          <table:table-cell table:style-name="表格73.A1" table:number-columns-spanned="2" office:value-type="string">
            <text:p text:style-name="P26" loext:marker-style-name="T69"><text:span text:style-name="T79">rwnd</text:span><text:span text:style-name="T69"/></text:p>
          </table:table-cell>
          <table:covered-table-cell/>
          <table:table-cell table:style-name="表格73.A1" office:value-type="string">
            <text:p text:style-name="P26" loext:marker-style-name="T69"><text:span text:style-name="T70">實際傳送量</text:span><text:span text:style-name="T69"/></text:p>
          </table:table-cell>
          <table:table-cell table:style-name="表格73.A1" office:value-type="string">
            <text:p text:style-name="P26" loext:marker-style-name="T69"><text:span text:style-name="T70">瓶頸原因</text:span><text:span text:style-name="T69"/></text:p>
          </table:table-cell>
        </table:table-row>
        <table:table-row table:style-name="表格73.1">
          <table:table-cell table:style-name="表格73.A2" office:value-type="string">
            <text:p text:style-name="P29" loext:marker-style-name="T83"><text:span text:style-name="T84">對方 </text:span><text:span text:style-name="T182">buffer </text:span><text:span text:style-name="T84">快滿了</text:span></text:p>
          </table:table-cell>
          <table:table-cell table:style-name="表格73.A2" office:value-type="string">
            <text:p text:style-name="P29" loext:marker-style-name="T83"><text:span text:style-name="T182">10</text:span><text:span text:style-name="T83"/></text:p>
          </table:table-cell>
          <table:table-cell table:style-name="表格73.A2" table:number-columns-spanned="2" office:value-type="string">
            <text:p text:style-name="P29" loext:marker-style-name="T83"><text:span text:style-name="T182">3</text:span><text:span text:style-name="T83"/></text:p>
          </table:table-cell>
          <table:covered-table-cell/>
          <table:table-cell table:style-name="表格73.A2" office:value-type="string">
            <text:p text:style-name="P29" loext:marker-style-name="T83"><text:span text:style-name="T182">3</text:span><text:span text:style-name="T83"/></text:p>
          </table:table-cell>
          <table:table-cell table:style-name="表格73.A2" office:value-type="string">
            <text:p text:style-name="P29" loext:marker-style-name="T83"><text:span text:style-name="T84">接收端限制（</text:span><text:span text:style-name="T182">rwnd</text:span><text:span text:style-name="T84">）</text:span></text:p>
          </table:table-cell>
        </table:table-row>
        <table:table-row table:style-name="表格73.1">
          <table:table-cell table:style-name="表格73.A6" office:value-type="string">
            <text:p text:style-name="P29" loext:marker-style-name="T83"><text:span text:style-name="T84">網路很塞</text:span><text:span text:style-name="T83"/></text:p>
          </table:table-cell>
          <table:table-cell table:style-name="表格73.A6" office:value-type="string">
            <text:p text:style-name="P29" loext:marker-style-name="T83"><text:span text:style-name="T182">2</text:span><text:span text:style-name="T83"/></text:p>
          </table:table-cell>
          <table:table-cell table:style-name="表格73.A6" table:number-columns-spanned="2" office:value-type="string">
            <text:p text:style-name="P29" loext:marker-style-name="T83"><text:span text:style-name="T182">10</text:span><text:span text:style-name="T83"/></text:p>
          </table:table-cell>
          <table:covered-table-cell/>
          <table:table-cell table:style-name="表格73.A6" office:value-type="string">
            <text:p text:style-name="P29" loext:marker-style-name="T83"><text:span text:style-name="T182">2</text:span><text:span text:style-name="T83"/></text:p>
          </table:table-cell>
          <table:table-cell table:style-name="表格73.A6" office:value-type="string">
            <text:p text:style-name="P29" loext:marker-style-name="T83"><text:span text:style-name="T84">網路限制（</text:span><text:span text:style-name="T182">cwnd</text:span><text:span text:style-name="T84">）</text:span></text:p>
          </table:table-cell>
        </table:table-row>
        <table:table-row table:style-name="表格73.1">
          <table:table-cell table:style-name="表格73.A2" office:value-type="string">
            <text:p text:style-name="P29" loext:marker-style-name="T83"><text:span text:style-name="T84">兩者相近</text:span><text:span text:style-name="T83"/></text:p>
          </table:table-cell>
          <table:table-cell table:style-name="表格73.A2" office:value-type="string">
            <text:p text:style-name="P29" loext:marker-style-name="T83"><text:span text:style-name="T182">5</text:span><text:span text:style-name="T83"/></text:p>
          </table:table-cell>
          <table:table-cell table:style-name="表格73.A2" table:number-columns-spanned="2" office:value-type="string">
            <text:p text:style-name="P29" loext:marker-style-name="T83"><text:span text:style-name="T182">6</text:span><text:span text:style-name="T83"/></text:p>
          </table:table-cell>
          <table:covered-table-cell/>
          <table:table-cell table:style-name="表格73.A2" office:value-type="string">
            <text:p text:style-name="P29" loext:marker-style-name="T83"><text:span text:style-name="T182">5</text:span><text:span text:style-name="T83"/></text:p>
          </table:table-cell>
          <table:table-cell table:style-name="表格73.A2" office:value-type="string">
            <text:p text:style-name="P29" loext:marker-style-name="T83"><text:span text:style-name="T84">網路限制（</text:span><text:span text:style-name="T182">cwnd</text:span><text:span text:style-name="T84">）</text:span></text:p>
          </table:table-cell>
        </table:table-row>
      </table:table>
      <text:h text:style-name="P11" text:outline-level="2" loext:marker-style-name="T27"><text:span text:style-name="T28">六、滑動視窗（</text:span><text:span text:style-name="T27">Sliding Window</text:span><text:span text:style-name="T28">）</text:span></text:h>
      <text:p text:style-name="P35" loext:marker-style-name="T107"><text:span text:style-name="T108">最笨的方法：送 </text:span><text:span text:style-name="T195">1 </text:span><text:span text:style-name="T108">個封包 → 等 </text:span><text:span text:style-name="T195">ACK → </text:span><text:span text:style-name="T108">再送 </text:span><text:span text:style-name="T195">1 </text:span><text:span text:style-name="T108">個 → 等 </text:span><text:span text:style-name="T195">ACK</text:span><text:span text:style-name="T106">，</text:span><text:span text:style-name="T576">大部分時間在閒置，非常浪費</text:span><text:span text:style-name="T106">。</text:span><text:span text:style-name="T217">TCP </text:span><text:span text:style-name="T133">的改進</text:span><text:span text:style-name="T106">：</text:span><text:span text:style-name="T704">不用等 </text:span><text:span text:style-name="T712">ACK</text:span><text:span text:style-name="T704">，先連續送出多個封包讓封包都在網路上飛（</text:span><text:span text:style-name="T712">in-flight</text:span><text:span text:style-name="T704">），</text:span><text:span text:style-name="T712">ACK </text:span><text:span text:style-name="T704">再慢慢回來</text:span><text:span text:style-name="T106">，這就是 </text:span><text:span text:style-name="T194">pipeline</text:span><text:span text:style-name="T106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7"><text:span text:style-name="T286">✗ </text:span><text:span text:style-name="T279">常見錯誤：</text:span><text:span text:style-name="T106">視窗 </text:span><text:span text:style-name="T194">= cwnd</text:span><text:span text:style-name="T106">（擁塞視窗）。</text:span><text:span text:style-name="T290">✓ 正確：</text:span><text:span text:style-name="T342">視窗 </text:span><text:span text:style-name="T366">= min(cwnd, rwnd)</text:span><text:span text:style-name="T342">，</text:span><text:span text:style-name="T366">cwnd </text:span><text:span text:style-name="T34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4" loext:marker-style-name="T69"><text:span text:style-name="T70">時間點</text:span><text:span text:style-name="T69"/></text:p>
          </table:table-cell>
          <table:table-cell table:style-name="表格74.A2" office:value-type="string">
            <text:p text:style-name="P4" loext:marker-style-name="T69"><text:span text:style-name="T70">已確認</text:span><text:span text:style-name="T69"/></text:p>
          </table:table-cell>
          <table:table-cell table:style-name="表格74.A2" office:value-type="string">
            <text:p text:style-name="P4" loext:marker-style-name="T69"><text:span text:style-name="T70">視窗範圍（可送）</text:span><text:span text:style-name="T69"/></text:p>
          </table:table-cell>
          <table:table-cell table:style-name="表格74.A2" office:value-type="string">
            <text:p text:style-name="P4" loext:marker-style-name="T69"><text:span text:style-name="T70">等待中</text:span><text:span text:style-name="T69"/></text:p>
          </table:table-cell>
        </table:table-row>
        <table:table-row table:style-name="表格74.1">
          <table:table-cell table:style-name="表格74.A3" office:value-type="string">
            <text:p text:style-name="P29" loext:marker-style-name="T83"><text:span text:style-name="T84">初始狀態</text:span><text:span text:style-name="T83"/></text:p>
          </table:table-cell>
          <table:table-cell table:style-name="表格74.A3" office:value-type="string">
            <text:p text:style-name="P29" loext:marker-style-name="T83"><text:span text:style-name="T84">無</text:span><text:span text:style-name="T83"/></text:p>
          </table:table-cell>
          <table:table-cell table:style-name="表格74.A3" office:value-type="string">
            <text:p text:style-name="P29" loext:marker-style-name="T83"><text:span text:style-name="T84">封包 </text:span><text:span text:style-name="T182">1, 2, 3</text:span></text:p>
          </table:table-cell>
          <table:table-cell table:style-name="表格74.A3" office:value-type="string">
            <text:p text:style-name="P29" loext:marker-style-name="T83"><text:span text:style-name="T182">4, 5, 6 …</text:span><text:span text:style-name="T83"/></text:p>
          </table:table-cell>
        </table:table-row>
        <table:table-row table:style-name="表格74.1">
          <table:table-cell table:style-name="表格74.A4" office:value-type="string">
            <text:p text:style-name="P29" loext:marker-style-name="T99"><text:span text:style-name="T100">收到 </text:span><text:span text:style-name="T189">ACK 1</text:span></text:p>
          </table:table-cell>
          <table:table-cell table:style-name="表格74.A4" office:value-type="string">
            <text:p text:style-name="P29" loext:marker-style-name="T104"><text:span text:style-name="T105">封包 </text:span><text:span text:style-name="T193">1</text:span></text:p>
          </table:table-cell>
          <table:table-cell table:style-name="表格74.A4" office:value-type="string">
            <text:p text:style-name="P29" loext:marker-style-name="T83"><text:span text:style-name="T84">封包 </text:span><text:span text:style-name="T182">2, 3, 4</text:span></text:p>
          </table:table-cell>
          <table:table-cell table:style-name="表格74.A4" office:value-type="string">
            <text:p text:style-name="P29" loext:marker-style-name="T83"><text:span text:style-name="T182">5, 6 …</text:span><text:span text:style-name="T84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9" loext:marker-style-name="T99"><text:span text:style-name="T100">收到 </text:span><text:span text:style-name="T189">ACK 2</text:span></text:p>
          </table:table-cell>
          <table:table-cell table:style-name="表格74.A3" office:value-type="string">
            <text:p text:style-name="P29" loext:marker-style-name="T104"><text:span text:style-name="T105">封包 </text:span><text:span text:style-name="T193">1, 2</text:span></text:p>
          </table:table-cell>
          <table:table-cell table:style-name="表格74.A3" office:value-type="string">
            <text:p text:style-name="P29" loext:marker-style-name="T83"><text:span text:style-name="T84">封包 </text:span><text:span text:style-name="T182">3, 4, 5</text:span></text:p>
          </table:table-cell>
          <table:table-cell table:style-name="表格74.A3" office:value-type="string">
            <text:p text:style-name="P29" loext:marker-style-name="T83"><text:span text:style-name="T182">6, 7 …</text:span><text:span text:style-name="T84">（繼續往右滑）</text:span></text:p>
          </table:table-cell>
        </table:table-row>
      </table:table>
      <text:p text:style-name="P35" loext:marker-style-name="T10"><text:span text:style-name="T11">關鍵理解：視窗大小決定效率（越大越快），</text:span><text:span text:style-name="T689">ACK </text:span><text:span text:style-name="T684">的回傳決定視窗位置（往前滑）</text:span><text:span text:style-name="T11">，兩者合作讓傳輸保持流暢。</text:span></text:p>
      <text:h text:style-name="P11" text:outline-level="2" loext:marker-style-name="T27"><text:span text:style-name="T28">七、擁塞控制：怎麼調整速度</text:span><text:span text:style-name="T27"/></text:h>
      <text:h text:style-name="P12" text:outline-level="3"><text:span text:style-name="T249">▍</text:span><text:span text:style-name="T250"> </text:span><text:span text:style-name="T251">階段一：</text:span><text:span text:style-name="T250">Slow Start</text:span><text:span text:style-name="T251">（慢啟動）— 指數成長</text:span></text:h>
      <text:p text:style-name="P35" loext:marker-style-name="T107"><text:span text:style-name="T106">雖叫「慢」啟動，實際成長非常快。規則：</text:span><text:span text:style-name="T537">每收到一個 </text:span><text:span text:style-name="T554">ACK</text:span><text:span text:style-name="T537">，</text:span><text:span text:style-name="T554">cwnd </text:span><text:span text:style-name="T537">就 </text:span><text:span text:style-name="T554">+1</text:span><text:span text:style-name="T106">；</text:span><text:span text:style-name="T636">送出 </text:span><text:span text:style-name="T651">N </text:span><text:span text:style-name="T636">個封包 → 收回 </text:span><text:span text:style-name="T651">N </text:span><text:span text:style-name="T636">個 </text:span><text:span text:style-name="T651">ACK → cwnd </text:span><text:span text:style-name="T636">增加 </text:span><text:span text:style-name="T651">N</text:span><text:span text:style-name="T106">，所以每輪自然翻倍。</text:span><text:span text:style-name="T194">(</text:span><text:span text:style-name="T366">Slow Start = </text:span><text:span text:style-name="T342">每一輪變 </text:span><text:span text:style-name="T366">2 </text:span><text:span text:style-name="T342">倍，</text:span><text:span text:style-name="T366">Congestion Avoidance = </text:span><text:span text:style-name="T342">每一輪只加 </text:span><text:span text:style-name="T366">1</text:span><text:span text:style-name="T194">(</text:span><text:span text:style-name="T106">「</text:span><text:span text:style-name="T571">Slow Start</text:span><text:span text:style-name="T577">翻倍，壅塞避免加一</text:span><text:span text:style-name="T106">」</text:span><text:span text:style-name="T194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6" loext:marker-style-name="T69"><text:span text:style-name="T70">輪次（</text:span><text:span text:style-name="T79">RTT</text:span><text:span text:style-name="T70">）</text:span></text:p>
            </table:table-cell>
            <table:table-cell table:style-name="表格75.A1" office:value-type="string">
              <text:p text:style-name="P26" loext:marker-style-name="T69"><text:span text:style-name="T79">cwnd</text:span><text:span text:style-name="T69"/></text:p>
            </table:table-cell>
            <table:table-cell table:style-name="表格75.A1" office:value-type="string">
              <text:p text:style-name="P26" loext:marker-style-name="T69"><text:span text:style-name="T70">送出封包數</text:span><text:span text:style-name="T69"/></text:p>
            </table:table-cell>
            <table:table-cell table:style-name="表格75.A1" office:value-type="string">
              <text:p text:style-name="P26" loext:marker-style-name="T69"><text:span text:style-name="T70">收回 </text:span><text:span text:style-name="T79">ACK </text:span><text:span text:style-name="T70">數</text:span></text:p>
            </table:table-cell>
            <table:table-cell table:style-name="表格75.A1" office:value-type="string">
              <text:p text:style-name="P26" loext:marker-style-name="T69"><text:span text:style-name="T70">新 </text:span><text:span text:style-name="T79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9" loext:marker-style-name="T83"><text:span text:style-name="T84">第 </text:span><text:span text:style-name="T182">1 </text:span><text:span text:style-name="T84">輪</text:span></text:p>
          </table:table-cell>
          <table:table-cell table:style-name="表格75.A2" office:value-type="string">
            <text:p text:style-name="P29" loext:marker-style-name="T83"><text:span text:style-name="T182">1</text:span><text:span text:style-name="T83"/></text:p>
          </table:table-cell>
          <table:table-cell table:style-name="表格75.A2" office:value-type="string">
            <text:p text:style-name="P29" loext:marker-style-name="T83"><text:span text:style-name="T182">1</text:span><text:span text:style-name="T83"/></text:p>
          </table:table-cell>
          <table:table-cell table:style-name="表格75.A2" office:value-type="string">
            <text:p text:style-name="P29" loext:marker-style-name="T83"><text:span text:style-name="T182">1</text:span><text:span text:style-name="T83"/></text:p>
          </table:table-cell>
          <table:table-cell table:style-name="表格75.A2" office:value-type="string">
            <text:p text:style-name="P29" loext:marker-style-name="T83"><text:span text:style-name="T182">2</text:span><text:span text:style-name="T83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9" loext:marker-style-name="T83"><text:span text:style-name="T84">第 </text:span><text:span text:style-name="T182">2 </text:span><text:span text:style-name="T84">輪</text:span></text:p>
          </table:table-cell>
          <table:table-cell table:style-name="表格75.A3" office:value-type="string">
            <text:p text:style-name="P29" loext:marker-style-name="T83"><text:span text:style-name="T182">2</text:span><text:span text:style-name="T83"/></text:p>
          </table:table-cell>
          <table:table-cell table:style-name="表格75.A3" office:value-type="string">
            <text:p text:style-name="P29" loext:marker-style-name="T83"><text:span text:style-name="T182">2</text:span><text:span text:style-name="T83"/></text:p>
          </table:table-cell>
          <table:table-cell table:style-name="表格75.A3" office:value-type="string">
            <text:p text:style-name="P29" loext:marker-style-name="T83"><text:span text:style-name="T182">2</text:span><text:span text:style-name="T83"/></text:p>
          </table:table-cell>
          <table:table-cell table:style-name="表格75.A3" office:value-type="string">
            <text:p text:style-name="P29" loext:marker-style-name="T83"><text:span text:style-name="T182">4</text:span><text:span text:style-name="T83"/></text:p>
          </table:table-cell>
        </table:table-row>
        <table:table-row table:style-name="表格75.1">
          <table:table-cell table:style-name="表格75.A2" office:value-type="string">
            <text:p text:style-name="P29" loext:marker-style-name="T83"><text:span text:style-name="T84">第 </text:span><text:span text:style-name="T182">3 </text:span><text:span text:style-name="T84">輪</text:span></text:p>
          </table:table-cell>
          <table:table-cell table:style-name="表格75.A2" office:value-type="string">
            <text:p text:style-name="P29" loext:marker-style-name="T83"><text:span text:style-name="T182">4</text:span><text:span text:style-name="T83"/></text:p>
          </table:table-cell>
          <table:table-cell table:style-name="表格75.A2" office:value-type="string">
            <text:p text:style-name="P29" loext:marker-style-name="T83"><text:span text:style-name="T182">4</text:span><text:span text:style-name="T83"/></text:p>
          </table:table-cell>
          <table:table-cell table:style-name="表格75.A2" office:value-type="string">
            <text:p text:style-name="P29" loext:marker-style-name="T83"><text:span text:style-name="T182">4</text:span><text:span text:style-name="T83"/></text:p>
          </table:table-cell>
          <table:table-cell table:style-name="表格75.A2" office:value-type="string">
            <text:p text:style-name="P29" loext:marker-style-name="T83"><text:span text:style-name="T182">8</text:span><text:span text:style-name="T83"/></text:p>
          </table:table-cell>
        </table:table-row>
        <table:table-row table:style-name="表格75.1">
          <table:table-cell table:style-name="表格75.A3" office:value-type="string">
            <text:p text:style-name="P29" loext:marker-style-name="T83"><text:span text:style-name="T84">第 </text:span><text:span text:style-name="T182">4 </text:span><text:span text:style-name="T84">輪</text:span></text:p>
          </table:table-cell>
          <table:table-cell table:style-name="表格75.A3" office:value-type="string">
            <text:p text:style-name="P29" loext:marker-style-name="T83"><text:span text:style-name="T182">8</text:span><text:span text:style-name="T83"/></text:p>
          </table:table-cell>
          <table:table-cell table:style-name="表格75.A3" office:value-type="string">
            <text:p text:style-name="P29" loext:marker-style-name="T83"><text:span text:style-name="T182">8</text:span><text:span text:style-name="T83"/></text:p>
          </table:table-cell>
          <table:table-cell table:style-name="表格75.A3" office:value-type="string">
            <text:p text:style-name="P29" loext:marker-style-name="T83"><text:span text:style-name="T182">8</text:span><text:span text:style-name="T83"/></text:p>
          </table:table-cell>
          <table:table-cell table:style-name="表格75.A3" office:value-type="string">
            <text:p text:style-name="P29" loext:marker-style-name="T83"><text:span text:style-name="T182">16</text:span><text:span text:style-name="T83"/></text:p>
          </table:table-cell>
        </table:table-row>
      </table:table>
      <text:h text:style-name="P12" text:outline-level="3"><text:span text:style-name="T249">▍</text:span><text:span text:style-name="T250"> </text:span><text:span text:style-name="T251">階段二：</text:span><text:span text:style-name="T250">Congestion Avoidance</text:span><text:span text:style-name="T251">（擁塞避免）— 線性成長</text:span></text:h>
      <text:p text:style-name="P35" loext:marker-style-name="T107"><text:span text:style-name="T474">cwnd </text:span><text:span text:style-name="T452">成長到門檻值（</text:span><text:span text:style-name="T474">ssthresh</text:span><text:span text:style-name="T452">）後，改為線性成長</text:span><text:span text:style-name="T106">（</text:span><text:span text:style-name="T537">每個 </text:span><text:span text:style-name="T554">RTT </text:span><text:span text:style-name="T537">只 </text:span><text:span text:style-name="T554">+1</text:span><text:span text:style-name="T106">），</text:span><text:span text:style-name="T131">避免增長太快讓網路過載</text:span><text:span text:style-name="T106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4"/>
            </table:table-cell>
            <table:table-cell table:style-name="表格76.A1" office:value-type="string">
              <text:p text:style-name="P4" loext:marker-style-name="T69"><text:span text:style-name="T79">Slow Start</text:span><text:span text:style-name="T69"/></text:p>
            </table:table-cell>
            <table:table-cell table:style-name="表格76.A1" office:value-type="string">
              <text:p text:style-name="P4" loext:marker-style-name="T69"><text:span text:style-name="T79">Congestion Avoidance</text:span><text:span text:style-name="T69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9" loext:marker-style-name="T83"><text:span text:style-name="T84">觸發條件</text:span><text:span text:style-name="T83"/></text:p>
          </table:table-cell>
          <table:table-cell table:style-name="表格76.A2" office:value-type="string">
            <text:p text:style-name="P29" loext:marker-style-name="T99"><text:span text:style-name="T189">cwnd &lt; ssthresh</text:span><text:span text:style-name="T99"/></text:p>
          </table:table-cell>
          <table:table-cell table:style-name="表格76.A2" office:value-type="string">
            <text:p text:style-name="P29" loext:marker-style-name="T99"><text:span text:style-name="T189">cwnd ≥ ssthresh</text:span><text:span text:style-name="T99"/></text:p>
          </table:table-cell>
        </table:table-row>
        <table:table-row table:style-name="表格76.1">
          <table:table-cell table:style-name="表格76.A3" office:value-type="string">
            <text:p text:style-name="P29" loext:marker-style-name="T83"><text:span text:style-name="T84">成長方式</text:span><text:span text:style-name="T83"/></text:p>
          </table:table-cell>
          <table:table-cell table:style-name="表格76.A3" office:value-type="string">
            <text:p text:style-name="P29" loext:marker-style-name="T83"><text:span text:style-name="T649">指數成長</text:span><text:span text:style-name="T84">（</text:span><text:span text:style-name="T532">每個 </text:span><text:span text:style-name="T550">ACK +1</text:span><text:span text:style-name="T84">）</text:span></text:p>
          </table:table-cell>
          <table:table-cell table:style-name="表格76.A3" office:value-type="string">
            <text:p text:style-name="P29" loext:marker-style-name="T83"><text:span text:style-name="T680">線性成長</text:span><text:span text:style-name="T84">（</text:span><text:span text:style-name="T532">每個 </text:span><text:span text:style-name="T550">RTT +1</text:span><text:span text:style-name="T84">）</text:span><text:span text:style-name="T182">(</text:span><text:span text:style-name="T715">RTT </text:span><text:span text:style-name="T707">：</text:span><text:span text:style-name="T715">Round Trip Time</text:span><text:span text:style-name="T707">（往返時間）</text:span><text:span text:style-name="T715">= </text:span><text:span text:style-name="T707">封包出去 </text:span><text:span text:style-name="T715">+ ACK </text:span><text:span text:style-name="T707">回來的一個來回時間</text:span><text:span text:style-name="T182">)</text:span></text:p>
          </table:table-cell>
        </table:table-row>
        <table:table-row table:style-name="表格76.1">
          <table:table-cell table:style-name="表格76.A2" office:value-type="string">
            <text:p text:style-name="P29" loext:marker-style-name="T83"><text:span text:style-name="T84">特性</text:span><text:span text:style-name="T83"/></text:p>
          </table:table-cell>
          <table:table-cell table:style-name="表格76.A2" office:value-type="string">
            <text:p text:style-name="P29" loext:marker-style-name="T83"><text:span text:style-name="T84">快速試探網路上限</text:span><text:span text:style-name="T83"/></text:p>
          </table:table-cell>
          <table:table-cell table:style-name="表格76.A2" office:value-type="string">
            <text:p text:style-name="P29" loext:marker-style-name="T83"><text:span text:style-name="T84">保守維持穩定傳輸</text:span><text:span text:style-name="T83"/></text:p>
          </table:table-cell>
        </table:table-row>
      </table:table>
      <text:h text:style-name="P12" text:outline-level="3"><text:span text:style-name="T249">▍</text:span><text:span text:style-name="T250"> </text:span><text:span text:style-name="T251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" loext:marker-style-name="T75"><text:span text:style-name="T76">丟包偵測方式</text:span><text:span text:style-name="T75"/></text:p>
            </table:table-cell>
            <table:table-cell table:style-name="表格77.A1" office:value-type="string">
              <text:p text:style-name="P4" loext:marker-style-name="T75"><text:span text:style-name="T76">說明</text:span><text:span text:style-name="T75"/></text:p>
            </table:table-cell>
            <table:table-cell table:style-name="表格77.A1" office:value-type="string">
              <text:p text:style-name="P4" loext:marker-style-name="T75"><text:span text:style-name="T81">ssthresh</text:span><text:span text:style-name="T75"/></text:p>
            </table:table-cell>
            <table:table-cell table:style-name="表格77.A1" office:value-type="string">
              <text:p text:style-name="P4" loext:marker-style-name="T75"><text:span text:style-name="T81">cwnd</text:span><text:span text:style-name="T75"/></text:p>
            </table:table-cell>
            <table:table-cell table:style-name="表格77.A1" office:value-type="string">
              <text:p text:style-name="P4" loext:marker-style-name="T75"><text:span text:style-name="T76">下一階段</text:span><text:span text:style-name="T75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9" loext:marker-style-name="T174"><text:span text:style-name="T240">Timeout</text:span><text:span text:style-name="T172">（逾時）</text:span></text:p>
          </table:table-cell>
          <table:table-cell table:style-name="表格77.A2" office:value-type="string">
            <text:p text:style-name="P29" loext:marker-style-name="T147"><text:span text:style-name="T169">等太久沒 </text:span><text:span text:style-name="T238">ACK</text:span><text:span text:style-name="T148">，</text:span><text:span text:style-name="T330">網路嚴重擁塞</text:span></text:p>
          </table:table-cell>
          <table:table-cell table:style-name="表格77.A2" office:value-type="string">
            <text:p text:style-name="P29" loext:marker-style-name="T147"><text:span text:style-name="T230">= </text:span><text:span text:style-name="T375">cwnd / 2</text:span></text:p>
          </table:table-cell>
          <table:table-cell table:style-name="表格77.A2" office:value-type="string">
            <text:p text:style-name="P29" loext:marker-style-name="T274"><text:span text:style-name="T275">重設為 </text:span><text:span text:style-name="T282">1</text:span></text:p>
          </table:table-cell>
          <table:table-cell table:style-name="表格77.A2" office:value-type="string">
            <text:p text:style-name="P29" loext:marker-style-name="T384"><text:span text:style-name="T382">重新進入 </text:span><text:span text:style-name="T395">Slow Start</text:span></text:p>
          </table:table-cell>
        </table:table-row>
        <table:table-row table:style-name="表格77.1">
          <table:table-cell table:style-name="表格77.A3" office:value-type="string">
            <text:p text:style-name="P29" loext:marker-style-name="T174"><text:span text:style-name="T240">3 </text:span><text:span text:style-name="T172">個重複 </text:span><text:span text:style-name="T240">ACK (Fast Retransmit)</text:span></text:p>
          </table:table-cell>
          <table:table-cell table:style-name="表格77.A3" office:value-type="string">
            <text:p text:style-name="P29" loext:marker-style-name="T147"><text:span text:style-name="T169">連續收 </text:span><text:span text:style-name="T238">3 </text:span><text:span text:style-name="T169">個同樣 </text:span><text:span text:style-name="T238">ACK</text:span><text:span text:style-name="T148">，</text:span><text:span text:style-name="T441">單一封包丟失</text:span></text:p>
          </table:table-cell>
          <table:table-cell table:style-name="表格77.A3" office:value-type="string">
            <text:p text:style-name="P29" loext:marker-style-name="T147"><text:span text:style-name="T230">= </text:span><text:span text:style-name="T375">cwnd / 2</text:span></text:p>
          </table:table-cell>
          <table:table-cell table:style-name="表格77.A3" office:value-type="string">
            <text:p text:style-name="P29" loext:marker-style-name="T33"><text:span text:style-name="T41">= ssthresh</text:span><text:span text:style-name="T34">（直接減半）</text:span></text:p>
          </table:table-cell>
          <table:table-cell table:style-name="表格77.A3" office:value-type="string">
            <text:p text:style-name="P29" loext:marker-style-name="T384"><text:span text:style-name="T382">進入 </text:span><text:span text:style-name="T395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6"><text:span text:style-name="T247">⚠️ <text:s/></text:span><text:span text:style-name="T269">重要區別</text:span></text:p>
            <text:p text:style-name="P7" loext:marker-style-name="T107"><text:span text:style-name="T695">Timeout </text:span><text:span text:style-name="T691">代表網路嚴重問題</text:span><text:span text:style-name="T106">，</text:span><text:span text:style-name="T654">cwnd </text:span><text:span text:style-name="T639">重設回 </text:span><text:span text:style-name="T654">1 </text:span><text:span text:style-name="T639">從頭來</text:span><text:span text:style-name="T106">；</text:span><text:span text:style-name="T717">3 </text:span><text:span text:style-name="T718">個重複 </text:span><text:span text:style-name="T717">ACK </text:span><text:span text:style-name="T718">只是單一封包遺失</text:span><text:span text:style-name="T106">，</text:span><text:span text:style-name="T654">cwnd </text:span><text:span text:style-name="T639">直接減半後繼續 </text:span><text:span text:style-name="T654">Congestion Avoidance</text:span><text:span text:style-name="T639">，不用從頭重來</text:span><text:span text:style-name="T106">。</text:span><text:span text:style-name="T194">(</text:span><text:span text:style-name="T369">Timeout → cwnd = 1</text:span><text:span text:style-name="T346">；</text:span><text:span text:style-name="T369">3Dup ACK → cwnd ÷ 2</text:span><text:span text:style-name="T194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AIMD</text:span><text:span text:style-name="T251">（加法增長 </text:span><text:span text:style-name="T250">/ </text:span><text:span text:style-name="T251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26" loext:marker-style-name="T69"><text:span text:style-name="T79">AI</text:span><text:span text:style-name="T70">：加法增長 </text:span><text:span text:style-name="T79">Additive Increase</text:span></text:p>
            </table:table-cell>
            <table:table-cell table:style-name="表格78.A1" office:value-type="string">
              <text:p text:style-name="P26" loext:marker-style-name="T69"><text:span text:style-name="T79">MD</text:span><text:span text:style-name="T70">：乘法減少 </text:span><text:span text:style-name="T79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9" loext:marker-style-name="T83"><text:span text:style-name="T92">沒丟包 → 網路 </text:span><text:span text:style-name="T190">OK </text:span><text:span text:style-name="T182">→ CA </text:span><text:span text:style-name="T84">階段線性增加（</text:span><text:span text:style-name="T96">每 </text:span><text:span text:style-name="T187">RTT +1</text:span><text:span text:style-name="T84">），慢慢加速。</text:span></text:p>
          </table:table-cell>
          <table:table-cell table:style-name="表格78.A2" office:value-type="string">
            <text:p text:style-name="P29" loext:marker-style-name="T83"><text:span text:style-name="T92">偵測到丟包 → 網路塞了 </text:span><text:span text:style-name="T84">→ </text:span><text:span text:style-name="T187">cwnd ×0.5</text:span><text:span text:style-name="T96">（減半）</text:span><text:span text:style-name="T84">，快速降速避免繼續惡化。</text:span></text:p>
          </table:table-cell>
        </table:table-row>
      </table:table>
      <text:p text:style-name="P35" loext:marker-style-name="T10"><text:span text:style-name="T557">AIMD </text:span><text:span text:style-name="T541">本質：用 </text:span><text:span text:style-name="T557">ACK </text:span><text:span text:style-name="T541">當回饋，不斷探測網路的「最高速度」</text:span><text:span text:style-name="T11">——</text:span><text:span text:style-name="T386">慢慢加速找上限，遇到問題快速減速再重新找</text:span><text:span text:style-name="T11">，這個循環就是 </text:span><text:span text:style-name="T20">TCP </text:span><text:span text:style-name="T11">傳輸的節奏。</text:span></text:p>
      <text:h text:style-name="P11" text:outline-level="2" loext:marker-style-name="T27"><text:span text:style-name="T28">八、把整個 </text:span><text:span text:style-name="T27">TCP </text:span><text:span text:style-name="T28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6"><text:span text:style-name="T247">🔄 <text:s/></text:span><text:span text:style-name="T52">完整流程</text:span></text:p>
            <text:p text:style-name="P7" loext:marker-style-name="T107"><text:span text:style-name="T194">① </text:span><text:span text:style-name="T106">建立連線：三次握手（</text:span><text:span text:style-name="T194">SYN → SYN+ACK → ACK</text:span><text:span text:style-name="T106">）確認雙向通訊正常。</text:span></text:p>
            <text:p text:style-name="P8" loext:marker-style-name="T107"><text:span text:style-name="T194">② </text:span><text:span text:style-name="T106">開始傳資料 </text:span><text:span text:style-name="T194">Slow Start</text:span><text:span text:style-name="T106">：</text:span><text:span text:style-name="T194">cwnd </text:span><text:span text:style-name="T106">從 </text:span><text:span text:style-name="T194">1 </text:span><text:span text:style-name="T106">開始，每個 </text:span><text:span text:style-name="T194">ACK +1</text:span><text:span text:style-name="T106">，指數成長快速試探上限。</text:span></text:p>
            <text:p text:style-name="P8" loext:marker-style-name="T107"><text:span text:style-name="T194">③ </text:span><text:span text:style-name="T106">達到門檻切換 </text:span><text:span text:style-name="T194">CA</text:span><text:span text:style-name="T106">：</text:span><text:span text:style-name="T194">cwnd </text:span><text:span text:style-name="T106">到 </text:span><text:span text:style-name="T194">ssthresh </text:span><text:span text:style-name="T106">後改每 </text:span><text:span text:style-name="T194">RTT +1</text:span><text:span text:style-name="T106">，線性保守維持穩定。（</text:span><text:span text:style-name="T194">RTT</text:span><text:span text:style-name="T106">＝來回時間：送出一個封包到收到 </text:span><text:span text:style-name="T194">ACK </text:span><text:span text:style-name="T106">所花的時間）</text:span></text:p>
            <text:p text:style-name="P8" loext:marker-style-name="T107"><text:span text:style-name="T194">④ </text:span><text:span text:style-name="T106">每輪都考慮兩個限制：實際傳送量 </text:span><text:span text:style-name="T194">= min(rwnd, cwnd)</text:span><text:span text:style-name="T106">。</text:span></text:p>
            <text:p text:style-name="P8" loext:marker-style-name="T107"><text:span text:style-name="T194">⑤ </text:span><text:span text:style-name="T106">視窗持續滑動：每收到一個 </text:span><text:span text:style-name="T194">ACK </text:span><text:span text:style-name="T106">視窗往前移，保持 </text:span><text:span text:style-name="T194">pipeline </text:span><text:span text:style-name="T106">流暢。</text:span></text:p>
            <text:p text:style-name="P8" loext:marker-style-name="T107"><text:span text:style-name="T194">⑥ </text:span><text:span text:style-name="T106">偵測到丟包快速反應：</text:span><text:span text:style-name="T194">Timeout → cwnd=1 </text:span><text:span text:style-name="T106">重回 </text:span><text:span text:style-name="T194">Slow Start</text:span><text:span text:style-name="T106">；</text:span><text:span text:style-name="T194">3 </text:span><text:span text:style-name="T106">重複 </text:span><text:span text:style-name="T194">ACK → cwnd </text:span><text:span text:style-name="T106">減半續 </text:span><text:span text:style-name="T194">CA</text:span><text:span text:style-name="T106">。</text:span></text:p>
            <text:p text:style-name="P8" loext:marker-style-name="T107"><text:span text:style-name="T194">⑦ </text:span><text:span text:style-name="T106">持續循環調整：送 → 收 </text:span><text:span text:style-name="T194">ACK → </text:span><text:span text:style-name="T106">調整 </text:span><text:span text:style-name="T194">cwnd → </text:span><text:span text:style-name="T106">再送，</text:span><text:span text:style-name="T537">用 </text:span><text:span text:style-name="T554">ACK </text:span><text:span text:style-name="T537">當回饋不斷自我調節</text:span><text:span text:style-name="T106">。</text:span></text:p>
          </table:table-cell>
        </table:table-row>
      </table:table>
      <text:h text:style-name="P11" text:outline-level="2" loext:marker-style-name="T350"><text:soft-page-break/><text:span text:style-name="T350">TCP </text:span><text:span text:style-name="T351">七字口訣 <text:s text:c="2"/>握</text:span><text:span text:style-name="T350">(</text:span><text:span text:style-name="T351">三次握手</text:span><text:span text:style-name="T350">) → </text:span><text:span text:style-name="T351">衝</text:span><text:span text:style-name="T350">(Slow Start </text:span><text:span text:style-name="T351">指數成長</text:span><text:span text:style-name="T350">) → </text:span><text:span text:style-name="T351">穩</text:span><text:span text:style-name="T350">(CA </text:span><text:span text:style-name="T351">線性成長</text:span><text:span text:style-name="T350">) → </text:span><text:span text:style-name="T351">看</text:span><text:span text:style-name="T350">(min(rwnd,cwnd)) → </text:span><text:span text:style-name="T351">滑</text:span><text:span text:style-name="T350">(Sliding Window) → </text:span><text:span text:style-name="T351">救</text:span><text:span text:style-name="T350">(Timeout / 3 Dup ACK) → </text:span><text:span text:style-name="T351">循</text:span><text:span text:style-name="T350">(ACK </text:span><text:span text:style-name="T351">回饋循環</text:span><text:span text:style-name="T350">)</text:span></text:h>
      <text:h text:style-name="P19" text:outline-level="2" loext:marker-style-name="T27"/>
      <text:h text:style-name="P11" text:outline-level="2" loext:marker-style-name="T27"><text:span text:style-name="T28">九、</text:span><text:span text:style-name="T27">ARP / NAT / TCP </text:span><text:span text:style-name="T28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4" loext:marker-style-name="T69"><text:span text:style-name="T70">步驟</text:span><text:span text:style-name="T69"/></text:p>
            </table:table-cell>
            <table:table-cell table:style-name="表格80.A1" office:value-type="string">
              <text:p text:style-name="P4" loext:marker-style-name="T69"><text:span text:style-name="T70">發生什麼</text:span><text:span text:style-name="T69"/></text:p>
            </table:table-cell>
            <table:table-cell table:style-name="表格80.A1" office:value-type="string">
              <text:p text:style-name="P4" loext:marker-style-name="T69"><text:span text:style-name="T70">用到什麼</text:span><text:span text:style-name="T69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9" loext:marker-style-name="T83"><text:span text:style-name="T182">DNS </text:span><text:span text:style-name="T84">解析</text:span></text:p>
          </table:table-cell>
          <table:table-cell table:style-name="表格80.A2" office:value-type="string">
            <text:p text:style-name="P29" loext:marker-style-name="T83"><text:span text:style-name="T182">google.com → 142.250.x.x</text:span><text:span text:style-name="T83"/></text:p>
          </table:table-cell>
          <table:table-cell table:style-name="表格80.A2" office:value-type="string">
            <text:p text:style-name="P29" loext:marker-style-name="T83"><text:span text:style-name="T182">DNS</text:span><text:span text:style-name="T83"/></text:p>
          </table:table-cell>
        </table:table-row>
        <table:table-row table:style-name="表格80.1">
          <table:table-cell table:style-name="表格80.A3" office:value-type="string">
            <text:p text:style-name="P29" loext:marker-style-name="T83"><text:span text:style-name="T182">ARP </text:span><text:span text:style-name="T84">找路由器</text:span></text:p>
          </table:table-cell>
          <table:table-cell table:style-name="表格80.A3" office:value-type="string">
            <text:p text:style-name="P29" loext:marker-style-name="T83"><text:span text:style-name="T84">找路由器的 </text:span><text:span text:style-name="T182">MAC </text:span><text:span text:style-name="T84">位址</text:span></text:p>
          </table:table-cell>
          <table:table-cell table:style-name="表格80.A3" office:value-type="string">
            <text:p text:style-name="P29" loext:marker-style-name="T83"><text:span text:style-name="T182">ARP</text:span><text:span text:style-name="T83"/></text:p>
          </table:table-cell>
        </table:table-row>
        <table:table-row table:style-name="表格80.1">
          <table:table-cell table:style-name="表格80.A2" office:value-type="string">
            <text:p text:style-name="P29" loext:marker-style-name="T83"><text:span text:style-name="T182">NAT</text:span><text:span text:style-name="T83"/></text:p>
          </table:table-cell>
          <table:table-cell table:style-name="表格80.A2" office:value-type="string">
            <text:p text:style-name="P29" loext:marker-style-name="T83"><text:span text:style-name="T84">私有 </text:span><text:span text:style-name="T182">IP </text:span><text:span text:style-name="T84">換成公網 </text:span><text:span text:style-name="T182">IP</text:span></text:p>
          </table:table-cell>
          <table:table-cell table:style-name="表格80.A2" office:value-type="string">
            <text:p text:style-name="P29" loext:marker-style-name="T83"><text:span text:style-name="T182">NAT</text:span><text:span text:style-name="T83"/></text:p>
          </table:table-cell>
        </table:table-row>
        <table:table-row table:style-name="表格80.1">
          <table:table-cell table:style-name="表格80.A3" office:value-type="string">
            <text:p text:style-name="P29" loext:marker-style-name="T83"><text:span text:style-name="T182">TCP </text:span><text:span text:style-name="T84">三次握手</text:span></text:p>
          </table:table-cell>
          <table:table-cell table:style-name="表格80.A3" office:value-type="string">
            <text:p text:style-name="P29" loext:marker-style-name="T83"><text:span text:style-name="T84">與 </text:span><text:span text:style-name="T182">Google </text:span><text:span text:style-name="T84">建立可靠連線</text:span></text:p>
          </table:table-cell>
          <table:table-cell table:style-name="表格80.A3" office:value-type="string">
            <text:p text:style-name="P29" loext:marker-style-name="T83"><text:span text:style-name="T182">TCP</text:span><text:span text:style-name="T83"/></text:p>
          </table:table-cell>
        </table:table-row>
        <table:table-row table:style-name="表格80.1">
          <table:table-cell table:style-name="表格80.A2" office:value-type="string">
            <text:p text:style-name="P29" loext:marker-style-name="T83"><text:span text:style-name="T84">傳資料（</text:span><text:span text:style-name="T182">Slow Start → CA</text:span><text:span text:style-name="T84">）</text:span></text:p>
          </table:table-cell>
          <table:table-cell table:style-name="表格80.A2" office:value-type="string">
            <text:p text:style-name="P29" loext:marker-style-name="T83"><text:span text:style-name="T182">cwnd </text:span><text:span text:style-name="T84">慢慢加速，滑動視窗持續傳送</text:span></text:p>
          </table:table-cell>
          <table:table-cell table:style-name="表格80.A2" office:value-type="string">
            <text:p text:style-name="P29" loext:marker-style-name="T83"><text:span text:style-name="T182">TCP </text:span><text:span text:style-name="T84">擁塞控制</text:span></text:p>
          </table:table-cell>
        </table:table-row>
        <table:table-row table:style-name="表格80.1">
          <table:table-cell table:style-name="表格80.A3" office:value-type="string">
            <text:p text:style-name="P29" loext:marker-style-name="T83"><text:span text:style-name="T182">Google </text:span><text:span text:style-name="T84">回應</text:span></text:p>
          </table:table-cell>
          <table:table-cell table:style-name="表格80.A3" office:value-type="string">
            <text:p text:style-name="P29" loext:marker-style-name="T83"><text:span text:style-name="T84">資料送回你的電腦</text:span><text:span text:style-name="T83"/></text:p>
          </table:table-cell>
          <table:table-cell table:style-name="表格80.A3" office:value-type="string">
            <text:p text:style-name="P29" loext:marker-style-name="T83"><text:span text:style-name="T182">TCP + NAT</text:span><text:span text:style-name="T84">（回程換 </text:span><text:span text:style-name="T182">IP</text:span><text:span text:style-name="T84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6"><text:span text:style-name="T247">⚡ <text:s/></text:span><text:span text:style-name="T251">層次關係</text:span></text:p>
            <text:p text:style-name="P7" loext:marker-style-name="T107"><text:span text:style-name="T194">ARP </text:span><text:span text:style-name="T106">在 </text:span><text:span text:style-name="T194">L2/L3 </text:span><text:span text:style-name="T106">交界處工作（找 </text:span><text:span text:style-name="T194">MAC</text:span><text:span text:style-name="T106">）；</text:span><text:span text:style-name="T194">NAT </text:span><text:span text:style-name="T106">在 </text:span><text:span text:style-name="T194">L3</text:span><text:span text:style-name="T106">（換 </text:span><text:span text:style-name="T194">IP</text:span><text:span text:style-name="T106">）；</text:span><text:span text:style-name="T194">TCP </text:span><text:span text:style-name="T106">在 </text:span><text:span text:style-name="T194">L4</text:span><text:span text:style-name="T106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十、本篇一句話總結</text:span><text:span text:style-name="T27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6"><text:span text:style-name="T247">🧠 <text:s/></text:span><text:span text:style-name="T299">考試直接用</text:span></text:p>
            <text:p text:style-name="P7" loext:marker-style-name="T107"><text:span text:style-name="T194">TCP </text:span><text:span text:style-name="T106">用三次握手建立連線，</text:span><text:span text:style-name="T133">用 </text:span><text:span text:style-name="T217">rwnd</text:span><text:span text:style-name="T133">（接收端）和 </text:span><text:span text:style-name="T217">cwnd</text:span><text:span text:style-name="T133">（網路）雙重限制控制傳送速度</text:span><text:span text:style-name="T106">，透過 </text:span><text:span text:style-name="T194">Slow Start </text:span><text:span text:style-name="T106">指數試探、</text:span><text:span text:style-name="T194">Congestion Avoidance </text:span><text:span text:style-name="T106">線性增長、丟包後快速降速，</text:span><text:span text:style-name="T411">持續用 </text:span><text:span text:style-name="T417">ACK </text:span><text:span text:style-name="T411">當回饋調節</text:span><text:span text:style-name="T106">，確保資料可靠且高效地傳達。</text:span></text:p>
          </table:table-cell>
        </table:table-row>
      </table:table>
      <text:h text:style-name="P17" text:outline-level="1" loext:marker-style-name="T71"><text:span text:style-name="T72">第 六 篇　</text:span><text:span text:style-name="T71">DNS </text:span><text:span text:style-name="T72">與 </text:span><text:span text:style-name="T71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"><text:span text:style-name="T247">💡 <text:s/></text:span><text:span text:style-name="T63">DNS </text:span><text:span text:style-name="T52">是什麼？</text:span></text:p>
            <text:p text:style-name="P7" loext:marker-style-name="T107"><text:span text:style-name="T194">DNS </text:span><text:span text:style-name="T106">就像「網路電話簿」。人類習慣記名字（</text:span><text:span text:style-name="T194">google.com</text:span><text:span text:style-name="T106">），但電腦只認識號碼（</text:span><text:span text:style-name="T194">IP </text:span><text:span text:style-name="T106">位址），</text:span><text:span text:style-name="T194">DNS </text:span><text:span text:style-name="T106">的工作就是幫你查出對應的號碼。全名 </text:span><text:span text:style-name="T194">Domain Name System</text:span><text:span text:style-name="T106">，是負責將「網域名稱」轉換為「</text:span><text:span text:style-name="T194">IP </text:span><text:span text:style-name="T106">位址」的分散式系統。</text:span></text:p>
          </table:table-cell>
        </table:table-row>
      </table:table>
      <text:h text:style-name="P11" text:outline-level="2" loext:marker-style-name="T27"><text:span text:style-name="T28">一、</text:span><text:span text:style-name="T27">DNS </text:span><text:span text:style-name="T28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4" loext:marker-style-name="T69"><text:span text:style-name="T70">類型</text:span><text:span text:style-name="T69"/></text:p>
            </table:table-cell>
            <table:table-cell table:style-name="表格83.A1" office:value-type="string">
              <text:p text:style-name="P4" loext:marker-style-name="T69"><text:span text:style-name="T70">全名</text:span><text:span text:style-name="T69"/></text:p>
            </table:table-cell>
            <table:table-cell table:style-name="表格83.A1" office:value-type="string">
              <text:p text:style-name="P4" loext:marker-style-name="T69"><text:span text:style-name="T70">用途</text:span><text:span text:style-name="T69"/></text:p>
            </table:table-cell>
            <table:table-cell table:style-name="表格83.A1" office:value-type="string">
              <text:p text:style-name="P4" loext:marker-style-name="T69"><text:span text:style-name="T70">範例</text:span><text:span text:style-name="T69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9" loext:marker-style-name="T93"><text:span text:style-name="T190">A</text:span><text:span text:style-name="T93"/></text:p>
          </table:table-cell>
          <table:table-cell table:style-name="表格83.A2" office:value-type="string">
            <text:p text:style-name="P29" loext:marker-style-name="T98"><text:span text:style-name="T187">Address Record</text:span><text:span text:style-name="T98"/></text:p>
          </table:table-cell>
          <table:table-cell table:style-name="表格83.A2" office:value-type="string">
            <text:p text:style-name="P29" loext:marker-style-name="T83"><text:span text:style-name="T84">網域名稱 → </text:span><text:span text:style-name="T461">IPv4 </text:span><text:span text:style-name="T433">位址</text:span></text:p>
          </table:table-cell>
          <table:table-cell table:style-name="表格83.A2" office:value-type="string">
            <text:p text:style-name="P29" loext:marker-style-name="T83"><text:span text:style-name="T182">google.com → 142.250.x.x</text:span><text:span text:style-name="T83"/></text:p>
          </table:table-cell>
        </table:table-row>
        <table:table-row table:style-name="表格83.1">
          <table:table-cell table:style-name="表格83.A3" office:value-type="string">
            <text:p text:style-name="P29" loext:marker-style-name="T93"><text:span text:style-name="T190">NS</text:span><text:span text:style-name="T93"/></text:p>
          </table:table-cell>
          <table:table-cell table:style-name="表格83.A3" office:value-type="string">
            <text:p text:style-name="P29" loext:marker-style-name="T98"><text:span text:style-name="T187">Name Server</text:span><text:span text:style-name="T98"/></text:p>
          </table:table-cell>
          <table:table-cell table:style-name="表格83.A3" office:value-type="string">
            <text:p text:style-name="P29" loext:marker-style-name="T83"><text:span text:style-name="T84">指定</text:span><text:span text:style-name="T325">管理該網域的 </text:span><text:span text:style-name="T182">DNS </text:span><text:span text:style-name="T84">伺服器</text:span></text:p>
          </table:table-cell>
          <table:table-cell table:style-name="表格83.A3" office:value-type="string">
            <text:p text:style-name="P29" loext:marker-style-name="T83"><text:span text:style-name="T182">google.com → ns1.google.com</text:span><text:span text:style-name="T83"/></text:p>
          </table:table-cell>
        </table:table-row>
        <table:table-row table:style-name="表格83.1">
          <table:table-cell table:style-name="表格83.A2" office:value-type="string">
            <text:p text:style-name="P29" loext:marker-style-name="T93"><text:span text:style-name="T190">MX</text:span><text:span text:style-name="T93"/></text:p>
          </table:table-cell>
          <table:table-cell table:style-name="表格83.A2" office:value-type="string">
            <text:p text:style-name="P29" loext:marker-style-name="T98"><text:span text:style-name="T187">Mail Exchange</text:span><text:span text:style-name="T98"/></text:p>
          </table:table-cell>
          <table:table-cell table:style-name="表格83.A2" office:value-type="string">
            <text:p text:style-name="P29" loext:marker-style-name="T83"><text:span text:style-name="T84">指定</text:span><text:span text:style-name="T649">負責收發郵件的</text:span><text:span text:style-name="T84">伺服器</text:span></text:p>
          </table:table-cell>
          <table:table-cell table:style-name="表格83.A2" office:value-type="string">
            <text:p text:style-name="P29" loext:marker-style-name="T83"><text:span text:style-name="T182">google.com → mail.google.com</text:span><text:span text:style-name="T83"/></text:p>
          </table:table-cell>
        </table:table-row>
        <table:table-row table:style-name="表格83.1">
          <table:table-cell table:style-name="表格83.A3" office:value-type="string">
            <text:p text:style-name="P29" loext:marker-style-name="T93"><text:span text:style-name="T190">CNAME</text:span><text:span text:style-name="T93"/></text:p>
          </table:table-cell>
          <table:table-cell table:style-name="表格83.A3" office:value-type="string">
            <text:p text:style-name="P29" loext:marker-style-name="T98"><text:span text:style-name="T187">Canonical Name</text:span><text:span text:style-name="T98"/></text:p>
          </table:table-cell>
          <table:table-cell table:style-name="表格83.A3" office:value-type="string">
            <text:p text:style-name="P29" loext:marker-style-name="T708"><text:span text:style-name="T707">設定網域別名，指向另一個網域</text:span><text:span text:style-name="T708"/></text:p>
          </table:table-cell>
          <table:table-cell table:style-name="表格83.A3" office:value-type="string">
            <text:p text:style-name="P29" loext:marker-style-name="T83"><text:span text:style-name="T182">www → google.com</text:span><text:span text:style-name="T83"/></text:p>
          </table:table-cell>
        </table:table-row>
      </table:table>
      <text:p text:style-name="P35" loext:marker-style-name="T6"><text:span text:style-name="T7">（</text:span><text:span text:style-name="T8">補充：</text:span><text:span text:style-name="T17">AAAA record → </text:span><text:span text:style-name="T8">回傳 </text:span><text:span text:style-name="T17">IPv6 </text:span><text:span text:style-name="T8">位址，見第三篇 </text:span><text:span text:style-name="T17">Dual Stack</text:span><text:span text:style-name="T8">。</text:span><text:span text:style-name="T7">）</text:span></text:p>
      <text:h text:style-name="P11" text:outline-level="2" loext:marker-style-name="T27"><text:span text:style-name="T28">二、</text:span><text:span text:style-name="T27">DNS </text:span><text:span text:style-name="T28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6"><text:span text:style-name="T247">📚 <text:s/></text:span><text:span text:style-name="T52">圖書館找書比喻</text:span></text:p>
            <text:p text:style-name="P7" loext:marker-style-name="T107"><text:span text:style-name="T106">你要找一本書，書名叫「</text:span><text:span text:style-name="T194">google.com</text:span><text:span text:style-name="T106">」：</text:span></text:p>
            <text:p text:style-name="P8" loext:marker-style-name="T107"><text:span text:style-name="T194">① </text:span><text:span text:style-name="T106">先翻自己的筆記本（</text:span><text:span text:style-name="T194">Cache</text:span><text:span text:style-name="T106">）→ 記得放哪就直接去</text:span></text:p>
            <text:p text:style-name="P8" loext:marker-style-name="T107"><text:span text:style-name="T194">② </text:span><text:span text:style-name="T106">問圖書館員（</text:span><text:span text:style-name="T194">Local DNS</text:span><text:span text:style-name="T106">）→「你知道這本書嗎？」</text:span></text:p>
            <text:p text:style-name="P8" loext:marker-style-name="T107"><text:span text:style-name="T194">③ </text:span><text:span text:style-name="T106">館員問館長（</text:span><text:span text:style-name="T194">Root DNS</text:span><text:span text:style-name="T106">）→「這本是哪個分類？」→「外文區」</text:span></text:p>
            <text:p text:style-name="P8" loext:marker-style-name="T107"><text:span text:style-name="T194">④ </text:span><text:span text:style-name="T106">去外文區管理員（</text:span><text:span text:style-name="T194">TLD</text:span><text:span text:style-name="T106">：</text:span><text:span text:style-name="T194">.com</text:span><text:span text:style-name="T106">）→「</text:span><text:span text:style-name="T194">google </text:span><text:span text:style-name="T106">在哪個書架？」</text:span></text:p>
            <text:p text:style-name="P8" loext:marker-style-name="T107"><text:span text:style-name="T194">⑤ </text:span><text:span text:style-name="T106">書架管理員（</text:span><text:span text:style-name="T194">Authoritative DNS</text:span><text:span text:style-name="T106">）→ 直接給你確切位置（</text:span><text:span text:style-name="T194">IP</text:span><text:span text:style-name="T106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26" loext:marker-style-name="T75"><text:span text:style-name="T76">步驟</text:span><text:span text:style-name="T75"/></text:p>
          </table:table-cell>
          <table:table-cell table:style-name="表格84.A2" office:value-type="string">
            <text:p text:style-name="P26" loext:marker-style-name="T75"><text:span text:style-name="T76">層級</text:span><text:span text:style-name="T75"/></text:p>
          </table:table-cell>
          <table:table-cell table:style-name="表格84.A2" office:value-type="string">
            <text:p text:style-name="P26" loext:marker-style-name="T75"><text:span text:style-name="T76">說明</text:span><text:span text:style-name="T75"/></text:p>
          </table:table-cell>
        </table:table-row>
        <table:table-row table:style-name="表格84.1">
          <table:table-cell table:style-name="表格84.A3" office:value-type="string">
            <text:p text:style-name="P29" loext:marker-style-name="T147"><text:span text:style-name="T230">1</text:span><text:span text:style-name="T147"/></text:p>
          </table:table-cell>
          <table:table-cell table:style-name="表格84.A3" office:value-type="string">
            <text:p text:style-name="P29" loext:marker-style-name="T519"><text:span text:style-name="T518">本機快取（</text:span><text:span text:style-name="T559">Cache</text:span><text:span text:style-name="T518">）</text:span></text:p>
          </table:table-cell>
          <table:table-cell table:style-name="表格84.A3" office:value-type="string">
            <text:p text:style-name="P29" loext:marker-style-name="T679"><text:span text:style-name="T678">先檢查電腦或瀏覽器有無記住此網址的 </text:span><text:span text:style-name="T682">IP</text:span><text:span text:style-name="T678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9" loext:marker-style-name="T147"><text:span text:style-name="T230">2</text:span><text:span text:style-name="T147"/></text:p>
          </table:table-cell>
          <table:table-cell table:style-name="表格84.A4" office:value-type="string">
            <text:p text:style-name="P29" loext:marker-style-name="T329"><text:span text:style-name="T373">Local DNS </text:span><text:span text:style-name="T327">伺服器</text:span></text:p>
          </table:table-cell>
          <table:table-cell table:style-name="表格84.A4" office:value-type="string">
            <text:p text:style-name="P29" loext:marker-style-name="T147"><text:span text:style-name="T148">向 </text:span><text:span text:style-name="T238">ISP</text:span><text:span text:style-name="T169">（如中華電信）</text:span><text:span text:style-name="T148">或</text:span><text:span text:style-name="T169">自設 </text:span><text:span text:style-name="T238">DNS</text:span><text:span text:style-name="T169">（如 </text:span><text:span text:style-name="T238">8.8.8.8</text:span><text:span text:style-name="T169">）</text:span><text:span text:style-name="T148">查詢。</text:span></text:p>
          </table:table-cell>
        </table:table-row>
        <table:table-row table:style-name="表格84.1">
          <table:table-cell table:style-name="表格84.A3" office:value-type="string">
            <text:p text:style-name="P29" loext:marker-style-name="T147"><text:span text:style-name="T230">3</text:span><text:span text:style-name="T147"/></text:p>
          </table:table-cell>
          <table:table-cell table:style-name="表格84.A3" office:value-type="string">
            <text:p text:style-name="P29" loext:marker-style-name="T644"><text:span text:style-name="T657">Root DNS </text:span><text:span text:style-name="T643">伺服器</text:span></text:p>
          </table:table-cell>
          <table:table-cell table:style-name="表格84.A3" office:value-type="string">
            <text:p text:style-name="P29" loext:marker-style-name="T147"><text:span text:style-name="T603">全球共 </text:span><text:span text:style-name="T623">13 </text:span><text:span text:style-name="T603">組根 </text:span><text:span text:style-name="T623">DNS</text:span><text:span text:style-name="T148">。不知道答案，但</text:span><text:span text:style-name="T172">會指向對應的 </text:span><text:span text:style-name="T240">TLD DNS</text:span><text:span text:style-name="T148">。</text:span></text:p>
          </table:table-cell>
        </table:table-row>
        <table:table-row table:style-name="表格84.1">
          <table:table-cell table:style-name="表格84.A4" office:value-type="string">
            <text:p text:style-name="P29" loext:marker-style-name="T147"><text:span text:style-name="T230">4</text:span><text:span text:style-name="T147"/></text:p>
          </table:table-cell>
          <table:table-cell table:style-name="表格84.A4" office:value-type="string">
            <text:p text:style-name="P29" loext:marker-style-name="T440"><text:span text:style-name="T464">TLD DNS </text:span><text:span text:style-name="T438">伺服器</text:span></text:p>
          </table:table-cell>
          <table:table-cell table:style-name="表格84.A4" office:value-type="string">
            <text:p text:style-name="P29" loext:marker-style-name="T147"><text:span text:style-name="T148">負責</text:span><text:span text:style-name="T711">管理頂層網域（</text:span><text:span text:style-name="T716">.com</text:span><text:span text:style-name="T711">、</text:span><text:span text:style-name="T716">.tw</text:span><text:span text:style-name="T711">）</text:span><text:span text:style-name="T148">。</text:span><text:span text:style-name="T172">回應 </text:span><text:span text:style-name="T240">Authoritative DNS </text:span><text:span text:style-name="T172">的位置。</text:span><text:span text:style-name="T326">「</text:span><text:span text:style-name="T375">TLD </text:span><text:span text:style-name="T326">是 </text:span><text:span text:style-name="T375">Top-Level Domain</text:span><text:span text:style-name="T326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9" loext:marker-style-name="T147"><text:span text:style-name="T230">5</text:span><text:span text:style-name="T147"/></text:p>
          </table:table-cell>
          <table:table-cell table:style-name="表格84.A3" office:value-type="string">
            <text:p text:style-name="P29" loext:marker-style-name="T692"><text:span text:style-name="T697">Authoritative DNS</text:span><text:span text:style-name="T692"/></text:p>
          </table:table-cell>
          <table:table-cell table:style-name="表格84.A3" office:value-type="string">
            <text:p text:style-name="P29" loext:marker-style-name="T147"><text:span text:style-name="T169">真正儲存答案的伺服器</text:span><text:span text:style-name="T148">，直接回傳正確的 </text:span><text:span text:style-name="T230">IP </text:span><text:span text:style-name="T148">位址。</text:span></text:p>
          </table:table-cell>
        </table:table-row>
        <table:table-row table:style-name="表格84.1">
          <table:table-cell table:style-name="表格84.A4" office:value-type="string">
            <text:p text:style-name="P29" loext:marker-style-name="T147"><text:span text:style-name="T230">6</text:span><text:span text:style-name="T147"/></text:p>
          </table:table-cell>
          <table:table-cell table:style-name="表格84.A4" office:value-type="string">
            <text:p text:style-name="P29" loext:marker-style-name="T147"><text:span text:style-name="T148">回傳 </text:span><text:span text:style-name="T230">IP </text:span><text:span text:style-name="T148">位址 ✓</text:span></text:p>
          </table:table-cell>
          <table:table-cell table:style-name="表格84.A4" office:value-type="string">
            <text:p text:style-name="P29" loext:marker-style-name="T147"><text:span text:style-name="T148">瀏覽器取得 </text:span><text:span text:style-name="T230">IP </text:span><text:span text:style-name="T148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6"><text:span text:style-name="T247">📌 <text:s/></text:span><text:span text:style-name="T299">一句話總結</text:span></text:p>
            <text:p text:style-name="P7" loext:marker-style-name="T107"><text:span text:style-name="T194">DNS </text:span><text:span text:style-name="T106">解析為「由快取開始，經 </text:span><text:span text:style-name="T194">Local DNS</text:span><text:span text:style-name="T106">，逐層向 </text:span><text:span text:style-name="T194">Root</text:span><text:span text:style-name="T106">、</text:span><text:span text:style-name="T194">TLD</text:span><text:span text:style-name="T106">、</text:span><text:span text:style-name="T194">Authoritative DNS </text:span><text:span text:style-name="T106">查詢，最後取得 </text:span><text:span text:style-name="T194">IP </text:span><text:span text:style-name="T106">位址」。</text:span></text:p>
          </table:table-cell>
          <table:covered-table-cell/>
          <table:covered-table-cell/>
        </table:table-row>
      </table:table>
      <text:h text:style-name="P11" text:outline-level="2" loext:marker-style-name="T27"><text:soft-page-break/><text:span text:style-name="T28">三、</text:span><text:span text:style-name="T27">Recursive vs. Iterative</text:span><text:span text:style-name="T28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6"><text:span text:style-name="T247">⚠️ <text:s/></text:span><text:span text:style-name="T269">最關鍵的差別</text:span></text:p>
            <text:p text:style-name="P7" loext:marker-style-name="T107"><text:span text:style-name="T133">兩種方式的路徑相同</text:span><text:span text:style-name="T106">（</text:span><text:span text:style-name="T194">Cache → Local → Root → TLD → Auth</text:span><text:span text:style-name="T106">），</text:span><text:span text:style-name="T386">唯一差別只有一件事：「誰去問」</text:span><text:span text:style-name="T106">。</text:span></text:p>
            <text:p text:style-name="P8" loext:marker-style-name="T107"><text:span text:style-name="T194">→ </text:span><text:span text:style-name="T366">DNS </text:span><text:span text:style-name="T342">幫你問完 ＝ </text:span><text:span text:style-name="T366">Recursive</text:span><text:span text:style-name="T342">（遞迴）</text:span><text:span text:style-name="T106">；</text:span><text:span text:style-name="T452">你自己去問 ＝ </text:span><text:span text:style-name="T474">Iterative</text:span><text:span text:style-name="T452">（反覆）</text:span><text:span text:style-name="T106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4" loext:marker-style-name="T69"><text:span text:style-name="T70">比較項目</text:span><text:span text:style-name="T69"/></text:p>
          </table:table-cell>
          <table:table-cell table:style-name="表格85.A2" office:value-type="string">
            <text:p text:style-name="P4" loext:marker-style-name="T69"><text:span text:style-name="T79">Recursive</text:span><text:span text:style-name="T70">（遞迴）</text:span></text:p>
          </table:table-cell>
          <table:table-cell table:style-name="表格85.A2" office:value-type="string">
            <text:p text:style-name="P4" loext:marker-style-name="T69"><text:span text:style-name="T79">Iterative</text:span><text:span text:style-name="T70">（反覆）</text:span></text:p>
          </table:table-cell>
        </table:table-row>
        <table:table-row table:style-name="表格85.1">
          <table:table-cell table:style-name="表格85.A3" office:value-type="string">
            <text:p text:style-name="P29" loext:marker-style-name="T83"><text:span text:style-name="T84">誰去問</text:span><text:span text:style-name="T83"/></text:p>
          </table:table-cell>
          <table:table-cell table:style-name="表格85.A3" office:value-type="string">
            <text:p text:style-name="P29" loext:marker-style-name="T98"><text:span text:style-name="T187">DNS </text:span><text:span text:style-name="T96">伺服器代替你問完</text:span></text:p>
          </table:table-cell>
          <table:table-cell table:style-name="表格85.A3" office:value-type="string">
            <text:p text:style-name="P29" loext:marker-style-name="T93"><text:span text:style-name="T92">你自己逐層查詢</text:span><text:span text:style-name="T93"/></text:p>
          </table:table-cell>
        </table:table-row>
        <table:table-row table:style-name="表格85.1">
          <table:table-cell table:style-name="表格85.A4" office:value-type="string">
            <text:p text:style-name="P29" loext:marker-style-name="T83"><text:span text:style-name="T84">問幾次</text:span><text:span text:style-name="T83"/></text:p>
          </table:table-cell>
          <table:table-cell table:style-name="表格85.A4" office:value-type="string">
            <text:p text:style-name="P29" loext:marker-style-name="T98"><text:span text:style-name="T96">你只問 </text:span><text:span text:style-name="T187">1 </text:span><text:span text:style-name="T96">次</text:span></text:p>
          </table:table-cell>
          <table:table-cell table:style-name="表格85.A4" office:value-type="string">
            <text:p text:style-name="P29" loext:marker-style-name="T93"><text:span text:style-name="T92">每層各問一次，共多次</text:span><text:span text:style-name="T93"/></text:p>
          </table:table-cell>
        </table:table-row>
        <table:table-row table:style-name="表格85.1">
          <table:table-cell table:style-name="表格85.A3" office:value-type="string">
            <text:p text:style-name="P29" loext:marker-style-name="T83"><text:span text:style-name="T84">常見場合</text:span><text:span text:style-name="T83"/></text:p>
          </table:table-cell>
          <table:table-cell table:style-name="表格85.A3" office:value-type="string">
            <text:p text:style-name="P29" loext:marker-style-name="T83"><text:span text:style-name="T84">一般使用者 → </text:span><text:span text:style-name="T182">Local DNS</text:span></text:p>
          </table:table-cell>
          <table:table-cell table:style-name="表格85.A3" office:value-type="string">
            <text:p text:style-name="P29" loext:marker-style-name="T83"><text:span text:style-name="T182">DNS </text:span><text:span text:style-name="T84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9" loext:marker-style-name="T83"><text:span text:style-name="T84">記憶口訣</text:span><text:span text:style-name="T83"/></text:p>
          </table:table-cell>
          <table:table-cell table:style-name="表格85.A4" office:value-type="string">
            <text:p text:style-name="P29" loext:marker-style-name="T257"><text:span text:style-name="T258">代查到底</text:span><text:span text:style-name="T257"/></text:p>
          </table:table-cell>
          <table:table-cell table:style-name="表格85.A4" office:value-type="string">
            <text:p text:style-name="P29" loext:marker-style-name="T35"><text:span text:style-name="T36">逐層詢問</text:span><text:span text:style-name="T35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6"><text:span text:style-name="T247">🗣️ <text:s/></text:span><text:span text:style-name="T52">問路比喻</text:span></text:p>
            <text:p text:style-name="P7"><text:span text:style-name="T66">Recursive</text:span><text:span text:style-name="T58">（朋友幫你問完）</text:span><text:span text:style-name="T57">：</text:span><text:span text:style-name="T131">你只問朋友（</text:span><text:span text:style-name="T215">Local DNS</text:span><text:span text:style-name="T131">）一次</text:span><text:span text:style-name="T106">「台北</text:span><text:span text:style-name="T194">101</text:span><text:span text:style-name="T106">在哪？」朋友自己跑完 </text:span><text:span text:style-name="T194">Root→TLD→Auth</text:span><text:span text:style-name="T106">，回你 </text:span><text:span text:style-name="T194">IP</text:span><text:span text:style-name="T106">，你沒動過。</text:span></text:p>
            <text:p text:style-name="P8"><text:span text:style-name="T66">Iterative</text:span><text:span text:style-name="T58">（你自己跑全程）</text:span><text:span text:style-name="T57">：</text:span><text:span text:style-name="T106">你問 </text:span><text:span text:style-name="T194">Root</text:span><text:span text:style-name="T106">「我不知道，去問 </text:span><text:span text:style-name="T194">TLD</text:span><text:span text:style-name="T106">」→ 你問 </text:span><text:span text:style-name="T194">TLD</text:span><text:span text:style-name="T106">「去問 </text:span><text:span text:style-name="T194">Auth</text:span><text:span text:style-name="T106">」→ 你問 </text:span><text:span text:style-name="T194">Auth </text:span><text:span text:style-name="T106">拿到 </text:span><text:span text:style-name="T194">IP</text:span><text:span text:style-name="T106">，全程你自己跑。</text:span></text:p>
            <text:p text:style-name="P8"><text:span text:style-name="T24">為什麼有兩種？</text:span><text:span text:style-name="T344">一般使用者採 </text:span><text:span text:style-name="T368">Recursive</text:span><text:span text:style-name="T344">（簡單方便）</text:span><text:span text:style-name="T106">；</text:span><text:span text:style-name="T476">DNS </text:span><text:span text:style-name="T454">伺服器之間採 </text:span><text:span text:style-name="T476">Iterative</text:span><text:span text:style-name="T106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Open Resolver </text:span><text:span text:style-name="T28">風險</text:span></text:h>
      <text:p text:style-name="P35" loext:marker-style-name="T107"><text:span text:style-name="T217">Open Resolver </text:span><text:span text:style-name="T106">是</text:span><text:span text:style-name="T677">對外完全開放、任何人都可以使用的 </text:span><text:span text:style-name="T681">DNS </text:span><text:span text:style-name="T677">伺服器</text:span><text:span text:style-name="T106">；因為</text:span><text:span text:style-name="T131">沒有存取限制，容易成為攻擊目標</text:span><text:span text:style-name="T106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26" loext:marker-style-name="T69"><text:span text:style-name="T79">⚠️ Cache Poisoning</text:span><text:span text:style-name="T70">（快取污染）</text:span></text:p>
            </table:table-cell>
            <table:table-cell table:style-name="表格86.A1" office:value-type="string">
              <text:p text:style-name="P26" loext:marker-style-name="T69"><text:span text:style-name="T79">⚡ DDoS </text:span><text:span text:style-name="T70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9" loext:marker-style-name="T83"><text:span text:style-name="T533">攻擊者偽造 </text:span><text:span text:style-name="T551">DNS </text:span><text:span text:style-name="T533">回應</text:span><text:span text:style-name="T84">，</text:span><text:span text:style-name="T380">將惡意 </text:span><text:span text:style-name="T393">IP </text:span><text:span text:style-name="T380">植入 </text:span><text:span text:style-name="T393">DNS </text:span><text:span text:style-name="T380">快取，使用者被引導至釣魚網站</text:span><text:span text:style-name="T84">。流程：偽造回應 → </text:span><text:span text:style-name="T182">DNS </text:span><text:span text:style-name="T84">存假 </text:span><text:span text:style-name="T182">IP → </text:span><text:span text:style-name="T84">用戶連到釣魚網站。</text:span></text:p>
          </table:table-cell>
          <table:table-cell table:style-name="表格86.A2" office:value-type="string">
            <text:p text:style-name="P29" loext:marker-style-name="T83"><text:span text:style-name="T598">攻擊者偽造受害者 </text:span><text:span text:style-name="T620">IP </text:span><text:span text:style-name="T403">發送查詢</text:span><text:span text:style-name="T84">，</text:span><text:span text:style-name="T393">DNS </text:span><text:span text:style-name="T380">回傳大量資料給受害者，形成流量放大效果</text:span><text:span text:style-name="T84">。流程：小封包 → </text:span><text:span text:style-name="T182">DNS </text:span><text:span text:style-name="T84">回超大資料 → 灌爆受害者。</text:span></text:p>
          </table:table-cell>
        </table:table-row>
      </table:table>
      <text:h text:style-name="P11" text:outline-level="2" loext:marker-style-name="T27"><text:span text:style-name="T28">五、</text:span><text:span text:style-name="T27">DNSSEC — DNS </text:span><text:span text:style-name="T28">安全機制</text:span></text:h>
      <text:p text:style-name="P35" loext:marker-style-name="T107"><text:span text:style-name="T194">DNSSEC</text:span><text:span text:style-name="T106">（</text:span><text:span text:style-name="T194">DNS Security Extensions</text:span><text:span text:style-name="T106">）透過</text:span><text:span text:style-name="T542">數位簽章機制</text:span><text:span text:style-name="T106">，</text:span><text:span text:style-name="T488">讓接收方能驗證 </text:span><text:span text:style-name="T500">DNS </text:span><text:span text:style-name="T488">回應的真實性與完整性</text:span><text:span text:style-name="T106">，</text:span><text:span text:style-name="T133">防止資料被偽造或篡改</text:span><text:span text:style-name="T106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26" loext:marker-style-name="T69"><text:span text:style-name="T79">✅ DNSSEC </text:span><text:span text:style-name="T70">可以防禦</text:span></text:p>
            </table:table-cell>
            <table:table-cell table:style-name="表格87.A1" office:value-type="string">
              <text:p text:style-name="P26" loext:marker-style-name="T69"><text:span text:style-name="T79">❌ DNSSEC </text:span><text:span text:style-name="T70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9" loext:marker-style-name="T83"><text:span text:style-name="T84">防止 </text:span><text:span text:style-name="T182">DNS Spoofing</text:span><text:span text:style-name="T84">（假回應）／防止 </text:span><text:span text:style-name="T182">Cache Poisoning</text:span><text:span text:style-name="T84">（快取污染）／</text:span><text:span text:style-name="T534">驗證資料完整性與來源真實性</text:span></text:p>
          </table:table-cell>
          <table:table-cell table:style-name="表格87.A2" office:value-type="string">
            <text:p text:style-name="P29" loext:marker-style-name="T83"><text:span text:style-name="T84">不提供加密功能（非 </text:span><text:span text:style-name="T182">HTTPS</text:span><text:span text:style-name="T84">）／</text:span><text:span text:style-name="T325">無法防禦 </text:span><text:span text:style-name="T357">DoS / DDoS </text:span><text:span text:style-name="T325">攻擊</text:span><text:span text:style-name="T84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6"><text:span text:style-name="T247">⚠️ <text:s/></text:span><text:span text:style-name="T299">最重要的一句話</text:span></text:p>
            <text:p text:style-name="P7" loext:marker-style-name="T304"><text:span text:style-name="T308">DNSSEC</text:span><text:span text:style-name="T307"> = </text:span><text:span text:style-name="T305">驗證真偽，不是加密，不防 </text:span><text:span text:style-name="T310">DDoS</text:span></text:p>
          </table:table-cell>
          <table:covered-table-cell/>
        </table:table-row>
      </table:table>
      <text:h text:style-name="P11" text:outline-level="2" loext:marker-style-name="T27"><text:span text:style-name="T28">六、</text:span><text:span text:style-name="T27">DNS </text:span><text:span text:style-name="T28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6"><text:span text:style-name="T247">🔍 <text:s/></text:span><text:span text:style-name="T52">診斷結論</text:span></text:p>
            <text:p text:style-name="P7" loext:marker-style-name="T107"><text:span text:style-name="T106">能用 </text:span><text:span text:style-name="T194">IP </text:span><text:span text:style-name="T106">連線（</text:span><text:span text:style-name="T194">ping 142.250.1.1 </text:span><text:span text:style-name="T106">成功），但無法用網域名稱連線（</text:span><text:span text:style-name="T194">ping google.com </text:span><text:span text:style-name="T106">失敗）→ </text:span><text:span text:style-name="T194">DNS </text:span><text:span text:style-name="T106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6"><text:span text:style-name="T247">📝 <text:s/></text:span><text:span text:style-name="T289">申論題標準答案</text:span></text:p>
            <text:p text:style-name="P7"><text:span text:style-name="T290">一、</text:span><text:span text:style-name="T294">DNS </text:span><text:span text:style-name="T290">功能：</text:span><text:span text:style-name="T194">DNS </text:span><text:span text:style-name="T106">為網際網路中負責</text:span><text:span text:style-name="T340">將網域名稱轉換為 </text:span><text:span text:style-name="T364">IP </text:span><text:span text:style-name="T340">位址</text:span><text:span text:style-name="T106">的分散式系統。</text:span></text:p>
            <text:p text:style-name="P8"><text:span text:style-name="T290">二、查詢流程：</text:span><text:span text:style-name="T106">由</text:span><text:span text:style-name="T133">快取</text:span><text:span text:style-name="T106">開始，依序向 </text:span><text:span text:style-name="T217">Local DNS</text:span><text:span text:style-name="T106">、</text:span><text:span text:style-name="T217">Root DNS</text:span><text:span text:style-name="T106">、</text:span><text:span text:style-name="T217">TLD DNS</text:span><text:span text:style-name="T106">、</text:span><text:span text:style-name="T217">Authoritative DN</text:span><text:span text:style-name="T194">S </text:span><text:span text:style-name="T106">查詢，最終取得 </text:span><text:span text:style-name="T194">IP </text:span><text:span text:style-name="T106">位址。</text:span></text:p>
            <text:p text:style-name="P8"><text:span text:style-name="T290">三、</text:span><text:span text:style-name="T294">Recursive</text:span><text:span text:style-name="T290">：</text:span><text:span text:style-name="T106">由 </text:span><text:span text:style-name="T194">DNS </text:span><text:span text:style-name="T106">伺服器代替用戶端完整查詢並直接回傳最終 </text:span><text:span text:style-name="T194">IP</text:span><text:span text:style-name="T106">，用戶端只需等待結果。</text:span></text:p>
            <text:p text:style-name="P8"><text:span text:style-name="T290">四、</text:span><text:span text:style-name="T294">Iterative</text:span><text:span text:style-name="T290">：</text:span><text:span text:style-name="T194">DNS </text:span><text:span text:style-name="T106">伺服器僅回應下一步查詢位置，由用戶端自行逐層向各 </text:span><text:span text:style-name="T194">DNS </text:span><text:span text:style-name="T106">查詢，直到取得 </text:span><text:span text:style-name="T194">IP</text:span><text:span text:style-name="T106">。</text:span></text:p>
            <text:p text:style-name="P8"><text:span text:style-name="T290">五、</text:span><text:span text:style-name="T294">DNSSEC</text:span><text:span text:style-name="T290">：</text:span><text:span text:style-name="T106">透過</text:span><text:span text:style-name="T133">數位簽章</text:span><text:span text:style-name="T719">驗證 </text:span><text:span text:style-name="T720">DNS </text:span><text:span text:style-name="T719">回應真實性</text:span><text:span text:style-name="T106">，可防 </text:span><text:span text:style-name="T194">DNS Spoofing </text:span><text:span text:style-name="T106">及 </text:span><text:span text:style-name="T194">Cache Poisoning</text:span><text:span text:style-name="T106">，但不提供加密，也</text:span><text:span text:style-name="T346">無法防禦 </text:span><text:span text:style-name="T369">DDoS</text:span><text:span text:style-name="T106">。</text:span></text:p>
          </table:table-cell>
        </table:table-row>
      </table:table>
      <text:h text:style-name="P17" text:outline-level="1" loext:marker-style-name="T71"><text:span text:style-name="T72">第 七 篇　路由協定：</text:span><text:span text:style-name="T71">OSPF </text:span><text:span text:style-name="T72">與 </text:span><text:span text:style-name="T71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6"><text:span text:style-name="T247">🗺️ <text:s/></text:span><text:span text:style-name="T52">在解決什麼問題？</text:span></text:p>
            <text:p text:style-name="P7" loext:marker-style-name="T107"><text:span text:style-name="T106">網路上有無數個</text:span><text:span text:style-name="T133">路由器（</text:span><text:span text:style-name="T217">Router</text:span><text:span text:style-name="T133">）</text:span><text:span text:style-name="T106">，它們只有一個任務：「</text:span><text:span text:style-name="T336">資料要走哪條路才能抵達目的地？</text:span><text:span text:style-name="T106">」</text:span><text:span text:style-name="T386">它們需要一套共通的對話規則，這就是路由協定</text:span><text:span text:style-name="T106">。</text:span></text:p>
          </table:table-cell>
        </table:table-row>
      </table:table>
      <text:h text:style-name="P11" text:outline-level="2" loext:marker-style-name="T27"><text:span text:style-name="T28">一、路由協定兩大分類：</text:span><text:span text:style-name="T30">IGP</text:span><text:span text:style-name="T27"> vs </text:span><text:span text:style-name="T30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26" loext:marker-style-name="T69"><text:span text:style-name="T79">🏢 IGP — </text:span><text:span text:style-name="T70">內部用</text:span></text:p>
            </table:table-cell>
            <table:table-cell table:style-name="表格90.A1" office:value-type="string">
              <text:p text:style-name="P26" loext:marker-style-name="T69"><text:span text:style-name="T79">🌍 EGP — </text:span><text:span text:style-name="T70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9" loext:marker-style-name="T83"><text:span text:style-name="T187">Interior Gateway Protocol</text:span><text:span text:style-name="T84">，在</text:span><text:span text:style-name="T433">同一個組織內部使用</text:span><text:span text:style-name="T84">（公司內網、校園網路）。常見：</text:span><text:span text:style-name="T182">OSPF</text:span><text:span text:style-name="T84">（最主流）、</text:span><text:span text:style-name="T182">RIP</text:span><text:span text:style-name="T84">（較舊）。</text:span></text:p>
          </table:table-cell>
          <table:table-cell table:style-name="表格90.A2" office:value-type="string">
            <text:p text:style-name="P29" loext:marker-style-name="T83"><text:span text:style-name="T187">Exterior Gateway Protocol</text:span><text:span text:style-name="T84">，</text:span><text:span text:style-name="T325">在不同組織之間使用</text:span><text:span text:style-name="T84">（中華電信 ↔ </text:span><text:span text:style-name="T182">Google</text:span><text:span text:style-name="T84">、</text:span><text:span text:style-name="T182">ISP ↔ ISP</text:span><text:span text:style-name="T84">）。目前唯一在用：</text:span><text:span text:style-name="T182">BGP</text:span><text:span text:style-name="T84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6"><text:span text:style-name="T247">⚡ <text:s/></text:span><text:span text:style-name="T251">一句話記憶法</text:span></text:p>
            <text:p text:style-name="P7" loext:marker-style-name="T107"><text:span text:style-name="T588">公司／校園內 → 用 </text:span><text:span text:style-name="T612">IGP</text:span><text:span text:style-name="T106">（</text:span><text:span text:style-name="T358">OSPF</text:span><text:span text:style-name="T194"> </text:span><text:span text:style-name="T106">或 </text:span><text:span text:style-name="T194">RIP</text:span><text:span text:style-name="T106">）；</text:span><text:span text:style-name="T589">公司與公司間 → 用 </text:span><text:span text:style-name="T613">EGP</text:span><text:span text:style-name="T106">（</text:span><text:span text:style-name="T358">BGP</text:span><text:span text:style-name="T106">）。</text:span></text:p>
          </table:table-cell>
          <table:covered-table-cell/>
        </table:table-row>
      </table:table>
      <text:h text:style-name="P11" text:outline-level="2" loext:marker-style-name="T27"><text:span text:style-name="T28">二、</text:span><text:span text:style-name="T27">OSPF </text:span><text:span text:style-name="T28">的核心概念</text:span></text:h>
      <text:p text:style-name="P35" loext:marker-style-name="T107"><text:span text:style-name="T358">OSPF</text:span><text:span text:style-name="T336">（</text:span><text:span text:style-name="T358">Open Shortest Path First</text:span><text:span text:style-name="T336">）</text:span><text:span text:style-name="T106">是 </text:span><text:span text:style-name="T217">IGP </text:span><text:span text:style-name="T133">裡最主流的協定</text:span><text:span text:style-name="T106">，最大特色是</text:span><text:span text:style-name="T543">把網路切成多個區域（</text:span><text:span text:style-name="T558">Area</text:span><text:span text:style-name="T543">）管理</text:span><text:span text:style-name="T106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6"><text:span text:style-name="T247">📌 <text:s/></text:span><text:span text:style-name="T299">最重要的規定</text:span></text:p>
            <text:p text:style-name="P7" loext:marker-style-name="T107"><text:span text:style-name="T454">所有 </text:span><text:span text:style-name="T476">Area </text:span><text:span text:style-name="T454">都必須連到 </text:span><text:span text:style-name="T476">Area 0</text:span><text:span text:style-name="T454">（骨幹區域）</text:span><text:span text:style-name="T106">。</text:span><text:span text:style-name="T614">Area 0 </text:span><text:span text:style-name="T590">就像高速公路主幹道，其他 </text:span><text:span text:style-name="T614">Area </text:span><text:span text:style-name="T590">是交流道</text:span><text:span text:style-name="T106">。</text:span></text:p>
          </table:table-cell>
        </table:table-row>
      </table:table>
      <text:h text:style-name="P11" text:outline-level="2" loext:marker-style-name="T27"><text:span text:style-name="T28">三、</text:span><text:span text:style-name="T27">OSPF </text:span><text:span text:style-name="T28">的 </text:span><text:span text:style-name="T27">4 </text:span><text:span text:style-name="T28">種 </text:span><text:span text:style-name="T27">Router</text:span><text:span text:style-name="T28">（重點！）</text:span></text:h>
      <text:p text:style-name="P35" loext:marker-style-name="T107"><text:span text:style-name="T106">把整個 </text:span><text:span text:style-name="T194">OSPF </text:span><text:span text:style-name="T106">網路想像成一座城市：</text:span><text:span text:style-name="T133">城市裡有很多「區（</text:span><text:span text:style-name="T217">Area</text:span><text:span text:style-name="T133">）」像大樓</text:span><text:span text:style-name="T106">；</text:span><text:span text:style-name="T721">中間一定有「主幹道」就是 </text:span><text:span text:style-name="T722">Area 0</text:span><text:span text:style-name="T721">；所有大樓要互通都必須先連到 </text:span><text:span text:style-name="T722">Area 0</text:span><text:span text:style-name="T106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" loext:marker-style-name="T75"><text:span text:style-name="T76">類型</text:span><text:span text:style-name="T75"/></text:p>
            </table:table-cell>
            <table:table-cell table:style-name="表格92.A1" office:value-type="string">
              <text:p text:style-name="P4" loext:marker-style-name="T75"><text:span text:style-name="T76">本質</text:span><text:span text:style-name="T75"/></text:p>
            </table:table-cell>
            <table:table-cell table:style-name="表格92.A1" office:value-type="string">
              <text:p text:style-name="P4" loext:marker-style-name="T75"><text:span text:style-name="T76">核心記憶點</text:span><text:span text:style-name="T75"/></text:p>
            </table:table-cell>
            <table:table-cell table:style-name="表格92.A1" office:value-type="string">
              <text:p text:style-name="P4" loext:marker-style-name="T75"><text:span text:style-name="T76">比喻</text:span><text:span text:style-name="T75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9" loext:marker-style-name="T147"><text:span text:style-name="T230">① Internal</text:span><text:span text:style-name="T147"/></text:p>
          </table:table-cell>
          <table:table-cell table:style-name="表格92.A2" office:value-type="string">
            <text:p text:style-name="P29" loext:marker-style-name="T147"><text:span text:style-name="T148">不出 </text:span><text:span text:style-name="T230">Area</text:span></text:p>
          </table:table-cell>
          <table:table-cell table:style-name="表格92.A2" office:value-type="string">
            <text:p text:style-name="P29" loext:marker-style-name="T147"><text:span text:style-name="T148">只在同一個 </text:span><text:span text:style-name="T230">Area </text:span><text:span text:style-name="T148">裡活動，對外一無所知</text:span></text:p>
          </table:table-cell>
          <table:table-cell table:style-name="表格92.A2" office:value-type="string">
            <text:p text:style-name="P29" loext:marker-style-name="T147"><text:span text:style-name="T148">只在一個辦公室活動的員工</text:span><text:span text:style-name="T147"/></text:p>
          </table:table-cell>
        </table:table-row>
        <table:table-row table:style-name="表格92.1">
          <table:table-cell table:style-name="表格92.A3" office:value-type="string">
            <text:p text:style-name="P29" loext:marker-style-name="T147"><text:span text:style-name="T230">② </text:span><text:span text:style-name="T723">Backbone</text:span></text:p>
          </table:table-cell>
          <table:table-cell table:style-name="表格92.A3" office:value-type="string">
            <text:p text:style-name="P29" loext:marker-style-name="T724"><text:span text:style-name="T725">在 </text:span><text:span text:style-name="T723">Area 0</text:span></text:p>
          </table:table-cell>
          <table:table-cell table:style-name="表格92.A3" office:value-type="string">
            <text:p text:style-name="P29" loext:marker-style-name="T147"><text:span text:style-name="T725">核心骨幹節點</text:span><text:span text:style-name="T148">，所有跨區流量都經過這裡</text:span></text:p>
          </table:table-cell>
          <table:table-cell table:style-name="表格92.A3" office:value-type="string">
            <text:p text:style-name="P29" loext:marker-style-name="T522"><text:span text:style-name="T523">高速公路主幹上的節點</text:span><text:span text:style-name="T522"/></text:p>
          </table:table-cell>
        </table:table-row>
        <table:table-row table:style-name="表格92.1">
          <table:table-cell table:style-name="表格92.A2" office:value-type="string">
            <text:p text:style-name="P29" loext:marker-style-name="T147"><text:span text:style-name="T230">③ </text:span><text:span text:style-name="T624">ABR</text:span></text:p>
          </table:table-cell>
          <table:table-cell table:style-name="表格92.A2" office:value-type="string">
            <text:p text:style-name="P29" loext:marker-style-name="T604"><text:span text:style-name="T605">跨 </text:span><text:span text:style-name="T624">Area </text:span><text:span text:style-name="T605">橋樑</text:span></text:p>
          </table:table-cell>
          <table:table-cell table:style-name="表格92.A2" office:value-type="string">
            <text:p text:style-name="P29" loext:marker-style-name="T604"><text:span text:style-name="T605">同時連 </text:span><text:span text:style-name="T624">Area 0 </text:span><text:span text:style-name="T605">與其他 </text:span><text:span text:style-name="T624">Area</text:span><text:span text:style-name="T605">，是區域間唯一合法的橋</text:span></text:p>
          </table:table-cell>
          <table:table-cell table:style-name="表格92.A2" office:value-type="string">
            <text:p text:style-name="P29" loext:marker-style-name="T384"><text:span text:style-name="T382">不同部門之間的聯絡窗口</text:span><text:span text:style-name="T384"/></text:p>
          </table:table-cell>
        </table:table-row>
        <table:table-row table:style-name="表格92.1">
          <table:table-cell table:style-name="表格92.A3" office:value-type="string">
            <text:p text:style-name="P29" loext:marker-style-name="T147"><text:span text:style-name="T230">④ </text:span><text:span text:style-name="T464">ASBR</text:span></text:p>
          </table:table-cell>
          <table:table-cell table:style-name="表格92.A3" office:value-type="string">
            <text:p text:style-name="P29" loext:marker-style-name="T147"><text:span text:style-name="T148">跨 </text:span><text:span text:style-name="T230">AS </text:span><text:span text:style-name="T148">入口</text:span></text:p>
          </table:table-cell>
          <table:table-cell table:style-name="表格92.A3" office:value-type="string">
            <text:p text:style-name="P29" loext:marker-style-name="T147"><text:span text:style-name="T148">把外部路由（</text:span><text:span text:style-name="T230">BGP/</text:span><text:span text:style-name="T148">靜態）引入 </text:span><text:span text:style-name="T230">OSPF</text:span><text:span text:style-name="T148">，</text:span><text:span text:style-name="T326">是對外入口</text:span></text:p>
          </table:table-cell>
          <table:table-cell table:style-name="表格92.A3" office:value-type="string">
            <text:p text:style-name="P29" loext:marker-style-name="T147"><text:span text:style-name="T148">公司對外的大門警衛室</text:span><text:span text:style-name="T147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6"><text:span text:style-name="T247">⚠️ <text:s/></text:span><text:span text:style-name="T269">考試最愛考的三個陷阱</text:span></text:p>
            <text:p text:style-name="P7"><text:span text:style-name="T286">✗ ABR </text:span><text:span text:style-name="T279">負責連接外部網路　→　</text:span><text:span text:style-name="T106">✓</text:span><text:span text:style-name="T131"> </text:span><text:span text:style-name="T215">ABR </text:span><text:span text:style-name="T131">只負責 </text:span><text:span text:style-name="T215">Area </text:span><text:span text:style-name="T131">之間的橋樑</text:span><text:span text:style-name="T106">，對外是 </text:span><text:span text:style-name="T194">ASBR </text:span><text:span text:style-name="T106">的工作。</text:span></text:p>
            <text:p text:style-name="P8"><text:span text:style-name="T286">✗ ASBR </text:span><text:span text:style-name="T279">是用來跨越不同 </text:span><text:span text:style-name="T286">Area</text:span><text:span text:style-name="T279">　→　</text:span><text:span text:style-name="T106">✓ </text:span><text:span text:style-name="T215">ASBR </text:span><text:span text:style-name="T131">是跨越不同 </text:span><text:span text:style-name="T215">AS</text:span><text:span text:style-name="T131">（整個系統）</text:span><text:span text:style-name="T106">，不是跨 </text:span><text:span text:style-name="T194">Area</text:span><text:span text:style-name="T106">。</text:span></text:p>
            <text:p text:style-name="P8"><text:span text:style-name="T286">✗ </text:span><text:span text:style-name="T279">任意兩個 </text:span><text:span text:style-name="T286">Area </text:span><text:span text:style-name="T279">可直接相連　→　</text:span><text:span text:style-name="T106">✓ </text:span><text:span text:style-name="T386">所有 </text:span><text:span text:style-name="T398">Area </text:span><text:span text:style-name="T386">一定要透過 </text:span><text:span text:style-name="T398">Area 0 </text:span><text:span text:style-name="T386">才能互通，不能繞過</text:span><text:span text:style-name="T106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AS-PATH </text:span><text:span text:style-name="T28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26" loext:marker-style-name="T69"><text:span text:style-name="T79">📦 Route</text:span><text:span text:style-name="T70">（路由）</text:span></text:p>
            </table:table-cell>
            <table:table-cell table:style-name="表格93.A1" office:value-type="string">
              <text:p text:style-name="P26" loext:marker-style-name="T69"><text:span text:style-name="T79">📜 AS-PATH</text:span><text:span text:style-name="T69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9" loext:marker-style-name="T83"><text:span text:style-name="T84">回答「封包下一步要丟給誰？」。這是路由器最後做出</text:span><text:soft-page-break/><text:span text:style-name="T84">的轉送決定，對應到一個 </text:span><text:span text:style-name="T182">Next-Hop</text:span><text:span text:style-name="T84">（下一跳）。</text:span></text:p>
          </table:table-cell>
          <table:table-cell table:style-name="表格93.A2" office:value-type="string">
            <text:p text:style-name="P29" loext:marker-style-name="T83"><text:span text:style-name="T84">回答「這條路由消息一路經過了哪些 </text:span><text:span text:style-name="T182">AS</text:span><text:span text:style-name="T84">（自治系統）？」。它是一串 </text:span><text:span text:style-name="T182">AS </text:span><text:span text:style-name="T84">編號名單，也是 </text:span><text:span text:style-name="T352">BGP</text:span><text:span text:style-name="T182"> </text:span><text:span text:style-name="T84">用來判</text:span><text:soft-page-break/><text:span text:style-name="T84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9" loext:marker-style-name="T83"><text:span text:style-name="T84">是</text:span><text:span text:style-name="T433">「實際的轉送動作」——封包真的會照它走</text:span><text:span text:style-name="T84">。</text:span></text:p>
          </table:table-cell>
          <table:table-cell table:style-name="表格93.A2" office:value-type="string">
            <text:p text:style-name="P29" loext:marker-style-name="T83"><text:span text:style-name="T84">是</text:span><text:span text:style-name="T599">「這條路的來歷（履歷）」——封包根本看不到它</text:span><text:span text:style-name="T84">，</text:span><text:span text:style-name="T378">它只給 </text:span><text:span text:style-name="T391">BGP </text:span><text:span text:style-name="T378">參考</text:span><text:span text:style-name="T84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6"><text:span text:style-name="T247">🔎 <text:s/></text:span><text:span text:style-name="T52">看一個例子：兩條路由二選一</text:span></text:p>
            <text:p text:style-name="P7" loext:marker-style-name="T107"><text:span text:style-name="T215">Google </text:span><text:span text:style-name="T131">同時收到兩條到 </text:span><text:span text:style-name="T215">1.1.1.0/24 </text:span><text:span text:style-name="T131">的路由廣告</text:span><text:span text:style-name="T106">：</text:span><text:span text:style-name="T217">ISP A </text:span><text:span text:style-name="T133">的 </text:span><text:span text:style-name="T217">AS-PATH </text:span><text:span text:style-name="T133">是「</text:span><text:span text:style-name="T217">100 200 300</text:span><text:span text:style-name="T133">」（經過 </text:span><text:span text:style-name="T217">3 </text:span><text:span text:style-name="T133">個 </text:span><text:span text:style-name="T217">AS</text:span><text:span text:style-name="T133">）</text:span><text:span text:style-name="T106">，</text:span><text:span text:style-name="T217">ISP B </text:span><text:span text:style-name="T133">的 </text:span><text:span text:style-name="T217">AS-PATH </text:span><text:span text:style-name="T133">是「</text:span><text:span text:style-name="T217">400 300</text:span><text:span text:style-name="T133">」（只經過 </text:span><text:span text:style-name="T217">2 </text:span><text:span text:style-name="T133">個 </text:span><text:span text:style-name="T217">AS</text:span><text:span text:style-name="T133">）</text:span><text:span text:style-name="T106">。</text:span></text:p>
            <text:p text:style-name="P8"><text:span text:style-name="T130">在其他條件都相同時 →</text:span><text:span text:style-name="T336"> </text:span><text:span text:style-name="T358">BGP </text:span><text:span text:style-name="T336">會偏好較短的「</text:span><text:span text:style-name="T358">400 300</text:span><text:span text:style-name="T336">」</text:span><text:span text:style-name="T106">。</text:span></text:p>
            <text:p text:style-name="P8" loext:marker-style-name="T107"><text:span text:style-name="T106">小提醒：</text:span><text:span text:style-name="T398">AS-PATH </text:span><text:span text:style-name="T386">要從右邊讀起，最右邊的「</text:span><text:span text:style-name="T398">300</text:span><text:span text:style-name="T386">」才是這條路由的發源地（</text:span><text:span text:style-name="T398">Origin AS</text:span><text:span text:style-name="T386">）</text:span><text:span text:style-name="T106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6"><text:span text:style-name="T244">❁</text:span><text:span text:style-name="T106">假設你收到兩條路由：</text:span><text:span text:style-name="T199"><text:line-break/>Route A: AS-PATH = 100 200 300<text:line-break/>Route B: AS-PATH = 400 300<text:line-break/><text:line-break/></text:span><text:span text:style-name="T106">你先不要管 </text:span><text:span text:style-name="T199">Route </text:span><text:span text:style-name="T106">是什麼。</text:span><text:span text:style-name="T199"><text:line-break/><text:line-break/></text:span><text:span text:style-name="T106">只看 </text:span><text:span text:style-name="T199">AS-PATH</text:span><text:span text:style-name="T106">：</text:span><text:span text:style-name="T199">100 200 300 <text:s/></text:span><text:span text:style-name="T106">意思：我 ← </text:span><text:span text:style-name="T199">AS100 ← AS200 ← AS300<text:line-break/><text:line-break/></text:span><text:span text:style-name="T106">而</text:span><text:span text:style-name="T199">400 300 <text:s/></text:span><text:span text:style-name="T106">意思：我 ← </text:span><text:span text:style-name="T199">AS400 ← AS300<text:line-break/><text:line-break/></text:span><text:span text:style-name="T696">AS-PATH </text:span><text:span text:style-name="T691">就只是：這個路由消息經過了哪些 </text:span><text:span text:style-name="T696">AS </text:span><text:span text:style-name="T691">的名單。就這樣而已。</text:span><text:span text:style-name="T199"><text:line-break/><text:line-break/></text:span><text:span text:style-name="T106">然後 </text:span><text:span text:style-name="T359">BGP</text:span><text:span text:style-name="T199"> </text:span><text:span text:style-name="T106">看到：</text:span><text:span text:style-name="T199"><text:line-break/><text:line-break/>100 200 300 <text:s/></text:span><text:span text:style-name="T106">有 </text:span><text:span text:style-name="T199">3 </text:span><text:span text:style-name="T106">個 </text:span><text:span text:style-name="T199">AS</text:span><text:span text:style-name="T106">。</text:span><text:span text:style-name="T199"><text:line-break/><text:line-break/>400 300 <text:s/></text:span><text:span text:style-name="T106">有 </text:span><text:span text:style-name="T199">2 </text:span><text:span text:style-name="T106">個 </text:span><text:span text:style-name="T199">AS</text:span><text:span text:style-name="T106">。</text:span><text:span text:style-name="T199"><text:line-break/><text:line-break/></text:span><text:span text:style-name="T106">於是它想：</text:span><text:span text:style-name="T636">「嗯，看起來第二條比較短。」然後選第二條</text:span><text:span text:style-name="T106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6"><text:span text:style-name="T247">⚠️ <text:s/></text:span><text:span text:style-name="T52">新手最容易搞混的地方</text:span></text:p>
            <text:p text:style-name="P7" loext:marker-style-name="T107"><text:span text:style-name="T194">AS-PATH </text:span><text:span text:style-name="T106">不是寫在封包上的東西，也不是「下一跳」。封包只認 </text:span><text:span text:style-name="T194">Next-Hop</text:span><text:span text:style-name="T106">；</text:span><text:span text:style-name="T368">AS-PATH </text:span><text:span text:style-name="T344">純粹是 </text:span><text:span text:style-name="T368">BGP </text:span><text:span text:style-name="T344">拿來「比較哪條路由比較好」的參考資料</text:span><text:span text:style-name="T106">。</text:span></text:p>
            <text:p text:style-name="P6"><text:span text:style-name="T247">🎯 <text:s/></text:span><text:span text:style-name="T52">考點加碼：</text:span><text:span text:style-name="T63">AS-PATH </text:span><text:span text:style-name="T52">的另一個任務</text:span></text:p>
            <text:p text:style-name="P8" loext:marker-style-name="T107"><text:span text:style-name="T106">防迴圈！</text:span><text:span text:style-name="T131">當某個 </text:span><text:span text:style-name="T215">AS </text:span><text:span text:style-name="T131">發現一條路由的 </text:span><text:span text:style-name="T215">AS-PATH </text:span><text:span text:style-name="T131">裡「已經有自己的 </text:span><text:span text:style-name="T215">AS </text:span><text:span text:style-name="T131">編號」</text:span><text:span text:style-name="T106">，</text:span><text:span text:style-name="T386">就會直接丟棄這條路由，避免封包在 </text:span><text:span text:style-name="T398">AS </text:span><text:span text:style-name="T386">之間繞圈圈</text:span><text:span text:style-name="T106">。</text:span></text:p>
          </table:table-cell>
          <table:covered-table-cell/>
        </table:table-row>
      </table:table>
      <text:h text:style-name="P11" text:outline-level="2" loext:marker-style-name="T27"><text:span text:style-name="T28">五、</text:span><text:span text:style-name="T27">BGP </text:span><text:span text:style-name="T28">必背考點：高命中率一次搞懂</text:span></text:h>
      <text:p text:style-name="P36" loext:marker-style-name="T107"><text:span text:style-name="T358">BGP(Border Gateway Protocol) </text:span><text:span text:style-name="T106">不像 </text:span><text:span text:style-name="T194">OSPF </text:span><text:span text:style-name="T106">會自己算最短距離，它是在「</text:span><text:span text:style-name="T684">比條件、看政策</text:span><text:span text:style-name="T106">」。與其硬背排序表，不如先搞懂下面這 </text:span><text:span text:style-name="T199">9 </text:span><text:span text:style-name="T106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26" loext:marker-style-name="T75"><text:span text:style-name="T82">#</text:span><text:span text:style-name="T75"/></text:p>
            </table:table-cell>
            <table:table-cell table:style-name="表格94.A1" office:value-type="string">
              <text:p text:style-name="P26" loext:marker-style-name="T75"><text:span text:style-name="T76">考點</text:span><text:span text:style-name="T75"/></text:p>
            </table:table-cell>
            <table:table-cell table:style-name="表格94.A1" office:value-type="string">
              <text:p text:style-name="P26" loext:marker-style-name="T75"><text:span text:style-name="T76">一句話重點</text:span><text:span text:style-name="T75"/></text:p>
            </table:table-cell>
            <table:table-cell table:style-name="表格94.A1" office:value-type="string">
              <text:p text:style-name="P26" loext:marker-style-name="T75"><text:span text:style-name="T76">白話理解 </text:span><text:span text:style-name="T82">× </text:span><text:span text:style-name="T76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8" loext:marker-style-name="T83"><text:span text:style-name="T182">①</text:span><text:span text:style-name="T83"/></text:p>
          </table:table-cell>
          <table:table-cell table:style-name="表格94.A2" office:value-type="string">
            <text:p text:style-name="P38">TCP 179</text:p>
          </table:table-cell>
          <table:table-cell table:style-name="表格94.A2" office:value-type="string">
            <text:p text:style-name="P29" loext:marker-style-name="T147"><text:span text:style-name="T561">BGP </text:span><text:span text:style-name="T525">跑在 </text:span><text:span text:style-name="T561">TCP</text:span><text:span text:style-name="T148">，</text:span><text:span text:style-name="T525">埠號 </text:span><text:span text:style-name="T561">179</text:span><text:span text:style-name="T148">（不是 </text:span><text:span text:style-name="T231">UDP</text:span><text:span text:style-name="T148">）</text:span></text:p>
          </table:table-cell>
          <table:table-cell table:style-name="表格94.A2" office:value-type="string">
            <text:p text:style-name="P29" loext:marker-style-name="T147"><text:span text:style-name="T148">要傳「整個網際網路」的路由，丟包會大亂，所以需要 </text:span><text:span text:style-name="T231">TCP </text:span><text:span text:style-name="T148">的可靠重送與順序保證。考：</text:span><text:span text:style-name="T466">BGP </text:span><text:span text:style-name="T438">傳輸層協定 → </text:span><text:span text:style-name="T466">TCP</text:span><text:span text:style-name="T148">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3"><text:span text:style-name="T182">②</text:span><text:span text:style-name="T83"/></text:p>
          </table:table-cell>
          <table:table-cell table:style-name="表格94.A3" office:value-type="string">
            <text:p text:style-name="P38">Path Vector</text:p>
          </table:table-cell>
          <table:table-cell table:style-name="表格94.A3" office:value-type="string">
            <text:p text:style-name="P29" loext:marker-style-name="T147"><text:span text:style-name="T231">BGP </text:span><text:span text:style-name="T148">屬於 </text:span><text:span text:style-name="T231">Path Vector </text:span><text:span text:style-name="T148">協定</text:span></text:p>
          </table:table-cell>
          <table:table-cell table:style-name="表格94.A3" office:value-type="string">
            <text:p text:style-name="P29" loext:marker-style-name="T147"><text:span text:style-name="T148">不只報「距離」，而是</text:span><text:span text:style-name="T331">把「整條 </text:span><text:span text:style-name="T376">AS </text:span><text:span text:style-name="T331">路徑」報給你</text:span><text:span text:style-name="T148">。</text:span><text:span text:style-name="T231">RIP</text:span><text:span text:style-name="T148">＝</text:span><text:span text:style-name="T231">Distance </text:span><text:soft-page-break/><text:span text:style-name="T231">Vector</text:span><text:span text:style-name="T148">、</text:span><text:span text:style-name="T231">OSPF</text:span><text:span text:style-name="T148">＝</text:span><text:span text:style-name="T231">Link State</text:span><text:span text:style-name="T148">、</text:span><text:span text:style-name="T231">BGP</text:span><text:span text:style-name="T148">＝</text:span><text:span text:style-name="T231">Path Vector</text:span><text:span text:style-name="T148">。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3"><text:span text:style-name="T182">③</text:span><text:span text:style-name="T83"/></text:p>
          </table:table-cell>
          <table:table-cell table:style-name="表格94.A2" office:value-type="string">
            <text:p text:style-name="P13"><text:span text:style-name="T243">AS-PATH</text:span><text:span text:style-name="T179">（</text:span><text:span text:style-name="T606">防迴圈</text:span><text:span text:style-name="T179">）</text:span></text:p>
          </table:table-cell>
          <table:table-cell table:style-name="表格94.A2" office:value-type="string">
            <text:p text:style-name="P29" loext:marker-style-name="T147"><text:span text:style-name="T41">✅ </text:span><text:span text:style-name="T148">最大用途＝</text:span><text:span text:style-name="T605">防 </text:span><text:span text:style-name="T625">Routing Loop</text:span></text:p>
          </table:table-cell>
          <table:table-cell table:style-name="表格94.A2" office:value-type="string">
            <text:p text:style-name="P29" loext:marker-style-name="T147"><text:span text:style-name="T466">AS </text:span><text:span text:style-name="T438">一看到 </text:span><text:span text:style-name="T466">AS-PATH </text:span><text:span text:style-name="T438">裡有「自己的 </text:span><text:span text:style-name="T466">AS </text:span><text:span text:style-name="T438">編號」就立刻丟棄，避免繞圈</text:span><text:span text:style-name="T148">。考「</text:span><text:span text:style-name="T231">AS-PATH </text:span><text:span text:style-name="T148">主要功能」→ </text:span><text:span text:style-name="T231">Loop Prevention</text:span><text:span text:style-name="T148">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3"><text:span text:style-name="T182">④</text:span><text:span text:style-name="T83"/></text:p>
          </table:table-cell>
          <table:table-cell table:style-name="表格94.A3" office:value-type="string">
            <text:p text:style-name="P38">Local Preference</text:p>
          </table:table-cell>
          <table:table-cell table:style-name="表格94.A3" office:value-type="string">
            <text:p text:style-name="P39">數值越大越優先</text:p>
          </table:table-cell>
          <table:table-cell table:style-name="表格94.A3" office:value-type="string">
            <text:p text:style-name="P29" loext:marker-style-name="T147"><text:span text:style-name="T41">✅ </text:span><text:span text:style-name="T42">通用屬性中最重要！</text:span><text:span text:style-name="T148">是</text:span><text:span text:style-name="T331"> </text:span><text:span text:style-name="T376">AS </text:span><text:span text:style-name="T331">的「內部政策」：想走哪個出口就把它設高分</text:span><text:span text:style-name="T148">。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3"><text:span text:style-name="T182">⑤</text:span><text:span text:style-name="T83"/></text:p>
          </table:table-cell>
          <table:table-cell table:style-name="表格94.A2" office:value-type="string">
            <text:p text:style-name="P13"><text:span text:style-name="T243">AS-PATH</text:span><text:span text:style-name="T179">（</text:span><text:span text:style-name="T606">長度</text:span><text:span text:style-name="T179">）</text:span></text:p>
          </table:table-cell>
          <table:table-cell table:style-name="表格94.A2" office:value-type="string">
            <text:p text:style-name="P14"><text:span text:style-name="T726">路徑越短（經過 </text:span><text:span text:style-name="T727">AS </text:span><text:span text:style-name="T726">越少）越優先</text:span></text:p>
          </table:table-cell>
          <table:table-cell table:style-name="表格94.A2" office:value-type="string">
            <text:p text:style-name="P29" loext:marker-style-name="T147"><text:span text:style-name="T41">⚠️ </text:span><text:span text:style-name="T438">但要先比 </text:span><text:span text:style-name="T466">Weight</text:span><text:span text:style-name="T438">、</text:span><text:span text:style-name="T466">Local Pref</text:span><text:span text:style-name="T438">，前面平手才輪到它</text:span><text:span text:style-name="T148">——</text:span><text:span text:style-name="T413">別誤以為 </text:span><text:span text:style-name="T419">AS-PATH </text:span><text:span text:style-name="T413">最重要</text:span><text:span text:style-name="T148">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3"><text:span text:style-name="T182">⑥</text:span><text:span text:style-name="T83"/></text:p>
          </table:table-cell>
          <table:table-cell table:style-name="表格94.A3" office:value-type="string">
            <text:p text:style-name="P38">MED</text:p>
          </table:table-cell>
          <table:table-cell table:style-name="表格94.A3" office:value-type="string">
            <text:p text:style-name="P40">數值越小越優先</text:p>
          </table:table-cell>
          <table:table-cell table:style-name="表格94.A3" office:value-type="string">
            <text:p text:style-name="P29" loext:marker-style-name="T147"><text:span text:style-name="T331">告訴鄰居「請從這個入口進來」，數字小的入口優先</text:span><text:span text:style-name="T148">。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3"><text:span text:style-name="T182">⑦</text:span><text:span text:style-name="T83"/></text:p>
          </table:table-cell>
          <table:table-cell table:style-name="表格94.A2" office:value-type="string">
            <text:p text:style-name="P38">eBGP vs iBGP</text:p>
          </table:table-cell>
          <table:table-cell table:style-name="表格94.A2" office:value-type="string">
            <text:p text:style-name="P15"><text:span text:style-name="T727">eBGP </text:span><text:span text:style-name="T726">優先於 </text:span><text:span text:style-name="T727">iBGP</text:span></text:p>
          </table:table-cell>
          <table:table-cell table:style-name="表格94.A2" office:value-type="string">
            <text:p text:style-name="P29" loext:marker-style-name="T147"><text:span text:style-name="T231">eBGP</text:span><text:span text:style-name="T148">＝外面直接告訴你；</text:span><text:span text:style-name="T231">iBGP</text:span><text:span text:style-name="T148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3"><text:span text:style-name="T182">⑧</text:span><text:span text:style-name="T83"/></text:p>
          </table:table-cell>
          <table:table-cell table:style-name="表格94.A3" office:value-type="string">
            <text:p text:style-name="P13"><text:span text:style-name="T243">MED</text:span><text:span text:style-name="T179">（比較範圍）</text:span></text:p>
          </table:table-cell>
          <table:table-cell table:style-name="表格94.A3" office:value-type="string">
            <text:p text:style-name="P16"><text:span text:style-name="T726">只比較同一個「來源 </text:span><text:span text:style-name="T727">AS</text:span><text:span text:style-name="T726">」</text:span></text:p>
          </table:table-cell>
          <table:table-cell table:style-name="表格94.A3" office:value-type="string">
            <text:p text:style-name="P29" loext:marker-style-name="T147"><text:span text:style-name="T41">⚠️</text:span><text:span text:style-name="T461"> </text:span><text:span text:style-name="T646">不同 </text:span><text:span text:style-name="T659">AS </text:span><text:span text:style-name="T646">的 </text:span><text:span text:style-name="T659">MED </text:span><text:span text:style-name="T646">不能互比；只在同一家公司的建議之間比大小</text:span><text:span text:style-name="T148">。最愛考！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3"><text:span text:style-name="T182">⑨</text:span><text:span text:style-name="T83"/></text:p>
          </table:table-cell>
          <table:table-cell table:style-name="表格94.A2" office:value-type="string">
            <text:p text:style-name="P38">Weight</text:p>
          </table:table-cell>
          <table:table-cell table:style-name="表格94.A2" office:value-type="string">
            <text:p text:style-name="P29" loext:marker-style-name="T147"><text:span text:style-name="T43">Cisco </text:span><text:span text:style-name="T44">私有</text:span><text:span text:style-name="T148">，</text:span><text:span text:style-name="T693">非 </text:span><text:span text:style-name="T699">BGP </text:span><text:span text:style-name="T693">標準</text:span></text:p>
          </table:table-cell>
          <table:table-cell table:style-name="表格94.A2" office:value-type="string">
            <text:p text:style-name="P29" loext:marker-style-name="T147"><text:span text:style-name="T41">⚠️ </text:span><text:span text:style-name="T148">看到「</text:span><text:span text:style-name="T231">BGP </text:span><text:span text:style-name="T148">標準屬性」選項別選 </text:span><text:span text:style-name="T231">Weight</text:span><text:span text:style-name="T148">（</text:span><text:span text:style-name="T231">Juniper</text:span><text:span text:style-name="T148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6"><text:span text:style-name="T247">🧠 <text:s/></text:span><text:span text:style-name="T299">白話理解（這句最重要）</text:span></text:p>
            <text:p text:style-name="P7" loext:marker-style-name="T107"><text:span text:style-name="T358">BGP </text:span><text:span text:style-name="T336">心裡在想：「哪條路比較值得信任？比較符合政策？」不是「哪條最短」</text:span><text:span text:style-name="T106">（</text:span><text:span text:style-name="T386">那是 </text:span><text:span text:style-name="T398">OSPF </text:span><text:span text:style-name="T386">在做的事</text:span><text:span text:style-name="T106">）。</text:span></text:p>
            <text:p text:style-name="P8"><text:span text:style-name="T300">一句話總結 → </text:span><text:span text:style-name="T194">BGP </text:span><text:span text:style-name="T106">是政策導向（</text:span><text:span text:style-name="T194">policy-based routing</text:span><text:span text:style-name="T106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6"><text:span text:style-name="T247">⚡ <text:s/></text:span><text:span text:style-name="T251">考前濃縮版（</text:span><text:span text:style-name="T261">10 </text:span><text:span text:style-name="T251">秒掃過）</text:span></text:p>
            <text:p text:style-name="P7" loext:marker-style-name="T107"><text:span text:style-name="T217">BGP</text:span><text:span text:style-name="T133">＝</text:span><text:span text:style-name="T217">TCP 179</text:span><text:span text:style-name="T106">、</text:span><text:span text:style-name="T611">Path Vector</text:span><text:span text:style-name="T106">｜</text:span><text:span text:style-name="T427">AS-PATH</text:span><text:span text:style-name="T426">：防迴圈＋越短越好</text:span><text:span text:style-name="T106">｜</text:span><text:span text:style-name="T427">Local Preference</text:span><text:span text:style-name="T426">：越大越好</text:span><text:span text:style-name="T106">｜</text:span><text:span text:style-name="T427">MED</text:span><text:span text:style-name="T426">：越小越好</text:span><text:span text:style-name="T106">＋</text:span><text:span text:style-name="T386">只比同 </text:span><text:span text:style-name="T398">AS</text:span><text:span text:style-name="T106">｜</text:span><text:span text:style-name="T217">eBGP &gt; iBGP</text:span><text:span text:style-name="T106">｜</text:span><text:span text:style-name="T225">Weight</text:span><text:span text:style-name="T141">：</text:span><text:span text:style-name="T225">Cisco </text:span><text:span text:style-name="T141">私有</text:span><text:span text:style-name="T106">。</text:span></text:p>
            <text:p text:style-name="P7" loext:marker-style-name="T107"><text:span text:style-name="T106">選路優先順序：</text:span><text:span text:style-name="T194">Weight &gt; Local Pref &gt; </text:span><text:span text:style-name="T106">自己產生 </text:span><text:span text:style-name="T194">&gt; AS-PATH &gt; Origin &gt; MED &gt; eBGP &gt; IGP cost &gt; Router ID</text:span><text:span text:style-name="T106">（</text:span><text:span text:style-name="T194">Weight </text:span><text:span text:style-name="T106">為 </text:span><text:span text:style-name="T194">Cisco </text:span><text:span text:style-name="T106">私有；</text:span><text:span text:style-name="T194">Local Pref </text:span><text:span text:style-name="T106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六、</text:span><text:span text:style-name="T27">BGP </text:span><text:span text:style-name="T28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7"><text:span text:style-name="T286">✗ </text:span><text:span text:style-name="T285">AS-PATH </text:span><text:span text:style-name="T280">是 </text:span><text:span text:style-name="T285">BGP </text:span><text:span text:style-name="T280">選路最重要的屬性</text:span><text:span text:style-name="T279">　→　</text:span><text:span text:style-name="T106">✓ </text:span><text:span text:style-name="T474">Local Preference </text:span><text:span text:style-name="T452">才是最重要的通用屬性</text:span><text:span text:style-name="T106">（</text:span><text:span text:style-name="T194">Weight </text:span><text:span text:style-name="T106">是 </text:span><text:span text:style-name="T194">Cisco </text:span><text:span text:style-name="T106">私有）。</text:span></text:p>
            <text:p text:style-name="P8"><text:span text:style-name="T286">✗ </text:span><text:span text:style-name="T285">AS-PATH </text:span><text:span text:style-name="T280">越短就一定會選那條</text:span><text:span text:style-name="T279">　→　</text:span><text:span text:style-name="T106">✓ </text:span><text:span text:style-name="T344">只有前面的屬性（</text:span><text:span text:style-name="T368">Local Pref </text:span><text:span text:style-name="T344">等）完全相同時，才會比較 </text:span><text:span text:style-name="T368">AS-PATH</text:span><text:span text:style-name="T106">。</text:span></text:p>
            <text:p text:style-name="P8"><text:span text:style-name="T286">✗ </text:span><text:span text:style-name="T285">BGP </text:span><text:span text:style-name="T280">會自己計算最短路徑</text:span><text:span text:style-name="T279">　→　</text:span><text:span text:style-name="T106">✓ </text:span><text:span text:style-name="T194">BGP </text:span><text:span text:style-name="T106">不算距離，</text:span><text:span text:style-name="T612">OSPF </text:span><text:span text:style-name="T588">才做最短路徑計算</text:span><text:span text:style-name="T106">。</text:span></text:p>
            <text:p text:style-name="P8"><text:span text:style-name="T286">✗ </text:span><text:span text:style-name="T285">iBGP </text:span><text:span text:style-name="T280">比 </text:span><text:span text:style-name="T285">eBGP </text:span><text:span text:style-name="T280">優先</text:span><text:span text:style-name="T279">　→　</text:span><text:span text:style-name="T106">✓ </text:span><text:span text:style-name="T712">eBGP </text:span><text:span text:style-name="T704">優先於 </text:span><text:span text:style-name="T712">iBGP</text:span><text:span text:style-name="T106">（外部路由更可信）。</text:span></text:p>
            <text:p text:style-name="P8"><text:span text:style-name="T286">✗ </text:span><text:span text:style-name="T285">MED </text:span><text:span text:style-name="T280">可以跨不同 </text:span><text:span text:style-name="T285">AS </text:span><text:span text:style-name="T280">互相比較</text:span><text:span text:style-name="T279">　→　</text:span><text:span text:style-name="T106">✓</text:span><text:span text:style-name="T348"> </text:span><text:span text:style-name="T371">MED </text:span><text:span text:style-name="T348">只能比較來自同一個 </text:span><text:span text:style-name="T371">AS </text:span><text:span text:style-name="T348">的路由</text:span><text:span text:style-name="T106">。</text:span></text:p>
          </table:table-cell>
        </table:table-row>
      </table:table>
      <text:h text:style-name="P11" text:outline-level="2" loext:marker-style-name="T27"><text:soft-page-break/><text:span text:style-name="T28">七、</text:span><text:span text:style-name="T27">BGP + NAT + </text:span><text:span text:style-name="T28">防火牆 整合流程</text:span></text:h>
      <text:p text:style-name="P35" loext:marker-style-name="T107"><text:span text:style-name="T106">把三個概念串在一起，這才是實務上封包實際走的路。情境：</text:span><text:span text:style-name="T132">你的電腦要連到健保署</text:span><text:span text:style-name="T106">，</text:span><text:span text:style-name="T134">有兩條對外線路</text:span><text:span text:style-name="T106">（</text:span><text:span text:style-name="T489">中華電信 </text:span><text:span text:style-name="T501">AS-PATH </text:span><text:span text:style-name="T489">長度 </text:span><text:span text:style-name="T501">2</text:span><text:span text:style-name="T106">、</text:span><text:span text:style-name="T335">台灣固網 </text:span><text:span text:style-name="T363">AS-PATH </text:span><text:span text:style-name="T335">長度 </text:span><text:span text:style-name="T363">3</text:span><text:span text:style-name="T106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" loext:marker-style-name="T75"><text:span text:style-name="T76">步驟</text:span><text:span text:style-name="T75"/></text:p>
            </table:table-cell>
            <table:table-cell table:style-name="表格96.A1" office:value-type="string">
              <text:p text:style-name="P4" loext:marker-style-name="T75"><text:span text:style-name="T76">動作</text:span><text:span text:style-name="T75"/></text:p>
            </table:table-cell>
            <table:table-cell table:style-name="表格96.A1" office:value-type="string">
              <text:p text:style-name="P4" loext:marker-style-name="T75"><text:span text:style-name="T76">關鍵一句</text:span><text:span text:style-name="T75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9" loext:marker-style-name="T147"><text:span text:style-name="T230">1 </text:span><text:span text:style-name="T173">封包產生</text:span></text:p>
          </table:table-cell>
          <table:table-cell table:style-name="表格96.A2" office:value-type="string">
            <text:p text:style-name="P29" loext:marker-style-name="T147"><text:span text:style-name="T148">你的電腦說「我要去健保署 </text:span><text:span text:style-name="T230">IP</text:span><text:span text:style-name="T148">」</text:span></text:p>
          </table:table-cell>
          <table:table-cell table:style-name="表格96.A2" office:value-type="string">
            <text:p text:style-name="P29" loext:marker-style-name="T147"><text:span text:style-name="T148">封包準備出發</text:span><text:span text:style-name="T147"/></text:p>
          </table:table-cell>
        </table:table-row>
        <table:table-row table:style-name="表格96.1">
          <table:table-cell table:style-name="表格96.A3" office:value-type="string">
            <text:p text:style-name="P29" loext:marker-style-name="T147"><text:span text:style-name="T230">2 </text:span><text:span text:style-name="T173">防火牆 </text:span><text:span text:style-name="T241">Firewall</text:span></text:p>
          </table:table-cell>
          <table:table-cell table:style-name="表格96.A3" office:value-type="string">
            <text:p text:style-name="P29" loext:marker-style-name="T147"><text:span text:style-name="T148">看來源</text:span><text:span text:style-name="T230">/</text:span><text:span text:style-name="T148">目的 </text:span><text:span text:style-name="T230">IP</text:span><text:span text:style-name="T148">、</text:span><text:span text:style-name="T230">Port</text:span><text:span text:style-name="T148">，不符就擋掉</text:span></text:p>
          </table:table-cell>
          <table:table-cell table:style-name="表格96.A3" office:value-type="string">
            <text:p text:style-name="P29" loext:marker-style-name="T147"><text:span text:style-name="T148">防火牆決定「能不能走」</text:span><text:span text:style-name="T147"/></text:p>
          </table:table-cell>
        </table:table-row>
        <table:table-row table:style-name="表格96.1">
          <table:table-cell table:style-name="表格96.A2" office:value-type="string">
            <text:p text:style-name="P29" loext:marker-style-name="T147"><text:span text:style-name="T230">3 </text:span><text:span text:style-name="T241">NAT</text:span></text:p>
          </table:table-cell>
          <table:table-cell table:style-name="表格96.A2" office:value-type="string">
            <text:p text:style-name="P29" loext:marker-style-name="T147"><text:span text:style-name="T148">把</text:span><text:span text:style-name="T694">私有 </text:span><text:span text:style-name="T698">IP </text:span><text:span text:style-name="T694">換成公網 </text:span><text:span text:style-name="T698">IP</text:span><text:span text:style-name="T148">（</text:span><text:span text:style-name="T230">192.168.1.10 → 203.66.x.x</text:span><text:span text:style-name="T148">）</text:span></text:p>
          </table:table-cell>
          <table:table-cell table:style-name="表格96.A2" office:value-type="string">
            <text:p text:style-name="P29" loext:marker-style-name="T147"><text:span text:style-name="T230">NAT </text:span><text:span text:style-name="T148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9" loext:marker-style-name="T147"><text:span text:style-name="T230">4 </text:span><text:span text:style-name="T241">BGP </text:span><text:span text:style-name="T173">選路</text:span></text:p>
          </table:table-cell>
          <table:table-cell table:style-name="表格96.A3" office:value-type="string">
            <text:p text:style-name="P29" loext:marker-style-name="T147"><text:span text:style-name="T148">比條件：</text:span><text:span text:style-name="T439">若相同選 </text:span><text:span text:style-name="T465">AS-PATH </text:span><text:span text:style-name="T439">較短路</text:span><text:span text:style-name="T465">1</text:span><text:span text:style-name="T148">；</text:span><text:span text:style-name="T578">若中華電信 </text:span><text:span text:style-name="T579">Local Pref </text:span><text:span text:style-name="T578">較高則不管長短走路</text:span><text:span text:style-name="T579">1</text:span></text:p>
          </table:table-cell>
          <table:table-cell table:style-name="表格96.A3" office:value-type="string">
            <text:p text:style-name="P29" loext:marker-style-name="T147"><text:span text:style-name="T230">BGP </text:span><text:span text:style-name="T148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9" loext:marker-style-name="T147"><text:span text:style-name="T230">5 </text:span><text:span text:style-name="T173">出 </text:span><text:span text:style-name="T241">ISP </text:span><text:span text:style-name="T173">跨 </text:span><text:span text:style-name="T241">AS</text:span></text:p>
          </table:table-cell>
          <table:table-cell table:style-name="表格96.A2" office:value-type="string">
            <text:p text:style-name="P29" loext:marker-style-name="T147"><text:span text:style-name="T328">封包經過多個 </text:span><text:span text:style-name="T374">AS</text:span><text:span text:style-name="T148">（這就是 </text:span><text:span text:style-name="T230">AS-PATH </text:span><text:span text:style-name="T148">的來源）</text:span></text:p>
          </table:table-cell>
          <table:table-cell table:style-name="表格96.A2" office:value-type="string">
            <text:p text:style-name="P29" loext:marker-style-name="T147"><text:span text:style-name="T230">—</text:span><text:span text:style-name="T147"/></text:p>
          </table:table-cell>
        </table:table-row>
        <table:table-row table:style-name="表格96.1">
          <table:table-cell table:style-name="表格96.A3" office:value-type="string">
            <text:p text:style-name="P29" loext:marker-style-name="T147"><text:span text:style-name="T230">6 </text:span><text:span text:style-name="T148">到達健保署</text:span></text:p>
          </table:table-cell>
          <table:table-cell table:style-name="表格96.A3" office:value-type="string">
            <text:p text:style-name="P29" loext:marker-style-name="T147"><text:span text:style-name="T148">健保署收到請求，完成連線</text:span><text:span text:style-name="T147"/></text:p>
          </table:table-cell>
          <table:table-cell table:style-name="表格96.A3" office:value-type="string">
            <text:p text:style-name="P29" loext:marker-style-name="T147"><text:span text:style-name="T230">—</text:span><text:span text:style-name="T147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6"><text:span text:style-name="T247">🎯 <text:s/></text:span><text:span text:style-name="T299">三層分工，一句話各自記</text:span></text:p>
            <text:p text:style-name="P7"><text:span text:style-name="T300">防火牆 → </text:span><text:span text:style-name="T106">決定「能不能走」｜</text:span><text:span text:style-name="T307">NAT → </text:span><text:span text:style-name="T106">解決「你是誰」｜</text:span><text:span text:style-name="T311">BGP → </text:span><text:span text:style-name="T114">決定「要怎麼走」</text:span></text:p>
            <text:p text:style-name="P8" loext:marker-style-name="T107"><text:span text:style-name="T106">生活比喻：</text:span><text:span text:style-name="T132">海關（防火牆）</text:span><text:span text:style-name="T106">→ </text:span><text:span text:style-name="T132">換護照</text:span><text:span text:style-name="T216">/</text:span><text:span text:style-name="T132">身份（</text:span><text:span text:style-name="T216">NAT</text:span><text:span text:style-name="T132">）</text:span><text:span text:style-name="T106">→ </text:span><text:span text:style-name="T138">選航班（</text:span><text:span text:style-name="T222">BGP</text:span><text:span text:style-name="T138">）</text:span><text:span text:style-name="T106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6"><text:span text:style-name="T247">⚠️ <text:s/></text:span><text:span text:style-name="T269">整合情境的考試陷阱</text:span></text:p>
            <text:p text:style-name="P7"><text:span text:style-name="T287">✗ </text:span><text:span text:style-name="T281">封包送不出去</text:span><text:span text:style-name="T279"> → 一定是 </text:span><text:span text:style-name="T286">BGP </text:span><text:span text:style-name="T279">問題　→　</text:span><text:span text:style-name="T106">✓ 應依序排查：</text:span><text:span text:style-name="T132">防火牆有沒有擋？</text:span><text:span text:style-name="T216">NAT </text:span><text:span text:style-name="T132">有沒有設？</text:span><text:span text:style-name="T216">BGP </text:span><text:span text:style-name="T132">有沒有路？</text:span></text:p>
            <text:p text:style-name="P8"><text:span text:style-name="T286">✗ </text:span><text:span text:style-name="T279">有路但連不到 → 是 </text:span><text:span text:style-name="T286">BGP </text:span><text:span text:style-name="T279">路由問題　→　</text:span><text:span text:style-name="T106">✓ 通常是防火牆或 </text:span><text:span text:style-name="T194">NAT </text:span><text:span text:style-name="T106">問題，不是 </text:span><text:span text:style-name="T194">BGP</text:span><text:span text:style-name="T106">。</text:span></text:p>
            <text:p text:style-name="P8"><text:span text:style-name="T286">✗ </text:span><text:span text:style-name="T281">走到錯誤的 </text:span><text:span text:style-name="T287">ISP </text:span><text:span text:style-name="T286">→ </text:span><text:span text:style-name="T279">是 </text:span><text:span text:style-name="T286">NAT </text:span><text:span text:style-name="T279">設定問題　→　</text:span><text:span text:style-name="T106">✓ </text:span><text:span text:style-name="T343">走到錯誤 </text:span><text:span text:style-name="T367">ISP </text:span><text:span text:style-name="T343">是 </text:span><text:span text:style-name="T367">BGP </text:span><text:span text:style-name="T343">選路問題（</text:span><text:span text:style-name="T367">Local Pref </text:span><text:span text:style-name="T343">或 </text:span><text:span text:style-name="T367">AS-PATH </text:span><text:span text:style-name="T343">設定不對）</text:span><text:span text:style-name="T106">。</text:span></text:p>
          </table:table-cell>
          <table:covered-table-cell/>
          <table:covered-table-cell/>
        </table:table-row>
      </table:table>
      <text:h text:style-name="P17" text:outline-level="1" loext:marker-style-name="T71"><text:span text:style-name="T72">第 八 篇　網路系統進階：</text:span><text:span text:style-name="T71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6"><text:span text:style-name="T247">🌐 <text:s/></text:span><text:span text:style-name="T52">本篇重點</text:span></text:p>
            <text:p text:style-name="P7" loext:marker-style-name="T107"><text:span text:style-name="T106">本篇涵蓋四大現代網路主題：</text:span><text:span text:style-name="T194">SDN</text:span><text:span text:style-name="T106">（網路如何被控制）、</text:span><text:span text:style-name="T194">Load Balancing</text:span><text:span text:style-name="T106">（流量如何分配）、</text:span><text:span text:style-name="T194">CDN</text:span><text:span text:style-name="T106">（網站如何加速）、</text:span><text:span text:style-name="T194">5G</text:span><text:span text:style-name="T106">（新世代行動網路特性）。</text:span></text:p>
          </table:table-cell>
        </table:table-row>
      </table:table>
      <text:h text:style-name="P11" text:outline-level="2" loext:marker-style-name="T27"><text:span text:style-name="T28">一、</text:span><text:span text:style-name="T27">SDN</text:span><text:span text:style-name="T28">（軟體定義網路）</text:span></text:h>
      <text:p text:style-name="P35" loext:marker-style-name="T107"><text:span text:style-name="T198">SDN</text:span><text:span text:style-name="T111">（</text:span><text:span text:style-name="T198">Software Defined Networking</text:span><text:span text:style-name="T111">）</text:span><text:span text:style-name="T106">的核心概念是：</text:span><text:span text:style-name="T315">將「控制平面」與「資料平面」分離</text:span><text:span text:style-name="T106">。</text:span><text:span text:style-name="T345">傳統網路</text:span><text:span text:style-name="T106">中</text:span><text:span text:style-name="T345">路由器和交換器同時負責「決定資料走哪條路」和「實際傳送資料」</text:span><text:span text:style-name="T106">，</text:span><text:span text:style-name="T415">SDN </text:span><text:span text:style-name="T407">則把「決策」抽出來交給集中式的 </text:span><text:span text:style-name="T415">Controller </text:span><text:span text:style-name="T407">統一管理。</text:span><text:span text:style-name="T106">（</text:span><text:span text:style-name="T194">Router</text:span><text:span text:style-name="T106">：負責「不同網路之間」傳資料；</text:span><text:span text:style-name="T194">Switch</text:span><text:span text:style-name="T106">：負責「同一個網路內」傳資料）</text:span></text:p>
      <text:p text:style-name="P37" loext:marker-style-name="T107"><text:span text:style-name="T106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246">→ </text:span><text:span text:style-name="T106">查轉送表 </text:span><text:span text:style-name="T246">→ </text:span><text:span text:style-name="T106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CF965C9.png" xlink:type="simple" xlink:show="embed" xlink:actuate="onLoad" draw:mime-type="image/png"/></draw:frame><text:span text:style-name="T106"><text:line-break/><text:line-break/></text:span></text:p>
      <text:p text:style-name="P37" loext:marker-style-name="T107"><text:span text:style-name="T106"/></text:p>
      <text:p text:style-name="P37" loext:marker-style-name="T107"><text:span text:style-name="T106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6"><text:span text:style-name="T247">🟦 <text:s/></text:span><text:span text:style-name="T299">核心概念（考試最常考）</text:span></text:p>
            <text:p text:style-name="P7"><text:span text:style-name="T303">控制平面（</text:span><text:span text:style-name="T309">Control Plane</text:span><text:span text:style-name="T303">）：</text:span><text:span text:style-name="T111">決定資料「怎麼走」</text:span><text:span text:style-name="T106">——負責路由決策的大腦。</text:span></text:p>
            <text:p text:style-name="P8"><text:span text:style-name="T303">資料平面（</text:span><text:span text:style-name="T309">Data Plane</text:span><text:span text:style-name="T303">）：</text:span><text:span text:style-name="T111">負責資料「實際傳送」</text:span><text:span text:style-name="T106">——執行指令的手腳。</text:span></text:p>
            <text:p text:style-name="P8"><text:span text:style-name="T307">🔑 </text:span><text:span text:style-name="T300">關鍵：</text:span><text:span text:style-name="T132">兩者分離，是 </text:span><text:span text:style-name="T216">SDN </text:span><text:span text:style-name="T132">最核心的設計原則</text:span><text:span text:style-name="T106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" loext:marker-style-name="T75"><text:span text:style-name="T76">三層架構</text:span><text:span text:style-name="T75"/></text:p>
          </table:table-cell>
          <table:table-cell table:style-name="表格98.A2" office:value-type="string">
            <text:p text:style-name="P4" loext:marker-style-name="T75"><text:span text:style-name="T76">說明</text:span><text:span text:style-name="T75"/></text:p>
          </table:table-cell>
          <table:table-cell table:style-name="表格98.A2" office:value-type="string">
            <text:p text:style-name="P4" loext:marker-style-name="T75"><text:span text:style-name="T76">白話</text:span><text:span text:style-name="T75"/></text:p>
          </table:table-cell>
        </table:table-row>
        <table:table-row table:style-name="表格98.1">
          <table:table-cell table:style-name="表格98.A3" office:value-type="string">
            <text:p text:style-name="P41"><text:span text:style-name="T728">🟦 Application Layer </text:span><text:span text:style-name="T726">應用層</text:span></text:p>
          </table:table-cell>
          <table:table-cell table:style-name="表格98.A3" office:value-type="string">
            <text:p text:style-name="P29" loext:marker-style-name="T147"><text:span text:style-name="T148">使用者所使用的服務，如網頁、</text:span><text:span text:style-name="T230">API</text:span><text:span text:style-name="T148">、</text:span><text:span text:style-name="T230">App</text:span></text:p>
          </table:table-cell>
          <table:table-cell table:style-name="表格98.A3" office:value-type="string">
            <text:p text:style-name="P29" loext:marker-style-name="T147"><text:span text:style-name="T148">你真正在用的東西</text:span><text:span text:style-name="T147"/></text:p>
          </table:table-cell>
        </table:table-row>
        <table:table-row table:style-name="表格98.1">
          <table:table-cell table:style-name="表格98.A4" office:value-type="string">
            <text:p text:style-name="P42"><text:span text:style-name="T728">🟨 Control Layer </text:span><text:span text:style-name="T726">控制層</text:span></text:p>
          </table:table-cell>
          <table:table-cell table:style-name="表格98.A4" office:value-type="string">
            <text:p text:style-name="P29" loext:marker-style-name="T147"><text:span text:style-name="T230">SDN Controller</text:span><text:span text:style-name="T148">（大腦），決定資料流向、集中管理</text:span></text:p>
          </table:table-cell>
          <table:table-cell table:style-name="表格98.A4" office:value-type="string">
            <text:p text:style-name="P29" loext:marker-style-name="T147"><text:span text:style-name="T148">交通指揮中心</text:span><text:span text:style-name="T147"/></text:p>
          </table:table-cell>
        </table:table-row>
        <table:table-row table:style-name="表格98.1">
          <table:table-cell table:style-name="表格98.A3" office:value-type="string">
            <text:p text:style-name="P43"><text:span text:style-name="T728">🟩 Infrastructure Layer </text:span><text:span text:style-name="T726">基礎層</text:span></text:p>
          </table:table-cell>
          <table:table-cell table:style-name="表格98.A3" office:value-type="string">
            <text:p text:style-name="P29" loext:marker-style-name="T147"><text:span text:style-name="T148">真正傳送資料的設備，如 </text:span><text:span text:style-name="T230">Router</text:span><text:span text:style-name="T148">、</text:span><text:span text:style-name="T230">Switch</text:span></text:p>
          </table:table-cell>
          <table:table-cell table:style-name="表格98.A3" office:value-type="string">
            <text:p text:style-name="P29" loext:marker-style-name="T147"><text:span text:style-name="T148">路、車道和車子</text:span><text:span text:style-name="T147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6"><text:span text:style-name="T247">⚡ <text:s/></text:span><text:span text:style-name="T251">記憶口訣</text:span></text:p>
            <text:p text:style-name="P7" loext:marker-style-name="T107"><text:span text:style-name="T106">「</text:span><text:span text:style-name="T194">SDN </text:span><text:span text:style-name="T106">分平面、三層 </text:span><text:span text:style-name="T194">App-</text:span><text:span text:style-name="T106">控</text:span><text:span text:style-name="T194">-</text:span><text:span text:style-name="T106">基」→ </text:span><text:span text:style-name="T132">分平面＝控制／資料分離</text:span><text:span text:style-name="T106">；</text:span><text:span text:style-name="T685">三層＝</text:span><text:span text:style-name="T690">Application / Control / Infrastructure</text:span><text:span text:style-name="T106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</text:span><text:span text:style-name="T27">Load Balancing</text:span><text:span text:style-name="T28">（負載平衡）</text:span></text:h>
      <text:p text:style-name="P35" loext:marker-style-name="T107"><text:span text:style-name="T106">當大量使用者同時存取同一網站，單一台伺服器會不堪負荷。負載平衡器</text:span><text:span text:style-name="T109">把流量「智慧分配」到多台伺</text:span><text:soft-page-break/><text:span text:style-name="T109">服器，確保每台都不過載</text:span><text:span text:style-name="T106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" loext:marker-style-name="T75"><text:span text:style-name="T76">策略</text:span><text:span text:style-name="T75"/></text:p>
            </table:table-cell>
            <table:table-cell table:style-name="表格99.A1" office:value-type="string">
              <text:p text:style-name="P4" loext:marker-style-name="T75"><text:span text:style-name="T76">說明</text:span><text:span text:style-name="T75"/></text:p>
            </table:table-cell>
            <table:table-cell table:style-name="表格99.A1" office:value-type="string">
              <text:p text:style-name="P4" loext:marker-style-name="T75"><text:span text:style-name="T76">優 </text:span><text:span text:style-name="T81">/ </text:span><text:span text:style-name="T76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9" loext:marker-style-name="T147"><text:span text:style-name="T230">① </text:span><text:span text:style-name="T241">Round Robin</text:span><text:span text:style-name="T173">（輪詢）</text:span></text:p>
          </table:table-cell>
          <table:table-cell table:style-name="表格99.A2" office:value-type="string">
            <text:p text:style-name="P29" loext:marker-style-name="T147"><text:span text:style-name="T176">依序輪流分配</text:span><text:span text:style-name="T148">，</text:span><text:span text:style-name="T177">不考慮伺服器效能或負載</text:span></text:p>
          </table:table-cell>
          <table:table-cell table:style-name="表格99.A2" office:value-type="string">
            <text:p text:style-name="P29" loext:marker-style-name="T147"><text:span text:style-name="T230">✓ </text:span><text:span text:style-name="T148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9" loext:marker-style-name="T147"><text:span text:style-name="T230">② </text:span><text:span text:style-name="T241">Weighted Round Robin</text:span><text:span text:style-name="T173">（加權輪詢）</text:span></text:p>
          </table:table-cell>
          <table:table-cell table:style-name="表格99.A3" office:value-type="string">
            <text:p text:style-name="P29" loext:marker-style-name="T147"><text:span text:style-name="T176">依各伺服器處理能力設「權重」</text:span><text:span text:style-name="T148">，</text:span><text:span text:style-name="T687">能力強分到更多</text:span></text:p>
          </table:table-cell>
          <table:table-cell table:style-name="表格99.A3" office:value-type="string">
            <text:p text:style-name="P29" loext:marker-style-name="T147"><text:span text:style-name="T230">✓ </text:span><text:span text:style-name="T148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9" loext:marker-style-name="T147"><text:span text:style-name="T230">③ </text:span><text:span text:style-name="T241">Session Stickiness</text:span><text:span text:style-name="T173">（會話黏著）</text:span></text:p>
          </table:table-cell>
          <table:table-cell table:style-name="表格99.A2" office:value-type="string">
            <text:p text:style-name="P29" loext:marker-style-name="T147"><text:span text:style-name="T631">同一使用者所有請求固定導向同一台</text:span><text:span text:style-name="T148">，</text:span><text:span text:style-name="T524">維持連線狀態</text:span></text:p>
          </table:table-cell>
          <table:table-cell table:style-name="表格99.A2" office:value-type="string">
            <text:p text:style-name="P29" loext:marker-style-name="T147"><text:span text:style-name="T230">✓ </text:span><text:span text:style-name="T148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6"><text:span text:style-name="T247">⚡ <text:s/></text:span><text:span text:style-name="T251">記憶口訣</text:span></text:p>
            <text:p text:style-name="P7" loext:marker-style-name="T107"><text:span text:style-name="T586">「</text:span><text:span text:style-name="T610">LB </text:span><text:span text:style-name="T586">輪、重、黏」</text:span><text:span text:style-name="T106">→ </text:span><text:span text:style-name="T132">輪＝</text:span><text:span text:style-name="T216">Round Robin</text:span><text:span text:style-name="T132">（輪流）；重＝</text:span><text:span text:style-name="T216">Weighted RR</text:span><text:span text:style-name="T132">（加權）；黏＝</text:span><text:span text:style-name="T216">Stickiness</text:span><text:span text:style-name="T132">（固定同一台）</text:span><text:span text:style-name="T106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三、</text:span><text:span text:style-name="T27">CDN</text:span><text:span text:style-name="T28">（</text:span><text:span text:style-name="T32">內容傳遞網路</text:span><text:span text:style-name="T28">）</text:span></text:h>
      <text:p text:style-name="P35" loext:marker-style-name="T107"><text:span text:style-name="T218">CDN</text:span><text:span text:style-name="T134">（</text:span><text:span text:style-name="T218">Content Delivery Network</text:span><text:span text:style-name="T134">）</text:span><text:span text:style-name="T106">透過</text:span><text:span text:style-name="T132">在全球各地部署</text:span><text:span text:style-name="T106">「</text:span><text:span text:style-name="T453">邊緣伺服器（</text:span><text:span text:style-name="T475">Edge Server</text:span><text:span text:style-name="T453">）</text:span><text:span text:style-name="T106">」加速內容傳遞。</text:span><text:span text:style-name="T637">當你開啟 </text:span><text:span text:style-name="T652">Google </text:span><text:span text:style-name="T637">或 </text:span><text:span text:style-name="T652">YouTube</text:span><text:span text:style-name="T637">，不需跨越太平洋連到美國總部，而是連到你附近的 </text:span><text:span text:style-name="T652">CDN </text:span><text:span text:style-name="T637">節點</text:span><text:span text:style-name="T106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6"><text:span text:style-name="T247">🌍 <text:s/></text:span><text:span text:style-name="T63">CDN </text:span><text:span text:style-name="T52">完整流程（一定要記）</text:span></text:p>
            <text:p text:style-name="P7" loext:marker-style-name="T107"><text:span text:style-name="T194">Step 1 </text:span><text:span text:style-name="T109">使用者輸入網址</text:span><text:span text:style-name="T106">（</text:span><text:span text:style-name="T194">www.example.com</text:span><text:span text:style-name="T106">）</text:span></text:p>
            <text:p text:style-name="P8" loext:marker-style-name="T107"><text:span text:style-name="T194">Step 2 </text:span><text:span text:style-name="T203">DNS </text:span><text:span text:style-name="T116">解析網址</text:span><text:span text:style-name="T106">，</text:span><text:span text:style-name="T388">找到對應 </text:span><text:span text:style-name="T400">CDN </text:span><text:span text:style-name="T388">的 </text:span><text:span text:style-name="T400">CNAME </text:span><text:span text:style-name="T388">記錄</text:span></text:p>
            <text:p text:style-name="P8" loext:marker-style-name="T107"><text:span text:style-name="T194">Step 3 </text:span><text:span text:style-name="T729">CNAME </text:span><text:span text:style-name="T731">將請求轉向 </text:span><text:span text:style-name="T729">CDN </text:span><text:span text:style-name="T731">服務商</text:span><text:span text:style-name="T106">（如 </text:span><text:span text:style-name="T194">cdn.example.net</text:span><text:span text:style-name="T106">）</text:span></text:p>
            <text:p text:style-name="P8" loext:marker-style-name="T107"><text:span text:style-name="T194">Step 4 </text:span><text:span text:style-name="T370">CDN </text:span><text:span text:style-name="T347">根據使用者地理位置，選擇最近的 </text:span><text:span text:style-name="T370">Edge </text:span><text:span text:style-name="T347">伺服器</text:span></text:p>
            <text:p text:style-name="P8" loext:marker-style-name="T107"><text:span text:style-name="T194">Step 5 Edge </text:span><text:span text:style-name="T106">伺服器將</text:span><text:span text:style-name="T538">快取內容</text:span><text:span text:style-name="T106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4" loext:marker-style-name="T69"><text:span text:style-name="T70">關鍵名詞</text:span><text:span text:style-name="T69"/></text:p>
          </table:table-cell>
          <table:table-cell table:style-name="表格100.A2" office:value-type="string">
            <text:p text:style-name="P4" loext:marker-style-name="T69"><text:span text:style-name="T70">說明</text:span><text:span text:style-name="T69"/></text:p>
          </table:table-cell>
        </table:table-row>
        <table:table-row table:style-name="表格100.1">
          <table:table-cell table:style-name="表格100.A3" office:value-type="string">
            <text:p text:style-name="P29" loext:marker-style-name="T83"><text:span text:style-name="T182">CNAME</text:span><text:span text:style-name="T84">（別名記錄）</text:span></text:p>
          </table:table-cell>
          <table:table-cell table:style-name="表格100.A3" office:value-type="string">
            <text:p text:style-name="P29" loext:marker-style-name="T83"><text:span text:style-name="T188">DNS </text:span><text:span text:style-name="T97">的一種記錄</text:span><text:span text:style-name="T84">，作用是「</text:span><text:span text:style-name="T735">網址指向另一個網址</text:span><text:span text:style-name="T84">」（不是 </text:span><text:span text:style-name="T182">IP</text:span><text:span text:style-name="T84">）。範例：</text:span><text:span text:style-name="T580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9" loext:marker-style-name="T83"><text:span text:style-name="T182">Edge Server</text:span><text:span text:style-name="T84">（邊緣伺服器）</text:span></text:p>
          </table:table-cell>
          <table:table-cell table:style-name="表格100.A4" office:value-type="string">
            <text:p text:style-name="P29" loext:marker-style-name="T83"><text:span text:style-name="T597">部署在全球各地靠近使用者的伺服器</text:span><text:span text:style-name="T84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6"><text:span text:style-name="T247">⚡ <text:s/></text:span><text:span text:style-name="T251">記憶口訣</text:span></text:p>
            <text:p text:style-name="P7" loext:marker-style-name="T107"><text:span text:style-name="T106">「</text:span><text:span text:style-name="T194">CDN</text:span><text:span text:style-name="T106">：網址轉轉轉，資料找最近」→ </text:span><text:span text:style-name="T729">CNAME</text:span><text:span text:style-name="T731">＝網址→網址</text:span><text:span text:style-name="T106">（不是 </text:span><text:span text:style-name="T194">IP</text:span><text:span text:style-name="T106">！）；</text:span><text:span text:style-name="T194">Edge</text:span><text:span text:style-name="T106">＝就近服務，不用跑遠。</text:span></text:p>
          </table:table-cell>
          <table:covered-table-cell/>
        </table:table-row>
      </table:table>
      <text:h text:style-name="P11" text:outline-level="2" loext:marker-style-name="T27"><text:span text:style-name="T28">四、</text:span><text:span text:style-name="T27">5G </text:span><text:span text:style-name="T28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" loext:marker-style-name="T75"><text:span text:style-name="T76">四大核心特性</text:span><text:span text:style-name="T75"/></text:p>
            </table:table-cell>
            <table:table-cell table:style-name="表格101.A1" office:value-type="string">
              <text:p text:style-name="P4" loext:marker-style-name="T75"><text:span text:style-name="T76">說明</text:span><text:span text:style-name="T75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9" loext:marker-style-name="T147"><text:span text:style-name="T230">① </text:span><text:span text:style-name="T173">高速傳輸（</text:span><text:span text:style-name="T241">eMBB</text:span><text:span text:style-name="T173">）</text:span></text:p>
          </table:table-cell>
          <table:table-cell table:style-name="表格101.A2" office:value-type="string">
            <text:p text:style-name="P29" loext:marker-style-name="T147"><text:span text:style-name="T230">Enhanced Mobile Broadband — </text:span><text:span text:style-name="T148">比 </text:span><text:span text:style-name="T230">4G </text:span><text:span text:style-name="T148">快數十倍，適合高畫質影音、</text:span><text:span text:style-name="T230">AR/VR</text:span></text:p>
          </table:table-cell>
        </table:table-row>
        <table:table-row table:style-name="表格101.1">
          <table:table-cell table:style-name="表格101.A3" office:value-type="string">
            <text:p text:style-name="P29" loext:marker-style-name="T147"><text:span text:style-name="T230">② </text:span><text:span text:style-name="T173">超低延遲（</text:span><text:span text:style-name="T241">URLLC</text:span><text:span text:style-name="T173">）</text:span></text:p>
          </table:table-cell>
          <table:table-cell table:style-name="表格101.A3" office:value-type="string">
            <text:p text:style-name="P29" loext:marker-style-name="T147"><text:span text:style-name="T230">Ultra-Reliable Low Latency — </text:span><text:span text:style-name="T148">延遲低至 </text:span><text:span text:style-name="T230">1ms </text:span><text:span text:style-name="T148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9" loext:marker-style-name="T147"><text:span text:style-name="T230">③ </text:span><text:span text:style-name="T173">大量連線（</text:span><text:span text:style-name="T241">mMTC</text:span><text:span text:style-name="T173">）</text:span></text:p>
          </table:table-cell>
          <table:table-cell table:style-name="表格101.A2" office:value-type="string">
            <text:p text:style-name="P29" loext:marker-style-name="T147"><text:span text:style-name="T230">Massive Machine Type — </text:span><text:span text:style-name="T148">每平方公里</text:span><text:span text:style-name="T439">可連數百萬台裝置</text:span><text:span text:style-name="T148">，適合 </text:span><text:span text:style-name="T230">IoT </text:span><text:span text:style-name="T148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9" loext:marker-style-name="T147"><text:span text:style-name="T230">④ </text:span><text:span text:style-name="T173">網路切片（</text:span><text:span text:style-name="T241">Network Slicing</text:span><text:span text:style-name="T173">）</text:span></text:p>
          </table:table-cell>
          <table:table-cell table:style-name="表格101.A3" office:value-type="string">
            <text:p text:style-name="P29" loext:marker-style-name="T147"><text:span text:style-name="T664">將同一物理網路虛擬化為多個獨立「切片」</text:span><text:span text:style-name="T148">，各自不同 </text:span><text:span text:style-name="T230">QoS</text:span><text:span text:style-name="T148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6"><text:span text:style-name="T247">⚡ <text:s/></text:span><text:span text:style-name="T251">記憶口訣</text:span></text:p>
            <text:p text:style-name="P7" loext:marker-style-name="T107"><text:span text:style-name="T106">「</text:span><text:span text:style-name="T370">5G </text:span><text:span text:style-name="T347">快、低、多、切</text:span><text:span text:style-name="T106">」→ 快（</text:span><text:span text:style-name="T194">eMBB</text:span><text:span text:style-name="T106">）＝高速；低（</text:span><text:span text:style-name="T194">URLLC</text:span><text:span text:style-name="T106">）＝超低延遲；多（</text:span><text:span text:style-name="T194">mMTC</text:span><text:span text:style-name="T106">）＝大量連</text:span><text:soft-page-break/><text:span text:style-name="T106">線；切＝網路切片。</text:span></text:p>
          </table:table-cell>
          <table:covered-table-cell/>
        </table:table-row>
      </table:table>
      <text:h text:style-name="P11" text:outline-level="2" loext:marker-style-name="T27"><text:span text:style-name="T28">五、本篇陷阱與情境串連</text:span><text:span text:style-name="T27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" loext:marker-style-name="T75"><text:span text:style-name="T76">常見錯誤</text:span><text:span text:style-name="T75"/></text:p>
            </table:table-cell>
            <table:table-cell table:style-name="表格102.A1" office:value-type="string">
              <text:p text:style-name="P4" loext:marker-style-name="T75"><text:span text:style-name="T76">正確觀念</text:span><text:span text:style-name="T75"/></text:p>
            </table:table-cell>
            <table:table-cell table:style-name="表格102.A1" office:value-type="string">
              <text:p text:style-name="P4" loext:marker-style-name="T75"><text:span text:style-name="T76">主題</text:span><text:span text:style-name="T75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9" loext:marker-style-name="T147"><text:span text:style-name="T230">SDN </text:span><text:span text:style-name="T148">是把控制與資料整合</text:span></text:p>
          </table:table-cell>
          <table:table-cell table:style-name="表格102.A2" office:value-type="string">
            <text:p text:style-name="P29" loext:marker-style-name="T147"><text:span text:style-name="T230">SDN = </text:span><text:span text:style-name="T148">控制與資料「分離」</text:span></text:p>
          </table:table-cell>
          <table:table-cell table:style-name="表格102.A2" office:value-type="string">
            <text:p text:style-name="P29" loext:marker-style-name="T147"><text:span text:style-name="T230">SDN</text:span><text:span text:style-name="T147"/></text:p>
          </table:table-cell>
        </table:table-row>
        <table:table-row table:style-name="表格102.1">
          <table:table-cell table:style-name="表格102.A3" office:value-type="string">
            <text:p text:style-name="P29" loext:marker-style-name="T147"><text:span text:style-name="T230">Round Robin </text:span><text:span text:style-name="T148">會考慮伺服器效能</text:span></text:p>
          </table:table-cell>
          <table:table-cell table:style-name="表格102.A3" office:value-type="string">
            <text:p text:style-name="P29" loext:marker-style-name="T147"><text:span text:style-name="T230">RR </text:span><text:span text:style-name="T148">不看效能，</text:span><text:span text:style-name="T230">Weighted RR </text:span><text:span text:style-name="T148">才看</text:span></text:p>
          </table:table-cell>
          <table:table-cell table:style-name="表格102.A3" office:value-type="string">
            <text:p text:style-name="P29" loext:marker-style-name="T147"><text:span text:style-name="T230">LB</text:span><text:span text:style-name="T147"/></text:p>
          </table:table-cell>
        </table:table-row>
        <table:table-row table:style-name="表格102.1">
          <table:table-cell table:style-name="表格102.A2" office:value-type="string">
            <text:p text:style-name="P29" loext:marker-style-name="T147"><text:span text:style-name="T230">Stickiness </text:span><text:span text:style-name="T148">是平均分配流量</text:span></text:p>
          </table:table-cell>
          <table:table-cell table:style-name="表格102.A2" office:value-type="string">
            <text:p text:style-name="P29" loext:marker-style-name="T147"><text:span text:style-name="T230">Stickiness = </text:span><text:span text:style-name="T148">固定同一台 </text:span><text:span text:style-name="T230">Server</text:span></text:p>
          </table:table-cell>
          <table:table-cell table:style-name="表格102.A2" office:value-type="string">
            <text:p text:style-name="P29" loext:marker-style-name="T147"><text:span text:style-name="T230">LB</text:span><text:span text:style-name="T147"/></text:p>
          </table:table-cell>
        </table:table-row>
        <table:table-row table:style-name="表格102.1">
          <table:table-cell table:style-name="表格102.A3" office:value-type="string">
            <text:p text:style-name="P29" loext:marker-style-name="T147"><text:span text:style-name="T230">CDN </text:span><text:span text:style-name="T148">是把資料放在中心機房</text:span></text:p>
          </table:table-cell>
          <table:table-cell table:style-name="表格102.A3" office:value-type="string">
            <text:p text:style-name="P29" loext:marker-style-name="T147"><text:span text:style-name="T230">CDN </text:span><text:span text:style-name="T148">放在</text:span><text:span text:style-name="T631">靠近使用者的 </text:span><text:span text:style-name="T634">Edge </text:span><text:span text:style-name="T631">節點</text:span></text:p>
          </table:table-cell>
          <table:table-cell table:style-name="表格102.A3" office:value-type="string">
            <text:p text:style-name="P29" loext:marker-style-name="T147"><text:span text:style-name="T230">CDN</text:span><text:span text:style-name="T147"/></text:p>
          </table:table-cell>
        </table:table-row>
        <table:table-row table:style-name="表格102.1">
          <table:table-cell table:style-name="表格102.A2" office:value-type="string">
            <text:p text:style-name="P29" loext:marker-style-name="T147"><text:span text:style-name="T230">CNAME </text:span><text:span text:style-name="T148">是 </text:span><text:span text:style-name="T230">IP </text:span><text:span text:style-name="T148">位址的對應</text:span></text:p>
          </table:table-cell>
          <table:table-cell table:style-name="表格102.A2" office:value-type="string">
            <text:p text:style-name="P29" loext:marker-style-name="T147"><text:span text:style-name="T396">CNAME = </text:span><text:span text:style-name="T383">網址 → 網址</text:span><text:span text:style-name="T148">（非 </text:span><text:span text:style-name="T230">IP</text:span><text:span text:style-name="T148">）</text:span></text:p>
          </table:table-cell>
          <table:table-cell table:style-name="表格102.A2" office:value-type="string">
            <text:p text:style-name="P29" loext:marker-style-name="T147"><text:span text:style-name="T230">CDN</text:span><text:span text:style-name="T147"/></text:p>
          </table:table-cell>
        </table:table-row>
        <table:table-row table:style-name="表格102.1">
          <table:table-cell table:style-name="表格102.A3" office:value-type="string">
            <text:p text:style-name="P29" loext:marker-style-name="T147"><text:span text:style-name="T230">WiFi </text:span><text:span text:style-name="T148">使用 </text:span><text:span text:style-name="T230">CSMA/CD</text:span></text:p>
          </table:table-cell>
          <table:table-cell table:style-name="表格102.A3" office:value-type="string">
            <text:p text:style-name="P29" loext:marker-style-name="T147"><text:span text:style-name="T239">WiFi </text:span><text:span text:style-name="T170">用 </text:span><text:span text:style-name="T239">CSMA/CA</text:span><text:span text:style-name="T148">（</text:span><text:span text:style-name="T230">CD </text:span><text:span text:style-name="T148">是有線網路）</text:span></text:p>
          </table:table-cell>
          <table:table-cell table:style-name="表格102.A3" office:value-type="string">
            <text:p text:style-name="P29" loext:marker-style-name="T147"><text:span text:style-name="T230">WiFi</text:span><text:span text:style-name="T147"/></text:p>
          </table:table-cell>
        </table:table-row>
        <table:table-row table:style-name="表格102.1">
          <table:table-cell table:style-name="表格102.A2" office:value-type="string">
            <text:p text:style-name="P29" loext:marker-style-name="T147"><text:span text:style-name="T230">5G </text:span><text:span text:style-name="T148">只是速度變快</text:span></text:p>
          </table:table-cell>
          <table:table-cell table:style-name="表格102.A2" office:value-type="string">
            <text:p text:style-name="P29" loext:marker-style-name="T147"><text:span text:style-name="T230">5G </text:span><text:span text:style-name="T148">還有低延遲、大量連線、網路切片</text:span></text:p>
          </table:table-cell>
          <table:table-cell table:style-name="表格102.A2" office:value-type="string">
            <text:p text:style-name="P29" loext:marker-style-name="T147"><text:span text:style-name="T230">5G</text:span><text:span text:style-name="T147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6"><text:span text:style-name="T247">🔗 <text:s/></text:span><text:span text:style-name="T52">使用情境串連（理解記憶）</text:span></text:p>
            <text:p text:style-name="P7" loext:marker-style-name="T107"><text:span text:style-name="T106">想像你用手機打開 </text:span><text:span text:style-name="T194">App</text:span><text:span text:style-name="T106">：① 開啟 </text:span><text:span text:style-name="T194">App → Application Layer</text:span><text:span text:style-name="T106">；② </text:span><text:span text:style-name="T194">SDN Controller </text:span><text:span text:style-name="T106">決定資料怎麼走 → </text:span><text:span text:style-name="T194">Control Layer</text:span><text:span text:style-name="T106">；③ </text:span><text:span text:style-name="T194">Router/Switch </text:span><text:span text:style-name="T106">實際傳送 → </text:span><text:span text:style-name="T194">Infrastructure Layer</text:span><text:span text:style-name="T106">；④ </text:span><text:span text:style-name="T194">Load Balancer </text:span><text:span text:style-name="T106">把請求分配到空閒伺服器 → </text:span><text:span text:style-name="T194">Load Balancing</text:span><text:span text:style-name="T106">；⑤ </text:span><text:span text:style-name="T194">CDN </text:span><text:span text:style-name="T106">找最近節點傳回網頁 → </text:span><text:span text:style-name="T194">CDN Edge</text:span><text:span text:style-name="T106">；⑥ 資料透過 </text:span><text:span text:style-name="T194">WiFi </text:span><text:span text:style-name="T106">或 </text:span><text:span text:style-name="T194">5G </text:span><text:span text:style-name="T106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71"><text:span text:style-name="T72">第 九 篇　無線通訊：</text:span><text:span text:style-name="T71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"><text:span text:style-name="T247">💡 <text:s/></text:span><text:span text:style-name="T52">核心問題：大家同時說話會怎樣？</text:span></text:p>
            <text:p text:style-name="P7" loext:marker-style-name="T107"><text:span text:style-name="T106">很多裝置想用無線電波傳資料，若同時傳訊號會「撞在一起」。這個「決定誰先傳」的規則，就叫 </text:span><text:span text:style-name="T194">MAC </text:span><text:span text:style-name="T106">機制（</text:span><text:span text:style-name="T194">Media Access Control</text:span><text:span text:style-name="T106">）。⚠️ 注意：這裡的 </text:span><text:span text:style-name="T194">MAC </text:span><text:span text:style-name="T106">指「誰先傳資料的規則」，不是 </text:span><text:span text:style-name="T194">MAC </text:span><text:span text:style-name="T106">位址（硬體位址）！</text:span></text:p>
          </table:table-cell>
        </table:table-row>
      </table:table>
      <text:h text:style-name="P11" text:outline-level="2" loext:marker-style-name="T27"><text:span text:style-name="T28">一、</text:span><text:span text:style-name="T27">WiFi</text:span><text:span text:style-name="T28">：先聽再講（</text:span><text:span text:style-name="T27">CSMA/CA</text:span><text:span text:style-name="T28">）</text:span></text:h>
      <text:p text:style-name="P35" loext:marker-style-name="T107"><text:span text:style-name="T194">WiFi </text:span><text:span text:style-name="T106">採用「先聽再講」的競爭機制，就像一群人用對講機：① 先聽頻道有沒有人在傳；② 沒人傳才開始傳；③ 有人在傳就等一段隨機時間再試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4" loext:marker-style-name="T69"><text:span text:style-name="T79">CSMA/CA </text:span><text:span text:style-name="T70">拆解</text:span></text:p>
            </table:table-cell>
            <table:table-cell table:style-name="表格104.A1" office:value-type="string">
              <text:p text:style-name="P4" loext:marker-style-name="T69"><text:span text:style-name="T70">意義</text:span><text:span text:style-name="T69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9" loext:marker-style-name="T83"><text:span text:style-name="T182">Carrier Sense </text:span><text:span text:style-name="T84">載波感測</text:span></text:p>
          </table:table-cell>
          <table:table-cell table:style-name="表格104.A2" office:value-type="string">
            <text:p text:style-name="P29" loext:marker-style-name="T83"><text:span text:style-name="T84">先聽頻道有沒有人在用</text:span><text:span text:style-name="T83"/></text:p>
          </table:table-cell>
        </table:table-row>
        <table:table-row table:style-name="表格104.1">
          <table:table-cell table:style-name="表格104.A3" office:value-type="string">
            <text:p text:style-name="P29" loext:marker-style-name="T83"><text:span text:style-name="T182">Multiple Access </text:span><text:span text:style-name="T84">多重存取</text:span></text:p>
          </table:table-cell>
          <table:table-cell table:style-name="表格104.A3" office:value-type="string">
            <text:p text:style-name="P29" loext:marker-style-name="T83"><text:span text:style-name="T84">大家共用同一個頻道</text:span><text:span text:style-name="T83"/></text:p>
          </table:table-cell>
        </table:table-row>
        <table:table-row table:style-name="表格104.1">
          <table:table-cell table:style-name="表格104.A2" office:value-type="string">
            <text:p text:style-name="P29" loext:marker-style-name="T83"><text:span text:style-name="T182">Collision Avoidance </text:span><text:span text:style-name="T84">碰撞避免</text:span></text:p>
          </table:table-cell>
          <table:table-cell table:style-name="表格104.A2" office:value-type="string">
            <text:p text:style-name="P29" loext:marker-style-name="T83"><text:span text:style-name="T84">盡量「避免」訊號互撞（而非偵測後再處理）</text:span><text:span text:style-name="T83"/>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6"><text:span text:style-name="T247">📶 <text:s/></text:span><text:span text:style-name="T67">WiFi </text:span><text:span text:style-name="T59">高速基礎</text:span></text:p>
            <text:p text:style-name="P7" loext:marker-style-name="T107"><text:span text:style-name="T106">另：</text:span><text:span text:style-name="T194">OFDM</text:span><text:span text:style-name="T106">（正交分頻多工）— 將資料分成多個子頻道同時傳輸，讓頻寬利用率大幅提升，是現代 </text:span><text:span text:style-name="T194">WiFi </text:span><text:span text:style-name="T106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6"><text:span text:style-name="T247">🚑 <text:s/></text:span><text:span text:style-name="T261">WiFi </text:span><text:span text:style-name="T251">的 </text:span><text:span text:style-name="T261">QoS</text:span><text:span text:style-name="T251">：</text:span><text:span text:style-name="T261">EDCA</text:span></text:p>
            <text:p text:style-name="P7" loext:marker-style-name="T107"><text:span text:style-name="T106">當很多人在搶頻道，某些資料（語音、視訊）需要優先通過，這就是 </text:span><text:span text:style-name="T194">EDCA</text:span><text:span text:style-name="T106">（</text:span><text:span text:style-name="T194">Enhanced Distributed Channel Access</text:span><text:span text:style-name="T106">）的功能。視訊通話</text:span><text:span text:style-name="T194">/</text:span><text:span text:style-name="T106">語音→少等、優先傳；網頁</text:span><text:span text:style-name="T194">/</text:span><text:span text:style-name="T106">大檔下載→稍微等一下也沒關係。</text:span></text:p>
            <text:p text:style-name="P8" loext:marker-style-name="T107"><text:span text:style-name="T106">記憶口訣：</text:span><text:span text:style-name="T194">WiFi = </text:span><text:span text:style-name="T106">急診室排隊制度（心臟病</text:span><text:span text:style-name="T194">/</text:span><text:span text:style-name="T106">語音視訊優先，小感冒</text:span><text:span text:style-name="T194">/</text:span><text:span text:style-name="T106">網頁下載等一下）。</text:span></text:p>
          </table:table-cell>
          <table:covered-table-cell/>
        </table:table-row>
      </table:table>
      <text:h text:style-name="P11" text:outline-level="2" loext:marker-style-name="T27"><text:span text:style-name="T28">二、</text:span><text:span text:style-name="T27">Bluetooth</text:span><text:span text:style-name="T28">：老大排班（</text:span><text:span text:style-name="T27">Master-Slave</text:span><text:span text:style-name="T28">）</text:span></text:h>
      <text:p text:style-name="P35" loext:marker-style-name="T107"><text:span text:style-name="T194">Bluetooth </text:span><text:span text:style-name="T106">不靠「搶」，而是由 </text:span><text:span text:style-name="T194">Master </text:span><text:span text:style-name="T106">統一分配時間，</text:span><text:span text:style-name="T194">Slave </text:span><text:span text:style-name="T106">照順序傳資料（</text:span><text:span text:style-name="T194">0~1ms </text:span><text:span text:style-name="T106">耳機、</text:span><text:span text:style-name="T194">1~2ms </text:span><text:span text:style-name="T106">滑鼠、</text:span><text:span text:style-name="T194">2~3ms </text:span><text:span text:style-name="T106">鍵盤、</text:span><text:span text:style-name="T194">3~4ms </text:span><text:span text:style-name="T106">再回耳機…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6"><text:span text:style-name="T247">🔵 <text:s/></text:span><text:span text:style-name="T59">為什麼要排班？</text:span></text:p>
            <text:p text:style-name="P7" loext:marker-style-name="T107"><text:span text:style-name="T106">因為藍牙裝置大多是「即時設備」，延遲太久就沒用了（耳機你說「你好」</text:span><text:span text:style-name="T194">2 </text:span><text:span text:style-name="T106">秒後才到→完蛋；滑鼠 </text:span><text:span text:style-name="T194">1 </text:span><text:span text:style-name="T106">秒後游標才動→無法使用）。因此 </text:span><text:span text:style-name="T194">Bluetooth </text:span><text:span text:style-name="T106">保留固定時槽（</text:span><text:span text:style-name="T194">Time Slot</text:span><text:span text:style-name="T106">），確保即時性與穩定性。</text:span></text:p>
            <text:p text:style-name="P8" loext:marker-style-name="T107"><text:span text:style-name="T106">記憶口訣：</text:span><text:span text:style-name="T194">WiFi = </text:span><text:span text:style-name="T106">菜市場（自由競爭，亂搶）；</text:span><text:span text:style-name="T194">Bluetooth = </text:span><text:span text:style-name="T106">公司會議室預約（固定排班，有秩序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4" loext:marker-style-name="T69"><text:span text:style-name="T70">即時語音</text:span><text:span text:style-name="T69"/></text:p>
          </table:table-cell>
          <table:table-cell table:style-name="表格105.A2" office:value-type="string">
            <text:p text:style-name="P4" loext:marker-style-name="T69"><text:span text:style-name="T70">全名</text:span><text:span text:style-name="T69"/></text:p>
          </table:table-cell>
          <table:table-cell table:style-name="表格105.A2" office:value-type="string">
            <text:p text:style-name="P4" loext:marker-style-name="T69"><text:span text:style-name="T70">說明</text:span><text:span text:style-name="T69"/></text:p>
          </table:table-cell>
          <table:table-cell table:style-name="表格105.A2" office:value-type="string">
            <text:p text:style-name="P4" loext:marker-style-name="T69"><text:span text:style-name="T70">用途</text:span><text:span text:style-name="T69"/></text:p>
          </table:table-cell>
        </table:table-row>
        <table:table-row table:style-name="表格105.1">
          <table:table-cell table:style-name="表格105.A3" office:value-type="string">
            <text:p text:style-name="P29" loext:marker-style-name="T83"><text:span text:style-name="T182">SCO</text:span><text:span text:style-name="T83"/></text:p>
          </table:table-cell>
          <table:table-cell table:style-name="表格105.A3" office:value-type="string">
            <text:p text:style-name="P29" loext:marker-style-name="T83"><text:span text:style-name="T182">Synchronous Connection-Oriented</text:span><text:span text:style-name="T83"/></text:p>
          </table:table-cell>
          <table:table-cell table:style-name="表格105.A3" office:value-type="string">
            <text:p text:style-name="P29" loext:marker-style-name="T83"><text:span text:style-name="T84">固定時槽、同步傳輸</text:span><text:span text:style-name="T83"/></text:p>
          </table:table-cell>
          <table:table-cell table:style-name="表格105.A3" office:value-type="string">
            <text:p text:style-name="P29" loext:marker-style-name="T83"><text:span text:style-name="T84">藍牙耳機通話</text:span><text:span text:style-name="T83"/></text:p>
          </table:table-cell>
        </table:table-row>
        <table:table-row table:style-name="表格105.1">
          <table:table-cell table:style-name="表格105.A4" office:value-type="string">
            <text:p text:style-name="P29" loext:marker-style-name="T83"><text:span text:style-name="T182">eSCO</text:span><text:span text:style-name="T83"/></text:p>
          </table:table-cell>
          <table:table-cell table:style-name="表格105.A4" office:value-type="string">
            <text:p text:style-name="P29" loext:marker-style-name="T83"><text:span text:style-name="T182">Enhanced SCO</text:span><text:span text:style-name="T83"/></text:p>
          </table:table-cell>
          <table:table-cell table:style-name="表格105.A4" office:value-type="string">
            <text:p text:style-name="P29" loext:marker-style-name="T83"><text:span text:style-name="T182">SCO </text:span><text:span text:style-name="T84">加強版、可重傳、品質更好</text:span></text:p>
          </table:table-cell>
          <table:table-cell table:style-name="表格105.A4" office:value-type="string">
            <text:p text:style-name="P29" loext:marker-style-name="T83"><text:span text:style-name="T84">高品質語音</text:span><text:span text:style-name="T83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6"><text:span text:style-name="T247">🔀 <text:s/></text:span><text:span text:style-name="T67">Bluetooth </text:span><text:span text:style-name="T59">抗干擾</text:span></text:p>
            <text:p text:style-name="P7" loext:marker-style-name="T107"><text:span text:style-name="T106">另：</text:span><text:span text:style-name="T194">FHSS</text:span><text:span text:style-name="T106">（跳頻展頻）— 在 </text:span><text:span text:style-name="T194">2.4GHz </text:span><text:span text:style-name="T106">頻段中每秒快速切換數百次（每秒約 </text:span><text:span text:style-name="T194">1600 </text:span><text:span text:style-name="T106">次）頻道，避免與其他設備干擾，提升穩定性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三、深入理解：時槽（</text:span><text:span text:style-name="T27">Time Slot</text:span><text:span text:style-name="T28">）</text:span></text:h>
      <text:p text:style-name="P35" loext:marker-style-name="T107"><text:span text:style-name="T106">時槽就是「切好的時間格子」。藍牙頻道像一條只有一個人能講話的走廊，如果大家同時講會混在一起亂掉。</text:span><text:span text:style-name="T194">Bluetooth </text:span><text:span text:style-name="T106">的解法：把時間先切成固定小格子，每個格子叫 </text:span><text:span text:style-name="T194">Time Slot</text:span><text:span text:style-name="T106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" loext:marker-style-name="T75"><text:span text:style-name="T76">三大好處</text:span><text:span text:style-name="T75"/></text:p>
            </table:table-cell>
            <table:table-cell table:style-name="表格106.A1" table:number-columns-spanned="2" office:value-type="string">
              <text:p text:style-name="P4" loext:marker-style-name="T75"><text:span text:style-name="T76">說明</text:span><text:span text:style-name="T75"/></text:p>
            </table:table-cell>
            <table:covered-table-cell/>
            <table:table-cell table:style-name="表格106.A1" office:value-type="string">
              <text:p text:style-name="P4" loext:marker-style-name="T75"><text:span text:style-name="T76">比喻</text:span><text:span text:style-name="T75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9" loext:marker-style-name="T147"><text:span text:style-name="T148">穩定不碰撞</text:span><text:span text:style-name="T147"/></text:p>
          </table:table-cell>
          <table:table-cell table:style-name="表格106.A2" table:number-columns-spanned="2" office:value-type="string">
            <text:p text:style-name="P29" loext:marker-style-name="T147"><text:span text:style-name="T148">每人有專屬時間，不會互相干擾</text:span><text:span text:style-name="T147"/></text:p>
          </table:table-cell>
          <table:covered-table-cell/>
          <table:table-cell table:style-name="表格106.A2" office:value-type="string">
            <text:p text:style-name="P29" loext:marker-style-name="T147"><text:span text:style-name="T148">公司會議室預約制</text:span><text:span text:style-name="T147"/></text:p>
          </table:table-cell>
        </table:table-row>
        <table:table-row table:style-name="表格106.1">
          <table:table-cell table:style-name="表格106.A3" office:value-type="string">
            <text:p text:style-name="P29" loext:marker-style-name="T147"><text:span text:style-name="T148">即時性保證</text:span><text:span text:style-name="T147"/></text:p>
          </table:table-cell>
          <table:table-cell table:style-name="表格106.A3" table:number-columns-spanned="2" office:value-type="string">
            <text:p text:style-name="P29" loext:marker-style-name="T147"><text:span text:style-name="T148">耳機每隔固定時間必定輪到，聲音不卡頓</text:span><text:span text:style-name="T147"/></text:p>
          </table:table-cell>
          <table:covered-table-cell/>
          <table:table-cell table:style-name="表格106.A3" office:value-type="string">
            <text:p text:style-name="P29" loext:marker-style-name="T147"><text:span text:style-name="T148">醫院預約制，準時看診</text:span><text:span text:style-name="T147"/></text:p>
          </table:table-cell>
        </table:table-row>
        <table:table-row table:style-name="表格106.1">
          <table:table-cell table:style-name="表格106.A2" office:value-type="string">
            <text:p text:style-name="P29" loext:marker-style-name="T147"><text:span text:style-name="T148">省電效果</text:span><text:span text:style-name="T147"/></text:p>
          </table:table-cell>
          <table:table-cell table:style-name="表格106.A2" table:number-columns-spanned="2" office:value-type="string">
            <text:p text:style-name="P29" loext:marker-style-name="T147"><text:span text:style-name="T148">裝置知道「還沒輪到我」，可先休眠等待</text:span><text:span text:style-name="T147"/></text:p>
          </table:table-cell>
          <table:covered-table-cell/>
          <table:table-cell table:style-name="表格106.A2" office:value-type="string">
            <text:p text:style-name="P29" loext:marker-style-name="T147"><text:span text:style-name="T148">等候室等叫號，先睡一下</text:span><text:span text:style-name="T147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26" loext:marker-style-name="T69"><text:span text:style-name="T79">WiFi </text:span><text:span text:style-name="T70">競爭制</text:span></text:p>
          </table:table-cell>
          <table:covered-table-cell/>
          <table:table-cell table:style-name="表格106.A1" table:number-columns-spanned="2" office:value-type="string">
            <text:p text:style-name="P26" loext:marker-style-name="T69"><text:span text:style-name="T79">BT </text:span><text:span text:style-name="T70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9" loext:marker-style-name="T83"><text:span text:style-name="T84">菜市場：大家自由搶。吞吐量高、速度快，但可能塞車、延遲不穩定。</text:span><text:span text:style-name="T83"/></text:p>
          </table:table-cell>
          <table:covered-table-cell/>
          <table:table-cell table:style-name="表格106.A2" table:number-columns-spanned="2" office:value-type="string">
            <text:p text:style-name="P29" loext:marker-style-name="T83"><text:span text:style-name="T84">醫院預約制：輪流看診。延遲固定、穩定省電，但速度不如 </text:span><text:span text:style-name="T182">WiFi </text:span><text:span text:style-name="T84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6"><text:span text:style-name="T247">🕐 <text:s/></text:span><text:span text:style-name="T299">考試定義（背起來）</text:span></text:p>
            <text:p text:style-name="P7" loext:marker-style-name="T107"><text:span text:style-name="T194">Time Slot</text:span><text:span text:style-name="T106">（時槽）＝將時間切成固定小區段，由不同裝置依序使用，避免碰撞並確保即時性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WiFi vs Bluetooth </text:span><text:span text:style-name="T28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4" loext:marker-style-name="T69"><text:span text:style-name="T70">項目</text:span><text:span text:style-name="T69"/></text:p>
            </table:table-cell>
            <table:table-cell table:style-name="表格107.A1" office:value-type="string">
              <text:p text:style-name="P4" loext:marker-style-name="T69"><text:span text:style-name="T79">WiFi</text:span><text:span text:style-name="T69"/></text:p>
            </table:table-cell>
            <table:table-cell table:style-name="表格107.A1" office:value-type="string">
              <text:p text:style-name="P4" loext:marker-style-name="T69"><text:span text:style-name="T79">Bluetooth</text:span><text:span text:style-name="T69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9" loext:marker-style-name="T83"><text:span text:style-name="T84">核心機制</text:span><text:span text:style-name="T83"/></text:p>
          </table:table-cell>
          <table:table-cell table:style-name="表格107.A2" office:value-type="string">
            <text:p text:style-name="P29" loext:marker-style-name="T83"><text:span text:style-name="T182">CSMA/CA</text:span><text:span text:style-name="T84">（先偵聽再傳）</text:span></text:p>
          </table:table-cell>
          <table:table-cell table:style-name="表格107.A2" office:value-type="string">
            <text:p text:style-name="P29" loext:marker-style-name="T83"><text:span text:style-name="T182">Master-Slave</text:span><text:span text:style-name="T84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29" loext:marker-style-name="T83"><text:span text:style-name="T84">即時語音 </text:span><text:span text:style-name="T182">/ QoS</text:span></text:p>
          </table:table-cell>
          <table:table-cell table:style-name="表格107.A3" office:value-type="string">
            <text:p text:style-name="P29" loext:marker-style-name="T83"><text:span text:style-name="T182">EDCA</text:span><text:span text:style-name="T84">（</text:span><text:span text:style-name="T182">QoS </text:span><text:span text:style-name="T84">優先）</text:span></text:p>
          </table:table-cell>
          <table:table-cell table:style-name="表格107.A3" office:value-type="string">
            <text:p text:style-name="P29" loext:marker-style-name="T83"><text:span text:style-name="T182">SCO / eSCO</text:span><text:span text:style-name="T84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9" loext:marker-style-name="T83"><text:span text:style-name="T84">速度</text:span><text:span text:style-name="T83"/></text:p>
          </table:table-cell>
          <table:table-cell table:style-name="表格107.A2" office:value-type="string">
            <text:p text:style-name="P29" loext:marker-style-name="T83"><text:span text:style-name="T84">高速（快）</text:span><text:span text:style-name="T83"/></text:p>
          </table:table-cell>
          <table:table-cell table:style-name="表格107.A2" office:value-type="string">
            <text:p text:style-name="P29" loext:marker-style-name="T83"><text:span text:style-name="T84">較慢</text:span><text:span text:style-name="T83"/></text:p>
          </table:table-cell>
        </table:table-row>
        <table:table-row table:style-name="表格107.1">
          <table:table-cell table:style-name="表格107.A3" office:value-type="string">
            <text:p text:style-name="P29" loext:marker-style-name="T83"><text:span text:style-name="T84">耗電量</text:span><text:span text:style-name="T83"/></text:p>
          </table:table-cell>
          <table:table-cell table:style-name="表格107.A3" office:value-type="string">
            <text:p text:style-name="P29" loext:marker-style-name="T83"><text:span text:style-name="T84">較高</text:span><text:span text:style-name="T83"/></text:p>
          </table:table-cell>
          <table:table-cell table:style-name="表格107.A3" office:value-type="string">
            <text:p text:style-name="P29" loext:marker-style-name="T83"><text:span text:style-name="T84">低功耗</text:span><text:span text:style-name="T83"/></text:p>
          </table:table-cell>
        </table:table-row>
        <table:table-row table:style-name="表格107.1">
          <table:table-cell table:style-name="表格107.A2" office:value-type="string">
            <text:p text:style-name="P29" loext:marker-style-name="T83"><text:span text:style-name="T84">傳輸距離</text:span><text:span text:style-name="T83"/></text:p>
          </table:table-cell>
          <table:table-cell table:style-name="表格107.A2" office:value-type="string">
            <text:p text:style-name="P29" loext:marker-style-name="T83"><text:span text:style-name="T84">較遠（數十</text:span><text:span text:style-name="T182">~</text:span><text:span text:style-name="T84">百公尺）</text:span></text:p>
          </table:table-cell>
          <table:table-cell table:style-name="表格107.A2" office:value-type="string">
            <text:p text:style-name="P29" loext:marker-style-name="T83"><text:span text:style-name="T84">較短（約 </text:span><text:span text:style-name="T182">10 </text:span><text:span text:style-name="T84">公尺）</text:span></text:p>
          </table:table-cell>
        </table:table-row>
        <table:table-row table:style-name="表格107.1">
          <table:table-cell table:style-name="表格107.A3" office:value-type="string">
            <text:p text:style-name="P29" loext:marker-style-name="T83"><text:span text:style-name="T84">穩定性</text:span><text:span text:style-name="T83"/></text:p>
          </table:table-cell>
          <table:table-cell table:style-name="表格107.A3" office:value-type="string">
            <text:p text:style-name="P29" loext:marker-style-name="T83"><text:span text:style-name="T84">受干擾影響較大</text:span><text:span text:style-name="T83"/></text:p>
          </table:table-cell>
          <table:table-cell table:style-name="表格107.A3" office:value-type="string">
            <text:p text:style-name="P29" loext:marker-style-name="T83"><text:span text:style-name="T84">固定時槽非常穩定</text:span><text:span text:style-name="T83"/></text:p>
          </table:table-cell>
        </table:table-row>
        <table:table-row table:style-name="表格107.1">
          <table:table-cell table:style-name="表格107.A2" office:value-type="string">
            <text:p text:style-name="P29" loext:marker-style-name="T83"><text:span text:style-name="T84">適用場景</text:span><text:span text:style-name="T83"/></text:p>
          </table:table-cell>
          <table:table-cell table:style-name="表格107.A2" office:value-type="string">
            <text:p text:style-name="P29" loext:marker-style-name="T83"><text:span text:style-name="T84">上網、看影片、大檔下載</text:span><text:span text:style-name="T83"/></text:p>
          </table:table-cell>
          <table:table-cell table:style-name="表格107.A2" office:value-type="string">
            <text:p text:style-name="P29" loext:marker-style-name="T83"><text:span text:style-name="T84">耳機、滑鼠、鍵盤、通話</text:span><text:span text:style-name="T83"/></text:p>
          </table:table-cell>
        </table:table-row>
      </table:table>
      <text:h text:style-name="P11" text:outline-level="2" loext:marker-style-name="T27"><text:span text:style-name="T28">五、</text:span><text:span text:style-name="T27">L2CAP</text:span><text:span text:style-name="T28">：藍牙的資料管理員</text:span></text:h>
      <text:p text:style-name="P35" loext:marker-style-name="T107"><text:span text:style-name="T194">L2CAP</text:span><text:span text:style-name="T106">（</text:span><text:span text:style-name="T194">Logical Link Control and Adaptation Protocol</text:span><text:span text:style-name="T106">）是藍牙協議的重要一層，負責：管理並分流不同類型的資料（語音、檔案、控制指令）；建立、管理、釋放「邏輯通道」；提供 </text:span><text:span text:style-name="T194">QoS </text:span><text:span text:style-name="T106">服務品質保證。一句話記憶：</text:span><text:span text:style-name="T194">L2CAP </text:span><text:span text:style-name="T106">＝ 藍牙的資料管理中心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" loext:marker-style-name="T75"><text:span text:style-name="T76">三種邏輯通道</text:span><text:span text:style-name="T75"/></text:p>
            </table:table-cell>
            <table:table-cell table:style-name="表格108.A1" table:number-columns-spanned="2" office:value-type="string">
              <text:p text:style-name="P4" loext:marker-style-name="T75"><text:span text:style-name="T76">特性</text:span><text:span text:style-name="T75"/></text:p>
            </table:table-cell>
            <table:covered-table-cell/>
            <table:table-cell table:style-name="表格108.A1" office:value-type="string">
              <text:p text:style-name="P4" loext:marker-style-name="T75"><text:span text:style-name="T76">用途</text:span><text:span text:style-name="T75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9" loext:marker-style-name="T147"><text:span text:style-name="T230">Connection-oriented</text:span><text:span text:style-name="T148">（連線導向）</text:span></text:p>
          </table:table-cell>
          <table:table-cell table:style-name="表格108.A2" table:number-columns-spanned="2" office:value-type="string">
            <text:p text:style-name="P29" loext:marker-style-name="T147"><text:span text:style-name="T148">有建立連線、雙方確認，可靠、確保收到</text:span><text:span text:style-name="T147"/></text:p>
          </table:table-cell>
          <table:covered-table-cell/>
          <table:table-cell table:style-name="表格108.A2" office:value-type="string">
            <text:p text:style-name="P29" loext:marker-style-name="T147"><text:span text:style-name="T148">重要資料傳輸、檔案（像打電話）</text:span><text:span text:style-name="T147"/></text:p>
          </table:table-cell>
        </table:table-row>
        <table:table-row table:style-name="表格108.1">
          <table:table-cell table:style-name="表格108.A3" office:value-type="string">
            <text:p text:style-name="P29" loext:marker-style-name="T147"><text:span text:style-name="T230">Connectionless</text:span><text:span text:style-name="T148">（非連線）</text:span></text:p>
          </table:table-cell>
          <table:table-cell table:style-name="表格108.A3" table:number-columns-spanned="2" office:value-type="string">
            <text:p text:style-name="P29" loext:marker-style-name="T147"><text:span text:style-name="T148">直接送出、不確認，快速但可能遺失</text:span><text:span text:style-name="T147"/></text:p>
          </table:table-cell>
          <table:covered-table-cell/>
          <table:table-cell table:style-name="表格108.A3" office:value-type="string">
            <text:p text:style-name="P29" loext:marker-style-name="T147"><text:span text:style-name="T148">廣播、串流（像廣播）</text:span><text:span text:style-name="T147"/></text:p>
          </table:table-cell>
        </table:table-row>
        <table:table-row table:style-name="表格108.1">
          <table:table-cell table:style-name="表格108.A2" office:value-type="string">
            <text:p text:style-name="P29" loext:marker-style-name="T147"><text:span text:style-name="T230">Signaling Channel</text:span><text:span text:style-name="T148">（信令通道）</text:span></text:p>
          </table:table-cell>
          <table:table-cell table:style-name="表格108.A2" table:number-columns-spanned="2" office:value-type="string">
            <text:p text:style-name="P29" loext:marker-style-name="T147"><text:span text:style-name="T148">控制管理用，不傳資料只管控制</text:span><text:span text:style-name="T147"/></text:p>
          </table:table-cell>
          <table:covered-table-cell/>
          <table:table-cell table:style-name="表格108.A2" office:value-type="string">
            <text:p text:style-name="P29" loext:marker-style-name="T147"><text:span text:style-name="T148">建立</text:span><text:span text:style-name="T230">/</text:span><text:span text:style-name="T148">釋放連線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4" loext:marker-style-name="T69"><text:span text:style-name="T79">OSI </text:span><text:span text:style-name="T70">層</text:span></text:p>
          </table:table-cell>
          <table:covered-table-cell/>
          <table:table-cell table:style-name="表格108.A1" table:number-columns-spanned="2" office:value-type="string">
            <text:p text:style-name="P4" loext:marker-style-name="T69"><text:span text:style-name="T70">藍牙對應</text:span><text:span text:style-name="T69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9" loext:marker-style-name="T83"><text:span text:style-name="T84">應用層 </text:span><text:span text:style-name="T182">Application</text:span></text:p>
          </table:table-cell>
          <table:covered-table-cell/>
          <table:table-cell table:style-name="表格108.A2" table:number-columns-spanned="2" office:value-type="string">
            <text:p text:style-name="P29" loext:marker-style-name="T83"><text:span text:style-name="T182">App / </text:span><text:span text:style-name="T84">語音 </text:span><text:span text:style-name="T182">/ </text:span><text:span text:style-name="T84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9" loext:marker-style-name="T83"><text:span text:style-name="T84">傳輸層 </text:span><text:span text:style-name="T182">Transport</text:span></text:p>
          </table:table-cell>
          <table:covered-table-cell/>
          <table:table-cell table:style-name="表格108.A3" table:number-columns-spanned="2" office:value-type="string">
            <text:p text:style-name="P29" loext:marker-style-name="T83"><text:span text:style-name="T84">部分功能在 </text:span><text:span text:style-name="T182">L2CAP</text:span><text:span text:style-name="T84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9" loext:marker-style-name="T83"><text:span text:style-name="T84">網路層 </text:span><text:span text:style-name="T182">Network</text:span></text:p>
          </table:table-cell>
          <table:covered-table-cell/>
          <table:table-cell table:style-name="表格108.A2" table:number-columns-spanned="2" office:value-type="string">
            <text:p text:style-name="P29" loext:marker-style-name="T83"><text:span text:style-name="T84">（幾乎不對應，藍牙無路由概念）</text:span><text:span text:style-name="T83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9" loext:marker-style-name="T83"><text:span text:style-name="T84">資料鏈結層 </text:span><text:span text:style-name="T182">Data Link</text:span></text:p>
          </table:table-cell>
          <table:covered-table-cell/>
          <table:table-cell table:style-name="表格108.A3" table:number-columns-spanned="2" office:value-type="string">
            <text:p text:style-name="P29" loext:marker-style-name="T83"><text:span text:style-name="T182">L2CAP / MAC </text:span><text:span text:style-name="T84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9" loext:marker-style-name="T83"><text:span text:style-name="T84">實體層 </text:span><text:span text:style-name="T182">Physical</text:span></text:p>
          </table:table-cell>
          <table:covered-table-cell/>
          <table:table-cell table:style-name="表格108.A2" table:number-columns-spanned="2" office:value-type="string">
            <text:p text:style-name="P29" loext:marker-style-name="T83"><text:span text:style-name="T84">無線電波（</text:span><text:span text:style-name="T182">2.4GHz</text:span><text:span text:style-name="T84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6"><text:span text:style-name="T247">📐 <text:s/></text:span><text:span text:style-name="T269">重要</text:span></text:p>
            <text:p text:style-name="P7" loext:marker-style-name="T107"><text:span text:style-name="T194">L2CAP </text:span><text:span text:style-name="T106">主要位於「資料鏈結層（</text:span><text:span text:style-name="T194">Data Link Layer</text:span><text:span text:style-name="T106">）」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六、本篇考試陷阱整理</text:span><text:span text:style-name="T27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7"><text:span text:style-name="T214">WiFi </text:span><text:span text:style-name="T130">用什麼避免碰撞？　</text:span><text:span text:style-name="T106">✗ </text:span><text:span text:style-name="T194">CSMA/CD</text:span><text:span text:style-name="T106">（有線乙太網路機制）→ ✓ </text:span><text:span text:style-name="T194">CSMA/CA</text:span><text:span text:style-name="T106">（</text:span><text:span text:style-name="T194">WiFi </text:span><text:span text:style-name="T106">用「避免」碰撞，不是「偵測」）。口訣：有線 </text:span><text:span text:style-name="T194">Ethernet = CD</text:span><text:span text:style-name="T106">（</text:span><text:span text:style-name="T194">Detect</text:span><text:span text:style-name="T106">），無線 </text:span><text:span text:style-name="T194">WiFi = CA</text:span><text:span text:style-name="T106">（</text:span><text:span text:style-name="T194">Avoid</text:span><text:span text:style-name="T106">）。</text:span></text:p>
            <text:p text:style-name="P8"><text:span text:style-name="T214">Bluetooth </text:span><text:span text:style-name="T130">是競爭制還是排程制？　</text:span><text:span text:style-name="T106">✓ 排程制（</text:span><text:span text:style-name="T194">Master-Slave</text:span><text:span text:style-name="T106">，老大安排時槽），不是競爭制。</text:span></text:p>
            <text:p text:style-name="P8"><text:span text:style-name="T130">藍牙即時語音用什麼？　</text:span><text:span text:style-name="T106">✓ </text:span><text:span text:style-name="T194">SCO</text:span><text:span text:style-name="T106">（同步連線）或 </text:span><text:span text:style-name="T194">eSCO</text:span><text:span text:style-name="T106">（加強版，可重傳）。</text:span></text:p>
            <text:p text:style-name="P8"><text:span text:style-name="T214">L2CAP </text:span><text:span text:style-name="T130">控制管理用哪個通道？　</text:span><text:span text:style-name="T106">✓ </text:span><text:span text:style-name="T194">Signaling Channel</text:span><text:span text:style-name="T106">；最可靠＝</text:span><text:span text:style-name="T194">Connection-oriented</text:span><text:span text:style-name="T106">；最快速低延遲＝</text:span><text:span text:style-name="T194">Connectionless</text:span><text:span text:style-name="T106">。</text:span></text:p>
          </table:table-cell>
        </table:table-row>
        <table:table-row table:style-name="表格109.1">
          <table:table-cell table:style-name="表格109.A2" office:value-type="string">
            <text:p text:style-name="P6"><text:span text:style-name="T247">⏱ <text:s/></text:span><text:span text:style-name="T299">考前 </text:span><text:span text:style-name="T306">30 </text:span><text:span text:style-name="T299">秒濃縮</text:span></text:p>
            <text:p text:style-name="P7" loext:marker-style-name="T107"><text:span text:style-name="T194">WiFi</text:span><text:span text:style-name="T106">＝搶頻道 </text:span><text:span text:style-name="T194">· BT</text:span><text:span text:style-name="T106">＝排班 </text:span><text:span text:style-name="T194">· </text:span><text:span text:style-name="T106">時槽＝時間格子 </text:span><text:span text:style-name="T194">· SCO</text:span><text:span text:style-name="T106">＝語音 </text:span><text:span text:style-name="T194">· L2CAP</text:span><text:span text:style-name="T106">＝三通道（位於 </text:span><text:span text:style-name="T194">Data Link </text:span><text:span text:style-name="T106">層）。</text:span></text:p>
          </table:table-cell>
        </table:table-row>
      </table:table>
      <text:h text:style-name="P17" text:outline-level="1" loext:marker-style-name="T71"><text:span text:style-name="T72">第 十 篇　資訊安全：設備防護 </text:span><text:span text:style-name="T71">· </text:span><text:span text:style-name="T72">攻防解析 </text:span><text:span text:style-name="T71">· </text:span><text:span text:style-name="T72">企業資安 </text:span><text:span text:style-name="T71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6"><text:span text:style-name="T247">🛡️ <text:s/></text:span><text:span text:style-name="T52">本篇地圖</text:span></text:p>
            <text:p text:style-name="P7" loext:marker-style-name="T107"><text:span text:style-name="T106">本篇是全書最大主題，分六大部分：① 防護設備（</text:span><text:span text:style-name="T194">FW/WAF/NGFW/DMZ/IOC/Proxy</text:span><text:span text:style-name="T106">）；② </text:span><text:span text:style-name="T194">SQL Injection </text:span><text:span text:style-name="T106">與 </text:span><text:span text:style-name="T194">Zero-Day </text:span><text:span text:style-name="T106">攻防；③ </text:span><text:span text:style-name="T194">Firewall/IDS/IPS/SNMP/ICMP</text:span><text:span text:style-name="T106">；④ 企業資安三階段；⑤ </text:span><text:span text:style-name="T194">EDR/MDR/MITRE ATT&amp;CK/</text:span><text:span text:style-name="T106">數位韌性；⑥ </text:span><text:span text:style-name="T194">Zero Trust </text:span><text:span text:style-name="T106">零信任。</text:span></text:p>
          </table:table-cell>
        </table:table-row>
      </table:table>
      <text:h text:style-name="P11" text:outline-level="2" loext:marker-style-name="T27"><text:span text:style-name="T28">壹、資安與網路設備：</text:span><text:span text:style-name="T27">FW · WAF · NGFW · DMZ · IOC · Proxy</text:span></text:h>
      <text:p text:style-name="P35" loext:marker-style-name="T107"><text:span text:style-name="T106">想像你家是一間公司：外面是危險的 </text:span><text:span text:style-name="T194">Internet</text:span><text:span text:style-name="T106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4" loext:marker-style-name="T69"><text:span text:style-name="T70">名詞</text:span><text:span text:style-name="T69"/></text:p>
            </table:table-cell>
            <table:table-cell table:style-name="表格111.A1" office:value-type="string">
              <text:p text:style-name="P4" loext:marker-style-name="T69"><text:span text:style-name="T70">一行說明</text:span><text:span text:style-name="T69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9" loext:marker-style-name="T83"><text:span text:style-name="T182">FW</text:span><text:span text:style-name="T83"/></text:p>
          </table:table-cell>
          <table:table-cell table:style-name="表格111.A2" office:value-type="string">
            <text:p text:style-name="P29" loext:marker-style-name="T83"><text:span text:style-name="T84">傳統防火牆，只看封包「外面」的 </text:span><text:span text:style-name="T182">IP</text:span><text:span text:style-name="T84">、</text:span><text:span text:style-name="T182">Port</text:span><text:span text:style-name="T84">、</text:span><text:span text:style-name="T182">Protocol</text:span></text:p>
          </table:table-cell>
        </table:table-row>
        <table:table-row table:style-name="表格111.1">
          <table:table-cell table:style-name="表格111.A3" office:value-type="string">
            <text:p text:style-name="P29" loext:marker-style-name="T83"><text:span text:style-name="T182">WAF</text:span><text:span text:style-name="T83"/></text:p>
          </table:table-cell>
          <table:table-cell table:style-name="表格111.A3" office:value-type="string">
            <text:p text:style-name="P29" loext:marker-style-name="T83"><text:span text:style-name="T84">網站應用防火牆，會打開封包「裡面」，防 </text:span><text:span text:style-name="T182">SQL Injection</text:span><text:span text:style-name="T84">、</text:span><text:span text:style-name="T182">XSS</text:span></text:p>
          </table:table-cell>
        </table:table-row>
        <table:table-row table:style-name="表格111.1">
          <table:table-cell table:style-name="表格111.A2" office:value-type="string">
            <text:p text:style-name="P29" loext:marker-style-name="T83"><text:span text:style-name="T182">NGFW</text:span><text:span text:style-name="T83"/></text:p>
          </table:table-cell>
          <table:table-cell table:style-name="表格111.A2" office:value-type="string">
            <text:p text:style-name="P29" loext:marker-style-name="T83"><text:span text:style-name="T84">次世代防火牆，比 </text:span><text:span text:style-name="T182">FW </text:span><text:span text:style-name="T84">更聰明，有 </text:span><text:span text:style-name="T182">DPI </text:span><text:span text:style-name="T84">深度檢查、</text:span><text:span text:style-name="T182">IPS</text:span><text:span text:style-name="T84">、</text:span><text:span text:style-name="T182">App </text:span><text:span text:style-name="T84">識別</text:span></text:p>
          </table:table-cell>
        </table:table-row>
        <table:table-row table:style-name="表格111.1">
          <table:table-cell table:style-name="表格111.A3" office:value-type="string">
            <text:p text:style-name="P29" loext:marker-style-name="T83"><text:span text:style-name="T182">DMZ</text:span><text:span text:style-name="T83"/></text:p>
          </table:table-cell>
          <table:table-cell table:style-name="表格111.A3" office:value-type="string">
            <text:p text:style-name="P29" loext:marker-style-name="T83"><text:span text:style-name="T84">隔離區，把對外服務（</text:span><text:span text:style-name="T182">Web</text:span><text:span text:style-name="T84">、</text:span><text:span text:style-name="T182">Mail</text:span><text:span text:style-name="T84">）放這裡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29" loext:marker-style-name="T83"><text:span text:style-name="T182">IOC</text:span><text:span text:style-name="T83"/></text:p>
          </table:table-cell>
          <table:table-cell table:style-name="表格111.A2" office:value-type="string">
            <text:p text:style-name="P29" loext:marker-style-name="T83"><text:span text:style-name="T84">入侵指標（攻擊事後證據）：</text:span><text:span text:style-name="T182">Domain</text:span><text:span text:style-name="T84">（網）、</text:span><text:span text:style-name="T182">Hash</text:span><text:span text:style-name="T84">（檔）、</text:span><text:span text:style-name="T182">IP</text:span><text:span text:style-name="T84">（連）、</text:span><text:span text:style-name="T182">C2</text:span><text:span text:style-name="T84">（控）</text:span></text:p>
          </table:table-cell>
        </table:table-row>
        <table:table-row table:style-name="表格111.1">
          <table:table-cell table:style-name="表格111.A3" office:value-type="string">
            <text:p text:style-name="P29" loext:marker-style-name="T83"><text:span text:style-name="T182">Proxy</text:span><text:span text:style-name="T83"/></text:p>
          </table:table-cell>
          <table:table-cell table:style-name="表格111.A3" office:value-type="string">
            <text:p text:style-name="P29" loext:marker-style-name="T83"><text:span text:style-name="T84">正向代理，幫「使用者（</text:span><text:span text:style-name="T182">Client</text:span><text:span text:style-name="T84">）」隱藏 </text:span><text:span text:style-name="T182">IP</text:span><text:span text:style-name="T84">、快取內容</text:span></text:p>
          </table:table-cell>
        </table:table-row>
        <table:table-row table:style-name="表格111.1">
          <table:table-cell table:style-name="表格111.A2" office:value-type="string">
            <text:p text:style-name="P29" loext:marker-style-name="T83"><text:span text:style-name="T182">Reverse Proxy</text:span><text:span text:style-name="T83"/></text:p>
          </table:table-cell>
          <table:table-cell table:style-name="表格111.A2" office:value-type="string">
            <text:p text:style-name="P29" loext:marker-style-name="T83"><text:span text:style-name="T84">反向代理，幫「伺服器（</text:span><text:span text:style-name="T182">Server</text:span><text:span text:style-name="T84">）」負載平衡、隱藏主機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防火牆 </text:span><text:span text:style-name="T250">Firewall</text:span><text:span text:style-name="T251">（</text:span><text:span text:style-name="T250">FW</text:span><text:span text:style-name="T251">）</text:span></text:h>
      <text:p text:style-name="P35" loext:marker-style-name="T107"><text:span text:style-name="T106">最基本的網路防護設備，像公司門口的警衛。只看封包的「外部資訊」：</text:span><text:span text:style-name="T194">IP </text:span><text:span text:style-name="T106">位址（來者是誰）、</text:span><text:span text:style-name="T194">Port</text:span><text:span text:style-name="T106">（從哪個門進來）、</text:span><text:span text:style-name="T194">Protocol</text:span><text:span text:style-name="T106">（什麼類型）。主要運作在 </text:span><text:span text:style-name="T194">L3</text:span><text:span text:style-name="T106">（網路層）與 </text:span><text:span text:style-name="T194">L4</text:span><text:span text:style-name="T106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6"><text:span text:style-name="T247">⚠️ <text:s/></text:span><text:span text:style-name="T269">缺點</text:span></text:p>
            <text:p text:style-name="P7" loext:marker-style-name="T107"><text:span text:style-name="T194">FW </text:span><text:span text:style-name="T106">只看外面，不看封包裡面的內容，無法防止應用層攻擊（如 </text:span><text:span text:style-name="T194">SQL Injection</text:span><text:span text:style-name="T106">）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網站應用防火牆 </text:span><text:span text:style-name="T250">WAF</text:span></text:h>
      <text:p text:style-name="P35" loext:marker-style-name="T107"><text:span text:style-name="T106">進階版防護，會「打開包包檢查內容」，專門防禦網站層面的攻擊：</text:span><text:span text:style-name="T194">SQL Injection</text:span><text:span text:style-name="T106">（注入惡意 </text:span><text:span text:style-name="T194">SQL </text:span><text:span text:style-name="T106">竊取資料庫）、</text:span><text:span text:style-name="T194">XSS</text:span><text:span text:style-name="T106">（插入惡意 </text:span><text:span text:style-name="T194">JavaScript</text:span><text:span text:style-name="T106">）、其他 </text:span><text:span text:style-name="T194">HTTP </text:span><text:span text:style-name="T106">層攻擊（</text:span><text:span text:style-name="T194">CSRF</text:span><text:span text:style-name="T106">、</text:span><text:span text:style-name="T194">Path Traversal</text:span><text:span text:style-name="T106">）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4" loext:marker-style-name="T69"><text:span text:style-name="T70">比較項目</text:span><text:span text:style-name="T69"/></text:p>
            </table:table-cell>
            <table:table-cell table:style-name="表格113.A1" office:value-type="string">
              <text:p text:style-name="P4" loext:marker-style-name="T69"><text:span text:style-name="T79">FW</text:span><text:span text:style-name="T69"/></text:p>
            </table:table-cell>
            <table:table-cell table:style-name="表格113.A1" office:value-type="string">
              <text:p text:style-name="P4" loext:marker-style-name="T69"><text:span text:style-name="T79">WAF</text:span><text:span text:style-name="T69"/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9" loext:marker-style-name="T83"><text:span text:style-name="T84">檢查範圍</text:span><text:span text:style-name="T83"/></text:p>
          </table:table-cell>
          <table:table-cell table:style-name="表格113.A2" office:value-type="string">
            <text:p text:style-name="P29" loext:marker-style-name="T83"><text:span text:style-name="T84">封包外面（</text:span><text:span text:style-name="T182">IP/Port</text:span><text:span text:style-name="T84">）</text:span></text:p>
          </table:table-cell>
          <table:table-cell table:style-name="表格113.A2" office:value-type="string">
            <text:p text:style-name="P29" loext:marker-style-name="T83"><text:span text:style-name="T84">封包裡面（</text:span><text:span text:style-name="T182">HTTP </text:span><text:span text:style-name="T84">內容）</text:span></text:p>
          </table:table-cell>
        </table:table-row>
        <table:table-row table:style-name="表格113.1">
          <table:table-cell table:style-name="表格113.A3" office:value-type="string">
            <text:p text:style-name="P29" loext:marker-style-name="T83"><text:span text:style-name="T182">OSI </text:span><text:span text:style-name="T84">分層</text:span></text:p>
          </table:table-cell>
          <table:table-cell table:style-name="表格113.A3" office:value-type="string">
            <text:p text:style-name="P29" loext:marker-style-name="T83"><text:span text:style-name="T182">L3 / L4</text:span><text:span text:style-name="T83"/></text:p>
          </table:table-cell>
          <table:table-cell table:style-name="表格113.A3" office:value-type="string">
            <text:p text:style-name="P29" loext:marker-style-name="T83"><text:span text:style-name="T182">L7</text:span><text:span text:style-name="T84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9" loext:marker-style-name="T83"><text:span text:style-name="T84">防禦 </text:span><text:span text:style-name="T182">SQL Injection</text:span></text:p>
          </table:table-cell>
          <table:table-cell table:style-name="表格113.A2" office:value-type="string">
            <text:p text:style-name="P29" loext:marker-style-name="T83"><text:span text:style-name="T182">✗ </text:span><text:span text:style-name="T84">無法</text:span></text:p>
          </table:table-cell>
          <table:table-cell table:style-name="表格113.A2" office:value-type="string">
            <text:p text:style-name="P29" loext:marker-style-name="T83"><text:span text:style-name="T182">○ </text:span><text:span text:style-name="T84">可以</text:span></text:p>
          </table:table-cell>
        </table:table-row>
        <table:table-row table:style-name="表格113.1">
          <table:table-cell table:style-name="表格113.A3" office:value-type="string">
            <text:p text:style-name="P29" loext:marker-style-name="T83"><text:span text:style-name="T84">防禦 </text:span><text:span text:style-name="T182">XSS</text:span></text:p>
          </table:table-cell>
          <table:table-cell table:style-name="表格113.A3" office:value-type="string">
            <text:p text:style-name="P29" loext:marker-style-name="T83"><text:span text:style-name="T182">✗ </text:span><text:span text:style-name="T84">無法</text:span></text:p>
          </table:table-cell>
          <table:table-cell table:style-name="表格113.A3" office:value-type="string">
            <text:p text:style-name="P29" loext:marker-style-name="T83"><text:span text:style-name="T182">○ </text:span><text:span text:style-name="T84">可以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次世代防火牆 </text:span><text:span text:style-name="T250">NGFW</text:span></text:h>
      <text:p text:style-name="P35" loext:marker-style-name="T107"><text:span text:style-name="T106">在傳統 </text:span><text:span text:style-name="T194">FW </text:span><text:span text:style-name="T106">基礎上大幅強化：</text:span><text:span text:style-name="T194">DPI</text:span><text:span text:style-name="T106">（深度封包檢測）、</text:span><text:span text:style-name="T194">IPS</text:span><text:span text:style-name="T106">（入侵防禦）、</text:span><text:span text:style-name="T194">App </text:span><text:span text:style-name="T106">識別（知道你在用 </text:span><text:span text:style-name="T194">LINE </text:span><text:span text:style-name="T106">還是 </text:span><text:span text:style-name="T194">YouTube</text:span><text:span text:style-name="T106">）、使用者身份識別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26" loext:marker-style-name="T69"><text:span text:style-name="T70">能力</text:span><text:span text:style-name="T69"/></text:p>
            </table:table-cell>
            <table:table-cell table:style-name="表格114.A1" office:value-type="string">
              <text:p text:style-name="P26" loext:marker-style-name="T69"><text:span text:style-name="T79">FW</text:span><text:span text:style-name="T69"/></text:p>
            </table:table-cell>
            <table:table-cell table:style-name="表格114.A1" office:value-type="string">
              <text:p text:style-name="P26" loext:marker-style-name="T69"><text:span text:style-name="T79">WAF</text:span><text:span text:style-name="T69"/></text:p>
            </table:table-cell>
            <table:table-cell table:style-name="表格114.A1" office:value-type="string">
              <text:p text:style-name="P26" loext:marker-style-name="T69"><text:span text:style-name="T79">NGFW</text:span><text:span text:style-name="T69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9" loext:marker-style-name="T83"><text:span text:style-name="T182">IP/Port </text:span><text:span text:style-name="T84">過濾</text:span></text:p>
          </table:table-cell>
          <table:table-cell table:style-name="表格114.A2" office:value-type="string">
            <text:p text:style-name="P28" loext:marker-style-name="T288"><text:span text:style-name="T293">○</text:span><text:span text:style-name="T288"/></text:p>
          </table:table-cell>
          <table:table-cell table:style-name="表格114.A2" office:value-type="string">
            <text:p text:style-name="P28" loext:marker-style-name="T288"><text:span text:style-name="T293">○</text:span><text:span text:style-name="T288"/></text:p>
          </table:table-cell>
          <table:table-cell table:style-name="表格114.A2" office:value-type="string">
            <text:p text:style-name="P28" loext:marker-style-name="T288"><text:span text:style-name="T293">○</text:span><text:span text:style-name="T288"/>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9" loext:marker-style-name="T83"><text:span text:style-name="T182">HTTP </text:span><text:span text:style-name="T84">內容檢查</text:span></text:p>
          </table:table-cell>
          <table:table-cell table:style-name="表格114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3" office:value-type="string">
            <text:p text:style-name="P28" loext:marker-style-name="T288"><text:span text:style-name="T293">○</text:span><text:span text:style-name="T288"/></text:p>
          </table:table-cell>
          <table:table-cell table:style-name="表格114.A3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114.1">
          <table:table-cell table:style-name="表格114.A2" office:value-type="string">
            <text:p text:style-name="P29" loext:marker-style-name="T83"><text:span text:style-name="T182">DPI </text:span><text:span text:style-name="T84">深度檢查</text:span></text:p>
          </table:table-cell>
          <table:table-cell table:style-name="表格114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2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114.1">
          <table:table-cell table:style-name="表格114.A3" office:value-type="string">
            <text:p text:style-name="P29" loext:marker-style-name="T83"><text:span text:style-name="T182">App </text:span><text:span text:style-name="T84">識別</text:span></text:p>
          </table:table-cell>
          <table:table-cell table:style-name="表格114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3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114.1">
          <table:table-cell table:style-name="表格114.A2" office:value-type="string">
            <text:p text:style-name="P29" loext:marker-style-name="T83"><text:span text:style-name="T182">IPS </text:span><text:span text:style-name="T84">入侵防禦</text:span></text:p>
          </table:table-cell>
          <table:table-cell table:style-name="表格114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2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6"><text:span text:style-name="T247">💡 <text:s/></text:span><text:span text:style-name="T251">實務說明</text:span></text:p>
            <text:p text:style-name="P7" loext:marker-style-name="T107"><text:span text:style-name="T194">NGFW </text:span><text:span text:style-name="T106">在現代企業通常用來「取代」傳統 </text:span><text:span text:style-name="T194">FW</text:span><text:span text:style-name="T106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DMZ</text:span><text:span text:style-name="T251">（非軍事區 </text:span><text:span text:style-name="T250">/ </text:span><text:span text:style-name="T251">隔離區）</text:span></text:h>
      <text:p text:style-name="P35" loext:marker-style-name="T107"><text:span text:style-name="T106">網路架構中的「隔離緩衝區」，專門放置需要對外公開的服務。生活比喻：</text:span><text:span text:style-name="T194">DMZ</text:span><text:span text:style-name="T106">＝大樓門口的接待室，訪客只能到接待室、無法進入辦公室；就算接待室被搗亂，也不影響裡面的員工與機密。通常放：</text:span><text:span text:style-name="T194">Web Server</text:span><text:span text:style-name="T106">、</text:span><text:span text:style-name="T194">Mail Server</text:span><text:span text:style-name="T106">、</text:span><text:span text:style-name="T194">DNS Server</text:span><text:span text:style-name="T106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6"><text:span text:style-name="T247">⚠️ <text:s/></text:span><text:span text:style-name="T269">考試陷阱</text:span></text:p>
            <text:p text:style-name="P7" loext:marker-style-name="T107"><text:span text:style-name="T194">DMZ </text:span><text:span text:style-name="T106">的用途是「隔離保護」（就算 </text:span><text:span text:style-name="T194">DMZ </text:span><text:span text:style-name="T106">內伺服器被駭，駭客也無法直接進入內部網路），不是提升速度，也不是加密資料！</text:span></text:p>
          </table:table-cell>
        </table:table-row>
      </table:table>
      <text:h text:style-name="P12" text:outline-level="3"><text:span text:style-name="T249">▍</text:span><text:span text:style-name="T250"> IOC</text:span><text:span text:style-name="T251">（入侵指標）</text:span></text:h>
      <text:p text:style-name="P35" loext:marker-style-name="T107"><text:span text:style-name="T194">IOC</text:span><text:span text:style-name="T106">（</text:span><text:span text:style-name="T194">Indicator of Compromise</text:span><text:span text:style-name="T106">）是「攻擊發生後所留下的已知痕跡與線索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6"><text:span text:style-name="T247">🎯 <text:s/></text:span><text:span text:style-name="T299">核心觀念</text:span></text:p>
            <text:p text:style-name="P7" loext:marker-style-name="T107"><text:span text:style-name="T194">IOC </text:span><text:span text:style-name="T106">是「已發生攻擊的事後證據」，不是用來預測未來攻擊的工具！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26" loext:marker-style-name="T75"><text:span text:style-name="T76">口訣</text:span><text:span text:style-name="T75"/></text:p>
          </table:table-cell>
          <table:table-cell table:style-name="表格116.A2" office:value-type="string">
            <text:p text:style-name="P26" loext:marker-style-name="T75"><text:span text:style-name="T81">IOC </text:span><text:span text:style-name="T76">類型</text:span></text:p>
          </table:table-cell>
          <table:table-cell table:style-name="表格116.A2" office:value-type="string">
            <text:p text:style-name="P26" loext:marker-style-name="T75"><text:span text:style-name="T76">白話說明</text:span><text:span text:style-name="T75"/></text:p>
          </table:table-cell>
          <table:table-cell table:style-name="表格116.A2" office:value-type="string">
            <text:p text:style-name="P26" loext:marker-style-name="T75"><text:span text:style-name="T76">對應防禦工具</text:span><text:span text:style-name="T75"/></text:p>
          </table:table-cell>
        </table:table-row>
        <table:table-row table:style-name="表格116.1">
          <table:table-cell table:style-name="表格116.A3" office:value-type="string">
            <text:p text:style-name="P28" loext:marker-style-name="T297"><text:span text:style-name="T298">網</text:span><text:span text:style-name="T297"/></text:p>
          </table:table-cell>
          <table:table-cell table:style-name="表格116.A3" office:value-type="string">
            <text:p text:style-name="P29" loext:marker-style-name="T147"><text:span text:style-name="T148">惡意 </text:span><text:span text:style-name="T230">Domain</text:span><text:span text:style-name="T148">（網域）</text:span></text:p>
          </table:table-cell>
          <table:table-cell table:style-name="表格116.A3" office:value-type="string">
            <text:p text:style-name="P29" loext:marker-style-name="T147"><text:span text:style-name="T148">釣魚網站網址，用來騙帳密、假冒正規網站</text:span><text:span text:style-name="T147"/></text:p>
          </table:table-cell>
          <table:table-cell table:style-name="表格116.A3" office:value-type="string">
            <text:p text:style-name="P29" loext:marker-style-name="T147"><text:span text:style-name="T230">DNS </text:span><text:span text:style-name="T148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28" loext:marker-style-name="T297"><text:span text:style-name="T298">檔</text:span><text:span text:style-name="T297"/></text:p>
          </table:table-cell>
          <table:table-cell table:style-name="表格116.A4" office:value-type="string">
            <text:p text:style-name="P29" loext:marker-style-name="T147"><text:span text:style-name="T148">惡意 </text:span><text:span text:style-name="T230">Hash</text:span><text:span text:style-name="T148">（雜湊值）</text:span></text:p>
          </table:table-cell>
          <table:table-cell table:style-name="表格116.A4" office:value-type="string">
            <text:p text:style-name="P29" loext:marker-style-name="T147"><text:span text:style-name="T148">惡意程式的唯一特徵碼，改檔名也能識別</text:span><text:span text:style-name="T147"/></text:p>
          </table:table-cell>
          <table:table-cell table:style-name="表格116.A4" office:value-type="string">
            <text:p text:style-name="P29" loext:marker-style-name="T147"><text:span text:style-name="T148">防毒軟體 </text:span><text:span text:style-name="T230">AV</text:span><text:span text:style-name="T148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28" loext:marker-style-name="T297"><text:span text:style-name="T298">連</text:span><text:span text:style-name="T297"/></text:p>
          </table:table-cell>
          <table:table-cell table:style-name="表格116.A3" office:value-type="string">
            <text:p text:style-name="P29" loext:marker-style-name="T147"><text:span text:style-name="T148">惡意 </text:span><text:span text:style-name="T230">IP </text:span><text:span text:style-name="T148">位址</text:span></text:p>
          </table:table-cell>
          <table:table-cell table:style-name="表格116.A3" office:value-type="string">
            <text:p text:style-name="P29" loext:marker-style-name="T147"><text:span text:style-name="T148">感染後電腦對外異常連線的目標</text:span><text:span text:style-name="T147"/></text:p>
          </table:table-cell>
          <table:table-cell table:style-name="表格116.A3" office:value-type="string">
            <text:p text:style-name="P29" loext:marker-style-name="T147"><text:span text:style-name="T148">防火牆 </text:span><text:span text:style-name="T230">FW / NGFW</text:span><text:span text:style-name="T148">（封鎖 </text:span><text:span text:style-name="T230">IP</text:span><text:span text:style-name="T148">）</text:span></text:p>
          </table:table-cell>
        </table:table-row>
        <table:table-row table:style-name="表格116.1">
          <table:table-cell table:style-name="表格116.A4" office:value-type="string">
            <text:p text:style-name="P28" loext:marker-style-name="T297"><text:span text:style-name="T298">控</text:span><text:span text:style-name="T297"/></text:p>
          </table:table-cell>
          <table:table-cell table:style-name="表格116.A4" office:value-type="string">
            <text:p text:style-name="P29" loext:marker-style-name="T147"><text:span text:style-name="T230">C2 Server</text:span><text:span text:style-name="T148">（指揮控制）</text:span></text:p>
          </table:table-cell>
          <table:table-cell table:style-name="表格116.A4" office:value-type="string">
            <text:p text:style-name="P29" loext:marker-style-name="T147"><text:span text:style-name="T148">駭客遠端操控被感染主機的總部</text:span><text:span text:style-name="T147"/></text:p>
          </table:table-cell>
          <table:table-cell table:style-name="表格116.A4" office:value-type="string">
            <text:p text:style-name="P29" loext:marker-style-name="T147"><text:span text:style-name="T230">SIEM / IDS</text:span><text:span text:style-name="T148">（偵測異常連線）</text:span>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6"><text:span text:style-name="T247">▸ <text:s/></text:span><text:span text:style-name="T52">攻擊全流程（</text:span><text:span text:style-name="T63">IOC </text:span><text:span text:style-name="T52">出現在哪裡？）</text:span></text:p>
            <text:p text:style-name="P7" loext:marker-style-name="T107"><text:span text:style-name="T194">① </text:span><text:span text:style-name="T106">駭客準備：建立釣魚網站（</text:span><text:span text:style-name="T194">Domain</text:span><text:span text:style-name="T106">）、製作惡意程式（</text:span><text:span text:style-name="T194">Hash</text:span><text:span text:style-name="T106">）、架設控制中心（</text:span><text:span text:style-name="T194">C2</text:span><text:span text:style-name="T106">）→ ② 發動攻擊：受害者點釣魚網站 → 下載惡意程式 → ③ 主機感染：電腦自動連回駭客主機（</text:span><text:span text:style-name="T194">IP</text:span><text:span text:style-name="T106">）或 </text:span><text:span text:style-name="T194">C2 → ④ </text:span><text:span text:style-name="T106">駭客控制：下指令、偷資料、橫向移動 → ⑤ 資安系統偵測：比對異常 </text:span><text:span text:style-name="T194">IP</text:span><text:span text:style-name="T106">、惡意 </text:span><text:span text:style-name="T194">Domain</text:span><text:span text:style-name="T106">、已知 </text:span><text:span text:style-name="T194">Hash</text:span><text:span text:style-name="T106">、</text:span><text:span text:style-name="T194">C2 </text:span><text:span text:style-name="T106">行為 → ⑥ 判定中毒 → </text:span><text:span text:style-name="T194">IOC </text:span><text:span text:style-name="T106">記錄建立 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6"><text:span text:style-name="T247">⚡ <text:s/></text:span><text:span text:style-name="T261">10 </text:span><text:span text:style-name="T251">秒口訣速記</text:span></text:p>
            <text:p text:style-name="P7" loext:marker-style-name="T107"><text:span text:style-name="T106">網騙你（</text:span><text:span text:style-name="T194">Domain</text:span><text:span text:style-name="T106">）→ 檔害你（</text:span><text:span text:style-name="T194">Hash</text:span><text:span text:style-name="T106">）→ 連出去（</text:span><text:span text:style-name="T194">IP</text:span><text:span text:style-name="T106">）→ 被控制（</text:span><text:span text:style-name="T194">C2</text:span><text:span text:style-name="T106">）。口訣：「網 → 檔 → 連 → 控」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Proxy </text:span><text:span text:style-name="T251">與 </text:span><text:span text:style-name="T250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26" loext:marker-style-name="T69"><text:span text:style-name="T79">🧍 Proxy</text:span><text:span text:style-name="T70">（正向代理）— 幫 </text:span><text:span text:style-name="T79">Client</text:span></text:p>
            </table:table-cell>
            <table:table-cell table:style-name="表格117.A1" office:value-type="string">
              <text:p text:style-name="P26" loext:marker-style-name="T69"><text:span text:style-name="T79">🏢 Reverse Proxy</text:span><text:span text:style-name="T70">（反向代理）— 幫 </text:span><text:span text:style-name="T79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9" loext:marker-style-name="T83"><text:span text:style-name="T84">流程：你 → </text:span><text:span text:style-name="T182">Proxy → </text:span><text:span text:style-name="T84">網站。隱藏使用者真實 </text:span><text:span text:style-name="T182">IP</text:span><text:span text:style-name="T84">、</text:span><text:span text:style-name="T182">Cache </text:span><text:span text:style-name="T84">加速、企業控管員工能存取哪些網站。比</text:span><text:soft-page-break/><text:span text:style-name="T84">喻：你請朋友幫你買東西，店家不知道真正買家是你。</text:span></text:p>
          </table:table-cell>
          <table:table-cell table:style-name="表格117.A2" office:value-type="string">
            <text:p text:style-name="P29" loext:marker-style-name="T83"><text:span text:style-name="T84">流程：你 → </text:span><text:span text:style-name="T182">Reverse Proxy → </text:span><text:span text:style-name="T84">真正 </text:span><text:span text:style-name="T182">Server</text:span><text:span text:style-name="T84">。負載平衡、隱藏後端伺服器、</text:span><text:span text:style-name="T182">SSL </text:span><text:span text:style-name="T84">終止與安全防護。比喻：公</text:span><text:soft-page-break/><text:span text:style-name="T84">司大廳接待員分流訪客，客人不知道真正辦公室在哪層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6"><text:span text:style-name="T247">🚧 <text:s/></text:span><text:span text:style-name="T52">封包闖關順序</text:span></text:p>
            <text:p text:style-name="P7" loext:marker-style-name="T107"><text:span text:style-name="T194">🧍 </text:span><text:span text:style-name="T106">使用者（</text:span><text:span text:style-name="T194">Client</text:span><text:span text:style-name="T106">）→ 🔵 </text:span><text:span text:style-name="T194">Proxy</text:span><text:span text:style-name="T106">（選用，隱藏 </text:span><text:span text:style-name="T194">IP/</text:span><text:span text:style-name="T106">上網控管）→ 🌍 </text:span><text:span text:style-name="T194">Internet → 🔥 FW/NGFW</text:span><text:span text:style-name="T106">（第一道防線，過濾 </text:span><text:span text:style-name="T194">IP/Port/</text:span><text:span text:style-name="T106">深度檢查）→ 🏝 </text:span><text:span text:style-name="T194">DMZ</text:span><text:span text:style-name="T106">（</text:span><text:span text:style-name="T194">Web/Mail/DNS </text:span><text:span text:style-name="T106">伺服器）→ 🛡 </text:span><text:span text:style-name="T194">WAF</text:span><text:span text:style-name="T106">（深度過濾 </text:span><text:span text:style-name="T194">HTTP</text:span><text:span text:style-name="T106">，防 </text:span><text:span text:style-name="T194">SQLi/XSS</text:span><text:span text:style-name="T106">）→ 🪞 </text:span><text:span text:style-name="T194">Reverse Proxy</text:span><text:span text:style-name="T106">（負載平衡</text:span><text:span text:style-name="T194">/</text:span><text:span text:style-name="T106">隱藏後端）→ 🏢 內部 </text:span><text:span text:style-name="T194">Server</text:span><text:span text:style-name="T106">（核心資產）。</text:span></text:p>
            <text:p text:style-name="P8" loext:marker-style-name="T107"><text:span text:style-name="T194">📌 </text:span><text:span text:style-name="T106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6"><text:span text:style-name="T247">🔑 <text:s/></text:span><text:span text:style-name="T299">萬用口訣</text:span></text:p>
            <text:p text:style-name="P7" loext:marker-style-name="T107"><text:span text:style-name="T194">FW </text:span><text:span text:style-name="T106">封外、</text:span><text:span text:style-name="T194">WAF </text:span><text:span text:style-name="T106">看內、</text:span><text:span text:style-name="T194">NGFW </text:span><text:span text:style-name="T106">最強、</text:span><text:span text:style-name="T194">DMZ </text:span><text:span text:style-name="T106">隔離、</text:span><text:span text:style-name="T194">IOC </text:span><text:span text:style-name="T106">壞人、</text:span><text:span text:style-name="T194">Proxy </text:span><text:span text:style-name="T106">幫客、</text:span><text:span text:style-name="T194">Reverse </text:span><text:span text:style-name="T106">幫服。</text:span></text:p>
          </table:table-cell>
        </table:table-row>
      </table:table>
      <text:h text:style-name="P11" text:outline-level="2" loext:marker-style-name="T27"><text:span text:style-name="T28">貳、</text:span><text:span text:style-name="T27">SQL Injection × Zero-Day × </text:span><text:span text:style-name="T28">防禦機制</text:span></text:h>
      <text:h text:style-name="P12" text:outline-level="3"><text:span text:style-name="T249">▍</text:span><text:span text:style-name="T250"> SQL Injection</text:span><text:span text:style-name="T251">（</text:span><text:span text:style-name="T250">SQL </text:span><text:span text:style-name="T251">注入攻擊）</text:span></text:h>
      <text:p text:style-name="P35" loext:marker-style-name="T107"><text:span text:style-name="T106">當你在登入頁輸入帳密，後端會把輸入組合成 </text:span><text:span text:style-name="T194">SQL </text:span><text:span text:style-name="T106">送到資料庫查詢，例如：</text:span><text:span text:style-name="T194">SELECT * FROM users WHERE account='john' AND password='1234'</text:span><text:span text:style-name="T106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6"><text:span text:style-name="T247">💉 <text:s/></text:span><text:span text:style-name="T269">什麼是 </text:span><text:span text:style-name="T273">SQL Injection</text:span><text:span text:style-name="T269">？</text:span></text:p>
            <text:p text:style-name="P7"><text:span text:style-name="T265">核心一句話：</text:span><text:span text:style-name="T106">把原本只是「資料」的輸入，惡意改造成可執行的「</text:span><text:span text:style-name="T194">SQL </text:span><text:span text:style-name="T106">指令」。</text:span></text:p>
            <text:p text:style-name="P8" loext:marker-style-name="T107"><text:span text:style-name="T106">駭客在帳號欄位輸入：</text:span><text:span text:style-name="T194">' OR 1=1 --</text:span><text:span text:style-name="T106">，拼入後變成：…</text:span><text:span text:style-name="T194">WHERE account='' OR 1=1 -- ' AND password='1234'</text:span><text:span text:style-name="T106">。</text:span></text:p>
            <text:p text:style-name="P8" loext:marker-style-name="T107"><text:span text:style-name="T194">OR 1=1 </text:span><text:span text:style-name="T106">永遠成立 → 查出所有使用者；</text:span><text:span text:style-name="T194">-- </text:span><text:span text:style-name="T106">是 </text:span><text:span text:style-name="T194">SQL </text:span><text:span text:style-name="T106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26" loext:marker-style-name="T69"><text:span text:style-name="T79">❌ </text:span><text:span text:style-name="T70">攻擊成功的原因</text:span></text:p>
          </table:table-cell>
          <table:covered-table-cell/>
          <table:table-cell table:style-name="表格119.A2" office:value-type="string">
            <text:p text:style-name="P26" loext:marker-style-name="T69"><text:span text:style-name="T79">✅ </text:span><text:span text:style-name="T70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9" loext:marker-style-name="T83"><text:span text:style-name="T182">① OR 1=1 </text:span><text:span text:style-name="T84">永遠成立，回傳全部使用者 ② </text:span><text:span text:style-name="T182">-- </text:span><text:span text:style-name="T84">把密碼驗證段註解掉 ③ 工程師直接用字串拼接組 </text:span><text:span text:style-name="T182">SQL</text:span><text:span text:style-name="T84">，沒有驗證輸入</text:span></text:p>
          </table:table-cell>
          <table:covered-table-cell/>
          <table:table-cell table:style-name="表格119.A3" office:value-type="string">
            <text:p text:style-name="P29" loext:marker-style-name="T83"><text:span text:style-name="T84">把使用者輸入視為「純資料」，不允許改變 </text:span><text:span text:style-name="T182">SQL </text:span><text:span text:style-name="T84">結構；</text:span><text:span text:style-name="T182">SQL </text:span><text:span text:style-name="T84">骨架固定，不因任何輸入而改變；使用 </text:span><text:span text:style-name="T182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6"><text:span text:style-name="T247">🛡️ <text:s/></text:span><text:span text:style-name="T289">防禦核心：</text:span><text:span text:style-name="T296">Prepared Statement</text:span><text:span text:style-name="T289">（預備語句）</text:span></text:p>
            <text:p text:style-name="P7"><text:span text:style-name="T290">概念：</text:span><text:span text:style-name="T106">先把 </text:span><text:span text:style-name="T194">SQL </text:span><text:span text:style-name="T106">骨架「鎖死」，使用者只能填入資料，完全無法修改 </text:span><text:span text:style-name="T194">SQL </text:span><text:span text:style-name="T106">結構。</text:span></text:p>
            <text:p text:style-name="P8" loext:marker-style-name="T107"><text:span text:style-name="T194">❌ </text:span><text:span text:style-name="T106">危險寫法（字串拼接）：</text:span><text:span text:style-name="T194">sql = "SELECT * FROM users WHERE id='" + input + "'"</text:span><text:span text:style-name="T106">；輸入 </text:span><text:span text:style-name="T194">' OR 1=1 -- → </text:span><text:span text:style-name="T106">結構被竄改。</text:span></text:p>
            <text:p text:style-name="P8" loext:marker-style-name="T107"><text:span text:style-name="T194">✅ </text:span><text:span text:style-name="T106">安全寫法：</text:span><text:span text:style-name="T194">String sql = "SELECT * FROM users WHERE id=?"</text:span><text:span text:style-name="T106">；</text:span><text:span text:style-name="T194">? </text:span><text:span text:style-name="T106">是佔位符，</text:span><text:span text:style-name="T194">input </text:span><text:span text:style-name="T106">被視為純文字，</text:span><text:span text:style-name="T194">' OR 1=1 -- </text:span><text:span text:style-name="T106">完全無效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" loext:marker-style-name="T75"><text:span text:style-name="T76">輔助防禦手段</text:span><text:span text:style-name="T75"/></text:p>
          </table:table-cell>
          <table:table-cell table:style-name="表格119.A2" table:number-columns-spanned="2" office:value-type="string">
            <text:p text:style-name="P4" loext:marker-style-name="T75"><text:span text:style-name="T76">說明</text:span><text:span text:style-name="T75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9" loext:marker-style-name="T147"><text:span text:style-name="T230">Prepared Statement</text:span><text:span text:style-name="T147"/></text:p>
          </table:table-cell>
          <table:table-cell table:style-name="表格119.A3" table:number-columns-spanned="2" office:value-type="string">
            <text:p text:style-name="P29" loext:marker-style-name="T147"><text:span text:style-name="T230">✅ </text:span><text:span text:style-name="T148">根本解決方案。</text:span><text:span text:style-name="T230">SQL </text:span><text:span text:style-name="T148">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9" loext:marker-style-name="T147"><text:span text:style-name="T148">輸入驗證 </text:span><text:span text:style-name="T230">(Input Validation)</text:span></text:p>
          </table:table-cell>
          <table:table-cell table:style-name="表格119.A7" table:number-columns-spanned="2" office:value-type="string">
            <text:p text:style-name="P29" loext:marker-style-name="T147"><text:span text:style-name="T148">過濾或拒絕特殊字元（如單引號），輔助手段，但單靠此法仍可能被繞過。</text:span><text:span text:style-name="T147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9" loext:marker-style-name="T147"><text:span text:style-name="T230">WAF</text:span><text:span text:style-name="T148">（網站應用防火牆）</text:span></text:p>
          </table:table-cell>
          <table:table-cell table:style-name="表格119.A3" table:number-columns-spanned="2" office:value-type="string">
            <text:p text:style-name="P29" loext:marker-style-name="T147"><text:span text:style-name="T148">偵測 </text:span><text:span text:style-name="T230">OR 1=1</text:span><text:span text:style-name="T148">、</text:span><text:span text:style-name="T230">UNION SELECT </text:span><text:span text:style-name="T148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9" loext:marker-style-name="T147"><text:span text:style-name="T148">最小權限原則</text:span><text:span text:style-name="T147"/></text:p>
          </table:table-cell>
          <table:table-cell table:style-name="表格119.A7" table:number-columns-spanned="2" office:value-type="string">
            <text:p text:style-name="P29" loext:marker-style-name="T147"><text:span text:style-name="T148">資料庫帳號只給應用程式必要的權限，避免帳號被拿下後資料全失。</text:span><text:span text:style-name="T147"/></text:p>
          </table:table-cell>
          <table:covered-table-cell/>
        </table:table-row>
      </table:table>
      <text:h text:style-name="P12" text:outline-level="3"><text:span text:style-name="T249">▍</text:span><text:span text:style-name="T250"> Zero-Day Attack</text:span><text:span text:style-name="T251">（零時差攻擊）</text:span></text:h>
      <text:p text:style-name="P35" loext:marker-style-name="T107"><text:span text:style-name="T194">Zero-Day </text:span><text:span text:style-name="T106">指一個「尚未被開發商發現或公開」的安全漏洞，在廠商來得及發布修補程式（</text:span><text:span text:style-name="T194">Patch</text:span><text:span text:style-name="T106">）之前，駭客就已利用它展開攻擊。命名由來：「</text:span><text:span text:style-name="T194">Day Zero</text:span><text:span text:style-name="T106">」代表廠商只有 </text:span><text:span text:style-name="T194">0 </text:span><text:span text:style-name="T106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26" loext:marker-style-name="T69"><text:span text:style-name="T79">😱 </text:span><text:span text:style-name="T70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26" loext:marker-style-name="T69"><text:span text:style-name="T79">🏠 </text:span><text:span text:style-name="T70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9" loext:marker-style-name="T83"><text:span text:style-name="T84">傳統防毒靠「特徵碼（</text:span><text:span text:style-name="T182">Signature</text:span><text:span text:style-name="T84">）」辨識病毒，像通緝名單。但 </text:span><text:span text:style-name="T182">Zero-Day </text:span><text:span text:style-name="T84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9" loext:marker-style-name="T83"><text:span text:style-name="T84">你家大門有個秘密漏洞，你不知道、鎖廠不知道、所有人都不知道——只有小偷知道。小偷可以天天進你家，直到漏洞被發現並修補為止。</text:span><text:span text:style-name="T83"/></text:p>
          </table:table-cell>
        </table:table-row>
        <table:table-row table:style-name="表格120.1">
          <table:table-cell table:style-name="表格120.A1" office:value-type="string">
            <text:p text:style-name="P4" loext:marker-style-name="T75"><text:span text:style-name="T76">防禦層</text:span><text:span text:style-name="T75"/></text:p>
          </table:table-cell>
          <table:table-cell table:style-name="表格120.A1" office:value-type="string">
            <text:p text:style-name="P4" loext:marker-style-name="T75"><text:span text:style-name="T76">手段</text:span><text:span text:style-name="T75"/></text:p>
          </table:table-cell>
          <table:table-cell table:style-name="表格120.A1" table:number-columns-spanned="2" office:value-type="string">
            <text:p text:style-name="P4" loext:marker-style-name="T75"><text:span text:style-name="T76">說明</text:span><text:span text:style-name="T75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9" loext:marker-style-name="T147"><text:span text:style-name="T148">修補</text:span><text:span text:style-name="T147"/></text:p>
          </table:table-cell>
          <table:table-cell table:style-name="表格120.A2" office:value-type="string">
            <text:p text:style-name="P29" loext:marker-style-name="T147"><text:span text:style-name="T230">Patch </text:span><text:span text:style-name="T148">更新</text:span></text:p>
          </table:table-cell>
          <table:table-cell table:style-name="表格120.A2" table:number-columns-spanned="2" office:value-type="string">
            <text:p text:style-name="P29" loext:marker-style-name="T147"><text:span text:style-name="T148">漏洞公開後立即套用廠商安全更新（這是最重要的行動）</text:span><text:span text:style-name="T147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9" loext:marker-style-name="T147"><text:span text:style-name="T148">偵測</text:span><text:span text:style-name="T147"/></text:p>
          </table:table-cell>
          <table:table-cell table:style-name="表格120.A5" office:value-type="string">
            <text:p text:style-name="P29" loext:marker-style-name="T147"><text:span text:style-name="T230">IDS / IPS</text:span><text:span text:style-name="T147"/></text:p>
          </table:table-cell>
          <table:table-cell table:style-name="表格120.A5" table:number-columns-spanned="2" office:value-type="string">
            <text:p text:style-name="P29" loext:marker-style-name="T147"><text:span text:style-name="T230">IDS </text:span><text:span text:style-name="T148">發現異常後發警報；</text:span><text:span text:style-name="T230">IPS </text:span><text:span text:style-name="T148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9" loext:marker-style-name="T147"><text:span text:style-name="T148">深度檢查</text:span><text:span text:style-name="T147"/></text:p>
          </table:table-cell>
          <table:table-cell table:style-name="表格120.A2" office:value-type="string">
            <text:p text:style-name="P29" loext:marker-style-name="T147"><text:span text:style-name="T230">DPI</text:span><text:span text:style-name="T148">（深度封包檢查）</text:span></text:p>
          </table:table-cell>
          <table:table-cell table:style-name="表格120.A2" table:number-columns-spanned="2" office:value-type="string">
            <text:p text:style-name="P29" loext:marker-style-name="T147"><text:span text:style-name="T148">拆開檢查封包內容，偵測隱藏其中的攻擊指令</text:span><text:span text:style-name="T147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9" loext:marker-style-name="T147"><text:span text:style-name="T148">隔離</text:span><text:span text:style-name="T147"/></text:p>
          </table:table-cell>
          <table:table-cell table:style-name="表格120.A5" office:value-type="string">
            <text:p text:style-name="P29" loext:marker-style-name="T147"><text:span text:style-name="T148">網路分段</text:span><text:span text:style-name="T147"/></text:p>
          </table:table-cell>
          <table:table-cell table:style-name="表格120.A5" table:number-columns-spanned="2" office:value-type="string">
            <text:p text:style-name="P29" loext:marker-style-name="T147"><text:span text:style-name="T148">把網路切成多區，即使入侵一區也難橫向擴散</text:span><text:span text:style-name="T147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9" loext:marker-style-name="T147"><text:span text:style-name="T148">降低風險</text:span><text:span text:style-name="T147"/></text:p>
          </table:table-cell>
          <table:table-cell table:style-name="表格120.A2" office:value-type="string">
            <text:p text:style-name="P29" loext:marker-style-name="T147"><text:span text:style-name="T148">最小權限原則</text:span><text:span text:style-name="T147"/></text:p>
          </table:table-cell>
          <table:table-cell table:style-name="表格120.A2" table:number-columns-spanned="2" office:value-type="string">
            <text:p text:style-name="P29" loext:marker-style-name="T147"><text:span text:style-name="T148">每個帳號只給必要的最低權限，減少淪陷後的損害</text:span><text:span text:style-name="T147"/></text:p>
          </table:table-cell>
          <table:covered-table-cell/>
        </table:table-row>
      </table:table>
      <text:h text:style-name="P12" text:outline-level="3"><text:span text:style-name="T249">▍</text:span><text:span text:style-name="T250"> </text:span><text:span text:style-name="T251">防禦機制速查：</text:span><text:span text:style-name="T250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" loext:marker-style-name="T75"><text:span text:style-name="T76">機制</text:span><text:span text:style-name="T75"/></text:p>
            </table:table-cell>
            <table:table-cell table:style-name="表格121.A1" office:value-type="string">
              <text:p text:style-name="P4" loext:marker-style-name="T75"><text:span text:style-name="T76">白話比喻</text:span><text:span text:style-name="T75"/></text:p>
            </table:table-cell>
            <table:table-cell table:style-name="表格121.A1" office:value-type="string">
              <text:p text:style-name="P4" loext:marker-style-name="T75"><text:span text:style-name="T76">主要功能</text:span><text:span text:style-name="T75"/></text:p>
            </table:table-cell>
            <table:table-cell table:style-name="表格121.A1" office:value-type="string">
              <text:p text:style-name="P4" loext:marker-style-name="T75"><text:span text:style-name="T76">備註</text:span><text:span text:style-name="T75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9" loext:marker-style-name="T147"><text:span text:style-name="T230">Firewall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社區大門保全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依 </text:span><text:span text:style-name="T230">IP</text:span><text:span text:style-name="T148">、</text:span><text:span text:style-name="T230">Port</text:span><text:span text:style-name="T148">、協定決定允許或拒絕流量</text:span></text:p>
          </table:table-cell>
          <table:table-cell table:style-name="表格121.A2" office:value-type="string">
            <text:p text:style-name="P29" loext:marker-style-name="T147"><text:span text:style-name="T148">基礎但必要</text:span><text:span text:style-name="T147"/></text:p>
          </table:table-cell>
        </table:table-row>
        <table:table-row table:style-name="表格121.1">
          <table:table-cell table:style-name="表格121.A3" office:value-type="string">
            <text:p text:style-name="P29" loext:marker-style-name="T147"><text:span text:style-name="T230">IDS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監視器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偵測到異常流量後產生警報，不主動攔截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只警告</text:span><text:span text:style-name="T147"/></text:p>
          </table:table-cell>
        </table:table-row>
        <table:table-row table:style-name="表格121.1">
          <table:table-cell table:style-name="表格121.A2" office:value-type="string">
            <text:p text:style-name="P29" loext:marker-style-name="T147"><text:span text:style-name="T230">IPS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警衛直接攔人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自動阻斷偵測到的攻擊流量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直接阻擋</text:span><text:span text:style-name="T147"/></text:p>
          </table:table-cell>
        </table:table-row>
        <table:table-row table:style-name="表格121.1">
          <table:table-cell table:style-name="表格121.A3" office:value-type="string">
            <text:p text:style-name="P29" loext:marker-style-name="T147"><text:span text:style-name="T230">DPI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海關拆包裹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不只看封包表頭，深入檢查封包內容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最深層檢查</text:span><text:span text:style-name="T147"/></text:p>
          </table:table-cell>
        </table:table-row>
        <table:table-row table:style-name="表格121.1">
          <table:table-cell table:style-name="表格121.A2" office:value-type="string">
            <text:p text:style-name="P29" loext:marker-style-name="T147"><text:span text:style-name="T230">WAF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網站門口掃描機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專門針對 </text:span><text:span text:style-name="T230">Web </text:span><text:span text:style-name="T148">攻擊（</text:span><text:span text:style-name="T230">SQLi</text:span><text:span text:style-name="T148">、</text:span><text:span text:style-name="T230">XSS</text:span><text:span text:style-name="T148">）過濾</text:span></text:p>
          </table:table-cell>
          <table:table-cell table:style-name="表格121.A2" office:value-type="string">
            <text:p text:style-name="P29" loext:marker-style-name="T147"><text:span text:style-name="T148">網站專用</text:span><text:span text:style-name="T147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6"><text:span text:style-name="T247">⚠️ <text:s/></text:span><text:span text:style-name="T269">考試常考</text:span></text:p>
            <text:p text:style-name="P7" loext:marker-style-name="T107"><text:span text:style-name="T194">IDS </text:span><text:span text:style-name="T106">只發警報（不攔截）；</text:span><text:span text:style-name="T194">IPS </text:span><text:span text:style-name="T106">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</text:span><text:span text:style-name="T251">駭客如何一步一步入侵網站（典型 </text:span><text:span text:style-name="T250">7 </text:span><text:span text:style-name="T251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26" loext:marker-style-name="T75"><text:span text:style-name="T81">Step</text:span><text:span text:style-name="T75"/></text:p>
            </table:table-cell>
            <table:table-cell table:style-name="表格122.A1" office:value-type="string">
              <text:p text:style-name="P26" loext:marker-style-name="T75"><text:span text:style-name="T76">階段</text:span><text:span text:style-name="T75"/></text:p>
            </table:table-cell>
            <table:table-cell table:style-name="表格122.A1" office:value-type="string">
              <text:p text:style-name="P26" loext:marker-style-name="T75"><text:span text:style-name="T76">做什麼</text:span><text:span text:style-name="T75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9" loext:marker-style-name="T147"><text:span text:style-name="T230">1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偵察 </text:span><text:span text:style-name="T230">Reconnaissance</text:span></text:p>
          </table:table-cell>
          <table:table-cell table:style-name="表格122.A2" office:value-type="string">
            <text:p text:style-name="P29" loext:marker-style-name="T147"><text:span text:style-name="T148">掃描目標網站，找漏洞：</text:span><text:span text:style-name="T230">SQL Injection</text:span><text:span text:style-name="T148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9" loext:marker-style-name="T147"><text:span text:style-name="T230">2</text:span><text:span text:style-name="T147"/></text:p>
          </table:table-cell>
          <table:table-cell table:style-name="表格122.A3" office:value-type="string">
            <text:p text:style-name="P29" loext:marker-style-name="T147"><text:span text:style-name="T148">試探 </text:span><text:span text:style-name="T230">Probing</text:span></text:p>
          </table:table-cell>
          <table:table-cell table:style-name="表格122.A3" office:value-type="string">
            <text:p text:style-name="P29" loext:marker-style-name="T147"><text:span text:style-name="T148">嘗試輸入 </text:span><text:span text:style-name="T230">' OR 1=1 -- </text:span><text:span text:style-name="T148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9" loext:marker-style-name="T147"><text:span text:style-name="T230">3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取得初步權限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成功繞過驗證或取得資料庫讀取權，可能拿到帳密清單</text:span><text:span text:style-name="T147"/></text:p>
          </table:table-cell>
        </table:table-row>
        <table:table-row table:style-name="表格122.1">
          <table:table-cell table:style-name="表格122.A3" office:value-type="string">
            <text:p text:style-name="P29" loext:marker-style-name="T147"><text:span text:style-name="T230">4</text:span><text:span text:style-name="T147"/></text:p>
          </table:table-cell>
          <table:table-cell table:style-name="表格122.A3" office:value-type="string">
            <text:p text:style-name="P29" loext:marker-style-name="T147"><text:span text:style-name="T148">橫向移動 </text:span><text:span text:style-name="T230">Lateral Movement</text:span></text:p>
          </table:table-cell>
          <table:table-cell table:style-name="表格122.A3" office:value-type="string">
            <text:p text:style-name="P29" loext:marker-style-name="T147"><text:span text:style-name="T148">從網站主機延伸進資料庫，再滲透內網其他系統</text:span><text:span text:style-name="T147"/></text:p>
          </table:table-cell>
        </table:table-row>
        <table:table-row table:style-name="表格122.1">
          <table:table-cell table:style-name="表格122.A2" office:value-type="string">
            <text:p text:style-name="P29" loext:marker-style-name="T147"><text:span text:style-name="T230">5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竊取資料 </text:span><text:span text:style-name="T230">Exfiltration</text:span></text:p>
          </table:table-cell>
          <table:table-cell table:style-name="表格122.A2" office:value-type="string">
            <text:p text:style-name="P29" loext:marker-style-name="T147"><text:span text:style-name="T148">偷取個資、信用卡資料、機密文件</text:span><text:span text:style-name="T147"/></text:p>
          </table:table-cell>
        </table:table-row>
        <table:table-row table:style-name="表格122.1">
          <table:table-cell table:style-name="表格122.A3" office:value-type="string">
            <text:p text:style-name="P29" loext:marker-style-name="T147"><text:span text:style-name="T230">6</text:span><text:span text:style-name="T147"/></text:p>
          </table:table-cell>
          <table:table-cell table:style-name="表格122.A3" office:value-type="string">
            <text:p text:style-name="P29" loext:marker-style-name="T147"><text:span text:style-name="T148">植入後門 </text:span><text:span text:style-name="T230">Backdoor</text:span></text:p>
          </table:table-cell>
          <table:table-cell table:style-name="表格122.A3" office:value-type="string">
            <text:p text:style-name="P29" loext:marker-style-name="T147"><text:span text:style-name="T148">埋下後門程式，確保下次還能輕鬆進入</text:span><text:span text:style-name="T147"/></text:p>
          </table:table-cell>
        </table:table-row>
        <table:table-row table:style-name="表格122.1">
          <table:table-cell table:style-name="表格122.A2" office:value-type="string">
            <text:p text:style-name="P29" loext:marker-style-name="T147"><text:span text:style-name="T230">7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勒索或變現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加密資料索取贖金，或在暗網販售竊取的資料</text:span><text:span text:style-name="T147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6"><text:span text:style-name="T247">⚠️ <text:s/></text:span><text:span text:style-name="T269">公職考試常見陷阱</text:span></text:p>
            <text:p text:style-name="P7"><text:span text:style-name="T130">「輸入驗證」就足夠防 </text:span><text:span text:style-name="T214">SQLi</text:span><text:span text:style-name="T130">？　</text:span><text:span text:style-name="T106">❌ 不夠，過濾特殊字元有被繞過風險。✅ 真正防禦是 </text:span><text:span text:style-name="T194">Prepared Statement</text:span><text:span text:style-name="T106">。</text:span></text:p>
            <text:p text:style-name="P8"><text:span text:style-name="T214">WAF </text:span><text:span text:style-name="T130">可以完全防止所有攻擊？　</text:span><text:span text:style-name="T106">❌ 不能，</text:span><text:span text:style-name="T194">WAF </text:span><text:span text:style-name="T106">是輔助防禦，新型攻擊可能繞過。✅ </text:span><text:span text:style-name="T194">WAF + Prepared Statement </text:span><text:span text:style-name="T106">才是正道。</text:span></text:p>
            <text:p text:style-name="P8"><text:span text:style-name="T214">Zero-Day </text:span><text:span text:style-name="T130">最危險是它「很強大」？　</text:span><text:span text:style-name="T106">❌ 不是，最危險的是「還沒人知道」，防毒無法識別。</text:span></text:p>
            <text:p text:style-name="P8"><text:span text:style-name="T214">IDS </text:span><text:span text:style-name="T130">可以阻擋攻擊？　</text:span><text:span text:style-name="T106">❌ 不行，</text:span><text:span text:style-name="T194">IDS </text:span><text:span text:style-name="T106">只能偵測警報，能阻擋的是 </text:span><text:span text:style-name="T194">IPS</text:span><text:span text:style-name="T106">。</text:span></text:p>
          </table:table-cell>
          <table:covered-table-cell/>
          <table:covered-table-cell/>
        </table:table-row>
      </table:table>
      <text:h text:style-name="P11" text:outline-level="2" loext:marker-style-name="T27"><text:soft-page-break/><text:span text:style-name="T28">參、網路安全：</text:span><text:span text:style-name="T27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4" loext:marker-style-name="T69"><text:span text:style-name="T70">工具</text:span><text:span text:style-name="T69"/></text:p>
            </table:table-cell>
            <table:table-cell table:style-name="表格123.A1" office:value-type="string">
              <text:p text:style-name="P4" loext:marker-style-name="T69"><text:span text:style-name="T70">角色</text:span><text:span text:style-name="T69"/></text:p>
            </table:table-cell>
            <table:table-cell table:style-name="表格123.A1" office:value-type="string">
              <text:p text:style-name="P4" loext:marker-style-name="T69"><text:span text:style-name="T70">功能</text:span><text:span text:style-name="T69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9" loext:marker-style-name="T83"><text:span text:style-name="T182">🚪 Firewall</text:span><text:span text:style-name="T83"/></text:p>
          </table:table-cell>
          <table:table-cell table:style-name="表格123.A2" office:value-type="string">
            <text:p text:style-name="P29" loext:marker-style-name="T83"><text:span text:style-name="T84">大門警衛</text:span><text:span text:style-name="T83"/></text:p>
          </table:table-cell>
          <table:table-cell table:style-name="表格123.A2" office:value-type="string">
            <text:p text:style-name="P29" loext:marker-style-name="T83"><text:span text:style-name="T84">過濾進出流量（擋或放）</text:span><text:span text:style-name="T83"/></text:p>
          </table:table-cell>
        </table:table-row>
        <table:table-row table:style-name="表格123.1">
          <table:table-cell table:style-name="表格123.A3" office:value-type="string">
            <text:p text:style-name="P29" loext:marker-style-name="T83"><text:span text:style-name="T182">👀 IDS</text:span><text:span text:style-name="T83"/></text:p>
          </table:table-cell>
          <table:table-cell table:style-name="表格123.A3" office:value-type="string">
            <text:p text:style-name="P29" loext:marker-style-name="T83"><text:span text:style-name="T84">監視器（只看）</text:span><text:span text:style-name="T83"/></text:p>
          </table:table-cell>
          <table:table-cell table:style-name="表格123.A3" office:value-type="string">
            <text:p text:style-name="P29" loext:marker-style-name="T83"><text:span text:style-name="T84">偵測異常、發出警報，不主動阻擋</text:span><text:span text:style-name="T83"/></text:p>
          </table:table-cell>
        </table:table-row>
        <table:table-row table:style-name="表格123.1">
          <table:table-cell table:style-name="表格123.A2" office:value-type="string">
            <text:p text:style-name="P29" loext:marker-style-name="T83"><text:span text:style-name="T182">🚨 IPS</text:span><text:span text:style-name="T83"/></text:p>
          </table:table-cell>
          <table:table-cell table:style-name="表格123.A2" office:value-type="string">
            <text:p text:style-name="P29" loext:marker-style-name="T83"><text:span text:style-name="T84">監視器＋警衛</text:span><text:span text:style-name="T83"/></text:p>
          </table:table-cell>
          <table:table-cell table:style-name="表格123.A2" office:value-type="string">
            <text:p text:style-name="P29" loext:marker-style-name="T83"><text:span text:style-name="T84">偵測異常並自動阻擋攻擊</text:span><text:span text:style-name="T83"/></text:p>
          </table:table-cell>
        </table:table-row>
        <table:table-row table:style-name="表格123.1">
          <table:table-cell table:style-name="表格123.A3" office:value-type="string">
            <text:p text:style-name="P29" loext:marker-style-name="T83"><text:span text:style-name="T182">📊 SNMP</text:span><text:span text:style-name="T83"/></text:p>
          </table:table-cell>
          <table:table-cell table:style-name="表格123.A3" office:value-type="string">
            <text:p text:style-name="P29" loext:marker-style-name="T83"><text:span text:style-name="T84">管理室</text:span><text:span text:style-name="T83"/></text:p>
          </table:table-cell>
          <table:table-cell table:style-name="表格123.A3" office:value-type="string">
            <text:p text:style-name="P29" loext:marker-style-name="T83"><text:span text:style-name="T84">監控網路設備狀態（</text:span><text:span text:style-name="T182">CPU</text:span><text:span text:style-name="T84">、流量等）</text:span></text:p>
          </table:table-cell>
        </table:table-row>
        <table:table-row table:style-name="表格123.1">
          <table:table-cell table:style-name="表格123.A2" office:value-type="string">
            <text:p text:style-name="P29" loext:marker-style-name="T83"><text:span text:style-name="T182">📶 ICMP</text:span><text:span text:style-name="T83"/></text:p>
          </table:table-cell>
          <table:table-cell table:style-name="表格123.A2" office:value-type="string">
            <text:p text:style-name="P29" loext:marker-style-name="T83"><text:span text:style-name="T84">網路測試員</text:span><text:span text:style-name="T83"/></text:p>
          </table:table-cell>
          <table:table-cell table:style-name="表格123.A2" office:value-type="string">
            <text:p text:style-name="P29" loext:marker-style-name="T83"><text:span text:style-name="T84">診斷網路連線（</text:span><text:span text:style-name="T182">Ping / Traceroute</text:span><text:span text:style-name="T84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6"><text:span text:style-name="T247">⚡ <text:s/></text:span><text:span text:style-name="T251">核心記憶口訣</text:span></text:p>
            <text:p text:style-name="P7" loext:marker-style-name="T107"><text:span text:style-name="T194">Firewall </text:span><text:span text:style-name="T106">擋入口 </text:span><text:span text:style-name="T194">· IDS </text:span><text:span text:style-name="T106">只看 </text:span><text:span text:style-name="T194">· IPS </text:span><text:span text:style-name="T106">看＋擋。</text:span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HIDS vs NIDS</text:span><text:span text:style-name="T251">（</text:span><text:span text:style-name="T250">IDS </text:span><text:span text:style-name="T251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4"/>
            </table:table-cell>
            <table:table-cell table:style-name="表格124.A1" office:value-type="string">
              <text:p text:style-name="P4" loext:marker-style-name="T69"><text:span text:style-name="T79">HIDS</text:span><text:span text:style-name="T69"/></text:p>
            </table:table-cell>
            <table:table-cell table:style-name="表格124.A1" office:value-type="string">
              <text:p text:style-name="P4" loext:marker-style-name="T69"><text:span text:style-name="T79">NIDS</text:span><text:span text:style-name="T69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9" loext:marker-style-name="T83"><text:span text:style-name="T84">安裝位置</text:span><text:span text:style-name="T83"/></text:p>
          </table:table-cell>
          <table:table-cell table:style-name="表格124.A2" office:value-type="string">
            <text:p text:style-name="P29" loext:marker-style-name="T83"><text:span text:style-name="T84">裝在主機（電腦）內部</text:span><text:span text:style-name="T83"/></text:p>
          </table:table-cell>
          <table:table-cell table:style-name="表格124.A2" office:value-type="string">
            <text:p text:style-name="P29" loext:marker-style-name="T83"><text:span text:style-name="T84">裝在網路節點（交換器旁）</text:span><text:span text:style-name="T83"/></text:p>
          </table:table-cell>
        </table:table-row>
        <table:table-row table:style-name="表格124.1">
          <table:table-cell table:style-name="表格124.A3" office:value-type="string">
            <text:p text:style-name="P29" loext:marker-style-name="T83"><text:span text:style-name="T84">監控內容</text:span><text:span text:style-name="T83"/></text:p>
          </table:table-cell>
          <table:table-cell table:style-name="表格124.A3" office:value-type="string">
            <text:p text:style-name="P29" loext:marker-style-name="T83"><text:span text:style-name="T84">系統 </text:span><text:span text:style-name="T182">Log</text:span><text:span text:style-name="T84">、使用者行為</text:span></text:p>
          </table:table-cell>
          <table:table-cell table:style-name="表格124.A3" office:value-type="string">
            <text:p text:style-name="P29" loext:marker-style-name="T83"><text:span text:style-name="T84">網路封包與流量</text:span><text:span text:style-name="T83"/></text:p>
          </table:table-cell>
        </table:table-row>
        <table:table-row table:style-name="表格124.1">
          <table:table-cell table:style-name="表格124.A2" office:value-type="string">
            <text:p text:style-name="P29" loext:marker-style-name="T83"><text:span text:style-name="T84">比喻</text:span><text:span text:style-name="T83"/></text:p>
          </table:table-cell>
          <table:table-cell table:style-name="表格124.A2" office:value-type="string">
            <text:p text:style-name="P29" loext:marker-style-name="T83"><text:span text:style-name="T84">電腦裡的監視器</text:span><text:span text:style-name="T83"/></text:p>
          </table:table-cell>
          <table:table-cell table:style-name="表格124.A2" office:value-type="string">
            <text:p text:style-name="P29" loext:marker-style-name="T83"><text:span text:style-name="T84">路口的交通監視器</text:span><text:span text:style-name="T83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6"><text:span text:style-name="T247">⚡ <text:s/></text:span><text:span text:style-name="T251">一句話秒懂</text:span></text:p>
            <text:p text:style-name="P7" loext:marker-style-name="T107"><text:span text:style-name="T194">HIDS </text:span><text:span text:style-name="T106">看主機（</text:span><text:span text:style-name="T194">Log</text:span><text:span text:style-name="T106">）</text:span><text:span text:style-name="T194">· NIDS </text:span><text:span text:style-name="T106">看網路（封包）。</text:span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SNMP vs ICMP</text:span><text:span text:style-name="T251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4"/>
            </table:table-cell>
            <table:table-cell table:style-name="表格125.A1" office:value-type="string">
              <text:p text:style-name="P4" loext:marker-style-name="T69"><text:span text:style-name="T79">SNMP</text:span><text:span text:style-name="T69"/></text:p>
            </table:table-cell>
            <table:table-cell table:style-name="表格125.A1" office:value-type="string">
              <text:p text:style-name="P4" loext:marker-style-name="T69"><text:span text:style-name="T79">ICMP</text:span><text:span text:style-name="T69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9" loext:marker-style-name="T83"><text:span text:style-name="T84">用途</text:span><text:span text:style-name="T83"/></text:p>
          </table:table-cell>
          <table:table-cell table:style-name="表格125.A2" office:value-type="string">
            <text:p text:style-name="P29" loext:marker-style-name="T83"><text:span text:style-name="T84">管理與監控網路設備</text:span><text:span text:style-name="T83"/></text:p>
          </table:table-cell>
          <table:table-cell table:style-name="表格125.A2" office:value-type="string">
            <text:p text:style-name="P29" loext:marker-style-name="T83"><text:span text:style-name="T84">測試網路是否連通</text:span><text:span text:style-name="T83"/></text:p>
          </table:table-cell>
        </table:table-row>
        <table:table-row table:style-name="表格125.1">
          <table:table-cell table:style-name="表格125.A3" office:value-type="string">
            <text:p text:style-name="P29" loext:marker-style-name="T83"><text:span text:style-name="T182">OSI </text:span><text:span text:style-name="T84">層</text:span></text:p>
          </table:table-cell>
          <table:table-cell table:style-name="表格125.A3" office:value-type="string">
            <text:p text:style-name="P29" loext:marker-style-name="T83"><text:span text:style-name="T182">Application Layer</text:span><text:span text:style-name="T84">（應用層）</text:span></text:p>
          </table:table-cell>
          <table:table-cell table:style-name="表格125.A3" office:value-type="string">
            <text:p text:style-name="P29" loext:marker-style-name="T83"><text:span text:style-name="T182">Network Layer</text:span><text:span text:style-name="T84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9" loext:marker-style-name="T83"><text:span text:style-name="T84">傳輸協定</text:span><text:span text:style-name="T83"/></text:p>
          </table:table-cell>
          <table:table-cell table:style-name="表格125.A2" office:value-type="string">
            <text:p text:style-name="P29" loext:marker-style-name="T83"><text:span text:style-name="T182">UDP</text:span><text:span text:style-name="T83"/></text:p>
          </table:table-cell>
          <table:table-cell table:style-name="表格125.A2" office:value-type="string">
            <text:p text:style-name="P29" loext:marker-style-name="T83"><text:span text:style-name="T182">IP </text:span><text:span text:style-name="T84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9" loext:marker-style-name="T83"><text:span text:style-name="T84">常見功能</text:span><text:span text:style-name="T83"/></text:p>
          </table:table-cell>
          <table:table-cell table:style-name="表格125.A3" office:value-type="string">
            <text:p text:style-name="P29" loext:marker-style-name="T83"><text:span text:style-name="T84">看 </text:span><text:span text:style-name="T182">CPU </text:span><text:span text:style-name="T84">使用率、設備狀態、</text:span><text:span text:style-name="T182">Trap </text:span><text:span text:style-name="T84">警報</text:span></text:p>
          </table:table-cell>
          <table:table-cell table:style-name="表格125.A3" office:value-type="string">
            <text:p text:style-name="P29" loext:marker-style-name="T83"><text:span text:style-name="T182">Ping</text:span><text:span text:style-name="T84">、</text:span><text:span text:style-name="T182">Traceroute</text:span></text:p>
          </table:table-cell>
        </table:table-row>
        <table:table-row table:style-name="表格125.1">
          <table:table-cell table:style-name="表格125.A2" office:value-type="string">
            <text:p text:style-name="P29" loext:marker-style-name="T83"><text:span text:style-name="T84">比喻</text:span><text:span text:style-name="T83"/></text:p>
          </table:table-cell>
          <table:table-cell table:style-name="表格125.A2" office:value-type="string">
            <text:p text:style-name="P29" loext:marker-style-name="T83"><text:span text:style-name="T84">大樓管理室的監控系統</text:span><text:span text:style-name="T83"/></text:p>
          </table:table-cell>
          <table:table-cell table:style-name="表格125.A2" office:value-type="string">
            <text:p text:style-name="P29" loext:marker-style-name="T83"><text:span text:style-name="T84">網路連線的體溫計</text:span><text:span text:style-name="T83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6"><text:span text:style-name="T247">⚡ <text:s/></text:span><text:span text:style-name="T251">核心差異</text:span></text:p>
            <text:p text:style-name="P7" loext:marker-style-name="T107"><text:span text:style-name="T194">SNMP </text:span><text:span text:style-name="T106">管理設備（應用層 </text:span><text:span text:style-name="T194">/ UDP</text:span><text:span text:style-name="T106">）</text:span><text:span text:style-name="T194">· ICMP </text:span><text:span text:style-name="T106">診斷網路（網路層）。</text:span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</text:span><text:span text:style-name="T251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6"><text:span text:style-name="T247">🗺 <text:s/></text:span><text:span text:style-name="T52">工具各自負責的位置</text:span></text:p>
            <text:p text:style-name="P7" loext:marker-style-name="T107"><text:span text:style-name="T194">🌐 </text:span><text:span text:style-name="T106">外部攻擊者 → 🚪 </text:span><text:span text:style-name="T194">Firewall</text:span><text:span text:style-name="T106">（第一道防線，依 </text:span><text:span text:style-name="T194">IP/Port </text:span><text:span text:style-name="T106">規則過濾）→ 📡 </text:span><text:span text:style-name="T194">NIDS / IPS</text:span><text:span text:style-name="T106">（網路中間監控：</text:span><text:span text:style-name="T194">IDS </text:span><text:span text:style-name="T106">分析封包發現異常只發警報；</text:span><text:span text:style-name="T194">IPS </text:span><text:span text:style-name="T106">分析封包發現異常直接阻擋）→ 🖥 主機 </text:span><text:span text:style-name="T194">/ Server → 👀 HIDS</text:span><text:span text:style-name="T106">（主機內部最後防線，監控系統 </text:span><text:span text:style-name="T194">Log </text:span><text:span text:style-name="T106">與使用者行為）。旁側：📊 </text:span><text:span text:style-name="T194">SNMP </text:span><text:span text:style-name="T106">監控全域設備狀態；📶 </text:span><text:span text:style-name="T194">ICMP</text:span><text:span text:style-name="T106">（</text:span><text:span text:style-name="T194">Ping/Traceroute</text:span><text:span text:style-name="T106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6"><text:span text:style-name="T247">⚠️ <text:s/></text:span><text:span text:style-name="T269">考試陷阱整理</text:span></text:p>
            <text:p text:style-name="P7"><text:span text:style-name="T286">① IDS </text:span><text:span text:style-name="T279">可以自動阻擋攻擊　→　</text:span><text:span text:style-name="T106">✓ </text:span><text:span text:style-name="T194">IDS </text:span><text:span text:style-name="T106">只偵測＋發警報，</text:span><text:span text:style-name="T194">IPS </text:span><text:span text:style-name="T106">才會阻擋。</text:span></text:p>
            <text:p text:style-name="P8"><text:span text:style-name="T286">② Firewall </text:span><text:span text:style-name="T279">可以偵測異常行為　→　</text:span><text:span text:style-name="T106">✓ </text:span><text:span text:style-name="T194">Firewall </text:span><text:span text:style-name="T106">依規則（</text:span><text:span text:style-name="T194">IP/Port</text:span><text:span text:style-name="T106">）過濾，不做行為分析。</text:span></text:p>
            <text:p text:style-name="P8"><text:soft-page-break/><text:span text:style-name="T286">③ HIDS </text:span><text:span text:style-name="T279">用來監控網路封包　→　</text:span><text:span text:style-name="T106">✓ </text:span><text:span text:style-name="T194">HIDS </text:span><text:span text:style-name="T106">監控主機 </text:span><text:span text:style-name="T194">Log </text:span><text:span text:style-name="T106">與系統行為，封包是 </text:span><text:span text:style-name="T194">NIDS </text:span><text:span text:style-name="T106">的工作。</text:span></text:p>
            <text:p text:style-name="P8"><text:span text:style-name="T286">④ ICMP </text:span><text:span text:style-name="T279">用來監控設備狀態　→　</text:span><text:span text:style-name="T106">✓ </text:span><text:span text:style-name="T194">ICMP </text:span><text:span text:style-name="T106">只診斷網路（</text:span><text:span text:style-name="T194">Ping</text:span><text:span text:style-name="T106">），監控設備是 </text:span><text:span text:style-name="T194">SNMP</text:span><text:span text:style-name="T106">。</text:span></text:p>
            <text:p text:style-name="P8"><text:span text:style-name="T286">⑤ ICMP </text:span><text:span text:style-name="T279">屬於 </text:span><text:span text:style-name="T286">Application Layer</text:span><text:span text:style-name="T279">　→　</text:span><text:span text:style-name="T106">✓ </text:span><text:span text:style-name="T194">ICMP </text:span><text:span text:style-name="T106">屬 </text:span><text:span text:style-name="T194">Network Layer</text:span><text:span text:style-name="T106">，</text:span><text:span text:style-name="T194">SNMP </text:span><text:span text:style-name="T106">才是 </text:span><text:span text:style-name="T194">Application Layer</text:span><text:span text:style-name="T106">。</text:span></text:p>
            <text:p text:style-name="P8"><text:span text:style-name="T286">⑥ IPS </text:span><text:span text:style-name="T279">就是防火牆　→　</text:span><text:span text:style-name="T106">✓ </text:span><text:span text:style-name="T194">Firewall </text:span><text:span text:style-name="T106">靜態過濾（規則），</text:span><text:span text:style-name="T194">IPS </text:span><text:span text:style-name="T106">動態偵測行為後阻擋，兩者不同。</text:span></text:p>
          </table:table-cell>
        </table:table-row>
      </table:table>
      <text:h text:style-name="P12" text:outline-level="3"><text:span text:style-name="T249">▍</text:span><text:span text:style-name="T250"> 10 </text:span><text:span text:style-name="T251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4" loext:marker-style-name="T77"><text:span text:style-name="T78">題目</text:span><text:span text:style-name="T77"/></text:p>
            </table:table-cell>
            <table:table-cell table:style-name="表格127.A1" office:value-type="string">
              <text:p text:style-name="P4" loext:marker-style-name="T77"><text:span text:style-name="T78">答案</text:span><text:span text:style-name="T77"/></text:p>
            </table:table-cell>
            <table:table-cell table:style-name="表格127.A1" office:value-type="string">
              <text:p text:style-name="P4" loext:marker-style-name="T77"><text:span text:style-name="T78">解析</text:span><text:span text:style-name="T77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9" loext:marker-style-name="T180"><text:span text:style-name="T245">Q1 </text:span><text:span text:style-name="T181">何者負責「過濾進出網路流量」？</text:span></text:p>
          </table:table-cell>
          <table:table-cell table:style-name="表格127.A2" office:value-type="string">
            <text:p text:style-name="P29" loext:marker-style-name="T180"><text:span text:style-name="T245">Firewall</text:span><text:span text:style-name="T180"/></text:p>
          </table:table-cell>
          <table:table-cell table:style-name="表格127.A2" office:value-type="string">
            <text:p text:style-name="P29" loext:marker-style-name="T180"><text:span text:style-name="T245">Firewall </text:span><text:span text:style-name="T181">是網路入口過濾工具，依規則決定放行。</text:span><text:span text:style-name="T245">IDS/IPS </text:span><text:span text:style-name="T181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80"><text:span text:style-name="T245">Q2 IDS </text:span><text:span text:style-name="T181">的主要功能為何？</text:span></text:p>
          </table:table-cell>
          <table:table-cell table:style-name="表格127.A3" office:value-type="string">
            <text:p text:style-name="P29" loext:marker-style-name="T180"><text:span text:style-name="T181">偵測並發出警報</text:span><text:span text:style-name="T180"/></text:p>
          </table:table-cell>
          <table:table-cell table:style-name="表格127.A3" office:value-type="string">
            <text:p text:style-name="P29" loext:marker-style-name="T180"><text:span text:style-name="T245">IDS </text:span><text:span text:style-name="T181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80"><text:span text:style-name="T245">Q3 IPS </text:span><text:span text:style-name="T181">與 </text:span><text:span text:style-name="T245">IDS </text:span><text:span text:style-name="T181">最大差別？</text:span></text:p>
          </table:table-cell>
          <table:table-cell table:style-name="表格127.A2" office:value-type="string">
            <text:p text:style-name="P29" loext:marker-style-name="T180"><text:span text:style-name="T245">IPS </text:span><text:span text:style-name="T181">會阻擋，</text:span><text:span text:style-name="T245">IDS </text:span><text:span text:style-name="T181">不會</text:span></text:p>
          </table:table-cell>
          <table:table-cell table:style-name="表格127.A2" office:value-type="string">
            <text:p text:style-name="P29" loext:marker-style-name="T180"><text:span text:style-name="T245">IPS = IDS </text:span><text:span text:style-name="T181">全功能 </text:span><text:span text:style-name="T245">+ </text:span><text:span text:style-name="T181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80"><text:span text:style-name="T245">Q4 </text:span><text:span text:style-name="T181">何者屬「主機型入侵偵測」？</text:span></text:p>
          </table:table-cell>
          <table:table-cell table:style-name="表格127.A3" office:value-type="string">
            <text:p text:style-name="P29" loext:marker-style-name="T180"><text:span text:style-name="T245">HIDS</text:span><text:span text:style-name="T180"/></text:p>
          </table:table-cell>
          <table:table-cell table:style-name="表格127.A3" office:value-type="string">
            <text:p text:style-name="P29" loext:marker-style-name="T180"><text:span text:style-name="T245">HIDS </text:span><text:span text:style-name="T181">安裝於主機內部，監控 </text:span><text:span text:style-name="T245">Log </text:span><text:span text:style-name="T181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80"><text:span text:style-name="T245">Q5 NIDS </text:span><text:span text:style-name="T181">主要監控什麼？</text:span></text:p>
          </table:table-cell>
          <table:table-cell table:style-name="表格127.A2" office:value-type="string">
            <text:p text:style-name="P29" loext:marker-style-name="T180"><text:span text:style-name="T181">網路封包</text:span><text:span text:style-name="T180"/></text:p>
          </table:table-cell>
          <table:table-cell table:style-name="表格127.A2" office:value-type="string">
            <text:p text:style-name="P29" loext:marker-style-name="T180"><text:span text:style-name="T245">NIDS </text:span><text:span text:style-name="T181">部署在網路節點，分析封包流量；</text:span><text:span text:style-name="T245">HIDS </text:span><text:span text:style-name="T181">才看 </text:span><text:span text:style-name="T245">Log</text:span><text:span text:style-name="T181">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80"><text:span text:style-name="T245">Q6 SNMP </text:span><text:span text:style-name="T181">的主要用途？</text:span></text:p>
          </table:table-cell>
          <table:table-cell table:style-name="表格127.A3" office:value-type="string">
            <text:p text:style-name="P29" loext:marker-style-name="T180"><text:span text:style-name="T181">管理網路設備</text:span><text:span text:style-name="T180"/></text:p>
          </table:table-cell>
          <table:table-cell table:style-name="表格127.A3" office:value-type="string">
            <text:p text:style-name="P29" loext:marker-style-name="T180"><text:span text:style-name="T245">SNMP </text:span><text:span text:style-name="T181">監控與管理路由器、交換器狀態（</text:span><text:span text:style-name="T245">CPU</text:span><text:span text:style-name="T181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80"><text:span text:style-name="T245">Q7 ICMP </text:span><text:span text:style-name="T181">常用於哪種工具？</text:span></text:p>
          </table:table-cell>
          <table:table-cell table:style-name="表格127.A2" office:value-type="string">
            <text:p text:style-name="P29" loext:marker-style-name="T180"><text:span text:style-name="T245">Ping</text:span><text:span text:style-name="T180"/></text:p>
          </table:table-cell>
          <table:table-cell table:style-name="表格127.A2" office:value-type="string">
            <text:p text:style-name="P29" loext:marker-style-name="T180"><text:span text:style-name="T245">Ping </text:span><text:span text:style-name="T181">與 </text:span><text:span text:style-name="T245">Traceroute </text:span><text:span text:style-name="T181">都用 </text:span><text:span text:style-name="T245">ICMP </text:span><text:span text:style-name="T181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80"><text:span text:style-name="T245">Q8 ICMP </text:span><text:span text:style-name="T181">屬 </text:span><text:span text:style-name="T245">OSI </text:span><text:span text:style-name="T181">哪一層？</text:span></text:p>
          </table:table-cell>
          <table:table-cell table:style-name="表格127.A3" office:value-type="string">
            <text:p text:style-name="P29" loext:marker-style-name="T180"><text:span text:style-name="T245">Network Layer</text:span><text:span text:style-name="T180"/></text:p>
          </table:table-cell>
          <table:table-cell table:style-name="表格127.A3" office:value-type="string">
            <text:p text:style-name="P29" loext:marker-style-name="T180"><text:span text:style-name="T245">ICMP </text:span><text:span text:style-name="T181">是 </text:span><text:span text:style-name="T245">IP </text:span><text:span text:style-name="T181">的附屬協定，屬網路層；</text:span><text:span text:style-name="T245">SNMP </text:span><text:span text:style-name="T181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80"><text:span text:style-name="T245">Q9 </text:span><text:span text:style-name="T181">何者用 </text:span><text:span text:style-name="T245">UDP </text:span><text:span text:style-name="T181">且屬應用層？</text:span></text:p>
          </table:table-cell>
          <table:table-cell table:style-name="表格127.A2" office:value-type="string">
            <text:p text:style-name="P29" loext:marker-style-name="T180"><text:span text:style-name="T245">SNMP</text:span><text:span text:style-name="T180"/></text:p>
          </table:table-cell>
          <table:table-cell table:style-name="表格127.A2" office:value-type="string">
            <text:p text:style-name="P29" loext:marker-style-name="T180"><text:span text:style-name="T245">SNMP </text:span><text:span text:style-name="T181">用 </text:span><text:span text:style-name="T245">UDP</text:span><text:span text:style-name="T181">、屬應用層；</text:span><text:span text:style-name="T245">ICMP </text:span><text:span text:style-name="T181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80"><text:span text:style-name="T245">Q10 </text:span><text:span text:style-name="T181">下列何者正確？</text:span></text:p>
          </table:table-cell>
          <table:table-cell table:style-name="表格127.A3" office:value-type="string">
            <text:p text:style-name="P29" loext:marker-style-name="T180"><text:span text:style-name="T245">SNMP </text:span><text:span text:style-name="T181">用於設備管理</text:span></text:p>
          </table:table-cell>
          <table:table-cell table:style-name="表格127.A3" office:value-type="string">
            <text:p text:style-name="P29" loext:marker-style-name="T180"><text:span text:style-name="T245">IDS </text:span><text:span text:style-name="T181">不阻擋；</text:span><text:span text:style-name="T245">Firewall </text:span><text:span text:style-name="T181">不做行為分析；</text:span><text:span text:style-name="T245">ICMP </text:span><text:span text:style-name="T181">只做網路診斷。</text:span></text:p>
          </table:table-cell>
        </table:table-row>
      </table:table>
      <text:h text:style-name="P11" text:outline-level="2" loext:marker-style-name="T27"><text:span text:style-name="T28">肆、企業資訊安全：預防 → 偵測 → 復原</text:span><text:span text:style-name="T27"/></text:h>
      <text:p text:style-name="P35" loext:marker-style-name="T107"><text:span text:style-name="T106">企業資訊系統（官網、資料庫、公文</text:span><text:span text:style-name="T194">/</text:span><text:span text:style-name="T106">健保</text:span><text:span text:style-name="T194">/</text:span><text:span text:style-name="T106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" loext:marker-style-name="T75"><text:span text:style-name="T76">三大核心</text:span><text:span text:style-name="T75"/></text:p>
            </table:table-cell>
            <table:table-cell table:style-name="表格128.A1" office:value-type="string">
              <text:p text:style-name="P4" loext:marker-style-name="T75"><text:span text:style-name="T76">目標</text:span><text:span text:style-name="T75"/></text:p>
            </table:table-cell>
            <table:table-cell table:style-name="表格128.A1" office:value-type="string">
              <text:p text:style-name="P4" loext:marker-style-name="T75"><text:span text:style-name="T76">做法</text:span><text:span text:style-name="T75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9" loext:marker-style-name="T147"><text:span text:style-name="T230">① </text:span><text:span text:style-name="T148">事前預防</text:span></text:p>
          </table:table-cell>
          <table:table-cell table:style-name="表格128.A2" office:value-type="string">
            <text:p text:style-name="P29" loext:marker-style-name="T147"><text:span text:style-name="T148">讓壞事不要發生</text:span><text:span text:style-name="T147"/></text:p>
          </table:table-cell>
          <table:table-cell table:style-name="表格128.A2" office:value-type="string">
            <text:p text:style-name="P29" loext:marker-style-name="T147"><text:span text:style-name="T148">設密碼、</text:span><text:span text:style-name="T230">MFA</text:span><text:span text:style-name="T148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9" loext:marker-style-name="T147"><text:span text:style-name="T230">② </text:span><text:span text:style-name="T148">事中偵測</text:span></text:p>
          </table:table-cell>
          <table:table-cell table:style-name="表格128.A3" office:value-type="string">
            <text:p text:style-name="P29" loext:marker-style-name="T147"><text:span text:style-name="T148">出事時盡快發現</text:span><text:span text:style-name="T147"/></text:p>
          </table:table-cell>
          <table:table-cell table:style-name="表格128.A3" office:value-type="string">
            <text:p text:style-name="P29" loext:marker-style-name="T147"><text:span text:style-name="T148">偵測異常登入、流量、病毒警報（</text:span><text:span text:style-name="T230">IDS/IPS/NGFW/EDR/MDR</text:span><text:span text:style-name="T148">）</text:span></text:p>
          </table:table-cell>
        </table:table-row>
        <table:table-row table:style-name="表格128.1">
          <table:table-cell table:style-name="表格128.A2" office:value-type="string">
            <text:p text:style-name="P29" loext:marker-style-name="T147"><text:span text:style-name="T230">③ </text:span><text:span text:style-name="T148">事後復原</text:span></text:p>
          </table:table-cell>
          <table:table-cell table:style-name="表格128.A2" office:value-type="string">
            <text:p text:style-name="P29" loext:marker-style-name="T147"><text:span text:style-name="T148">壞掉後快速救回來</text:span><text:span text:style-name="T147"/></text:p>
          </table:table-cell>
          <table:table-cell table:style-name="表格128.A2" office:value-type="string">
            <text:p text:style-name="P29" loext:marker-style-name="T147"><text:span text:style-name="T148">備份還原、啟動備援系統、災難復原（</text:span><text:span text:style-name="T230">BCP</text:span><text:span text:style-name="T148">、</text:span><text:span text:style-name="T230">RTO/RPO</text:span><text:span text:style-name="T148">）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事前預防：</text:span><text:span text:style-name="T250">MFA</text:span><text:span text:style-name="T251">（多因素驗證）</text:span></text:h>
      <text:p text:style-name="P35" loext:marker-style-name="T107"><text:span text:style-name="T194">MFA = Multi-Factor Authentication</text:span><text:span text:style-name="T106">。登入帳號時不只輸入密碼，還要再驗證一次身份：手機簡訊驗證碼、</text:span><text:span text:style-name="T194">Google Authenticator </text:span><text:span text:style-name="T106">動態碼、指紋或臉部辨識。為什麼要 </text:span><text:span text:style-name="T194">MFA</text:span><text:span text:style-name="T106">？即使駭客知道你的密碼，沒有你的手機或指紋，也無法登入。</text:span></text:p>
      <text:h text:style-name="P12" text:outline-level="3"><text:span text:style-name="T249">▍</text:span><text:span text:style-name="T250"> </text:span><text:span text:style-name="T251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" loext:marker-style-name="T75"><text:span text:style-name="T76">工具</text:span><text:span text:style-name="T75"/></text:p>
            </table:table-cell>
            <table:table-cell table:style-name="表格129.A1" office:value-type="string">
              <text:p text:style-name="P4" loext:marker-style-name="T75"><text:span text:style-name="T76">全名 </text:span><text:span text:style-name="T81">/ </text:span><text:span text:style-name="T76">說明</text:span></text:p>
            </table:table-cell>
            <table:table-cell table:style-name="表格129.A1" office:value-type="string">
              <text:p text:style-name="P4" loext:marker-style-name="T75"><text:span text:style-name="T76">會阻擋？</text:span><text:span text:style-name="T75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9" loext:marker-style-name="T147"><text:span text:style-name="T230">Firewall</text:span><text:span text:style-name="T147"/></text:p>
          </table:table-cell>
          <table:table-cell table:style-name="表格129.A2" office:value-type="string">
            <text:p text:style-name="P29" loext:marker-style-name="T147"><text:span text:style-name="T148">控制誰能進出網路</text:span><text:span text:style-name="T147"/></text:p>
          </table:table-cell>
          <table:table-cell table:style-name="表格129.A2" office:value-type="string">
            <text:p text:style-name="P29" loext:marker-style-name="T147"><text:span text:style-name="T230">✔ </text:span><text:span text:style-name="T148">會</text:span>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29" loext:marker-style-name="T147"><text:span text:style-name="T230">NGFW</text:span><text:span text:style-name="T147"/></text:p>
          </table:table-cell>
          <table:table-cell table:style-name="表格129.A3" office:value-type="string">
            <text:p text:style-name="P29" loext:marker-style-name="T147"><text:span text:style-name="T148">次世代防火牆，能辨識應用層威脅</text:span><text:span text:style-name="T147"/></text:p>
          </table:table-cell>
          <table:table-cell table:style-name="表格129.A3" office:value-type="string">
            <text:p text:style-name="P29" loext:marker-style-name="T147"><text:span text:style-name="T230">✔ </text:span><text:span text:style-name="T148">會</text:span></text:p>
          </table:table-cell>
        </table:table-row>
        <table:table-row table:style-name="表格129.1">
          <table:table-cell table:style-name="表格129.A2" office:value-type="string">
            <text:p text:style-name="P29" loext:marker-style-name="T147"><text:span text:style-name="T230">IDS</text:span><text:span text:style-name="T147"/></text:p>
          </table:table-cell>
          <table:table-cell table:style-name="表格129.A2" office:value-type="string">
            <text:p text:style-name="P29" loext:marker-style-name="T147"><text:span text:style-name="T148">入侵偵測系統，發現異常就發警報</text:span><text:span text:style-name="T147"/></text:p>
          </table:table-cell>
          <table:table-cell table:style-name="表格129.A2" office:value-type="string">
            <text:p text:style-name="P29" loext:marker-style-name="T147"><text:span text:style-name="T230">✘ </text:span><text:span text:style-name="T148">不會</text:span></text:p>
          </table:table-cell>
        </table:table-row>
        <table:table-row table:style-name="表格129.1">
          <table:table-cell table:style-name="表格129.A3" office:value-type="string">
            <text:p text:style-name="P29" loext:marker-style-name="T147"><text:span text:style-name="T230">IPS</text:span><text:span text:style-name="T147"/></text:p>
          </table:table-cell>
          <table:table-cell table:style-name="表格129.A3" office:value-type="string">
            <text:p text:style-name="P29" loext:marker-style-name="T147"><text:span text:style-name="T148">入侵防禦系統，發現異常直接阻擋</text:span><text:span text:style-name="T147"/></text:p>
          </table:table-cell>
          <table:table-cell table:style-name="表格129.A3" office:value-type="string">
            <text:p text:style-name="P29" loext:marker-style-name="T147"><text:span text:style-name="T230">✔ </text:span><text:span text:style-name="T148">會</text:span></text:p>
          </table:table-cell>
        </table:table-row>
        <table:table-row table:style-name="表格129.1">
          <table:table-cell table:style-name="表格129.A2" office:value-type="string">
            <text:p text:style-name="P29" loext:marker-style-name="T147"><text:span text:style-name="T230">EDR</text:span><text:span text:style-name="T147"/></text:p>
          </table:table-cell>
          <table:table-cell table:style-name="表格129.A2" office:value-type="string">
            <text:p text:style-name="P29" loext:marker-style-name="T147"><text:span text:style-name="T230">Endpoint Detection &amp; Response</text:span><text:span text:style-name="T148">，監控每台電腦行為</text:span></text:p>
          </table:table-cell>
          <table:table-cell table:style-name="表格129.A2" office:value-type="string">
            <text:p text:style-name="P29" loext:marker-style-name="T147"><text:span text:style-name="T230">✔ </text:span><text:span text:style-name="T148">會</text:span></text:p>
          </table:table-cell>
        </table:table-row>
        <table:table-row table:style-name="表格129.1">
          <table:table-cell table:style-name="表格129.A3" office:value-type="string">
            <text:p text:style-name="P29" loext:marker-style-name="T147"><text:span text:style-name="T230">MDR</text:span><text:span text:style-name="T147"/></text:p>
          </table:table-cell>
          <table:table-cell table:style-name="表格129.A3" office:value-type="string">
            <text:p text:style-name="P29" loext:marker-style-name="T147"><text:span text:style-name="T230">Managed D&amp;R</text:span><text:span text:style-name="T148">，委外資安監控服務（</text:span><text:span text:style-name="T230">24 </text:span><text:span text:style-name="T148">小時）</text:span></text:p>
          </table:table-cell>
          <table:table-cell table:style-name="表格129.A3" office:value-type="string">
            <text:p text:style-name="P29" loext:marker-style-name="T147"><text:span text:style-name="T230">✔ </text:span><text:span text:style-name="T148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6"><text:span text:style-name="T247">🏠 <text:s/></text:span><text:span text:style-name="T52">比喻幫你秒懂（公司＝大樓）</text:span></text:p>
            <text:p text:style-name="P7" loext:marker-style-name="T107"><text:span text:style-name="T106">防火牆＝社區大門警衛；</text:span><text:span text:style-name="T194">NGFW</text:span><text:span text:style-name="T106">＝更聰明的警衛（還會看你帶什麼東西進來）；</text:span><text:span text:style-name="T194">IDS</text:span><text:span text:style-name="T106">＝監視器警報（只會叫，不會阻止）；</text:span><text:span text:style-name="T194">IPS</text:span><text:span text:style-name="T106">＝保全（直接壓制壞人）；</text:span><text:span text:style-name="T194">EDR</text:span><text:span text:style-name="T106">＝每個房間都裝攝影機（監控每台電腦</text:span><text:span text:style-name="T194">/</text:span><text:span text:style-name="T106">程式）；</text:span><text:span text:style-name="T194">MDR</text:span><text:span text:style-name="T106">＝把保全工作委外給專業公司 </text:span><text:span text:style-name="T194">24 </text:span><text:span text:style-name="T106">小時監控。</text:span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</text:span><text:span text:style-name="T251">事後復原：備份、</text:span><text:span text:style-name="T250">RTO / RPO</text:span><text:span text:style-name="T251">、</text:span><text:span text:style-name="T250">BCP</text:span></text:h>
      <text:p text:style-name="P35" loext:marker-style-name="T107"><text:span text:style-name="T106">當資料損毀或遭加密（如勒索病毒），可透過備份救回。最佳實踐：本地備份 </text:span><text:span text:style-name="T194">+ </text:span><text:span text:style-name="T106">異地備份（台北機房同步到高雄機房）；定期測試「備份能否真的還原」；雲端備份（</text:span><text:span text:style-name="T194">AWS/Azure/GCP</text:span><text:span text:style-name="T106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" loext:marker-style-name="T75"><text:span text:style-name="T76">指標</text:span><text:span text:style-name="T75"/></text:p>
            </table:table-cell>
            <table:table-cell table:style-name="表格130.A1" office:value-type="string">
              <text:p text:style-name="P4" loext:marker-style-name="T75"><text:span text:style-name="T76">全名</text:span><text:span text:style-name="T75"/></text:p>
            </table:table-cell>
            <table:table-cell table:style-name="表格130.A1" office:value-type="string">
              <text:p text:style-name="P4" loext:marker-style-name="T75"><text:span text:style-name="T76">問什麼</text:span><text:span text:style-name="T75"/></text:p>
            </table:table-cell>
            <table:table-cell table:style-name="表格130.A1" office:value-type="string">
              <text:p text:style-name="P4" loext:marker-style-name="T75"><text:span text:style-name="T76">範例</text:span><text:span text:style-name="T75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9" loext:marker-style-name="T147"><text:span text:style-name="T230">RTO</text:span><text:span text:style-name="T147"/></text:p>
          </table:table-cell>
          <table:table-cell table:style-name="表格130.A2" office:value-type="string">
            <text:p text:style-name="P29" loext:marker-style-name="T147"><text:span text:style-name="T230">Recovery Time Objective </text:span><text:span text:style-name="T148">復原時間目標</text:span></text:p>
          </table:table-cell>
          <table:table-cell table:style-name="表格130.A2" office:value-type="string">
            <text:p text:style-name="P29" loext:marker-style-name="T147"><text:span text:style-name="T148">系統出問題後，最多能停多久？</text:span><text:span text:style-name="T147"/></text:p>
          </table:table-cell>
          <table:table-cell table:style-name="表格130.A2" office:value-type="string">
            <text:p text:style-name="P29" loext:marker-style-name="T147"><text:span text:style-name="T148">銀行 </text:span><text:span text:style-name="T230">RTO 10 </text:span><text:span text:style-name="T148">分鐘；學校網站 </text:span><text:span text:style-name="T230">RTO </text:span><text:span text:style-name="T148">半天</text:span></text:p>
          </table:table-cell>
        </table:table-row>
        <table:table-row table:style-name="表格130.1">
          <table:table-cell table:style-name="表格130.A3" office:value-type="string">
            <text:p text:style-name="P29" loext:marker-style-name="T147"><text:span text:style-name="T230">RPO</text:span><text:span text:style-name="T147"/></text:p>
          </table:table-cell>
          <table:table-cell table:style-name="表格130.A3" office:value-type="string">
            <text:p text:style-name="P29" loext:marker-style-name="T147"><text:span text:style-name="T230">Recovery Point Objective </text:span><text:span text:style-name="T148">復原點目標</text:span></text:p>
          </table:table-cell>
          <table:table-cell table:style-name="表格130.A3" office:value-type="string">
            <text:p text:style-name="P29" loext:marker-style-name="T147"><text:span text:style-name="T148">最多能接受丟失幾小時的資料？</text:span><text:span text:style-name="T147"/></text:p>
          </table:table-cell>
          <table:table-cell table:style-name="表格130.A3" office:value-type="string">
            <text:p text:style-name="P29" loext:marker-style-name="T147"><text:span text:style-name="T148">銀行 </text:span><text:span text:style-name="T230">RPO </text:span><text:span text:style-name="T148">接近 </text:span><text:span text:style-name="T230">0</text:span><text:span text:style-name="T148">；一般公司 </text:span><text:span text:style-name="T230">RPO 24 </text:span><text:span text:style-name="T148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6"><text:span text:style-name="T247">⏱ <text:s/></text:span><text:span text:style-name="T299">一句話記憶法</text:span></text:p>
            <text:p text:style-name="P7"><text:span text:style-name="T307">RTO = </text:span><text:span text:style-name="T300">停機時間</text:span><text:span text:style-name="T106">（能停多久？）　</text:span><text:span text:style-name="T307">RPO = </text:span><text:span text:style-name="T300">資料損失量</text:span><text:span text:style-name="T106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6"><text:span text:style-name="T247">🏢 <text:s/></text:span><text:span text:style-name="T63">BCP</text:span><text:span text:style-name="T52">：公司炸掉了還能繼續運作嗎？</text:span></text:p>
            <text:p text:style-name="P7" loext:marker-style-name="T107"><text:span text:style-name="T194">BCP = Business Continuity Planning</text:span><text:span text:style-name="T106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SSDLC</text:span><text:span text:style-name="T251">：軟體開發的每個階段都加入資安</text:span></text:h>
      <text:p text:style-name="P35" loext:marker-style-name="T107"><text:span text:style-name="T194">SSDLC = Security Software Development Life Cycle</text:span><text:span text:style-name="T106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" loext:marker-style-name="T75"><text:span text:style-name="T76">階段</text:span><text:span text:style-name="T75"/></text:p>
            </table:table-cell>
            <table:table-cell table:style-name="表格131.A1" office:value-type="string">
              <text:p text:style-name="P4" loext:marker-style-name="T75"><text:span text:style-name="T76">英文</text:span><text:span text:style-name="T75"/></text:p>
            </table:table-cell>
            <table:table-cell table:style-name="表格131.A1" office:value-type="string">
              <text:p text:style-name="P4" loext:marker-style-name="T75"><text:span text:style-name="T76">做什麼</text:span><text:span text:style-name="T75"/></text:p>
            </table:table-cell>
            <table:table-cell table:style-name="表格131.A1" office:value-type="string">
              <text:p text:style-name="P4" loext:marker-style-name="T75"><text:span text:style-name="T76">資安重點</text:span><text:span text:style-name="T75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9" loext:marker-style-name="T147"><text:span text:style-name="T230">① </text:span><text:span text:style-name="T148">定義</text:span></text:p>
          </table:table-cell>
          <table:table-cell table:style-name="表格131.A2" office:value-type="string">
            <text:p text:style-name="P29" loext:marker-style-name="T147"><text:span text:style-name="T230">Define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確認需求與範圍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列出安全需求（需要登入驗證嗎？）</text:span><text:span text:style-name="T147"/></text:p>
          </table:table-cell>
        </table:table-row>
        <table:table-row table:style-name="表格131.1">
          <table:table-cell table:style-name="表格131.A3" office:value-type="string">
            <text:p text:style-name="P29" loext:marker-style-name="T147"><text:span text:style-name="T230">② </text:span><text:span text:style-name="T148">設計</text:span></text:p>
          </table:table-cell>
          <table:table-cell table:style-name="表格131.A3" office:value-type="string">
            <text:p text:style-name="P29" loext:marker-style-name="T147"><text:span text:style-name="T230">Design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設計系統架構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規劃權限控管、密碼加密、防 </text:span><text:span text:style-name="T230">SQL Injection</text:span></text:p>
          </table:table-cell>
        </table:table-row>
        <table:table-row table:style-name="表格131.1">
          <table:table-cell table:style-name="表格131.A2" office:value-type="string">
            <text:p text:style-name="P29" loext:marker-style-name="T147"><text:span text:style-name="T230">③ </text:span><text:span text:style-name="T148">開發</text:span></text:p>
          </table:table-cell>
          <table:table-cell table:style-name="表格131.A2" office:value-type="string">
            <text:p text:style-name="P29" loext:marker-style-name="T147"><text:span text:style-name="T230">Develop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工程師寫程式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遵守安全編碼規範，不寫危險程式碼</text:span><text:span text:style-name="T147"/></text:p>
          </table:table-cell>
        </table:table-row>
        <table:table-row table:style-name="表格131.1">
          <table:table-cell table:style-name="表格131.A3" office:value-type="string">
            <text:p text:style-name="P29" loext:marker-style-name="T147"><text:span text:style-name="T230">④ </text:span><text:span text:style-name="T148">測試</text:span></text:p>
          </table:table-cell>
          <table:table-cell table:style-name="表格131.A3" office:value-type="string">
            <text:p text:style-name="P29" loext:marker-style-name="T147"><text:span text:style-name="T230">Test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測試功能與安全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弱點掃描、滲透測試，找出漏洞</text:span><text:span text:style-name="T147"/></text:p>
          </table:table-cell>
        </table:table-row>
        <table:table-row table:style-name="表格131.1">
          <table:table-cell table:style-name="表格131.A2" office:value-type="string">
            <text:p text:style-name="P29" loext:marker-style-name="T147"><text:span text:style-name="T230">⑤ </text:span><text:span text:style-name="T148">上線</text:span></text:p>
          </table:table-cell>
          <table:table-cell table:style-name="表格131.A2" office:value-type="string">
            <text:p text:style-name="P29" loext:marker-style-name="T147"><text:span text:style-name="T230">Deploy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正式發布系統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確認設定沒疏漏，最小權限原則</text:span><text:span text:style-name="T147"/></text:p>
          </table:table-cell>
        </table:table-row>
        <table:table-row table:style-name="表格131.1">
          <table:table-cell table:style-name="表格131.A3" office:value-type="string">
            <text:p text:style-name="P29" loext:marker-style-name="T147"><text:span text:style-name="T230">⑥ </text:span><text:span text:style-name="T148">維護</text:span></text:p>
          </table:table-cell>
          <table:table-cell table:style-name="表格131.A3" office:value-type="string">
            <text:p text:style-name="P29" loext:marker-style-name="T147"><text:span text:style-name="T230">Maintain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持續監控與更新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定期更新修補，監控異常行為</text:span><text:span text:style-name="T147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6"><text:span text:style-name="T247">🔑 <text:s/></text:span><text:span text:style-name="T261">SSDLC </text:span><text:span text:style-name="T251">核心</text:span></text:p>
            <text:p text:style-name="P7" loext:marker-style-name="T107"><text:span text:style-name="T106">核心精神「左移（</text:span><text:span text:style-name="T194">Shift Left</text:span><text:span text:style-name="T106">）」——把資安工作從最後一步，往前移到設計和開發階段。越早發現</text:span><text:soft-page-break/><text:span text:style-name="T106">漏洞，修復成本越低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ISO 27001</text:span><text:span text:style-name="T251">：用制度管理資安</text:span></text:h>
      <text:p text:style-name="P35" loext:marker-style-name="T107"><text:span text:style-name="T194">ISO 27001 </text:span><text:span text:style-name="T106">是國際公認的資安管理制度標準，建立的制度稱為 </text:span><text:span text:style-name="T194">ISMS</text:span><text:span text:style-name="T106">（</text:span><text:span text:style-name="T194">Information Security Management System</text:span><text:span text:style-name="T106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" loext:marker-style-name="T75"><text:span text:style-name="T76">四個面向</text:span><text:span text:style-name="T75"/></text:p>
            </table:table-cell>
            <table:table-cell table:style-name="表格132.A1" office:value-type="string">
              <text:p text:style-name="P4" loext:marker-style-name="T75"><text:span text:style-name="T76">管什麼</text:span><text:span text:style-name="T75"/></text:p>
            </table:table-cell>
            <table:table-cell table:style-name="表格132.A1" office:value-type="string">
              <text:p text:style-name="P4" loext:marker-style-name="T75"><text:span text:style-name="T76">例子</text:span><text:span text:style-name="T75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9" loext:marker-style-name="T147"><text:span text:style-name="T148">人（</text:span><text:span text:style-name="T230">People</text:span><text:span text:style-name="T148">）</text:span></text:p>
          </table:table-cell>
          <table:table-cell table:style-name="表格132.A2" office:value-type="string">
            <text:p text:style-name="P29" loext:marker-style-name="T147"><text:span text:style-name="T148">管理人員的行為與責任</text:span><text:span text:style-name="T147"/></text:p>
          </table:table-cell>
          <table:table-cell table:style-name="表格132.A2" office:value-type="string">
            <text:p text:style-name="P29" loext:marker-style-name="T147"><text:span text:style-name="T148">員工教育訓練、離職員工帳號立即停用、權限最小化</text:span><text:span text:style-name="T147"/></text:p>
          </table:table-cell>
        </table:table-row>
        <table:table-row table:style-name="表格132.1">
          <table:table-cell table:style-name="表格132.A3" office:value-type="string">
            <text:p text:style-name="P29" loext:marker-style-name="T147"><text:span text:style-name="T148">技術（</text:span><text:span text:style-name="T230">Technology</text:span><text:span text:style-name="T148">）</text:span></text:p>
          </table:table-cell>
          <table:table-cell table:style-name="表格132.A3" office:value-type="string">
            <text:p text:style-name="P29" loext:marker-style-name="T147"><text:span text:style-name="T148">使用適當的安全技術</text:span><text:span text:style-name="T147"/></text:p>
          </table:table-cell>
          <table:table-cell table:style-name="表格132.A3" office:value-type="string">
            <text:p text:style-name="P29" loext:marker-style-name="T147"><text:span text:style-name="T148">防火牆、</text:span><text:span text:style-name="T230">MFA</text:span><text:span text:style-name="T148">、資料加密、</text:span><text:span text:style-name="T230">EDR</text:span></text:p>
          </table:table-cell>
        </table:table-row>
        <table:table-row table:style-name="表格132.1">
          <table:table-cell table:style-name="表格132.A2" office:value-type="string">
            <text:p text:style-name="P29" loext:marker-style-name="T147"><text:span text:style-name="T148">組織（</text:span><text:span text:style-name="T230">Organization</text:span><text:span text:style-name="T148">）</text:span></text:p>
          </table:table-cell>
          <table:table-cell table:style-name="表格132.A2" office:value-type="string">
            <text:p text:style-name="P29" loext:marker-style-name="T147"><text:span text:style-name="T148">建立流程與管理制度</text:span><text:span text:style-name="T147"/></text:p>
          </table:table-cell>
          <table:table-cell table:style-name="表格132.A2" office:value-type="string">
            <text:p text:style-name="P29" loext:marker-style-name="T147"><text:span text:style-name="T148">資安政策、</text:span><text:span text:style-name="T230">SOP</text:span><text:span text:style-name="T148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9" loext:marker-style-name="T147"><text:span text:style-name="T148">實體（</text:span><text:span text:style-name="T230">Physical</text:span><text:span text:style-name="T148">）</text:span></text:p>
          </table:table-cell>
          <table:table-cell table:style-name="表格132.A3" office:value-type="string">
            <text:p text:style-name="P29" loext:marker-style-name="T147"><text:span text:style-name="T148">保護實體環境</text:span><text:span text:style-name="T147"/></text:p>
          </table:table-cell>
          <table:table-cell table:style-name="表格132.A3" office:value-type="string">
            <text:p text:style-name="P29" loext:marker-style-name="T147"><text:span text:style-name="T148">機房門禁、監視器、防止未授權人員進入</text:span><text:span text:style-name="T147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6"><text:span text:style-name="T247">🌟 <text:s/></text:span><text:span text:style-name="T299">考試必背三句話</text:span></text:p>
            <text:p text:style-name="P7" loext:marker-style-name="T107"><text:span text:style-name="T194">1. </text:span><text:span text:style-name="T106">資安三階段：事前預防 → 事中偵測 → 事後復原。</text:span></text:p>
            <text:p text:style-name="P8" loext:marker-style-name="T107"><text:span text:style-name="T194">2. SSDLC</text:span><text:span text:style-name="T106">：六階段（</text:span><text:span text:style-name="T194">Define→Design→Develop→Test→Deploy→Maintain</text:span><text:span text:style-name="T106">）都加入資安。</text:span></text:p>
            <text:p text:style-name="P8" loext:marker-style-name="T107"><text:span text:style-name="T194">3. ISO 27001</text:span><text:span text:style-name="T106">：用 </text:span><text:span text:style-name="T194">ISMS </text:span><text:span text:style-name="T106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伍、進階防禦：</text:span><text:span text:style-name="T27">EDR · MDR · MITRE ATT&amp;CK · </text:span><text:span text:style-name="T28">數位韌性</text:span></text:h>
      <text:p text:style-name="P35" loext:marker-style-name="T107"><text:span text:style-name="T106">現代駭客不一定放病毒，而是偷登入帳號偽裝成正常使用者、長期潛伏、利用合法工具發動攻擊。因此資安核心已從「防毒」轉向「持續監控電腦行為，即時偵測並快速應變」。</text:span><text:span text:style-name="T107"/></text:p>
      <text:h text:style-name="P12" text:outline-level="3"><text:span text:style-name="T249">▍</text:span><text:span text:style-name="T250"> EDR — </text:span><text:span text:style-name="T251">自己監控的資安工具</text:span></text:h>
      <text:p text:style-name="P35" loext:marker-style-name="T107"><text:span text:style-name="T194">EDR = Endpoint Detection and Response</text:span><text:span text:style-name="T106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26" loext:marker-style-name="T69"><text:span text:style-name="T70">三大偵測範圍</text:span><text:span text:style-name="T69"/></text:p>
            </table:table-cell>
            <table:table-cell table:style-name="表格133.A1" office:value-type="string">
              <text:p text:style-name="P26" loext:marker-style-name="T69"><text:span text:style-name="T70">三大回應動作</text:span><text:span text:style-name="T69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9" loext:marker-style-name="T83"><text:span text:style-name="T84">檔案行為：大量加密</text:span><text:span text:style-name="T182">/</text:span><text:span text:style-name="T84">修改系統檔案 → 可能勒索病毒｜程式行為：</text:span><text:span text:style-name="T182">Office </text:span><text:span text:style-name="T84">偷偷開命令列 → 明顯異常｜網路行為：突然連線境外 </text:span><text:span text:style-name="T182">IP → </text:span><text:span text:style-name="T84">可能已遭入侵</text:span></text:p>
          </table:table-cell>
          <table:table-cell table:style-name="表格133.A2" office:value-type="string">
            <text:p text:style-name="P29" loext:marker-style-name="T83"><text:span text:style-name="T84">中斷程序：立即殺掉可疑惡意程式｜隔離主機：切斷該電腦與內網連線，防擴散｜封鎖連線：禁止與駭客伺服器通訊</text:span><text:span text:style-name="T83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6"><text:span text:style-name="T247">💡 <text:s/></text:span><text:span text:style-name="T251">核心觀念</text:span></text:p>
            <text:p text:style-name="P7" loext:marker-style-name="T107"><text:span text:style-name="T194">EDR </text:span><text:span text:style-name="T106">是「買工具、自己守」。企業需要有內部資安人員負責查看警報並處理事件。</text:span></text:p>
          </table:table-cell>
          <table:covered-table-cell/>
        </table:table-row>
      </table:table>
      <text:h text:style-name="P12" text:outline-level="3"><text:span text:style-name="T249">▍</text:span><text:span text:style-name="T250"> MDR — </text:span><text:span text:style-name="T251">委外的資安託管服務</text:span></text:h>
      <text:p text:style-name="P35" loext:marker-style-name="T107"><text:span text:style-name="T194">MDR = Managed Detection and Response</text:span><text:span text:style-name="T106">。重點在「</text:span><text:span text:style-name="T194">Managed</text:span><text:span text:style-name="T106">（託管）」——你不需要自己有資安團隊，直接花錢請外部資安公司 </text:span><text:span text:style-name="T194">24 </text:span><text:span text:style-name="T106">小時幫你守。服務包含 </text:span><text:span text:style-name="T194">SOC</text:span><text:span text:style-name="T106">（資安監控中心，專業人員 </text:span><text:span text:style-name="T194">24 </text:span><text:span text:style-name="T106">小時盯著）、</text:span><text:span text:style-name="T194">IDS</text:span><text:span text:style-name="T106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4" loext:marker-style-name="T69"><text:span text:style-name="T70">比較項目</text:span><text:span text:style-name="T69"/></text:p>
            </table:table-cell>
            <table:table-cell table:style-name="表格134.A1" office:value-type="string">
              <text:p text:style-name="P4" loext:marker-style-name="T69"><text:span text:style-name="T79">EDR</text:span><text:span text:style-name="T69"/></text:p>
            </table:table-cell>
            <table:table-cell table:style-name="表格134.A1" office:value-type="string">
              <text:p text:style-name="P4" loext:marker-style-name="T69"><text:span text:style-name="T79">MDR</text:span><text:span text:style-name="T69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9" loext:marker-style-name="T83"><text:span text:style-name="T84">管理方式</text:span><text:span text:style-name="T83"/></text:p>
          </table:table-cell>
          <table:table-cell table:style-name="表格134.A2" office:value-type="string">
            <text:p text:style-name="P29" loext:marker-style-name="T83"><text:span text:style-name="T84">自行管理</text:span><text:span text:style-name="T83"/></text:p>
          </table:table-cell>
          <table:table-cell table:style-name="表格134.A2" office:value-type="string">
            <text:p text:style-name="P29" loext:marker-style-name="T83"><text:span text:style-name="T84">委外管理</text:span><text:span text:style-name="T83"/></text:p>
          </table:table-cell>
        </table:table-row>
        <table:table-row table:style-name="表格134.1">
          <table:table-cell table:style-name="表格134.A3" office:value-type="string">
            <text:p text:style-name="P29" loext:marker-style-name="T83"><text:span text:style-name="T84">監控時間</text:span><text:span text:style-name="T83"/></text:p>
          </table:table-cell>
          <table:table-cell table:style-name="表格134.A3" office:value-type="string">
            <text:p text:style-name="P29" loext:marker-style-name="T83"><text:span text:style-name="T84">視團隊而定</text:span><text:span text:style-name="T83"/></text:p>
          </table:table-cell>
          <table:table-cell table:style-name="表格134.A3" office:value-type="string">
            <text:p text:style-name="P29" loext:marker-style-name="T83"><text:span text:style-name="T182">24 / 7 </text:span><text:span text:style-name="T84">全天</text:span></text:p>
          </table:table-cell>
        </table:table-row>
        <table:table-row table:style-name="表格134.1">
          <table:table-cell table:style-name="表格134.A2" office:value-type="string">
            <text:p text:style-name="P29" loext:marker-style-name="T83"><text:span text:style-name="T84">所需能力</text:span><text:span text:style-name="T83"/></text:p>
          </table:table-cell>
          <table:table-cell table:style-name="表格134.A2" office:value-type="string">
            <text:p text:style-name="P29" loext:marker-style-name="T83"><text:span text:style-name="T84">需內部資安人員</text:span><text:span text:style-name="T83"/></text:p>
          </table:table-cell>
          <table:table-cell table:style-name="表格134.A2" office:value-type="string">
            <text:p text:style-name="P29" loext:marker-style-name="T83"><text:span text:style-name="T84">無須自建團隊</text:span><text:span text:style-name="T83"/></text:p>
          </table:table-cell>
        </table:table-row>
        <table:table-row table:style-name="表格134.1">
          <table:table-cell table:style-name="表格134.A3" office:value-type="string">
            <text:p text:style-name="P29" loext:marker-style-name="T83"><text:span text:style-name="T84">適合對象</text:span><text:span text:style-name="T83"/></text:p>
          </table:table-cell>
          <table:table-cell table:style-name="表格134.A3" office:value-type="string">
            <text:p text:style-name="P29" loext:marker-style-name="T83"><text:span text:style-name="T84">大型企業</text:span><text:span text:style-name="T83"/></text:p>
          </table:table-cell>
          <table:table-cell table:style-name="表格134.A3" office:value-type="string">
            <text:p text:style-name="P29" loext:marker-style-name="T83"><text:span text:style-name="T84">中小企業</text:span><text:span text:style-name="T83"/>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9" loext:marker-style-name="T83"><text:span text:style-name="T84">成本模式</text:span><text:span text:style-name="T83"/></text:p>
          </table:table-cell>
          <table:table-cell table:style-name="表格134.A2" office:value-type="string">
            <text:p text:style-name="P29" loext:marker-style-name="T83"><text:span text:style-name="T84">工具費 </text:span><text:span text:style-name="T182">+ </text:span><text:span text:style-name="T84">人力</text:span></text:p>
          </table:table-cell>
          <table:table-cell table:style-name="表格134.A2" office:value-type="string">
            <text:p text:style-name="P29" loext:marker-style-name="T83"><text:span text:style-name="T84">月費 </text:span><text:span text:style-name="T182">/ </text:span><text:span text:style-name="T84">年費訂閱</text:span></text:p>
          </table:table-cell>
        </table:table-row>
      </table:table>
      <text:h text:style-name="P12" text:outline-level="3"><text:span text:style-name="T249">▍</text:span><text:span text:style-name="T250"> MITRE ATT&amp;CK — </text:span><text:span text:style-name="T251">駭客招式大全</text:span></text:h>
      <text:p text:style-name="P35" loext:marker-style-name="T107"><text:span text:style-name="T106">資安界發現駭客攻擊模式相當固定（寄釣魚信→偷帳號→開後門→橫向移動→竊取資料）。</text:span><text:span text:style-name="T194">MITRE </text:span><text:span text:style-name="T106">公司將所有已知駭客手法整理成全球通用的知識庫，稱為 </text:span><text:span text:style-name="T194">MITRE ATT&amp;CK</text:span><text:span text:style-name="T106">（</text:span><text:span text:style-name="T194">Adversarial Tactics, Techniques, and Common Knowledge</text:span><text:span text:style-name="T106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" loext:marker-style-name="T75"><text:span text:style-name="T81">TTP</text:span><text:span text:style-name="T75"/></text:p>
            </table:table-cell>
            <table:table-cell table:style-name="表格135.A1" office:value-type="string">
              <text:p text:style-name="P4" loext:marker-style-name="T75"><text:span text:style-name="T76">意義</text:span><text:span text:style-name="T75"/></text:p>
            </table:table-cell>
            <table:table-cell table:style-name="表格135.A1" office:value-type="string">
              <text:p text:style-name="P4" loext:marker-style-name="T75"><text:span text:style-name="T81">ATT&amp;CK </text:span><text:span text:style-name="T76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9" loext:marker-style-name="T147"><text:span text:style-name="T230">T - Tactics</text:span><text:span text:style-name="T147"/></text:p>
          </table:table-cell>
          <table:table-cell table:style-name="表格135.A2" office:value-type="string">
            <text:p text:style-name="P29" loext:marker-style-name="T147"><text:span text:style-name="T148">戰術（攻擊目的）</text:span><text:span text:style-name="T147"/></text:p>
          </table:table-cell>
          <table:table-cell table:style-name="表格135.A2" office:value-type="string">
            <text:p text:style-name="P29" loext:marker-style-name="T147"><text:span text:style-name="T148">威脅分析：快速定性事件性質</text:span><text:span text:style-name="T147"/></text:p>
          </table:table-cell>
        </table:table-row>
        <table:table-row table:style-name="表格135.1">
          <table:table-cell table:style-name="表格135.A3" office:value-type="string">
            <text:p text:style-name="P29" loext:marker-style-name="T147"><text:span text:style-name="T230">T - Techniques</text:span><text:span text:style-name="T147"/></text:p>
          </table:table-cell>
          <table:table-cell table:style-name="表格135.A3" office:value-type="string">
            <text:p text:style-name="P29" loext:marker-style-name="T147"><text:span text:style-name="T148">技術（使用方法）</text:span><text:span text:style-name="T147"/></text:p>
          </table:table-cell>
          <table:table-cell table:style-name="表格135.A3" office:value-type="string">
            <text:p text:style-name="P29" loext:marker-style-name="T147"><text:span text:style-name="T148">防禦對應：針對常見手法加強監控</text:span><text:span text:style-name="T147"/></text:p>
          </table:table-cell>
        </table:table-row>
        <table:table-row table:style-name="表格135.1">
          <table:table-cell table:style-name="表格135.A2" office:value-type="string">
            <text:p text:style-name="P29" loext:marker-style-name="T147"><text:span text:style-name="T230">P - Procedures</text:span><text:span text:style-name="T147"/></text:p>
          </table:table-cell>
          <table:table-cell table:style-name="表格135.A2" office:value-type="string">
            <text:p text:style-name="P29" loext:marker-style-name="T147"><text:span text:style-name="T148">流程（實際操作步驟）</text:span><text:span text:style-name="T147"/></text:p>
          </table:table-cell>
          <table:table-cell table:style-name="表格135.A2" office:value-type="string">
            <text:p text:style-name="P29" loext:marker-style-name="T147"><text:span text:style-name="T148">主動防禦：預測下一步，提前部署</text:span><text:span text:style-name="T147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6"><text:span text:style-name="T247">💡 <text:s/></text:span><text:span text:style-name="T251">核心觀念</text:span></text:p>
            <text:p text:style-name="P7" loext:marker-style-name="T107"><text:span text:style-name="T194">ATT&amp;CK </text:span><text:span text:style-name="T106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</text:span><text:span text:style-name="T251">數位韌性（</text:span><text:span text:style-name="T250">Digital Resilience</text:span><text:span text:style-name="T251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26" loext:marker-style-name="T69"><text:span text:style-name="T79">❌ </text:span><text:span text:style-name="T70">以前的想法</text:span></text:p>
            </table:table-cell>
            <table:table-cell table:style-name="表格136.A1" office:value-type="string">
              <text:p text:style-name="P26" loext:marker-style-name="T69"><text:span text:style-name="T79">✅ </text:span><text:span text:style-name="T70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9" loext:marker-style-name="T83"><text:span text:style-name="T84">「不能被攻擊」——重點：阻止所有入侵。</text:span><text:span text:style-name="T83"/></text:p>
          </table:table-cell>
          <table:table-cell table:style-name="表格136.A2" office:value-type="string">
            <text:p text:style-name="P29" loext:marker-style-name="T83"><text:span text:style-name="T84">「被打了還能撐住並快速恢復」——重點：強化復原能力。</text:span><text:span text:style-name="T83"/></text:p>
          </table:table-cell>
        </table:table-row>
      </table:table>
      <text:p text:style-name="P35" loext:marker-style-name="T10"><text:span text:style-name="T11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0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6"><text:span text:style-name="T247">📝 <text:s/></text:span><text:span text:style-name="T299">一行記憶法</text:span></text:p>
            <text:p text:style-name="P7"><text:span text:style-name="T307">🛡 EDR → </text:span><text:span text:style-name="T106">自己買工具守　</text:span><text:span text:style-name="T300">👥 </text:span><text:span text:style-name="T307">MDR → </text:span><text:span text:style-name="T106">請公司幫你守</text:span></text:p>
            <text:p text:style-name="P8"><text:span text:style-name="T307">📖 ATT&amp;CK → </text:span><text:span text:style-name="T106">駭客招式教材　</text:span><text:span text:style-name="T300">💪 韌性 → </text:span><text:span text:style-name="T106">撐住、快速復原</text:span></text:p>
          </table:table-cell>
        </table:table-row>
      </table:table>
      <text:h text:style-name="P11" text:outline-level="2" loext:marker-style-name="T27"><text:span text:style-name="T28">陸、</text:span><text:span text:style-name="T27">Zero Trust </text:span><text:span text:style-name="T28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6"><text:span text:style-name="T247">📋 <text:s/></text:span><text:span text:style-name="T269">內容審查說明</text:span></text:p>
            <text:p text:style-name="P7" loext:marker-style-name="T107"><text:span text:style-name="T106">文中「三要素（身份</text:span><text:span text:style-name="T194">/</text:span><text:span text:style-name="T106">設備</text:span><text:span text:style-name="T194">/</text:span><text:span text:style-name="T106">情境）」源自 </text:span><text:span text:style-name="T194">Microsoft </text:span><text:span text:style-name="T106">的 </text:span><text:span text:style-name="T194">Zero Trust </text:span><text:span text:style-name="T106">簡化說法；</text:span><text:span text:style-name="T194">NIST SP 800-207 </text:span><text:span text:style-name="T106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35" loext:marker-style-name="T107"><text:span text:style-name="T106">傳統企業網路以「邊界防護」為核心，邊界之內的人員與設備幾乎被預設為可信任（城堡思維）。</text:span><text:span text:style-name="T194">Zero Trust </text:span><text:span text:style-name="T106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4"/>
            </table:table-cell>
            <table:table-cell table:style-name="表格139.A1" office:value-type="string">
              <text:p text:style-name="P4" loext:marker-style-name="T69"><text:span text:style-name="T70">傳統（城堡思維）</text:span><text:span text:style-name="T69"/></text:p>
            </table:table-cell>
            <table:table-cell table:style-name="表格139.A1" office:value-type="string">
              <text:p text:style-name="P4" loext:marker-style-name="T69"><text:span text:style-name="T79">Zero Trust</text:span><text:span text:style-name="T69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9" loext:marker-style-name="T83"><text:span text:style-name="T84">核心假設</text:span><text:span text:style-name="T83"/></text:p>
          </table:table-cell>
          <table:table-cell table:style-name="表格139.A2" office:value-type="string">
            <text:p text:style-name="P29" loext:marker-style-name="T83"><text:span text:style-name="T84">內網 </text:span><text:span text:style-name="T182">= </text:span><text:span text:style-name="T84">可信任</text:span></text:p>
          </table:table-cell>
          <table:table-cell table:style-name="表格139.A2" office:value-type="string">
            <text:p text:style-name="P29" loext:marker-style-name="T83"><text:span text:style-name="T84">任何人都需持續驗證</text:span><text:span text:style-name="T83"/></text:p>
          </table:table-cell>
        </table:table-row>
        <table:table-row table:style-name="表格139.1">
          <table:table-cell table:style-name="表格139.A3" office:value-type="string">
            <text:p text:style-name="P29" loext:marker-style-name="T83"><text:span text:style-name="T84">防護重點</text:span><text:span text:style-name="T83"/></text:p>
          </table:table-cell>
          <table:table-cell table:style-name="表格139.A3" office:value-type="string">
            <text:p text:style-name="P29" loext:marker-style-name="T83"><text:span text:style-name="T84">網路邊界 </text:span><text:span text:style-name="T182">/ </text:span><text:span text:style-name="T84">防火牆</text:span></text:p>
          </table:table-cell>
          <table:table-cell table:style-name="表格139.A3" office:value-type="string">
            <text:p text:style-name="P29" loext:marker-style-name="T83"><text:span text:style-name="T84">身份 </text:span><text:span text:style-name="T182">× </text:span><text:span text:style-name="T84">設備 </text:span><text:span text:style-name="T182">× </text:span><text:span text:style-name="T84">情境</text:span></text:p>
          </table:table-cell>
        </table:table-row>
        <table:table-row table:style-name="表格139.1">
          <table:table-cell table:style-name="表格139.A2" office:value-type="string">
            <text:p text:style-name="P29" loext:marker-style-name="T83"><text:span text:style-name="T84">登入之後</text:span><text:span text:style-name="T83"/></text:p>
          </table:table-cell>
          <table:table-cell table:style-name="表格139.A2" office:value-type="string">
            <text:p text:style-name="P29" loext:marker-style-name="T83"><text:span text:style-name="T84">幾乎不再驗證</text:span><text:span text:style-name="T83"/></text:p>
          </table:table-cell>
          <table:table-cell table:style-name="表格139.A2" office:value-type="string">
            <text:p text:style-name="P29" loext:marker-style-name="T83"><text:span text:style-name="T84">每個操作持續驗證</text:span><text:span text:style-name="T83"/></text:p>
          </table:table-cell>
        </table:table-row>
        <table:table-row table:style-name="表格139.1">
          <table:table-cell table:style-name="表格139.A3" office:value-type="string">
            <text:p text:style-name="P29" loext:marker-style-name="T83"><text:span text:style-name="T84">駭客入侵後</text:span><text:span text:style-name="T83"/></text:p>
          </table:table-cell>
          <table:table-cell table:style-name="表格139.A3" office:value-type="string">
            <text:p text:style-name="P29" loext:marker-style-name="T83"><text:span text:style-name="T84">可橫向移動整個內網</text:span><text:span text:style-name="T83"/></text:p>
          </table:table-cell>
          <table:table-cell table:style-name="表格139.A3" office:value-type="string">
            <text:p text:style-name="P29" loext:marker-style-name="T83"><text:span text:style-name="T84">被微分段限制，難以擴散</text:span><text:span text:style-name="T83"/></text:p>
          </table:table-cell>
        </table:table-row>
        <table:table-row table:style-name="表格139.1">
          <table:table-cell table:style-name="表格139.A2" office:value-type="string">
            <text:p text:style-name="P29" loext:marker-style-name="T83"><text:span text:style-name="T84">適合時代</text:span><text:span text:style-name="T83"/></text:p>
          </table:table-cell>
          <table:table-cell table:style-name="表格139.A2" office:value-type="string">
            <text:p text:style-name="P29" loext:marker-style-name="T83"><text:span text:style-name="T84">固定辦公室 </text:span><text:span text:style-name="T182">/ </text:span><text:span text:style-name="T84">單一內網</text:span></text:p>
          </table:table-cell>
          <table:table-cell table:style-name="表格139.A2" office:value-type="string">
            <text:p text:style-name="P29" loext:marker-style-name="T83"><text:span text:style-name="T182">Cloud / </text:span><text:span text:style-name="T84">遠端 </text:span><text:span text:style-name="T182">/ </text:span><text:span text:style-name="T84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6"><text:span text:style-name="T247">🔑 <text:s/></text:span><text:span text:style-name="T299">核心一句話</text:span></text:p>
            <text:p text:style-name="P7" loext:marker-style-name="T304"><text:soft-page-break/><text:span text:style-name="T307">❝ </text:span><text:span text:style-name="T300">永不信任，始終驗證 ❞（</text:span><text:span text:style-name="T307">Never Trust, Always Verify</text:span><text:span text:style-name="T300">）</text:span></text:p>
            <text:p text:style-name="P8" loext:marker-style-name="T107"><text:span text:style-name="T106">無論使用者身處公司內網或外部網路，無論設備是否為公司配發，系統都不會因為「位置」就直接信任，而是透過多重機制持續確認安全性。</text:span><text:span text:style-name="T107"/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</text:span><text:span text:style-name="T251">三大核心支柱：人 </text:span><text:span text:style-name="T250">· </text:span><text:span text:style-name="T251">機 </text:span><text:span text:style-name="T250">· </text:span><text:span text:style-name="T251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" loext:marker-style-name="T75"><text:span text:style-name="T76">支柱</text:span><text:span text:style-name="T75"/></text:p>
            </table:table-cell>
            <table:table-cell table:style-name="表格140.A1" office:value-type="string">
              <text:p text:style-name="P4" loext:marker-style-name="T75"><text:span text:style-name="T76">口訣</text:span><text:span text:style-name="T75"/></text:p>
            </table:table-cell>
            <table:table-cell table:style-name="表格140.A1" office:value-type="string">
              <text:p text:style-name="P4" loext:marker-style-name="T75"><text:span text:style-name="T76">具體內容</text:span><text:span text:style-name="T75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9" loext:marker-style-name="T147"><text:span text:style-name="T230">🔑 Identity</text:span><text:span text:style-name="T148">（身份驗證）</text:span></text:p>
          </table:table-cell>
          <table:table-cell table:style-name="表格140.A2" office:value-type="string">
            <text:p text:style-name="P29" loext:marker-style-name="T147"><text:span text:style-name="T148">人</text:span><text:span text:style-name="T147"/></text:p>
          </table:table-cell>
          <table:table-cell table:style-name="表格140.A2" office:value-type="string">
            <text:p text:style-name="P29" loext:marker-style-name="T147"><text:span text:style-name="T148">確認使用者是本人：帳密、</text:span><text:span text:style-name="T230">MFA</text:span><text:span text:style-name="T148">（手機 </text:span><text:span text:style-name="T230">OTP</text:span><text:span text:style-name="T148">、指紋）、</text:span><text:span text:style-name="T230">IAM </text:span><text:span text:style-name="T148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9" loext:marker-style-name="T147"><text:span text:style-name="T230">💻 Device</text:span><text:span text:style-name="T148">（設備健康）</text:span></text:p>
          </table:table-cell>
          <table:table-cell table:style-name="表格140.A3" office:value-type="string">
            <text:p text:style-name="P29" loext:marker-style-name="T147"><text:span text:style-name="T148">機</text:span><text:span text:style-name="T147"/></text:p>
          </table:table-cell>
          <table:table-cell table:style-name="表格140.A3" office:value-type="string">
            <text:p text:style-name="P29" loext:marker-style-name="T147"><text:span text:style-name="T148">確認設備是否安全：防毒更新、系統版本、是否為授權設備（</text:span><text:span text:style-name="T230">Device Posture</text:span><text:span text:style-name="T148">）</text:span></text:p>
          </table:table-cell>
        </table:table-row>
        <table:table-row table:style-name="表格140.1">
          <table:table-cell table:style-name="表格140.A2" office:value-type="string">
            <text:p text:style-name="P29" loext:marker-style-name="T147"><text:span text:style-name="T230">🌐 Context</text:span><text:span text:style-name="T148">（存取情境）</text:span></text:p>
          </table:table-cell>
          <table:table-cell table:style-name="表格140.A2" office:value-type="string">
            <text:p text:style-name="P29" loext:marker-style-name="T147"><text:span text:style-name="T148">境</text:span><text:span text:style-name="T147"/></text:p>
          </table:table-cell>
          <table:table-cell table:style-name="表格140.A2" office:value-type="string">
            <text:p text:style-name="P29" loext:marker-style-name="T147"><text:span text:style-name="T148">評估環境是否異常：登入時間、地點、行為模式；凌晨從境外登入會觸發額外驗證</text:span><text:span text:style-name="T147"/></text:p>
          </table:table-cell>
        </table:table-row>
      </table:table>
      <text:h text:style-name="P12" text:outline-level="3"><text:span text:style-name="T249">▍</text:span><text:span text:style-name="T250"> </text:span><text:span text:style-name="T251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" loext:marker-style-name="T75"><text:span text:style-name="T76">機制</text:span><text:span text:style-name="T75"/></text:p>
            </table:table-cell>
            <table:table-cell table:style-name="表格141.A1" office:value-type="string">
              <text:p text:style-name="P4" loext:marker-style-name="T75"><text:span text:style-name="T76">說明</text:span><text:span text:style-name="T75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9" loext:marker-style-name="T147"><text:span text:style-name="T230">① MFA </text:span><text:span text:style-name="T148">多因素驗證</text:span></text:p>
          </table:table-cell>
          <table:table-cell table:style-name="表格141.A2" office:value-type="string">
            <text:p text:style-name="P29" loext:marker-style-name="T147"><text:span text:style-name="T148">登入不只密碼，還需第二層驗證（手機驗證碼、指紋、硬體金鑰），密碼外洩也難入侵</text:span><text:span text:style-name="T147"/></text:p>
          </table:table-cell>
        </table:table-row>
        <table:table-row table:style-name="表格141.1">
          <table:table-cell table:style-name="表格141.A3" office:value-type="string">
            <text:p text:style-name="P29" loext:marker-style-name="T147"><text:span text:style-name="T230">② Least Privilege </text:span><text:span text:style-name="T148">最小權限</text:span></text:p>
          </table:table-cell>
          <table:table-cell table:style-name="表格141.A3" office:value-type="string">
            <text:p text:style-name="P29" loext:marker-style-name="T147"><text:span text:style-name="T148">每位使用者只獲得完成工作所需的最低權限。權限愈小，風險愈低</text:span><text:span text:style-name="T147"/></text:p>
          </table:table-cell>
        </table:table-row>
        <table:table-row table:style-name="表格141.1">
          <table:table-cell table:style-name="表格141.A2" office:value-type="string">
            <text:p text:style-name="P29" loext:marker-style-name="T147"><text:span text:style-name="T230">③ Micro-Segmentation </text:span><text:span text:style-name="T148">微分段</text:span></text:p>
          </table:table-cell>
          <table:table-cell table:style-name="表格141.A2" office:value-type="string">
            <text:p text:style-name="P29" loext:marker-style-name="T147"><text:span text:style-name="T148">將內網切成多個獨立小區段，各區設存取控制；攻破一段也無法橫向擴散</text:span><text:span text:style-name="T147"/></text:p>
          </table:table-cell>
        </table:table-row>
        <table:table-row table:style-name="表格141.1">
          <table:table-cell table:style-name="表格141.A3" office:value-type="string">
            <text:p text:style-name="P29" loext:marker-style-name="T147"><text:span text:style-name="T230">④ Continuous Monitoring </text:span><text:span text:style-name="T148">持續監控</text:span></text:p>
          </table:table-cell>
          <table:table-cell table:style-name="表格141.A3" office:value-type="string">
            <text:p text:style-name="P29" loext:marker-style-name="T147"><text:span text:style-name="T148">全天候分析行為，異常立即警示（如半夜大量下載、短時間多國登入、刪大量日誌）</text:span><text:span text:style-name="T147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6"><text:span text:style-name="T247">🔥 <text:s/></text:span><text:span text:style-name="T251">考前 </text:span><text:span text:style-name="T261">10 </text:span><text:span text:style-name="T251">秒超濃縮</text:span></text:p>
            <text:p text:style-name="P7" loext:marker-style-name="T107"><text:span text:style-name="T194">ZT </text:span><text:span text:style-name="T106">核心：不信任任何人（含內網）；檢查三件事——人（</text:span><text:span text:style-name="T194">Identity</text:span><text:span text:style-name="T106">）、機（</text:span><text:span text:style-name="T194">Device</text:span><text:span text:style-name="T106">）、境（</text:span><text:span text:style-name="T194">Context</text:span><text:span text:style-name="T106">）；搭配四招——</text:span><text:span text:style-name="T194">MFA </text:span><text:span text:style-name="T106">＋ 最小權限 ＋ 微分段 ＋ 持續監控。</text:span></text:p>
            <text:p text:style-name="P8" loext:marker-style-name="T107"><text:span text:style-name="T106">口訣：人機境，多驗、少給、切塊、一直看。</text:span><text:span text:style-name="T107"/></text:p>
          </table:table-cell>
          <table:covered-table-cell/>
        </table:table-row>
      </table:table>
      <text:h text:style-name="P12" text:outline-level="3"><text:span text:style-name="T249">▍</text:span><text:span text:style-name="T250"> Zero Trust </text:span><text:span text:style-name="T251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" loext:marker-style-name="T75"><text:span text:style-name="T81">Step</text:span><text:span text:style-name="T75"/></text:p>
            </table:table-cell>
            <table:table-cell table:style-name="表格142.A1" office:value-type="string">
              <text:p text:style-name="P4" loext:marker-style-name="T75"><text:span text:style-name="T76">動作</text:span><text:span text:style-name="T75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9" loext:marker-style-name="T147"><text:span text:style-name="T230">1 </text:span><text:span text:style-name="T148">發出存取請求</text:span></text:p>
          </table:table-cell>
          <table:table-cell table:style-name="表格142.A2" office:value-type="string">
            <text:p text:style-name="P29" loext:marker-style-name="T147"><text:span text:style-name="T148">使用者或設備嘗試存取某資源（系統 </text:span><text:span text:style-name="T230">/ </text:span><text:span text:style-name="T148">檔案 </text:span><text:span text:style-name="T230">/ </text:span><text:span text:style-name="T148">資料庫）</text:span></text:p>
          </table:table-cell>
        </table:table-row>
        <table:table-row table:style-name="表格142.1">
          <table:table-cell table:style-name="表格142.A3" office:value-type="string">
            <text:p text:style-name="P29" loext:marker-style-name="T147"><text:span text:style-name="T230">2 </text:span><text:span text:style-name="T148">身份驗證 </text:span><text:span text:style-name="T230">Identity</text:span></text:p>
          </table:table-cell>
          <table:table-cell table:style-name="表格142.A3" office:value-type="string">
            <text:p text:style-name="P29" loext:marker-style-name="T147"><text:span text:style-name="T148">確認身份：帳密 </text:span><text:span text:style-name="T230">+ MFA </text:span><text:span text:style-name="T148">驗證通過</text:span></text:p>
          </table:table-cell>
        </table:table-row>
        <table:table-row table:style-name="表格142.1">
          <table:table-cell table:style-name="表格142.A2" office:value-type="string">
            <text:p text:style-name="P29" loext:marker-style-name="T147"><text:span text:style-name="T230">3 </text:span><text:span text:style-name="T148">設備驗證 </text:span><text:span text:style-name="T230">Device</text:span></text:p>
          </table:table-cell>
          <table:table-cell table:style-name="表格142.A2" office:value-type="string">
            <text:p text:style-name="P29" loext:marker-style-name="T147"><text:span text:style-name="T148">檢查設備健康：防毒、更新、合規性符合要求</text:span><text:span text:style-name="T147"/></text:p>
          </table:table-cell>
        </table:table-row>
        <table:table-row table:style-name="表格142.1">
          <table:table-cell table:style-name="表格142.A3" office:value-type="string">
            <text:p text:style-name="P29" loext:marker-style-name="T147"><text:span text:style-name="T230">4 </text:span><text:span text:style-name="T148">情境評估 </text:span><text:span text:style-name="T230">Context</text:span></text:p>
          </table:table-cell>
          <table:table-cell table:style-name="表格142.A3" office:value-type="string">
            <text:p text:style-name="P29" loext:marker-style-name="T147"><text:span text:style-name="T148">分析存取時間、地點、行為模式，計算風險分數</text:span><text:span text:style-name="T147"/></text:p>
          </table:table-cell>
        </table:table-row>
        <table:table-row table:style-name="表格142.1">
          <table:table-cell table:style-name="表格142.A2" office:value-type="string">
            <text:p text:style-name="P29" loext:marker-style-name="T147"><text:span text:style-name="T230">5 </text:span><text:span text:style-name="T148">權限比對</text:span></text:p>
          </table:table-cell>
          <table:table-cell table:style-name="表格142.A2" office:value-type="string">
            <text:p text:style-name="P29" loext:marker-style-name="T147"><text:span text:style-name="T148">依最小權限原則，確認是否有權存取該資源</text:span><text:span text:style-name="T147"/></text:p>
          </table:table-cell>
        </table:table-row>
        <table:table-row table:style-name="表格142.1">
          <table:table-cell table:style-name="表格142.A3" office:value-type="string">
            <text:p text:style-name="P29" loext:marker-style-name="T147"><text:span text:style-name="T230">6 </text:span><text:span text:style-name="T148">授權或拒絕</text:span></text:p>
          </table:table-cell>
          <table:table-cell table:style-name="表格142.A3" office:value-type="string">
            <text:p text:style-name="P29" loext:marker-style-name="T147"><text:span text:style-name="T148">風險低且權限符合 → 授權；否則 → 要求補充驗證或拒絕</text:span><text:span text:style-name="T147"/></text:p>
          </table:table-cell>
        </table:table-row>
        <table:table-row table:style-name="表格142.1">
          <table:table-cell table:style-name="表格142.A2" office:value-type="string">
            <text:p text:style-name="P29" loext:marker-style-name="T147"><text:span text:style-name="T230">7 </text:span><text:span text:style-name="T148">持續監控</text:span></text:p>
          </table:table-cell>
          <table:table-cell table:style-name="表格142.A2" office:value-type="string">
            <text:p text:style-name="P29" loext:marker-style-name="T147"><text:span text:style-name="T148">授權後全程監控行為，發現異常立即告警或中斷連線</text:span><text:span text:style-name="T147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6"><text:span text:style-name="T247">⚠️ <text:s/></text:span><text:span text:style-name="T269">公職考試陷阱整理</text:span></text:p>
            <text:p text:style-name="P7"><text:span text:style-name="T214">ZT = </text:span><text:span text:style-name="T130">完全不相信員工？　</text:span><text:span text:style-name="T106">✗ 重點是「每次都驗證」，驗證通過員工仍可正常使用，只是不再預設信任。</text:span></text:p>
            <text:p text:style-name="P8"><text:soft-page-break/><text:span text:style-name="T130">只有外網才危險？　</text:span><text:span text:style-name="T106">✗ 內網也可能：帳號被盜、設備中毒、內部人員惡意操作，故內網也須驗證。</text:span></text:p>
            <text:p text:style-name="P8"><text:span text:style-name="T130">登入一次後就永久可信？　</text:span><text:span text:style-name="T106">✗ 持續驗證，單次登入不代表長期信任，高風險行為會觸發重新驗證。</text:span></text:p>
            <text:p text:style-name="P8"><text:span text:style-name="T214">Zero Trust </text:span><text:span text:style-name="T130">重視網路位置？（超常考）　</text:span><text:span text:style-name="T106">✗ 完全相反！重點從「位置」轉移到「身份 </text:span><text:span text:style-name="T194">/ </text:span><text:span text:style-name="T106">設備 </text:span><text:span text:style-name="T194">/ </text:span><text:span text:style-name="T106">情境」。</text:span></text:p>
          </table:table-cell>
          <table:covered-table-cell/>
        </table:table-row>
      </table:table>
      <text:h text:style-name="P17" text:outline-level="1" loext:marker-style-name="T71"><text:span text:style-name="T72">結語　</text:span><text:span text:style-name="T71">·</text:span><text:span text:style-name="T72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6"><text:span text:style-name="T247">✅ <text:s/></text:span><text:span text:style-name="T251">你已經完成一輪</text:span></text:p>
            <text:p text:style-name="P7" loext:marker-style-name="T107"><text:span text:style-name="T106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107"/></text:p>
          </table:table-cell>
        </table:table-row>
        <table:table-row table:style-name="表格143.1">
          <table:table-cell table:style-name="表格143.A2" office:value-type="string">
            <text:p text:style-name="P6"><text:span text:style-name="T247">🎯 <text:s/></text:span><text:span text:style-name="T299">五個高頻拿分重點</text:span></text:p>
            <text:p text:style-name="P7" loext:marker-style-name="T107"><text:span text:style-name="T194">① </text:span><text:span text:style-name="T106">分層先記責任：應用給人用、傳輸怎麼送、網路走哪條、連結同區網。</text:span></text:p>
            <text:p text:style-name="P8" loext:marker-style-name="T107"><text:span text:style-name="T194">② </text:span><text:span text:style-name="T106">計算題動手練：</text:span><text:span text:style-name="T194">VLSM</text:span><text:span text:style-name="T106">「需求</text:span><text:span text:style-name="T194">+2→</text:span><text:span text:style-name="T106">最小 </text:span><text:span text:style-name="T194">2ⁿ→/(32−n)</text:span><text:span text:style-name="T106">」、可用主機「</text:span><text:span text:style-name="T194">2^</text:span><text:span text:style-name="T106">主機</text:span><text:span text:style-name="T194">bit −2</text:span><text:span text:style-name="T106">」。</text:span></text:p>
            <text:p text:style-name="P8" loext:marker-style-name="T107"><text:span text:style-name="T194">③ </text:span><text:span text:style-name="T106">流程要會串：上網＝</text:span><text:span text:style-name="T194">DNS→ARP→NAT</text:span><text:span text:style-name="T106">；</text:span><text:span text:style-name="T194">TCP</text:span><text:span text:style-name="T106">＝握手→</text:span><text:span text:style-name="T194">Slow Start→CA→</text:span><text:span text:style-name="T106">丟包降速。</text:span></text:p>
            <text:p text:style-name="P8" loext:marker-style-name="T107"><text:span text:style-name="T194">④ </text:span><text:span text:style-name="T106">易混成對背：</text:span><text:span text:style-name="T194">FW/WAF/NGFW</text:span><text:span text:style-name="T106">、</text:span><text:span text:style-name="T194">IDS/IPS</text:span><text:span text:style-name="T106">、</text:span><text:span text:style-name="T194">HIDS/NIDS</text:span><text:span text:style-name="T106">、</text:span><text:span text:style-name="T194">SNMP/ICMP</text:span><text:span text:style-name="T106">、</text:span><text:span text:style-name="T194">EDR/MDR</text:span><text:span text:style-name="T106">、</text:span><text:span text:style-name="T194">RTO/RPO</text:span><text:span text:style-name="T106">、</text:span><text:span text:style-name="T194">Recursive/Iterative</text:span><text:span text:style-name="T106">。</text:span></text:p>
            <text:p text:style-name="P8" loext:marker-style-name="T107"><text:span text:style-name="T194">⑤ </text:span><text:span text:style-name="T106">陷阱反著記：</text:span><text:span text:style-name="T194">ARP </text:span><text:span text:style-name="T106">找路由器不是 </text:span><text:span text:style-name="T194">Google</text:span><text:span text:style-name="T106">、</text:span><text:span text:style-name="T194">BGP </text:span><text:span text:style-name="T106">政策不是距離、</text:span><text:span text:style-name="T194">WiFi </text:span><text:span text:style-name="T106">是 </text:span><text:span text:style-name="T194">CA </text:span><text:span text:style-name="T106">不是 </text:span><text:span text:style-name="T194">CD</text:span><text:span text:style-name="T106">、</text:span><text:span text:style-name="T194">IOC </text:span><text:span text:style-name="T106">是事後不是預測、</text:span><text:span text:style-name="T194">Zero Trust </text:span><text:span text:style-name="T106">看身份不看位置。</text:span></text:p>
          </table:table-cell>
        </table:table-row>
      </table:table>
      <text:p text:style-name="P25" loext:marker-style-name="T60"><text:span text:style-name="T61">祝　金榜題名　</text:span><text:span text:style-name="T68">·</text:span><text:span text:style-name="T61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45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2T00:41:46</meta:creation-date>
    <meta:initial-creator>Claude</meta:initial-creator>
    <dc:language>en-US</dc:language>
    <dc:date>2026-06-17T17:28:22.774000000</dc:date>
    <meta:editing-cycles>404</meta:editing-cycles>
    <dc:title>網路概論與資訊安全 完整整合筆記</dc:title>
    <meta:editing-duration>P2DT18H17M58S</meta:editing-duration>
    <meta:generator>MODA_ODF_Application_Tools/3.8.4.2$Windows_X86_64 LibreOffice_project/4fb77107d5af14329e08085efe4fa19b5633383a</meta:generator>
    <meta:document-statistic meta:table-count="143" meta:image-count="1" meta:object-count="0" meta:page-count="52" meta:paragraph-count="2304" meta:word-count="30722" meta:character-count="48594" meta:non-whitespace-character-count="43815"/>
    <meta:user-defined meta:name="AppVersion">15.0000</meta:user-defined>
  </office:meta>
</office:document-meta>
</file>