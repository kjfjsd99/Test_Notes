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D60000014BACF965C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4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4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88cm"/>
    </style:style>
    <style:style style:name="表格14.D" style:family="table-column">
      <style:table-column-properties style:column-width="2.651cm"/>
    </style:style>
    <style:style style:name="表格14.E" style:family="table-column">
      <style:table-column-properties style:column-width="2.641cm"/>
    </style:style>
    <style:style style:name="表格14.F" style:family="table-column">
      <style:table-column-properties style:column-width="5.121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4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6" style:family="table">
      <style:table-properties style:width="16.933cm" fo:margin-left="0.004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2cm"/>
    </style:style>
    <style:style style:name="表格16.C" style:family="table-column">
      <style:table-column-properties style:column-width="6.973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7" style:family="table">
      <style:table-properties style:width="16.933cm" fo:margin-left="0.004cm" fo:margin-top="0cm" fo:margin-bottom="0cm" table:align="left" style:writing-mode="page"/>
    </style:style>
    <style:style style:name="表格17.A" style:family="table-column">
      <style:table-column-properties style:column-width="3.611cm"/>
    </style:style>
    <style:style style:name="表格17.B" style:family="table-column">
      <style:table-column-properties style:column-width="3.268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8" style:family="table">
      <style:table-properties style:width="16.933cm" fo:margin-left="0.004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9" style:family="table">
      <style:table-properties style:width="16.933cm" fo:margin-left="0.004cm" fo:margin-top="0cm" fo:margin-bottom="0cm" table:align="left" style:writing-mode="page"/>
    </style:style>
    <style:style style:name="表格19.A" style:family="table-column">
      <style:table-column-properties style:column-width="2.464cm"/>
    </style:style>
    <style:style style:name="表格19.B" style:family="table-column">
      <style:table-column-properties style:column-width="3.53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0" style:family="table">
      <style:table-properties style:width="16.933cm" fo:margin-left="0.004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5cm"/>
    </style:style>
    <style:style style:name="表格20.D" style:family="table-column">
      <style:table-column-properties style:column-width="3.886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1" style:family="table">
      <style:table-properties style:width="16.933cm" fo:margin-left="0.004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2cm"/>
    </style:style>
    <style:style style:name="表格21.C" style:family="table-column">
      <style:table-column-properties style:column-width="10.236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" style:family="table">
      <style:table-properties style:width="16.933cm" fo:margin-left="0.004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699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4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4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cm"/>
    </style:style>
    <style:style style:name="表格23.C" style:family="table-column">
      <style:table-column-properties style:column-width="7.061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4" style:family="table">
      <style:table-properties style:width="16.933cm" fo:margin-left="0.004cm" fo:margin-top="0cm" fo:margin-bottom="0cm" table:align="left" style:writing-mode="page"/>
    </style:style>
    <style:style style:name="表格24.A" style:family="table-column">
      <style:table-column-properties style:column-width="3.346cm"/>
    </style:style>
    <style:style style:name="表格24.B" style:family="table-column">
      <style:table-column-properties style:column-width="7.237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5" style:family="table">
      <style:table-properties style:width="16.933cm" fo:margin-left="0.004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4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6cm"/>
    </style:style>
    <style:style style:name="表格27.C" style:family="table-column">
      <style:table-column-properties style:column-width="7.061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4cm" fo:margin-top="0cm" fo:margin-bottom="0cm" table:align="left" style:writing-mode="page"/>
    </style:style>
    <style:style style:name="表格28.A" style:family="table-column">
      <style:table-column-properties style:column-width="1.406cm"/>
    </style:style>
    <style:style style:name="表格28.B" style:family="table-column">
      <style:table-column-properties style:column-width="4.415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4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5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62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4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4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4cm" fo:margin-top="0cm" fo:margin-bottom="0cm" table:align="left" style:writing-mode="page"/>
    </style:style>
    <style:style style:name="表格32.A" style:family="table-column">
      <style:table-column-properties style:column-width="3.522cm"/>
    </style:style>
    <style:style style:name="表格32.B" style:family="table-column">
      <style:table-column-properties style:column-width="6.708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4cm"/>
    </style:style>
    <style:style style:name="表格34.B" style:family="table-column">
      <style:table-column-properties style:column-width="2.298cm"/>
    </style:style>
    <style:style style:name="表格34.C" style:family="table-column">
      <style:table-column-properties style:column-width="8.285cm"/>
    </style:style>
    <style:style style:name="表格34.D" style:family="table-column">
      <style:table-column-properties style:column-width="3.886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4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4cm" fo:margin-top="0cm" fo:margin-bottom="0cm" table:align="left" style:writing-mode="page"/>
    </style:style>
    <style:style style:name="表格39.A" style:family="table-column">
      <style:table-column-properties style:column-width="2.288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51cm"/>
    </style:style>
    <style:style style:name="表格39.D" style:family="table-column">
      <style:table-column-properties style:column-width="3.875cm"/>
    </style:style>
    <style:style style:name="表格39.E" style:family="table-column">
      <style:table-column-properties style:column-width="3.886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4cm" fo:margin-top="0cm" fo:margin-bottom="0cm" table:align="left" style:writing-mode="page"/>
    </style:style>
    <style:style style:name="表格40.A" style:family="table-column">
      <style:table-column-properties style:column-width="2.288cm"/>
    </style:style>
    <style:style style:name="表格40.B" style:family="table-column">
      <style:table-column-properties style:column-width="2.651cm"/>
    </style:style>
    <style:style style:name="表格40.C" style:family="table-column">
      <style:table-column-properties style:column-width="2.641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9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4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4cm" fo:margin-top="0cm" fo:margin-bottom="0cm" table:align="left" style:writing-mode="page"/>
    </style:style>
    <style:style style:name="表格44.A" style:family="table-column">
      <style:table-column-properties style:column-width="1.406cm"/>
    </style:style>
    <style:style style:name="表格44.B" style:family="table-column">
      <style:table-column-properties style:column-width="1.593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88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4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17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6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4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46cm"/>
    </style:style>
    <style:style style:name="表格49.D" style:family="table-column">
      <style:table-column-properties style:column-width="7.237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2cm"/>
    </style:style>
    <style:style style:name="表格50.C" style:family="table-column">
      <style:table-column-properties style:column-width="3.886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" style:family="table">
      <style:table-properties style:width="16.933cm" fo:margin-left="0.004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6cm"/>
    </style:style>
    <style:style style:name="表格51.D" style:family="table-column">
      <style:table-column-properties style:column-width="5.121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4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1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6.003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4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2cm"/>
    </style:style>
    <style:style style:name="表格54.C" style:family="table-column">
      <style:table-column-properties style:column-width="7.061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4cm" fo:margin-top="0cm" fo:margin-bottom="0cm" table:align="left" style:writing-mode="page"/>
    </style:style>
    <style:style style:name="表格55.A" style:family="table-column">
      <style:table-column-properties style:column-width="4.581cm"/>
    </style:style>
    <style:style style:name="表格55.B" style:family="table-column">
      <style:table-column-properties style:column-width="12.353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4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2cm"/>
    </style:style>
    <style:style style:name="表格57.C" style:family="table-column">
      <style:table-column-properties style:column-width="6.973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7.2" style:family="table-row">
      <style:table-row-properties style:min-row-height="0.811cm" fo:keep-together="auto"/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7.3" style:family="table-row">
      <style:table-row-properties style:min-row-height="0.794cm" fo:keep-together="auto"/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4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1cm"/>
    </style:style>
    <style:style style:name="表格62.B" style:family="table-column">
      <style:table-column-properties style:column-width="12.353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46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9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1cm"/>
    </style:style>
    <style:style style:name="表格64.D" style:family="table-column">
      <style:table-column-properties style:column-width="3.886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4cm" fo:margin-top="0cm" fo:margin-bottom="0cm" table:align="left" style:writing-mode="page"/>
    </style:style>
    <style:style style:name="表格66.A" style:family="table-column">
      <style:table-column-properties style:column-width="2.801cm"/>
    </style:style>
    <style:style style:name="表格66.B" style:family="table-column">
      <style:table-column-properties style:column-width="5.136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4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697cm"/>
    </style:style>
    <style:style style:name="表格67.C" style:family="table-column">
      <style:table-column-properties style:column-width="7.061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4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68cm"/>
    </style:style>
    <style:style style:name="表格69.C" style:family="table-column">
      <style:table-column-properties style:column-width="7.061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0" style:family="table">
      <style:table-properties style:width="16.933cm" fo:margin-left="0.004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cm"/>
    </style:style>
    <style:style style:name="表格70.C" style:family="table-column">
      <style:table-column-properties style:column-width="7.061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4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4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46cm"/>
    </style:style>
    <style:style style:name="表格73.F" style:family="table-column">
      <style:table-column-properties style:column-width="4.062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2cm"/>
    </style:style>
    <style:style style:name="表格74.C" style:family="table-column">
      <style:table-column-properties style:column-width="4.768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5" style:family="table">
      <style:table-properties style:width="16.933cm" fo:margin-left="0.004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17cm"/>
    </style:style>
    <style:style style:name="表格75.C" style:family="table-column">
      <style:table-column-properties style:column-width="3.53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6" style:family="table">
      <style:table-properties style:width="16.933cm" fo:margin-left="0.004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697cm"/>
    </style:style>
    <style:style style:name="表格76.C" style:family="table-column">
      <style:table-column-properties style:column-width="7.061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" style:family="table">
      <style:table-properties style:width="16.933cm" fo:margin-left="0.004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89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41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4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4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4cm"/>
    </style:style>
    <style:style style:name="表格80.C" style:family="table-column">
      <style:table-column-properties style:column-width="4.944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4cm" fo:margin-top="0cm" fo:margin-bottom="0cm" table:align="left" style:writing-mode="page"/>
    </style:style>
    <style:style style:name="表格83.A" style:family="table-column">
      <style:table-column-properties style:column-width="2.288cm"/>
    </style:style>
    <style:style style:name="表格83.B" style:family="table-column">
      <style:table-column-properties style:column-width="3.709cm"/>
    </style:style>
    <style:style style:name="表格83.C" style:family="table-column">
      <style:table-column-properties style:column-width="5.816cm"/>
    </style:style>
    <style:style style:name="表格83.D" style:family="table-column">
      <style:table-column-properties style:column-width="5.121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6cm"/>
    </style:style>
    <style:style style:name="表格84.B" style:family="table-column">
      <style:table-column-properties style:column-width="4.768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4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" style:family="table">
      <style:table-properties style:width="16.933cm" fo:margin-left="0.004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4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4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3cm"/>
    </style:style>
    <style:style style:name="表格92.C" style:family="table-column">
      <style:table-column-properties style:column-width="6.884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4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3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6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4cm" fo:margin-top="0cm" fo:margin-bottom="0cm" table:align="left" style:writing-mode="page"/>
    </style:style>
    <style:style style:name="表格94.A" style:family="table-column">
      <style:table-column-properties style:column-width="1.318cm"/>
    </style:style>
    <style:style style:name="表格94.B" style:family="table-column">
      <style:table-column-properties style:column-width="3.709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4cm" fo:margin-top="0cm" fo:margin-bottom="0cm" table:align="left" style:writing-mode="page"/>
    </style:style>
    <style:style style:name="表格96.A" style:family="table-column">
      <style:table-column-properties style:column-width="3.346cm"/>
    </style:style>
    <style:style style:name="表格96.B" style:family="table-column">
      <style:table-column-properties style:column-width="9.001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27cm"/>
    </style:style>
    <style:style style:name="表格98.C" style:family="table-column">
      <style:table-column-properties style:column-width="4.062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4cm" fo:margin-top="0cm" fo:margin-bottom="0cm" table:align="left" style:writing-mode="page"/>
    </style:style>
    <style:style style:name="表格99.A" style:family="table-column">
      <style:table-column-properties style:column-width="5.463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4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4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4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4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88cm"/>
    </style:style>
    <style:style style:name="表格105.B" style:family="table-column">
      <style:table-column-properties style:column-width="5.826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4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4cm" fo:margin-top="0cm" fo:margin-bottom="0cm" table:align="left" style:writing-mode="page"/>
    </style:style>
    <style:style style:name="表格107.A" style:family="table-column">
      <style:table-column-properties style:column-width="3.346cm"/>
    </style:style>
    <style:style style:name="表格107.B" style:family="table-column">
      <style:table-column-properties style:column-width="6.796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" style:family="table">
      <style:table-properties style:width="16.933cm" fo:margin-left="0.004cm" fo:margin-top="0cm" fo:margin-bottom="0cm" table:align="left" style:writing-mode="page"/>
    </style:style>
    <style:style style:name="表格108.A" style:family="table-column">
      <style:table-column-properties style:column-width="5.463cm"/>
    </style:style>
    <style:style style:name="表格108.B" style:family="table-column">
      <style:table-column-properties style:column-width="0.182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4cm" fo:margin-top="0cm" fo:margin-bottom="0cm" table:align="left" style:writing-mode="page"/>
    </style:style>
    <style:style style:name="表格111.A" style:family="table-column">
      <style:table-column-properties style:column-width="3.346cm"/>
    </style:style>
    <style:style style:name="表格111.B" style:family="table-column">
      <style:table-column-properties style:column-width="13.587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4cm" fo:margin-top="0cm" fo:margin-bottom="0cm" table:align="left" style:writing-mode="page"/>
    </style:style>
    <style:style style:name="表格113.A" style:family="table-column">
      <style:table-column-properties style:column-width="4.581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9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" style:family="table">
      <style:table-properties style:width="16.933cm" fo:margin-left="0.004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5cm"/>
    </style:style>
    <style:style style:name="表格114.D" style:family="table-column">
      <style:table-column-properties style:column-width="3.886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6cm"/>
    </style:style>
    <style:style style:name="表格116.B" style:family="table-column">
      <style:table-column-properties style:column-width="4.415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6.7" style:family="table-row">
      <style:table-row-properties style:min-row-height="2.958cm" fo:keep-together="auto"/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4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0" style:family="table">
      <style:table-properties style:width="16.933cm" fo:margin-left="0.004cm" fo:margin-top="0cm" fo:margin-bottom="0cm" table:align="left" style:writing-mode="page"/>
    </style:style>
    <style:style style:name="表格120.A" style:family="table-column">
      <style:table-column-properties style:column-width="2.464cm"/>
    </style:style>
    <style:style style:name="表格120.B" style:family="table-column">
      <style:table-column-properties style:column-width="4.768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" style:family="table">
      <style:table-properties style:width="16.933cm" fo:margin-left="0.004cm" fo:margin-top="0cm" fo:margin-bottom="0cm" table:align="left" style:writing-mode="page"/>
    </style:style>
    <style:style style:name="表格121.A" style:family="table-column">
      <style:table-column-properties style:column-width="2.288cm"/>
    </style:style>
    <style:style style:name="表格121.B" style:family="table-column">
      <style:table-column-properties style:column-width="3.886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4cm" fo:margin-top="0cm" fo:margin-bottom="0cm" table:align="left" style:writing-mode="page"/>
    </style:style>
    <style:style style:name="表格122.A" style:family="table-column">
      <style:table-column-properties style:column-width="1.406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12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4cm" fo:margin-top="0cm" fo:margin-bottom="0cm" table:align="left" style:writing-mode="page"/>
    </style:style>
    <style:style style:name="表格123.A" style:family="table-column">
      <style:table-column-properties style:column-width="3.346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8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4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4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27cm"/>
    </style:style>
    <style:style style:name="表格125.C" style:family="table-column">
      <style:table-column-properties style:column-width="7.061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4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699cm"/>
    </style:style>
    <style:style style:name="表格127.C" style:family="table-column">
      <style:table-column-properties style:column-width="7.237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8" style:family="table">
      <style:table-properties style:width="16.933cm" fo:margin-left="0.004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" style:family="table">
      <style:table-properties style:width="16.933cm" fo:margin-left="0.004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4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6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62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4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4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4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4cm" fo:margin-top="0cm" fo:margin-bottom="0cm" table:align="left" style:writing-mode="page"/>
    </style:style>
    <style:style style:name="表格134.A" style:family="table-column">
      <style:table-column-properties style:column-width="3.346cm"/>
    </style:style>
    <style:style style:name="表格134.B" style:family="table-column">
      <style:table-column-properties style:column-width="6.796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" style:family="table">
      <style:table-properties style:width="16.933cm" fo:margin-left="0.004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4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4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2cm"/>
    </style:style>
    <style:style style:name="表格139.C" style:family="table-column">
      <style:table-column-properties style:column-width="6.973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4cm" fo:margin-top="0cm" fo:margin-bottom="0cm" table:align="left" style:writing-mode="page"/>
    </style:style>
    <style:style style:name="表格140.A" style:family="table-column">
      <style:table-column-properties style:column-width="4.581cm"/>
    </style:style>
    <style:style style:name="表格140.B" style:family="table-column">
      <style:table-column-properties style:column-width="1.593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" style:family="table">
      <style:table-properties style:width="16.933cm" fo:margin-left="0.004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4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P2" style:family="paragraph" style:parent-style-name="Standard">
      <style:paragraph-properties fo:margin-top="2.822cm" fo:margin-bottom="0cm" style:contextual-spacing="false"/>
    </style:style>
    <style:style style:name="P3" style:family="paragraph" style:parent-style-name="Standard">
      <style:paragraph-properties fo:margin-top="0cm" fo:margin-bottom="0.388cm" style:contextual-spacing="false"/>
    </style:style>
    <style:style style:name="P4" style:family="paragraph" style:parent-style-name="Standard">
      <style:paragraph-properties fo:margin-top="0.018cm" fo:margin-bottom="0.018cm" style:contextual-spacing="false" fo:line-height="0.437cm" fo:text-align="start" style:justify-single-word="false"/>
    </style:style>
    <style:style style:name="P5" style:family="paragraph" style:parent-style-name="Standard">
      <style:paragraph-properties fo:margin-top="0cm" fo:margin-bottom="0.353cm" style:contextual-spacing="false"/>
    </style:style>
    <style:style style:name="P6" style:family="paragraph" style:parent-style-name="Standard">
      <style:paragraph-properties fo:margin-top="0.035cm" fo:margin-bottom="0.106cm" style:contextual-spacing="false" fo:line-height="0.459cm"/>
    </style:style>
    <style:style style:name="P7" style:family="paragraph" style:parent-style-name="Standard">
      <style:paragraph-properties fo:margin-top="0cm" fo:margin-bottom="0.042cm" style:contextual-spacing="false" fo:line-height="0.455cm"/>
    </style:style>
    <style:style style:name="P8" style:family="paragraph" style:parent-style-name="Standard">
      <style:paragraph-properties fo:margin-top="0.042cm" fo:margin-bottom="0.042cm" style:contextual-spacing="false" fo:line-height="0.455cm"/>
    </style:style>
    <style:style style:name="P9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1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</style:style>
    <style:style style:name="P12" style:family="paragraph" style:parent-style-name="Heading_20_3">
      <style:paragraph-properties fo:margin-left="0cm" fo:margin-right="0cm" fo:margin-top="0.318cm" fo:margin-bottom="0.123cm" style:contextual-spacing="false" fo:text-indent="0cm" style:auto-text-indent="false"/>
    </style:style>
    <style:style style:name="P1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fo:font-size="9.5pt" fo:font-style="normal" fo:font-weight="bold" fo:background-color="#ffff0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fo:font-size="9pt" fo:font-style="normal" fo:font-weight="bold" fo:background-color="#ffd74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1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font-weight="bold" fo:background-color="#ffd740" style:font-weight-asian="bold" style:font-weight-complex="bold"/>
    </style:style>
    <style:style style:name="P1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8bbd0" loext:opacity="100%" fo:font-weight="bold" fo:background-color="#880e4f" style:font-weight-asian="bold" style:font-weight-complex="bold"/>
    </style:style>
    <style:style style:name="P1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1744" loext:opacity="100%" style:font-name="Microsoft JhengHei" fo:font-size="9pt" fo:font-style="normal" fo:font-weight="bold" fo:background-color="#ffff0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1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ea00" loext:opacity="100%" fo:font-weight="bold" fo:background-color="#3d5afe" style:font-weight-asian="bold" style:font-weight-complex="bold"/>
    </style:style>
    <style:style style:name="P1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fo:font-weight="bold" fo:background-color="#5d4037" style:font-weight-asian="bold" style:font-weight-complex="bold"/>
    </style:style>
    <style:style style:name="P2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fo:font-weight="bold" fo:background-color="#1b5e20" style:font-weight-asian="bold" style:font-weight-complex="bold"/>
    </style:style>
    <style:style style:name="P2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fo:font-weight="bold" fo:background-color="#33691e" style:font-weight-asian="bold" style:font-weight-complex="bold"/>
    </style:style>
    <style:style style:name="P2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cdd2" loext:opacity="100%" fo:font-weight="bold" fo:background-color="#b71c1c" style:font-weight-asian="bold" style:font-weight-complex="bold"/>
    </style:style>
    <style:style style:name="P2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fo:font-weight="bold" fo:background-color="#1a237e" style:font-weight-asian="bold" style:font-weight-complex="bold"/>
    </style:style>
    <style:style style:name="P2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fo:font-weight="bold" fo:background-color="#0d47a1" style:font-weight-asian="bold" style:font-weight-complex="bold"/>
    </style:style>
    <style:style style:name="P2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6ff00" loext:opacity="100%" fo:font-weight="bold" fo:background-color="#1b5e20" style:font-weight-asian="bold" style:font-weight-complex="bold"/>
    </style:style>
    <style:style style:name="P2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eeff41" loext:opacity="100%" fo:font-weight="bold" fo:background-color="#1b5e20" style:font-weight-asian="bold" style:font-weight-complex="bold"/>
    </style:style>
    <style:style style:name="P2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background-color="#ffd740"/>
    </style:style>
    <style:style style:name="P2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ebee" loext:opacity="100%" fo:font-weight="bold" fo:background-color="#b71c1c" style:font-weight-asian="bold" style:font-weight-complex="bold"/>
    </style:style>
    <style:style style:name="P2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ebee" loext:opacity="100%" fo:font-weight="bold" fo:background-color="#880e4f" style:font-weight-asian="bold" style:font-weight-complex="bold"/>
    </style:style>
    <style:style style:name="P30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</style:style>
    <style:style style:name="P31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1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32" style:family="paragraph" style:parent-style-name="Heading_20_1">
      <loext:graphic-properties draw:fill="solid" draw:fill-color="#1f3a5c"/>
      <style:paragraph-properties fo:margin-left="0cm" fo:margin-right="0cm" fo:margin-top="0cm" fo:margin-bottom="0.282cm" style:contextual-spacing="false" fo:text-indent="0cm" style:auto-text-indent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</style:style>
    <style:style style:name="P33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</style:style>
    <style:style style:name="P34" style:family="paragraph" style:parent-style-name="Standard">
      <style:paragraph-properties fo:margin-top="0cm" fo:margin-bottom="0.071cm" style:contextual-spacing="false" fo:text-align="center" style:justify-single-word="false"/>
    </style:style>
    <style:style style:name="P35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</style:style>
    <style:style style:name="P36" style:family="paragraph" style:parent-style-name="Standard">
      <style:paragraph-properties fo:margin-top="0.106cm" fo:margin-bottom="0.071cm" style:contextual-spacing="false" fo:text-align="center" style:justify-single-word="false"/>
    </style:style>
    <style:style style:name="P37" style:family="paragraph" style:parent-style-name="Standard">
      <style:paragraph-properties fo:margin-top="0.071cm" fo:margin-bottom="0.071cm" style:contextual-spacing="false" fo:text-align="center" style:justify-single-word="false"/>
    </style:style>
    <style:style style:name="P38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</style:style>
    <style:style style:name="P39" style:family="paragraph" style:parent-style-name="Standard">
      <style:paragraph-properties fo:margin-top="0.018cm" fo:margin-bottom="0.018cm" style:contextual-spacing="false" fo:line-height="0.437cm" fo:text-align="center" style:justify-single-word="false"/>
    </style:style>
    <style:style style:name="P40" style:family="paragraph" style:parent-style-name="Standard">
      <style:paragraph-properties fo:margin-top="0.018cm" fo:margin-bottom="0.018cm" style:contextual-spacing="false" fo:line-height="0.437cm" fo:text-align="start" style:justify-single-word="false"/>
    </style:style>
    <style:style style:name="P41" style:family="paragraph" style:parent-style-name="Standard">
      <style:paragraph-properties fo:margin-top="0.046cm" fo:margin-bottom="0.046cm" style:contextual-spacing="false" fo:line-height="0.441cm" fo:text-align="center" style:justify-single-word="false"/>
    </style:style>
    <style:style style:name="P42" style:family="paragraph" style:parent-style-name="Standard">
      <style:paragraph-properties fo:margin-top="0.046cm" fo:margin-bottom="0.046cm" style:contextual-spacing="false" fo:line-height="0.441cm" fo:text-align="start" style:justify-single-word="false"/>
    </style:style>
    <style:style style:name="P43" style:family="paragraph" style:parent-style-name="Standard">
      <style:paragraph-properties fo:margin-top="0.042cm" fo:margin-bottom="0.042cm" style:contextual-spacing="false" fo:line-height="0.455cm"/>
    </style:style>
    <style:style style:name="P44" style:family="paragraph" style:parent-style-name="Standard">
      <style:paragraph-properties fo:margin-top="0cm" fo:margin-bottom="0.042cm" style:contextual-spacing="false" fo:line-height="0.455cm"/>
    </style:style>
    <style:style style:name="P45" style:family="paragraph" style:parent-style-name="Standard">
      <style:paragraph-properties fo:margin-top="0cm" fo:margin-bottom="0.212cm" style:contextual-spacing="false" fo:break-before="page"/>
    </style:style>
    <style:style style:name="P46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47" style:family="paragraph" style:parent-style-name="Standard">
      <style:paragraph-properties fo:margin-top="0.035cm" fo:margin-bottom="0.106cm" style:contextual-spacing="false" fo:line-height="0.459cm"/>
    </style:style>
    <style:style style:name="P48" style:family="paragraph" style:parent-style-name="Standard">
      <style:paragraph-properties fo:margin-top="0.071cm" fo:margin-bottom="0.106cm" style:contextual-spacing="false" fo:line-height="0.466cm" fo:text-align="start" style:justify-single-word="false"/>
    </style:style>
    <style:style style:name="P49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officeooo:paragraph-rsid="0017bb8d"/>
    </style:style>
    <style:style style:name="P50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officeooo:paragraph-rsid="004942c0"/>
    </style:style>
    <style:style style:name="P5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76ff03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5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18ffff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5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ffff0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5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normal" fo:background-color="#ffd74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5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5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ea00" loext:opacity="100%" style:font-name="Microsoft JhengHei" fo:font-size="9.5pt" fo:font-style="normal" fo:font-weight="bold" fo:background-color="#7c4dff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5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pt" fo:font-style="normal" fo:font-weight="bold" fo:background-color="#d500f9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fo:font-weight="bold" fo:background-color="#0d47a1" style:font-weight-asian="bold" style:font-weight-complex="bold"/>
    </style:style>
    <style:style style:name="P5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background-color="#ffd740"/>
    </style:style>
    <style:style style:name="P6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font-weight="bold" fo:background-color="#ffd740" style:font-weight-asian="bold" style:font-weight-complex="bold"/>
    </style:style>
    <style:style style:name="P6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font-weight="bold" fo:background-color="#18ffff" style:font-weight-asian="bold" style:font-weight-complex="bold"/>
    </style:style>
    <style:style style:name="P6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font-weight="bold" fo:background-color="#ffea00" style:font-weight-asian="bold" style:font-weight-complex="bold"/>
    </style:style>
    <style:style style:name="P63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5252" loext:opacity="100%" fo:font-weight="bold" fo:background-color="#1a237e" style:font-weight-asian="bold" style:font-weight-complex="bold"/>
    </style:style>
    <style:style style:name="P6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5252" loext:opacity="100%" fo:font-weight="bold" fo:background-color="#1a237e" style:font-weight-asian="bold" style:font-weight-complex="bold"/>
    </style:style>
    <style:style style:name="P65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5252" loext:opacity="100%" fo:font-weight="bold" fo:background-color="#311b92" style:font-weight-asian="bold" style:font-weight-complex="bold"/>
    </style:style>
    <style:style style:name="P6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5252" loext:opacity="100%" fo:font-weight="bold" fo:background-color="#311b92" style:font-weight-asian="bold" style:font-weight-complex="bold"/>
    </style:style>
    <style:style style:name="P67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background-color="#ffff00"/>
    </style:style>
    <style:style style:name="P68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background-color="#ffea00"/>
    </style:style>
    <style:style style:name="P6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cdd2" loext:opacity="100%" fo:font-weight="bold" fo:background-color="#b71c1c" style:font-weight-asian="bold" style:font-weight-complex="bold"/>
    </style:style>
    <style:style style:name="P7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d740" loext:opacity="100%" fo:font-weight="bold" fo:background-color="#e65100" style:font-weight-asian="bold" style:font-weight-complex="bold"/>
    </style:style>
    <style:style style:name="P7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fo:font-weight="bold" fo:background-color="#1b5e20" style:font-weight-asian="bold" style:font-weight-complex="bold"/>
    </style:style>
    <style:style style:name="P7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eeeeee" loext:opacity="100%" fo:font-weight="bold" fo:background-color="#ff4081" style:font-weight-asian="bold" style:font-weight-complex="bold"/>
    </style:style>
    <style:style style:name="P7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000000" loext:opacity="100%" fo:font-weight="bold" fo:background-color="#00e676" style:font-weight-asian="bold" style:font-weight-complex="bold"/>
    </style:style>
    <style:style style:name="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T2" style:family="text">
      <style:text-properties fo:color="#555555" loext:opacity="100%" style:font-name="Microsoft JhengHei" fo:font-size="8pt" style:font-size-asian="8pt" style:font-name-complex="Microsoft JhengHei2" style:font-size-complex="8pt"/>
    </style:style>
    <style:style style:name="T3" style:family="text"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4" style:family="text">
      <style:text-properties fo:color="#555555" loext:opacity="100%" style:font-name="Microsoft JhengHei" fo:font-size="9.5pt" fo:font-weight="normal" style:font-size-asian="9.5pt" style:font-weight-asian="normal" style:font-name-complex="Microsoft JhengHei2" style:font-size-complex="9.5pt" style:font-weight-complex="normal"/>
    </style:style>
    <style:style style:name="T5" style:family="text"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6" style:family="text"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7" style:family="text">
      <style:text-properties fo:color="#555555" loext:opacity="100%" style:font-name="Microsoft JhengHei" fo:font-size="9.5pt" fo:font-style="italic" fo:font-weight="normal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8" style:family="text">
      <style:text-properties fo:color="#555555" loext:opacity="100%" style:font-name="Microsoft JhengHei" fo:font-size="9.5pt" fo:font-style="italic" fo:font-weight="normal" fo:background-color="#ffff00" loext:char-shading-value="0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9" style:family="text">
      <style:text-properties fo:color="#555555" loext:opacity="100%" style:font-name="Microsoft JhengHei" fo:font-size="10pt" fo:font-weight="normal" style:font-size-asian="10pt" style:font-weight-asian="normal" style:font-name-complex="Microsoft JhengHei2" style:font-size-complex="10pt" style:font-weight-complex="normal"/>
    </style:style>
    <style:style style:name="T10" style:family="text"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" style:family="text">
      <style:text-properties fo:color="#555555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" style:family="text">
      <style:text-properties fo:color="#555555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" style:family="text">
      <style:text-properties fo:color="#555555" loext:opacity="100%" fo:font-size="8pt" style:font-name-asian="Microsoft JhengHei2" style:font-size-asian="8pt" style:font-name-complex="Microsoft JhengHei2" style:font-size-complex="8pt"/>
    </style:style>
    <style:style style:name="T14" style:family="text">
      <style:text-properties fo:color="#555555" loext:opacity="100%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15" style:family="text">
      <style:text-properties fo:color="#555555" loext:opacity="100%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16" style:family="text">
      <style:text-properties fo:color="#555555" loext:opacity="100%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7" style:family="text">
      <style:text-properties fo:color="#555555" loext:opacity="100%" fo:font-size="9.5pt" fo:font-style="italic" fo:font-weight="normal" fo:background-color="#ffff00" loext:char-shading-value="0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8" style:family="text">
      <style:text-properties fo:color="#555555" loext:opacity="100%" fo:font-size="10pt" style:font-name-asian="Microsoft JhengHei2" style:font-size-asian="10pt" style:font-name-complex="Microsoft JhengHei2" style:font-size-complex="10pt"/>
    </style:style>
    <style:style style:name="T19" style:family="text">
      <style:text-properties fo:color="#555555" loext:opacity="100%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20" style:family="text">
      <style:text-properties fo:color="#555555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" style:family="text"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22" style:family="text">
      <style:text-properties fo:color="#c96a1e" loext:opacity="100%" style:font-name="Microsoft JhengHei" fo:font-size="14pt" fo:font-weight="bold" style:font-size-asian="14pt" style:font-weight-asian="bold" style:font-name-complex="Microsoft JhengHei2" style:font-size-complex="14pt" style:font-weight-complex="bold"/>
    </style:style>
    <style:style style:name="T23" style:family="text">
      <style:text-properties fo:color="#c96a1e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4" style:family="text">
      <style:text-properties fo:color="#c96a1e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" style:family="text">
      <style:text-properties fo:color="#c96a1e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28" style:family="text">
      <style:text-properties fo:color="#c96a1e" loext:opacity="100%" style:font-name="Microsoft JhengHei" fo:font-size="12.5pt" fo:font-weight="bold" style:font-size-asian="12.5pt" style:font-weight-asian="bold" style:font-name-complex="Microsoft JhengHei2" style:font-size-complex="12.5pt" style:font-weight-complex="bold"/>
    </style:style>
    <style:style style:name="T29" style:family="text">
      <style:text-properties fo:color="#c96a1e" loext:opacity="100%" style:font-name="Microsoft JhengHei" fo:font-size="12.5pt" fo:font-weight="bold" fo:background-color="#ffff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30" style:family="text">
      <style:text-properties fo:color="#c96a1e" loext:opacity="100%" style:font-name="Microsoft JhengHei" fo:font-size="12.5pt" fo:font-weight="bold" fo:background-color="#ffd74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31" style:family="text">
      <style:text-properties fo:color="#c96a1e" loext:opacity="100%" style:font-name="Microsoft JhengHei" fo:font-size="12.5pt" fo:font-weight="bold" fo:background-color="#ffea00" loext:char-shading-value="0" style:font-size-asian="12.5pt" style:font-weight-asian="bold" style:font-name-complex="Microsoft JhengHei2" style:font-size-complex="12.5pt" style:font-weight-complex="bold"/>
    </style:style>
    <style:style style:name="T32" style:family="text">
      <style:text-properties fo:color="#c96a1e" loext:opacity="100%" style:font-name="Microsoft JhengHei" fo:font-size="12.5pt" fo:font-weight="bold" fo:background-color="#ffea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33" style:family="text">
      <style:text-properties fo:color="#c96a1e" loext:opacity="100%" style:font-name="Microsoft JhengHei" fo:font-size="12.5pt" fo:font-weight="bold" fo:background-color="#00e5ff" loext:char-shading-value="0" style:font-size-asian="12.5pt" style:font-weight-asian="bold" style:font-name-complex="Microsoft JhengHei2" style:font-size-complex="12.5pt" style:font-weight-complex="bold"/>
    </style:style>
    <style:style style:name="T34" style:family="text"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" style:family="text">
      <style:text-properties fo:color="#c96a1e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6" style:family="text"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7" style:family="text">
      <style:text-properties fo:color="#c96a1e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8" style:family="text">
      <style:text-properties fo:color="#c96a1e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9" style:family="text">
      <style:text-properties fo:color="#c96a1e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40" style:family="text">
      <style:text-properties fo:color="#c96a1e" loext:opacity="100%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41" style:family="text">
      <style:text-properties fo:color="#c96a1e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2" style:family="text">
      <style:text-properties fo:color="#c96a1e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" style:family="text">
      <style:text-properties fo:color="#c96a1e" loext:opacity="100%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" style:family="text">
      <style:text-properties fo:color="#c96a1e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5" style:family="text">
      <style:text-properties fo:color="#c96a1e" loext:opacity="100%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" style:family="text">
      <style:text-properties fo:color="#c96a1e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" style:family="text"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T48" style:family="text">
      <style:text-properties fo:color="#1f3a5c" loext:opacity="100%" style:font-name="Microsoft JhengHei" fo:font-size="28pt" fo:font-weight="bold" style:font-size-asian="28pt" style:font-weight-asian="bold" style:font-name-complex="Microsoft JhengHei2" style:font-size-complex="28pt" style:font-weight-complex="bold"/>
    </style:style>
    <style:style style:name="T49" style:family="text"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50" style:family="text">
      <style:text-properties fo:color="#1f3a5c" loext:opacity="100%" style:font-name="Microsoft JhengHei" fo:font-size="20pt" fo:font-weight="bold" style:font-size-asian="20pt" style:font-weight-asian="bold" style:font-name-complex="Microsoft JhengHei2" style:font-size-complex="20pt" style:font-weight-complex="bold"/>
    </style:style>
    <style:style style:name="T51" style:family="text"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T52" style:family="text">
      <style:text-properties fo:color="#1f3a5c" loext:opacity="100%" style:font-name="Microsoft JhengHei" fo:font-size="18pt" fo:font-weight="bold" style:font-size-asian="18pt" style:font-weight-asian="bold" style:font-name-complex="Microsoft JhengHei2" style:font-size-complex="18pt" style:font-weight-complex="bold"/>
    </style:style>
    <style:style style:name="T53" style:family="text">
      <style:text-properties fo:color="#1f3a5c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54" style:family="text"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5" style:family="text">
      <style:text-properties fo:color="#1f3a5c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6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" style:family="text">
      <style:text-properties fo:color="#1f3a5c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" style:family="text">
      <style:text-properties fo:color="#1f3a5c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" style:family="text">
      <style:text-properties fo:color="#1f3a5c" loext:opacity="100%" style:font-name="Microsoft JhengHei" fo:font-size="10.5pt" fo:font-style="normal" fo:font-weight="bold" fo:background-color="#ffab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" style:family="text">
      <style:text-properties fo:color="#1f3a5c" loext:opacity="100%" style:font-name="Microsoft JhengHei" fo:font-size="10.5pt" fo:font-weight="bold" fo:background-color="#ffd740" loext:char-shading-value="0" style:font-size-asian="10.5pt" style:font-weight-asian="bold" style:font-name-complex="Microsoft JhengHei2" style:font-size-complex="10.5pt" style:font-weight-complex="bold"/>
    </style:style>
    <style:style style:name="T61" style:family="text">
      <style:text-properties fo:color="#1f3a5c" loext:opacity="100%" style:font-name="Microsoft JhengHei" fo:font-size="10.5pt" fo:font-weight="bold" style:font-size-asian="10.5pt" style:font-weight-asian="bold" style:font-name-complex="Microsoft JhengHei2" style:font-size-complex="10.5pt" style:font-weight-complex="bold"/>
    </style:style>
    <style:style style:name="T62" style:family="text"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63" style:family="text">
      <style:text-properties fo:color="#1f3a5c" loext:opacity="100%" style:font-name="Microsoft JhengHei" fo:font-size="16pt" fo:font-weight="bold" style:font-size-asian="16pt" style:font-weight-asian="bold" style:font-name-complex="Microsoft JhengHei2" style:font-size-complex="16pt" style:font-weight-complex="bold"/>
    </style:style>
    <style:style style:name="T64" style:family="text">
      <style:text-properties fo:color="#1f3a5c" loext:opacity="100%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65" style:family="text">
      <style:text-properties fo:color="#1f3a5c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66" style:family="text">
      <style:text-properties fo:color="#1f3a5c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7" style:family="text">
      <style:text-properties fo:color="#1f3a5c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8" style:family="text">
      <style:text-properties fo:color="#1f3a5c" loext:opacity="100%" fo:font-size="10.5pt" fo:font-style="normal" fo:font-weight="bold" fo:background-color="#ffab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9" style:family="text">
      <style:text-properties fo:color="#1f3a5c" loext:opacity="100%" fo:font-size="10.5pt" fo:font-weight="bold" fo:background-color="#ffd740" loext:char-shading-value="0" style:font-name-asian="Microsoft JhengHei2" style:font-size-asian="10.5pt" style:font-weight-asian="bold" style:font-name-complex="Microsoft JhengHei2" style:font-size-complex="10.5pt" style:font-weight-complex="bold"/>
    </style:style>
    <style:style style:name="T70" style:family="text">
      <style:text-properties fo:color="#1f3a5c" loext:opacity="100%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71" style:family="text"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2" style:family="text">
      <style:text-properties fo:color="#ffffff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3" style:family="text"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T74" style:family="text">
      <style:text-properties fo:color="#ffffff" loext:opacity="100%" style:font-name="Microsoft JhengHei" fo:font-size="15pt" fo:font-weight="bold" style:font-size-asian="15pt" style:font-weight-asian="bold" style:font-name-complex="Microsoft JhengHei2" style:font-size-complex="15pt" style:font-weight-complex="bold"/>
    </style:style>
    <style:style style:name="T75" style:family="text"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76" style:family="text">
      <style:text-properties fo:color="#ffffff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77" style:family="text"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78" style:family="text">
      <style:text-properties fo:color="#ffffff" loext:opacity="100%" style:font-name="Microsoft JhengHei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79" style:family="text"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80" style:family="text">
      <style:text-properties fo:color="#ffffff" loext:opacity="100%" style:font-name="Microsoft JhengHei" fo:font-size="8.5pt" fo:font-style="normal" fo:font-weight="bold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81" style:family="text">
      <style:text-properties fo:color="#ffffff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2" style:family="text">
      <style:text-properties fo:color="#ffffff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83" style:family="text">
      <style:text-properties fo:color="#ffffff" loext:opacity="100%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84" style:family="text">
      <style:text-properties fo:color="#ffffff" loext:opacity="100%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85" style:family="text"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86" style:family="text">
      <style:text-properties fo:color="#2b2b2b" loext:opacity="100%" style:font-name="Microsoft JhengHei" fo:font-size="9.5pt" fo:font-style="normal" fo:font-weight="normal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87" style:family="text">
      <style:text-properties fo:color="#2b2b2b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88" style:family="text">
      <style:text-properties fo:color="#2b2b2b" loext:opacity="100%" style:font-name="Microsoft JhengHei" fo:font-size="9.5pt" fo:font-style="normal" fo:font-weight="normal" fo:background-color="#ffd74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89" style:family="text">
      <style:text-properties fo:color="#2b2b2b" loext:opacity="100%" style:font-name="Microsoft JhengHei" fo:font-size="9.5pt" fo:font-style="normal" fo:font-weight="normal" fo:background-color="#ffd74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90" style:family="text">
      <style:text-properties fo:color="#2b2b2b" loext:opacity="100%" style:font-name="Microsoft JhengHei" fo:font-size="9.5pt" fo:font-style="normal" fo:font-weight="normal" fo:background-color="#1a237e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91" style:family="text">
      <style:text-properties fo:color="#2b2b2b" loext:opacity="100%" style:font-name="Microsoft JhengHei" fo:font-size="9.5pt" fo:font-style="normal" fo:font-weight="normal" fo:background-color="#1a237e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92" style:family="text">
      <style:text-properties fo:color="#2b2b2b" loext:opacity="100%" style:font-name="Microsoft JhengHei" fo:font-size="9.5pt" fo:font-style="normal" fo:font-weight="normal" fo:background-color="#311b92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93" style:family="text">
      <style:text-properties fo:color="#2b2b2b" loext:opacity="100%" style:font-name="Microsoft JhengHei" fo:font-size="9.5pt" fo:font-style="normal" fo:font-weight="normal" fo:background-color="#311b92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94" style:family="text">
      <style:text-properties fo:color="#2b2b2b" loext:opacity="100%" style:font-name="Microsoft JhengHei" fo:font-size="9.5pt" fo:font-style="normal" fo:font-weight="normal" fo:background-color="#33691e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95" style:family="text">
      <style:text-properties fo:color="#2b2b2b" loext:opacity="100%" style:font-name="Microsoft JhengHei" fo:font-size="9.5pt" fo:font-style="normal" fo:font-weight="normal" fo:background-color="#33691e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96" style:family="text">
      <style:text-properties fo:color="#2b2b2b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7" style:family="text">
      <style:text-properties fo:color="#2b2b2b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8" style:family="text">
      <style:text-properties fo:color="#2b2b2b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9" style:family="text">
      <style:text-properties fo:color="#2b2b2b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0" style:family="text">
      <style:text-properties fo:color="#2b2b2b" loext:opacity="100%" style:font-name="Microsoft JhengHei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1" style:family="text">
      <style:text-properties fo:color="#2b2b2b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2" style:family="text">
      <style:text-properties fo:color="#2b2b2b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3" style:family="text">
      <style:text-properties fo:color="#2b2b2b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4" style:family="text">
      <style:text-properties fo:color="#2b2b2b" loext:opacity="100%" style:font-name="Microsoft JhengHei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5" style:family="text">
      <style:text-properties fo:color="#2b2b2b" loext:opacity="100%" style:font-name="Microsoft JhengHei" fo:font-size="9.5pt" fo:font-style="normal" fo:font-weight="bold" fo:background-color="#ffab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6" style:family="text">
      <style:text-properties fo:color="#2b2b2b" loext:opacity="100%" style:font-name="Microsoft JhengHei" fo:font-size="9.5pt" fo:font-style="normal" fo:font-weight="bold" fo:background-color="#76ff03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7" style:family="text">
      <style:text-properties fo:color="#2b2b2b" loext:opacity="100%" style:font-name="Microsoft JhengHei" fo:font-size="9.5pt" fo:font-style="normal" fo:font-weight="bold" fo:background-color="#76ff03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8" style:family="text">
      <style:text-properties fo:color="#2b2b2b" loext:opacity="100%" style:font-name="Microsoft JhengHei" fo:font-size="9.5pt" fo:font-style="normal" fo:font-weight="bold" fo:background-color="#ffea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9" style:family="text">
      <style:text-properties fo:color="#2b2b2b" loext:opacity="100%" style:font-name="Microsoft JhengHei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10" style:family="text">
      <style:text-properties fo:color="#2b2b2b" loext:opacity="100%" style:font-name="Microsoft JhengHei" fo:font-size="9.5pt" fo:font-style="normal" fo:font-weight="bold" fo:background-color="#00e676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11" style:family="text">
      <style:text-properties fo:color="#2b2b2b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2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3" style:family="text">
      <style:text-properties fo:color="#2b2b2b" loext:opacity="100%" style:font-name="Microsoft JhengHei" fo:font-size="10.5pt" fo:font-style="normal" fo:font-weight="normal" fo:background-color="#ffff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4" style:family="text">
      <style:text-properties fo:color="#2b2b2b" loext:opacity="100%" style:font-name="Microsoft JhengHei" fo:font-size="10.5pt" fo:font-style="normal" fo:font-weight="normal" fo:background-color="#ffff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5" style:family="text">
      <style:text-properties fo:color="#2b2b2b" loext:opacity="100%" style:font-name="Microsoft JhengHei" fo:font-size="10.5pt" fo:font-style="normal" fo:font-weight="normal" fo:background-color="#ffd7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6" style:family="text">
      <style:text-properties fo:color="#2b2b2b" loext:opacity="100%" style:font-name="Microsoft JhengHei" fo:font-size="10.5pt" fo:font-style="normal" fo:font-weight="normal" fo:background-color="#ffd7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7" style:family="text">
      <style:text-properties fo:color="#2b2b2b" loext:opacity="100%" style:font-name="Microsoft JhengHei" fo:font-size="10.5pt" fo:font-style="normal" fo:font-weight="normal" fo:background-color="#ffea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8" style:family="text">
      <style:text-properties fo:color="#2b2b2b" loext:opacity="100%" style:font-name="Microsoft JhengHei" fo:font-size="10.5pt" fo:font-style="normal" fo:font-weight="normal" fo:background-color="#76ff03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9" style:family="text">
      <style:text-properties fo:color="#2b2b2b" loext:opacity="100%" style:font-name="Microsoft JhengHei" fo:font-size="10.5pt" fo:font-style="normal" fo:font-weight="normal" fo:background-color="#311b92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0" style:family="text">
      <style:text-properties fo:color="#2b2b2b" loext:opacity="100%" style:font-name="Microsoft JhengHei" fo:font-size="10.5pt" fo:font-style="normal" fo:font-weight="normal" fo:background-color="#311b92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1" style:family="text">
      <style:text-properties fo:color="#2b2b2b" loext:opacity="100%" style:font-name="Microsoft JhengHei" fo:font-size="10.5pt" fo:font-style="normal" fo:font-weight="normal" fo:background-color="#1a237e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2" style:family="text">
      <style:text-properties fo:color="#2b2b2b" loext:opacity="100%" style:font-name="Microsoft JhengHei" fo:font-size="10.5pt" fo:font-style="normal" fo:font-weight="normal" fo:background-color="#1a237e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3" style:family="text">
      <style:text-properties fo:color="#2b2b2b" loext:opacity="100%" style:font-name="Microsoft JhengHei" fo:font-size="10.5pt" fo:font-style="normal" fo:font-weight="normal" fo:background-color="#004d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4" style:family="text">
      <style:text-properties fo:color="#2b2b2b" loext:opacity="100%" style:font-name="Microsoft JhengHei" fo:font-size="10.5pt" fo:font-style="normal" fo:font-weight="normal" fo:background-color="#004d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5" style:family="text">
      <style:text-properties fo:color="#2b2b2b" loext:opacity="100%" style:font-name="Microsoft JhengHei" fo:font-size="10.5pt" fo:font-style="normal" fo:font-weight="normal" fo:background-color="#ff4081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6" style:family="text">
      <style:text-properties fo:color="#2b2b2b" loext:opacity="100%" style:font-name="Microsoft JhengHei" fo:font-size="10.5pt" fo:font-style="normal" fo:font-weight="normal" fo:background-color="#ff4081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7" style:family="text">
      <style:text-properties fo:color="#2b2b2b" loext:opacity="100%" style:font-name="Microsoft JhengHei" fo:font-size="10.5pt" fo:font-style="normal" fo:font-weight="normal" fo:background-color="#bf360c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8" style:family="text">
      <style:text-properties fo:color="#2b2b2b" loext:opacity="100%" style:font-name="Microsoft JhengHei" fo:font-size="10.5pt" fo:font-style="normal" fo:font-weight="normal" fo:background-color="#bf360c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9" style:family="text">
      <style:text-properties fo:color="#2b2b2b" loext:opacity="100%" style:font-name="Microsoft JhengHei" fo:font-size="10.5pt" fo:font-style="normal" fo:font-weight="normal" fo:background-color="#d500f9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30" style:family="text">
      <style:text-properties fo:color="#2b2b2b" loext:opacity="100%" style:font-name="Microsoft JhengHei" fo:font-size="10.5pt" fo:font-style="normal" fo:font-weight="normal" fo:background-color="#d500f9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31" style:family="text">
      <style:text-properties fo:color="#2b2b2b" loext:opacity="100%" style:font-name="Microsoft JhengHei" fo:font-size="10.5pt" fo:font-style="normal" fo:font-weight="normal" fo:background-color="#b71c1c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32" style:family="text">
      <style:text-properties fo:color="#2b2b2b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3" style:family="text">
      <style:text-properties fo:color="#2b2b2b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4" style:family="text">
      <style:text-properties fo:color="#2b2b2b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5" style:family="text">
      <style:text-properties fo:color="#2b2b2b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6" style:family="text">
      <style:text-properties fo:color="#2b2b2b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7" style:family="text">
      <style:text-properties fo:color="#2b2b2b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8" style:family="text">
      <style:text-properties fo:color="#2b2b2b" loext:opacity="100%" style:font-name="Microsoft JhengHei" fo:font-size="10.5pt" fo:font-style="normal" fo:font-weight="bold" fo:background-color="#18f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9" style:family="text">
      <style:text-properties fo:color="#2b2b2b" loext:opacity="100%" style:font-name="Microsoft JhengHei" fo:font-size="10.5pt" fo:font-style="normal" fo:font-weight="bold" fo:background-color="#76ff03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0" style:family="text">
      <style:text-properties fo:color="#2b2b2b" loext:opacity="100%" style:font-name="Microsoft JhengHei" fo:font-size="10.5pt" fo:font-style="normal" fo:font-weight="bold" fo:background-color="#ffea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1" style:family="text">
      <style:text-properties fo:color="#2b2b2b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2" style:family="text">
      <style:text-properties fo:color="#2b2b2b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3" style:family="text">
      <style:text-properties fo:color="#2b2b2b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4" style:family="text"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145" style:family="text">
      <style:text-properties fo:color="#2b2b2b" loext:opacity="100%" style:font-name="Microsoft JhengHei" fo:font-size="10pt" fo:font-style="normal" fo:font-weight="normal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146" style:family="text">
      <style:text-properties fo:color="#2b2b2b" loext:opacity="100%" style:font-name="Microsoft JhengHei" fo:font-size="10pt" fo:font-style="normal" fo:font-weight="bold" fo:background-color="#ffd74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47" style:family="text">
      <style:text-properties fo:color="#2b2b2b" loext:opacity="100%" style:font-name="Microsoft JhengHei" fo:font-size="10pt" fo:font-style="normal" fo:font-weight="bold" fo:background-color="#ffd74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48" style:family="text">
      <style:text-properties fo:color="#2b2b2b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49" style:family="text"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50" style:family="text">
      <style:text-properties fo:color="#2b2b2b" loext:opacity="100%" style:font-name="Microsoft JhengHei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51" style:family="text">
      <style:text-properties fo:color="#2b2b2b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52" style:family="text">
      <style:text-properties fo:color="#2b2b2b" loext:opacity="100%" style:font-name="Microsoft JhengHei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53" style:family="text">
      <style:text-properties fo:color="#2b2b2b" loext:opacity="100%" style:font-name="Microsoft JhengHei" fo:font-size="9pt" fo:font-style="normal" fo:font-weight="bold" fo:background-color="#ffd7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54" style:family="text">
      <style:text-properties fo:color="#2b2b2b" loext:opacity="100%" style:font-name="Microsoft JhengHei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55" style:family="text">
      <style:text-properties fo:color="#2b2b2b" loext:opacity="100%" style:font-name="Microsoft JhengHei" fo:font-size="9pt" fo:font-style="normal" fo:font-weight="bold" fo:background-color="#00e676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56" style:family="text">
      <style:text-properties fo:color="#2b2b2b" loext:opacity="100%" style:font-name="Microsoft JhengHei" fo:font-size="9pt" fo:font-style="normal" fo:font-weight="bold" fo:background-color="#76ff03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57" style:family="text">
      <style:text-properties fo:color="#2b2b2b" loext:opacity="100%" style:font-name="Microsoft JhengHei" fo:font-size="9pt" fo:font-style="normal" fo:font-weight="bold" fo:background-color="#18ffff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58" style:family="text">
      <style:text-properties fo:color="#2b2b2b" loext:opacity="100%" style:font-name="Microsoft JhengHei" fo:font-size="9pt" fo:font-style="normal" style:font-size-asian="9pt" style:font-style-asian="normal" style:font-name-complex="Microsoft JhengHei2" style:font-size-complex="9pt" style:font-style-complex="normal"/>
    </style:style>
    <style:style style:name="T159" style:family="text"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160" style:family="text">
      <style:text-properties fo:color="#2b2b2b" loext:opacity="100%" style:font-name="Microsoft JhengHei" fo:font-size="8.5pt" fo:font-style="normal" fo:font-weight="normal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161" style:family="text">
      <style:text-properties fo:color="#2b2b2b" loext:opacity="100%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62" style:family="text">
      <style:text-properties fo:color="#2b2b2b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63" style:family="text">
      <style:text-properties fo:color="#2b2b2b" loext:opacity="100%" fo:font-size="9.5pt" fo:font-style="normal" fo:font-weight="normal" fo:background-color="#1a237e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64" style:family="text">
      <style:text-properties fo:color="#2b2b2b" loext:opacity="100%" fo:font-size="9.5pt" fo:font-style="normal" fo:font-weight="normal" fo:background-color="#1a237e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65" style:family="text">
      <style:text-properties fo:color="#2b2b2b" loext:opacity="100%" fo:font-size="9.5pt" fo:font-style="normal" fo:font-weight="normal" fo:background-color="#311b92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66" style:family="text">
      <style:text-properties fo:color="#2b2b2b" loext:opacity="100%" fo:font-size="9.5pt" fo:font-style="normal" fo:font-weight="normal" fo:background-color="#311b92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67" style:family="text">
      <style:text-properties fo:color="#2b2b2b" loext:opacity="100%" fo:font-size="9.5pt" fo:font-style="normal" fo:font-weight="normal" fo:background-color="#33691e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68" style:family="text">
      <style:text-properties fo:color="#2b2b2b" loext:opacity="100%" fo:font-size="9.5pt" fo:font-style="normal" fo:font-weight="normal" fo:background-color="#33691e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69" style:family="text">
      <style:text-properties fo:color="#2b2b2b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70" style:family="text">
      <style:text-properties fo:color="#2b2b2b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71" style:family="text">
      <style:text-properties fo:color="#2b2b2b" loext:opacity="100%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72" style:family="text">
      <style:text-properties fo:color="#2b2b2b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73" style:family="text">
      <style:text-properties fo:color="#2b2b2b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74" style:family="text">
      <style:text-properties fo:color="#2b2b2b" loext:opacity="100%" fo:font-size="9.5pt" fo:font-style="normal" fo:font-weight="bold" fo:background-color="#ffea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75" style:family="text">
      <style:text-properties fo:color="#2b2b2b" loext:opacity="100%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76" style:family="text">
      <style:text-properties fo:color="#2b2b2b" loext:opacity="100%" fo:font-size="9.5pt" fo:font-style="normal" style:font-name-asian="Microsoft JhengHei2" style:font-size-asian="9.5pt" style:font-style-asian="normal" style:font-name-complex="Microsoft JhengHei2" style:font-size-complex="9.5pt" style:font-style-complex="normal"/>
    </style:style>
    <style:style style:name="T177" style:family="text">
      <style:text-properties fo:color="#2b2b2b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8" style:family="text">
      <style:text-properties fo:color="#2b2b2b" loext:opacity="100%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9" style:family="text">
      <style:text-properties fo:color="#2b2b2b" loext:opacity="100%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0" style:family="text">
      <style:text-properties fo:color="#2b2b2b" loext:opacity="100%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1" style:family="text">
      <style:text-properties fo:color="#2b2b2b" loext:opacity="100%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2" style:family="text">
      <style:text-properties fo:color="#2b2b2b" loext:opacity="100%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3" style:family="text">
      <style:text-properties fo:color="#2b2b2b" loext:opacity="100%" fo:font-size="10.5pt" fo:font-style="normal" fo:font-weight="normal" fo:background-color="#76ff03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4" style:family="text">
      <style:text-properties fo:color="#2b2b2b" loext:opacity="100%" fo:font-size="10.5pt" fo:font-style="normal" fo:font-weight="normal" fo:background-color="#1b5e2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5" style:family="text">
      <style:text-properties fo:color="#2b2b2b" loext:opacity="100%" fo:font-size="10.5pt" fo:font-style="normal" fo:font-weight="normal" fo:background-color="#1b5e2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6" style:family="text">
      <style:text-properties fo:color="#2b2b2b" loext:opacity="100%" fo:font-size="10.5pt" fo:font-style="normal" fo:font-weight="normal" fo:background-color="#311b92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7" style:family="text">
      <style:text-properties fo:color="#2b2b2b" loext:opacity="100%" fo:font-size="10.5pt" fo:font-style="normal" fo:font-weight="normal" fo:background-color="#311b92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8" style:family="text">
      <style:text-properties fo:color="#2b2b2b" loext:opacity="100%" fo:font-size="10.5pt" fo:font-style="normal" fo:font-weight="normal" fo:background-color="#1a237e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9" style:family="text">
      <style:text-properties fo:color="#2b2b2b" loext:opacity="100%" fo:font-size="10.5pt" fo:font-style="normal" fo:font-weight="normal" fo:background-color="#1a237e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90" style:family="text">
      <style:text-properties fo:color="#2b2b2b" loext:opacity="100%" fo:font-size="10.5pt" fo:font-style="normal" fo:font-weight="normal" fo:background-color="#004d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91" style:family="text">
      <style:text-properties fo:color="#2b2b2b" loext:opacity="100%" fo:font-size="10.5pt" fo:font-style="normal" fo:font-weight="normal" fo:background-color="#004d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92" style:family="text">
      <style:text-properties fo:color="#2b2b2b" loext:opacity="100%" fo:font-size="10.5pt" fo:font-style="normal" fo:font-weight="normal" fo:background-color="#bf360c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93" style:family="text">
      <style:text-properties fo:color="#2b2b2b" loext:opacity="100%" fo:font-size="10.5pt" fo:font-style="normal" fo:font-weight="normal" fo:background-color="#bf360c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94" style:family="text">
      <style:text-properties fo:color="#2b2b2b" loext:opacity="100%" fo:font-size="10.5pt" fo:font-style="normal" fo:font-weight="normal" fo:background-color="#d500f9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95" style:family="text">
      <style:text-properties fo:color="#2b2b2b" loext:opacity="100%" fo:font-size="10.5pt" fo:font-style="normal" fo:font-weight="normal" fo:background-color="#d500f9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96" style:family="text">
      <style:text-properties fo:color="#2b2b2b" loext:opacity="100%" fo:font-size="10.5pt" fo:font-style="normal" fo:font-weight="normal" fo:background-color="#b71c1c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97" style:family="text">
      <style:text-properties fo:color="#2b2b2b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8" style:family="text">
      <style:text-properties fo:color="#2b2b2b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9" style:family="text">
      <style:text-properties fo:color="#2b2b2b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0" style:family="text">
      <style:text-properties fo:color="#2b2b2b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1" style:family="text">
      <style:text-properties fo:color="#2b2b2b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2" style:family="text">
      <style:text-properties fo:color="#2b2b2b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3" style:family="text">
      <style:text-properties fo:color="#2b2b2b" loext:opacity="100%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4" style:family="text">
      <style:text-properties fo:color="#2b2b2b" loext:opacity="100%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5" style:family="text">
      <style:text-properties fo:color="#2b2b2b" loext:opacity="100%" fo:font-size="10.5pt" fo:font-style="normal" fo:font-weight="bold" fo:background-color="#ffea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6" style:family="text">
      <style:text-properties fo:color="#2b2b2b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7" style:family="text">
      <style:text-properties fo:color="#2b2b2b" loext:opacity="100%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8" style:family="text">
      <style:text-properties fo:color="#2b2b2b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9" style:family="text">
      <style:text-properties fo:color="#2b2b2b" loext:opacity="100%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210" style:family="text">
      <style:text-properties fo:color="#2b2b2b" loext:opacity="100%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11" style:family="text">
      <style:text-properties fo:color="#2b2b2b" loext:opacity="100%" fo:font-size="9pt" fo:font-style="normal" fo:font-weight="normal" fo:background-color="#ffd740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212" style:family="text">
      <style:text-properties fo:color="#2b2b2b" loext:opacity="100%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213" style:family="text">
      <style:text-properties fo:color="#2b2b2b" loext:opacity="100%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214" style:family="text">
      <style:text-properties fo:color="#2b2b2b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15" style:family="text">
      <style:text-properties fo:color="#2b2b2b" loext:opacity="100%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16" style:family="text">
      <style:text-properties fo:color="#2b2b2b" loext:opacity="100%" fo:font-size="9pt" fo:font-style="normal" fo:font-weight="bold" fo:background-color="#00e676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17" style:family="text">
      <style:text-properties fo:color="#2b2b2b" loext:opacity="100%" fo:font-size="9pt" fo:font-style="normal" style:font-name-asian="Microsoft JhengHei2" style:font-size-asian="9pt" style:font-style-asian="normal" style:font-name-complex="Microsoft JhengHei2" style:font-size-complex="9pt" style:font-style-complex="normal"/>
    </style:style>
    <style:style style:name="T218" style:family="text">
      <style:text-properties fo:color="#2b2b2b" loext:opacity="100%" style:font-name="OpenSymbol" fo:font-size="10.5pt" fo:font-style="normal" fo:font-weight="normal" style:font-name-asian="OpenSymbol1" style:font-size-asian="10.5pt" style:font-style-asian="normal" style:font-weight-asian="normal" style:font-name-complex="OpenSymbol1" style:font-size-complex="10.5pt" style:font-style-complex="normal" style:font-weight-complex="normal"/>
    </style:style>
    <style:style style:name="T219" style:family="text">
      <style:text-properties fo:color="#2b2b2b" loext:opacity="100%" style:font-name="Arial" fo:font-size="10.5pt" fo:font-style="normal" fo:font-weight="normal" officeooo:rsid="004849e1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20" style:family="text">
      <style:text-properties fo:color="#2b2b2b" loext:opacity="100%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221" style:family="text">
      <style:text-properties fo:color="#2b2b2b" loext:opacity="100%" fo:font-size="8pt" fo:font-style="normal" style:font-name-asian="Microsoft JhengHei2" style:font-size-asian="8pt" style:font-style-asian="normal" style:font-name-complex="Microsoft JhengHei2" style:font-size-complex="8pt" style:font-style-complex="normal"/>
    </style:style>
    <style:style style:name="T222" style:family="text">
      <style:text-properties fo:font-size="11pt" style:font-name-asian="Microsoft JhengHei2" style:font-size-asian="11pt" style:font-name-complex="Microsoft JhengHei2" style:font-size-complex="11pt"/>
    </style:style>
    <style:style style:name="T223" style:family="text">
      <style:text-properties fo:font-size="11pt" fo:background-color="#ffff00" loext:char-shading-value="0" style:font-name-asian="Microsoft JhengHei2" style:font-size-asian="11pt" style:font-name-complex="Microsoft JhengHei2" style:font-size-complex="11pt"/>
    </style:style>
    <style:style style:name="T224" style:family="text">
      <style:text-properties fo:font-size="11pt" fo:background-color="#ffd740" loext:char-shading-value="0" style:font-name-asian="Microsoft JhengHei2" style:font-size-asian="11pt" style:font-name-complex="Microsoft JhengHei2" style:font-size-complex="11pt"/>
    </style:style>
    <style:style style:name="T225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226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27" style:family="text">
      <style:text-properties fo:color="#1f7a70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28" style:family="text">
      <style:text-properties fo:color="#1f7a70" loext:opacity="100%" style:font-name="Microsoft JhengHei" fo:font-size="11pt" fo:font-weight="bold" fo:background-color="#ffd740" loext:char-shading-value="0" style:font-size-asian="11pt" style:font-weight-asian="bold" style:font-name-complex="Microsoft JhengHei2" style:font-size-complex="11pt" style:font-weight-complex="bold"/>
    </style:style>
    <style:style style:name="T229" style:family="text">
      <style:text-properties fo:color="#1f7a70" loext:opacity="100%" style:font-name="Microsoft JhengHei" fo:font-size="11pt" fo:font-weight="bold" fo:background-color="#ffff00" loext:char-shading-value="0" style:font-size-asian="11pt" style:font-weight-asian="bold" style:font-name-complex="Microsoft JhengHei2" style:font-size-complex="11pt" style:font-weight-complex="bold"/>
    </style:style>
    <style:style style:name="T230" style:family="text">
      <style:text-properties fo:color="#1f7a70" loext:opacity="100%" style:font-name="Microsoft JhengHei" fo:font-size="11pt" fo:font-weight="bold" fo:background-color="#ffea0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231" style:family="text">
      <style:text-properties fo:color="#1f7a70" loext:opacity="100%" style:font-name="Microsoft JhengHei" fo:font-size="11pt" fo:font-weight="bold" fo:background-color="#ffea00" loext:char-shading-value="0" style:font-size-asian="11pt" style:font-weight-asian="bold" style:font-name-complex="Microsoft JhengHei2" style:font-size-complex="11pt" style:font-weight-complex="bold"/>
    </style:style>
    <style:style style:name="T232" style:family="text">
      <style:text-properties fo:color="#1f7a70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3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4" style:family="text">
      <style:text-properties fo:color="#1f7a70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5" style:family="text"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36" style:family="text">
      <style:text-properties fo:color="#1f7a70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37" style:family="text">
      <style:text-properties fo:color="#1f7a70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38" style:family="text">
      <style:text-properties fo:color="#1f7a70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39" style:family="text">
      <style:text-properties fo:color="#1f7a70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40" style:family="text">
      <style:text-properties fo:color="#1f7a70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1" style:family="text">
      <style:text-properties fo:color="#1f7a7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2" style:family="text">
      <style:text-properties fo:color="#1f7a70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3" style:family="text">
      <style:text-properties fo:color="#b07a12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4" style:family="text">
      <style:text-properties fo:color="#b07a1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5" style:family="text">
      <style:text-properties fo:color="#b07a12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6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7" style:family="text">
      <style:text-properties fo:color="#b07a12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48" style:family="text">
      <style:text-properties fo:color="#b07a12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9" style:family="text">
      <style:text-properties fo:color="#b07a12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0" style:family="text">
      <style:text-properties fo:color="#b07a12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1" style:family="text">
      <style:text-properties fo:color="#b07a12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52" style:family="text"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53" style:family="text">
      <style:text-properties fo:color="#b83227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54" style:family="text">
      <style:text-properties fo:color="#b83227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55" style:family="text">
      <style:text-properties fo:color="#b83227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56" style:family="text"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57" style:family="text">
      <style:text-properties fo:color="#b83227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8" style:family="text">
      <style:text-properties fo:color="#b83227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9" style:family="text">
      <style:text-properties fo:color="#b83227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0" style:family="text">
      <style:text-properties fo:color="#b83227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61" style:family="text">
      <style:text-properties fo:color="#b83227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62" style:family="text">
      <style:text-properties fo:color="#b83227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63" style:family="text">
      <style:text-properties fo:color="#b83227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4" style:family="text">
      <style:text-properties fo:color="#b83227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5" style:family="text">
      <style:text-properties fo:color="#b83227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6" style:family="text"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67" style:family="text">
      <style:text-properties fo:color="#2f7a4d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68" style:family="text">
      <style:text-properties fo:color="#2f7a4d" loext:opacity="100%" style:font-name="Microsoft JhengHei" fo:font-size="11pt" fo:font-weight="bold" fo:background-color="#ffd740" loext:char-shading-value="0" style:font-size-asian="11pt" style:font-weight-asian="bold" style:font-name-complex="Microsoft JhengHei2" style:font-size-complex="11pt" style:font-weight-complex="bold"/>
    </style:style>
    <style:style style:name="T269" style:family="text">
      <style:text-properties fo:color="#2f7a4d" loext:opacity="100%" style:font-name="Microsoft JhengHei" fo:font-size="11pt" fo:font-weight="bold" fo:background-color="#ffd740" loext:char-shading-value="0" style:font-size-asian="11pt" style:font-weight-asian="bold" style:font-name-complex="Microsoft JhengHei2" style:font-size-complex="11pt" style:font-weight-complex="bold"/>
    </style:style>
    <style:style style:name="T270" style:family="text">
      <style:text-properties fo:color="#2f7a4d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1" style:family="text">
      <style:text-properties fo:color="#2f7a4d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2" style:family="text">
      <style:text-properties fo:color="#2f7a4d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3" style:family="text">
      <style:text-properties fo:color="#2f7a4d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74" style:family="text">
      <style:text-properties fo:color="#2f7a4d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5" style:family="text">
      <style:text-properties fo:color="#2f7a4d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6" style:family="text">
      <style:text-properties fo:color="#2f7a4d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77" style:family="text">
      <style:text-properties fo:color="#2f7a4d" loext:opacity="100%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278" style:family="text">
      <style:text-properties fo:color="#2f7a4d" loext:opacity="100%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279" style:family="text"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80" style:family="text">
      <style:text-properties fo:color="#b83c61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281" style:family="text">
      <style:text-properties fo:color="#b83c61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82" style:family="text">
      <style:text-properties fo:color="#b83c61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3" style:family="text">
      <style:text-properties fo:color="#b83c61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4" style:family="text">
      <style:text-properties fo:color="#b83c61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5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6" style:family="text">
      <style:text-properties fo:color="#b83c6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7" style:family="text">
      <style:text-properties fo:color="#b83c61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88" style:family="text">
      <style:text-properties fo:color="#b83c61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9" style:family="text">
      <style:text-properties fo:color="#b83c61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0" style:family="text">
      <style:text-properties fo:color="#b83c6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1" style:family="text">
      <style:text-properties fo:color="#b83c61" loext:opacity="100%" fo:font-size="10.5pt" fo:font-style="normal" fo:font-weight="bold" fo:background-color="#ffea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2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3" style:family="text">
      <style:text-properties fo:color="#ff1744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4" style:family="text">
      <style:text-properties fo:color="#ff1744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5" style:family="text">
      <style:text-properties fo:color="#ff1744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6" style:family="text">
      <style:text-properties fo:color="#ffc4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7" style:family="text">
      <style:text-properties fo:color="#18ffff" loext:opacity="100%" style:font-name="Microsoft JhengHei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8" style:family="text">
      <style:text-properties fo:color="#18ffff" loext:opacity="100%" style:font-name="Microsoft JhengHei" fo:font-size="9.5pt" fo:font-style="normal" fo:font-weight="bold" fo:background-color="#d500f9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9" style:family="text">
      <style:text-properties fo:color="#18ffff" loext:opacity="100%" style:font-name="Microsoft JhengHei" fo:font-size="9.5pt" fo:font-style="normal" fo:font-weight="bold" fo:background-color="#d500f9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0" style:family="text">
      <style:text-properties fo:color="#18ffff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1" style:family="text">
      <style:text-properties fo:color="#18ffff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2" style:family="text">
      <style:text-properties fo:color="#18ffff" loext:opacity="100%" style:font-name="Microsoft JhengHei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3" style:family="text">
      <style:text-properties fo:color="#18ffff" loext:opacity="100%" style:font-name="Microsoft JhengHei" fo:font-size="9.5pt" fo:font-style="normal" fo:font-weight="bold" fo:background-color="#0d47a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4" style:family="text">
      <style:text-properties fo:color="#18ffff" loext:opacity="100%" style:font-name="Microsoft JhengHei" fo:font-size="9.5pt" fo:font-style="normal" fo:font-weight="bold" fo:background-color="#0d47a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5" style:family="text">
      <style:text-properties fo:color="#18ffff" loext:opacity="100%" style:font-name="Microsoft JhengHei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6" style:family="text">
      <style:text-properties fo:color="#18ff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7" style:family="text">
      <style:text-properties fo:color="#18ffff" loext:opacity="100%"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308" style:family="text">
      <style:text-properties fo:color="#18ffff" loext:opacity="100%" style:font-name="Microsoft JhengHei" fo:font-size="9pt" fo:font-style="normal" fo:font-weight="bold" fo:background-color="#d500f9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09" style:family="text">
      <style:text-properties fo:color="#18ffff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10" style:family="text">
      <style:text-properties fo:color="#18ffff" loext:opacity="100%" style:font-name="Microsoft JhengHei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11" style:family="text">
      <style:text-properties fo:color="#18ffff" loext:opacity="100%" style:font-name="Microsoft JhengHei" fo:font-size="9pt" fo:font-style="normal" fo:font-weight="bold" fo:background-color="#0000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12" style:family="text">
      <style:text-properties fo:color="#18ffff" loext:opacity="100%" style:font-name="Microsoft JhengHei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13" style:family="text">
      <style:text-properties fo:color="#18ffff" loext:opacity="100%" style:font-name="Microsoft JhengHei" fo:font-size="9pt" fo:font-style="normal" fo:font-weight="bold" fo:background-color="#01579b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14" style:family="text">
      <style:text-properties fo:color="#18ffff" loext:opacity="100%" style:font-name="Microsoft JhengHei" fo:font-size="10pt" fo:font-style="normal" fo:font-weight="bold" fo:background-color="#d500f9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15" style:family="text">
      <style:text-properties fo:color="#18ffff" loext:opacity="100%" style:font-name="Microsoft JhengHei" fo:font-size="10pt" fo:font-style="normal" fo:font-weight="bold" fo:background-color="#d500f9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16" style:family="text">
      <style:text-properties fo:color="#18ffff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7" style:family="text">
      <style:text-properties fo:color="#18ff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8" style:family="text">
      <style:text-properties fo:color="#18ff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9" style:family="text">
      <style:text-properties fo:color="#18ffff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0" style:family="text">
      <style:text-properties fo:color="#18ffff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1" style:family="text">
      <style:text-properties fo:color="#18ffff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2" style:family="text">
      <style:text-properties fo:color="#18ffff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3" style:family="text">
      <style:text-properties fo:color="#18ffff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4" style:family="text">
      <style:text-properties fo:color="#18ffff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5" style:family="text">
      <style:text-properties fo:color="#18ffff" loext:opacity="100%" style:font-name="Microsoft JhengHei" fo:font-size="10.5pt" fo:font-style="normal" fo:font-weight="bold" fo:background-color="#0d47a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6" style:family="text">
      <style:text-properties fo:color="#18ffff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7" style:family="text">
      <style:text-properties fo:color="#18ffff" loext:opacity="100%" style:font-name="Microsoft JhengHei" fo:font-size="10.5pt" fo:font-style="normal" fo:font-weight="bold" fo:background-color="#e040f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8" style:family="text">
      <style:text-properties fo:color="#18ffff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9" style:family="text">
      <style:text-properties fo:color="#18ffff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30" style:family="text">
      <style:text-properties fo:color="#18ffff" loext:opacity="100%" style:font-name="Microsoft JhengHei" fo:font-size="10.5pt" fo:font-style="normal" fo:font-weight="normal" fo:background-color="#d500f9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31" style:family="text">
      <style:text-properties fo:color="#18ffff" loext:opacity="100%" style:font-name="Microsoft JhengHei" fo:font-size="10.5pt" fo:font-style="normal" fo:font-weight="normal" fo:background-color="#d500f9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32" style:family="text">
      <style:text-properties fo:color="#18ffff" loext:opacity="100%" style:font-name="Microsoft JhengHei" fo:font-size="10.5pt" fo:font-style="normal" fo:font-weight="normal" fo:background-color="#b71c1c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33" style:family="text">
      <style:text-properties fo:color="#18ffff" loext:opacity="100%" style:font-name="Microsoft JhengHei" fo:font-size="12.5pt" fo:font-weight="bold" fo:background-color="#d500f9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334" style:family="text">
      <style:text-properties fo:color="#18ffff" loext:opacity="100%" style:font-name="Microsoft JhengHei" fo:font-size="12.5pt" fo:font-weight="bold" fo:background-color="#d500f9" loext:char-shading-value="0" style:font-size-asian="12.5pt" style:font-weight-asian="bold" style:font-name-complex="Microsoft JhengHei2" style:font-size-complex="12.5pt" style:font-weight-complex="bold"/>
    </style:style>
    <style:style style:name="T335" style:family="text">
      <style:text-properties fo:color="#18ffff" loext:opacity="100%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6" style:family="text">
      <style:text-properties fo:color="#18ffff" loext:opacity="100%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7" style:family="text">
      <style:text-properties fo:color="#18ffff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8" style:family="text">
      <style:text-properties fo:color="#18ffff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9" style:family="text">
      <style:text-properties fo:color="#18ffff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0" style:family="text">
      <style:text-properties fo:color="#18ffff" loext:opacity="100%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1" style:family="text">
      <style:text-properties fo:color="#18ffff" loext:opacity="100%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2" style:family="text">
      <style:text-properties fo:color="#18ff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3" style:family="text">
      <style:text-properties fo:color="#18ff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4" style:family="text">
      <style:text-properties fo:color="#18ff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5" style:family="text">
      <style:text-properties fo:color="#18ffff" loext:opacity="100%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6" style:family="text">
      <style:text-properties fo:color="#18ffff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7" style:family="text">
      <style:text-properties fo:color="#18ffff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8" style:family="text">
      <style:text-properties fo:color="#18ffff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9" style:family="text">
      <style:text-properties fo:color="#18ffff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0" style:family="text">
      <style:text-properties fo:color="#18ffff" loext:opacity="100%" fo:font-size="10.5pt" fo:font-style="normal" fo:font-weight="bold" fo:background-color="#01579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1" style:family="text">
      <style:text-properties fo:color="#18ffff" loext:opacity="100%" fo:font-size="10.5pt" fo:font-style="normal" fo:font-weight="bold" fo:background-color="#01579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2" style:family="text">
      <style:text-properties fo:color="#18ffff" loext:opacity="100%" fo:font-size="10.5pt" fo:font-style="normal" fo:font-weight="bold" fo:background-color="#0d47a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3" style:family="text">
      <style:text-properties fo:color="#18ffff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4" style:family="text">
      <style:text-properties fo:color="#18ffff" loext:opacity="100%" fo:font-size="10.5pt" fo:font-style="normal" fo:font-weight="bold" fo:background-color="#e040f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5" style:family="text">
      <style:text-properties fo:color="#18ffff" loext:opacity="100%" fo:font-size="10.5pt" fo:font-style="normal" fo:font-weight="bold" fo:background-color="#b71c1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6" style:family="text">
      <style:text-properties fo:color="#18ffff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57" style:family="text">
      <style:text-properties fo:color="#18ffff" loext:opacity="100%" fo:font-size="10.5pt" fo:font-style="normal" fo:font-weight="normal" fo:background-color="#d500f9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58" style:family="text">
      <style:text-properties fo:color="#18ffff" loext:opacity="100%" fo:font-size="10.5pt" fo:font-style="normal" fo:font-weight="normal" fo:background-color="#d500f9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59" style:family="text">
      <style:text-properties fo:color="#18ffff" loext:opacity="100%" fo:font-size="10.5pt" fo:font-style="normal" fo:font-weight="normal" fo:background-color="#b71c1c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60" style:family="text">
      <style:text-properties fo:color="#18ffff" loext:opacity="100%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61" style:family="text">
      <style:text-properties fo:color="#18ffff" loext:opacity="100%" fo:font-size="9pt" fo:font-style="normal" fo:font-weight="bold" fo:background-color="#d500f9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62" style:family="text">
      <style:text-properties fo:color="#18ffff" loext:opacity="100%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63" style:family="text">
      <style:text-properties fo:color="#ff3d00" loext:opacity="100%" style:font-name="Microsoft JhengHei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64" style:family="text">
      <style:text-properties fo:color="#ff3d00" loext:opacity="100%" style:font-name="Microsoft JhengHei" fo:font-size="9.5pt" fo:font-style="normal" fo:font-weight="bold" fo:background-color="#64ffda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65" style:family="text">
      <style:text-properties fo:color="#ff3d00" loext:opacity="100%" style:font-name="Microsoft JhengHei" fo:font-size="9.5pt" fo:font-style="normal" fo:font-weight="bold" fo:background-color="#64ffda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66" style:family="text">
      <style:text-properties fo:color="#ff3d00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67" style:family="text">
      <style:text-properties fo:color="#ff3d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68" style:family="text">
      <style:text-properties fo:color="#ff3d00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69" style:family="text">
      <style:text-properties fo:color="#ff3d00" loext:opacity="100%" style:font-name="Microsoft JhengHei" fo:font-size="9pt" fo:font-style="normal" fo:font-weight="bold" fo:background-color="#64ffda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0" style:family="text">
      <style:text-properties fo:color="#ff3d00" loext:opacity="100%" style:font-name="Microsoft JhengHei" fo:font-size="9pt" fo:font-style="normal" fo:font-weight="bold" fo:background-color="#64ffda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1" style:family="text">
      <style:text-properties fo:color="#ff3d00" loext:opacity="100%" style:font-name="Microsoft JhengHei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2" style:family="text">
      <style:text-properties fo:color="#ff3d0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3" style:family="text">
      <style:text-properties fo:color="#ff3d0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4" style:family="text">
      <style:text-properties fo:color="#ff3d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5" style:family="text">
      <style:text-properties fo:color="#ff3d00" loext:opacity="100%" style:font-name="Microsoft JhengHei" fo:font-size="10.5pt" fo:font-style="normal" fo:font-weight="bold" fo:background-color="#18f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6" style:family="text">
      <style:text-properties fo:color="#ff3d00" loext:opacity="100%" style:font-name="Microsoft JhengHei" fo:font-size="10pt" fo:font-style="normal" fo:font-weight="bold" fo:background-color="#64ffda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77" style:family="text">
      <style:text-properties fo:color="#ff3d00" loext:opacity="100%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78" style:family="text">
      <style:text-properties fo:color="#ff3d00" loext:opacity="100%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79" style:family="text">
      <style:text-properties fo:color="#ff3d00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80" style:family="text">
      <style:text-properties fo:color="#ff3d00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81" style:family="text">
      <style:text-properties fo:color="#ff3d00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2" style:family="text">
      <style:text-properties fo:color="#ff3d00" loext:opacity="100%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3" style:family="text">
      <style:text-properties fo:color="#ff3d0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4" style:family="text">
      <style:text-properties fo:color="#ff3d00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5" style:family="text">
      <style:text-properties fo:color="#ff3d00" loext:opacity="100%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6" style:family="text">
      <style:text-properties fo:color="#c6ff00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87" style:family="text">
      <style:text-properties fo:color="#c6ff00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88" style:family="text">
      <style:text-properties fo:color="#c6ff00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89" style:family="text">
      <style:text-properties fo:color="#c6ff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90" style:family="text">
      <style:text-properties fo:color="#c6ff00" loext:opacity="100%" style:font-name="Microsoft JhengHei" fo:font-size="9.5pt" fo:font-style="normal" fo:font-weight="bold" fo:background-color="#33691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91" style:family="text">
      <style:text-properties fo:color="#c6ff0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2" style:family="text">
      <style:text-properties fo:color="#c6ff0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3" style:family="text">
      <style:text-properties fo:color="#c6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4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5" style:family="text">
      <style:text-properties fo:color="#c6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6" style:family="text">
      <style:text-properties fo:color="#c6ff00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7" style:family="text">
      <style:text-properties fo:color="#c6ff00" loext:opacity="100%" style:font-name="Microsoft JhengHei" fo:font-size="10.5pt" fo:font-style="normal" fo:font-weight="normal" fo:background-color="#ff4081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98" style:family="text">
      <style:text-properties fo:color="#c6ff00" loext:opacity="100%" style:font-name="Microsoft JhengHei" fo:font-size="12.5pt" fo:font-weight="bold" fo:background-color="#ff4081" loext:char-shading-value="0" style:font-size-asian="12.5pt" style:font-weight-asian="bold" style:font-name-complex="Microsoft JhengHei2" style:font-size-complex="12.5pt" style:font-weight-complex="bold"/>
    </style:style>
    <style:style style:name="T399" style:family="text">
      <style:text-properties fo:color="#c6ff00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00" style:family="text">
      <style:text-properties fo:color="#c6ff0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1" style:family="text">
      <style:text-properties fo:color="#c6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2" style:family="text">
      <style:text-properties fo:color="#c6ff00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3" style:family="text">
      <style:text-properties fo:color="#c6ff00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4" style:family="text">
      <style:text-properties fo:color="#c6ff00" loext:opacity="100%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5" style:family="text">
      <style:text-properties fo:color="#c6ff00" loext:opacity="100%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06" style:family="text">
      <style:text-properties fo:color="#eeff41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7" style:family="text">
      <style:text-properties fo:color="#eeff41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8" style:family="text">
      <style:text-properties fo:color="#eeff41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9" style:family="text">
      <style:text-properties fo:color="#eeff41" loext:opacity="100%" style:font-name="Microsoft JhengHei" fo:font-size="10.5pt" fo:font-style="normal" fo:font-weight="normal" fo:background-color="#ff4081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10" style:family="text">
      <style:text-properties fo:color="#eeff41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1" style:family="text">
      <style:text-properties fo:color="#0000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2" style:family="text">
      <style:text-properties fo:color="#0000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3" style:family="text">
      <style:text-properties fo:color="#000000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4" style:family="text">
      <style:text-properties fo:color="#000000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5" style:family="text">
      <style:text-properties fo:color="#76ff03" loext:opacity="100%" style:font-name="Microsoft JhengHei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6" style:family="text">
      <style:text-properties fo:color="#76ff03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7" style:family="text">
      <style:text-properties fo:color="#76ff03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8" style:family="text">
      <style:text-properties fo:color="#76ff03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9" style:family="text">
      <style:text-properties fo:color="#76ff03" loext:opacity="100%" style:font-name="Microsoft JhengHei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0" style:family="text">
      <style:text-properties fo:color="#76ff03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1" style:family="text">
      <style:text-properties fo:color="#76ff03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2" style:family="text">
      <style:text-properties fo:color="#76ff03" loext:opacity="100%" style:font-name="Microsoft JhengHei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3" style:family="text">
      <style:text-properties fo:color="#76ff03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4" style:family="text">
      <style:text-properties fo:color="#76ff03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25" style:family="text">
      <style:text-properties fo:color="#76ff03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26" style:family="text">
      <style:text-properties fo:color="#76ff03" loext:opacity="100%" style:font-name="Microsoft JhengHei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27" style:family="text">
      <style:text-properties fo:color="#76ff03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28" style:family="text">
      <style:text-properties fo:color="#76ff03" loext:opacity="100%" style:font-name="Microsoft JhengHei" fo:font-size="10pt" fo:font-style="normal" fo:font-weight="bold" fo:background-color="#651fff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429" style:family="text">
      <style:text-properties fo:color="#76ff03" loext:opacity="100%" style:font-name="Microsoft JhengHei" fo:font-size="10pt" fo:font-style="normal" fo:font-weight="bold" fo:background-color="#651fff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430" style:family="text">
      <style:text-properties fo:color="#76ff03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1" style:family="text">
      <style:text-properties fo:color="#76ff03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2" style:family="text">
      <style:text-properties fo:color="#76ff03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3" style:family="text">
      <style:text-properties fo:color="#76ff03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4" style:family="text">
      <style:text-properties fo:color="#76ff03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5" style:family="text">
      <style:text-properties fo:color="#76ff03" loext:opacity="100%" style:font-name="Microsoft JhengHei" fo:font-size="10.5pt" fo:font-style="normal" fo:font-weight="bold" fo:background-color="#6d4c4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6" style:family="text">
      <style:text-properties fo:color="#76ff03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7" style:family="text">
      <style:text-properties fo:color="#76ff03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8" style:family="text">
      <style:text-properties fo:color="#76ff03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9" style:family="text">
      <style:text-properties fo:color="#76ff03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0" style:family="text">
      <style:text-properties fo:color="#76ff03" loext:opacity="100%" style:font-name="Microsoft JhengHei" fo:font-size="10.5pt" fo:font-style="normal" fo:font-weight="bold" fo:background-color="#2e7d3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1" style:family="text">
      <style:text-properties fo:color="#76ff03" loext:opacity="100%" style:font-name="Microsoft JhengHei" fo:font-size="10.5pt" fo:font-style="normal" fo:font-weight="normal" fo:background-color="#ff1744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42" style:family="text">
      <style:text-properties fo:color="#76ff03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3" style:family="text">
      <style:text-properties fo:color="#76ff03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4" style:family="text">
      <style:text-properties fo:color="#76ff03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5" style:family="text">
      <style:text-properties fo:color="#76ff03" loext:opacity="100%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6" style:family="text">
      <style:text-properties fo:color="#76ff03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7" style:family="text">
      <style:text-properties fo:color="#76ff03" loext:opacity="100%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8" style:family="text">
      <style:text-properties fo:color="#76ff03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9" style:family="text">
      <style:text-properties fo:color="#76ff03" loext:opacity="100%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50" style:family="text">
      <style:text-properties fo:color="#76ff03" loext:opacity="100%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51" style:family="text">
      <style:text-properties fo:color="#76ff03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2" style:family="text">
      <style:text-properties fo:color="#76ff03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3" style:family="text">
      <style:text-properties fo:color="#76ff03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4" style:family="text">
      <style:text-properties fo:color="#76ff03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5" style:family="text">
      <style:text-properties fo:color="#76ff03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6" style:family="text">
      <style:text-properties fo:color="#76ff03" loext:opacity="100%" fo:font-size="10.5pt" fo:font-style="normal" fo:font-weight="bold" fo:background-color="#6d4c4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7" style:family="text">
      <style:text-properties fo:color="#76ff03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8" style:family="text">
      <style:text-properties fo:color="#76ff03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9" style:family="text">
      <style:text-properties fo:color="#76ff03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0" style:family="text">
      <style:text-properties fo:color="#76ff03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1" style:family="text">
      <style:text-properties fo:color="#76ff03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62" style:family="text">
      <style:text-properties fo:color="#76ff03" loext:opacity="100%" fo:font-size="10.5pt" fo:font-style="normal" fo:font-weight="normal" fo:background-color="#1b5e2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63" style:family="text">
      <style:text-properties fo:color="#00e676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4" style:family="text">
      <style:text-properties fo:color="#00e676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5" style:family="text">
      <style:text-properties fo:color="#00e676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6" style:family="text">
      <style:text-properties fo:color="#00e676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7" style:family="text">
      <style:text-properties fo:color="#00e676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8" style:family="text">
      <style:text-properties fo:color="#00e676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9" style:family="text">
      <style:text-properties fo:color="#00e676" loext:opacity="100%" style:font-name="Microsoft JhengHei" fo:font-size="9.5pt" fo:font-style="normal" fo:font-weight="bold" fo:background-color="#33691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70" style:family="text">
      <style:text-properties fo:color="#00e676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1" style:family="text">
      <style:text-properties fo:color="#00e676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2" style:family="text">
      <style:text-properties fo:color="#00e676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3" style:family="text">
      <style:text-properties fo:color="#00e676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4" style:family="text">
      <style:text-properties fo:color="#00e676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5" style:family="text">
      <style:text-properties fo:color="#00e676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6" style:family="text">
      <style:text-properties fo:color="#00e676" loext:opacity="100%" style:font-name="Microsoft JhengHei" fo:font-size="10.5pt" fo:font-style="normal" fo:font-weight="bold" fo:background-color="#00606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7" style:family="text">
      <style:text-properties fo:color="#00e676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8" style:family="text">
      <style:text-properties fo:color="#00e676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9" style:family="text">
      <style:text-properties fo:color="#00e676" loext:opacity="100%" style:font-name="Microsoft JhengHei" fo:font-size="10.5pt" fo:font-style="normal" fo:font-weight="bold" fo:background-color="#2b2b2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0" style:family="text">
      <style:text-properties fo:color="#00e676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1" style:family="text">
      <style:text-properties fo:color="#00e676" loext:opacity="100%" style:font-name="Microsoft JhengHei" fo:font-size="10.5pt" fo:font-style="normal" fo:font-weight="normal" fo:background-color="#1a237e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82" style:family="text">
      <style:text-properties fo:color="#00e676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3" style:family="text">
      <style:text-properties fo:color="#00e676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4" style:family="text">
      <style:text-properties fo:color="#00e676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5" style:family="text">
      <style:text-properties fo:color="#00e676" loext:opacity="100%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6" style:family="text">
      <style:text-properties fo:color="#00e676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7" style:family="text">
      <style:text-properties fo:color="#00e676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8" style:family="text">
      <style:text-properties fo:color="#00e676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9" style:family="text">
      <style:text-properties fo:color="#00e676" loext:opacity="100%" fo:font-size="10.5pt" fo:font-style="normal" fo:font-weight="bold" fo:background-color="#00606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0" style:family="text">
      <style:text-properties fo:color="#00e676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1" style:family="text">
      <style:text-properties fo:color="#00e676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2" style:family="text">
      <style:text-properties fo:color="#00e676" loext:opacity="100%" fo:font-size="10.5pt" fo:font-style="normal" fo:font-weight="bold" fo:background-color="#2b2b2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3" style:family="text">
      <style:text-properties fo:color="#00e676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4" style:family="text">
      <style:text-properties fo:color="#00e676" loext:opacity="100%" fo:font-size="10.5pt" fo:font-style="normal" fo:font-weight="normal" fo:background-color="#1a237e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95" style:family="text">
      <style:text-properties fo:color="#ff4081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96" style:family="text">
      <style:text-properties fo:color="#ff4081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97" style:family="text">
      <style:text-properties fo:color="#ff4081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98" style:family="text">
      <style:text-properties fo:color="#ff4081" loext:opacity="100%" style:font-name="Microsoft JhengHei" fo:font-size="9.5pt" fo:font-style="normal" fo:font-weight="bold" fo:background-color="#0000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99" style:family="text">
      <style:text-properties fo:color="#ff4081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0" style:family="text">
      <style:text-properties fo:color="#ff4081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1" style:family="text">
      <style:text-properties fo:color="#ff4081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2" style:family="text">
      <style:text-properties fo:color="#ff4081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3" style:family="text">
      <style:text-properties fo:color="#ff4081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4" style:family="text">
      <style:text-properties fo:color="#ff408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5" style:family="text">
      <style:text-properties fo:color="#ff4081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6" style:family="text">
      <style:text-properties fo:color="#ff408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7" style:family="text">
      <style:text-properties fo:color="#ffff00" loext:opacity="100%" style:font-name="Microsoft JhengHei" fo:font-size="9pt" fo:font-style="normal" fo:font-weight="bold" fo:background-color="#ff9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8" style:family="text">
      <style:text-properties fo:color="#ffff00" loext:opacity="100%" style:font-name="Microsoft JhengHei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9" style:family="text">
      <style:text-properties fo:color="#ffff00" loext:opacity="100%" style:font-name="Microsoft JhengHei" fo:font-size="9pt" fo:font-style="normal" fo:font-weight="bold" fo:background-color="#ff3d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0" style:family="text">
      <style:text-properties fo:color="#ffff00" loext:opacity="100%" style:font-name="Microsoft JhengHei" fo:font-size="9pt" fo:font-style="normal" fo:font-weight="bold" fo:background-color="#ff1744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1" style:family="text">
      <style:text-properties fo:color="#ffff00" loext:opacity="100%" style:font-name="Microsoft JhengHei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2" style:family="text">
      <style:text-properties fo:color="#ffff0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3" style:family="text">
      <style:text-properties fo:color="#ffff00" loext:opacity="100%" style:font-name="Microsoft JhengHei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4" style:family="text">
      <style:text-properties fo:color="#ffff00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15" style:family="text">
      <style:text-properties fo:color="#ffff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16" style:family="text">
      <style:text-properties fo:color="#ffff00" loext:opacity="100%" style:font-name="Microsoft JhengHei" fo:font-size="9.5pt" fo:font-style="normal" fo:font-weight="bold" fo:background-color="#ff3d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17" style:family="text">
      <style:text-properties fo:color="#ffff00" loext:opacity="100%" style:font-name="Microsoft JhengHei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18" style:family="text">
      <style:text-properties fo:color="#ffff00" loext:opacity="100%" style:font-name="Microsoft JhengHei" fo:font-size="9.5pt" fo:font-style="normal" fo:font-weight="bold" fo:background-color="#ff91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19" style:family="text">
      <style:text-properties fo:color="#ffff00" loext:opacity="100%" style:font-name="Microsoft JhengHei" fo:font-size="9.5pt" fo:font-style="normal" fo:font-weight="bold" fo:background-color="#ffc4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20" style:family="text">
      <style:text-properties fo:color="#ffff00" loext:opacity="100%" style:font-name="Microsoft JhengHei" fo:font-size="9.5pt" fo:font-style="normal" fo:font-weight="bold" fo:background-color="#bf360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21" style:family="text">
      <style:text-properties fo:color="#ffff00" loext:opacity="100%" style:font-name="Microsoft JhengHei" fo:font-size="9.5pt" fo:font-style="normal" fo:font-weight="bold" fo:background-color="#ff6e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22" style:family="text">
      <style:text-properties fo:color="#ffff00" loext:opacity="100%"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523" style:family="text">
      <style:text-properties fo:color="#ffff00" loext:opacity="100%" style:font-name="Microsoft JhengHei" fo:font-size="10.5pt" fo:font-style="normal" fo:font-weight="bold" fo:background-color="#ff3d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24" style:family="text">
      <style:text-properties fo:color="#ffff00" loext:opacity="100%" style:font-name="Microsoft JhengHei" fo:font-size="10.5pt" fo:font-style="normal" fo:font-weight="bold" fo:background-color="#ff3d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25" style:family="text">
      <style:text-properties fo:color="#ff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26" style:family="text">
      <style:text-properties fo:color="#ff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27" style:family="text">
      <style:text-properties fo:color="#ffff00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28" style:family="text">
      <style:text-properties fo:color="#ffff00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29" style:family="text">
      <style:text-properties fo:color="#ffff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0" style:family="text">
      <style:text-properties fo:color="#ffff00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1" style:family="text">
      <style:text-properties fo:color="#ffff00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2" style:family="text">
      <style:text-properties fo:color="#ffff00" loext:opacity="100%" style:font-name="Microsoft JhengHei" fo:font-size="11pt" fo:font-weight="bold" fo:background-color="#3d5afe" loext:char-shading-value="0" style:font-size-asian="11pt" style:font-weight-asian="bold" style:font-name-complex="Microsoft JhengHei2" style:font-size-complex="11pt" style:font-weight-complex="bold"/>
    </style:style>
    <style:style style:name="T533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534" style:family="text">
      <style:text-properties fo:color="#ffff00" loext:opacity="100%" style:font-name="Microsoft JhengHei" fo:font-size="12.5pt" fo:font-weight="bold" fo:background-color="#ff3d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535" style:family="text">
      <style:text-properties fo:color="#ffff00" loext:opacity="100%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6" style:family="text">
      <style:text-properties fo:color="#ffff00" loext:opacity="100%" fo:font-size="9.5pt" fo:font-style="normal" fo:font-weight="bold" fo:background-color="#ff3d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7" style:family="text">
      <style:text-properties fo:color="#ffff00" loext:opacity="100%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8" style:family="text">
      <style:text-properties fo:color="#ffff00" loext:opacity="100%" fo:font-size="9.5pt" fo:font-style="normal" fo:font-weight="bold" fo:background-color="#ffc4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9" style:family="text">
      <style:text-properties fo:color="#ffff00" loext:opacity="100%" fo:font-size="9.5pt" fo:font-style="normal" fo:font-weight="bold" fo:background-color="#bf360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40" style:family="text">
      <style:text-properties fo:color="#ff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1" style:family="text">
      <style:text-properties fo:color="#ffff00" loext:opacity="100%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2" style:family="text">
      <style:text-properties fo:color="#ffff00" loext:opacity="100%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3" style:family="text">
      <style:text-properties fo:color="#ffff00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4" style:family="text">
      <style:text-properties fo:color="#ffff00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5" style:family="text">
      <style:text-properties fo:color="#ffff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6" style:family="text">
      <style:text-properties fo:color="#ffff00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7" style:family="text">
      <style:text-properties fo:color="#ffff00" loext:opacity="100%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48" style:family="text">
      <style:text-properties fo:color="#ffff00" loext:opacity="100%" fo:font-size="9pt" fo:font-style="normal" fo:font-weight="bold" fo:background-color="#ff1744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49" style:family="text">
      <style:text-properties fo:color="#ffff00" loext:opacity="100%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0" style:family="text">
      <style:text-properties fo:color="#ff525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1" style:family="text">
      <style:text-properties fo:color="#ff5252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2" style:family="text">
      <style:text-properties fo:color="#ff5252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3" style:family="text">
      <style:text-properties fo:color="#ff5252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4" style:family="text">
      <style:text-properties fo:color="#ff6e4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5" style:family="text">
      <style:text-properties fo:color="#ffd74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6" style:family="text">
      <style:text-properties fo:color="#ffd74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7" style:family="text">
      <style:text-properties fo:color="#ffd74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8" style:family="text">
      <style:text-properties fo:color="#ffd74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9" style:family="text">
      <style:text-properties fo:color="#ffd74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0" style:family="text">
      <style:text-properties fo:color="#ffd74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1" style:family="text">
      <style:text-properties fo:color="#ffd74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2" style:family="text">
      <style:text-properties fo:color="#ffd74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3" style:family="text">
      <style:text-properties fo:color="#ffd74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4" style:family="text">
      <style:text-properties fo:color="#ffd740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5" style:family="text">
      <style:text-properties fo:color="#ffd74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6" style:family="text">
      <style:text-properties fo:color="#ffd74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7" style:family="text">
      <style:text-properties fo:color="#ffd740" loext:opacity="100%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8" style:family="text">
      <style:text-properties fo:color="#ffd740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69" style:family="text">
      <style:text-properties fo:color="#f50057" loext:opacity="100%" style:font-name="Microsoft JhengHei" fo:font-size="10.5pt" fo:font-style="normal" fo:font-weight="bold" fo:background-color="#c6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0" style:family="text">
      <style:text-properties fo:color="#f50057" loext:opacity="100%" fo:font-size="10.5pt" fo:font-style="normal" fo:font-weight="bold" fo:background-color="#c6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1" style:family="text">
      <style:text-properties fo:color="#ffea0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2" style:family="text">
      <style:text-properties fo:color="#ffea0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3" style:family="text">
      <style:text-properties fo:color="#ffea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4" style:family="text">
      <style:text-properties fo:color="#ffea00" loext:opacity="100%" style:font-name="Microsoft JhengHei" fo:font-size="10.5pt" fo:font-style="normal" fo:font-weight="bold" fo:background-color="#2979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5" style:family="text">
      <style:text-properties fo:color="#ffea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6" style:family="text">
      <style:text-properties fo:color="#ffea00" loext:opacity="100%" style:font-name="Microsoft JhengHei" fo:font-size="10.5pt" fo:font-style="normal" fo:font-weight="bold" fo:background-color="#e65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7" style:family="text">
      <style:text-properties fo:color="#ffea00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8" style:family="text">
      <style:text-properties fo:color="#ffea00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9" style:family="text">
      <style:text-properties fo:color="#ffea00" loext:opacity="100%" style:font-name="Microsoft JhengHei" fo:font-size="10.5pt" fo:font-style="normal" fo:font-weight="bold" fo:background-color="#0d47a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0" style:family="text">
      <style:text-properties fo:color="#ffea00" loext:opacity="100%" style:font-name="Microsoft JhengHei" fo:font-size="10.5pt" fo:font-style="normal" fo:font-weight="bold" fo:background-color="#ff3d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1" style:family="text">
      <style:text-properties fo:color="#ffea00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82" style:family="text">
      <style:text-properties fo:color="#ffea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83" style:family="text">
      <style:text-properties fo:color="#ffea00" loext:opacity="100%" style:font-name="Microsoft JhengHei" fo:font-size="9.5pt" fo:font-style="normal" fo:font-weight="bold" fo:background-color="#2979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84" style:family="text">
      <style:text-properties fo:color="#ffea00" loext:opacity="100%" style:font-name="Microsoft JhengHei" fo:font-size="9.5pt" fo:font-style="normal" fo:font-weight="bold" fo:background-color="#b71c1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85" style:family="text">
      <style:text-properties fo:color="#ffea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86" style:family="text">
      <style:text-properties fo:color="#ffea00" loext:opacity="100%" style:font-name="Microsoft JhengHei" fo:font-size="9.5pt" fo:font-style="normal" fo:font-weight="bold" fo:background-color="#311b92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87" style:family="text">
      <style:text-properties fo:color="#ffea00" loext:opacity="100%" style:font-name="Microsoft JhengHei" fo:font-size="9.5pt" fo:font-style="normal" fo:font-weight="normal" fo:background-color="#311b92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588" style:family="text">
      <style:text-properties fo:color="#ffea00" loext:opacity="100%" style:font-name="Microsoft JhengHei" fo:font-size="10pt" fo:font-style="normal" fo:font-weight="bold" fo:background-color="#3d5afe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89" style:family="text">
      <style:text-properties fo:color="#ffea00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90" style:family="text">
      <style:text-properties fo:color="#ffea00" loext:opacity="100%" style:font-name="Microsoft JhengHei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91" style:family="text">
      <style:text-properties fo:color="#ffea00" loext:opacity="100%" style:font-name="Microsoft JhengHei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92" style:family="text">
      <style:text-properties fo:color="#ffea00" loext:opacity="100%" style:font-name="Microsoft JhengHei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93" style:family="text">
      <style:text-properties fo:color="#ffea00" loext:opacity="100%" style:font-name="Microsoft JhengHei" fo:font-size="9pt" fo:font-style="normal" fo:background-color="#3d5afe" loext:char-shading-value="0" style:font-size-asian="9pt" style:font-style-asian="normal" style:font-name-complex="Microsoft JhengHei2" style:font-size-complex="9pt" style:font-style-complex="normal"/>
    </style:style>
    <style:style style:name="T594" style:family="text">
      <style:text-properties fo:color="#ffea0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5" style:family="text">
      <style:text-properties fo:color="#ffea0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6" style:family="text">
      <style:text-properties fo:color="#ffea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7" style:family="text">
      <style:text-properties fo:color="#ffea00" loext:opacity="100%" fo:font-size="10.5pt" fo:font-style="normal" fo:font-weight="bold" fo:background-color="#2979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8" style:family="text">
      <style:text-properties fo:color="#ffea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9" style:family="text">
      <style:text-properties fo:color="#ffea00" loext:opacity="100%" fo:font-size="10.5pt" fo:font-style="normal" fo:font-weight="bold" fo:background-color="#e65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0" style:family="text">
      <style:text-properties fo:color="#ffea00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1" style:family="text">
      <style:text-properties fo:color="#ffea00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2" style:family="text">
      <style:text-properties fo:color="#ffea00" loext:opacity="100%" fo:font-size="10.5pt" fo:font-style="normal" fo:font-weight="bold" fo:background-color="#0d47a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3" style:family="text">
      <style:text-properties fo:color="#ffea00" loext:opacity="100%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4" style:family="text">
      <style:text-properties fo:color="#ffea00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5" style:family="text">
      <style:text-properties fo:color="#ffea00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6" style:family="text">
      <style:text-properties fo:color="#ffea00" loext:opacity="100%" fo:font-size="9.5pt" fo:font-style="normal" fo:font-weight="bold" fo:background-color="#b71c1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7" style:family="text">
      <style:text-properties fo:color="#ffea00" loext:opacity="100%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8" style:family="text">
      <style:text-properties fo:color="#ffea00" loext:opacity="100%" fo:font-size="9.5pt" fo:font-style="normal" fo:font-weight="normal" fo:background-color="#311b92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609" style:family="text">
      <style:text-properties fo:color="#ffea00" loext:opacity="100%" fo:font-size="9pt" fo:font-style="normal" fo:font-weight="bold" fo:background-color="#bf360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10" style:family="text">
      <style:text-properties fo:color="#ffea00" loext:opacity="100%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11" style:family="text">
      <style:text-properties fo:color="#ffea00" loext:opacity="100%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12" style:family="text">
      <style:text-properties fo:color="#eeeeee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3" style:family="text">
      <style:text-properties fo:color="#eeeeee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14" style:family="text">
      <style:text-properties fo:color="#eeeeee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5" style:family="text">
      <style:text-properties fo:color="#eeeeee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16" style:family="text">
      <style:text-properties fo:color="#64ffda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7" style:family="text">
      <style:text-properties fo:color="#64ffda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8" style:family="text">
      <style:text-properties fo:color="#64ffda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9" style:family="text">
      <style:text-properties fo:color="#64ffda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20" style:family="text">
      <style:text-properties fo:color="#64ffda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21" style:family="text">
      <style:text-properties fo:color="#64ffda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22" style:family="text">
      <style:text-properties fo:color="#64ffda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23" style:family="text">
      <style:text-properties fo:color="#64ffda" loext:opacity="100%" style:font-name="Microsoft JhengHei" fo:font-size="10.5pt" fo:font-style="normal" fo:font-weight="normal" fo:background-color="#004d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24" style:family="text">
      <style:text-properties fo:color="#64ffda" loext:opacity="100%" style:font-name="Microsoft JhengHei" fo:font-size="9pt" fo:font-style="normal" fo:font-weight="bold" fo:background-color="#004d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25" style:family="text">
      <style:text-properties fo:color="#64ffda" loext:opacity="100%" style:font-name="Microsoft JhengHei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26" style:family="text">
      <style:text-properties fo:color="#64ffda" loext:opacity="100%" style:font-name="Microsoft JhengHei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27" style:family="text">
      <style:text-properties fo:color="#64ffda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28" style:family="text">
      <style:text-properties fo:color="#64ffda" loext:opacity="100%" style:font-name="Microsoft JhengHei" fo:font-size="9.5pt" fo:font-style="normal" fo:font-weight="bold" fo:background-color="#006064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9" style:family="text">
      <style:text-properties fo:color="#64ffda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30" style:family="text">
      <style:text-properties fo:color="#64ffda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31" style:family="text">
      <style:text-properties fo:color="#64ffda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32" style:family="text">
      <style:text-properties fo:color="#64ffda" loext:opacity="100%" style:font-name="Microsoft JhengHei" fo:font-size="9.5pt" fo:font-style="normal" fo:font-weight="normal" fo:background-color="#1a237e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633" style:family="text">
      <style:text-properties fo:color="#64ffda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4" style:family="text">
      <style:text-properties fo:color="#64ffda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5" style:family="text">
      <style:text-properties fo:color="#64ffda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6" style:family="text">
      <style:text-properties fo:color="#64ffda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7" style:family="text">
      <style:text-properties fo:color="#64ffda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8" style:family="text">
      <style:text-properties fo:color="#64ffda" loext:opacity="100%" fo:font-size="10.5pt" fo:font-style="normal" fo:font-weight="normal" fo:background-color="#004d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39" style:family="text">
      <style:text-properties fo:color="#64ffda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40" style:family="text">
      <style:text-properties fo:color="#64ffda" loext:opacity="100%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41" style:family="text">
      <style:text-properties fo:color="#64ffda" loext:opacity="100%" fo:font-size="9pt" fo:font-style="normal" fo:font-weight="bold" fo:background-color="#0d47a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42" style:family="text">
      <style:text-properties fo:color="#64ffda" loext:opacity="100%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43" style:family="text">
      <style:text-properties fo:color="#64ffda" loext:opacity="100%" fo:font-size="9.5pt" fo:font-style="normal" fo:font-weight="bold" fo:background-color="#006064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44" style:family="text">
      <style:text-properties fo:color="#64ffda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45" style:family="text">
      <style:text-properties fo:color="#64ffda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46" style:family="text">
      <style:text-properties fo:color="#64ffda" loext:opacity="100%" fo:font-size="9.5pt" fo:font-style="normal" fo:font-weight="normal" fo:background-color="#1a237e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647" style:family="text">
      <style:text-properties fo:color="#b2ff59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48" style:family="text">
      <style:text-properties fo:color="#b2ff59" loext:opacity="100%" style:font-name="Microsoft JhengHei" fo:font-size="9pt" fo:font-style="normal" fo:font-weight="bold" fo:background-color="#4a148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49" style:family="text">
      <style:text-properties fo:color="#b2ff59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50" style:family="text">
      <style:text-properties fo:color="#b2ff59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51" style:family="text">
      <style:text-properties fo:color="#00e5ff" loext:opacity="100%" style:font-name="Microsoft JhengHei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52" style:family="text">
      <style:text-properties fo:color="#00e5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53" style:family="text">
      <style:text-properties fo:color="#00e5ff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54" style:family="text">
      <style:text-properties fo:color="#00e5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55" style:family="text">
      <style:text-properties fo:color="#00e5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56" style:family="text">
      <style:text-properties fo:color="#00e5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57" style:family="text">
      <style:text-properties fo:color="#f48fb1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58" style:family="text">
      <style:text-properties fo:color="#f48fb1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59" style:family="text">
      <style:text-properties fo:color="#f48fb1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60" style:family="text">
      <style:text-properties fo:color="#ffab9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61" style:family="text">
      <style:text-properties fo:color="#ffab9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62" style:family="text">
      <style:text-properties fo:color="#f06292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63" style:family="text">
      <style:text-properties fo:color="#e1bee7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64" style:family="text">
      <style:text-properties fo:color="#e1bee7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65" style:family="text">
      <style:text-properties fo:color="#e1bee7" loext:opacity="100%" style:font-name="Microsoft JhengHei" fo:font-size="9pt" fo:font-style="normal" fo:font-weight="bold" fo:background-color="#4a148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66" style:family="text">
      <style:text-properties fo:color="#e1bee7" loext:opacity="100%" style:font-name="Microsoft JhengHei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67" style:family="text">
      <style:text-properties fo:color="#e1bee7" loext:opacity="100%" style:font-name="Microsoft JhengHei" fo:font-size="9.5pt" fo:font-style="normal" fo:font-weight="bold" fo:background-color="#4a148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68" style:family="text">
      <style:text-properties fo:color="#e1bee7" loext:opacity="100%" style:font-name="Microsoft JhengHei" fo:font-size="9.5pt" fo:font-style="normal" fo:font-weight="bold" fo:background-color="#4a148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69" style:family="text">
      <style:text-properties fo:color="#e1bee7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70" style:family="text">
      <style:text-properties fo:color="#e1bee7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71" style:family="text">
      <style:text-properties fo:color="#e1bee7" loext:opacity="100%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72" style:family="text">
      <style:text-properties fo:color="#e1bee7" loext:opacity="100%" fo:font-size="9.5pt" fo:font-style="normal" fo:font-weight="bold" fo:background-color="#4a148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73" style:family="text">
      <style:text-properties fo:color="#e1bee7" loext:opacity="100%" fo:font-size="9.5pt" fo:font-style="normal" fo:font-weight="bold" fo:background-color="#4a148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74" style:family="text">
      <style:text-properties fo:color="#d1c4e9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75" style:family="text">
      <style:text-properties fo:color="#d1c4e9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76" style:family="text">
      <style:text-properties fo:color="#d1c4e9" loext:opacity="100%" style:font-name="Microsoft JhengHei" fo:font-size="9pt" fo:font-style="normal" fo:font-weight="bold" fo:background-color="#311b92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77" style:family="text">
      <style:text-properties fo:color="#d1c4e9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78" style:family="text">
      <style:text-properties fo:color="#d1c4e9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79" style:family="text">
      <style:text-properties fo:color="#ffcdd2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80" style:family="text">
      <style:text-properties fo:color="#ffcdd2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81" style:family="text">
      <style:text-properties fo:color="#ffcdd2" loext:opacity="100%" style:font-name="Microsoft JhengHei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82" style:family="text">
      <style:text-properties fo:color="#ffcdd2" loext:opacity="100%" style:font-name="Microsoft JhengHei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83" style:family="text">
      <style:text-properties fo:color="#ffcdd2" loext:opacity="100%" style:font-name="Microsoft JhengHei" fo:font-size="9.5pt" fo:font-style="normal" fo:font-weight="bold" fo:background-color="#b71c1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84" style:family="text">
      <style:text-properties fo:color="#ffcdd2" loext:opacity="100%" fo:font-size="10.5pt" fo:font-style="normal" fo:font-weight="bold" fo:background-color="#b71c1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85" style:family="text">
      <style:text-properties fo:color="#ffcdd2" loext:opacity="100%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86" style:family="text">
      <style:text-properties fo:color="#ffcdd2" loext:opacity="100%" fo:font-size="10.5pt" fo:font-style="normal" fo:font-weight="bold" fo:background-color="#880e4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87" style:family="text">
      <style:text-properties fo:color="#ffcdd2" loext:opacity="100%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88" style:family="text">
      <style:text-properties fo:color="#ffcdd2" loext:opacity="100%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89" style:family="text">
      <style:text-properties fo:color="#c5cae9" loext:opacity="100%" style:font-name="Microsoft JhengHei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90" style:family="text">
      <style:text-properties fo:color="#c5cae9" loext:opacity="100%" style:font-name="Microsoft JhengHei" fo:font-size="9.5pt" fo:font-style="normal" fo:font-weight="bold" fo:background-color="#311b92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91" style:family="text">
      <style:text-properties fo:color="#c5cae9" loext:opacity="100%" style:font-name="Microsoft JhengHei" fo:font-size="10.5pt" fo:font-style="normal" fo:font-weight="normal" fo:background-color="#311b92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92" style:family="text">
      <style:text-properties fo:color="#c5cae9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93" style:family="text">
      <style:text-properties fo:color="#c5cae9" loext:opacity="100%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94" style:family="text">
      <style:text-properties fo:color="#c5cae9" loext:opacity="100%" fo:font-size="10.5pt" fo:font-style="normal" fo:font-weight="normal" fo:background-color="#311b92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95" style:family="text">
      <style:text-properties fo:color="#c5cae9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96" style:family="text">
      <style:text-properties fo:color="#ef9a9a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97" style:family="text">
      <style:text-properties fo:color="#f8bbd0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98" style:family="text">
      <style:text-properties fo:color="#f8bbd0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99" style:family="text">
      <style:text-properties fo:color="#f8bbd0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00" style:family="text">
      <style:text-properties fo:color="#f8bbd0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01" style:family="text">
      <style:text-properties fo:color="#f8bbd0" loext:opacity="100%" style:font-name="Microsoft JhengHei" fo:font-size="9pt" fo:font-style="normal" fo:font-weight="bold" fo:background-color="#880e4f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702" style:family="text">
      <style:text-properties fo:color="#f8bbd0" loext:opacity="100%" fo:font-size="10.5pt" fo:font-style="normal" fo:font-weight="bold" fo:background-color="#880e4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03" style:family="text">
      <style:text-properties fo:color="#f8bbd0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04" style:family="text">
      <style:text-properties fo:color="#f8bbd0" loext:opacity="100%" fo:font-size="9pt" fo:font-style="normal" fo:font-weight="bold" fo:background-color="#880e4f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705" style:family="text">
      <style:text-properties fo:color="#ffccbc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06" style:family="text">
      <style:text-properties fo:color="#ffccbc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07" style:family="text">
      <style:text-properties fo:color="#ce93d8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08" style:family="text">
      <style:text-properties fo:color="#ce93d8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09" style:family="text">
      <style:text-properties fo:color="#69f0ae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10" style:family="text">
      <style:text-properties fo:color="#69f0ae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11" style:family="text">
      <style:text-properties fo:color="#fce4ec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712" style:family="text">
      <style:text-properties fo:color="#fce4ec" loext:opacity="100%" style:font-name="Microsoft JhengHei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713" style:family="text">
      <style:text-properties fo:color="#fce4ec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714" style:family="text">
      <style:text-properties style:font-name="Microsoft JhengHei" fo:font-size="9pt" fo:font-style="normal" style:font-size-asian="9pt" style:font-style-asian="normal" style:font-name-complex="Microsoft JhengHei2" style:font-size-complex="9pt" style:font-style-complex="normal"/>
    </style:style>
    <style:style style:name="T715" style:family="text">
      <style:text-properties style:font-name="Microsoft JhengHei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716" style:family="text">
      <style:text-properties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717" style:family="text">
      <style:text-properties fo:font-size="9pt" fo:font-style="normal" style:font-size-asian="9pt" style:font-style-asian="normal" style:font-name-complex="Microsoft JhengHei2" style:font-size-complex="9pt" style:font-style-complex="normal"/>
    </style:style>
    <style:style style:name="T718" style:family="text">
      <style:text-properties fo:font-size="9pt" fo:font-style="normal" style:font-name-asian="Microsoft JhengHei2" style:font-size-asian="9pt" style:font-style-asian="normal" style:font-name-complex="Microsoft JhengHei2" style:font-size-complex="9pt" style:font-style-complex="normal"/>
    </style:style>
    <style:style style:name="T719" style:family="text">
      <style:text-properties fo:color="#f5f5f5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20" style:family="text">
      <style:text-properties fo:color="#f5f5f5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21" style:family="text">
      <style:text-properties fo:color="#f5f5f5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22" style:family="text">
      <style:text-properties fo:color="#e040fb" loext:opacity="100%" fo:font-size="9.5pt" fo:font-style="normal" style:font-name-asian="Microsoft JhengHei2" style:font-size-asian="9.5pt" style:font-style-asian="normal" style:font-name-complex="Microsoft JhengHei2" style:font-size-complex="9.5pt" style:font-style-complex="normal"/>
    </style:style>
    <style:style style:name="T723" style:family="text">
      <style:text-properties fo:font-size="9.5pt" fo:font-style="normal" style:font-name-asian="Microsoft JhengHei2" style:font-size-asian="9.5pt" style:font-style-asian="normal" style:font-name-complex="Microsoft JhengHei2" style:font-size-complex="9.5pt" style:font-style-complex="normal"/>
    </style:style>
    <style:style style:name="T724" style:family="text">
      <style:text-properties fo:color="#ffcc8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725" style:family="text">
      <style:text-properties fo:color="#ffcc8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26" style:family="text">
      <style:text-properties fo:color="#ffcc80" loext:opacity="100%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727" style:family="text">
      <style:text-properties fo:color="#ffcc8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28" style:family="text">
      <style:text-properties fo:color="#ffab40" loext:opacity="100%" style:font-name="Microsoft JhengHei" fo:font-size="10.5pt" fo:font-style="normal" fo:font-weight="normal" fo:background-color="#bf360c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729" style:family="text">
      <style:text-properties fo:color="#ffab4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30" style:family="text">
      <style:text-properties fo:color="#ffab40" loext:opacity="100%" fo:font-size="10.5pt" fo:font-style="normal" fo:font-weight="normal" fo:background-color="#bf360c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731" style:family="text">
      <style:text-properties fo:color="#ffab4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32" style:family="text">
      <style:text-properties fo:color="#1de9b6" loext:opacity="100%" style:font-name="Microsoft JhengHei" fo:font-size="9.5pt" fo:font-style="normal" fo:font-weight="normal" fo:background-color="#33691e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733" style:family="text">
      <style:text-properties fo:color="#1de9b6" loext:opacity="100%" style:font-name="Microsoft JhengHei" fo:font-size="9.5pt" fo:font-style="normal" fo:font-weight="bold" fo:background-color="#33691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34" style:family="text">
      <style:text-properties fo:color="#1de9b6" loext:opacity="100%" fo:font-size="9.5pt" fo:font-style="normal" fo:font-weight="normal" fo:background-color="#33691e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735" style:family="text">
      <style:text-properties fo:color="#1de9b6" loext:opacity="100%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4" loext:marker-style-name="T21"><text:span text:style-name="T22">公職考試 </text:span><text:span text:style-name="T40">· </text:span><text:span text:style-name="T22">資訊類</text:span></text:p>
      <text:p text:style-name="P35" loext:marker-style-name="T47"><text:span text:style-name="T48">網路概論 與 資訊安全</text:span><text:span text:style-name="T47"/></text:p>
      <text:p text:style-name="P36" loext:marker-style-name="T49"><text:span text:style-name="T50">完整整合筆記 </text:span><text:span text:style-name="T64">· </text:span><text:span text:style-name="T50">最終版</text:span></text:p>
      <text:p text:style-name="P37" loext:marker-style-name="T3"><text:span text:style-name="T14">OSI / TCP/IP ‧ IP </text:span><text:span text:style-name="T4">子網 ‧ </text:span><text:span text:style-name="T14">IPv6 ‧ ARP/NAT ‧ TCP ‧ DNS ‧ </text:span><text:span text:style-name="T4">路由 ‧ </text:span><text:span text:style-name="T14">SDN/CDN/5G ‧ </text:span><text:span text:style-name="T4">無線 ‧ 資安全攻防</text:span></text:p>
      <text:p text:style-name="P3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39" loext:marker-style-name="T71"><text:span text:style-name="T72">涵蓋十大主題</text:span><text:span text:style-name="T71"/></text:p>
            </table:table-cell>
            <table:table-cell table:style-name="表格1.A1" office:value-type="string">
              <text:p text:style-name="P39" loext:marker-style-name="T71"><text:span text:style-name="T72">前置速記</text:span><text:span text:style-name="T71"/></text:p>
            </table:table-cell>
            <table:table-cell table:style-name="表格1.A1" office:value-type="string">
              <text:p text:style-name="P39" loext:marker-style-name="T71"><text:span text:style-name="T72">全程對照</text:span><text:span text:style-name="T71"/></text:p>
            </table:table-cell>
            <table:table-cell table:style-name="表格1.A1" office:value-type="string">
              <text:p text:style-name="P39" loext:marker-style-name="T71"><text:span text:style-name="T72">考試導向</text:span><text:span text:style-name="T71"/>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41" loext:marker-style-name="T85"><text:span text:style-name="T86">十篇章節</text:span><text:span text:style-name="T85"/></text:p>
          </table:table-cell>
          <table:table-cell table:style-name="表格1.A2" office:value-type="string">
            <text:p text:style-name="P41" loext:marker-style-name="T85"><text:span text:style-name="T86">口訣 </text:span><text:span text:style-name="T161">+ </text:span><text:span text:style-name="T86">表格</text:span></text:p>
          </table:table-cell>
          <table:table-cell table:style-name="表格1.A2" office:value-type="string">
            <text:p text:style-name="P41" loext:marker-style-name="T85"><text:span text:style-name="T86">陷阱 </text:span><text:span text:style-name="T161">+ </text:span><text:span text:style-name="T86">正解</text:span></text:p>
          </table:table-cell>
          <table:table-cell table:style-name="表格1.A2" office:value-type="string">
            <text:p text:style-name="P41" loext:marker-style-name="T85"><text:span text:style-name="T86">申論 </text:span><text:span text:style-name="T161">+ </text:span><text:span text:style-name="T86">選擇</text:span></text:p>
          </table:table-cell>
        </table:table-row>
      </table:table>
      <text:p text:style-name="P5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6"><text:span text:style-name="T222">📖 <text:s/></text:span><text:span text:style-name="T23">讀這份筆記的方法</text:span></text:p>
            <text:p text:style-name="P7"><text:span text:style-name="T24">使用方式：</text:span><text:span text:style-name="T111">第〇篇「考前速記總表」收錄全書所有口訣與必背表格，考前衝刺只看這篇即可；</text:span></text:p>
            <text:p text:style-name="P8" loext:marker-style-name="T112"><text:span text:style-name="T111">第一～十篇為完整詳解，建立觀念與申論寫法時閱讀。每篇皆附「常見陷阱」與「考試標準答案」。</text:span><text:span text:style-name="T112"/></text:p>
          </table:table-cell>
        </table:table-row>
      </table:table>
      <text:p text:style-name="P45" loext:marker-style-name="T51"><text:span text:style-name="T52">目　錄</text:span><text:span text:style-name="T51"/></text:p>
      <text:p text:style-name="P46" loext:marker-style-name="T5"><text:span text:style-name="T15">Table of Contents</text:span><text:span text:style-name="T5"/></text:p>
      <text:p text:style-name="P9"><text:span text:style-name="T23">第 〇 篇　考前速記總表 — 口訣 </text:span><text:span text:style-name="T41">× </text:span><text:span text:style-name="T23">必背表格</text:span><text:span text:style-name="T18"><text:tab/>3</text:span></text:p>
      <text:p text:style-name="P9"><text:span text:style-name="T9">　　</text:span><text:span text:style-name="T19">Part A</text:span><text:span text:style-name="T9">　口訣大全（依主題分類）</text:span><text:span text:style-name="T18"><text:tab/>3</text:span></text:p>
      <text:p text:style-name="P9"><text:span text:style-name="T9">　　</text:span><text:span text:style-name="T19">Part B</text:span><text:span text:style-name="T9">　必背表格精選</text:span><text:span text:style-name="T18"><text:tab/>5</text:span></text:p>
      <text:p text:style-name="P10"><text:span text:style-name="T53">第 一 篇　網路基礎架構：</text:span><text:span text:style-name="T65">OSI / TCP-IP · </text:span><text:span text:style-name="T53">協定 </text:span><text:span text:style-name="T65">· ARP · Traceroute</text:span><text:span text:style-name="T18"><text:tab/>9</text:span></text:p>
      <text:p text:style-name="P9"><text:span text:style-name="T53">第 二 篇　</text:span><text:span text:style-name="T65">IP </text:span><text:span text:style-name="T53">位址與封包處理：分類 </text:span><text:span text:style-name="T65">· CIDR · VLSM · Fragmentation</text:span><text:span text:style-name="T18"><text:tab/>13</text:span></text:p>
      <text:p text:style-name="P9"><text:span text:style-name="T53">第 三 篇　</text:span><text:span text:style-name="T65">IPv4 → IPv6 </text:span><text:span text:style-name="T53">過渡技術</text:span><text:span text:style-name="T18"><text:tab/>19</text:span></text:p>
      <text:p text:style-name="P9"><text:span text:style-name="T53">第 四 篇　</text:span><text:span text:style-name="T65">ARP</text:span><text:span text:style-name="T53">、</text:span><text:span text:style-name="T65">NAT </text:span><text:span text:style-name="T53">與完整上網流程</text:span><text:span text:style-name="T18"><text:tab/>21</text:span></text:p>
      <text:p text:style-name="P9"><text:span text:style-name="T53">第 五 篇　</text:span><text:span text:style-name="T65">TCP </text:span><text:span text:style-name="T53">傳輸控制深入</text:span><text:span text:style-name="T18"><text:tab/>24</text:span></text:p>
      <text:p text:style-name="P9"><text:span text:style-name="T53">第 六 篇　</text:span><text:span text:style-name="T65">DNS </text:span><text:span text:style-name="T53">與 </text:span><text:span text:style-name="T65">DNSSEC</text:span><text:span text:style-name="T18"><text:tab/>28</text:span></text:p>
      <text:p text:style-name="P9"><text:span text:style-name="T53">第 七 篇　路由協定：</text:span><text:span text:style-name="T65">OSPF </text:span><text:span text:style-name="T53">與 </text:span><text:span text:style-name="T65">BGP</text:span><text:span text:style-name="T18"><text:tab/>31</text:span></text:p>
      <text:p text:style-name="P9"><text:span text:style-name="T53">第 八 篇　網路系統進階：</text:span><text:span text:style-name="T65">SDN · LB · CDN · 5G</text:span><text:span text:style-name="T18"><text:tab/>34</text:span></text:p>
      <text:p text:style-name="P9"><text:span text:style-name="T53">第 九 篇　無線通訊：</text:span><text:span text:style-name="T65">WiFi vs Bluetooth</text:span><text:span text:style-name="T18"><text:tab/>37</text:span></text:p>
      <text:p text:style-name="P9"><text:span text:style-name="T53">第 十 篇　資訊安全：設備 </text:span><text:span text:style-name="T65">· </text:span><text:span text:style-name="T53">攻防 </text:span><text:span text:style-name="T65">· </text:span><text:span text:style-name="T53">企業資安 </text:span><text:span text:style-name="T65">· Zero Trust</text:span><text:span text:style-name="T18"><text:tab/>40</text:span></text:p>
      <text:p text:style-name="P10"><text:span text:style-name="T23">結　語　考前最後叮嚀</text:span><text:span text:style-name="T18"><text:tab/>51</text:span></text:p>
      <text:h text:style-name="P32" text:outline-level="1" loext:marker-style-name="T73"><text:span text:style-name="T74">第 〇 篇　考前速記總表 — 口訣 </text:span><text:span text:style-name="T73">× </text:span><text:span text:style-name="T74">必背表格</text:span>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6"><text:span text:style-name="T222">⚡ <text:s/></text:span><text:span text:style-name="T53">本篇用途</text:span></text:p>
            <text:p text:style-name="P7" loext:marker-style-name="T112"><text:span text:style-name="T111">這一篇把全書最關鍵的「記憶口訣」與「必背表格」依主題集中，方便考前快速複習；每一條後方括號為對應的詳解篇章。</text:span><text:span text:style-name="T112"/></text:p>
          </table:table-cell>
        </table:table-row>
      </table:table>
      <text:h text:style-name="P11" text:outline-level="2" loext:marker-style-name="T27"><text:span text:style-name="T27">Part A</text:span><text:span text:style-name="T28">　口訣大全（依主題分類）</text:span></text:h>
      <text:h text:style-name="P12" text:outline-level="3"><text:span text:style-name="T225">▍</text:span><text:span text:style-name="T226"> </text:span><text:span text:style-name="T227">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6" loext:marker-style-name="T226"><text:span text:style-name="T239">🔑 </text:span><text:span text:style-name="T227">口訣</text:span></text:p>
            <text:p text:style-name="P7"><text:span text:style-name="T240">TCP/IP </text:span><text:span text:style-name="T232">四層心法：</text:span><text:span text:style-name="T111">應用層→給人用（</text:span><text:span text:style-name="T177">HTTP/DNS/DHCP/SSH/MQTT</text:span><text:span text:style-name="T111">）｜傳輸層→怎麼送（</text:span><text:span text:style-name="T177">TCP </text:span><text:span text:style-name="T111">穩、</text:span><text:span text:style-name="T177">UDP </text:span><text:span text:style-name="T111">快）｜網路層→走哪條路（</text:span><text:span text:style-name="T177">IP/ICMP</text:span><text:span text:style-name="T111">）｜連結層→同一區網怎麼接（</text:span><text:span text:style-name="T177">Ethernet/ARP</text:span><text:span text:style-name="T111">）</text:span></text:p>
            <text:p text:style-name="P8"><text:span text:style-name="T240">OSI vs TCP/IP</text:span><text:span text:style-name="T232">：</text:span><text:span text:style-name="T177">OSI 7 </text:span><text:span text:style-name="T111">層（理論）、</text:span><text:span text:style-name="T177">TCP/IP 4 </text:span><text:span text:style-name="T111">層（實際）；差別在 </text:span><text:span text:style-name="T177">TCP/IP </text:span><text:span text:style-name="T111">把 </text:span><text:span text:style-name="T177">Session</text:span><text:span text:style-name="T111">＋</text:span><text:span text:style-name="T177">Presentation </text:span><text:span text:style-name="T111">併入 </text:span><text:span text:style-name="T177">Application</text:span><text:span text:style-name="T111">。</text:span></text:p>
            <text:p text:style-name="P8"><text:span text:style-name="T240">TCP vs UDP</text:span><text:span text:style-name="T232">：</text:span><text:span text:style-name="T177">TCP</text:span><text:span text:style-name="T111">「穩定優先」（保證送達、會重傳）；</text:span><text:span text:style-name="T177">UDP</text:span><text:span text:style-name="T111">「速度優先」（不保證、不重傳）。</text:span></text:p>
            <text:p text:style-name="P8"><text:span text:style-name="T232">三件事：</text:span><text:span text:style-name="T177">IP→</text:span><text:span text:style-name="T111">定位（目的地是誰）｜</text:span><text:span text:style-name="T177">Routing→</text:span><text:span text:style-name="T111">選路（怎麼走最快）｜</text:span><text:span text:style-name="T177">ICMP→</text:span><text:span text:style-name="T111">回報（出錯通知你）。</text:span></text:p>
            <text:p text:style-name="P8"><text:span text:style-name="T240">Traceroute</text:span><text:span text:style-name="T232">＝</text:span><text:span text:style-name="T177">TTL </text:span><text:span text:style-name="T111">遞增 ＋ </text:span><text:span text:style-name="T177">ICMP </text:span><text:span text:style-name="T111">回報，逐步「炸出」完整路徑。</text:span></text:p>
            <text:p text:style-name="P8"><text:span text:style-name="T240">ARP</text:span><text:span text:style-name="T232">＝</text:span><text:span text:style-name="T111">用 </text:span><text:span text:style-name="T177">IP </text:span><text:span text:style-name="T111">找 </text:span><text:span text:style-name="T177">MAC</text:span><text:span text:style-name="T111">，只在同一個 </text:span><text:span text:style-name="T177">LAN </text:span><text:span text:style-name="T111">內使用。</text:span></text:p>
          </table:table-cell>
        </table:table-row>
      </table:table>
      <text:h text:style-name="P12" text:outline-level="3"><text:span text:style-name="T225">▍</text:span><text:span text:style-name="T226"> </text:span><text:span text:style-name="T227">二、</text:span><text:span text:style-name="T226">IP </text:span><text:span text:style-name="T227">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6" loext:marker-style-name="T226"><text:span text:style-name="T239">🔑 </text:span><text:span text:style-name="T227">口訣</text:span></text:p>
            <text:p text:style-name="P7"><text:span text:style-name="T240">VLSM </text:span><text:span text:style-name="T232">黃金公式：</text:span><text:span text:style-name="T111">需求 ＋</text:span><text:span text:style-name="T177">2 → </text:span><text:span text:style-name="T111">找最小 </text:span><text:span text:style-name="T177">2ⁿ → </text:span><text:span text:style-name="T111">前綴 </text:span><text:span text:style-name="T177">/(32−n)</text:span><text:span text:style-name="T111">。</text:span></text:p>
            <text:p text:style-name="P8"><text:span text:style-name="T232">可用主機數：</text:span><text:span text:style-name="T177">2^(</text:span><text:span text:style-name="T111">主機 </text:span><text:span text:style-name="T177">bit) − 2</text:span><text:span text:style-name="T111">（扣掉網路位址與廣播位址）。</text:span></text:p>
            <text:p text:style-name="P8"><text:span text:style-name="T240">CIDR </text:span><text:span text:style-name="T232">合併：</text:span><text:span text:style-name="T111">連續 ＋ 數量 </text:span><text:span text:style-name="T177">2ⁿ </text:span><text:span text:style-name="T111">＋ 起點對齊 → 合併 </text:span><text:span text:style-name="T177">2ⁿ </text:span><text:span text:style-name="T111">個子網則「前綴減 </text:span><text:span text:style-name="T177">n</text:span><text:span text:style-name="T111">」。</text:span></text:p>
            <text:p text:style-name="P8"><text:span text:style-name="T232">前綴速背：</text:span><text:span text:style-name="T177">/25=126</text:span><text:span text:style-name="T111">、</text:span><text:span text:style-name="T177">/26=62</text:span><text:span text:style-name="T111">、</text:span><text:span text:style-name="T177">/27=30</text:span><text:span text:style-name="T111">、</text:span><text:span text:style-name="T177">/28=14</text:span><text:span text:style-name="T111">、</text:span><text:span text:style-name="T177">/29=6</text:span><text:span text:style-name="T111">、</text:span><text:span text:style-name="T177">/30=2</text:span><text:span text:style-name="T111">。</text:span></text:p>
            <text:p text:style-name="P8"><text:span text:style-name="T232">封包切割：</text:span><text:span text:style-name="T111">封包 </text:span><text:span text:style-name="T177">&gt; MTU </text:span><text:span text:style-name="T111">就切（</text:span><text:span text:style-name="T177">Fragmentation</text:span><text:span text:style-name="T111">）；</text:span><text:span text:style-name="T177">Fragment Offset </text:span><text:span text:style-name="T111">＝ 起始位置 </text:span><text:span text:style-name="T177">÷ 8</text:span><text:span text:style-name="T111">。</text:span></text:p>
            <text:p text:style-name="P8"><text:span text:style-name="T232">誰能切：</text:span><text:span text:style-name="T177">IPv4</text:span><text:span text:style-name="T111">＝</text:span><text:span text:style-name="T177">Router </text:span><text:span text:style-name="T111">或 </text:span><text:span text:style-name="T177">Source </text:span><text:span text:style-name="T111">可切；</text:span><text:span text:style-name="T177">IPv6</text:span><text:span text:style-name="T111">＝只有 </text:span><text:span text:style-name="T177">Source </text:span><text:span text:style-name="T111">切，必搭 </text:span><text:span text:style-name="T177">PMTUD</text:span><text:span text:style-name="T111">。</text:span></text:p>
            <text:p text:style-name="P8"><text:span text:style-name="T240">Protocol </text:span><text:span text:style-name="T232">值：</text:span><text:span text:style-name="T177">ICMP=1</text:span><text:span text:style-name="T111">、</text:span><text:span text:style-name="T177">TCP=6</text:span><text:span text:style-name="T111">、</text:span><text:span text:style-name="T177">UDP=17</text:span><text:span text:style-name="T111">｜</text:span><text:span text:style-name="T177">DF=1 </text:span><text:span text:style-name="T111">禁止切、</text:span><text:span text:style-name="T177">MF=1 </text:span><text:span text:style-name="T111">後面還有分段｜</text:span><text:span text:style-name="T177">MSS</text:span><text:span text:style-name="T111">＝</text:span><text:span text:style-name="T177">MTU−20−20</text:span><text:span text:style-name="T111">＝</text:span><text:span text:style-name="T177">1460</text:span><text:span text:style-name="T111">。</text:span></text:p>
          </table:table-cell>
        </table:table-row>
      </table:table>
      <text:h text:style-name="P12" text:outline-level="3"><text:span text:style-name="T225">▍</text:span><text:span text:style-name="T226"> </text:span><text:span text:style-name="T227">三、</text:span><text:span text:style-name="T226">IPv4 → IPv6</text:span><text:span text:style-name="T227">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6" loext:marker-style-name="T226"><text:span text:style-name="T239">🔑 </text:span><text:span text:style-name="T227">口訣</text:span></text:p>
            <text:p text:style-name="P7"><text:span text:style-name="T240">IPv6 </text:span><text:span text:style-name="T232">特點：</text:span><text:span text:style-name="T111">大（</text:span><text:span text:style-name="T177">128 bit</text:span><text:span text:style-name="T111">）＋ 安全（</text:span><text:span text:style-name="T177">IPsec</text:span><text:span text:style-name="T111">）＋ 快（固定 </text:span><text:span text:style-name="T177">Header</text:span><text:span text:style-name="T111">）＋ 自動（</text:span><text:span text:style-name="T177">SLAAC</text:span><text:span text:style-name="T111">）＋ 乾淨（無 </text:span><text:span text:style-name="T177">Broadcast</text:span><text:span text:style-name="T111">）。</text:span></text:p>
            <text:p text:style-name="P8"><text:span text:style-name="T232">三種過渡技術：</text:span><text:span text:style-name="T111">雙語（</text:span><text:span text:style-name="T177">Dual Stack</text:span><text:span text:style-name="T111">）＋ 偽裝（</text:span><text:span text:style-name="T177">Tunneling</text:span><text:span text:style-name="T111">）＋ 翻譯（</text:span><text:span text:style-name="T177">Translation</text:span><text:span text:style-name="T111">）。</text:span></text:p>
            <text:p text:style-name="P8"><text:span text:style-name="T232">生活比喻：</text:span><text:span text:style-name="T177">Dual Stack</text:span><text:span text:style-name="T111">＝同時會中英文；</text:span><text:span text:style-name="T177">Tunneling</text:span><text:span text:style-name="T111">＝英文信裝進中文信封偷渡；</text:span><text:span text:style-name="T177">Translation</text:span><text:span text:style-name="T111">＝現場請翻譯口譯。</text:span></text:p>
          </table:table-cell>
        </table:table-row>
      </table:table>
      <text:h text:style-name="P12" text:outline-level="3"><text:span text:style-name="T225">▍</text:span><text:span text:style-name="T226"> </text:span><text:span text:style-name="T227">四、</text:span><text:span text:style-name="T226">ARP</text:span><text:span text:style-name="T227">、</text:span><text:span text:style-name="T226">NAT </text:span><text:span text:style-name="T227">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6" loext:marker-style-name="T226"><text:span text:style-name="T239">🔑 </text:span><text:span text:style-name="T227">口訣</text:span></text:p>
            <text:p text:style-name="P7"><text:span text:style-name="T232">上網流程：</text:span><text:span text:style-name="T177">DNS → ARP → L2 </text:span><text:span text:style-name="T111">封包 → </text:span><text:span text:style-name="T177">NAT</text:span><text:span text:style-name="T111">（去程）→ </text:span><text:span text:style-name="T177">Internet → NAT</text:span><text:span text:style-name="T111">（回程）→ 你。</text:span></text:p>
            <text:p text:style-name="P8"><text:span text:style-name="T232">核心觀念：</text:span><text:span text:style-name="T177">IP</text:span><text:span text:style-name="T111">＝最終目的地（全程不變）；</text:span><text:span text:style-name="T177">MAC</text:span><text:span text:style-name="T111">＝下一站（每跳更換）。</text:span></text:p>
            <text:p text:style-name="P8"><text:span text:style-name="T232">最大地雷：</text:span><text:span text:style-name="T177">ARP </text:span><text:span text:style-name="T111">找的是「路由器（預設閘道）」的 </text:span><text:span text:style-name="T177">MAC</text:span><text:span text:style-name="T111">，不是 </text:span><text:span text:style-name="T177">Google </text:span><text:span text:style-name="T111">的 </text:span><text:span text:style-name="T177">MAC</text:span><text:span text:style-name="T111">。</text:span></text:p>
            <text:p text:style-name="P8"><text:span text:style-name="T240">PAT</text:span><text:span text:style-name="T232">：</text:span><text:span text:style-name="T111">多台共用一個公網 </text:span><text:span text:style-name="T177">IP</text:span><text:span text:style-name="T111">，靠 </text:span><text:span text:style-name="T177">Port </text:span><text:span text:style-name="T111">號碼區分（最重要）。</text:span></text:p>
          </table:table-cell>
        </table:table-row>
      </table:table>
      <text:h text:style-name="P12" text:outline-level="3"><text:soft-page-break/><text:span text:style-name="T225">▍</text:span><text:span text:style-name="T226"> </text:span><text:span text:style-name="T227">五、</text:span><text:span text:style-name="T226">TCP </text:span><text:span text:style-name="T227">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6" loext:marker-style-name="T226"><text:span text:style-name="T239">🔑 </text:span><text:span text:style-name="T227">口訣</text:span></text:p>
            <text:p text:style-name="P7"><text:span text:style-name="T232">三次握手：</text:span><text:span text:style-name="T177">SYN → SYN</text:span><text:span text:style-name="T111">＋</text:span><text:span text:style-name="T177">ACK → ACK</text:span><text:span text:style-name="T111">，確認雙向都能通訊。</text:span></text:p>
            <text:p text:style-name="P8"><text:span text:style-name="T232">傳送量公式：</text:span><text:span text:style-name="T111">實際傳送量 ＝ </text:span><text:span text:style-name="T177">min(rwnd, cwnd)</text:span><text:span text:style-name="T111">。</text:span><text:span text:style-name="T177">rwnd</text:span><text:span text:style-name="T111">＝接收端限制、</text:span><text:span text:style-name="T177">cwnd</text:span><text:span text:style-name="T111">＝網路限制。</text:span></text:p>
            <text:p text:style-name="P8"><text:span text:style-name="T232">擁塞控制節奏：</text:span><text:span text:style-name="T177">Slow Start</text:span><text:span text:style-name="T111">（指數成長）→ </text:span><text:span text:style-name="T177">Congestion Avoidance</text:span><text:span text:style-name="T111">（線性成長）→ 丟包（減速）。</text:span></text:p>
            <text:p text:style-name="P8"><text:span text:style-name="T232">丟包處理：</text:span><text:span text:style-name="T177">Timeout → cwnd </text:span><text:span text:style-name="T111">重設為 </text:span><text:span text:style-name="T177">1 </text:span><text:span text:style-name="T111">回 </text:span><text:span text:style-name="T177">Slow Start</text:span><text:span text:style-name="T111">；</text:span><text:span text:style-name="T177">3 </text:span><text:span text:style-name="T111">個重複 </text:span><text:span text:style-name="T177">ACK → cwnd </text:span><text:span text:style-name="T111">減半續 </text:span><text:span text:style-name="T177">CA</text:span><text:span text:style-name="T111">。</text:span></text:p>
            <text:p text:style-name="P8"><text:span text:style-name="T240">AIMD</text:span><text:span text:style-name="T232">：</text:span><text:span text:style-name="T111">沒丟包 每 </text:span><text:span text:style-name="T177">RTT</text:span><text:span text:style-name="T111">＋</text:span><text:span text:style-name="T177">1</text:span><text:span text:style-name="T111">（加法增長）；丟包 </text:span><text:span text:style-name="T177">×0.5</text:span><text:span text:style-name="T111">（乘法減少）。</text:span></text:p>
            <text:p text:style-name="P8"><text:span text:style-name="T240">SYN Flood</text:span><text:span text:style-name="T232">：</text:span><text:span text:style-name="T111">大量半連線（</text:span><text:span text:style-name="T177">Half-open</text:span><text:span text:style-name="T111">）耗盡 </text:span><text:span text:style-name="T177">Server </text:span><text:span text:style-name="T111">資源 → </text:span><text:span text:style-name="T177">DoS</text:span><text:span text:style-name="T111">。</text:span></text:p>
          </table:table-cell>
        </table:table-row>
      </table:table>
      <text:h text:style-name="P12" text:outline-level="3"><text:span text:style-name="T225">▍</text:span><text:span text:style-name="T226"> </text:span><text:span text:style-name="T227">六、</text:span><text:span text:style-name="T226">DNS </text:span><text:span text:style-name="T227">與 </text:span><text:span text:style-name="T226">DNSSEC</text:span><text:span text:style-name="T227">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6" loext:marker-style-name="T226"><text:span text:style-name="T239">🔑 </text:span><text:span text:style-name="T227">口訣</text:span></text:p>
            <text:p text:style-name="P7"><text:span text:style-name="T232">查詢流程：</text:span><text:span text:style-name="T177">Cache → Local → Root → TLD → Authoritative → </text:span><text:span text:style-name="T111">取得 </text:span><text:span text:style-name="T177">IP</text:span><text:span text:style-name="T111">。</text:span></text:p>
            <text:p text:style-name="P8"><text:span text:style-name="T240">Recursive</text:span><text:span text:style-name="T232">：</text:span><text:span text:style-name="T111">「代查到底」（</text:span><text:span text:style-name="T177">DNS </text:span><text:span text:style-name="T111">幫你問完，你只問一次）。</text:span></text:p>
            <text:p text:style-name="P8"><text:span text:style-name="T240">Iterative</text:span><text:span text:style-name="T232">：</text:span><text:span text:style-name="T111">「逐層詢問」（你自己一層一層問）。</text:span></text:p>
            <text:p text:style-name="P8"><text:span text:style-name="T240">DNSSEC</text:span><text:span text:style-name="T232">：</text:span><text:span text:style-name="T111">驗證真偽，不是加密、不防 </text:span><text:span text:style-name="T177">DDoS</text:span><text:span text:style-name="T111">。</text:span></text:p>
          </table:table-cell>
        </table:table-row>
      </table:table>
      <text:h text:style-name="P12" text:outline-level="3"><text:span text:style-name="T225">▍</text:span><text:span text:style-name="T226"> </text:span><text:span text:style-name="T227">七、路由協定 </text:span><text:span text:style-name="T226">OSPF / BGP</text:span><text:span text:style-name="T227">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6" loext:marker-style-name="T226"><text:span text:style-name="T239">🔑 </text:span><text:span text:style-name="T227">口訣</text:span></text:p>
            <text:p text:style-name="P7"><text:span text:style-name="T232">範圍分類：</text:span><text:span text:style-name="T111">公司／校園內 → </text:span><text:span text:style-name="T177">IGP</text:span><text:span text:style-name="T111">（</text:span><text:span text:style-name="T177">OSPF</text:span><text:span text:style-name="T111">、</text:span><text:span text:style-name="T177">RIP</text:span><text:span text:style-name="T111">）；公司與公司間 → </text:span><text:span text:style-name="T177">EGP</text:span><text:span text:style-name="T111">（</text:span><text:span text:style-name="T177">BGP</text:span><text:span text:style-name="T111">）。</text:span></text:p>
            <text:p text:style-name="P8"><text:span text:style-name="T240">OSPF </text:span><text:span text:style-name="T232">規定：</text:span><text:span text:style-name="T111">所有 </text:span><text:span text:style-name="T177">Area </text:span><text:span text:style-name="T111">一定要連到 </text:span><text:span text:style-name="T177">Area 0</text:span><text:span text:style-name="T111">（骨幹）才能互通。</text:span></text:p>
            <text:p text:style-name="P8"><text:span text:style-name="T240">OSPF </text:span><text:span text:style-name="T232">四種 </text:span><text:span text:style-name="T240">Router</text:span><text:span text:style-name="T232">：</text:span><text:span text:style-name="T177">Internal</text:span><text:span text:style-name="T111">（不出 </text:span><text:span text:style-name="T177">Area</text:span><text:span text:style-name="T111">）／</text:span><text:span text:style-name="T177">Backbone</text:span><text:span text:style-name="T111">（在 </text:span><text:span text:style-name="T177">Area 0</text:span><text:span text:style-name="T111">）／</text:span><text:span text:style-name="T177">ABR</text:span><text:span text:style-name="T111">（跨 </text:span><text:span text:style-name="T177">Area </text:span><text:span text:style-name="T111">橋樑）／</text:span><text:span text:style-name="T177">ASBR</text:span><text:span text:style-name="T111">（跨 </text:span><text:span text:style-name="T177">AS </text:span><text:span text:style-name="T111">入口）。</text:span></text:p>
            <text:p text:style-name="P8"><text:span text:style-name="T240">BGP </text:span><text:span text:style-name="T232">選路順序：</text:span><text:span text:style-name="T177">Weight &gt; Local Pref &gt; </text:span><text:span text:style-name="T111">自己產生 </text:span><text:span text:style-name="T177">&gt; AS-PATH &gt; Origin &gt; MED &gt; eBGP &gt; IGP cost &gt; Router ID</text:span><text:span text:style-name="T111">。</text:span></text:p>
            <text:p text:style-name="P8"><text:span text:style-name="T240">BGP </text:span><text:span text:style-name="T232">本質：</text:span><text:span text:style-name="T111">政策導向（不是距離導向）；</text:span><text:span text:style-name="T177">Local Preference </text:span><text:span text:style-name="T111">才是最重要的「通用」屬性（</text:span><text:span text:style-name="T177">Weight </text:span><text:span text:style-name="T111">為 </text:span><text:span text:style-name="T177">Cisco </text:span><text:span text:style-name="T111">私有）。</text:span></text:p>
            <text:p text:style-name="P8"><text:span text:style-name="T232">三層分工：</text:span><text:span text:style-name="T111">防火牆→「能不能走」｜</text:span><text:span text:style-name="T177">NAT→</text:span><text:span text:style-name="T111">「你是誰」｜</text:span><text:span text:style-name="T177">BGP→</text:span><text:span text:style-name="T111">「怎麼走」。</text:span></text:p>
          </table:table-cell>
        </table:table-row>
      </table:table>
      <text:h text:style-name="P12" text:outline-level="3"><text:span text:style-name="T225">▍</text:span><text:span text:style-name="T226"> </text:span><text:span text:style-name="T227">八、網路系統進階 </text:span><text:span text:style-name="T226">SDN / LB / CDN / 5G</text:span><text:span text:style-name="T227">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6" loext:marker-style-name="T226"><text:span text:style-name="T239">🔑 </text:span><text:span text:style-name="T227">口訣</text:span></text:p>
            <text:p text:style-name="P7"><text:span text:style-name="T240">SDN</text:span><text:span text:style-name="T232">：</text:span><text:span text:style-name="T111">「分平面、三層 </text:span><text:span text:style-name="T177">App-</text:span><text:span text:style-name="T111">控</text:span><text:span text:style-name="T177">-</text:span><text:span text:style-name="T111">基」＝控制／資料分離；</text:span><text:span text:style-name="T177">Application → Control → Infrastructure</text:span><text:span text:style-name="T111">。</text:span></text:p>
            <text:p text:style-name="P8"><text:span text:style-name="T240">Load Balancing</text:span><text:span text:style-name="T232">：</text:span><text:span text:style-name="T111">「</text:span><text:span text:style-name="T177">LB </text:span><text:span text:style-name="T111">輪、重、黏」＝</text:span><text:span text:style-name="T177">Round Robin</text:span><text:span text:style-name="T111">（輪流）／</text:span><text:span text:style-name="T177">Weighted RR</text:span><text:span text:style-name="T111">（加權）／</text:span><text:span text:style-name="T177">Stickiness</text:span><text:span text:style-name="T111">（同人同台）。</text:span></text:p>
            <text:p text:style-name="P8"><text:span text:style-name="T240">CDN</text:span><text:span text:style-name="T232">：</text:span><text:span text:style-name="T111">「網址轉轉轉（</text:span><text:span text:style-name="T177">CNAME</text:span><text:span text:style-name="T111">），資料找最近（</text:span><text:span text:style-name="T177">Edge</text:span><text:span text:style-name="T111">）」；</text:span><text:span text:style-name="T177">CNAME</text:span><text:span text:style-name="T111">＝網址→網址（非 </text:span><text:span text:style-name="T177">IP</text:span><text:span text:style-name="T111">）。</text:span></text:p>
            <text:p text:style-name="P8"><text:span text:style-name="T240">5G</text:span><text:span text:style-name="T232">：</text:span><text:span text:style-name="T111">「快、低、多、切」＝</text:span><text:span text:style-name="T177">eMBB</text:span><text:span text:style-name="T111">（高速）／</text:span><text:span text:style-name="T177">URLLC</text:span><text:span text:style-name="T111">（超低延遲）／</text:span><text:span text:style-name="T177">mMTC</text:span><text:span text:style-name="T111">（大量連線）／</text:span><text:span text:style-name="T177">Network Slicing</text:span><text:span text:style-name="T111">（切片）。</text:span></text:p>
            <text:p text:style-name="P8"><text:span text:style-name="T240">10 </text:span><text:span text:style-name="T232">秒總背：</text:span><text:span text:style-name="T177">SDN </text:span><text:span text:style-name="T111">分離三層、</text:span><text:span text:style-name="T177">LB </text:span><text:span text:style-name="T111">輪重黏、</text:span><text:span text:style-name="T177">CDN CNAME→</text:span><text:span text:style-name="T111">最近、</text:span><text:span text:style-name="T177">5G </text:span><text:span text:style-name="T111">快低多切、</text:span><text:span text:style-name="T177">WiFi </text:span><text:span text:style-name="T111">聽、</text:span><text:span text:style-name="T177">BT </text:span><text:span text:style-name="T111">跳。</text:span></text:p>
          </table:table-cell>
        </table:table-row>
      </table:table>
      <text:h text:style-name="P12" text:outline-level="3"><text:span text:style-name="T225">▍</text:span><text:span text:style-name="T226"> </text:span><text:span text:style-name="T227">九、無線通訊 </text:span><text:span text:style-name="T226">WiFi vs Bluetooth</text:span><text:span text:style-name="T227">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6" loext:marker-style-name="T226"><text:span text:style-name="T239">🔑 </text:span><text:span text:style-name="T227">口訣</text:span></text:p>
            <text:p text:style-name="P7"><text:span text:style-name="T232">一句總綱：</text:span><text:span text:style-name="T111">「</text:span><text:span text:style-name="T177">WiFi </text:span><text:span text:style-name="T111">先聽再說（</text:span><text:span text:style-name="T177">CSMA/CA</text:span><text:span text:style-name="T111">），</text:span><text:span text:style-name="T177">Bluetooth </text:span><text:span text:style-name="T111">一直換頻道（</text:span><text:span text:style-name="T177">FHSS</text:span><text:span text:style-name="T111">）」。</text:span></text:p>
            <text:p text:style-name="P8"><text:span text:style-name="T232">本質對比：</text:span><text:span text:style-name="T177">WiFi</text:span><text:span text:style-name="T111">＝搶頻道（菜市場）；</text:span><text:span text:style-name="T177">BT</text:span><text:span text:style-name="T111">＝排班（會議室預約）；時槽＝時間格子；</text:span><text:span text:style-name="T177">SCO</text:span><text:span text:style-name="T111">＝語音；</text:span><text:span text:style-name="T177">L2CAP</text:span><text:span text:style-name="T111">＝三通道。</text:span></text:p>
            <text:p text:style-name="P8"><text:span text:style-name="T232">最大陷阱：</text:span><text:span text:style-name="T111">有線 </text:span><text:span text:style-name="T177">Ethernet</text:span><text:span text:style-name="T111">＝</text:span><text:span text:style-name="T177">CD</text:span><text:span text:style-name="T111">（</text:span><text:span text:style-name="T177">Detect </text:span><text:span text:style-name="T111">偵測）；無線 </text:span><text:span text:style-name="T177">WiFi</text:span><text:span text:style-name="T111">＝</text:span><text:span text:style-name="T177">CA</text:span><text:span text:style-name="T111">（</text:span><text:span text:style-name="T177">Avoid </text:span><text:span text:style-name="T111">避免）。</text:span></text:p>
            <text:p text:style-name="P8"><text:span text:style-name="T240">QoS</text:span><text:span text:style-name="T232">／語音：</text:span><text:span text:style-name="T177">WiFi QoS</text:span><text:span text:style-name="T111">＝</text:span><text:span text:style-name="T177">EDCA</text:span><text:span text:style-name="T111">（急診室分級）；藍牙即時語音＝</text:span><text:span text:style-name="T177">SCO</text:span><text:span text:style-name="T111">／</text:span><text:span text:style-name="T177">eSCO</text:span><text:span text:style-name="T111">；</text:span><text:span text:style-name="T177">L2CAP </text:span><text:span text:style-name="T111">位於 </text:span><text:span text:style-name="T177">Data </text:span><text:soft-page-break/><text:span text:style-name="T177">Link </text:span><text:span text:style-name="T111">層。</text:span></text:p>
          </table:table-cell>
        </table:table-row>
      </table:table>
      <text:h text:style-name="P12" text:outline-level="3"><text:span text:style-name="T225">▍</text:span><text:span text:style-name="T226"> </text:span><text:span text:style-name="T227">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6" loext:marker-style-name="T226"><text:span text:style-name="T239">🔑 </text:span><text:span text:style-name="T227">口訣</text:span></text:p>
            <text:p text:style-name="P7"><text:span text:style-name="T232">設備萬用口訣：</text:span><text:span text:style-name="T177">FW </text:span><text:span text:style-name="T111">封外、</text:span><text:span text:style-name="T177">WAF </text:span><text:span text:style-name="T111">看內、</text:span><text:span text:style-name="T177">NGFW </text:span><text:span text:style-name="T111">最強、</text:span><text:span text:style-name="T177">DMZ </text:span><text:span text:style-name="T111">隔離、</text:span><text:span text:style-name="T177">IOC </text:span><text:span text:style-name="T111">壞人、</text:span><text:span text:style-name="T177">Proxy </text:span><text:span text:style-name="T111">幫客、</text:span><text:span text:style-name="T177">Reverse </text:span><text:span text:style-name="T111">幫服。</text:span></text:p>
            <text:p text:style-name="P8"><text:span text:style-name="T240">IOC </text:span><text:span text:style-name="T232">四線索：</text:span><text:span text:style-name="T111">網（</text:span><text:span text:style-name="T177">Domain</text:span><text:span text:style-name="T111">）→ 檔（</text:span><text:span text:style-name="T177">Hash</text:span><text:span text:style-name="T111">）→ 連（</text:span><text:span text:style-name="T177">IP</text:span><text:span text:style-name="T111">）→ 控（</text:span><text:span text:style-name="T177">C2</text:span><text:span text:style-name="T111">）。</text:span></text:p>
            <text:p text:style-name="P8"><text:span text:style-name="T232">封包闖關順序：</text:span><text:span text:style-name="T177">Client → Proxy → Internet → FW/NGFW → DMZ → WAF → Reverse Proxy → </text:span><text:span text:style-name="T111">內部 </text:span><text:span text:style-name="T177">Server</text:span><text:span text:style-name="T111">。</text:span></text:p>
            <text:p text:style-name="P8"><text:span text:style-name="T232">三防分工：</text:span><text:span text:style-name="T177">Firewall </text:span><text:span text:style-name="T111">擋入口、</text:span><text:span text:style-name="T177">IDS </text:span><text:span text:style-name="T111">只看、</text:span><text:span text:style-name="T177">IPS </text:span><text:span text:style-name="T111">看＋擋；</text:span><text:span text:style-name="T177">HIDS </text:span><text:span text:style-name="T111">看主機（</text:span><text:span text:style-name="T177">Log</text:span><text:span text:style-name="T111">）、</text:span><text:span text:style-name="T177">NIDS </text:span><text:span text:style-name="T111">看網路（封包）。</text:span></text:p>
            <text:p text:style-name="P8"><text:span text:style-name="T232">易混兩協定：</text:span><text:span text:style-name="T177">SNMP </text:span><text:span text:style-name="T111">管理設備（應用層／</text:span><text:span text:style-name="T177">UDP</text:span><text:span text:style-name="T111">）、</text:span><text:span text:style-name="T177">ICMP </text:span><text:span text:style-name="T111">診斷網路（網路層）。</text:span></text:p>
            <text:p text:style-name="P8"><text:span text:style-name="T240">SQL Injection</text:span><text:span text:style-name="T232">：</text:span><text:span text:style-name="T111">攻擊＝</text:span><text:span text:style-name="T177">' OR 1=1 --</text:span><text:span text:style-name="T111">；防禦核心＝</text:span><text:span text:style-name="T177">Prepared Statement</text:span><text:span text:style-name="T111">（預備語句）。</text:span></text:p>
            <text:p text:style-name="P8"><text:span text:style-name="T240">Zero-Day</text:span><text:span text:style-name="T232">：</text:span><text:span text:style-name="T111">最怕「沒有 </text:span><text:span text:style-name="T177">Signature</text:span><text:span text:style-name="T111">」；防禦＝</text:span><text:span text:style-name="T177">Patch </text:span><text:span text:style-name="T111">更新 ＋ </text:span><text:span text:style-name="T177">IDS/IPS </text:span><text:span text:style-name="T111">＋ 網路分段。</text:span></text:p>
            <text:p text:style-name="P8"><text:span text:style-name="T232">企業資安三階段：</text:span><text:span text:style-name="T111">事前預防 → 事中偵測 → 事後復原。</text:span><text:span text:style-name="T177">RTO</text:span><text:span text:style-name="T111">＝停機時間、</text:span><text:span text:style-name="T177">RPO</text:span><text:span text:style-name="T111">＝資料損失量。</text:span></text:p>
            <text:p text:style-name="P8"><text:span text:style-name="T240">EDR/MDR</text:span><text:span text:style-name="T232">：</text:span><text:span text:style-name="T177">EDR</text:span><text:span text:style-name="T111">＝自己買工具守、</text:span><text:span text:style-name="T177">MDR</text:span><text:span text:style-name="T111">＝請公司幫你守、</text:span><text:span text:style-name="T177">ATT&amp;CK</text:span><text:span text:style-name="T111">＝駭客招式教材、數位韌性＝撐住快速復原。</text:span></text:p>
            <text:p text:style-name="P8"><text:span text:style-name="T240">SSDLC</text:span><text:span text:style-name="T232">：</text:span><text:span text:style-name="T177">Define→Design→Develop→Test→Deploy→Maintain</text:span><text:span text:style-name="T111">，精神是「左移（</text:span><text:span text:style-name="T177">Shift Left</text:span><text:span text:style-name="T111">）」。</text:span></text:p>
            <text:p text:style-name="P8"><text:span text:style-name="T240">Zero Trust</text:span><text:span text:style-name="T232">：</text:span><text:span text:style-name="T111">永不信任，始終驗證；查「人（</text:span><text:span text:style-name="T177">Identity</text:span><text:span text:style-name="T111">）機（</text:span><text:span text:style-name="T177">Device</text:span><text:span text:style-name="T111">）境（</text:span><text:span text:style-name="T177">Context</text:span><text:span text:style-name="T111">）」；配 </text:span><text:span text:style-name="T177">MFA</text:span><text:span text:style-name="T111">＋最小權限＋微分段＋持續監控。</text:span></text:p>
          </table:table-cell>
        </table:table-row>
      </table:table>
      <text:h text:style-name="P11" text:outline-level="2" loext:marker-style-name="T27"><text:span text:style-name="T27">Part B</text:span><text:span text:style-name="T28">　必背表格精選（考前掃一遍）</text:span></text:h>
      <text:h text:style-name="P12" text:outline-level="3"><text:span text:style-name="T225">▍</text:span><text:span text:style-name="T226"> ① </text:span><text:span text:style-name="T227">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39" loext:marker-style-name="T71"><text:span text:style-name="T72">前綴</text:span><text:span text:style-name="T71"/></text:p>
            </table:table-cell>
            <table:table-cell table:style-name="表格14.A1" office:value-type="string">
              <text:p text:style-name="P39" loext:marker-style-name="T71"><text:span text:style-name="T72">主機 </text:span><text:span text:style-name="T81">bit</text:span></text:p>
            </table:table-cell>
            <table:table-cell table:style-name="表格14.A1" office:value-type="string">
              <text:p text:style-name="P39" loext:marker-style-name="T71"><text:span text:style-name="T81">IP </text:span><text:span text:style-name="T72">總數</text:span></text:p>
            </table:table-cell>
            <table:table-cell table:style-name="表格14.A1" office:value-type="string">
              <text:p text:style-name="P39" loext:marker-style-name="T71"><text:span text:style-name="T72">可用主機</text:span><text:span text:style-name="T71"/></text:p>
            </table:table-cell>
            <table:table-cell table:style-name="表格14.A1" office:value-type="string">
              <text:p text:style-name="P39" loext:marker-style-name="T71"><text:span text:style-name="T72">區塊步長</text:span><text:span text:style-name="T71"/></text:p>
            </table:table-cell>
            <table:table-cell table:style-name="表格14.A1" office:value-type="string">
              <text:p text:style-name="P39" loext:marker-style-name="T71"><text:span text:style-name="T72">廣播尾數範例</text:span><text:span text:style-name="T71"/>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42" loext:marker-style-name="T85"><text:span text:style-name="T161">/24</text:span><text:span text:style-name="T85"/></text:p>
          </table:table-cell>
          <table:table-cell table:style-name="表格14.A2" office:value-type="string">
            <text:p text:style-name="P41" loext:marker-style-name="T85"><text:span text:style-name="T161">8</text:span><text:span text:style-name="T85"/></text:p>
          </table:table-cell>
          <table:table-cell table:style-name="表格14.A2" office:value-type="string">
            <text:p text:style-name="P42" loext:marker-style-name="T85"><text:span text:style-name="T161">256</text:span><text:span text:style-name="T85"/></text:p>
          </table:table-cell>
          <table:table-cell table:style-name="表格14.A2" office:value-type="string">
            <text:p text:style-name="P41" loext:marker-style-name="T34"><text:span text:style-name="T42">254</text:span><text:span text:style-name="T34"/></text:p>
          </table:table-cell>
          <table:table-cell table:style-name="表格14.A2" office:value-type="string">
            <text:p text:style-name="P42" loext:marker-style-name="T85"><text:span text:style-name="T161">+256</text:span><text:span text:style-name="T85"/></text:p>
          </table:table-cell>
          <table:table-cell table:style-name="表格14.A2" office:value-type="string">
            <text:p text:style-name="P42" loext:marker-style-name="T85"><text:span text:style-name="T161">255</text:span><text:span text:style-name="T85"/></text:p>
          </table:table-cell>
        </table:table-row>
        <table:table-row table:style-name="表格14.1">
          <table:table-cell table:style-name="表格14.A3" office:value-type="string">
            <text:p text:style-name="P42" loext:marker-style-name="T85"><text:span text:style-name="T161">/25</text:span><text:span text:style-name="T85"/></text:p>
          </table:table-cell>
          <table:table-cell table:style-name="表格14.A3" office:value-type="string">
            <text:p text:style-name="P41" loext:marker-style-name="T85"><text:span text:style-name="T161">7</text:span><text:span text:style-name="T85"/></text:p>
          </table:table-cell>
          <table:table-cell table:style-name="表格14.A3" office:value-type="string">
            <text:p text:style-name="P42" loext:marker-style-name="T85"><text:span text:style-name="T161">128</text:span><text:span text:style-name="T85"/></text:p>
          </table:table-cell>
          <table:table-cell table:style-name="表格14.A3" office:value-type="string">
            <text:p text:style-name="P41" loext:marker-style-name="T34"><text:span text:style-name="T42">126</text:span><text:span text:style-name="T34"/></text:p>
          </table:table-cell>
          <table:table-cell table:style-name="表格14.A3" office:value-type="string">
            <text:p text:style-name="P42" loext:marker-style-name="T85"><text:span text:style-name="T161">+128</text:span><text:span text:style-name="T85"/></text:p>
          </table:table-cell>
          <table:table-cell table:style-name="表格14.A3" office:value-type="string">
            <text:p text:style-name="P42" loext:marker-style-name="T85"><text:span text:style-name="T161">127, 255</text:span><text:span text:style-name="T85"/></text:p>
          </table:table-cell>
        </table:table-row>
        <table:table-row table:style-name="表格14.1">
          <table:table-cell table:style-name="表格14.A2" office:value-type="string">
            <text:p text:style-name="P42" loext:marker-style-name="T85"><text:span text:style-name="T161">/26</text:span><text:span text:style-name="T85"/></text:p>
          </table:table-cell>
          <table:table-cell table:style-name="表格14.A2" office:value-type="string">
            <text:p text:style-name="P41" loext:marker-style-name="T85"><text:span text:style-name="T161">6</text:span><text:span text:style-name="T85"/></text:p>
          </table:table-cell>
          <table:table-cell table:style-name="表格14.A2" office:value-type="string">
            <text:p text:style-name="P42" loext:marker-style-name="T85"><text:span text:style-name="T161">64</text:span><text:span text:style-name="T85"/></text:p>
          </table:table-cell>
          <table:table-cell table:style-name="表格14.A2" office:value-type="string">
            <text:p text:style-name="P41" loext:marker-style-name="T34"><text:span text:style-name="T42">62</text:span><text:span text:style-name="T34"/></text:p>
          </table:table-cell>
          <table:table-cell table:style-name="表格14.A2" office:value-type="string">
            <text:p text:style-name="P42" loext:marker-style-name="T85"><text:span text:style-name="T161">+64</text:span><text:span text:style-name="T85"/></text:p>
          </table:table-cell>
          <table:table-cell table:style-name="表格14.A2" office:value-type="string">
            <text:p text:style-name="P42" loext:marker-style-name="T85"><text:span text:style-name="T161">63, 127, 191, 255</text:span><text:span text:style-name="T85"/></text:p>
          </table:table-cell>
        </table:table-row>
        <table:table-row table:style-name="表格14.1">
          <table:table-cell table:style-name="表格14.A3" office:value-type="string">
            <text:p text:style-name="P42" loext:marker-style-name="T85"><text:span text:style-name="T161">/27</text:span><text:span text:style-name="T85"/></text:p>
          </table:table-cell>
          <table:table-cell table:style-name="表格14.A3" office:value-type="string">
            <text:p text:style-name="P41" loext:marker-style-name="T85"><text:span text:style-name="T161">5</text:span><text:span text:style-name="T85"/></text:p>
          </table:table-cell>
          <table:table-cell table:style-name="表格14.A3" office:value-type="string">
            <text:p text:style-name="P42" loext:marker-style-name="T85"><text:span text:style-name="T161">32</text:span><text:span text:style-name="T85"/></text:p>
          </table:table-cell>
          <table:table-cell table:style-name="表格14.A3" office:value-type="string">
            <text:p text:style-name="P41" loext:marker-style-name="T34"><text:span text:style-name="T42">30</text:span><text:span text:style-name="T34"/></text:p>
          </table:table-cell>
          <table:table-cell table:style-name="表格14.A3" office:value-type="string">
            <text:p text:style-name="P42" loext:marker-style-name="T85"><text:span text:style-name="T161">+32</text:span><text:span text:style-name="T85"/></text:p>
          </table:table-cell>
          <table:table-cell table:style-name="表格14.A3" office:value-type="string">
            <text:p text:style-name="P42" loext:marker-style-name="T85"><text:span text:style-name="T161">31, 63, 95 …</text:span><text:span text:style-name="T85"/></text:p>
          </table:table-cell>
        </table:table-row>
        <table:table-row table:style-name="表格14.1">
          <table:table-cell table:style-name="表格14.A2" office:value-type="string">
            <text:p text:style-name="P42" loext:marker-style-name="T85"><text:span text:style-name="T161">/28</text:span><text:span text:style-name="T85"/></text:p>
          </table:table-cell>
          <table:table-cell table:style-name="表格14.A2" office:value-type="string">
            <text:p text:style-name="P41" loext:marker-style-name="T85"><text:span text:style-name="T161">4</text:span><text:span text:style-name="T85"/></text:p>
          </table:table-cell>
          <table:table-cell table:style-name="表格14.A2" office:value-type="string">
            <text:p text:style-name="P42" loext:marker-style-name="T85"><text:span text:style-name="T161">16</text:span><text:span text:style-name="T85"/></text:p>
          </table:table-cell>
          <table:table-cell table:style-name="表格14.A2" office:value-type="string">
            <text:p text:style-name="P41" loext:marker-style-name="T34"><text:span text:style-name="T42">14</text:span><text:span text:style-name="T34"/></text:p>
          </table:table-cell>
          <table:table-cell table:style-name="表格14.A2" office:value-type="string">
            <text:p text:style-name="P42" loext:marker-style-name="T85"><text:span text:style-name="T161">+16</text:span><text:span text:style-name="T85"/></text:p>
          </table:table-cell>
          <table:table-cell table:style-name="表格14.A2" office:value-type="string">
            <text:p text:style-name="P42" loext:marker-style-name="T85"><text:span text:style-name="T161">15, 31, 47 …</text:span><text:span text:style-name="T85"/></text:p>
          </table:table-cell>
        </table:table-row>
        <table:table-row table:style-name="表格14.1">
          <table:table-cell table:style-name="表格14.A3" office:value-type="string">
            <text:p text:style-name="P42" loext:marker-style-name="T85"><text:span text:style-name="T161">/29</text:span><text:span text:style-name="T85"/></text:p>
          </table:table-cell>
          <table:table-cell table:style-name="表格14.A3" office:value-type="string">
            <text:p text:style-name="P41" loext:marker-style-name="T85"><text:span text:style-name="T161">3</text:span><text:span text:style-name="T85"/></text:p>
          </table:table-cell>
          <table:table-cell table:style-name="表格14.A3" office:value-type="string">
            <text:p text:style-name="P42" loext:marker-style-name="T85"><text:span text:style-name="T161">8</text:span><text:span text:style-name="T85"/></text:p>
          </table:table-cell>
          <table:table-cell table:style-name="表格14.A3" office:value-type="string">
            <text:p text:style-name="P41" loext:marker-style-name="T34"><text:span text:style-name="T42">6</text:span><text:span text:style-name="T34"/></text:p>
          </table:table-cell>
          <table:table-cell table:style-name="表格14.A3" office:value-type="string">
            <text:p text:style-name="P42" loext:marker-style-name="T85"><text:span text:style-name="T161">+8</text:span><text:span text:style-name="T85"/></text:p>
          </table:table-cell>
          <table:table-cell table:style-name="表格14.A3" office:value-type="string">
            <text:p text:style-name="P42" loext:marker-style-name="T85"><text:span text:style-name="T161">7, 15, 23 …</text:span><text:span text:style-name="T85"/></text:p>
          </table:table-cell>
        </table:table-row>
        <table:table-row table:style-name="表格14.1">
          <table:table-cell table:style-name="表格14.A2" office:value-type="string">
            <text:p text:style-name="P42" loext:marker-style-name="T85"><text:span text:style-name="T161">/30</text:span><text:span text:style-name="T85"/></text:p>
          </table:table-cell>
          <table:table-cell table:style-name="表格14.A2" office:value-type="string">
            <text:p text:style-name="P41" loext:marker-style-name="T85"><text:span text:style-name="T161">2</text:span><text:span text:style-name="T85"/></text:p>
          </table:table-cell>
          <table:table-cell table:style-name="表格14.A2" office:value-type="string">
            <text:p text:style-name="P42" loext:marker-style-name="T85"><text:span text:style-name="T161">4</text:span><text:span text:style-name="T85"/></text:p>
          </table:table-cell>
          <table:table-cell table:style-name="表格14.A2" office:value-type="string">
            <text:p text:style-name="P41" loext:marker-style-name="T34"><text:span text:style-name="T42">2</text:span><text:span text:style-name="T34"/></text:p>
          </table:table-cell>
          <table:table-cell table:style-name="表格14.A2" office:value-type="string">
            <text:p text:style-name="P42" loext:marker-style-name="T85"><text:span text:style-name="T161">+4</text:span><text:span text:style-name="T85"/></text:p>
          </table:table-cell>
          <table:table-cell table:style-name="表格14.A2" office:value-type="string">
            <text:p text:style-name="P42" loext:marker-style-name="T85"><text:span text:style-name="T161">3, 7, 11 …</text:span><text:span text:style-name="T85"/>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7"><text:span text:style-name="T243">例外 </text:span><text:span text:style-name="T248">/31</text:span><text:span text:style-name="T243">：</text:span><text:span text:style-name="T111">點對點連線（</text:span><text:span text:style-name="T177">RFC 3021</text:span><text:span text:style-name="T111">），</text:span><text:span text:style-name="T177">2 </text:span><text:span text:style-name="T111">個 </text:span><text:span text:style-name="T177">IP </text:span><text:span text:style-name="T111">全部可用，無網路位址與廣播位址。</text:span><text:span text:style-name="T177">/32 </text:span><text:span text:style-name="T111">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12" text:outline-level="3"><text:span text:style-name="T225">▍</text:span><text:span text:style-name="T226"> ② TCP vs UDP</text:span><text:span text:style-name="T227">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4" loext:marker-style-name="T75"><text:span text:style-name="T76">比較項目</text:span><text:span text:style-name="T75"/></text:p>
            </table:table-cell>
            <table:table-cell table:style-name="表格15.A1" office:value-type="string">
              <text:p text:style-name="P4" loext:marker-style-name="T75"><text:span text:style-name="T82">TCP</text:span><text:span text:style-name="T76">（穩定）</text:span></text:p>
            </table:table-cell>
            <table:table-cell table:style-name="表格15.A1" office:value-type="string">
              <text:p text:style-name="P4" loext:marker-style-name="T75"><text:span text:style-name="T82">UDP</text:span><text:span text:style-name="T76">（快速）</text:span>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42" loext:marker-style-name="T144"><text:span text:style-name="T145">連線方式</text:span><text:span text:style-name="T144"/></text:p>
          </table:table-cell>
          <table:table-cell table:style-name="表格15.A2" office:value-type="string">
            <text:p text:style-name="P42" loext:marker-style-name="T144"><text:span text:style-name="T145">三次握手才開始</text:span><text:span text:style-name="T144"/></text:p>
          </table:table-cell>
          <table:table-cell table:style-name="表格15.A2" office:value-type="string">
            <text:p text:style-name="P42" loext:marker-style-name="T144"><text:span text:style-name="T145">無連線，直接送</text:span><text:span text:style-name="T144"/></text:p>
          </table:table-cell>
        </table:table-row>
        <table:table-row table:style-name="表格15.1">
          <table:table-cell table:style-name="表格15.A3" office:value-type="string">
            <text:p text:style-name="P42" loext:marker-style-name="T144"><text:span text:style-name="T145">可靠性</text:span><text:span text:style-name="T144"/></text:p>
          </table:table-cell>
          <table:table-cell table:style-name="表格15.A3" office:value-type="string">
            <text:p text:style-name="P42" loext:marker-style-name="T144"><text:span text:style-name="T145">保證送達、會重傳</text:span><text:span text:style-name="T144"/></text:p>
          </table:table-cell>
          <table:table-cell table:style-name="表格15.A3" office:value-type="string">
            <text:p text:style-name="P42" loext:marker-style-name="T144"><text:span text:style-name="T145">不保證、不重傳</text:span><text:span text:style-name="T144"/></text:p>
          </table:table-cell>
        </table:table-row>
        <table:table-row table:style-name="表格15.1">
          <table:table-cell table:style-name="表格15.A2" office:value-type="string">
            <text:p text:style-name="P42" loext:marker-style-name="T144"><text:span text:style-name="T145">順序</text:span><text:span text:style-name="T144"/></text:p>
          </table:table-cell>
          <table:table-cell table:style-name="表格15.A2" office:value-type="string">
            <text:p text:style-name="P42" loext:marker-style-name="T144"><text:span text:style-name="T145">保證順序</text:span><text:span text:style-name="T144"/></text:p>
          </table:table-cell>
          <table:table-cell table:style-name="表格15.A2" office:value-type="string">
            <text:p text:style-name="P42" loext:marker-style-name="T144"><text:span text:style-name="T145">不保證順序</text:span><text:span text:style-name="T144"/></text:p>
          </table:table-cell>
        </table:table-row>
        <table:table-row table:style-name="表格15.1">
          <table:table-cell table:style-name="表格15.A3" office:value-type="string">
            <text:p text:style-name="P42" loext:marker-style-name="T144"><text:span text:style-name="T145">速度</text:span><text:span text:style-name="T144"/></text:p>
          </table:table-cell>
          <table:table-cell table:style-name="表格15.A3" office:value-type="string">
            <text:p text:style-name="P42" loext:marker-style-name="T144"><text:span text:style-name="T145">較慢（有控制機制）</text:span><text:span text:style-name="T144"/></text:p>
          </table:table-cell>
          <table:table-cell table:style-name="表格15.A3" office:value-type="string">
            <text:p text:style-name="P42" loext:marker-style-name="T144"><text:span text:style-name="T145">較快（無額外開銷）</text:span><text:span text:style-name="T144"/></text:p>
          </table:table-cell>
        </table:table-row>
        <text:soft-page-break/>
        <table:table-row table:style-name="表格15.1">
          <table:table-cell table:style-name="表格15.A2" office:value-type="string">
            <text:p text:style-name="P42" loext:marker-style-name="T144"><text:span text:style-name="T145">適用</text:span><text:span text:style-name="T144"/></text:p>
          </table:table-cell>
          <table:table-cell table:style-name="表格15.A2" office:value-type="string">
            <text:p text:style-name="P42" loext:marker-style-name="T144"><text:span text:style-name="T145">網頁、</text:span><text:span text:style-name="T209">Email</text:span><text:span text:style-name="T145">、</text:span><text:span text:style-name="T209">FTP</text:span><text:span text:style-name="T145">、檔案</text:span></text:p>
          </table:table-cell>
          <table:table-cell table:style-name="表格15.A2" office:value-type="string">
            <text:p text:style-name="P42" loext:marker-style-name="T144"><text:span text:style-name="T145">串流、遊戲、</text:span><text:span text:style-name="T209">VoIP</text:span><text:span text:style-name="T145">、</text:span><text:span text:style-name="T209">DNS</text:span></text:p>
          </table:table-cell>
        </table:table-row>
        <table:table-row table:style-name="表格15.1">
          <table:table-cell table:style-name="表格15.A3" office:value-type="string">
            <text:p text:style-name="P42" loext:marker-style-name="T144"><text:span text:style-name="T145">一句話</text:span><text:span text:style-name="T144"/></text:p>
          </table:table-cell>
          <table:table-cell table:style-name="表格15.A3" office:value-type="string">
            <text:p text:style-name="P42" loext:marker-style-name="T235"><text:span text:style-name="T236">「穩定優先」</text:span><text:span text:style-name="T235"/></text:p>
          </table:table-cell>
          <table:table-cell table:style-name="表格15.A3" office:value-type="string">
            <text:p text:style-name="P42" loext:marker-style-name="T36"><text:span text:style-name="T37">「速度優先」</text:span><text:span text:style-name="T36"/></text:p>
          </table:table-cell>
        </table:table-row>
      </table:table>
      <text:h text:style-name="P12" text:outline-level="3"><text:span text:style-name="T225">▍</text:span><text:span text:style-name="T226"> ③ IPv4 vs IPv6 </text:span><text:span text:style-name="T227">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4" loext:marker-style-name="T71"><text:span text:style-name="T72">比較項目</text:span><text:span text:style-name="T71"/></text:p>
            </table:table-cell>
            <table:table-cell table:style-name="表格16.A1" office:value-type="string">
              <text:p text:style-name="P4" loext:marker-style-name="T71"><text:span text:style-name="T81">✗ IPv4 </text:span><text:span text:style-name="T72">問題</text:span></text:p>
            </table:table-cell>
            <table:table-cell table:style-name="表格16.A1" office:value-type="string">
              <text:p text:style-name="P4" loext:marker-style-name="T71"><text:span text:style-name="T81">✓ IPv6 </text:span><text:span text:style-name="T72">改進</text:span>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42" loext:marker-style-name="T85"><text:span text:style-name="T86">位址長度</text:span><text:span text:style-name="T85"/></text:p>
          </table:table-cell>
          <table:table-cell table:style-name="表格16.A2" office:value-type="string">
            <text:p text:style-name="P42" loext:marker-style-name="T85"><text:span text:style-name="T161">32 bit</text:span><text:span text:style-name="T86">，約 </text:span><text:span text:style-name="T161">43 </text:span><text:span text:style-name="T86">億個，已不足</text:span></text:p>
          </table:table-cell>
          <table:table-cell table:style-name="表格16.A2" office:value-type="string">
            <text:p text:style-name="P42" loext:marker-style-name="T85"><text:span text:style-name="T161">128 bit</text:span><text:span text:style-name="T86">，約 </text:span><text:span text:style-name="T161">3.4×10³⁸</text:span><text:span text:style-name="T86">，近乎無限</text:span></text:p>
          </table:table-cell>
        </table:table-row>
        <table:table-row table:style-name="表格16.1">
          <table:table-cell table:style-name="表格16.A3" office:value-type="string">
            <text:p text:style-name="P42" loext:marker-style-name="T85"><text:span text:style-name="T161">NAT</text:span><text:span text:style-name="T85"/></text:p>
          </table:table-cell>
          <table:table-cell table:style-name="表格16.A3" office:value-type="string">
            <text:p text:style-name="P42" loext:marker-style-name="T85"><text:span text:style-name="T86">需 </text:span><text:span text:style-name="T161">NAT </text:span><text:span text:style-name="T86">共用 </text:span><text:span text:style-name="T161">IP</text:span><text:span text:style-name="T86">，破壞 </text:span><text:span text:style-name="T161">E2E</text:span></text:p>
          </table:table-cell>
          <table:table-cell table:style-name="表格16.A3" office:value-type="string">
            <text:p text:style-name="P42" loext:marker-style-name="T85"><text:span text:style-name="T86">每裝置獨立公開 </text:span><text:span text:style-name="T161">IP</text:span><text:span text:style-name="T86">，恢復 </text:span><text:span text:style-name="T161">E2E</text:span></text:p>
          </table:table-cell>
        </table:table-row>
        <table:table-row table:style-name="表格16.1">
          <table:table-cell table:style-name="表格16.A2" office:value-type="string">
            <text:p text:style-name="P42" loext:marker-style-name="T85"><text:span text:style-name="T86">安全性</text:span><text:span text:style-name="T85"/></text:p>
          </table:table-cell>
          <table:table-cell table:style-name="表格16.A2" office:value-type="string">
            <text:p text:style-name="P42" loext:marker-style-name="T85"><text:span text:style-name="T86">無內建加密／驗證</text:span><text:span text:style-name="T85"/></text:p>
          </table:table-cell>
          <table:table-cell table:style-name="表格16.A2" office:value-type="string">
            <text:p text:style-name="P42" loext:marker-style-name="T85"><text:span text:style-name="T86">支援 </text:span><text:span text:style-name="T161">IPsec</text:span><text:span text:style-name="T86">（</text:span><text:span text:style-name="T161">RFC 6434 </text:span><text:span text:style-name="T86">後改建議）</text:span></text:p>
          </table:table-cell>
        </table:table-row>
        <table:table-row table:style-name="表格16.1">
          <table:table-cell table:style-name="表格16.A3" office:value-type="string">
            <text:p text:style-name="P42" loext:marker-style-name="T85"><text:span text:style-name="T161">Header</text:span><text:span text:style-name="T85"/></text:p>
          </table:table-cell>
          <table:table-cell table:style-name="表格16.A3" office:value-type="string">
            <text:p text:style-name="P42" loext:marker-style-name="T85"><text:span text:style-name="T86">可變長度含 </text:span><text:span text:style-name="T161">Options</text:span><text:span text:style-name="T86">，效率低</text:span></text:p>
          </table:table-cell>
          <table:table-cell table:style-name="表格16.A3" office:value-type="string">
            <text:p text:style-name="P42" loext:marker-style-name="T85"><text:span text:style-name="T86">固定 </text:span><text:span text:style-name="T161">40 bytes</text:span><text:span text:style-name="T86">，轉送更快</text:span></text:p>
          </table:table-cell>
        </table:table-row>
        <table:table-row table:style-name="表格16.1">
          <table:table-cell table:style-name="表格16.A2" office:value-type="string">
            <text:p text:style-name="P42" loext:marker-style-name="T85"><text:span text:style-name="T161">QoS</text:span><text:span text:style-name="T85"/></text:p>
          </table:table-cell>
          <table:table-cell table:style-name="表格16.A2" office:value-type="string">
            <text:p text:style-name="P42" loext:marker-style-name="T85"><text:span text:style-name="T86">無法標記優先權</text:span><text:span text:style-name="T85"/></text:p>
          </table:table-cell>
          <table:table-cell table:style-name="表格16.A2" office:value-type="string">
            <text:p text:style-name="P42" loext:marker-style-name="T85"><text:span text:style-name="T161">Flow Label </text:span><text:span text:style-name="T86">標記高優先流量</text:span></text:p>
          </table:table-cell>
        </table:table-row>
        <table:table-row table:style-name="表格16.1">
          <table:table-cell table:style-name="表格16.A3" office:value-type="string">
            <text:p text:style-name="P42" loext:marker-style-name="T85"><text:span text:style-name="T86">廣播</text:span><text:span text:style-name="T85"/></text:p>
          </table:table-cell>
          <table:table-cell table:style-name="表格16.A3" office:value-type="string">
            <text:p text:style-name="P42" loext:marker-style-name="T85"><text:span text:style-name="T161">Broadcast </text:span><text:span text:style-name="T86">發給所有人</text:span></text:p>
          </table:table-cell>
          <table:table-cell table:style-name="表格16.A3" office:value-type="string">
            <text:p text:style-name="P42" loext:marker-style-name="T85"><text:span text:style-name="T86">改用 </text:span><text:span text:style-name="T161">Multicast</text:span><text:span text:style-name="T86">／</text:span><text:span text:style-name="T161">Anycast</text:span></text:p>
          </table:table-cell>
        </table:table-row>
        <table:table-row table:style-name="表格16.1">
          <table:table-cell table:style-name="表格16.A2" office:value-type="string">
            <text:p text:style-name="P42" loext:marker-style-name="T85"><text:span text:style-name="T161">IP </text:span><text:span text:style-name="T86">配置</text:span></text:p>
          </table:table-cell>
          <table:table-cell table:style-name="表格16.A2" office:value-type="string">
            <text:p text:style-name="P42" loext:marker-style-name="T85"><text:span text:style-name="T86">手動或 </text:span><text:span text:style-name="T161">DHCP</text:span><text:span text:style-name="T86">，繁瑣</text:span></text:p>
          </table:table-cell>
          <table:table-cell table:style-name="表格16.A2" office:value-type="string">
            <text:p text:style-name="P42" loext:marker-style-name="T85"><text:span text:style-name="T161">SLAAC </text:span><text:span text:style-name="T86">無狀態自動配置</text:span></text:p>
          </table:table-cell>
        </table:table-row>
      </table:table>
      <text:h text:style-name="P12" text:outline-level="3"><text:span text:style-name="T225">▍</text:span><text:span text:style-name="T226"> ④ TCP </text:span><text:span text:style-name="T227">丟包處理（第五篇 </text:span><text:span text:style-name="T226">· </text:span><text:span text:style-name="T227">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4" loext:marker-style-name="T71"><text:span text:style-name="T72">丟包偵測</text:span><text:span text:style-name="T71"/></text:p>
            </table:table-cell>
            <table:table-cell table:style-name="表格17.A1" office:value-type="string">
              <text:p text:style-name="P4" loext:marker-style-name="T71"><text:span text:style-name="T72">代表意義</text:span><text:span text:style-name="T71"/></text:p>
            </table:table-cell>
            <table:table-cell table:style-name="表格17.A1" office:value-type="string">
              <text:p text:style-name="P4" loext:marker-style-name="T71"><text:span text:style-name="T81">ssthresh</text:span><text:span text:style-name="T71"/></text:p>
            </table:table-cell>
            <table:table-cell table:style-name="表格17.A1" office:value-type="string">
              <text:p text:style-name="P4" loext:marker-style-name="T71"><text:span text:style-name="T81">cwnd</text:span><text:span text:style-name="T71"/></text:p>
            </table:table-cell>
            <table:table-cell table:style-name="表格17.A1" office:value-type="string">
              <text:p text:style-name="P4" loext:marker-style-name="T71"><text:span text:style-name="T72">下一階段</text:span><text:span text:style-name="T71"/>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42" loext:marker-style-name="T85"><text:span text:style-name="T161">Timeout</text:span><text:span text:style-name="T86">（逾時）</text:span></text:p>
          </table:table-cell>
          <table:table-cell table:style-name="表格17.A2" office:value-type="string">
            <text:p text:style-name="P42" loext:marker-style-name="T85"><text:span text:style-name="T86">網路嚴重擁塞</text:span><text:span text:style-name="T85"/></text:p>
          </table:table-cell>
          <table:table-cell table:style-name="表格17.A2" office:value-type="string">
            <text:p text:style-name="P42" loext:marker-style-name="T85"><text:span text:style-name="T161">= cwnd / 2</text:span><text:span text:style-name="T85"/></text:p>
          </table:table-cell>
          <table:table-cell table:style-name="表格17.A2" office:value-type="string">
            <text:p text:style-name="P42" loext:marker-style-name="T252"><text:span text:style-name="T253">重設為 </text:span><text:span text:style-name="T260">1</text:span></text:p>
          </table:table-cell>
          <table:table-cell table:style-name="表格17.A2" office:value-type="string">
            <text:p text:style-name="P42" loext:marker-style-name="T85"><text:span text:style-name="T86">重回 </text:span><text:span text:style-name="T161">Slow Start</text:span></text:p>
          </table:table-cell>
        </table:table-row>
        <table:table-row table:style-name="表格17.1">
          <table:table-cell table:style-name="表格17.A3" office:value-type="string">
            <text:p text:style-name="P42" loext:marker-style-name="T85"><text:span text:style-name="T161">3 </text:span><text:span text:style-name="T86">個重複 </text:span><text:span text:style-name="T161">ACK</text:span></text:p>
          </table:table-cell>
          <table:table-cell table:style-name="表格17.A3" office:value-type="string">
            <text:p text:style-name="P42" loext:marker-style-name="T85"><text:span text:style-name="T86">單一封包遺失</text:span><text:span text:style-name="T85"/></text:p>
          </table:table-cell>
          <table:table-cell table:style-name="表格17.A3" office:value-type="string">
            <text:p text:style-name="P42" loext:marker-style-name="T85"><text:span text:style-name="T161">= cwnd / 2</text:span><text:span text:style-name="T85"/></text:p>
          </table:table-cell>
          <table:table-cell table:style-name="表格17.A3" office:value-type="string">
            <text:p text:style-name="P42" loext:marker-style-name="T34"><text:span text:style-name="T42">= ssthresh</text:span><text:span text:style-name="T35">（減半）</text:span></text:p>
          </table:table-cell>
          <table:table-cell table:style-name="表格17.A3" office:value-type="string">
            <text:p text:style-name="P42" loext:marker-style-name="T85"><text:span text:style-name="T86">續 </text:span><text:span text:style-name="T161">Congestion Avoidance</text:span></text:p>
          </table:table-cell>
        </table:table-row>
      </table:table>
      <text:h text:style-name="P12" text:outline-level="3"><text:span text:style-name="T225">▍</text:span><text:span text:style-name="T226"> ⑤ BGP </text:span><text:span text:style-name="T227">選路九步（前面贏就停 </text:span><text:span text:style-name="T226">· </text:span><text:span text:style-name="T227">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39" loext:marker-style-name="T71"><text:span text:style-name="T72">順序</text:span><text:span text:style-name="T71"/></text:p>
            </table:table-cell>
            <table:table-cell table:style-name="表格18.A1" office:value-type="string">
              <text:p text:style-name="P39" loext:marker-style-name="T71"><text:span text:style-name="T72">屬性</text:span><text:span text:style-name="T71"/></text:p>
            </table:table-cell>
            <table:table-cell table:style-name="表格18.A1" office:value-type="string">
              <text:p text:style-name="P39" loext:marker-style-name="T71"><text:span text:style-name="T72">規則／備註</text:span><text:span text:style-name="T71"/>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41" loext:marker-style-name="T85"><text:span text:style-name="T161">①</text:span><text:span text:style-name="T85"/></text:p>
          </table:table-cell>
          <table:table-cell table:style-name="表格18.A2" office:value-type="string">
            <text:p text:style-name="P42" loext:marker-style-name="T85"><text:span text:style-name="T161">Weight</text:span><text:span text:style-name="T85"/></text:p>
          </table:table-cell>
          <table:table-cell table:style-name="表格18.A2" office:value-type="string">
            <text:p text:style-name="P42" loext:marker-style-name="T85"><text:span text:style-name="T86">數值越高越優先 ⚠️ </text:span><text:span text:style-name="T161">Cisco </text:span><text:span text:style-name="T86">私有，他牌無此屬性</text:span></text:p>
          </table:table-cell>
        </table:table-row>
        <table:table-row table:style-name="表格18.1">
          <table:table-cell table:style-name="表格18.A3" office:value-type="string">
            <text:p text:style-name="P41" loext:marker-style-name="T85"><text:span text:style-name="T161">②</text:span><text:span text:style-name="T85"/></text:p>
          </table:table-cell>
          <table:table-cell table:style-name="表格18.A3" office:value-type="string">
            <text:p text:style-name="P42" loext:marker-style-name="T34"><text:span text:style-name="T42">Local Preference</text:span><text:span text:style-name="T34"/></text:p>
          </table:table-cell>
          <table:table-cell table:style-name="表格18.A3" office:value-type="string">
            <text:p text:style-name="P42" loext:marker-style-name="T34"><text:span text:style-name="T35">數值越高越優先 ✅ 最重要的「通用」屬性</text:span><text:span text:style-name="T34"/></text:p>
          </table:table-cell>
        </table:table-row>
        <table:table-row table:style-name="表格18.1">
          <table:table-cell table:style-name="表格18.A2" office:value-type="string">
            <text:p text:style-name="P41" loext:marker-style-name="T85"><text:span text:style-name="T161">③</text:span><text:span text:style-name="T85"/></text:p>
          </table:table-cell>
          <table:table-cell table:style-name="表格18.A2" office:value-type="string">
            <text:p text:style-name="P42" loext:marker-style-name="T85"><text:span text:style-name="T86">本地產生</text:span><text:span text:style-name="T85"/></text:p>
          </table:table-cell>
          <table:table-cell table:style-name="表格18.A2" office:value-type="string">
            <text:p text:style-name="P42" loext:marker-style-name="T85"><text:span text:style-name="T161">network / aggregate </text:span><text:span text:style-name="T86">產生的路由優先</text:span></text:p>
          </table:table-cell>
        </table:table-row>
        <table:table-row table:style-name="表格18.1">
          <table:table-cell table:style-name="表格18.A3" office:value-type="string">
            <text:p text:style-name="P41" loext:marker-style-name="T85"><text:span text:style-name="T161">④</text:span><text:span text:style-name="T85"/></text:p>
          </table:table-cell>
          <table:table-cell table:style-name="表格18.A3" office:value-type="string">
            <text:p text:style-name="P42" loext:marker-style-name="T85"><text:span text:style-name="T161">AS-PATH</text:span><text:span text:style-name="T85"/></text:p>
          </table:table-cell>
          <table:table-cell table:style-name="表格18.A3" office:value-type="string">
            <text:p text:style-name="P42" loext:marker-style-name="T85"><text:span text:style-name="T86">路徑越短（經過 </text:span><text:span text:style-name="T161">AS </text:span><text:span text:style-name="T86">越少）越優先</text:span></text:p>
          </table:table-cell>
        </table:table-row>
        <table:table-row table:style-name="表格18.1">
          <table:table-cell table:style-name="表格18.A2" office:value-type="string">
            <text:p text:style-name="P41" loext:marker-style-name="T85"><text:span text:style-name="T161">⑤</text:span><text:span text:style-name="T85"/></text:p>
          </table:table-cell>
          <table:table-cell table:style-name="表格18.A2" office:value-type="string">
            <text:p text:style-name="P42" loext:marker-style-name="T85"><text:span text:style-name="T161">Origin</text:span><text:span text:style-name="T85"/></text:p>
          </table:table-cell>
          <table:table-cell table:style-name="表格18.A2" office:value-type="string">
            <text:p text:style-name="P42" loext:marker-style-name="T85"><text:span text:style-name="T161">IGP &gt; EGP &gt; Incomplete</text:span><text:span text:style-name="T85"/></text:p>
          </table:table-cell>
        </table:table-row>
        <table:table-row table:style-name="表格18.1">
          <table:table-cell table:style-name="表格18.A3" office:value-type="string">
            <text:p text:style-name="P41" loext:marker-style-name="T85"><text:span text:style-name="T161">⑥</text:span><text:span text:style-name="T85"/></text:p>
          </table:table-cell>
          <table:table-cell table:style-name="表格18.A3" office:value-type="string">
            <text:p text:style-name="P42" loext:marker-style-name="T85"><text:span text:style-name="T161">MED</text:span><text:span text:style-name="T85"/></text:p>
          </table:table-cell>
          <table:table-cell table:style-name="表格18.A3" office:value-type="string">
            <text:p text:style-name="P42" loext:marker-style-name="T85"><text:span text:style-name="T86">數值越小越優先（只比同一 </text:span><text:span text:style-name="T161">AS </text:span><text:span text:style-name="T86">來的路由）</text:span></text:p>
          </table:table-cell>
        </table:table-row>
        <table:table-row table:style-name="表格18.1">
          <table:table-cell table:style-name="表格18.A2" office:value-type="string">
            <text:p text:style-name="P41" loext:marker-style-name="T85"><text:span text:style-name="T161">⑦</text:span><text:span text:style-name="T85"/></text:p>
          </table:table-cell>
          <table:table-cell table:style-name="表格18.A2" office:value-type="string">
            <text:p text:style-name="P42" loext:marker-style-name="T85"><text:span text:style-name="T161">eBGP vs iBGP</text:span><text:span text:style-name="T85"/></text:p>
          </table:table-cell>
          <table:table-cell table:style-name="表格18.A2" office:value-type="string">
            <text:p text:style-name="P42" loext:marker-style-name="T85"><text:span text:style-name="T161">eBGP </text:span><text:span text:style-name="T86">優先於 </text:span><text:span text:style-name="T161">iBGP</text:span></text:p>
          </table:table-cell>
        </table:table-row>
        <table:table-row table:style-name="表格18.1">
          <table:table-cell table:style-name="表格18.A3" office:value-type="string">
            <text:p text:style-name="P41" loext:marker-style-name="T85"><text:span text:style-name="T161">⑧</text:span><text:span text:style-name="T85"/></text:p>
          </table:table-cell>
          <table:table-cell table:style-name="表格18.A3" office:value-type="string">
            <text:p text:style-name="P42" loext:marker-style-name="T85"><text:span text:style-name="T161">IGP cost</text:span><text:span text:style-name="T85"/></text:p>
          </table:table-cell>
          <table:table-cell table:style-name="表格18.A3" office:value-type="string">
            <text:p text:style-name="P42" loext:marker-style-name="T85"><text:span text:style-name="T86">到 </text:span><text:span text:style-name="T161">next-hop </text:span><text:span text:style-name="T86">距離越小越優先</text:span></text:p>
          </table:table-cell>
        </table:table-row>
        <table:table-row table:style-name="表格18.1">
          <table:table-cell table:style-name="表格18.A2" office:value-type="string">
            <text:p text:style-name="P41" loext:marker-style-name="T85"><text:span text:style-name="T161">⑨</text:span><text:span text:style-name="T85"/></text:p>
          </table:table-cell>
          <table:table-cell table:style-name="表格18.A2" office:value-type="string">
            <text:p text:style-name="P42" loext:marker-style-name="T85"><text:span text:style-name="T161">Router ID</text:span><text:span text:style-name="T85"/></text:p>
          </table:table-cell>
          <table:table-cell table:style-name="表格18.A2" office:value-type="string">
            <text:p text:style-name="P42" loext:marker-style-name="T85"><text:span text:style-name="T161">Router ID </text:span><text:span text:style-name="T86">最小者優先（最後決勝點）</text:span></text:p>
          </table:table-cell>
        </table:table-row>
      </table:table>
      <text:h text:style-name="P12" text:outline-level="3"><text:span text:style-name="T225">▍</text:span><text:span text:style-name="T226"> ⑥ OSPF </text:span><text:span text:style-name="T227">四種 </text:span><text:span text:style-name="T226">Router</text:span><text:span text:style-name="T227">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4" loext:marker-style-name="T71"><text:span text:style-name="T72">類型</text:span><text:span text:style-name="T71"/></text:p>
            </table:table-cell>
            <table:table-cell table:style-name="表格19.A1" office:value-type="string">
              <text:p text:style-name="P4" loext:marker-style-name="T71"><text:span text:style-name="T72">本質</text:span><text:span text:style-name="T71"/></text:p>
            </table:table-cell>
            <table:table-cell table:style-name="表格19.A1" office:value-type="string">
              <text:p text:style-name="P4" loext:marker-style-name="T71"><text:span text:style-name="T72">核心記憶點</text:span><text:span text:style-name="T71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42" loext:marker-style-name="T85"><text:span text:style-name="T161">Internal</text:span><text:span text:style-name="T85"/></text:p>
          </table:table-cell>
          <table:table-cell table:style-name="表格19.A2" office:value-type="string">
            <text:p text:style-name="P42" loext:marker-style-name="T85"><text:span text:style-name="T86">不出 </text:span><text:span text:style-name="T161">Area</text:span></text:p>
          </table:table-cell>
          <table:table-cell table:style-name="表格19.A2" office:value-type="string">
            <text:p text:style-name="P42" loext:marker-style-name="T85"><text:span text:style-name="T86">只負責自己這一區，對外一無所知</text:span><text:span text:style-name="T85"/></text:p>
          </table:table-cell>
        </table:table-row>
        <table:table-row table:style-name="表格19.1">
          <table:table-cell table:style-name="表格19.A3" office:value-type="string">
            <text:p text:style-name="P42" loext:marker-style-name="T85"><text:span text:style-name="T161">Backbone</text:span><text:span text:style-name="T85"/></text:p>
          </table:table-cell>
          <table:table-cell table:style-name="表格19.A3" office:value-type="string">
            <text:p text:style-name="P42" loext:marker-style-name="T85"><text:span text:style-name="T86">在 </text:span><text:span text:style-name="T161">Area 0</text:span></text:p>
          </table:table-cell>
          <table:table-cell table:style-name="表格19.A3" office:value-type="string">
            <text:p text:style-name="P42" loext:marker-style-name="T85"><text:span text:style-name="T86">城市主幹道節點，跨區流量必經</text:span><text:span text:style-name="T85"/></text:p>
          </table:table-cell>
        </table:table-row>
        <table:table-row table:style-name="表格19.1">
          <table:table-cell table:style-name="表格19.A2" office:value-type="string">
            <text:p text:style-name="P42" loext:marker-style-name="T85"><text:span text:style-name="T161">ABR</text:span><text:span text:style-name="T85"/></text:p>
          </table:table-cell>
          <table:table-cell table:style-name="表格19.A2" office:value-type="string">
            <text:p text:style-name="P42" loext:marker-style-name="T85"><text:span text:style-name="T86">跨 </text:span><text:span text:style-name="T161">Area </text:span><text:span text:style-name="T86">橋樑</text:span></text:p>
          </table:table-cell>
          <table:table-cell table:style-name="表格19.A2" office:value-type="string">
            <text:p text:style-name="P42" loext:marker-style-name="T85"><text:span text:style-name="T86">一端連 </text:span><text:span text:style-name="T161">Area 0</text:span><text:span text:style-name="T86">、一端連其他 </text:span><text:span text:style-name="T161">Area</text:span><text:span text:style-name="T86">，區域間唯一合法通道</text:span>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42" loext:marker-style-name="T85"><text:span text:style-name="T161">ASBR</text:span><text:span text:style-name="T85"/></text:p>
          </table:table-cell>
          <table:table-cell table:style-name="表格19.A3" office:value-type="string">
            <text:p text:style-name="P42" loext:marker-style-name="T85"><text:span text:style-name="T86">跨 </text:span><text:span text:style-name="T161">AS </text:span><text:span text:style-name="T86">入口</text:span></text:p>
          </table:table-cell>
          <table:table-cell table:style-name="表格19.A3" office:value-type="string">
            <text:p text:style-name="P42" loext:marker-style-name="T85"><text:span text:style-name="T86">把外部路由（</text:span><text:span text:style-name="T161">BGP </text:span><text:span text:style-name="T86">等）帶進 </text:span><text:span text:style-name="T161">OSPF</text:span><text:span text:style-name="T86">，是對外的大門</text:span></text:p>
          </table:table-cell>
        </table:table-row>
      </table:table>
      <text:h text:style-name="P12" text:outline-level="3"><text:span text:style-name="T225">▍</text:span><text:span text:style-name="T226"> ⑦ </text:span><text:span text:style-name="T227">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39" loext:marker-style-name="T71"><text:span text:style-name="T72">能力</text:span><text:span text:style-name="T71"/></text:p>
            </table:table-cell>
            <table:table-cell table:style-name="表格20.A1" office:value-type="string">
              <text:p text:style-name="P39" loext:marker-style-name="T71"><text:span text:style-name="T81">FW</text:span><text:span text:style-name="T71"/></text:p>
            </table:table-cell>
            <table:table-cell table:style-name="表格20.A1" office:value-type="string">
              <text:p text:style-name="P39" loext:marker-style-name="T71"><text:span text:style-name="T81">WAF</text:span><text:span text:style-name="T71"/></text:p>
            </table:table-cell>
            <table:table-cell table:style-name="表格20.A1" office:value-type="string">
              <text:p text:style-name="P39" loext:marker-style-name="T71"><text:span text:style-name="T81">NGFW</text:span><text:span text:style-name="T71"/>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42" loext:marker-style-name="T85"><text:span text:style-name="T161">IP / Port </text:span><text:span text:style-name="T86">過濾</text:span></text:p>
          </table:table-cell>
          <table:table-cell table:style-name="表格20.A2" office:value-type="string">
            <text:p text:style-name="P41" loext:marker-style-name="T266"><text:span text:style-name="T273">○</text:span><text:span text:style-name="T266"/></text:p>
          </table:table-cell>
          <table:table-cell table:style-name="表格20.A2" office:value-type="string">
            <text:p text:style-name="P41" loext:marker-style-name="T266"><text:span text:style-name="T273">○</text:span><text:span text:style-name="T266"/></text:p>
          </table:table-cell>
          <table:table-cell table:style-name="表格20.A2" office:value-type="string">
            <text:p text:style-name="P41" loext:marker-style-name="T266"><text:span text:style-name="T273">○</text:span><text:span text:style-name="T266"/></text:p>
          </table:table-cell>
        </table:table-row>
        <table:table-row table:style-name="表格20.1">
          <table:table-cell table:style-name="表格20.A3" office:value-type="string">
            <text:p text:style-name="P42" loext:marker-style-name="T85"><text:span text:style-name="T161">HTTP </text:span><text:span text:style-name="T86">內容檢查</text:span></text:p>
          </table:table-cell>
          <table:table-cell table:style-name="表格20.A3" office:value-type="string">
            <text:p text:style-name="P41" loext:marker-style-name="T256"><text:span text:style-name="T262">✗</text:span><text:span text:style-name="T256"/></text:p>
          </table:table-cell>
          <table:table-cell table:style-name="表格20.A3" office:value-type="string">
            <text:p text:style-name="P41" loext:marker-style-name="T266"><text:span text:style-name="T273">○</text:span><text:span text:style-name="T266"/></text:p>
          </table:table-cell>
          <table:table-cell table:style-name="表格20.A3" office:value-type="string">
            <text:p text:style-name="P41" loext:marker-style-name="T266"><text:span text:style-name="T273">○</text:span><text:span text:style-name="T266"/></text:p>
          </table:table-cell>
        </table:table-row>
        <table:table-row table:style-name="表格20.1">
          <table:table-cell table:style-name="表格20.A2" office:value-type="string">
            <text:p text:style-name="P42" loext:marker-style-name="T85"><text:span text:style-name="T161">DPI </text:span><text:span text:style-name="T86">深度檢查</text:span></text:p>
          </table:table-cell>
          <table:table-cell table:style-name="表格20.A2" office:value-type="string">
            <text:p text:style-name="P41" loext:marker-style-name="T256"><text:span text:style-name="T262">✗</text:span><text:span text:style-name="T256"/></text:p>
          </table:table-cell>
          <table:table-cell table:style-name="表格20.A2" office:value-type="string">
            <text:p text:style-name="P41" loext:marker-style-name="T256"><text:span text:style-name="T262">✗</text:span><text:span text:style-name="T256"/></text:p>
          </table:table-cell>
          <table:table-cell table:style-name="表格20.A2" office:value-type="string">
            <text:p text:style-name="P41" loext:marker-style-name="T266"><text:span text:style-name="T273">○</text:span><text:span text:style-name="T266"/></text:p>
          </table:table-cell>
        </table:table-row>
        <table:table-row table:style-name="表格20.1">
          <table:table-cell table:style-name="表格20.A3" office:value-type="string">
            <text:p text:style-name="P42" loext:marker-style-name="T85"><text:span text:style-name="T161">App </text:span><text:span text:style-name="T86">識別 </text:span><text:span text:style-name="T161">/ IPS</text:span></text:p>
          </table:table-cell>
          <table:table-cell table:style-name="表格20.A3" office:value-type="string">
            <text:p text:style-name="P41" loext:marker-style-name="T256"><text:span text:style-name="T262">✗</text:span><text:span text:style-name="T256"/></text:p>
          </table:table-cell>
          <table:table-cell table:style-name="表格20.A3" office:value-type="string">
            <text:p text:style-name="P41" loext:marker-style-name="T256"><text:span text:style-name="T262">✗</text:span><text:span text:style-name="T256"/></text:p>
          </table:table-cell>
          <table:table-cell table:style-name="表格20.A3" office:value-type="string">
            <text:p text:style-name="P41" loext:marker-style-name="T266"><text:span text:style-name="T273">○</text:span><text:span text:style-name="T266"/></text:p>
          </table:table-cell>
        </table:table-row>
        <table:table-row table:style-name="表格20.1">
          <table:table-cell table:style-name="表格20.A2" office:value-type="string">
            <text:p text:style-name="P42" loext:marker-style-name="T85"><text:span text:style-name="T161">OSI </text:span><text:span text:style-name="T86">層</text:span></text:p>
          </table:table-cell>
          <table:table-cell table:style-name="表格20.A2" office:value-type="string">
            <text:p text:style-name="P41" loext:marker-style-name="T85"><text:span text:style-name="T161">L3 / L4</text:span><text:span text:style-name="T85"/></text:p>
          </table:table-cell>
          <table:table-cell table:style-name="表格20.A2" office:value-type="string">
            <text:p text:style-name="P41" loext:marker-style-name="T34"><text:span text:style-name="T42">L7</text:span><text:span text:style-name="T34"/></text:p>
          </table:table-cell>
          <table:table-cell table:style-name="表格20.A2" office:value-type="string">
            <text:p text:style-name="P41" loext:marker-style-name="T85"><text:span text:style-name="T161">L3–L7</text:span><text:span text:style-name="T85"/></text:p>
          </table:table-cell>
        </table:table-row>
      </table:table>
      <text:h text:style-name="P12" text:outline-level="3"><text:span text:style-name="T225">▍</text:span><text:span text:style-name="T226"> ⑧ </text:span><text:span text:style-name="T227">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4" loext:marker-style-name="T71"><text:span text:style-name="T72">工具</text:span><text:span text:style-name="T71"/></text:p>
            </table:table-cell>
            <table:table-cell table:style-name="表格21.A1" office:value-type="string">
              <text:p text:style-name="P4" loext:marker-style-name="T71"><text:span text:style-name="T72">角色</text:span><text:span text:style-name="T71"/></text:p>
            </table:table-cell>
            <table:table-cell table:style-name="表格21.A1" office:value-type="string">
              <text:p text:style-name="P4" loext:marker-style-name="T71"><text:span text:style-name="T72">關鍵差異</text:span><text:span text:style-name="T71"/>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42" loext:marker-style-name="T85"><text:span text:style-name="T161">Firewall</text:span><text:span text:style-name="T85"/></text:p>
          </table:table-cell>
          <table:table-cell table:style-name="表格21.A2" office:value-type="string">
            <text:p text:style-name="P42" loext:marker-style-name="T85"><text:span text:style-name="T86">大門警衛</text:span><text:span text:style-name="T85"/></text:p>
          </table:table-cell>
          <table:table-cell table:style-name="表格21.A2" office:value-type="string">
            <text:p text:style-name="P42" loext:marker-style-name="T85"><text:span text:style-name="T86">依 </text:span><text:span text:style-name="T161">IP / Port / </text:span><text:span text:style-name="T86">協定過濾，不做行為分析</text:span></text:p>
          </table:table-cell>
        </table:table-row>
        <table:table-row table:style-name="表格21.1">
          <table:table-cell table:style-name="表格21.A3" office:value-type="string">
            <text:p text:style-name="P42" loext:marker-style-name="T85"><text:span text:style-name="T161">IDS</text:span><text:span text:style-name="T85"/></text:p>
          </table:table-cell>
          <table:table-cell table:style-name="表格21.A3" office:value-type="string">
            <text:p text:style-name="P42" loext:marker-style-name="T85"><text:span text:style-name="T86">監視器（只看）</text:span><text:span text:style-name="T85"/></text:p>
          </table:table-cell>
          <table:table-cell table:style-name="表格21.A3" office:value-type="string">
            <text:p text:style-name="P42" loext:marker-style-name="T85"><text:span text:style-name="T86">偵測異常 → 只發警報，不阻擋</text:span><text:span text:style-name="T85"/></text:p>
          </table:table-cell>
        </table:table-row>
        <table:table-row table:style-name="表格21.1">
          <table:table-cell table:style-name="表格21.A2" office:value-type="string">
            <text:p text:style-name="P42" loext:marker-style-name="T85"><text:span text:style-name="T161">IPS</text:span><text:span text:style-name="T85"/></text:p>
          </table:table-cell>
          <table:table-cell table:style-name="表格21.A2" office:value-type="string">
            <text:p text:style-name="P42" loext:marker-style-name="T85"><text:span text:style-name="T86">監視器＋警衛</text:span><text:span text:style-name="T85"/></text:p>
          </table:table-cell>
          <table:table-cell table:style-name="表格21.A2" office:value-type="string">
            <text:p text:style-name="P42" loext:marker-style-name="T85"><text:span text:style-name="T86">偵測異常 → 自動阻擋（</text:span><text:span text:style-name="T161">IDS </text:span><text:span text:style-name="T86">全功能＋阻擋）</text:span></text:p>
          </table:table-cell>
        </table:table-row>
        <table:table-row table:style-name="表格21.1">
          <table:table-cell table:style-name="表格21.A3" office:value-type="string">
            <text:p text:style-name="P42" loext:marker-style-name="T85"><text:span text:style-name="T161">HIDS</text:span><text:span text:style-name="T85"/></text:p>
          </table:table-cell>
          <table:table-cell table:style-name="表格21.A3" office:value-type="string">
            <text:p text:style-name="P42" loext:marker-style-name="T85"><text:span text:style-name="T86">主機型</text:span><text:span text:style-name="T85"/></text:p>
          </table:table-cell>
          <table:table-cell table:style-name="表格21.A3" office:value-type="string">
            <text:p text:style-name="P42" loext:marker-style-name="T85"><text:span text:style-name="T86">看主機 </text:span><text:span text:style-name="T161">Log</text:span><text:span text:style-name="T86">／系統行為</text:span></text:p>
          </table:table-cell>
        </table:table-row>
        <table:table-row table:style-name="表格21.1">
          <table:table-cell table:style-name="表格21.A2" office:value-type="string">
            <text:p text:style-name="P42" loext:marker-style-name="T85"><text:span text:style-name="T161">NIDS</text:span><text:span text:style-name="T85"/></text:p>
          </table:table-cell>
          <table:table-cell table:style-name="表格21.A2" office:value-type="string">
            <text:p text:style-name="P42" loext:marker-style-name="T85"><text:span text:style-name="T86">網路型</text:span><text:span text:style-name="T85"/></text:p>
          </table:table-cell>
          <table:table-cell table:style-name="表格21.A2" office:value-type="string">
            <text:p text:style-name="P42" loext:marker-style-name="T85"><text:span text:style-name="T86">看網路封包／流量</text:span><text:span text:style-name="T85"/></text:p>
          </table:table-cell>
        </table:table-row>
        <table:table-row table:style-name="表格21.1">
          <table:table-cell table:style-name="表格21.A3" office:value-type="string">
            <text:p text:style-name="P42" loext:marker-style-name="T85"><text:span text:style-name="T161">SNMP</text:span><text:span text:style-name="T85"/></text:p>
          </table:table-cell>
          <table:table-cell table:style-name="表格21.A3" office:value-type="string">
            <text:p text:style-name="P42" loext:marker-style-name="T85"><text:span text:style-name="T86">管理室</text:span><text:span text:style-name="T85"/></text:p>
          </table:table-cell>
          <table:table-cell table:style-name="表格21.A3" office:value-type="string">
            <text:p text:style-name="P42" loext:marker-style-name="T85"><text:span text:style-name="T86">管理設備狀態（應用層／</text:span><text:span text:style-name="T161">UDP</text:span><text:span text:style-name="T86">）</text:span></text:p>
          </table:table-cell>
        </table:table-row>
        <table:table-row table:style-name="表格21.1">
          <table:table-cell table:style-name="表格21.A2" office:value-type="string">
            <text:p text:style-name="P42" loext:marker-style-name="T85"><text:span text:style-name="T161">ICMP</text:span><text:span text:style-name="T85"/></text:p>
          </table:table-cell>
          <table:table-cell table:style-name="表格21.A2" office:value-type="string">
            <text:p text:style-name="P42" loext:marker-style-name="T85"><text:span text:style-name="T86">網路測試員</text:span><text:span text:style-name="T85"/></text:p>
          </table:table-cell>
          <table:table-cell table:style-name="表格21.A2" office:value-type="string">
            <text:p text:style-name="P42" loext:marker-style-name="T85"><text:span text:style-name="T86">診斷網路連線（網路層／</text:span><text:span text:style-name="T161">Ping</text:span><text:span text:style-name="T86">）</text:span></text:p>
          </table:table-cell>
        </table:table-row>
      </table:table>
      <text:h text:style-name="P12" text:outline-level="3"><text:span text:style-name="T225">▍</text:span><text:span text:style-name="T226"> ⑨ IOC </text:span><text:span text:style-name="T227">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39" loext:marker-style-name="T71"><text:span text:style-name="T72">口訣</text:span><text:span text:style-name="T71"/></text:p>
            </table:table-cell>
            <table:table-cell table:style-name="表格22.A1" office:value-type="string">
              <text:p text:style-name="P39" loext:marker-style-name="T71"><text:span text:style-name="T81">IOC </text:span><text:span text:style-name="T72">類型</text:span></text:p>
            </table:table-cell>
            <table:table-cell table:style-name="表格22.A1" office:value-type="string">
              <text:p text:style-name="P39" loext:marker-style-name="T71"><text:span text:style-name="T72">白話</text:span><text:span text:style-name="T71"/></text:p>
            </table:table-cell>
            <table:table-cell table:style-name="表格22.A1" office:value-type="string">
              <text:p text:style-name="P39" loext:marker-style-name="T71"><text:span text:style-name="T72">對應防禦</text:span><text:span text:style-name="T71"/>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41" loext:marker-style-name="T279"><text:span text:style-name="T280">網</text:span><text:span text:style-name="T279"/></text:p>
          </table:table-cell>
          <table:table-cell table:style-name="表格22.A2" office:value-type="string">
            <text:p text:style-name="P42" loext:marker-style-name="T85"><text:span text:style-name="T86">惡意 </text:span><text:span text:style-name="T161">Domain</text:span></text:p>
          </table:table-cell>
          <table:table-cell table:style-name="表格22.A2" office:value-type="string">
            <text:p text:style-name="P42" loext:marker-style-name="T85"><text:span text:style-name="T86">釣魚網站網址</text:span><text:span text:style-name="T85"/></text:p>
          </table:table-cell>
          <table:table-cell table:style-name="表格22.A2" office:value-type="string">
            <text:p text:style-name="P42" loext:marker-style-name="T85"><text:span text:style-name="T161">DNS </text:span><text:span text:style-name="T86">封鎖網域</text:span></text:p>
          </table:table-cell>
        </table:table-row>
        <table:table-row table:style-name="表格22.1">
          <table:table-cell table:style-name="表格22.A3" office:value-type="string">
            <text:p text:style-name="P41" loext:marker-style-name="T279"><text:span text:style-name="T280">檔</text:span><text:span text:style-name="T279"/></text:p>
          </table:table-cell>
          <table:table-cell table:style-name="表格22.A3" office:value-type="string">
            <text:p text:style-name="P42" loext:marker-style-name="T85"><text:span text:style-name="T86">惡意 </text:span><text:span text:style-name="T161">Hash</text:span></text:p>
          </table:table-cell>
          <table:table-cell table:style-name="表格22.A3" office:value-type="string">
            <text:p text:style-name="P42" loext:marker-style-name="T85"><text:span text:style-name="T86">惡意程式特徵碼（改名也認得）</text:span><text:span text:style-name="T85"/></text:p>
          </table:table-cell>
          <table:table-cell table:style-name="表格22.A3" office:value-type="string">
            <text:p text:style-name="P42" loext:marker-style-name="T85"><text:span text:style-name="T86">防毒比對特徵</text:span><text:span text:style-name="T85"/></text:p>
          </table:table-cell>
        </table:table-row>
        <table:table-row table:style-name="表格22.1">
          <table:table-cell table:style-name="表格22.A2" office:value-type="string">
            <text:p text:style-name="P41" loext:marker-style-name="T279"><text:span text:style-name="T280">連</text:span><text:span text:style-name="T279"/></text:p>
          </table:table-cell>
          <table:table-cell table:style-name="表格22.A2" office:value-type="string">
            <text:p text:style-name="P42" loext:marker-style-name="T85"><text:span text:style-name="T86">惡意 </text:span><text:span text:style-name="T161">IP</text:span></text:p>
          </table:table-cell>
          <table:table-cell table:style-name="表格22.A2" office:value-type="string">
            <text:p text:style-name="P42" loext:marker-style-name="T85"><text:span text:style-name="T86">感染後對外異常連線目標</text:span><text:span text:style-name="T85"/></text:p>
          </table:table-cell>
          <table:table-cell table:style-name="表格22.A2" office:value-type="string">
            <text:p text:style-name="P42" loext:marker-style-name="T85"><text:span text:style-name="T161">FW / NGFW </text:span><text:span text:style-name="T86">封鎖</text:span></text:p>
          </table:table-cell>
        </table:table-row>
        <table:table-row table:style-name="表格22.1">
          <table:table-cell table:style-name="表格22.A3" office:value-type="string">
            <text:p text:style-name="P41" loext:marker-style-name="T279"><text:span text:style-name="T280">控</text:span><text:span text:style-name="T279"/></text:p>
          </table:table-cell>
          <table:table-cell table:style-name="表格22.A3" office:value-type="string">
            <text:p text:style-name="P42" loext:marker-style-name="T85"><text:span text:style-name="T161">C2 Server</text:span><text:span text:style-name="T85"/></text:p>
          </table:table-cell>
          <table:table-cell table:style-name="表格22.A3" office:value-type="string">
            <text:p text:style-name="P42" loext:marker-style-name="T85"><text:span text:style-name="T86">駭客遠端操控總部</text:span><text:span text:style-name="T85"/></text:p>
          </table:table-cell>
          <table:table-cell table:style-name="表格22.A3" office:value-type="string">
            <text:p text:style-name="P42" loext:marker-style-name="T85"><text:span text:style-name="T161">SIEM / IDS </text:span><text:span text:style-name="T86">偵測</text:span>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7"><text:span text:style-name="T243">必記：</text:span><text:span text:style-name="T177">IOC </text:span><text:span text:style-name="T111">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12" text:outline-level="3"><text:span text:style-name="T225">▍</text:span><text:span text:style-name="T226"> ⑩ DNS </text:span><text:span text:style-name="T227">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4" loext:marker-style-name="T75"><text:span text:style-name="T76">項目</text:span><text:span text:style-name="T75"/></text:p>
            </table:table-cell>
            <table:table-cell table:style-name="表格23.A1" office:value-type="string">
              <text:p text:style-name="P4" loext:marker-style-name="T75"><text:span text:style-name="T82">Recursive </text:span><text:span text:style-name="T76">遞迴</text:span></text:p>
            </table:table-cell>
            <table:table-cell table:style-name="表格23.A1" office:value-type="string">
              <text:p text:style-name="P4" loext:marker-style-name="T75"><text:span text:style-name="T82">Iterative </text:span><text:span text:style-name="T76">反覆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42" loext:marker-style-name="T144"><text:span text:style-name="T145">口訣</text:span><text:span text:style-name="T144"/></text:p>
          </table:table-cell>
          <table:table-cell table:style-name="表格23.A2" office:value-type="string">
            <text:p text:style-name="P42" loext:marker-style-name="T235"><text:span text:style-name="T236">代查到底</text:span><text:span text:style-name="T235"/></text:p>
          </table:table-cell>
          <table:table-cell table:style-name="表格23.A2" office:value-type="string">
            <text:p text:style-name="P42" loext:marker-style-name="T36"><text:span text:style-name="T37">逐層詢問</text:span><text:span text:style-name="T36"/></text:p>
          </table:table-cell>
        </table:table-row>
        <table:table-row table:style-name="表格23.1">
          <table:table-cell table:style-name="表格23.A3" office:value-type="string">
            <text:p text:style-name="P42" loext:marker-style-name="T144"><text:span text:style-name="T145">誰去問</text:span><text:span text:style-name="T144"/></text:p>
          </table:table-cell>
          <table:table-cell table:style-name="表格23.A3" office:value-type="string">
            <text:p text:style-name="P42" loext:marker-style-name="T144"><text:span text:style-name="T209">DNS </text:span><text:span text:style-name="T145">伺服器代你問完</text:span></text:p>
          </table:table-cell>
          <table:table-cell table:style-name="表格23.A3" office:value-type="string">
            <text:p text:style-name="P42" loext:marker-style-name="T144"><text:span text:style-name="T145">你自己逐層查詢</text:span><text:span text:style-name="T144"/></text:p>
          </table:table-cell>
        </table:table-row>
        <table:table-row table:style-name="表格23.1">
          <table:table-cell table:style-name="表格23.A2" office:value-type="string">
            <text:p text:style-name="P42" loext:marker-style-name="T144"><text:span text:style-name="T145">問幾次</text:span><text:span text:style-name="T144"/></text:p>
          </table:table-cell>
          <table:table-cell table:style-name="表格23.A2" office:value-type="string">
            <text:p text:style-name="P42" loext:marker-style-name="T144"><text:span text:style-name="T145">只問 </text:span><text:span text:style-name="T209">1 </text:span><text:span text:style-name="T145">次</text:span></text:p>
          </table:table-cell>
          <table:table-cell table:style-name="表格23.A2" office:value-type="string">
            <text:p text:style-name="P42" loext:marker-style-name="T144"><text:span text:style-name="T145">每層各問一次，共多次</text:span><text:span text:style-name="T144"/></text:p>
          </table:table-cell>
        </table:table-row>
        <table:table-row table:style-name="表格23.1">
          <table:table-cell table:style-name="表格23.A3" office:value-type="string">
            <text:p text:style-name="P42" loext:marker-style-name="T144"><text:span text:style-name="T145">常見場合</text:span><text:span text:style-name="T144"/></text:p>
          </table:table-cell>
          <table:table-cell table:style-name="表格23.A3" office:value-type="string">
            <text:p text:style-name="P42" loext:marker-style-name="T144"><text:span text:style-name="T145">一般使用者 → </text:span><text:span text:style-name="T209">Local DNS</text:span></text:p>
          </table:table-cell>
          <table:table-cell table:style-name="表格23.A3" office:value-type="string">
            <text:p text:style-name="P42" loext:marker-style-name="T144"><text:span text:style-name="T209">DNS </text:span><text:span text:style-name="T145">伺服器之間互查</text:span></text:p>
          </table:table-cell>
        </table:table-row>
      </table:table>
      <text:h text:style-name="P12" text:outline-level="3"><text:soft-page-break/><text:span text:style-name="T225">▍</text:span><text:span text:style-name="T226"> ⑪ </text:span><text:span text:style-name="T227">企業資安關鍵對：</text:span><text:span text:style-name="T226">RTO/RPO</text:span><text:span text:style-name="T227">、</text:span><text:span text:style-name="T226">EDR/MDR</text:span><text:span text:style-name="T227">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4" loext:marker-style-name="T71"><text:span text:style-name="T72">指標 </text:span><text:span text:style-name="T81">/ </text:span><text:span text:style-name="T72">名詞</text:span></text:p>
            </table:table-cell>
            <table:table-cell table:style-name="表格24.A1" office:value-type="string">
              <text:p text:style-name="P4" loext:marker-style-name="T71"><text:span text:style-name="T72">意義</text:span><text:span text:style-name="T71"/></text:p>
            </table:table-cell>
            <table:table-cell table:style-name="表格24.A1" office:value-type="string">
              <text:p text:style-name="P4" loext:marker-style-name="T71"><text:span text:style-name="T72">一句話記憶</text:span><text:span text:style-name="T71"/>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42" loext:marker-style-name="T85"><text:span text:style-name="T161">RTO</text:span><text:span text:style-name="T85"/></text:p>
          </table:table-cell>
          <table:table-cell table:style-name="表格24.A2" office:value-type="string">
            <text:p text:style-name="P42" loext:marker-style-name="T85"><text:span text:style-name="T161">Recovery Time Objective </text:span><text:span text:style-name="T86">復原時間目標</text:span></text:p>
          </table:table-cell>
          <table:table-cell table:style-name="表格24.A2" office:value-type="string">
            <text:p text:style-name="P42" loext:marker-style-name="T54"><text:span text:style-name="T55">停機時間（能停多久）</text:span><text:span text:style-name="T54"/></text:p>
          </table:table-cell>
        </table:table-row>
        <table:table-row table:style-name="表格24.1">
          <table:table-cell table:style-name="表格24.A3" office:value-type="string">
            <text:p text:style-name="P42" loext:marker-style-name="T85"><text:span text:style-name="T161">RPO</text:span><text:span text:style-name="T85"/></text:p>
          </table:table-cell>
          <table:table-cell table:style-name="表格24.A3" office:value-type="string">
            <text:p text:style-name="P42" loext:marker-style-name="T85"><text:span text:style-name="T161">Recovery Point Objective </text:span><text:span text:style-name="T86">復原點目標</text:span></text:p>
          </table:table-cell>
          <table:table-cell table:style-name="表格24.A3" office:value-type="string">
            <text:p text:style-name="P42" loext:marker-style-name="T54"><text:span text:style-name="T55">資料損失量（能丟幾小時）</text:span><text:span text:style-name="T54"/></text:p>
          </table:table-cell>
        </table:table-row>
        <table:table-row table:style-name="表格24.1">
          <table:table-cell table:style-name="表格24.A2" office:value-type="string">
            <text:p text:style-name="P42" loext:marker-style-name="T85"><text:span text:style-name="T161">EDR</text:span><text:span text:style-name="T85"/></text:p>
          </table:table-cell>
          <table:table-cell table:style-name="表格24.A2" office:value-type="string">
            <text:p text:style-name="P42" loext:marker-style-name="T85"><text:span text:style-name="T161">Endpoint Detection &amp; Response</text:span><text:span text:style-name="T85"/></text:p>
          </table:table-cell>
          <table:table-cell table:style-name="表格24.A2" office:value-type="string">
            <text:p text:style-name="P42" loext:marker-style-name="T85"><text:span text:style-name="T86">自己買工具守（需內部資安人員）</text:span><text:span text:style-name="T85"/></text:p>
          </table:table-cell>
        </table:table-row>
        <table:table-row table:style-name="表格24.1">
          <table:table-cell table:style-name="表格24.A3" office:value-type="string">
            <text:p text:style-name="P42" loext:marker-style-name="T85"><text:span text:style-name="T161">MDR</text:span><text:span text:style-name="T85"/></text:p>
          </table:table-cell>
          <table:table-cell table:style-name="表格24.A3" office:value-type="string">
            <text:p text:style-name="P42" loext:marker-style-name="T85"><text:span text:style-name="T161">Managed Detection &amp; Response</text:span><text:span text:style-name="T85"/></text:p>
          </table:table-cell>
          <table:table-cell table:style-name="表格24.A3" office:value-type="string">
            <text:p text:style-name="P42" loext:marker-style-name="T85"><text:span text:style-name="T86">請資安公司委外守（</text:span><text:span text:style-name="T161">24</text:span><text:span text:style-name="T86">／</text:span><text:span text:style-name="T161">7</text:span><text:span text:style-name="T86">，適合中小企業）</text:span></text:p>
          </table:table-cell>
        </table:table-row>
      </table:table>
      <text:h text:style-name="P12" text:outline-level="3"><text:span text:style-name="T225">▍</text:span><text:span text:style-name="T226"> ⑫ </text:span><text:span text:style-name="T227">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39" loext:marker-style-name="T71"><text:span text:style-name="T81">Protocol </text:span><text:span text:style-name="T72">值</text:span></text:p>
            </table:table-cell>
            <table:table-cell table:style-name="表格25.A1" office:value-type="string">
              <text:p text:style-name="P39" loext:marker-style-name="T71"><text:span text:style-name="T81">DF Flag</text:span><text:span text:style-name="T71"/></text:p>
            </table:table-cell>
            <table:table-cell table:style-name="表格25.A1" office:value-type="string">
              <text:p text:style-name="P39" loext:marker-style-name="T71"><text:span text:style-name="T81">MF Flag</text:span><text:span text:style-name="T71"/></text:p>
            </table:table-cell>
            <table:table-cell table:style-name="表格25.A1" office:value-type="string">
              <text:p text:style-name="P39" loext:marker-style-name="T71"><text:span text:style-name="T72">關鍵公式</text:span><text:span text:style-name="T71"/>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42" loext:marker-style-name="T85"><text:span text:style-name="T161">ICMP=1 / TCP=6 / UDP=17</text:span><text:span text:style-name="T85"/></text:p>
          </table:table-cell>
          <table:table-cell table:style-name="表格25.A2" office:value-type="string">
            <text:p text:style-name="P42" loext:marker-style-name="T85"><text:span text:style-name="T161">DF=1</text:span><text:span text:style-name="T86">：禁止切，太大就丟＋</text:span><text:span text:style-name="T161">ICMP</text:span></text:p>
          </table:table-cell>
          <table:table-cell table:style-name="表格25.A2" office:value-type="string">
            <text:p text:style-name="P42" loext:marker-style-name="T85"><text:span text:style-name="T161">MF=1</text:span><text:span text:style-name="T86">：後面還有分段（最後段</text:span><text:span text:style-name="T161">=0</text:span><text:span text:style-name="T86">）</text:span></text:p>
          </table:table-cell>
          <table:table-cell table:style-name="表格25.A2" office:value-type="string">
            <text:p text:style-name="P42" loext:marker-style-name="T34"><text:span text:style-name="T42">Offset=</text:span><text:span text:style-name="T35">起始</text:span><text:span text:style-name="T42">÷8</text:span><text:span text:style-name="T35">；</text:span><text:span text:style-name="T42">MSS=MTU−40=1460</text:span>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6"><text:span text:style-name="T222">✅ <text:s/></text:span><text:span text:style-name="T53">提醒</text:span></text:p>
            <text:p text:style-name="P7" loext:marker-style-name="T112"><text:span text:style-name="T111">以上即全書精華。接下來各篇為完整觀念詳解、生活比喻、申論寫法與考試陷阱，務必至少讀過一遍以建立理解，再用本篇反覆速記。</text:span><text:span text:style-name="T112"/></text:p>
          </table:table-cell>
          <table:covered-table-cell/>
          <table:covered-table-cell/>
          <table:covered-table-cell/>
        </table:table-row>
      </table:table>
      <text:h text:style-name="P32" text:outline-level="1" loext:marker-style-name="T73"><text:span text:style-name="T74">第 一 篇　網路基礎架構：</text:span><text:span text:style-name="T73">OSI / TCP-IP · </text:span><text:span text:style-name="T74">協定 </text:span><text:span text:style-name="T73">· IP/Routing/ICMP · ARP · Traceroute</text:span>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6"><text:span text:style-name="T222">🌐 <text:s/></text:span><text:span text:style-name="T53">本篇重點</text:span></text:p>
            <text:p text:style-name="P7" loext:marker-style-name="T112"><text:span text:style-name="T111">本篇先建立整個網路的「分層」骨架，再逐層認識常見協定，最後切入網路層三大工作與兩個必考工具（</text:span><text:span text:style-name="T177">ARP</text:span><text:span text:style-name="T111">、</text:span><text:span text:style-name="T177">Traceroute</text:span><text:span text:style-name="T111">）。理解每一層的「責任」，比死背名詞更重要。</text:span></text:p>
          </table:table-cell>
        </table:table-row>
      </table:table>
      <text:h text:style-name="P11" text:outline-level="2" loext:marker-style-name="T27"><text:span text:style-name="T28">一、用「寄信」理解分層（修正版）</text:span><text:span text:style-name="T27"/></text:h>
      <text:p text:style-name="P48" loext:marker-style-name="T112"><text:span text:style-name="T111">每一層就像寄信流程中各自獨立的環節，各司其職、互不干涉：</text:span><text:span text:style-name="T112"/>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4" loext:marker-style-name="T71"><text:span text:style-name="T81">TCP/IP </text:span><text:span text:style-name="T72">層</text:span></text:p>
            </table:table-cell>
            <table:table-cell table:style-name="表格27.A1" office:value-type="string">
              <text:p text:style-name="P4" loext:marker-style-name="T71"><text:span text:style-name="T72">郵寄比喻</text:span><text:span text:style-name="T71"/></text:p>
            </table:table-cell>
            <table:table-cell table:style-name="表格27.A1" office:value-type="string">
              <text:p text:style-name="P4" loext:marker-style-name="T71"><text:span text:style-name="T72">實際負責的事</text:span><text:span text:style-name="T71"/>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42" loext:marker-style-name="T85"><text:span text:style-name="T161">🟢 </text:span><text:span text:style-name="T86">應用層 </text:span><text:span text:style-name="T161">Application</text:span></text:p>
          </table:table-cell>
          <table:table-cell table:style-name="表格27.A2" office:value-type="string">
            <text:p text:style-name="P42" loext:marker-style-name="T85"><text:span text:style-name="T86">決定「</text:span><text:span text:style-name="T96">寄什麼內容</text:span><text:span text:style-name="T86">」（信的內容與格式）</text:span></text:p>
          </table:table-cell>
          <table:table-cell table:style-name="表格27.A2" office:value-type="string">
            <text:p text:style-name="P42" loext:marker-style-name="T85"><text:span text:style-name="T161">HTTP</text:span><text:span text:style-name="T86">、</text:span><text:span text:style-name="T161">DNS</text:span><text:span text:style-name="T86">、</text:span><text:span text:style-name="T161">DHCP</text:span><text:span text:style-name="T86">、</text:span><text:span text:style-name="T161">SSH …</text:span><text:span text:style-name="T86">使用者直接操作的服務</text:span></text:p>
          </table:table-cell>
        </table:table-row>
        <table:table-row table:style-name="表格27.1">
          <table:table-cell table:style-name="表格27.A3" office:value-type="string">
            <text:p text:style-name="P42" loext:marker-style-name="T85"><text:span text:style-name="T161">🟡 </text:span><text:span text:style-name="T86">傳輸層 </text:span><text:span text:style-name="T161">Transport</text:span></text:p>
          </table:table-cell>
          <table:table-cell table:style-name="表格27.A3" office:value-type="string">
            <text:p text:style-name="P42" loext:marker-style-name="T292"><text:span text:style-name="T293">切分、編頁碼、確認收件</text:span><text:span text:style-name="T292"/></text:p>
          </table:table-cell>
          <table:table-cell table:style-name="表格27.A3" office:value-type="string">
            <text:p text:style-name="P42" loext:marker-style-name="T85"><text:span text:style-name="T161">TCP / UDP</text:span><text:span text:style-name="T86">：切割封包、重傳、流量控制</text:span></text:p>
          </table:table-cell>
        </table:table-row>
        <table:table-row table:style-name="表格27.1">
          <table:table-cell table:style-name="表格27.A2" office:value-type="string">
            <text:p text:style-name="P42" loext:marker-style-name="T85"><text:span text:style-name="T161">🔵 </text:span><text:span text:style-name="T86">網路層 </text:span><text:span text:style-name="T161">Network</text:span></text:p>
          </table:table-cell>
          <table:table-cell table:style-name="表格27.A2" office:value-type="string">
            <text:p text:style-name="P42" loext:marker-style-name="T85"><text:span text:style-name="T296">寫地址＋規劃路線</text:span><text:span text:style-name="T86">（郵遞區號＋郵局選路）</text:span></text:p>
          </table:table-cell>
          <table:table-cell table:style-name="表格27.A2" office:value-type="string">
            <text:p text:style-name="P42" loext:marker-style-name="T297"><text:span text:style-name="T335">IP </text:span><text:span text:style-name="T298">路由、</text:span><text:span text:style-name="T335">ICMP</text:span><text:span text:style-name="T298">：決定封包走哪條路</text:span></text:p>
          </table:table-cell>
        </table:table-row>
        <table:table-row table:style-name="表格27.1">
          <table:table-cell table:style-name="表格27.A3" office:value-type="string">
            <text:p text:style-name="P42" loext:marker-style-name="T85"><text:span text:style-name="T161">🟠 </text:span><text:span text:style-name="T86">連結層 </text:span><text:span text:style-name="T161">Link</text:span></text:p>
          </table:table-cell>
          <table:table-cell table:style-name="表格27.A3" office:value-type="string">
            <text:p text:style-name="P42" loext:marker-style-name="T85"><text:span text:style-name="T86">當前路段的區域配送</text:span><text:span text:style-name="T85"/></text:p>
          </table:table-cell>
          <table:table-cell table:style-name="表格27.A3" office:value-type="string">
            <text:p text:style-name="P42" loext:marker-style-name="T363"><text:span text:style-name="T377">Ethernet</text:span><text:span text:style-name="T364">、</text:span><text:span text:style-name="T377">ARP</text:span><text:span text:style-name="T364">：同一區域網路內傳輸</text:span>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6"><text:span text:style-name="T222">⚠️ <text:s/></text:span><text:span text:style-name="T247">舊版三大比喻的錯誤</text:span></text:p>
            <text:p text:style-name="P7"><text:span text:style-name="T197">❌ </text:span><text:span text:style-name="T132">舊：「寫地址 → 應用層」　</text:span><text:span text:style-name="T177">IP </text:span><text:span text:style-name="T111">位址屬於網路層；應用層負責的是「內容與格式」，不是地址。</text:span></text:p>
            <text:p text:style-name="P8"><text:span text:style-name="T197">❌ </text:span><text:span text:style-name="T132">舊：「打包 → 傳輸層」　</text:span><text:span text:style-name="T111">傳輸層還負責切割、編號、重傳、流量控制，遠不只「打包」。</text:span></text:p>
            <text:p text:style-name="P8"><text:span text:style-name="T197">❌ </text:span><text:span text:style-name="T132">舊：「實際搬運 → 連結層」　</text:span><text:span text:style-name="T111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二、</text:span><text:span text:style-name="T27">OSI 7 </text:span><text:span text:style-name="T28">層 </text:span><text:span text:style-name="T27">vs TCP/IP 4 </text:span><text:span text:style-name="T28">層（完整對照）</text:span></text:h>
      <text:p text:style-name="P48" loext:marker-style-name="T112"><text:span text:style-name="T198">OSI </text:span><text:span text:style-name="T133">是理論模型（</text:span><text:span text:style-name="T198">7 </text:span><text:span text:style-name="T133">層）</text:span><text:span text:style-name="T111">；</text:span><text:span text:style-name="T200">TCP/IP </text:span><text:span text:style-name="T135">是實際使用的模型（</text:span><text:span text:style-name="T200">4 </text:span><text:span text:style-name="T135">層）</text:span><text:span text:style-name="T111">。</text:span><text:span text:style-name="T177">TCP/IP </text:span><text:span text:style-name="T111">將 </text:span><text:span text:style-name="T177">OSI </text:span><text:span text:style-name="T111">的 </text:span><text:span text:style-name="T177">Session </text:span><text:span text:style-name="T111">層與 </text:span><text:span text:style-name="T177">Presentation </text:span><text:span text:style-name="T111">層併入 </text:span><text:span text:style-name="T177">Application </text:span><text:span text:style-name="T111">層，並把 </text:span><text:span text:style-name="T177">Physical </text:span><text:span text:style-name="T111">併入 </text:span><text:span text:style-name="T177">Link</text:span><text:span text:style-name="T111">。</text:span>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39" loext:marker-style-name="T71"><text:span text:style-name="T72">層號</text:span><text:span text:style-name="T71"/></text:p>
            </table:table-cell>
            <table:table-cell table:style-name="表格28.A1" office:value-type="string">
              <text:p text:style-name="P39" loext:marker-style-name="T71"><text:span text:style-name="T81">OSI </text:span><text:span text:style-name="T72">層名</text:span></text:p>
            </table:table-cell>
            <table:table-cell table:style-name="表格28.A1" office:value-type="string">
              <text:p text:style-name="P39" loext:marker-style-name="T71"><text:span text:style-name="T72">主要功能</text:span><text:span text:style-name="T71"/></text:p>
            </table:table-cell>
            <table:table-cell table:style-name="表格28.A1" office:value-type="string">
              <text:p text:style-name="P39" loext:marker-style-name="T71"><text:span text:style-name="T81">TCP/IP </text:span><text:span text:style-name="T72">對應</text:span>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41" loext:marker-style-name="T85"><text:span text:style-name="T161">7</text:span><text:span text:style-name="T85"/></text:p>
          </table:table-cell>
          <table:table-cell table:style-name="表格28.A2" office:value-type="string">
            <text:p text:style-name="P42" loext:marker-style-name="T85"><text:span text:style-name="T161">Application </text:span><text:span text:style-name="T99">應</text:span><text:span text:style-name="T86">用層</text:span></text:p>
          </table:table-cell>
          <table:table-cell table:style-name="表格28.A2" office:value-type="string">
            <text:p text:style-name="P42" loext:marker-style-name="T85"><text:span text:style-name="T86">使用者直接操作：</text:span><text:span text:style-name="T161">HTTP</text:span><text:span text:style-name="T86">、</text:span><text:span text:style-name="T161">DNS</text:span><text:span text:style-name="T86">、</text:span><text:span text:style-name="T161">DHCP</text:span></text:p>
          </table:table-cell>
          <table:table-cell table:style-name="表格28.A2" office:value-type="string">
            <text:p text:style-name="P42" loext:marker-style-name="T85"><text:span text:style-name="T161">Application</text:span><text:span text:style-name="T85"/></text:p>
          </table:table-cell>
        </table:table-row>
        <table:table-row table:style-name="表格28.1">
          <table:table-cell table:style-name="表格28.A3" office:value-type="string">
            <text:p text:style-name="P41" loext:marker-style-name="T85"><text:span text:style-name="T161">6</text:span><text:span text:style-name="T85"/></text:p>
          </table:table-cell>
          <table:table-cell table:style-name="表格28.A3" office:value-type="string">
            <text:p text:style-name="P42" loext:marker-style-name="T85"><text:span text:style-name="T161">Presentation </text:span><text:span text:style-name="T99">表</text:span><text:span text:style-name="T86">示層</text:span></text:p>
          </table:table-cell>
          <table:table-cell table:style-name="表格28.A3" office:value-type="string">
            <text:p text:style-name="P42" loext:marker-style-name="T386"><text:span text:style-name="T387">資料格式轉換、加解密、壓縮</text:span><text:span text:style-name="T386"/></text:p>
          </table:table-cell>
          <table:table-cell table:style-name="表格28.A3" office:value-type="string">
            <text:p text:style-name="P42" loext:marker-style-name="T85"><text:span text:style-name="T161">↑ </text:span><text:span text:style-name="T86">併入 </text:span><text:span text:style-name="T161">Application</text:span></text:p>
          </table:table-cell>
        </table:table-row>
        <table:table-row table:style-name="表格28.1">
          <table:table-cell table:style-name="表格28.A2" office:value-type="string">
            <text:p text:style-name="P41" loext:marker-style-name="T85"><text:span text:style-name="T161">5</text:span><text:span text:style-name="T85"/></text:p>
          </table:table-cell>
          <table:table-cell table:style-name="表格28.A2" office:value-type="string">
            <text:p text:style-name="P42" loext:marker-style-name="T85"><text:span text:style-name="T161">Session </text:span><text:span text:style-name="T99">會</text:span><text:span text:style-name="T86">話層</text:span></text:p>
          </table:table-cell>
          <table:table-cell table:style-name="表格28.A2" office:value-type="string">
            <text:p text:style-name="P42" loext:marker-style-name="T406"><text:span text:style-name="T407">連線的建立、維持與終止</text:span><text:span text:style-name="T406"/></text:p>
          </table:table-cell>
          <table:table-cell table:style-name="表格28.A2" office:value-type="string">
            <text:p text:style-name="P42" loext:marker-style-name="T85"><text:span text:style-name="T161">↑ </text:span><text:span text:style-name="T86">併入 </text:span><text:span text:style-name="T161">Application</text:span></text:p>
          </table:table-cell>
        </table:table-row>
        <table:table-row table:style-name="表格28.1">
          <table:table-cell table:style-name="表格28.A3" office:value-type="string">
            <text:p text:style-name="P41" loext:marker-style-name="T85"><text:span text:style-name="T161">4</text:span><text:span text:style-name="T85"/></text:p>
          </table:table-cell>
          <table:table-cell table:style-name="表格28.A3" office:value-type="string">
            <text:p text:style-name="P42" loext:marker-style-name="T85"><text:span text:style-name="T161">Transport </text:span><text:span text:style-name="T99">傳</text:span><text:span text:style-name="T86">輸層</text:span></text:p>
          </table:table-cell>
          <table:table-cell table:style-name="表格28.A3" office:value-type="string">
            <text:p text:style-name="P42" loext:marker-style-name="T85"><text:span text:style-name="T86">端對端傳輸控制（</text:span><text:span text:style-name="T161">TCP / UDP</text:span><text:span text:style-name="T86">）</text:span></text:p>
          </table:table-cell>
          <table:table-cell table:style-name="表格28.A3" office:value-type="string">
            <text:p text:style-name="P42" loext:marker-style-name="T85"><text:span text:style-name="T161">Transport</text:span><text:span text:style-name="T85"/></text:p>
          </table:table-cell>
        </table:table-row>
        <table:table-row table:style-name="表格28.1">
          <table:table-cell table:style-name="表格28.A2" office:value-type="string">
            <text:p text:style-name="P41" loext:marker-style-name="T85"><text:span text:style-name="T161">3</text:span><text:span text:style-name="T85"/></text:p>
          </table:table-cell>
          <table:table-cell table:style-name="表格28.A2" office:value-type="string">
            <text:p text:style-name="P42" loext:marker-style-name="T85"><text:span text:style-name="T161">Network </text:span><text:span text:style-name="T99">網</text:span><text:span text:style-name="T86">路層</text:span></text:p>
          </table:table-cell>
          <table:table-cell table:style-name="表格28.A2" office:value-type="string">
            <text:p text:style-name="P42" loext:marker-style-name="T363"><text:span text:style-name="T377">IP </text:span><text:span text:style-name="T364">路由、</text:span><text:span text:style-name="T377">ICMP </text:span><text:span text:style-name="T364">錯誤回報</text:span></text:p>
          </table:table-cell>
          <table:table-cell table:style-name="表格28.A2" office:value-type="string">
            <text:p text:style-name="P42" loext:marker-style-name="T85"><text:span text:style-name="T161">Internet</text:span><text:span text:style-name="T85"/></text:p>
          </table:table-cell>
        </table:table-row>
        <table:table-row table:style-name="表格28.1">
          <table:table-cell table:style-name="表格28.A3" office:value-type="string">
            <text:p text:style-name="P41" loext:marker-style-name="T85"><text:span text:style-name="T161">2</text:span><text:span text:style-name="T85"/></text:p>
          </table:table-cell>
          <table:table-cell table:style-name="表格28.A3" office:value-type="string">
            <text:p text:style-name="P42" loext:marker-style-name="T85"><text:span text:style-name="T161">Data Link </text:span><text:span text:style-name="T411">資</text:span><text:span text:style-name="T86">料鏈結層</text:span></text:p>
          </table:table-cell>
          <table:table-cell table:style-name="表格28.A3" office:value-type="string">
            <text:p text:style-name="P42" loext:marker-style-name="T415"><text:span text:style-name="T442">MAC </text:span><text:span text:style-name="T416">位址、區域網路傳輸（</text:span><text:span text:style-name="T442">ARP</text:span><text:span text:style-name="T416">）</text:span></text:p>
          </table:table-cell>
          <table:table-cell table:style-name="表格28.A3" office:value-type="string">
            <text:p text:style-name="P42" loext:marker-style-name="T85"><text:span text:style-name="T161">Link</text:span><text:span text:style-name="T85"/></text:p>
          </table:table-cell>
        </table:table-row>
        <table:table-row table:style-name="表格28.1">
          <table:table-cell table:style-name="表格28.A2" office:value-type="string">
            <text:p text:style-name="P41" loext:marker-style-name="T85"><text:span text:style-name="T161">1</text:span><text:span text:style-name="T85"/></text:p>
          </table:table-cell>
          <table:table-cell table:style-name="表格28.A2" office:value-type="string">
            <text:p text:style-name="P42" loext:marker-style-name="T85"><text:span text:style-name="T161">Physical </text:span><text:span text:style-name="T99">實</text:span><text:span text:style-name="T86">體層</text:span></text:p>
          </table:table-cell>
          <table:table-cell table:style-name="表格28.A2" office:value-type="string">
            <text:p text:style-name="P42" loext:marker-style-name="T85"><text:span text:style-name="T86">電訊號、光訊號、無線電波</text:span><text:span text:style-name="T85"/></text:p>
          </table:table-cell>
          <table:table-cell table:style-name="表格28.A2" office:value-type="string">
            <text:p text:style-name="P42" loext:marker-style-name="T85"><text:span text:style-name="T161">↑ </text:span><text:span text:style-name="T86">併入 </text:span><text:span text:style-name="T161">Link</text:span>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6"><text:span text:style-name="T222">⚡ <text:s/></text:span><text:span text:style-name="T227">速記</text:span></text:p>
            <text:p text:style-name="P7" loext:marker-style-name="T112"><text:span text:style-name="T198">OSI → 7 </text:span><text:span text:style-name="T133">層（理論）</text:span><text:span text:style-name="T111">，</text:span><text:span text:style-name="T200">TCP/IP → 4 </text:span><text:span text:style-name="T135">層（實際）</text:span><text:span text:style-name="T111">；差別在於 </text:span><text:span text:style-name="T177">TCP/IP </text:span><text:span text:style-name="T111">少了獨立的 </text:span><text:span text:style-name="T177">Session </text:span><text:span text:style-name="T111">與 </text:span><text:span text:style-name="T177">Presentation </text:span><text:span text:style-name="T111">兩層。</text:span></text:p>
          </table:table-cell>
          <table:covered-table-cell/>
          <table:covered-table-cell/>
          <table:covered-table-cell/>
        </table:table-row>
      </table:table>
      <text:h text:style-name="P11" text:outline-level="2"><text:soft-page-break/><text:span text:style-name="T28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39" loext:marker-style-name="T71"><text:span text:style-name="T81">🟢 Application </text:span><text:span text:style-name="T72">應用層</text:span></text:p>
            </table:table-cell>
            <table:table-cell table:style-name="表格29.A1" office:value-type="string">
              <text:p text:style-name="P39" loext:marker-style-name="T71"><text:span text:style-name="T81">🟡 Transport </text:span><text:span text:style-name="T72">傳輸層</text:span></text:p>
            </table:table-cell>
            <table:table-cell table:style-name="表格29.A1" office:value-type="string">
              <text:p text:style-name="P39" loext:marker-style-name="T71"><text:span text:style-name="T81">🔵 Network </text:span><text:span text:style-name="T72">網路層</text:span></text:p>
            </table:table-cell>
            <table:table-cell table:style-name="表格29.A1" office:value-type="string">
              <text:p text:style-name="P39" loext:marker-style-name="T71"><text:span text:style-name="T81">🟠 Link </text:span><text:span text:style-name="T72">連結層</text:span>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42" loext:marker-style-name="T85"><text:span text:style-name="T161">HTTP / HTTPS</text:span><text:span text:style-name="T86">、</text:span><text:span text:style-name="T161">DNS</text:span><text:span text:style-name="T86">、</text:span><text:span text:style-name="T161">DHCP</text:span><text:span text:style-name="T86">、</text:span><text:span text:style-name="T161">SSH</text:span><text:span text:style-name="T86">、</text:span><text:span text:style-name="T161">MQTT</text:span><text:span text:style-name="T86">、</text:span><text:span text:style-name="T162">OSPF*</text:span></text:p>
          </table:table-cell>
          <table:table-cell table:style-name="表格29.A2" office:value-type="string">
            <text:p text:style-name="P42" loext:marker-style-name="T463"><text:span text:style-name="T482">TCP</text:span><text:span text:style-name="T464">（可靠傳輸）、</text:span><text:span text:style-name="T482">UDP</text:span><text:span text:style-name="T464">（高速傳輸）</text:span></text:p>
          </table:table-cell>
          <table:table-cell table:style-name="表格29.A2" office:value-type="string">
            <text:p text:style-name="P42" loext:marker-style-name="T85"><text:span text:style-name="T161">IP</text:span><text:span text:style-name="T86">（路由定址）、</text:span><text:span text:style-name="T495">ICMP</text:span><text:span text:style-name="T498">（錯誤回報 </text:span><text:span text:style-name="T495">/ ping</text:span><text:span text:style-name="T498">）</text:span></text:p>
          </table:table-cell>
          <table:table-cell table:style-name="表格29.A2" office:value-type="string">
            <text:p text:style-name="P42" loext:marker-style-name="T85"><text:span text:style-name="T161">Ethernet</text:span><text:span text:style-name="T86">（有線網路）、</text:span><text:span text:style-name="T379">ARP</text:span><text:span text:style-name="T366">（</text:span><text:span text:style-name="T379">IP → MAC</text:span><text:span text:style-name="T366">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7"><text:span text:style-name="T248">OSPF </text:span><text:span text:style-name="T243">分層備註：</text:span><text:span text:style-name="T177">OSPF </text:span><text:span text:style-name="T111">在 </text:span><text:span text:style-name="T177">OSI </text:span><text:span text:style-name="T111">模型屬第 </text:span><text:span text:style-name="T177">3 </text:span><text:span text:style-name="T111">層（</text:span><text:span text:style-name="T177">Network</text:span><text:span text:style-name="T111">）；但在 </text:span><text:span text:style-name="T177">TCP/IP </text:span><text:span text:style-name="T111">模型中，因為它直接跑在 </text:span><text:span text:style-name="T177">IP </text:span><text:span text:style-name="T111">上（不透過 </text:span><text:span text:style-name="T177">TCP/UDP</text:span><text:span text:style-name="T111">），通常歸為 </text:span><text:span text:style-name="T177">Application </text:span><text:span text:style-name="T111">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四、常見協定詳解：</text:span><text:span text:style-name="T27">DHCP · SSH · MQTT · OSPF</text:span>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4" loext:marker-style-name="T77"><text:span text:style-name="T78">協定</text:span><text:span text:style-name="T77"/></text:p>
            </table:table-cell>
            <table:table-cell table:style-name="表格30.A1" office:value-type="string">
              <text:p text:style-name="P4" loext:marker-style-name="T77"><text:span text:style-name="T78">層級</text:span><text:span text:style-name="T77"/></text:p>
            </table:table-cell>
            <table:table-cell table:style-name="表格30.A1" office:value-type="string">
              <text:p text:style-name="P4" loext:marker-style-name="T77"><text:span text:style-name="T78">做什麼（白話）</text:span><text:span text:style-name="T77"/></text:p>
            </table:table-cell>
            <table:table-cell table:style-name="表格30.A1" office:value-type="string">
              <text:p text:style-name="P4" loext:marker-style-name="T77"><text:span text:style-name="T78">生活比喻</text:span><text:span text:style-name="T77"/>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42" loext:marker-style-name="T149"><text:span text:style-name="T211">DHCP</text:span><text:span text:style-name="T212"> Dynamic Host Configuration Protocol</text:span></text:p>
          </table:table-cell>
          <table:table-cell table:style-name="表格30.A2" office:value-type="string">
            <text:p text:style-name="P42" loext:marker-style-name="T149"><text:span text:style-name="T150">應用層</text:span><text:span text:style-name="T149"/></text:p>
          </table:table-cell>
          <table:table-cell table:style-name="表格30.A2" office:value-type="string">
            <text:p text:style-name="P42" loext:marker-style-name="T149"><text:span text:style-name="T151">連上 </text:span><text:span text:style-name="T214">WiFi </text:span><text:span text:style-name="T151">時不必手動設定 </text:span><text:span text:style-name="T214">IP</text:span><text:span text:style-name="T150">，</text:span><text:span text:style-name="T212">DHCP </text:span><text:span text:style-name="T150">伺服器</text:span><text:span text:style-name="T368">自動分配一個 </text:span><text:span text:style-name="T381">IP </text:span><text:span text:style-name="T368">給你</text:span><text:span text:style-name="T150">。</text:span></text:p>
          </table:table-cell>
          <table:table-cell table:style-name="表格30.A2" office:value-type="string">
            <text:p text:style-name="P42" loext:marker-style-name="T149"><text:span text:style-name="T150">進飯店前台自動安排房號</text:span><text:span text:style-name="T149"/></text:p>
          </table:table-cell>
        </table:table-row>
        <table:table-row table:style-name="表格30.1">
          <table:table-cell table:style-name="表格30.A3" office:value-type="string">
            <text:p text:style-name="P42" loext:marker-style-name="T149"><text:span text:style-name="T211">SSH</text:span><text:span text:style-name="T212"> Secure Shell</text:span></text:p>
          </table:table-cell>
          <table:table-cell table:style-name="表格30.A3" office:value-type="string">
            <text:p text:style-name="P42" loext:marker-style-name="T149"><text:span text:style-name="T150">應用層</text:span><text:span text:style-name="T149"/></text:p>
          </table:table-cell>
          <table:table-cell table:style-name="表格30.A3" office:value-type="string">
            <text:p text:style-name="P42" loext:marker-style-name="T149"><text:span text:style-name="T470">透過加密通道遠端操控</text:span><text:span text:style-name="T150">另一台 </text:span><text:span text:style-name="T212">Linux</text:span><text:span text:style-name="T150">／伺服器的終端機。</text:span></text:p>
          </table:table-cell>
          <table:table-cell table:style-name="表格30.A3" office:value-type="string">
            <text:p text:style-name="P42" loext:marker-style-name="T149"><text:span text:style-name="T150">加密版的遠端遙控器</text:span><text:span text:style-name="T149"/></text:p>
          </table:table-cell>
        </table:table-row>
        <table:table-row table:style-name="表格30.1">
          <table:table-cell table:style-name="表格30.A2" office:value-type="string">
            <text:p text:style-name="P42" loext:marker-style-name="T149"><text:span text:style-name="T211">MQTT</text:span><text:span text:style-name="T212"> Message Queuing Telemetry Transport</text:span></text:p>
          </table:table-cell>
          <table:table-cell table:style-name="表格30.A2" office:value-type="string">
            <text:p text:style-name="P42" loext:marker-style-name="T149"><text:span text:style-name="T150">應用層</text:span><text:span text:style-name="T149"/></text:p>
          </table:table-cell>
          <table:table-cell table:style-name="表格30.A2" office:value-type="string">
            <text:p text:style-name="P42" loext:marker-style-name="T149"><text:span text:style-name="T448">IoT </text:span><text:span text:style-name="T424">裝置常用的輕量傳訊協定</text:span><text:span text:style-name="T150">，採</text:span><text:span text:style-name="T507">「發布／訂閱」模式</text:span><text:span text:style-name="T150">，非常省流量。</text:span></text:p>
          </table:table-cell>
          <table:table-cell table:style-name="表格30.A2" office:value-type="string">
            <text:p text:style-name="P42" loext:marker-style-name="T149"><text:span text:style-name="T150">溫度感測器發布「</text:span><text:span text:style-name="T212">30°C</text:span><text:span text:style-name="T150">」，訂閱者自動收到</text:span></text:p>
          </table:table-cell>
        </table:table-row>
        <table:table-row table:style-name="表格30.1">
          <table:table-cell table:style-name="表格30.A3" office:value-type="string">
            <text:p text:style-name="P42" loext:marker-style-name="T149"><text:span text:style-name="T211">OSPF</text:span><text:span text:style-name="T212"> Open Shortest Path First</text:span></text:p>
          </table:table-cell>
          <table:table-cell table:style-name="表格30.A3" office:value-type="string">
            <text:p text:style-name="P42" loext:marker-style-name="T149"><text:span text:style-name="T150">視模型而定 ⚠️</text:span><text:span text:style-name="T149"/></text:p>
          </table:table-cell>
          <table:table-cell table:style-name="表格30.A3" office:value-type="string">
            <text:p text:style-name="P42" loext:marker-style-name="T149"><text:span text:style-name="T308">路由器之間使用</text:span><text:span text:style-name="T150">，</text:span><text:span text:style-name="T369">自動計算封包走哪條路徑最短、最快</text:span><text:span text:style-name="T150">。</text:span></text:p>
          </table:table-cell>
          <table:table-cell table:style-name="表格30.A3" office:value-type="string">
            <text:p text:style-name="P42" loext:marker-style-name="T149"><text:span text:style-name="T212">Google Maps </text:span><text:span text:style-name="T150">幫路由器規劃最佳路線</text:span>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6"><text:span text:style-name="T222">💡 <text:s/></text:span><text:span text:style-name="T227">快速判斷層級的技巧</text:span></text:p>
            <text:p text:style-name="P7"><text:span text:style-name="T232">使用者／應用服務</text:span><text:span text:style-name="T111">（</text:span><text:span text:style-name="T177">SSH</text:span><text:span text:style-name="T111">、</text:span><text:span text:style-name="T177">DHCP</text:span><text:span text:style-name="T111">、</text:span><text:span text:style-name="T177">MQTT</text:span><text:span text:style-name="T111">、</text:span><text:span text:style-name="T177">HTTP</text:span><text:span text:style-name="T111">）→ 幾乎都是應用層。</text:span></text:p>
            <text:p text:style-name="P8"><text:span text:style-name="T232">幫路由器決定走哪條路</text:span><text:span text:style-name="T111">（</text:span><text:span text:style-name="T177">OSPF</text:span><text:span text:style-name="T111">、</text:span><text:span text:style-name="T177">RIP</text:span><text:span text:style-name="T111">、</text:span><text:span text:style-name="T177">BGP</text:span><text:span text:style-name="T111">）→ 在 </text:span><text:span text:style-name="T177">OSI </text:span><text:span text:style-name="T111">屬網路層，</text:span><text:span text:style-name="T177">TCP/IP </text:span><text:span text:style-name="T111">多歸應用層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五、網路層深度解析：</text:span><text:span text:style-name="T27">IP · Routing · ICMP</text:span></text:h>
      <text:p text:style-name="P48" loext:marker-style-name="T112"><text:span text:style-name="T111">網路層（第 </text:span><text:span text:style-name="T177">3 </text:span><text:span text:style-name="T111">層）是整個網路的「大腦」，負責三件獨立但相關的事：</text:span>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39" loext:marker-style-name="T71"><text:span text:style-name="T81">📍 IP</text:span><text:span text:style-name="T72">（位址）</text:span></text:p>
            </table:table-cell>
            <table:table-cell table:style-name="表格31.A1" office:value-type="string">
              <text:p text:style-name="P39" loext:marker-style-name="T71"><text:span text:style-name="T81">🗺️ Routing</text:span><text:span text:style-name="T72">（路由）</text:span></text:p>
            </table:table-cell>
            <table:table-cell table:style-name="表格31.A1" office:value-type="string">
              <text:p text:style-name="P39" loext:marker-style-name="T71"><text:span text:style-name="T81">🚨 ICMP</text:span><text:span text:style-name="T72">（錯誤回報）</text:span>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42" loext:marker-style-name="T85"><text:span text:style-name="T96">決定「目的地在哪」</text:span><text:span text:style-name="T86">。每台設備都有 </text:span><text:span text:style-name="T161">IP</text:span><text:span text:style-name="T86">，就像門牌；</text:span><text:span text:style-name="T161">IP </text:span><text:span text:style-name="T86">負責標記「我要送去哪裡」。</text:span></text:p>
          </table:table-cell>
          <table:table-cell table:style-name="表格31.A2" office:value-type="string">
            <text:p text:style-name="P42" loext:marker-style-name="T85"><text:span text:style-name="T96">決定「怎麼走最快」</text:span><text:span text:style-name="T86">。</text:span><text:span text:style-name="T101">封包經過很多路由器</text:span><text:span text:style-name="T86">，</text:span><text:span text:style-name="T464">每台都問「下一站往哪送？」</text:span><text:span text:style-name="T335">OSPF </text:span><text:span text:style-name="T298">等協定算出最短路徑。</text:span></text:p>
          </table:table-cell>
          <table:table-cell table:style-name="表格31.A2" office:value-type="string">
            <text:p text:style-name="P42" loext:marker-style-name="T85"><text:span text:style-name="T96">回報「出了什麼問題」</text:span><text:span text:style-name="T86">。找不到主機、路不通、</text:span><text:span text:style-name="T161">TTL </text:span><text:span text:style-name="T86">歸零 → </text:span><text:span text:style-name="T364">各自回傳對應 </text:span><text:span text:style-name="T377">ICMP </text:span><text:span text:style-name="T364">訊息</text:span><text:span text:style-name="T86">。</text:span>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6"><text:span text:style-name="T222">🔍 <text:s/></text:span><text:span text:style-name="T65">ping </text:span><text:span text:style-name="T53">是什麼？為什麼跟 </text:span><text:span text:style-name="T65">ICMP </text:span><text:span text:style-name="T53">有關？</text:span></text:p>
            <text:p text:style-name="P7" loext:marker-style-name="T56"><text:span text:style-name="T66">ping google.com </text:span><text:span text:style-name="T57">的運作</text:span><text:span text:style-name="T58">：</text:span></text:p>
            <text:p text:style-name="P8" loext:marker-style-name="T112"><text:span text:style-name="T177">① </text:span><text:span text:style-name="T111">你的電腦發出 </text:span><text:span text:style-name="T198">ICMP Echo Request</text:span><text:span text:style-name="T111">（「你在嗎？」）</text:span></text:p>
            <text:p text:style-name="P8" loext:marker-style-name="T112"><text:span text:style-name="T177">② </text:span><text:span text:style-name="T111">目標主機回傳 </text:span><text:span text:style-name="T198">ICMP Echo Reply</text:span><text:span text:style-name="T111">（「我在！」）</text:span></text:p>
            <text:p text:style-name="P8" loext:marker-style-name="T112"><text:span text:style-name="T177">③ </text:span><text:span text:style-name="T391">顯示來回時間（</text:span><text:span text:style-name="T400">ms</text:span><text:span text:style-name="T391">），數字越小代表網路越暢通</text:span></text:p>
            <text:p text:style-name="P8"><text:span text:style-name="T248">⚠️ </text:span><text:span text:style-name="T243">重點：</text:span><text:span text:style-name="T383">ping </text:span><text:span text:style-name="T372">完全使用 </text:span><text:span text:style-name="T383">ICMP</text:span><text:span text:style-name="T372">，不走 </text:span><text:span text:style-name="T383">TCP </text:span><text:span text:style-name="T372">也不走 </text:span><text:span text:style-name="T383">UDP</text:span><text:span text:style-name="T111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6"><text:span text:style-name="T222">⚡ <text:s/></text:span><text:span text:style-name="T227">三個概念一次記清楚</text:span></text:p>
            <text:p text:style-name="P7"><text:span text:style-name="T240">📍 IP → </text:span><text:span text:style-name="T111">定位（目的地是誰）　</text:span><text:span text:style-name="T232">🗺️ </text:span><text:span text:style-name="T240">Routing → </text:span><text:span text:style-name="T471">選路（怎麼走最快）</text:span><text:span text:style-name="T111">　</text:span><text:span text:style-name="T232">🚨 </text:span><text:span text:style-name="T241">ICMP → </text:span><text:span text:style-name="T372">回報（出錯了通知你）</text:span></text:p>
          </table:table-cell>
          <table:covered-table-cell/>
          <table:covered-table-cell/>
        </table:table-row>
      </table:table>
      <text:h text:style-name="P11" text:outline-level="2"><text:soft-page-break/><text:span text:style-name="T28">六、</text:span><text:span text:style-name="T27">TCP vs UDP </text:span><text:span text:style-name="T28">差異比較</text:span></text:h>
      <text:p text:style-name="P48" loext:marker-style-name="T112"><text:span text:style-name="T111">傳輸層最核心的兩個協定，差異在於「是否保證送達」（更深入的擁塞控制見第五篇）。</text:span><text:span text:style-name="T112"/>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4" loext:marker-style-name="T75"><text:span text:style-name="T76">比較項目</text:span><text:span text:style-name="T75"/></text:p>
            </table:table-cell>
            <table:table-cell table:style-name="表格32.A1" office:value-type="string">
              <text:p text:style-name="P4" loext:marker-style-name="T75"><text:span text:style-name="T82">TCP</text:span><text:span text:style-name="T75"/></text:p>
            </table:table-cell>
            <table:table-cell table:style-name="表格32.A1" office:value-type="string">
              <text:p text:style-name="P4" loext:marker-style-name="T75"><text:span text:style-name="T82">UDP</text:span><text:span text:style-name="T75"/>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42" loext:marker-style-name="T144"><text:span text:style-name="T145">連線方式</text:span><text:span text:style-name="T144"/></text:p>
          </table:table-cell>
          <table:table-cell table:style-name="表格32.A2" office:value-type="string">
            <text:p text:style-name="P42" loext:marker-style-name="T144"><text:span text:style-name="T145">需要握手（三向交握）</text:span><text:span text:style-name="T144"/></text:p>
          </table:table-cell>
          <table:table-cell table:style-name="表格32.A2" office:value-type="string">
            <text:p text:style-name="P42" loext:marker-style-name="T144"><text:span text:style-name="T145">無連線，直接送出</text:span><text:span text:style-name="T144"/></text:p>
          </table:table-cell>
        </table:table-row>
        <table:table-row table:style-name="表格32.1">
          <table:table-cell table:style-name="表格32.A3" office:value-type="string">
            <text:p text:style-name="P42" loext:marker-style-name="T144"><text:span text:style-name="T145">可靠性</text:span><text:span text:style-name="T144"/></text:p>
          </table:table-cell>
          <table:table-cell table:style-name="表格32.A3" office:value-type="string">
            <text:p text:style-name="P42" loext:marker-style-name="T314"><text:span text:style-name="T315">保證送達，遺失會重傳</text:span><text:span text:style-name="T314"/></text:p>
          </table:table-cell>
          <table:table-cell table:style-name="表格32.A3" office:value-type="string">
            <text:p text:style-name="P42" loext:marker-style-name="T428"><text:span text:style-name="T429">不保證，遺失不補</text:span><text:span text:style-name="T428"/></text:p>
          </table:table-cell>
        </table:table-row>
        <table:table-row table:style-name="表格32.1">
          <table:table-cell table:style-name="表格32.A2" office:value-type="string">
            <text:p text:style-name="P42" loext:marker-style-name="T144"><text:span text:style-name="T145">速度</text:span><text:span text:style-name="T144"/></text:p>
          </table:table-cell>
          <table:table-cell table:style-name="表格32.A2" office:value-type="string">
            <text:p text:style-name="P42" loext:marker-style-name="T146"><text:span text:style-name="T147">較慢（有確認機制）</text:span><text:span text:style-name="T146"/></text:p>
          </table:table-cell>
          <table:table-cell table:style-name="表格32.A2" office:value-type="string">
            <text:p text:style-name="P42" loext:marker-style-name="T146"><text:span text:style-name="T147">較快（無確認機制）</text:span><text:span text:style-name="T146"/></text:p>
          </table:table-cell>
        </table:table-row>
        <table:table-row table:style-name="表格32.1">
          <table:table-cell table:style-name="表格32.A3" office:value-type="string">
            <text:p text:style-name="P42" loext:marker-style-name="T144"><text:span text:style-name="T145">使用情境</text:span><text:span text:style-name="T144"/></text:p>
          </table:table-cell>
          <table:table-cell table:style-name="表格32.A3" office:value-type="string">
            <text:p text:style-name="P42" loext:marker-style-name="T144"><text:span text:style-name="T209">HTTP</text:span><text:span text:style-name="T145">、</text:span><text:span text:style-name="T209">Email</text:span><text:span text:style-name="T145">、</text:span><text:span text:style-name="T209">FTP</text:span></text:p>
          </table:table-cell>
          <table:table-cell table:style-name="表格32.A3" office:value-type="string">
            <text:p text:style-name="P42" loext:marker-style-name="T144"><text:span text:style-name="T145">串流影音、</text:span><text:span text:style-name="T209">VoIP</text:span><text:span text:style-name="T145">、</text:span><text:span text:style-name="T209">DNS</text:span></text:p>
          </table:table-cell>
        </table:table-row>
        <table:table-row table:style-name="表格32.1">
          <table:table-cell table:style-name="表格32.A2" office:value-type="string">
            <text:p text:style-name="P42" loext:marker-style-name="T144"><text:span text:style-name="T145">一句話</text:span><text:span text:style-name="T144"/></text:p>
          </table:table-cell>
          <table:table-cell table:style-name="表格32.A2" office:value-type="string">
            <text:p text:style-name="P42" loext:marker-style-name="T237"><text:span text:style-name="T238">「穩定優先」</text:span><text:span text:style-name="T237"/></text:p>
          </table:table-cell>
          <table:table-cell table:style-name="表格32.A2" office:value-type="string">
            <text:p text:style-name="P42" loext:marker-style-name="T38"><text:span text:style-name="T39">「速度優先」</text:span><text:span text:style-name="T38"/></text:p>
          </table:table-cell>
        </table:table-row>
      </table:table>
      <text:h text:style-name="P11" text:outline-level="2" loext:marker-style-name="T27"><text:span text:style-name="T28">七、</text:span><text:span text:style-name="T27">ARP — </text:span><text:span text:style-name="T28">位址解析協定</text:span>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6"><text:span text:style-name="T222">🔗 <text:s/></text:span><text:span text:style-name="T65">ARP </text:span><text:span text:style-name="T53">重點</text:span></text:p>
            <text:p text:style-name="P7"><text:span text:style-name="T67">ARP </text:span><text:span text:style-name="T58">做什麼？　</text:span><text:span text:style-name="T133">在</text:span><text:span text:style-name="T504">同一個</text:span><text:span text:style-name="T133">區域網路（</text:span><text:span text:style-name="T198">LAN</text:span><text:span text:style-name="T133">）中</text:span><text:span text:style-name="T111">，</text:span><text:span text:style-name="T393">將「</text:span><text:span text:style-name="T401">IP </text:span><text:span text:style-name="T393">位址（邏輯位址）」轉換成「</text:span><text:span text:style-name="T401">MAC </text:span><text:span text:style-name="T393">位址（實體位址）」</text:span><text:span text:style-name="T111">。</text:span></text:p>
            <text:p text:style-name="P8"><text:span text:style-name="T58">為何屬於 </text:span><text:span text:style-name="T67">Link </text:span><text:span text:style-name="T58">層？　</text:span><text:span text:style-name="T383">ARP </text:span><text:span text:style-name="T372">的作用範圍僅限於同一區域網路內，</text:span><text:span text:style-name="T505">無法跨越路由器</text:span><text:span text:style-name="T111">，因此歸屬 </text:span><text:span text:style-name="T177">Link</text:span><text:span text:style-name="T111">（連結）層。</text:span></text:p>
            <text:p text:style-name="P8" loext:marker-style-name="T56"><text:span text:style-name="T58">運作流程：</text:span><text:span text:style-name="T56"/></text:p>
            <text:p text:style-name="P8" loext:marker-style-name="T112"><text:span text:style-name="T177">① </text:span><text:span text:style-name="T137">裝置 </text:span><text:span text:style-name="T202">A </text:span><text:span text:style-name="T137">廣播詢問：</text:span><text:span text:style-name="T111">「</text:span><text:span text:style-name="T133">誰的 </text:span><text:span text:style-name="T198">IP</text:span><text:span text:style-name="T177"> </text:span><text:span text:style-name="T111">是 </text:span><text:span text:style-name="T177">192.168.1.5</text:span><text:span text:style-name="T111">？」</text:span></text:p>
            <text:p text:style-name="P8" loext:marker-style-name="T112"><text:span text:style-name="T177">② </text:span><text:span text:style-name="T138">裝置 </text:span><text:span text:style-name="T203">B </text:span><text:span text:style-name="T138">回應：</text:span><text:span text:style-name="T111">「</text:span><text:span text:style-name="T135">是我！</text:span><text:span text:style-name="T200">MAC </text:span><text:span text:style-name="T135">是</text:span><text:span text:style-name="T111"> </text:span><text:span text:style-name="T177">AA:BB:CC:DD:EE:FF</text:span><text:span text:style-name="T111">」</text:span></text:p>
            <text:p text:style-name="P8" loext:marker-style-name="T112"><text:span text:style-name="T177">③ </text:span><text:span text:style-name="T111">裝置 </text:span><text:span text:style-name="T177">A </text:span><text:span text:style-name="T111">記錄此對應至 </text:span><text:span text:style-name="T177">ARP </text:span><text:span text:style-name="T111">快取，下次直接使用</text:span></text:p>
          </table:table-cell>
        </table:table-row>
      </table:table>
      <text:p text:style-name="P48" loext:marker-style-name="T6"><text:span text:style-name="T7">（</text:span><text:span text:style-name="T16">ARP </text:span><text:span text:style-name="T7">完整流程、</text:span><text:span text:style-name="T16">ARP Spoofing </text:span><text:span text:style-name="T7">與完整上網流程，詳見第四篇。）</text:span></text:p>
      <text:h text:style-name="P11" text:outline-level="2" loext:marker-style-name="T27"><text:span text:style-name="T28">八、</text:span><text:span text:style-name="T27">Traceroute </text:span><text:span text:style-name="T28">原理詳解（</text:span><text:span text:style-name="T27">TTL </text:span><text:span text:style-name="T28">機制）</text:span>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7"><text:span text:style-name="T24">目的：</text:span><text:span text:style-name="T550">找出封包從來源到目的地</text:span><text:span text:style-name="T294">，</text:span><text:span text:style-name="T554">中間經過哪些路由器</text:span><text:span text:style-name="T111">（完整路徑偵測）。</text:span></text:p>
            <text:p text:style-name="P8"><text:span text:style-name="T555">TTL</text:span><text:span text:style-name="T560">（</text:span><text:span text:style-name="T555">Time To Live</text:span><text:span text:style-name="T560">）</text:span><text:span text:style-name="T24">：</text:span><text:span text:style-name="T391">封包的「存活計數器」。每經過一個路由器就減 </text:span><text:span text:style-name="T400">1</text:span><text:span text:style-name="T111">；</text:span><text:span text:style-name="T316">歸零時路由器丟棄封包</text:span><text:span text:style-name="T111">，並</text:span><text:span text:style-name="T430">回傳 </text:span><text:span text:style-name="T451">ICMP Time Exceeded </text:span><text:span text:style-name="T430">給發送方</text:span><text:span text:style-name="T111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4" loext:marker-style-name="T77"><text:span text:style-name="T78">封包次數</text:span><text:span text:style-name="T77"/></text:p>
          </table:table-cell>
          <table:table-cell table:style-name="表格34.A2" office:value-type="string">
            <text:p text:style-name="P4" loext:marker-style-name="T77"><text:span text:style-name="T83">TTL </text:span><text:span text:style-name="T78">值</text:span></text:p>
          </table:table-cell>
          <table:table-cell table:style-name="表格34.A2" office:value-type="string">
            <text:p text:style-name="P4" loext:marker-style-name="T77"><text:span text:style-name="T78">發生什麼事</text:span><text:span text:style-name="T77"/></text:p>
          </table:table-cell>
          <table:table-cell table:style-name="表格34.A2" office:value-type="string">
            <text:p text:style-name="P4" loext:marker-style-name="T77"><text:span text:style-name="T78">取得資訊</text:span><text:span text:style-name="T77"/></text:p>
          </table:table-cell>
        </table:table-row>
        <table:table-row table:style-name="表格34.1">
          <table:table-cell table:style-name="表格34.A3" office:value-type="string">
            <text:p text:style-name="P42" loext:marker-style-name="T149"><text:span text:style-name="T150">第 </text:span><text:span text:style-name="T212">1 </text:span><text:span text:style-name="T150">次</text:span></text:p>
          </table:table-cell>
          <table:table-cell table:style-name="表格34.A3" office:value-type="string">
            <text:p text:style-name="P42" loext:marker-style-name="T149"><text:span text:style-name="T212">TTL = 1</text:span><text:span text:style-name="T149"/></text:p>
          </table:table-cell>
          <table:table-cell table:style-name="表格34.A3" office:value-type="string">
            <text:p text:style-name="P42" loext:marker-style-name="T149"><text:span text:style-name="T153">抵達第 </text:span><text:span text:style-name="T215">1 </text:span><text:span text:style-name="T153">個 </text:span><text:span text:style-name="T215">Router </text:span><text:span text:style-name="T212">→ TTL </text:span><text:span text:style-name="T150">歸零 → 回傳 </text:span><text:span text:style-name="T212">ICMP Time Exceeded</text:span></text:p>
          </table:table-cell>
          <table:table-cell table:style-name="表格34.A3" office:value-type="string">
            <text:p text:style-name="P42" loext:marker-style-name="T152"><text:span text:style-name="T151">得知第 </text:span><text:span text:style-name="T214">1 </text:span><text:span text:style-name="T151">站位置</text:span></text:p>
          </table:table-cell>
        </table:table-row>
        <table:table-row table:style-name="表格34.1">
          <table:table-cell table:style-name="表格34.A4" office:value-type="string">
            <text:p text:style-name="P42" loext:marker-style-name="T149"><text:span text:style-name="T150">第 </text:span><text:span text:style-name="T212">2 </text:span><text:span text:style-name="T150">次</text:span></text:p>
          </table:table-cell>
          <table:table-cell table:style-name="表格34.A4" office:value-type="string">
            <text:p text:style-name="P42" loext:marker-style-name="T149"><text:span text:style-name="T212">TTL = 2</text:span><text:span text:style-name="T149"/></text:p>
          </table:table-cell>
          <table:table-cell table:style-name="表格34.A4" office:value-type="string">
            <text:p text:style-name="P42" loext:marker-style-name="T149"><text:span text:style-name="T153">通過第 </text:span><text:span text:style-name="T215">1 </text:span><text:span text:style-name="T153">站 → 抵達第 </text:span><text:span text:style-name="T215">2 </text:span><text:span text:style-name="T153">個 </text:span><text:span text:style-name="T215">Router</text:span><text:span text:style-name="T212"> → TTL </text:span><text:span text:style-name="T150">歸零 → 回傳 </text:span><text:span text:style-name="T212">ICMP</text:span></text:p>
          </table:table-cell>
          <table:table-cell table:style-name="表格34.A4" office:value-type="string">
            <text:p text:style-name="P42" loext:marker-style-name="T152"><text:span text:style-name="T151">得知第 </text:span><text:span text:style-name="T214">2 </text:span><text:span text:style-name="T151">站位置</text:span></text:p>
          </table:table-cell>
        </table:table-row>
        <table:table-row table:style-name="表格34.1">
          <table:table-cell table:style-name="表格34.A3" office:value-type="string">
            <text:p text:style-name="P42" loext:marker-style-name="T149"><text:span text:style-name="T150">第 </text:span><text:span text:style-name="T212">N </text:span><text:span text:style-name="T150">次</text:span></text:p>
          </table:table-cell>
          <table:table-cell table:style-name="表格34.A3" office:value-type="string">
            <text:p text:style-name="P42" loext:marker-style-name="T149"><text:span text:style-name="T212">TTL = N</text:span><text:span text:style-name="T149"/></text:p>
          </table:table-cell>
          <table:table-cell table:style-name="表格34.A3" office:value-type="string">
            <text:p text:style-name="P42" loext:marker-style-name="T149"><text:span text:style-name="T150">以此類推，每次多走一站</text:span><text:span text:style-name="T149"/></text:p>
          </table:table-cell>
          <table:table-cell table:style-name="表格34.A3" office:value-type="string">
            <text:p text:style-name="P42" loext:marker-style-name="T149"><text:span text:style-name="T150">逐步還原完整路徑</text:span><text:span text:style-name="T149"/></text:p>
          </table:table-cell>
        </table:table-row>
        <table:table-row table:style-name="表格34.1">
          <table:table-cell table:style-name="表格34.A4" office:value-type="string">
            <text:p text:style-name="P42" loext:marker-style-name="T149"><text:span text:style-name="T150">最後</text:span><text:span text:style-name="T149"/></text:p>
          </table:table-cell>
          <table:table-cell table:style-name="表格34.A4" office:value-type="string">
            <text:p text:style-name="P42" loext:marker-style-name="T149"><text:span text:style-name="T212">TTL = </text:span><text:span text:style-name="T150">距離</text:span></text:p>
          </table:table-cell>
          <table:table-cell table:style-name="表格34.A4" office:value-type="string">
            <text:p text:style-name="P42" loext:marker-style-name="T149"><text:span text:style-name="T150">封包抵達目的地，回傳正常應答</text:span><text:span text:style-name="T149"/></text:p>
          </table:table-cell>
          <table:table-cell table:style-name="表格34.A4" office:value-type="string">
            <text:p text:style-name="P42" loext:marker-style-name="T149"><text:span text:style-name="T150">路徑偵測完成 ✓</text:span><text:span text:style-name="T149"/>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6"><text:span text:style-name="T222">⚡ <text:s/></text:span><text:span text:style-name="T227">一句話記憶</text:span></text:p>
            <text:p text:style-name="P7" loext:marker-style-name="T112"><text:span text:style-name="T383">Traceroute = TTL </text:span><text:span text:style-name="T372">遞增 ＋ </text:span><text:span text:style-name="T383">ICMP </text:span><text:span text:style-name="T372">回報</text:span><text:span text:style-name="T111">，逐步「炸出」完整網路路徑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九、本篇考試必背心法</text:span><text:span text:style-name="T27"/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6"><text:span text:style-name="T222">🔥 <text:s/></text:span><text:span text:style-name="T287">TCP/IP </text:span><text:span text:style-name="T281">四層心法（背這個就夠）</text:span></text:p>
            <text:p text:style-name="P7"><text:span text:style-name="T288">🟢 Application</text:span><text:span text:style-name="T282">（應用層） → </text:span><text:span text:style-name="T111">給人用（</text:span><text:span text:style-name="T177">HTTP</text:span><text:span text:style-name="T111">、</text:span><text:span text:style-name="T177">DNS</text:span><text:span text:style-name="T111">、</text:span><text:span text:style-name="T177">DHCP</text:span><text:span text:style-name="T111">、</text:span><text:span text:style-name="T177">SSH</text:span><text:span text:style-name="T111">、</text:span><text:span text:style-name="T177">MQTT</text:span><text:span text:style-name="T111">）</text:span></text:p>
            <text:p text:style-name="P8"><text:soft-page-break/><text:span text:style-name="T288">🟡 Transport</text:span><text:span text:style-name="T282">（傳輸層） → </text:span><text:span text:style-name="T111">怎麼送（</text:span><text:span text:style-name="T177">TCP</text:span><text:span text:style-name="T111">＝穩定 </text:span><text:span text:style-name="T177">/ UDP</text:span><text:span text:style-name="T111">＝快速）</text:span><text:span text:style-name="T177">(</text:span><text:span text:style-name="T293">切分、編頁碼、確認收件</text:span><text:span text:style-name="T177">)</text:span></text:p>
            <text:p text:style-name="P8"><text:span text:style-name="T288">🔵 Network</text:span><text:span text:style-name="T282">（網路層） → </text:span><text:span text:style-name="T111">走哪條路（</text:span><text:span text:style-name="T177">IP</text:span><text:span text:style-name="T111">、</text:span><text:span text:style-name="T177">ICMP</text:span><text:span text:style-name="T111">）</text:span></text:p>
            <text:p text:style-name="P8"><text:span text:style-name="T288">🟠 Link</text:span><text:span text:style-name="T282">（連結層） → </text:span><text:span text:style-name="T111">同一區網怎麼接（</text:span><text:span text:style-name="T177">Ethernet</text:span><text:span text:style-name="T111">、</text:span><text:span text:style-name="T177">ARP</text:span><text:span text:style-name="T111">）</text:span><text:span text:style-name="T177">(</text:span><text:span text:style-name="T66">ARP</text:span><text:span text:style-name="T67"> </text:span><text:span text:style-name="T58">：</text:span><text:span text:style-name="T133">在</text:span><text:span text:style-name="T504">同一個</text:span><text:span text:style-name="T133">區域網路（</text:span><text:span text:style-name="T198">LAN</text:span><text:span text:style-name="T133">）中</text:span><text:span text:style-name="T111">，</text:span><text:span text:style-name="T393">將「</text:span><text:span text:style-name="T401">IP </text:span><text:span text:style-name="T393">位址（邏輯位址）」轉換成「</text:span><text:span text:style-name="T401">MAC </text:span><text:span text:style-name="T393">位址（實體位址）」</text:span><text:span text:style-name="T177">)</text:span></text:p>
          </table:table-cell>
        </table:table-row>
      </table:table>
      <text:h text:style-name="P32" text:outline-level="1" loext:marker-style-name="T73"><text:span text:style-name="T74">第 二 篇　</text:span><text:span text:style-name="T73">IP </text:span><text:span text:style-name="T74">位址與封包處理：分類 </text:span><text:span text:style-name="T73">· CIDR · VLSM · MTU · Fragmentation</text:span>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6"><text:span text:style-name="T222">📐 <text:s/></text:span><text:span text:style-name="T53">本篇重點</text:span></text:p>
            <text:p text:style-name="P7" loext:marker-style-name="T112"><text:span text:style-name="T111">本篇分兩大主軸：前半談「</text:span><text:span text:style-name="T200">IP </text:span><text:span text:style-name="T135">位址如何劃分</text:span><text:span text:style-name="T111">」（分類、</text:span><text:span text:style-name="T177">CIDR</text:span><text:span text:style-name="T111">、子網計算、</text:span><text:span text:style-name="T177">VLSM</text:span><text:span text:style-name="T111">、</text:span><text:span text:style-name="T177">CIDR </text:span><text:span text:style-name="T111">合併）；後半談「</text:span><text:span text:style-name="T135">封包如何被切割傳送</text:span><text:span text:style-name="T111">」（</text:span><text:span text:style-name="T177">MTU</text:span><text:span text:style-name="T111">、</text:span><text:span text:style-name="T177">Fragmentation</text:span><text:span text:style-name="T111">、</text:span><text:span text:style-name="T177">IP Header</text:span><text:span text:style-name="T111">、</text:span><text:span text:style-name="T177">DF/MF</text:span><text:span text:style-name="T111">、</text:span><text:span text:style-name="T177">PMTUD</text:span><text:span text:style-name="T111">、</text:span><text:span text:style-name="T177">MSS</text:span><text:span text:style-name="T111">、</text:span><text:span text:style-name="T177">Frag DoS</text:span><text:span text:style-name="T111">）。子網計算是計算題必考，務必動手練。</text:span></text:p>
          </table:table-cell>
        </table:table-row>
      </table:table>
      <text:h text:style-name="P11" text:outline-level="2" loext:marker-style-name="T27"><text:span text:style-name="T28">壹、</text:span><text:span text:style-name="T27">IP </text:span><text:span text:style-name="T28">位址基礎</text:span></text:h>
      <text:p text:style-name="P48" loext:marker-style-name="T112"><text:span text:style-name="T198">IP </text:span><text:span text:style-name="T133">位址（</text:span><text:span text:style-name="T198">IPv4</text:span><text:span text:style-name="T133">）是</text:span><text:span text:style-name="T317">一組 </text:span><text:span text:style-name="T343">32 </text:span><text:span text:style-name="T317">個 </text:span><text:span text:style-name="T343">bit</text:span><text:span text:style-name="T111">，用來</text:span><text:span text:style-name="T472">識別網路上每一台設備的「地址」</text:span><text:span text:style-name="T111">。</text:span><text:span text:style-name="T133">為了人類方便閱讀</text:span><text:span text:style-name="T111">，</text:span><text:span text:style-name="T135">這 </text:span><text:span text:style-name="T200">32 </text:span><text:span text:style-name="T135">個 </text:span><text:span text:style-name="T200">bit </text:span><text:span text:style-name="T135">被分成 </text:span><text:span text:style-name="T200">4 </text:span><text:span text:style-name="T135">組</text:span><text:span text:style-name="T111">、</text:span><text:span text:style-name="T372">每組 </text:span><text:span text:style-name="T383">8 </text:span><text:span text:style-name="T372">個 </text:span><text:span text:style-name="T383">bit</text:span><text:span text:style-name="T372">（一個 </text:span><text:span text:style-name="T383">Octet</text:span><text:span text:style-name="T372">），再轉成十進位</text:span><text:span text:style-name="T111">、以「點」隔開。</text:span>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39" loext:marker-style-name="T75"><text:span text:style-name="T82">Octet 1</text:span><text:span text:style-name="T75"/></text:p>
            </table:table-cell>
            <table:table-cell table:style-name="表格37.A1" office:value-type="string">
              <text:p text:style-name="P39" loext:marker-style-name="T75"><text:span text:style-name="T82">Octet 2</text:span><text:span text:style-name="T75"/></text:p>
            </table:table-cell>
            <table:table-cell table:style-name="表格37.A1" office:value-type="string">
              <text:p text:style-name="P39" loext:marker-style-name="T75"><text:span text:style-name="T82">Octet 3</text:span><text:span text:style-name="T75"/></text:p>
            </table:table-cell>
            <table:table-cell table:style-name="表格37.A1" office:value-type="string">
              <text:p text:style-name="P39" loext:marker-style-name="T75"><text:span text:style-name="T82">Octet 4</text:span><text:span text:style-name="T75"/>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42" loext:marker-style-name="T144"><text:span text:style-name="T209">192</text:span><text:span text:style-name="T144"/></text:p>
          </table:table-cell>
          <table:table-cell table:style-name="表格37.A2" office:value-type="string">
            <text:p text:style-name="P42" loext:marker-style-name="T144"><text:span text:style-name="T209">168</text:span><text:span text:style-name="T144"/></text:p>
          </table:table-cell>
          <table:table-cell table:style-name="表格37.A2" office:value-type="string">
            <text:p text:style-name="P42" loext:marker-style-name="T144"><text:span text:style-name="T209">1</text:span><text:span text:style-name="T144"/></text:p>
          </table:table-cell>
          <table:table-cell table:style-name="表格37.A2" office:value-type="string">
            <text:p text:style-name="P42" loext:marker-style-name="T144"><text:span text:style-name="T209">0</text:span><text:span text:style-name="T144"/></text:p>
          </table:table-cell>
        </table:table-row>
      </table:table>
      <text:p text:style-name="P48" loext:marker-style-name="T10"><text:span text:style-name="T20">→ </text:span><text:span text:style-name="T317">總共 </text:span><text:span text:style-name="T343">4 × 8 = 32 </text:span><text:span text:style-name="T317">個 </text:span><text:span text:style-name="T343">bit</text:span><text:span text:style-name="T11">，</text:span><text:span text:style-name="T569">每組數字範圍 </text:span><text:span text:style-name="T570">0</text:span><text:span text:style-name="T569">～</text:span><text:span text:style-name="T570">255</text:span><text:span text:style-name="T11">（因為 </text:span><text:span text:style-name="T570">2⁸ = 256 </text:span><text:span text:style-name="T569">種組合</text:span><text:span text:style-name="T11">）。</text:span>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6"><text:span text:style-name="T222">💡 <text:s/></text:span><text:span text:style-name="T247">為什麼 </text:span><text:span text:style-name="T251">IP </text:span><text:span text:style-name="T247">數量一定是 </text:span><text:span text:style-name="T251">2 </text:span><text:span text:style-name="T247">的次方？</text:span></text:p>
            <text:p text:style-name="P7" loext:marker-style-name="T112"><text:span text:style-name="T135">每一個 </text:span><text:span text:style-name="T200">bit </text:span><text:span text:style-name="T135">只有 </text:span><text:span text:style-name="T200">0 </text:span><text:span text:style-name="T135">或 </text:span><text:span text:style-name="T200">1 </text:span><text:span text:style-name="T135">兩種狀態</text:span><text:span text:style-name="T111">。若有 </text:span><text:span text:style-name="T177">n </text:span><text:span text:style-name="T111">個 </text:span><text:span text:style-name="T177">bit </text:span><text:span text:style-name="T111">可自由變化，可能的組合數 ＝ </text:span><text:span text:style-name="T177">2ⁿ</text:span><text:span text:style-name="T111">。</text:span></text:p>
            <text:p text:style-name="P8" loext:marker-style-name="T112"><text:span text:style-name="T111">因此</text:span><text:span text:style-name="T294">子網路的 </text:span><text:span text:style-name="T295">IP </text:span><text:span text:style-name="T294">總數一定是 </text:span><text:span text:style-name="T295">2</text:span><text:span text:style-name="T294">、</text:span><text:span text:style-name="T295">4</text:span><text:span text:style-name="T294">、</text:span><text:span text:style-name="T295">8</text:span><text:span text:style-name="T294">、</text:span><text:span text:style-name="T295">16</text:span><text:span text:style-name="T294">、</text:span><text:span text:style-name="T295">32</text:span><text:span text:style-name="T294">、</text:span><text:span text:style-name="T295">64</text:span><text:span text:style-name="T294">、</text:span><text:span text:style-name="T295">128</text:span><text:span text:style-name="T294">、</text:span><text:span text:style-name="T295">256… </text:span><text:span text:style-name="T294">等 </text:span><text:span text:style-name="T295">2 </text:span><text:span text:style-name="T294">的次方</text:span><text:span text:style-name="T111">，不可能是 </text:span><text:span text:style-name="T177">100 </text:span><text:span text:style-name="T111">或 </text:span><text:span text:style-name="T177">50</text:span><text:span text:style-name="T111">。這就是</text:span><text:span text:style-name="T571">計算子網時必須「找最接近的 </text:span><text:span text:style-name="T594">2ⁿ</text:span><text:span text:style-name="T571">」</text:span><text:span text:style-name="T111">的根本原因。</text:span></text:p>
          </table:table-cell>
        </table:table-row>
      </table:table>
      <text:h text:style-name="P11" text:outline-level="2" loext:marker-style-name="T27"><text:span text:style-name="T28">貳、</text:span><text:span text:style-name="T27">IP </text:span><text:span text:style-name="T28">分類（</text:span><text:span text:style-name="T27">A / B / C </text:span><text:span text:style-name="T28">類）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4" loext:marker-style-name="T71"><text:span text:style-name="T72">類別</text:span><text:span text:style-name="T71"/></text:p>
            </table:table-cell>
            <table:table-cell table:style-name="表格39.A1" office:value-type="string">
              <text:p text:style-name="P4" loext:marker-style-name="T71"><text:span text:style-name="T72">第一組數字範圍</text:span><text:span text:style-name="T71"/></text:p>
            </table:table-cell>
            <table:table-cell table:style-name="表格39.A1" office:value-type="string">
              <text:p text:style-name="P4" loext:marker-style-name="T71"><text:span text:style-name="T72">預設遮罩</text:span><text:span text:style-name="T71"/></text:p>
            </table:table-cell>
            <table:table-cell table:style-name="表格39.A1" office:value-type="string">
              <text:p text:style-name="P4" loext:marker-style-name="T71"><text:span text:style-name="T72">用途</text:span><text:span text:style-name="T71"/></text:p>
            </table:table-cell>
            <table:table-cell table:style-name="表格39.A1" office:value-type="string">
              <text:p text:style-name="P4" loext:marker-style-name="T71"><text:span text:style-name="T72">每網路主機數</text:span><text:span text:style-name="T71"/>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42" loext:marker-style-name="T85"><text:span text:style-name="T161">A </text:span><text:span text:style-name="T86">類</text:span></text:p>
          </table:table-cell>
          <table:table-cell table:style-name="表格39.A2" office:value-type="string">
            <text:p text:style-name="P42" loext:marker-style-name="T363"><text:span text:style-name="T377">1 </text:span><text:span text:style-name="T364">～ </text:span><text:span text:style-name="T377">126</text:span></text:p>
          </table:table-cell>
          <table:table-cell table:style-name="表格39.A2" office:value-type="string">
            <text:p text:style-name="P42" loext:marker-style-name="T408"><text:span text:style-name="T410">/8</text:span><text:span text:style-name="T408"/></text:p>
          </table:table-cell>
          <table:table-cell table:style-name="表格39.A2" office:value-type="string">
            <text:p text:style-name="P42" loext:marker-style-name="T85"><text:span text:style-name="T86">超大型網路</text:span><text:span text:style-name="T85"/></text:p>
          </table:table-cell>
          <table:table-cell table:style-name="表格39.A2" office:value-type="string">
            <text:p text:style-name="P42" loext:marker-style-name="T85"><text:span text:style-name="T86">約 </text:span><text:span text:style-name="T161">1,677 </text:span><text:span text:style-name="T86">萬</text:span></text:p>
          </table:table-cell>
        </table:table-row>
        <table:table-row table:style-name="表格39.1">
          <table:table-cell table:style-name="表格39.A3" office:value-type="string">
            <text:p text:style-name="P42" loext:marker-style-name="T85"><text:span text:style-name="T161">B </text:span><text:span text:style-name="T86">類</text:span></text:p>
          </table:table-cell>
          <table:table-cell table:style-name="表格39.A3" office:value-type="string">
            <text:p text:style-name="P42" loext:marker-style-name="T363"><text:span text:style-name="T377">128 </text:span><text:span text:style-name="T364">～ </text:span><text:span text:style-name="T377">191</text:span></text:p>
          </table:table-cell>
          <table:table-cell table:style-name="表格39.A3" office:value-type="string">
            <text:p text:style-name="P42" loext:marker-style-name="T408"><text:span text:style-name="T410">/16</text:span><text:span text:style-name="T408"/></text:p>
          </table:table-cell>
          <table:table-cell table:style-name="表格39.A3" office:value-type="string">
            <text:p text:style-name="P42" loext:marker-style-name="T85"><text:span text:style-name="T86">中型網路</text:span><text:span text:style-name="T85"/></text:p>
          </table:table-cell>
          <table:table-cell table:style-name="表格39.A3" office:value-type="string">
            <text:p text:style-name="P42" loext:marker-style-name="T85"><text:span text:style-name="T86">約 </text:span><text:span text:style-name="T161">6.5 </text:span><text:span text:style-name="T86">萬</text:span></text:p>
          </table:table-cell>
        </table:table-row>
        <table:table-row table:style-name="表格39.1">
          <table:table-cell table:style-name="表格39.A2" office:value-type="string">
            <text:p text:style-name="P42" loext:marker-style-name="T85"><text:span text:style-name="T161">C </text:span><text:span text:style-name="T86">類</text:span></text:p>
          </table:table-cell>
          <table:table-cell table:style-name="表格39.A2" office:value-type="string">
            <text:p text:style-name="P42" loext:marker-style-name="T363"><text:span text:style-name="T377">192 </text:span><text:span text:style-name="T364">～ </text:span><text:span text:style-name="T377">223</text:span></text:p>
          </table:table-cell>
          <table:table-cell table:style-name="表格39.A2" office:value-type="string">
            <text:p text:style-name="P42" loext:marker-style-name="T408"><text:span text:style-name="T410">/24</text:span><text:span text:style-name="T408"/></text:p>
          </table:table-cell>
          <table:table-cell table:style-name="表格39.A2" office:value-type="string">
            <text:p text:style-name="P42" loext:marker-style-name="T85"><text:span text:style-name="T86">小型網路</text:span><text:span text:style-name="T85"/></text:p>
          </table:table-cell>
          <table:table-cell table:style-name="表格39.A2" office:value-type="string">
            <text:p text:style-name="P42" loext:marker-style-name="T85"><text:span text:style-name="T161">254</text:span><text:span text:style-name="T85"/>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7"><text:span text:style-name="T249">127.x.x.x </text:span><text:span text:style-name="T244">為何不在 </text:span><text:span text:style-name="T249">A </text:span><text:span text:style-name="T244">類？　</text:span><text:span text:style-name="T178">127.0.0.1 </text:span><text:span text:style-name="T113">是回送位址（</text:span><text:span text:style-name="T178">Loopback</text:span><text:span text:style-name="T113">），保留給本機自我測試</text:span><text:span text:style-name="T111">；</text:span><text:span text:style-name="T594">ping 127.0.0.1 </text:span><text:span text:style-name="T571">可測本機協定是否正常，故 </text:span><text:span text:style-name="T594">A </text:span><text:span text:style-name="T571">類跳過 </text:span><text:span text:style-name="T594">127</text:span><text:span text:style-name="T111">，只到 </text:span><text:span text:style-name="T177">126</text:span><text:span text:style-name="T111">。</text:span></text:p>
            <text:p text:style-name="P8"><text:span text:style-name="T243">其他保留位址：</text:span><text:span text:style-name="T204">0.x.x.x</text:span><text:span text:style-name="T139">＝代表「這個網路本身」</text:span><text:span text:style-name="T111">；</text:span><text:span text:style-name="T203">224</text:span><text:span text:style-name="T138">～</text:span><text:span text:style-name="T203">239</text:span><text:span text:style-name="T138">＝</text:span><text:span text:style-name="T203">D </text:span><text:span text:style-name="T138">類（群播 </text:span><text:span text:style-name="T203">Multicast</text:span><text:span text:style-name="T138">）</text:span><text:span text:style-name="T111">；</text:span><text:span text:style-name="T200">240</text:span><text:span text:style-name="T135">～</text:span><text:span text:style-name="T200">255</text:span><text:span text:style-name="T135">＝</text:span><text:span text:style-name="T200">E </text:span><text:span text:style-name="T135">類（實驗用）</text:span><text:span text:style-name="T111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參、</text:span><text:span text:style-name="T27">CIDR </text:span><text:span text:style-name="T28">表示法（斜線 </text:span><text:span text:style-name="T27">/</text:span><text:span text:style-name="T28">幾）</text:span></text:h>
      <text:p text:style-name="P48" loext:marker-style-name="T112"><text:span text:style-name="T198">CIDR</text:span><text:span text:style-name="T133">（無類別網域間路由）</text:span><text:span text:style-name="T111">以</text:span><text:span text:style-name="T317">「</text:span><text:span text:style-name="T343">IP + / + </text:span><text:span text:style-name="T317">數字」精確表示網路大小</text:span><text:span text:style-name="T111">，例如 </text:span><text:span text:style-name="T177">192.168.1.0/24</text:span><text:span text:style-name="T111">。</text:span><text:span text:style-name="T383">/ </text:span><text:span text:style-name="T372">後面的數字 ＝ 前幾個 </text:span><text:span text:style-name="T383">bit </text:span><text:span text:style-name="T372">是「網路部分」（固定不變）</text:span><text:span text:style-name="T111">，</text:span><text:span text:style-name="T294">剩下的才是「主機部分」（可變）</text:span><text:span text:style-name="T111">。</text:span>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4" loext:marker-style-name="T71"><text:span text:style-name="T72">表示法</text:span><text:span text:style-name="T71"/></text:p>
            </table:table-cell>
            <table:table-cell table:style-name="表格40.A1" office:value-type="string">
              <text:p text:style-name="P4" loext:marker-style-name="T71"><text:span text:style-name="T72">網路 </text:span><text:span text:style-name="T81">bit</text:span></text:p>
            </table:table-cell>
            <table:table-cell table:style-name="表格40.A1" office:value-type="string">
              <text:p text:style-name="P4" loext:marker-style-name="T71"><text:span text:style-name="T72">主機 </text:span><text:span text:style-name="T81">bit</text:span></text:p>
            </table:table-cell>
            <table:table-cell table:style-name="表格40.A1" office:value-type="string">
              <text:p text:style-name="P4" loext:marker-style-name="T71"><text:span text:style-name="T81">IP </text:span><text:span text:style-name="T72">總數</text:span></text:p>
            </table:table-cell>
            <table:table-cell table:style-name="表格40.A1" office:value-type="string">
              <text:p text:style-name="P4" loext:marker-style-name="T71"><text:span text:style-name="T72">對應哪段固定</text:span><text:span text:style-name="T71"/>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42" loext:marker-style-name="T408"><text:span text:style-name="T410">/8</text:span><text:span text:style-name="T408"/></text:p>
          </table:table-cell>
          <table:table-cell table:style-name="表格40.A2" office:value-type="string">
            <text:p text:style-name="P42" loext:marker-style-name="T417"><text:span text:style-name="T443">8</text:span><text:span text:style-name="T417"/></text:p>
          </table:table-cell>
          <table:table-cell table:style-name="表格40.A2" office:value-type="string">
            <text:p text:style-name="P42" loext:marker-style-name="T300"><text:span text:style-name="T337">24</text:span><text:span text:style-name="T300"/></text:p>
          </table:table-cell>
          <table:table-cell table:style-name="表格40.A2" office:value-type="string">
            <text:p text:style-name="P42" loext:marker-style-name="T499"><text:span text:style-name="T495">16,777,216</text:span><text:span text:style-name="T499"/></text:p>
          </table:table-cell>
          <table:table-cell table:style-name="表格40.A2" office:value-type="string">
            <text:p text:style-name="P42" loext:marker-style-name="T85"><text:span text:style-name="T86">第 </text:span><text:span text:style-name="T161">1 </text:span><text:span text:style-name="T86">組（</text:span><text:span text:style-name="T161">A </text:span><text:span text:style-name="T86">類）</text:span></text:p>
          </table:table-cell>
        </table:table-row>
        <table:table-row table:style-name="表格40.1">
          <table:table-cell table:style-name="表格40.A3" office:value-type="string">
            <text:p text:style-name="P42" loext:marker-style-name="T408"><text:span text:style-name="T410">/16</text:span><text:span text:style-name="T408"/></text:p>
          </table:table-cell>
          <table:table-cell table:style-name="表格40.A3" office:value-type="string">
            <text:p text:style-name="P42" loext:marker-style-name="T417"><text:span text:style-name="T443">16</text:span><text:span text:style-name="T417"/></text:p>
          </table:table-cell>
          <table:table-cell table:style-name="表格40.A3" office:value-type="string">
            <text:p text:style-name="P42" loext:marker-style-name="T300"><text:span text:style-name="T337">16</text:span><text:span text:style-name="T300"/></text:p>
          </table:table-cell>
          <table:table-cell table:style-name="表格40.A3" office:value-type="string">
            <text:p text:style-name="P42" loext:marker-style-name="T499"><text:span text:style-name="T495">65,536</text:span><text:span text:style-name="T499"/></text:p>
          </table:table-cell>
          <table:table-cell table:style-name="表格40.A3" office:value-type="string">
            <text:p text:style-name="P42" loext:marker-style-name="T85"><text:span text:style-name="T86">第 </text:span><text:span text:style-name="T161">1-2 </text:span><text:span text:style-name="T86">組（</text:span><text:span text:style-name="T161">B </text:span><text:span text:style-name="T86">類）</text:span></text:p>
          </table:table-cell>
        </table:table-row>
        <table:table-row table:style-name="表格40.1">
          <table:table-cell table:style-name="表格40.A2" office:value-type="string">
            <text:p text:style-name="P42" loext:marker-style-name="T408"><text:span text:style-name="T410">/24</text:span><text:span text:style-name="T408"/></text:p>
          </table:table-cell>
          <table:table-cell table:style-name="表格40.A2" office:value-type="string">
            <text:p text:style-name="P42" loext:marker-style-name="T417"><text:span text:style-name="T443">24</text:span><text:span text:style-name="T417"/></text:p>
          </table:table-cell>
          <table:table-cell table:style-name="表格40.A2" office:value-type="string">
            <text:p text:style-name="P42" loext:marker-style-name="T300"><text:span text:style-name="T337">8</text:span><text:span text:style-name="T300"/></text:p>
          </table:table-cell>
          <table:table-cell table:style-name="表格40.A2" office:value-type="string">
            <text:p text:style-name="P42" loext:marker-style-name="T499"><text:span text:style-name="T495">256</text:span><text:span text:style-name="T499"/></text:p>
          </table:table-cell>
          <table:table-cell table:style-name="表格40.A2" office:value-type="string">
            <text:p text:style-name="P42" loext:marker-style-name="T85"><text:span text:style-name="T86">第 </text:span><text:span text:style-name="T161">1-3 </text:span><text:span text:style-name="T86">組（</text:span><text:span text:style-name="T161">C </text:span><text:span text:style-name="T86">類）</text:span></text:p>
          </table:table-cell>
        </table:table-row>
        <table:table-row table:style-name="表格40.1">
          <table:table-cell table:style-name="表格40.A3" office:value-type="string">
            <text:p text:style-name="P42" loext:marker-style-name="T408"><text:span text:style-name="T410">/25</text:span><text:span text:style-name="T408"/></text:p>
          </table:table-cell>
          <table:table-cell table:style-name="表格40.A3" office:value-type="string">
            <text:p text:style-name="P42" loext:marker-style-name="T417"><text:span text:style-name="T443">25</text:span><text:span text:style-name="T417"/></text:p>
          </table:table-cell>
          <table:table-cell table:style-name="表格40.A3" office:value-type="string">
            <text:p text:style-name="P42" loext:marker-style-name="T300"><text:span text:style-name="T337">7</text:span><text:span text:style-name="T300"/></text:p>
          </table:table-cell>
          <table:table-cell table:style-name="表格40.A3" office:value-type="string">
            <text:p text:style-name="P42" loext:marker-style-name="T499"><text:span text:style-name="T495">128</text:span><text:span text:style-name="T499"/></text:p>
          </table:table-cell>
          <table:table-cell table:style-name="表格40.A3" office:value-type="string">
            <text:p text:style-name="P42" loext:marker-style-name="T85"><text:span text:style-name="T86">第 </text:span><text:span text:style-name="T161">1-3 </text:span><text:span text:style-name="T86">組 </text:span><text:span text:style-name="T161">+ </text:span><text:span text:style-name="T86">第 </text:span><text:span text:style-name="T161">4 </text:span><text:span text:style-name="T86">組前 </text:span><text:span text:style-name="T161">1 bit</text:span></text:p>
          </table:table-cell>
        </table:table-row>
        <table:table-row table:style-name="表格40.1">
          <table:table-cell table:style-name="表格40.A2" office:value-type="string">
            <text:p text:style-name="P42" loext:marker-style-name="T408"><text:span text:style-name="T410">/26</text:span><text:span text:style-name="T408"/></text:p>
          </table:table-cell>
          <table:table-cell table:style-name="表格40.A2" office:value-type="string">
            <text:p text:style-name="P42" loext:marker-style-name="T418"><text:span text:style-name="T444">26</text:span><text:span text:style-name="T418"/></text:p>
          </table:table-cell>
          <table:table-cell table:style-name="表格40.A2" office:value-type="string">
            <text:p text:style-name="P42" loext:marker-style-name="T301"><text:span text:style-name="T338">6</text:span><text:span text:style-name="T301"/></text:p>
          </table:table-cell>
          <table:table-cell table:style-name="表格40.A2" office:value-type="string">
            <text:p text:style-name="P42" loext:marker-style-name="T499"><text:span text:style-name="T495">64</text:span><text:span text:style-name="T499"/></text:p>
          </table:table-cell>
          <table:table-cell table:style-name="表格40.A2" office:value-type="string">
            <text:p text:style-name="P42" loext:marker-style-name="T85"><text:span text:style-name="T86">第 </text:span><text:span text:style-name="T161">1-3 </text:span><text:span text:style-name="T86">組 </text:span><text:span text:style-name="T161">+ </text:span><text:span text:style-name="T86">第 </text:span><text:span text:style-name="T161">4 </text:span><text:span text:style-name="T86">組前 </text:span><text:span text:style-name="T161">2 bit</text:span></text:p>
          </table:table-cell>
        </table:table-row>
        <text:soft-page-break/>
        <table:table-row table:style-name="表格40.1">
          <table:table-cell table:style-name="表格40.A3" office:value-type="string">
            <text:p text:style-name="P42" loext:marker-style-name="T408"><text:span text:style-name="T410">/27</text:span><text:span text:style-name="T408"/></text:p>
          </table:table-cell>
          <table:table-cell table:style-name="表格40.A3" office:value-type="string">
            <text:p text:style-name="P42" loext:marker-style-name="T418"><text:span text:style-name="T444">27</text:span><text:span text:style-name="T418"/></text:p>
          </table:table-cell>
          <table:table-cell table:style-name="表格40.A3" office:value-type="string">
            <text:p text:style-name="P42" loext:marker-style-name="T301"><text:span text:style-name="T338">5</text:span><text:span text:style-name="T301"/></text:p>
          </table:table-cell>
          <table:table-cell table:style-name="表格40.A3" office:value-type="string">
            <text:p text:style-name="P42" loext:marker-style-name="T499"><text:span text:style-name="T495">32</text:span><text:span text:style-name="T499"/></text:p>
          </table:table-cell>
          <table:table-cell table:style-name="表格40.A3" office:value-type="string">
            <text:p text:style-name="P42" loext:marker-style-name="T85"><text:span text:style-name="T86">第 </text:span><text:span text:style-name="T161">1-3 </text:span><text:span text:style-name="T86">組 </text:span><text:span text:style-name="T161">+ </text:span><text:span text:style-name="T86">第 </text:span><text:span text:style-name="T161">4 </text:span><text:span text:style-name="T86">組前 </text:span><text:span text:style-name="T161">3 bit</text:span></text:p>
          </table:table-cell>
        </table:table-row>
        <table:table-row table:style-name="表格40.1">
          <table:table-cell table:style-name="表格40.A2" office:value-type="string">
            <text:p text:style-name="P42" loext:marker-style-name="T408"><text:span text:style-name="T410">/28</text:span><text:span text:style-name="T408"/></text:p>
          </table:table-cell>
          <table:table-cell table:style-name="表格40.A2" office:value-type="string">
            <text:p text:style-name="P42" loext:marker-style-name="T418"><text:span text:style-name="T444">28</text:span><text:span text:style-name="T418"/></text:p>
          </table:table-cell>
          <table:table-cell table:style-name="表格40.A2" office:value-type="string">
            <text:p text:style-name="P42" loext:marker-style-name="T301"><text:span text:style-name="T338">4</text:span><text:span text:style-name="T301"/></text:p>
          </table:table-cell>
          <table:table-cell table:style-name="表格40.A2" office:value-type="string">
            <text:p text:style-name="P42" loext:marker-style-name="T499"><text:span text:style-name="T495">16</text:span><text:span text:style-name="T499"/></text:p>
          </table:table-cell>
          <table:table-cell table:style-name="表格40.A2" office:value-type="string">
            <text:p text:style-name="P42" loext:marker-style-name="T85"><text:span text:style-name="T86">第 </text:span><text:span text:style-name="T161">1-3 </text:span><text:span text:style-name="T86">組 </text:span><text:span text:style-name="T161">+ </text:span><text:span text:style-name="T86">第 </text:span><text:span text:style-name="T161">4 </text:span><text:span text:style-name="T86">組前 </text:span><text:span text:style-name="T161">4 bit</text:span>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6"><text:span text:style-name="T222">▸ <text:s/></text:span><text:span text:style-name="T53">用 </text:span><text:span text:style-name="T65">bit </text:span><text:span text:style-name="T53">切割理解 </text:span><text:span text:style-name="T65">/26</text:span></text:p>
            <text:p text:style-name="P7" loext:marker-style-name="T112"><text:span text:style-name="T111">以 </text:span><text:span text:style-name="T177">192.168.1.0</text:span><text:span text:style-name="T178">/26</text:span><text:span text:style-name="T177"> </text:span><text:span text:style-name="T111">為例：</text:span></text:p>
            <text:p text:style-name="P8"><text:span text:style-name="T67">11000000 . 10101000 . 00000001 . 00</text:span><text:span text:style-name="T46">|000000</text:span></text:p>
            <text:p text:style-name="P8" loext:marker-style-name="T112"><text:span text:style-name="T177">└── </text:span><text:span text:style-name="T135">前 </text:span><text:span text:style-name="T200">26 bit</text:span><text:span text:style-name="T135">（固定＝網路）</text:span><text:span text:style-name="T111">──┘ └ </text:span><text:span text:style-name="T317">後 </text:span><text:span text:style-name="T343">6 bit</text:span><text:span text:style-name="T317">（可變＝主機）</text:span><text:span text:style-name="T111">┘</text:span></text:p>
            <text:p text:style-name="P8" loext:marker-style-name="T112"><text:span text:style-name="T177">→ </text:span><text:span text:style-name="T612">主機 </text:span><text:span text:style-name="T614">bit </text:span><text:span text:style-name="T612">有 </text:span><text:span text:style-name="T614">6 </text:span><text:span text:style-name="T612">個 → </text:span><text:span text:style-name="T614">2⁶ = 64 </text:span><text:span text:style-name="T612">個 </text:span><text:span text:style-name="T614">IP</text:span><text:span text:style-name="T111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肆、為什麼可用主機數要「−</text:span><text:span text:style-name="T27">2</text:span><text:span text:style-name="T28">」？</text:span>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4" loext:marker-style-name="T71"><text:span text:style-name="T72">名稱</text:span><text:span text:style-name="T71"/></text:p>
            </table:table-cell>
            <table:table-cell table:style-name="表格41.A1" office:value-type="string">
              <text:p text:style-name="P4" loext:marker-style-name="T71"><text:span text:style-name="T72">位置</text:span><text:span text:style-name="T71"/></text:p>
            </table:table-cell>
            <table:table-cell table:style-name="表格41.A1" office:value-type="string">
              <text:p text:style-name="P4" loext:marker-style-name="T71"><text:span text:style-name="T72">用途</text:span><text:span text:style-name="T71"/>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42" loext:marker-style-name="T514"><text:span text:style-name="T515">網路位址 </text:span><text:span text:style-name="T535">Network Address</text:span></text:p>
          </table:table-cell>
          <table:table-cell table:style-name="表格41.A2" office:value-type="string">
            <text:p text:style-name="P42" loext:marker-style-name="T363"><text:span text:style-name="T364">第一個 </text:span><text:span text:style-name="T377">IP</text:span><text:span text:style-name="T364">（最小）</text:span></text:p>
          </table:table-cell>
          <table:table-cell table:style-name="表格41.A2" office:value-type="string">
            <text:p text:style-name="P42" loext:marker-style-name="T85"><text:span text:style-name="T86">代表這整個子網路本身，不能分配給設備</text:span><text:span text:style-name="T85"/></text:p>
          </table:table-cell>
        </table:table-row>
        <table:table-row table:style-name="表格41.1">
          <table:table-cell table:style-name="表格41.A3" office:value-type="string">
            <text:p text:style-name="P42" loext:marker-style-name="T514"><text:span text:style-name="T515">廣播位址 </text:span><text:span text:style-name="T535">Broadcast Address</text:span></text:p>
          </table:table-cell>
          <table:table-cell table:style-name="表格41.A3" office:value-type="string">
            <text:p text:style-name="P42" loext:marker-style-name="T363"><text:span text:style-name="T364">最後一個 </text:span><text:span text:style-name="T377">IP</text:span><text:span text:style-name="T364">（最大）</text:span></text:p>
          </table:table-cell>
          <table:table-cell table:style-name="表格41.A3" office:value-type="string">
            <text:p text:style-name="P42" loext:marker-style-name="T85"><text:span text:style-name="T387">送到此位址＝網路內所有設備都收到</text:span><text:span text:style-name="T86">，不能分配給單一設備</text:span>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7" loext:marker-style-name="T283"><text:span text:style-name="T284">可用主機數 ＝ </text:span><text:span text:style-name="T289">IP </text:span><text:span text:style-name="T284">總數 − </text:span><text:span text:style-name="T289">2</text:span></text:p>
            <text:p text:style-name="P8" loext:marker-style-name="T112"><text:span text:style-name="T111">【</text:span><text:span text:style-name="T177">/24 </text:span><text:span text:style-name="T111">示範】</text:span><text:span text:style-name="T198">192.168.1.0</text:span><text:span text:style-name="T133">＝網路位址（不能用）</text:span><text:span text:style-name="T111">… </text:span><text:span text:style-name="T203">192.168.1.255</text:span><text:span text:style-name="T138">＝廣播位址（不能用）</text:span><text:span text:style-name="T111">→ </text:span><text:span text:style-name="T561">共 </text:span><text:span text:style-name="T556">256 </text:span><text:span text:style-name="T561">個，可用 </text:span><text:span text:style-name="T556">254 </text:span><text:span text:style-name="T561">個</text:span><text:span text:style-name="T111">。</text:span></text:p>
            <text:p text:style-name="P8" loext:marker-style-name="T112"><text:span text:style-name="T111">【</text:span><text:span text:style-name="T177">/26 </text:span><text:span text:style-name="T111">示範</text:span><text:span text:style-name="T177">·</text:span><text:span text:style-name="T111">最常考】</text:span><text:span text:style-name="T198">192.168.1.0</text:span><text:span text:style-name="T133">＝網路位址</text:span><text:span text:style-name="T111"> … </text:span><text:span text:style-name="T203">192.168.1.63</text:span><text:span text:style-name="T138">＝廣播位址</text:span><text:span text:style-name="T111"> → </text:span><text:span text:style-name="T561">共 </text:span><text:span text:style-name="T556">64 </text:span><text:span text:style-name="T561">個（</text:span><text:span text:style-name="T556">2⁶</text:span><text:span text:style-name="T561">），可用 </text:span><text:span text:style-name="T556">62 </text:span><text:span text:style-name="T561">個</text:span><text:span text:style-name="T111">。</text:span>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7"><text:span text:style-name="T245">唯一例外 </text:span><text:span text:style-name="T250">/31</text:span><text:span text:style-name="T245">（點對點，</text:span><text:span text:style-name="T250">RFC 3021</text:span><text:span text:style-name="T245">）：</text:span><text:span text:style-name="T431">只有 </text:span><text:span text:style-name="T452">2 </text:span><text:span text:style-name="T431">個 </text:span><text:span text:style-name="T452">IP</text:span><text:span text:style-name="T441">，</text:span><text:span text:style-name="T431">兩個都可用作主機</text:span><text:span text:style-name="T317">，沒有網路位址和廣播位址</text:span><text:span text:style-name="T111">。考試若未特別提到，預設仍要 −</text:span><text:span text:style-name="T177">2</text:span><text:span text:style-name="T111">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伍、</text:span><text:span text:style-name="T27">VLSM</text:span><text:span text:style-name="T28">（可變長度子網路遮罩）</text:span></text:h>
      <text:p text:style-name="P48" loext:marker-style-name="T112"><text:span text:style-name="T177">VLSM </text:span><text:span text:style-name="T111">的做法：</text:span><text:span text:style-name="T133">依各部門「實際需求」分配</text:span><text:span text:style-name="T473">剛剛好大小</text:span><text:span text:style-name="T133">的子網路，</text:span><text:span text:style-name="T523">不多給、不浪費</text:span><text:span text:style-name="T111">。例如 </text:span><text:span text:style-name="T177">A </text:span><text:span text:style-name="T111">部門 </text:span><text:span text:style-name="T177">100 </text:span><text:span text:style-name="T111">台、</text:span><text:span text:style-name="T177">B </text:span><text:span text:style-name="T111">部門 </text:span><text:span text:style-name="T177">50 </text:span><text:span text:style-name="T111">台、</text:span><text:span text:style-name="T177">C </text:span><text:span text:style-name="T111">部門 </text:span><text:span text:style-name="T177">10 </text:span><text:span text:style-name="T111">台，</text:span><text:span text:style-name="T432">若全用 </text:span><text:span text:style-name="T453">/24 </text:span><text:span text:style-name="T432">會浪費大量 </text:span><text:span text:style-name="T453">IP</text:span><text:span text:style-name="T111">。</text:span>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6"><text:span text:style-name="T222">📋 <text:s/></text:span><text:span text:style-name="T239">VLSM </text:span><text:span text:style-name="T227">標準流程（三步驟）</text:span></text:p>
            <text:p text:style-name="P7" loext:marker-style-name="T233"><text:span text:style-name="T240">①</text:span><text:span text:style-name="T242"> </text:span><text:span text:style-name="T234">將需求由大到小排序</text:span></text:p>
            <text:p text:style-name="P8"><text:span text:style-name="T240">② </text:span><text:span text:style-name="T234">計算每個需求所需前綴</text:span><text:span text:style-name="T232">：</text:span><text:span text:style-name="T504">需求 </text:span><text:span text:style-name="T506">+ 2 → </text:span><text:span text:style-name="T504">找最小 </text:span><text:span text:style-name="T506">2ⁿ → </text:span><text:span text:style-name="T504">前綴 </text:span><text:span text:style-name="T506">= 32 − n</text:span></text:p>
            <text:p text:style-name="P8" loext:marker-style-name="T233"><text:span text:style-name="T240">③ </text:span><text:span text:style-name="T232">依序從網路位址起點往後切割</text:span></text:p>
          </table:table-cell>
        </table:table-row>
        <table:table-row table:style-name="表格42.1">
          <table:table-cell table:style-name="表格42.A2" office:value-type="string">
            <text:p text:style-name="P7"><text:span text:style-name="T243">為什麼要「由大到小」？　</text:span><text:span text:style-name="T111">因為「對齊（</text:span><text:span text:style-name="T177">Alignment</text:span><text:span text:style-name="T111">）」：</text:span><text:span text:style-name="T317">子網路的起始位址必須是其大小的整數倍</text:span><text:span text:style-name="T111">。</text:span><text:span text:style-name="T616">大小 </text:span><text:span text:style-name="T633">128 </text:span><text:span text:style-name="T616">的子網只能從 </text:span><text:span text:style-name="T633">0</text:span><text:span text:style-name="T616">、</text:span><text:span text:style-name="T633">128… </text:span><text:span text:style-name="T616">開始；大小 </text:span><text:span text:style-name="T633">64 </text:span><text:span text:style-name="T616">的只能從 </text:span><text:span text:style-name="T633">0</text:span><text:span text:style-name="T616">、</text:span><text:span text:style-name="T633">64</text:span><text:span text:style-name="T616">、</text:span><text:span text:style-name="T633">128… </text:span><text:span text:style-name="T616">開始</text:span><text:span text:style-name="T111">。</text:span></text:p>
            <text:p text:style-name="P8"><text:span text:style-name="T243">反面示範：</text:span><text:span text:style-name="T111">若先切小的 </text:span><text:span text:style-name="T177">C</text:span><text:span text:style-name="T111">（</text:span><text:span text:style-name="T177">/28</text:span><text:span text:style-name="T111">，</text:span><text:span text:style-name="T177">0</text:span><text:span text:style-name="T111">～</text:span><text:span text:style-name="T177">15</text:span><text:span text:style-name="T111">），</text:span><text:span text:style-name="T474">再切大的 </text:span><text:span text:style-name="T486">A</text:span><text:span text:style-name="T474">（</text:span><text:span text:style-name="T486">/25</text:span><text:span text:style-name="T474">，</text:span><text:span text:style-name="T486">128 </text:span><text:span text:style-name="T474">個），最近可用對齊位址是 </text:span><text:span text:style-name="T486">128</text:span><text:span text:style-name="T177"> → </text:span><text:span text:style-name="T319">中間 </text:span><text:span text:style-name="T346">16</text:span><text:span text:style-name="T319">～</text:span><text:span text:style-name="T346">127 </text:span><text:span text:style-name="T319">共 </text:span><text:span text:style-name="T346">112 </text:span><text:span text:style-name="T319">個 </text:span><text:span text:style-name="T346">IP </text:span><text:span text:style-name="T319">全浪費！</text:span><text:span text:style-name="T111">正解：</text:span><text:span text:style-name="T372">先切大的，大的天然對齊，小的再從後面切</text:span><text:span text:style-name="T111">。</text:span></text:p>
          </table:table-cell>
        </table:table-row>
      </table:table>
      <text:h text:style-name="P12" text:outline-level="3"><text:span text:style-name="T225">▍</text:span><text:span text:style-name="T226"> </text:span><text:span text:style-name="T228">前綴計算公式詳解</text:span><text:span text:style-name="T227">（以</text:span><text:span text:style-name="T532">需要 </text:span><text:span text:style-name="T533">100 </text:span><text:span text:style-name="T532">台主機為例</text:span><text:span text:style-name="T227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7" loext:marker-style-name="T112"><text:span text:style-name="T177">① </text:span><text:span text:style-name="T135">加 </text:span><text:span text:style-name="T200">2</text:span><text:span text:style-name="T135">（預留網路 </text:span><text:span text:style-name="T200">+ </text:span><text:span text:style-name="T135">廣播）</text:span><text:span text:style-name="T111">：</text:span><text:span text:style-name="T178">100 + 2 = 102</text:span></text:p>
            <text:p text:style-name="P8" loext:marker-style-name="T112"><text:span text:style-name="T177">② </text:span><text:span text:style-name="T115">找「大於等於 </text:span><text:span text:style-name="T180">102</text:span><text:span text:style-name="T115">」的最小 </text:span><text:span text:style-name="T180">2ⁿ</text:span><text:span text:style-name="T111">：</text:span><text:span text:style-name="T177">2⁶ = 64</text:span><text:span text:style-name="T111">（太小）、</text:span><text:span text:style-name="T343">2⁷ = 128</text:span><text:span text:style-name="T317">（夠）→ </text:span><text:span text:style-name="T343">n = 7</text:span></text:p>
            <text:p text:style-name="P8" loext:marker-style-name="T112"><text:span text:style-name="T177">③ </text:span><text:span text:style-name="T372">前綴 </text:span><text:span text:style-name="T383">= 32 − n = 32 − 7 = 25</text:span><text:span text:style-name="T177"> →</text:span><text:span text:style-name="T461"> </text:span><text:span text:style-name="T433">使用 </text:span><text:span text:style-name="T454">/25</text:span><text:span text:style-name="T433">（驗證：</text:span><text:span text:style-name="T454">2⁷ = 128</text:span><text:span text:style-name="T433">，可用 </text:span><text:span text:style-name="T454">126 ≥ 100 ✔</text:span><text:span text:style-name="T433">）</text:span></text:p>
            <text:p text:style-name="P8" loext:marker-style-name="T25"><text:span text:style-name="T26">公式一句話</text:span><text:span text:style-name="T24">：</text:span><text:span text:style-name="T562">需求 </text:span><text:span text:style-name="T557">+2 → </text:span><text:span text:style-name="T562">找最小 </text:span><text:span text:style-name="T557">2ⁿ</text:span><text:span text:style-name="T46"> → </text:span><text:span text:style-name="T343">/(32−n)</text:span></text:p>
          </table:table-cell>
        </table:table-row>
      </table:table>
      <text:h text:style-name="P12" text:outline-level="3"><text:soft-page-break/><text:span text:style-name="T225">▍</text:span><text:span text:style-name="T226"> </text:span><text:span text:style-name="T227">完整範例：起始 </text:span><text:span text:style-name="T226">192.168.1.0/24</text:span><text:span text:style-name="T227">，需求 </text:span><text:span text:style-name="T226">A=100</text:span><text:span text:style-name="T227">、</text:span><text:span text:style-name="T226">B=50</text:span><text:span text:style-name="T227">、</text:span><text:span text:style-name="T226">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4" loext:marker-style-name="T77"><text:span text:style-name="T78">部門</text:span><text:span text:style-name="T77"/></text:p>
            </table:table-cell>
            <table:table-cell table:style-name="表格44.A1" office:value-type="string">
              <text:p text:style-name="P4" loext:marker-style-name="T77"><text:span text:style-name="T78">需求</text:span><text:span text:style-name="T77"/></text:p>
            </table:table-cell>
            <table:table-cell table:style-name="表格44.A1" office:value-type="string">
              <text:p text:style-name="P4" loext:marker-style-name="T77"><text:span text:style-name="T83">+2</text:span><text:span text:style-name="T77"/></text:p>
            </table:table-cell>
            <table:table-cell table:style-name="表格44.A1" office:value-type="string">
              <text:p text:style-name="P4" loext:marker-style-name="T77"><text:span text:style-name="T83">2ⁿ</text:span><text:span text:style-name="T77"/></text:p>
            </table:table-cell>
            <table:table-cell table:style-name="表格44.A1" office:value-type="string">
              <text:p text:style-name="P4" loext:marker-style-name="T77"><text:span text:style-name="T78">前綴</text:span><text:span text:style-name="T77"/></text:p>
            </table:table-cell>
            <table:table-cell table:style-name="表格44.A1" office:value-type="string">
              <text:p text:style-name="P4" loext:marker-style-name="T77"><text:span text:style-name="T78">切割結果（範圍）</text:span><text:span text:style-name="T77"/></text:p>
            </table:table-cell>
            <table:table-cell table:style-name="表格44.A1" office:value-type="string">
              <text:p text:style-name="P4" loext:marker-style-name="T77"><text:span text:style-name="T78">可用 </text:span><text:span text:style-name="T83">/ </text:span><text:span text:style-name="T78">需求</text:span>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42" loext:marker-style-name="T149"><text:span text:style-name="T212">A</text:span><text:span text:style-name="T149"/></text:p>
          </table:table-cell>
          <table:table-cell table:style-name="表格44.A2" office:value-type="string">
            <text:p text:style-name="P42" loext:marker-style-name="T149"><text:span text:style-name="T212">100</text:span><text:span text:style-name="T149"/></text:p>
          </table:table-cell>
          <table:table-cell table:style-name="表格44.A2" office:value-type="string">
            <text:p text:style-name="P42" loext:marker-style-name="T149"><text:span text:style-name="T212">102</text:span><text:span text:style-name="T149"/></text:p>
          </table:table-cell>
          <table:table-cell table:style-name="表格44.A2" office:value-type="string">
            <text:p text:style-name="P42" loext:marker-style-name="T149"><text:span text:style-name="T212">128</text:span><text:span text:style-name="T150">（</text:span><text:span text:style-name="T212">2</text:span><text:span text:style-name="T214">⁷</text:span><text:span text:style-name="T150">）</text:span></text:p>
          </table:table-cell>
          <table:table-cell table:style-name="表格44.A2" office:value-type="string">
            <text:p text:style-name="P42" loext:marker-style-name="T154"><text:span text:style-name="T215">/25</text:span><text:span text:style-name="T154"/></text:p>
          </table:table-cell>
          <table:table-cell table:style-name="表格44.A2" office:value-type="string">
            <text:p text:style-name="P42" loext:marker-style-name="T149"><text:span text:style-name="T212">192.168.1.0</text:span><text:span text:style-name="T215">/25</text:span><text:span text:style-name="T150">（</text:span><text:span text:style-name="T212">0</text:span><text:span text:style-name="T150">～</text:span><text:span text:style-name="T448">127</text:span><text:span text:style-name="T150">）</text:span></text:p>
          </table:table-cell>
          <table:table-cell table:style-name="表格44.A2" office:value-type="string">
            <text:p text:style-name="P42" loext:marker-style-name="T149"><text:span text:style-name="T212">126 ≥ 100 ✔</text:span><text:span text:style-name="T149"/></text:p>
          </table:table-cell>
        </table:table-row>
        <table:table-row table:style-name="表格44.1">
          <table:table-cell table:style-name="表格44.A3" office:value-type="string">
            <text:p text:style-name="P42" loext:marker-style-name="T149"><text:span text:style-name="T212">B</text:span><text:span text:style-name="T149"/></text:p>
          </table:table-cell>
          <table:table-cell table:style-name="表格44.A3" office:value-type="string">
            <text:p text:style-name="P42" loext:marker-style-name="T149"><text:span text:style-name="T212">50</text:span><text:span text:style-name="T149"/></text:p>
          </table:table-cell>
          <table:table-cell table:style-name="表格44.A3" office:value-type="string">
            <text:p text:style-name="P42" loext:marker-style-name="T149"><text:span text:style-name="T212">52</text:span><text:span text:style-name="T149"/></text:p>
          </table:table-cell>
          <table:table-cell table:style-name="表格44.A3" office:value-type="string">
            <text:p text:style-name="P42" loext:marker-style-name="T149"><text:span text:style-name="T212">64</text:span><text:span text:style-name="T150">（</text:span><text:span text:style-name="T212">2</text:span><text:span text:style-name="T214">⁶</text:span><text:span text:style-name="T150">）</text:span></text:p>
          </table:table-cell>
          <table:table-cell table:style-name="表格44.A3" office:value-type="string">
            <text:p text:style-name="P42" loext:marker-style-name="T154"><text:span text:style-name="T215">/26</text:span><text:span text:style-name="T154"/></text:p>
          </table:table-cell>
          <table:table-cell table:style-name="表格44.A3" office:value-type="string">
            <text:p text:style-name="P42" loext:marker-style-name="T149"><text:span text:style-name="T212">192.168.1.128</text:span><text:span text:style-name="T215">/26</text:span><text:span text:style-name="T150">（</text:span><text:span text:style-name="T212">128</text:span><text:span text:style-name="T150">～</text:span><text:span text:style-name="T448">191</text:span><text:span text:style-name="T150">）</text:span></text:p>
          </table:table-cell>
          <table:table-cell table:style-name="表格44.A3" office:value-type="string">
            <text:p text:style-name="P42" loext:marker-style-name="T149"><text:span text:style-name="T212">62 ≥ 50 ✔</text:span><text:span text:style-name="T149"/></text:p>
          </table:table-cell>
        </table:table-row>
        <table:table-row table:style-name="表格44.1">
          <table:table-cell table:style-name="表格44.A2" office:value-type="string">
            <text:p text:style-name="P42" loext:marker-style-name="T149"><text:span text:style-name="T212">C</text:span><text:span text:style-name="T149"/></text:p>
          </table:table-cell>
          <table:table-cell table:style-name="表格44.A2" office:value-type="string">
            <text:p text:style-name="P42" loext:marker-style-name="T149"><text:span text:style-name="T212">10</text:span><text:span text:style-name="T149"/></text:p>
          </table:table-cell>
          <table:table-cell table:style-name="表格44.A2" office:value-type="string">
            <text:p text:style-name="P42" loext:marker-style-name="T149"><text:span text:style-name="T212">12</text:span><text:span text:style-name="T149"/></text:p>
          </table:table-cell>
          <table:table-cell table:style-name="表格44.A2" office:value-type="string">
            <text:p text:style-name="P42" loext:marker-style-name="T149"><text:span text:style-name="T212">16</text:span><text:span text:style-name="T150">（</text:span><text:span text:style-name="T212">2</text:span><text:span text:style-name="T214">⁴</text:span><text:span text:style-name="T150">）</text:span></text:p>
          </table:table-cell>
          <table:table-cell table:style-name="表格44.A2" office:value-type="string">
            <text:p text:style-name="P42" loext:marker-style-name="T154"><text:span text:style-name="T215">/28</text:span><text:span text:style-name="T154"/></text:p>
          </table:table-cell>
          <table:table-cell table:style-name="表格44.A2" office:value-type="string">
            <text:p text:style-name="P42" loext:marker-style-name="T149"><text:span text:style-name="T212">192.168.1.192</text:span><text:span text:style-name="T215">/28</text:span><text:span text:style-name="T150">（</text:span><text:span text:style-name="T212">192</text:span><text:span text:style-name="T150">～</text:span><text:span text:style-name="T448">207</text:span><text:span text:style-name="T150">）</text:span></text:p>
          </table:table-cell>
          <table:table-cell table:style-name="表格44.A2" office:value-type="string">
            <text:p text:style-name="P42" loext:marker-style-name="T149"><text:span text:style-name="T212">14 ≥ 10 ✔</text:span><text:span text:style-name="T149"/></text:p>
          </table:table-cell>
        </table:table-row>
      </table:table>
      <text:p text:style-name="P48" loext:marker-style-name="T10"><text:span text:style-name="T11">剩餘 </text:span><text:span text:style-name="T20">192.168.1.208 </text:span><text:span text:style-name="T11">～ </text:span><text:span text:style-name="T20">.255</text:span><text:span text:style-name="T11">（</text:span><text:span text:style-name="T20">48 </text:span><text:span text:style-name="T11">個 </text:span><text:span text:style-name="T20">IP</text:span><text:span text:style-name="T11">）為未使用空間。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6"><text:span text:style-name="T222">💡 <text:s/></text:span><text:span text:style-name="T281">考試技巧</text:span></text:p>
            <text:p text:style-name="P7" loext:marker-style-name="T112"><text:span text:style-name="T434">快速判斷一個 </text:span><text:span text:style-name="T455">IP </text:span><text:span text:style-name="T434">屬於哪個 </text:span><text:span text:style-name="T455">/26 </text:span><text:span text:style-name="T434">子網</text:span><text:span text:style-name="T111">（</text:span><text:span text:style-name="T317">每段 </text:span><text:span text:style-name="T343">64 </text:span><text:span text:style-name="T317">個，起點 </text:span><text:span text:style-name="T343">0</text:span><text:span text:style-name="T317">、</text:span><text:span text:style-name="T343">64</text:span><text:span text:style-name="T317">、</text:span><text:span text:style-name="T343">128</text:span><text:span text:style-name="T317">、</text:span><text:span text:style-name="T343">192</text:span><text:span text:style-name="T111">）：</text:span><text:span text:style-name="T133">看最後一個 </text:span><text:span text:style-name="T198">Octet </text:span><text:span text:style-name="T133">落在哪個區間 </text:span><text:span text:style-name="T111">→</text:span></text:p>
            <text:p text:style-name="P8" loext:marker-style-name="T112"><text:span text:style-name="T200">0</text:span><text:span text:style-name="T135">～</text:span><text:span text:style-name="T200">63</text:span><text:span text:style-name="T177"> → x.0/26</text:span><text:span text:style-name="T111">　｜　</text:span><text:span text:style-name="T200">64</text:span><text:span text:style-name="T135">～</text:span><text:span text:style-name="T200">127</text:span><text:span text:style-name="T177"> → x.64/26</text:span><text:span text:style-name="T111">　｜　</text:span><text:span text:style-name="T200">128</text:span><text:span text:style-name="T135">～</text:span><text:span text:style-name="T200">191</text:span><text:span text:style-name="T177"> → x.128/26</text:span><text:span text:style-name="T111">　｜　</text:span><text:span text:style-name="T200">192</text:span><text:span text:style-name="T135">～</text:span><text:span text:style-name="T200">255</text:span><text:span text:style-name="T177"> → x.192/26</text:span></text:p>
          </table:table-cell>
        </table:table-row>
      </table:table>
      <text:h text:style-name="P11" text:outline-level="2" loext:marker-style-name="T27"><text:span text:style-name="T28">陸、</text:span><text:span text:style-name="T27">CIDR</text:span><text:span text:style-name="T28">（路由聚合 </text:span><text:span text:style-name="T27">/ </text:span><text:span text:style-name="T28">超網合併）</text:span></text:h>
      <text:p text:style-name="P48" loext:marker-style-name="T112"><text:span text:style-name="T177">CIDR </text:span><text:span text:style-name="T111">的合併功能是 </text:span><text:span text:style-name="T177">VLSM </text:span><text:span text:style-name="T111">的「反向操作」：</text:span><text:span text:style-name="T487">VLSM </text:span><text:span text:style-name="T472">把大網路切小</text:span><text:span text:style-name="T111">；</text:span><text:span text:style-name="T456">CIDR </text:span><text:span text:style-name="T435">合併把小網路合成一個大網路表示</text:span><text:span text:style-name="T111">，讓路由表更精簡（一條記錄代表很多小網路）。</text:span>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6"><text:span text:style-name="T222">🔑 </text:span><text:span text:style-name="T223"><text:s/></text:span><text:span text:style-name="T229">合併三條件（缺一不可）</text:span></text:p>
            <text:p text:style-name="P7"><text:span text:style-name="T240">① </text:span><text:span text:style-name="T234">連續（</text:span><text:span text:style-name="T242">Contiguous</text:span><text:span text:style-name="T234">）</text:span><text:span text:style-name="T232">：</text:span><text:span text:style-name="T343">IP </text:span><text:span text:style-name="T317">範圍必須緊鄰</text:span><text:span text:style-name="T111">，</text:span><text:span text:style-name="T372">中間不能有空缺</text:span><text:span text:style-name="T111">。</text:span></text:p>
            <text:p text:style-name="P8"><text:span text:style-name="T240">② </text:span><text:span text:style-name="T234">數量是 </text:span><text:span text:style-name="T242">2ⁿ</text:span><text:span text:style-name="T232">：</text:span><text:span text:style-name="T177">2</text:span><text:span text:style-name="T111">、</text:span><text:span text:style-name="T177">4</text:span><text:span text:style-name="T111">、</text:span><text:span text:style-name="T177">8…</text:span><text:span text:style-name="T111">。</text:span></text:p>
            <text:p text:style-name="P8"><text:span text:style-name="T240">③ </text:span><text:span text:style-name="T234">起始位址對齊</text:span><text:span text:style-name="T232">：</text:span><text:span text:style-name="T111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6"><text:span text:style-name="T222">▸ <text:s/></text:span><text:span text:style-name="T53">合併範例與反例</text:span></text:p>
            <text:p text:style-name="P7"><text:span text:style-name="T132">範例：</text:span><text:span text:style-name="T457">2 </text:span><text:span text:style-name="T436">個 </text:span><text:span text:style-name="T457">/25 → 1 </text:span><text:span text:style-name="T436">個 </text:span><text:span text:style-name="T457">/24</text:span><text:span text:style-name="T132">　</text:span><text:span text:style-name="T177">192.168.1</text:span><text:span text:style-name="T198">.0</text:span><text:span text:style-name="T177">/25 </text:span><text:span text:style-name="T111">＋ </text:span><text:span text:style-name="T177">192.168.1</text:span><text:span text:style-name="T198">.128</text:span><text:span text:style-name="T177">/25 → ① </text:span><text:span text:style-name="T111">緊鄰✔ ② </text:span><text:span text:style-name="T177">2 </text:span><text:span text:style-name="T111">個（</text:span><text:span text:style-name="T177">2¹</text:span><text:span text:style-name="T111">）✔ ③ 起點 </text:span><text:span text:style-name="T177">.0</text:span><text:span text:style-name="T111">，</text:span><text:span text:style-name="T177">0÷256=0✔ → </text:span><text:span text:style-name="T111">合併為 </text:span><text:span text:style-name="T177">192.168.1</text:span><text:span text:style-name="T198">.0</text:span><text:span text:style-name="T177">/24</text:span><text:span text:style-name="T111">。</text:span></text:p>
            <text:p text:style-name="P8"><text:span text:style-name="T132">範例：</text:span><text:span text:style-name="T457">4 </text:span><text:span text:style-name="T436">個 </text:span><text:span text:style-name="T457">/24 → 1 </text:span><text:span text:style-name="T436">個 </text:span><text:span text:style-name="T457">/22</text:span><text:span text:style-name="T132">　</text:span><text:span text:style-name="T177">192.168</text:span><text:span text:style-name="T200">.0/1/2/3</text:span><text:span text:style-name="T177">.0/</text:span><text:span text:style-name="T178">24</text:span><text:span text:style-name="T177"> → </text:span><text:span text:style-name="T111">連續✔、</text:span><text:span text:style-name="T177">4 </text:span><text:span text:style-name="T111">個（</text:span><text:span text:style-name="T177">2²</text:span><text:span text:style-name="T111">）✔、對齊✔ → 合併為 </text:span><text:span text:style-name="T177">192.168</text:span><text:span text:style-name="T180">.0</text:span><text:span text:style-name="T177">.0/</text:span><text:span text:style-name="T178">22</text:span><text:span text:style-name="T111">。</text:span></text:p>
            <text:p text:style-name="P8"><text:span text:style-name="T257">反例（無法合併）：</text:span><text:span text:style-name="T540">192.168.1.0/24 </text:span><text:span text:style-name="T525">＋ </text:span><text:span text:style-name="T540">192.168.2.0/24 → </text:span><text:span text:style-name="T525">雖數量為 </text:span><text:span text:style-name="T540">2</text:span><text:span text:style-name="T525">，但起點 </text:span><text:span text:style-name="T540">.1 </text:span><text:span text:style-name="T525">不對齊</text:span><text:span text:style-name="T111">（</text:span><text:span text:style-name="T177">/23 </text:span><text:span text:style-name="T111">起點只能是偶數倍 </text:span><text:span text:style-name="T177">.0 </text:span><text:span text:style-name="T111">或 </text:span><text:span text:style-name="T177">.2</text:span><text:span text:style-name="T111">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7"><text:span text:style-name="T282">合併後前綴公式：</text:span><text:span text:style-name="T111">合併 </text:span><text:span text:style-name="T177">2ⁿ </text:span><text:span text:style-name="T111">個子網 → 前綴減 </text:span><text:span text:style-name="T177">n</text:span><text:span text:style-name="T111">（</text:span><text:span text:style-name="T372">每合併一倍，</text:span><text:span text:style-name="T383">/ </text:span><text:span text:style-name="T372">的數字減 </text:span><text:span text:style-name="T383">1</text:span><text:span text:style-name="T111">）。</text:span></text:p>
            <text:p text:style-name="P8" loext:marker-style-name="T112"><text:span text:style-name="T595">2 </text:span><text:span text:style-name="T572">個 </text:span><text:span text:style-name="T595">/26 → /25</text:span><text:span text:style-name="T572">；</text:span><text:span text:style-name="T595">4 </text:span><text:span text:style-name="T572">個 </text:span><text:span text:style-name="T595">/26 → /24</text:span><text:span text:style-name="T572">；</text:span><text:span text:style-name="T595">2 </text:span><text:span text:style-name="T572">個 </text:span><text:span text:style-name="T595">/24 → /23</text:span><text:span text:style-name="T111">。</text:span></text:p>
          </table:table-cell>
        </table:table-row>
      </table:table>
      <text:h text:style-name="P11" text:outline-level="2" loext:marker-style-name="T27"><text:span text:style-name="T28">柒、子網路三大概念與解題流程</text:span><text:span text:style-name="T27"/>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4" loext:marker-style-name="T71"><text:span text:style-name="T72">概念</text:span><text:span text:style-name="T71"/></text:p>
            </table:table-cell>
            <table:table-cell table:style-name="表格47.A1" office:value-type="string">
              <text:p text:style-name="P4" loext:marker-style-name="T71"><text:span text:style-name="T72">關鍵字</text:span><text:span text:style-name="T71"/></text:p>
            </table:table-cell>
            <table:table-cell table:style-name="表格47.A1" office:value-type="string">
              <text:p text:style-name="P4" loext:marker-style-name="T71"><text:span text:style-name="T72">核心規則</text:span><text:span text:style-name="T71"/></text:p>
            </table:table-cell>
            <table:table-cell table:style-name="表格47.A1" office:value-type="string">
              <text:p text:style-name="P4" loext:marker-style-name="T71"><text:span text:style-name="T72">比喻</text:span><text:span text:style-name="T71"/>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42" loext:marker-style-name="T85"><text:span text:style-name="T161">IP </text:span><text:span text:style-name="T86">分類</text:span></text:p>
          </table:table-cell>
          <table:table-cell table:style-name="表格47.A2" office:value-type="string">
            <text:p text:style-name="P42" loext:marker-style-name="T85"><text:span text:style-name="T161">A/B/C </text:span><text:span text:style-name="T86">類</text:span></text:p>
          </table:table-cell>
          <table:table-cell table:style-name="表格47.A2" office:value-type="string">
            <text:p text:style-name="P42" loext:marker-style-name="T363"><text:span text:style-name="T364">看第一組數字判斷類別</text:span><text:span text:style-name="T363"/></text:p>
          </table:table-cell>
          <table:table-cell table:style-name="表格47.A2" office:value-type="string">
            <text:p text:style-name="P42" loext:marker-style-name="T85"><text:span text:style-name="T86">土地大小分類</text:span><text:span text:style-name="T85"/></text:p>
          </table:table-cell>
        </table:table-row>
        <table:table-row table:style-name="表格47.1">
          <table:table-cell table:style-name="表格47.A3" office:value-type="string">
            <text:p text:style-name="P42" loext:marker-style-name="T85"><text:span text:style-name="T161">VLSM</text:span><text:span text:style-name="T85"/></text:p>
          </table:table-cell>
          <table:table-cell table:style-name="表格47.A3" office:value-type="string">
            <text:p text:style-name="P42" loext:marker-style-name="T85"><text:span text:style-name="T86">切子網路</text:span><text:span text:style-name="T85"/></text:p>
          </table:table-cell>
          <table:table-cell table:style-name="表格47.A3" office:value-type="string">
            <text:p text:style-name="P42" loext:marker-style-name="T85"><text:span text:style-name="T96">由大到小</text:span><text:span text:style-name="T86">；</text:span><text:span text:style-name="T298">需求</text:span><text:span text:style-name="T335">+2→2ⁿ→/(32−n)</text:span></text:p>
          </table:table-cell>
          <table:table-cell table:style-name="表格47.A3" office:value-type="string">
            <text:p text:style-name="P42" loext:marker-style-name="T85"><text:span text:style-name="T86">把大地切成不同大小的小塊</text:span><text:span text:style-name="T85"/></text:p>
          </table:table-cell>
        </table:table-row>
        <table:table-row table:style-name="表格47.1">
          <table:table-cell table:style-name="表格47.A2" office:value-type="string">
            <text:p text:style-name="P42" loext:marker-style-name="T85"><text:span text:style-name="T161">CIDR </text:span><text:span text:style-name="T86">合併</text:span></text:p>
          </table:table-cell>
          <table:table-cell table:style-name="表格47.A2" office:value-type="string">
            <text:p text:style-name="P42" loext:marker-style-name="T85"><text:span text:style-name="T86">聚合路由</text:span><text:span text:style-name="T85"/></text:p>
          </table:table-cell>
          <table:table-cell table:style-name="表格47.A2" office:value-type="string">
            <text:p text:style-name="P42" loext:marker-style-name="T85"><text:span text:style-name="T364">連續</text:span><text:span text:style-name="T86"> </text:span><text:span text:style-name="T161">+ </text:span><text:span text:style-name="T86">數量 </text:span><text:span text:style-name="T161">2ⁿ + </text:span><text:span text:style-name="T86">對齊；</text:span><text:span text:style-name="T101">前綴減 </text:span><text:span text:style-name="T169">n</text:span></text:p>
          </table:table-cell>
          <table:table-cell table:style-name="表格47.A2" office:value-type="string">
            <text:p text:style-name="P42" loext:marker-style-name="T85"><text:span text:style-name="T86">把相鄰小地合成大地</text:span><text:span text:style-name="T85"/>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6"><text:span text:style-name="T222">🎯 <text:s/></text:span><text:span text:style-name="T267">考試標準解題流程</text:span></text:p>
            <text:p text:style-name="P7"><text:span text:style-name="T270">遇到 </text:span><text:span text:style-name="T274">VLSM </text:span><text:span text:style-name="T270">題：</text:span><text:span text:style-name="T561">確認起始網路</text:span><text:span text:style-name="T111"> → </text:span><text:span text:style-name="T551">需求由大到小</text:span><text:span text:style-name="T111"> → </text:span><text:span text:style-name="T320">各需求 </text:span><text:span text:style-name="T347">+2 </text:span><text:span text:style-name="T320">找 </text:span><text:span text:style-name="T347">2ⁿ </text:span><text:span text:style-name="T320">算前綴</text:span><text:span text:style-name="T111"> → </text:span><text:span text:style-name="T432">大的先切</text:span><text:span text:style-name="T111">依序往後 → </text:span><text:span text:style-name="T523">驗證網路位址</text:span><text:span text:style-name="T541">/</text:span><text:span text:style-name="T523">廣播位址</text:span><text:span text:style-name="T541">/</text:span><text:span text:style-name="T523">可用範圍</text:span><text:span text:style-name="T111">。</text:span></text:p>
            <text:p text:style-name="P8"><text:span text:style-name="T270">遇到 </text:span><text:span text:style-name="T274">CIDR </text:span><text:span text:style-name="T270">合併題：</text:span><text:span text:style-name="T111">列出網路確認連續 → 確認數量 </text:span><text:span text:style-name="T177">2ⁿ → </text:span><text:span text:style-name="T111">確認起點對齊（起點</text:span><text:span text:style-name="T177">÷</text:span><text:span text:style-name="T111">合併後大小</text:span><text:span text:style-name="T177">=</text:span><text:span text:style-name="T111">整數）→ 前綴 </text:span><text:span text:style-name="T177">= </text:span><text:span text:style-name="T111">原前綴 − </text:span><text:span text:style-name="T177">n</text:span><text:span text:style-name="T111">。</text:span></text:p>
          </table:table-cell>
          <table:covered-table-cell/>
          <table:covered-table-cell/>
          <table:covered-table-cell/>
        </table:table-row>
      </table:table>
      <text:h text:style-name="P11" text:outline-level="2"><text:soft-page-break/><text:span text:style-name="T28">捌、</text:span><text:span text:style-name="T27">MTU</text:span><text:span text:style-name="T28">（最大傳輸單位）</text:span><text:span text:style-name="T27">(</text:span><text:span text:style-name="T398">一條網路，一次最多</text:span><text:span text:style-name="T27">)</text:span></text:h>
      <text:p text:style-name="P48" loext:marker-style-name="T112"><text:span text:style-name="T198">MTU</text:span><text:span text:style-name="T177"> </text:span><text:span text:style-name="T111">＝ </text:span><text:span text:style-name="T542">Maximum Transmission Unit</text:span><text:span text:style-name="T526">，</text:span><text:span text:style-name="T321">一條網路</text:span><text:span text:style-name="T526">「</text:span><text:span text:style-name="T475">一次最多</text:span><text:span text:style-name="T526">能傳送的</text:span><text:span text:style-name="T395">封包大小</text:span><text:span text:style-name="T526">」</text:span><text:span text:style-name="T111">。</text:span>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4" loext:marker-style-name="T71"><text:span text:style-name="T72">網路類型</text:span><text:span text:style-name="T71"/></text:p>
            </table:table-cell>
            <table:table-cell table:style-name="表格48.A1" office:value-type="string">
              <text:p text:style-name="P4" loext:marker-style-name="T71"><text:span text:style-name="T81">MTU </text:span><text:span text:style-name="T72">值</text:span></text:p>
            </table:table-cell>
            <table:table-cell table:style-name="表格48.A1" office:value-type="string">
              <text:p text:style-name="P4" loext:marker-style-name="T71"><text:span text:style-name="T72">說明</text:span><text:span text:style-name="T71"/>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42" loext:marker-style-name="T85"><text:span text:style-name="T161">Ethernet</text:span><text:span text:style-name="T86">（乙太網）</text:span></text:p>
          </table:table-cell>
          <table:table-cell table:style-name="表格48.A2" office:value-type="string">
            <text:p text:style-name="P42" loext:marker-style-name="T85"><text:span text:style-name="T161">1500 bytes</text:span><text:span text:style-name="T85"/></text:p>
          </table:table-cell>
          <table:table-cell table:style-name="表格48.A2" office:value-type="string">
            <text:p text:style-name="P42" loext:marker-style-name="T85"><text:span text:style-name="T86">最常見，</text:span><text:span text:style-name="T161">99% </text:span><text:span text:style-name="T86">環境</text:span></text:p>
          </table:table-cell>
        </table:table-row>
        <table:table-row table:style-name="表格48.1">
          <table:table-cell table:style-name="表格48.A3" office:value-type="string">
            <text:p text:style-name="P42" loext:marker-style-name="T85"><text:span text:style-name="T161">Wi-Fi (802.11)</text:span><text:span text:style-name="T85"/></text:p>
          </table:table-cell>
          <table:table-cell table:style-name="表格48.A3" office:value-type="string">
            <text:p text:style-name="P42" loext:marker-style-name="T85"><text:span text:style-name="T161">2304 bytes</text:span><text:span text:style-name="T85"/></text:p>
          </table:table-cell>
          <table:table-cell table:style-name="表格48.A3" office:value-type="string">
            <text:p text:style-name="P42" loext:marker-style-name="T85"><text:span text:style-name="T86">無線區域網路</text:span><text:span text:style-name="T85"/></text:p>
          </table:table-cell>
        </table:table-row>
        <table:table-row table:style-name="表格48.1">
          <table:table-cell table:style-name="表格48.A2" office:value-type="string">
            <text:p text:style-name="P42" loext:marker-style-name="T85"><text:span text:style-name="T161">PPPoE</text:span><text:span text:style-name="T86">（</text:span><text:span text:style-name="T161">ADSL</text:span><text:span text:style-name="T86">）</text:span></text:p>
          </table:table-cell>
          <table:table-cell table:style-name="表格48.A2" office:value-type="string">
            <text:p text:style-name="P42" loext:marker-style-name="T85"><text:span text:style-name="T161">1492 bytes</text:span><text:span text:style-name="T85"/></text:p>
          </table:table-cell>
          <table:table-cell table:style-name="表格48.A2" office:value-type="string">
            <text:p text:style-name="P42" loext:marker-style-name="T85"><text:span text:style-name="T86">需扣掉 </text:span><text:span text:style-name="T161">PPPoE header</text:span></text:p>
          </table:table-cell>
        </table:table-row>
        <table:table-row table:style-name="表格48.1">
          <table:table-cell table:style-name="表格48.A3" office:value-type="string">
            <text:p text:style-name="P42" loext:marker-style-name="T85"><text:span text:style-name="T161">Loopback</text:span><text:span text:style-name="T86">（本機）</text:span></text:p>
          </table:table-cell>
          <table:table-cell table:style-name="表格48.A3" office:value-type="string">
            <text:p text:style-name="P42" loext:marker-style-name="T85"><text:span text:style-name="T161">65536 bytes</text:span><text:span text:style-name="T85"/></text:p>
          </table:table-cell>
          <table:table-cell table:style-name="表格48.A3" office:value-type="string">
            <text:p text:style-name="P42" loext:marker-style-name="T85"><text:span text:style-name="T86">本機內部通訊</text:span><text:span text:style-name="T85"/>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6"><text:span text:style-name="T222">❗ <text:s/></text:span><text:span text:style-name="T247">重點</text:span></text:p>
            <text:p text:style-name="P7" loext:marker-style-name="T112"><text:span text:style-name="T372">若封包大小 </text:span><text:span text:style-name="T383">&gt; MTU</text:span><text:span text:style-name="T372">，就必須「切開」才能傳送</text:span><text:span text:style-name="T111">，這個動作就叫 </text:span><text:span text:style-name="T556">Fragmentation</text:span><text:span text:style-name="T561">（分段）</text:span><text:span text:style-name="T111">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玖、</text:span><text:span text:style-name="T27">Fragmentation</text:span><text:span text:style-name="T28">（封包分段）</text:span>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6"><text:span text:style-name="T222">📦 <text:s/></text:span><text:span text:style-name="T53">怎麼切？</text:span></text:p>
            <text:p text:style-name="P7" loext:marker-style-name="T112"><text:span text:style-name="T111">範例：送出 </text:span><text:span text:style-name="T177">4000 bytes</text:span><text:span text:style-name="T111">、</text:span><text:span text:style-name="T200">MTU = 1500</text:span><text:span text:style-name="T111">（</text:span><text:span text:style-name="T317">每段扣掉 </text:span><text:span text:style-name="T343">20 bytes IP Header</text:span><text:span text:style-name="T111">，</text:span><text:span text:style-name="T133">剩 </text:span><text:span text:style-name="T198">1480 </text:span><text:span text:style-name="T133">可放資料</text:span><text:span text:style-name="T111">）</text:span></text:p>
            <text:p text:style-name="P8" loext:marker-style-name="T394"><text:span text:style-name="T393">第 </text:span><text:span text:style-name="T401">1 </text:span><text:span text:style-name="T393">段：</text:span><text:span text:style-name="T401">1480 bytes</text:span><text:span text:style-name="T393">｜第 </text:span><text:span text:style-name="T401">2 </text:span><text:span text:style-name="T393">段：</text:span><text:span text:style-name="T401">1480 bytes</text:span><text:span text:style-name="T393">｜第 </text:span><text:span text:style-name="T401">3 </text:span><text:span text:style-name="T393">段：</text:span><text:span text:style-name="T401">1040 bytes</text:span>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4" loext:marker-style-name="T71"><text:span text:style-name="T72">版本</text:span><text:span text:style-name="T71"/></text:p>
          </table:table-cell>
          <table:table-cell table:style-name="表格49.A2" office:value-type="string">
            <text:p text:style-name="P4" loext:marker-style-name="T71"><text:span text:style-name="T72">誰負責分段</text:span><text:span text:style-name="T71"/></text:p>
          </table:table-cell>
          <table:table-cell table:style-name="表格49.A2" office:value-type="string">
            <text:p text:style-name="P4" loext:marker-style-name="T71"><text:span text:style-name="T81">Router </text:span><text:span text:style-name="T72">可切？</text:span></text:p>
          </table:table-cell>
          <table:table-cell table:style-name="表格49.A2" office:value-type="string">
            <text:p text:style-name="P4" loext:marker-style-name="T71"><text:span text:style-name="T72">說明</text:span><text:span text:style-name="T71"/></text:p>
          </table:table-cell>
        </table:table-row>
        <table:table-row table:style-name="表格49.1">
          <table:table-cell table:style-name="表格49.A3" office:value-type="string">
            <text:p text:style-name="P42" loext:marker-style-name="T87"><text:span text:style-name="T162">IPv4</text:span><text:span text:style-name="T87"/></text:p>
          </table:table-cell>
          <table:table-cell table:style-name="表格49.A3" office:value-type="string">
            <text:p text:style-name="P42" loext:marker-style-name="T85"><text:span text:style-name="T161">Router </text:span><text:span text:style-name="T86">或 </text:span><text:span text:style-name="T161">Source</text:span></text:p>
          </table:table-cell>
          <table:table-cell table:style-name="表格49.A3" office:value-type="string">
            <text:p text:style-name="P42" loext:marker-style-name="T271"><text:span text:style-name="T275">✅ </text:span><text:span text:style-name="T272">可以</text:span></text:p>
          </table:table-cell>
          <table:table-cell table:style-name="表格49.A3" office:value-type="string">
            <text:p text:style-name="P42" loext:marker-style-name="T465"><text:span text:style-name="T466">封包到 </text:span><text:span text:style-name="T483">Router </text:span><text:span text:style-name="T466">太大時，</text:span><text:span text:style-name="T483">Router </text:span><text:span text:style-name="T466">直接幫你切</text:span></text:p>
          </table:table-cell>
        </table:table-row>
        <table:table-row table:style-name="表格49.1">
          <table:table-cell table:style-name="表格49.A4" office:value-type="string">
            <text:p text:style-name="P42" loext:marker-style-name="T87"><text:span text:style-name="T162">IPv6</text:span><text:span text:style-name="T87"/></text:p>
          </table:table-cell>
          <table:table-cell table:style-name="表格49.A4" office:value-type="string">
            <text:p text:style-name="P42" loext:marker-style-name="T85"><text:span text:style-name="T86">僅 </text:span><text:span text:style-name="T161">Source</text:span><text:span text:style-name="T86">（送端）</text:span></text:p>
          </table:table-cell>
          <table:table-cell table:style-name="表格49.A4" office:value-type="string">
            <text:p text:style-name="P42" loext:marker-style-name="T254"><text:span text:style-name="T261">❌ </text:span><text:span text:style-name="T255">不行</text:span></text:p>
          </table:table-cell>
          <table:table-cell table:style-name="表格49.A4" office:value-type="string">
            <text:p text:style-name="P42" loext:marker-style-name="T85"><text:span text:style-name="T604">Router </text:span><text:span text:style-name="T581">不分段</text:span><text:span text:style-name="T86">，</text:span><text:span text:style-name="T464">由送端自行處理</text:span><text:span text:style-name="T86">，搭配 </text:span><text:span text:style-name="T161">PMTUD</text:span></text:p>
          </table:table-cell>
        </table:table-row>
      </table:table>
      <text:h text:style-name="P11" text:outline-level="2" loext:marker-style-name="T27"><text:span text:style-name="T28">拾、</text:span><text:span text:style-name="T27">IP Header </text:span><text:span text:style-name="T28">關鍵欄位</text:span></text:h>
      <text:p text:style-name="P48" loext:marker-style-name="T112"><text:span text:style-name="T111">每個封包都有一個「說明書」（</text:span><text:span text:style-name="T177">IP Header</text:span><text:span text:style-name="T111">），無選項時長度固定 </text:span><text:span text:style-name="T177">20 bytes</text:span><text:span text:style-name="T111">。最重要的 </text:span><text:span text:style-name="T177">5 </text:span><text:span text:style-name="T111">個欄位：</text:span>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7"><text:span text:style-name="T67">(1) </text:span><text:span text:style-name="T66">Total Length</text:span><text:span text:style-name="T58">：</text:span><text:span text:style-name="T111">封包總大小（</text:span><text:span text:style-name="T177">Header + Data</text:span><text:span text:style-name="T111">），最大 </text:span><text:span text:style-name="T177">65535 bytes</text:span><text:span text:style-name="T111">（</text:span><text:span text:style-name="T177">16 bits</text:span><text:span text:style-name="T111">）。</text:span></text:p>
            <text:p text:style-name="P8"><text:span text:style-name="T67">(2) </text:span><text:span text:style-name="T66">Identification</text:span><text:span text:style-name="T58">：</text:span><text:span text:style-name="T317">同一原始封包的所有分段共用同一 </text:span><text:span text:style-name="T343">ID</text:span><text:span text:style-name="T111">；</text:span><text:span text:style-name="T437">接收端靠此 </text:span><text:span text:style-name="T458">ID </text:span><text:span text:style-name="T437">判斷哪些 </text:span><text:span text:style-name="T458">fragment </text:span><text:span text:style-name="T437">要拼在一起</text:span><text:span text:style-name="T111">。</text:span></text:p>
            <text:p text:style-name="P8"><text:span text:style-name="T67">(3) </text:span><text:span text:style-name="T66">Fragment Offset</text:span><text:span text:style-name="T58">：</text:span><text:span text:style-name="T372">這段資料在原始封包中的「起始位置」</text:span><text:span text:style-name="T111">。⚠️ 單位是 </text:span><text:span text:style-name="T177">8 bytes</text:span><text:span text:style-name="T111">（欄位僅 </text:span><text:span text:style-name="T177">13 bits</text:span><text:span text:style-name="T111">）→ </text:span><text:span text:style-name="T383">Offset = </text:span><text:span text:style-name="T372">起始位置 </text:span><text:span text:style-name="T383">÷ 8</text:span><text:span text:style-name="T111">。</text:span></text:p>
            <text:p text:style-name="P8"><text:span text:style-name="T67">(4) </text:span><text:span text:style-name="T66">TTL</text:span><text:span text:style-name="T58">：</text:span><text:span text:style-name="T573">最多可經過幾個 </text:span><text:span text:style-name="T596">Router</text:span><text:span text:style-name="T573">；每經過一個 −</text:span><text:span text:style-name="T596">1</text:span><text:span text:style-name="T111">，</text:span><text:span text:style-name="T523">歸零時 </text:span><text:span text:style-name="T541">Router </text:span><text:span text:style-name="T523">丟棄並回 </text:span><text:span text:style-name="T541">ICMP</text:span><text:span text:style-name="T523">「</text:span><text:span text:style-name="T541">Time Exceeded</text:span><text:span text:style-name="T523">」</text:span><text:span text:style-name="T111">。常見初始值 </text:span><text:span text:style-name="T177">Linux=64</text:span><text:span text:style-name="T111">、</text:span><text:span text:style-name="T177">Windows=128</text:span><text:span text:style-name="T111">。</text:span><text:span text:style-name="T177">traceroute </text:span><text:span text:style-name="T111">即利用 </text:span><text:span text:style-name="T177">TTL</text:span><text:span text:style-name="T111">。</text:span></text:p>
            <text:p text:style-name="P8"><text:span text:style-name="T67">(5) </text:span><text:span text:style-name="T66">Protocol</text:span><text:span text:style-name="T58">：</text:span><text:span text:style-name="T111">告訴 </text:span><text:span text:style-name="T177">OS </text:span><text:span text:style-name="T111">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4" loext:marker-style-name="T71"><text:span text:style-name="T72">計算範例（</text:span><text:span text:style-name="T81">MTU=1500, Header=20, </text:span><text:span text:style-name="T72">資料</text:span><text:span text:style-name="T81">=4000</text:span><text:span text:style-name="T72">）</text:span></text:p>
          </table:table-cell>
          <table:covered-table-cell/>
          <table:covered-table-cell/>
          <table:table-cell table:style-name="表格50.A2" office:value-type="string">
            <text:p text:style-name="P4" loext:marker-style-name="T71"><text:span text:style-name="T81">Offset </text:span><text:span text:style-name="T72">計算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42" loext:marker-style-name="T85"><text:span text:style-name="T86">第 </text:span><text:span text:style-name="T161">1 </text:span><text:span text:style-name="T86">段：資料 </text:span><text:span text:style-name="T161">1480 bytes</text:span></text:p>
          </table:table-cell>
          <table:covered-table-cell/>
          <table:covered-table-cell/>
          <table:table-cell table:style-name="表格50.A3" office:value-type="string">
            <text:p text:style-name="P42" loext:marker-style-name="T87"><text:span text:style-name="T162">0 ÷ 8 = 0</text:span><text:span text:style-name="T87"/>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42" loext:marker-style-name="T85"><text:span text:style-name="T86">第 </text:span><text:span text:style-name="T161">2 </text:span><text:span text:style-name="T86">段：資料 </text:span><text:span text:style-name="T161">1480 bytes</text:span></text:p>
          </table:table-cell>
          <table:covered-table-cell/>
          <table:covered-table-cell/>
          <table:table-cell table:style-name="表格50.A4" office:value-type="string">
            <text:p text:style-name="P42" loext:marker-style-name="T85"><text:span text:style-name="T162">1480 ÷ 8 </text:span><text:span text:style-name="T161">= 185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42" loext:marker-style-name="T85"><text:span text:style-name="T86">第 </text:span><text:span text:style-name="T161">3 </text:span><text:span text:style-name="T86">段：資料 </text:span><text:span text:style-name="T161">1040 bytes</text:span></text:p>
          </table:table-cell>
          <table:covered-table-cell/>
          <table:covered-table-cell/>
          <table:table-cell table:style-name="表格50.A3" office:value-type="string">
            <text:p text:style-name="P42" loext:marker-style-name="T85"><text:span text:style-name="T162">2960 ÷ 8</text:span><text:span text:style-name="T161"> = 370</text:span></text:p>
          </table:table-cell>
        </table:table-row>
        <table:table-row table:style-name="表格50.1">
          <table:table-cell table:style-name="表格50.A2" office:value-type="string">
            <text:p text:style-name="P39" loext:marker-style-name="T71"><text:span text:style-name="T81">Protocol </text:span><text:span text:style-name="T72">值</text:span></text:p>
          </table:table-cell>
          <table:table-cell table:style-name="表格50.A2" office:value-type="string">
            <text:p text:style-name="P39" loext:marker-style-name="T71"><text:span text:style-name="T72">對應協定</text:span><text:span text:style-name="T71"/></text:p>
          </table:table-cell>
          <table:table-cell table:style-name="表格50.A2" table:number-columns-spanned="2" office:value-type="string">
            <text:p text:style-name="P39" loext:marker-style-name="T71"><text:span text:style-name="T72">常見用途</text:span><text:span text:style-name="T71"/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42" loext:marker-style-name="T85"><text:span text:style-name="T161">1</text:span><text:span text:style-name="T85"/></text:p>
          </table:table-cell>
          <table:table-cell table:style-name="表格50.A3" office:value-type="string">
            <text:p text:style-name="P42" loext:marker-style-name="T104"><text:span text:style-name="T171">ICMP</text:span><text:span text:style-name="T104"/></text:p>
          </table:table-cell>
          <table:table-cell table:style-name="表格50.A3" table:number-columns-spanned="2" office:value-type="string">
            <text:p text:style-name="P42" loext:marker-style-name="T388"><text:span text:style-name="T403">ping</text:span><text:span text:style-name="T389">、</text:span><text:span text:style-name="T403">TTL </text:span><text:span text:style-name="T389">超時通知、</text:span><text:span text:style-name="T403">Fragmentation </text:span><text:span text:style-name="T389">通知</text:span>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42" loext:marker-style-name="T85"><text:span text:style-name="T161">6</text:span><text:span text:style-name="T85"/></text:p>
          </table:table-cell>
          <table:table-cell table:style-name="表格50.A4" office:value-type="string">
            <text:p text:style-name="P42" loext:marker-style-name="T85"><text:span text:style-name="T161">TCP</text:span><text:span text:style-name="T85"/></text:p>
          </table:table-cell>
          <table:table-cell table:style-name="表格50.A4" table:number-columns-spanned="2" office:value-type="string">
            <text:p text:style-name="P42" loext:marker-style-name="T85"><text:span text:style-name="T161">HTTP</text:span><text:span text:style-name="T86">、</text:span><text:span text:style-name="T161">HTTPS</text:span><text:span text:style-name="T86">、</text:span><text:span text:style-name="T161">SSH</text:span><text:span text:style-name="T86">、</text:span><text:span text:style-name="T161">FTP </text:span><text:span text:style-name="T86">等需要可靠傳輸</text:span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42" loext:marker-style-name="T85"><text:span text:style-name="T161">17</text:span><text:span text:style-name="T85"/></text:p>
          </table:table-cell>
          <table:table-cell table:style-name="表格50.A3" office:value-type="string">
            <text:p text:style-name="P42" loext:marker-style-name="T85"><text:span text:style-name="T161">UDP</text:span><text:span text:style-name="T85"/></text:p>
          </table:table-cell>
          <table:table-cell table:style-name="表格50.A3" table:number-columns-spanned="2" office:value-type="string">
            <text:p text:style-name="P42" loext:marker-style-name="T85"><text:span text:style-name="T161">DNS</text:span><text:span text:style-name="T86">、</text:span><text:span text:style-name="T161">DHCP</text:span><text:span text:style-name="T86">、影音串流等速度優先</text:span></text:p>
          </table:table-cell>
          <table:covered-table-cell/>
        </table:table-row>
      </table:table>
      <text:h text:style-name="P11" text:outline-level="2"><text:soft-page-break/><text:span text:style-name="T28">拾壹、</text:span><text:span text:style-name="T27">Fragmentation Flags</text:span><text:span text:style-name="T28">（</text:span><text:span text:style-name="T27">DF / MF</text:span><text:span text:style-name="T28">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4" loext:marker-style-name="T71"><text:span text:style-name="T81">Flag</text:span><text:span text:style-name="T71"/></text:p>
            </table:table-cell>
            <table:table-cell table:style-name="表格51.A1" office:value-type="string">
              <text:p text:style-name="P4" loext:marker-style-name="T71"><text:span text:style-name="T72">全名</text:span><text:span text:style-name="T71"/></text:p>
            </table:table-cell>
            <table:table-cell table:style-name="表格51.A1" office:value-type="string">
              <text:p text:style-name="P4" loext:marker-style-name="T71"><text:span text:style-name="T72">值 </text:span><text:span text:style-name="T81">= 1 </text:span><text:span text:style-name="T72">代表</text:span></text:p>
            </table:table-cell>
            <table:table-cell table:style-name="表格51.A1" office:value-type="string">
              <text:p text:style-name="P4" loext:marker-style-name="T71"><text:span text:style-name="T72">值 </text:span><text:span text:style-name="T81">= 0 </text:span><text:span text:style-name="T72">代表</text:span>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42" loext:marker-style-name="T363"><text:span text:style-name="T377">DF</text:span><text:span text:style-name="T363"/></text:p>
          </table:table-cell>
          <table:table-cell table:style-name="表格51.A2" office:value-type="string">
            <text:p text:style-name="P42" loext:marker-style-name="T363"><text:span text:style-name="T377">Don't Fragment</text:span><text:span text:style-name="T363"/></text:p>
          </table:table-cell>
          <table:table-cell table:style-name="表格51.A2" office:value-type="string">
            <text:p text:style-name="P42" loext:marker-style-name="T85"><text:span text:style-name="T161">❌ </text:span><text:span text:style-name="T86">不准切！超大就丟並回 </text:span><text:span text:style-name="T161">ICMP</text:span></text:p>
          </table:table-cell>
          <table:table-cell table:style-name="表格51.A2" office:value-type="string">
            <text:p text:style-name="P42" loext:marker-style-name="T85"><text:span text:style-name="T86">允許分段（一般封包）</text:span><text:span text:style-name="T85"/></text:p>
          </table:table-cell>
        </table:table-row>
        <table:table-row table:style-name="表格51.1">
          <table:table-cell table:style-name="表格51.A3" office:value-type="string">
            <text:p text:style-name="P42" loext:marker-style-name="T297"><text:span text:style-name="T335">MF</text:span><text:span text:style-name="T297"/></text:p>
          </table:table-cell>
          <table:table-cell table:style-name="表格51.A3" office:value-type="string">
            <text:p text:style-name="P42" loext:marker-style-name="T297"><text:span text:style-name="T335">More Fragments</text:span><text:span text:style-name="T297"/></text:p>
          </table:table-cell>
          <table:table-cell table:style-name="表格51.A3" office:value-type="string">
            <text:p text:style-name="P42" loext:marker-style-name="T85"><text:span text:style-name="T86">後面還有更多分段</text:span><text:span text:style-name="T85"/></text:p>
          </table:table-cell>
          <table:table-cell table:style-name="表格51.A3" office:value-type="string">
            <text:p text:style-name="P42" loext:marker-style-name="T85"><text:span text:style-name="T86">這是最後一段（或未分段）</text:span><text:span text:style-name="T85"/>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6"><text:span text:style-name="T222">▸ <text:s/></text:span><text:span text:style-name="T65">DF = 1 </text:span><text:span text:style-name="T53">的完整流程</text:span></text:p>
            <text:p text:style-name="P7" loext:marker-style-name="T112"><text:span text:style-name="T177">① </text:span><text:span text:style-name="T111">送出封包（</text:span><text:span text:style-name="T198">DF=1</text:span><text:span text:style-name="T133">，不准切</text:span><text:span text:style-name="T111">）→ ② 到某 </text:span><text:span text:style-name="T177">Router</text:span><text:span text:style-name="T111">，發現</text:span><text:span text:style-name="T316">封包 </text:span><text:span text:style-name="T348">&gt; </text:span><text:span text:style-name="T316">該路段 </text:span><text:span text:style-name="T348">MTU</text:span><text:span text:style-name="T177"> → ③ </text:span><text:span text:style-name="T488">Router </text:span><text:span text:style-name="T471">不能切，直接丟棄 </text:span><text:span text:style-name="T111">→ ④ </text:span><text:span text:style-name="T596">Router </text:span><text:span text:style-name="T573">回傳 </text:span><text:span text:style-name="T596">ICMP</text:span><text:span text:style-name="T573">「</text:span><text:span text:style-name="T596">Fragmentation Needed</text:span><text:span text:style-name="T573">」（含可用 </text:span><text:span text:style-name="T596">MTU </text:span><text:span text:style-name="T573">大小）</text:span><text:span text:style-name="T111">→ ⑤ </text:span><text:span text:style-name="T317">送端調整封包大小後</text:span><text:span text:style-name="T527">重送</text:span><text:span text:style-name="T111">。這就是 </text:span><text:span text:style-name="T200">PMTUD </text:span><text:span text:style-name="T135">的核心機制</text:span><text:span text:style-name="T111">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拾貳、</text:span><text:span text:style-name="T27">PMTUD</text:span><text:span text:style-name="T28">（路徑 </text:span><text:span text:style-name="T27">MTU </text:span><text:span text:style-name="T28">探測）</text:span></text:h>
      <text:p text:style-name="P48" loext:marker-style-name="T112"><text:span text:style-name="T198">PMTUD </text:span><text:span text:style-name="T111">＝</text:span><text:span text:style-name="T527"> </text:span><text:span text:style-name="T543">Path MTU Discovery</text:span><text:span text:style-name="T527">，自動找出</text:span><text:span text:style-name="T647">來源到目的地</text:span><text:span text:style-name="T527">整條路徑中</text:span><text:span text:style-name="T574">最小的 </text:span><text:span text:style-name="T597">MTU </text:span><text:span text:style-name="T574">值</text:span><text:span text:style-name="T111">。</text:span><text:span text:style-name="T138">網路路徑可能途經不同網路</text:span><text:span text:style-name="T111">（</text:span><text:span text:style-name="T177">Ethernet → PPPoE → Wi-Fi</text:span><text:span text:style-name="T111">），封包必須符合「最小的那個 </text:span><text:span text:style-name="T177">MTU</text:span><text:span text:style-name="T111">」才能全程通過。</text:span>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4" loext:marker-style-name="T71"><text:span text:style-name="T72">版本</text:span><text:span text:style-name="T71"/></text:p>
            </table:table-cell>
            <table:table-cell table:style-name="表格52.A1" office:value-type="string">
              <text:p text:style-name="P4" loext:marker-style-name="T71"><text:span text:style-name="T81">Router </text:span><text:span text:style-name="T72">可分段？</text:span></text:p>
            </table:table-cell>
            <table:table-cell table:style-name="表格52.A1" office:value-type="string">
              <text:p text:style-name="P4" loext:marker-style-name="T71"><text:span text:style-name="T81">PMTUD </text:span><text:span text:style-name="T72">必要性</text:span></text:p>
            </table:table-cell>
            <table:table-cell table:style-name="表格52.A1" office:value-type="string">
              <text:p text:style-name="P4" loext:marker-style-name="T71"><text:span text:style-name="T81">Router </text:span><text:span text:style-name="T72">回應訊息</text:span>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42" loext:marker-style-name="T103"><text:span text:style-name="T169">IPv4</text:span><text:span text:style-name="T103"/></text:p>
          </table:table-cell>
          <table:table-cell table:style-name="表格52.A2" office:value-type="string">
            <text:p text:style-name="P42" loext:marker-style-name="T98"><text:span text:style-name="T172">✅ </text:span><text:span text:style-name="T96">可以（但不推薦）</text:span></text:p>
          </table:table-cell>
          <table:table-cell table:style-name="表格52.A2" office:value-type="string">
            <text:p text:style-name="P42" loext:marker-style-name="T85"><text:span text:style-name="T86">可選，但建議使用</text:span><text:span text:style-name="T85"/></text:p>
          </table:table-cell>
          <table:table-cell table:style-name="表格52.A2" office:value-type="string">
            <text:p text:style-name="P42" loext:marker-style-name="T85"><text:span text:style-name="T161">ICMP Fragmentation Needed</text:span><text:span text:style-name="T85"/></text:p>
          </table:table-cell>
        </table:table-row>
        <table:table-row table:style-name="表格52.1">
          <table:table-cell table:style-name="表格52.A3" office:value-type="string">
            <text:p text:style-name="P42" loext:marker-style-name="T103"><text:span text:style-name="T169">IPv6</text:span><text:span text:style-name="T103"/></text:p>
          </table:table-cell>
          <table:table-cell table:style-name="表格52.A3" office:value-type="string">
            <text:p text:style-name="P42" loext:marker-style-name="T98"><text:span text:style-name="T172">❌ </text:span><text:span text:style-name="T96">不行</text:span></text:p>
          </table:table-cell>
          <table:table-cell table:style-name="表格52.A3" office:value-type="string">
            <text:p text:style-name="P42" loext:marker-style-name="T85"><text:span text:style-name="T161">⚠️ </text:span><text:span text:style-name="T86">必須使用</text:span></text:p>
          </table:table-cell>
          <table:table-cell table:style-name="表格52.A3" office:value-type="string">
            <text:p text:style-name="P42" loext:marker-style-name="T85"><text:span text:style-name="T161">ICMPv6 Packet Too Big</text:span><text:span text:style-name="T85"/></text:p>
          </table:table-cell>
        </table:table-row>
      </table:table>
      <text:h text:style-name="P11" text:outline-level="2" loext:marker-style-name="T27"><text:span text:style-name="T28">拾參、</text:span><text:span text:style-name="T27">TCP </text:span><text:span text:style-name="T28">如何避免 </text:span><text:span text:style-name="T27">Fragmentation</text:span><text:span text:style-name="T28">？</text:span></text:h>
      <text:p text:style-name="P48" loext:marker-style-name="T112"><text:span text:style-name="T383">TCP </text:span><text:span text:style-name="T372">不依賴 </text:span><text:span text:style-name="T383">IP </text:span><text:span text:style-name="T372">層切封包，而是「自己先控制好大小」</text:span><text:span text:style-name="T111">，</text:span><text:span text:style-name="T133">讓 </text:span><text:span text:style-name="T198">IP </text:span><text:span text:style-name="T133">層根本不需要切</text:span><text:span text:style-name="T111">。</text:span>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7"><text:span text:style-name="T67">MSS</text:span><text:span text:style-name="T58">（</text:span><text:span text:style-name="T67">Maximum Segment Size</text:span><text:span text:style-name="T58">）：</text:span><text:span text:style-name="T349">MSS = MTU − IP Header − TCP Header </text:span><text:span text:style-name="T177">= </text:span><text:span text:style-name="T198">1500 − 20 − 20 = 1460 bytes</text:span><text:span text:style-name="T111">。</text:span><text:span text:style-name="T476">三向交握時雙方各自宣告 </text:span><text:span text:style-name="T489">MSS</text:span><text:span text:style-name="T476">，之後每段 ≤ </text:span><text:span text:style-name="T489">MSS</text:span><text:span text:style-name="T111">，</text:span><text:span text:style-name="T133">讓 </text:span><text:span text:style-name="T198">IP </text:span><text:span text:style-name="T133">層不需分段</text:span><text:span text:style-name="T111">。</text:span></text:p>
            <text:p text:style-name="P8"><text:span text:style-name="T58">搭配 </text:span><text:span text:style-name="T67">DF=1 + PMTUD</text:span><text:span text:style-name="T58">：</text:span><text:span text:style-name="T177">TCP </text:span><text:span text:style-name="T111">連線設 </text:span><text:span text:style-name="T177">DF=1 </text:span><text:span text:style-name="T111">禁止 </text:span><text:span text:style-name="T177">Router </text:span><text:span text:style-name="T111">分段；</text:span><text:span text:style-name="T317">若收到 </text:span><text:span text:style-name="T343">ICMP</text:span><text:span text:style-name="T317">「</text:span><text:span text:style-name="T343">Fragmentation Needed</text:span><text:span text:style-name="T317">」，自動調低 </text:span><text:span text:style-name="T343">MSS </text:span><text:span text:style-name="T317">重試</text:span><text:span text:style-name="T111">，最終找到整條路徑都能通過的最佳 </text:span><text:span text:style-name="T177">MSS</text:span><text:span text:style-name="T111">。</text:span></text:p>
          </table:table-cell>
        </table:table-row>
        <table:table-row table:style-name="表格53.1">
          <table:table-cell table:style-name="表格53.A2" office:value-type="string">
            <text:p text:style-name="P6"><text:span text:style-name="T222">✅ <text:s/></text:span><text:span text:style-name="T267">結論</text:span></text:p>
            <text:p text:style-name="P7" loext:marker-style-name="T112"><text:span text:style-name="T556">TCP = </text:span><text:span text:style-name="T561">主動控制大小（</text:span><text:span text:style-name="T556">MSS</text:span><text:span text:style-name="T561">）＋ </text:span><text:span text:style-name="T556">DF=1 </text:span><text:span text:style-name="T561">＋ </text:span><text:span text:style-name="T556">PMTUD</text:span><text:span text:style-name="T111">，</text:span><text:span text:style-name="T322">從源頭就避免 </text:span><text:span text:style-name="T349">Fragmentation </text:span><text:span text:style-name="T322">發生</text:span><text:span text:style-name="T111">。</text:span><text:span text:style-name="T458">TCP </text:span><text:span text:style-name="T437">做 </text:span><text:span text:style-name="T458">Segmentation </text:span><text:span text:style-name="T437">的主要目的之一，就是讓每個封包符合 </text:span><text:span text:style-name="T458">MTU</text:span><text:span text:style-name="T111">，從而避免 </text:span><text:span text:style-name="T177">IP </text:span><text:span text:style-name="T111">再做 </text:span><text:span text:style-name="T177">Fragmentation</text:span><text:span text:style-name="T111">。</text:span></text:p>
          </table:table-cell>
        </table:table-row>
      </table:table>
      <text:h text:style-name="P11" text:outline-level="2" loext:marker-style-name="T27"><text:span text:style-name="T28">拾肆、</text:span><text:span text:style-name="T27">Fragmentation DoS </text:span><text:span text:style-name="T28">攻擊</text:span></text:h>
      <text:p text:style-name="P48" loext:marker-style-name="T112"><text:span text:style-name="T317">攻擊者利用「接收端重組封包很耗資源」這個特性</text:span><text:span text:style-name="T111">，</text:span><text:span text:style-name="T372">刻意製造大量異常 </text:span><text:span text:style-name="T383">Fragment</text:span><text:span text:style-name="T111">。正常重組流程：收到 </text:span><text:span text:style-name="T177">Fragment </text:span><text:span text:style-name="T526">放入緩衝區 </text:span><text:span text:style-name="T111">→ </text:span><text:span text:style-name="T573">等同一 </text:span><text:span text:style-name="T596">ID </text:span><text:span text:style-name="T573">的所有 </text:span><text:span text:style-name="T596">Fragment </text:span><text:span text:style-name="T573">到齊 → 依</text:span><text:span text:style-name="T374"> </text:span><text:span text:style-name="T384">Offset </text:span><text:span text:style-name="T573">排序 → 拼回原始封包</text:span><text:span text:style-name="T111">；每步都消耗 </text:span><text:span text:style-name="T177">RAM </text:span><text:span text:style-name="T111">與 </text:span><text:span text:style-name="T177">CPU</text:span><text:span text:style-name="T111">。</text:span>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4" loext:marker-style-name="T77"><text:span text:style-name="T78">攻擊手法</text:span><text:span text:style-name="T77"/></text:p>
            </table:table-cell>
            <table:table-cell table:style-name="表格54.A1" office:value-type="string">
              <text:p text:style-name="P4" loext:marker-style-name="T77"><text:span text:style-name="T78">做法</text:span><text:span text:style-name="T77"/></text:p>
            </table:table-cell>
            <table:table-cell table:style-name="表格54.A1" office:value-type="string">
              <text:p text:style-name="P4" loext:marker-style-name="T77"><text:span text:style-name="T78">後果</text:span><text:span text:style-name="T77"/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42" loext:marker-style-name="T152"><text:span text:style-name="T214">1 </text:span><text:span text:style-name="T151">不完整 </text:span><text:span text:style-name="T214">Fragment</text:span></text:p>
          </table:table-cell>
          <table:table-cell table:style-name="表格54.A2" office:value-type="string">
            <text:p text:style-name="P42" loext:marker-style-name="T149"><text:span text:style-name="T150">只送部分分段（缺其中一段）</text:span><text:span text:style-name="T149"/></text:p>
          </table:table-cell>
          <table:table-cell table:style-name="表格54.A2" office:value-type="string">
            <text:p text:style-name="P42" loext:marker-style-name="T149"><text:span text:style-name="T150">接收端一直等待不敢丟棄 → </text:span><text:span text:style-name="T212">RAM </text:span><text:span text:style-name="T150">持續被占用</text:span></text:p>
          </table:table-cell>
        </table:table-row>
        <table:table-row table:style-name="表格54.1">
          <table:table-cell table:style-name="表格54.A3" office:value-type="string">
            <text:p text:style-name="P42" loext:marker-style-name="T152"><text:span text:style-name="T214">2 Offset </text:span><text:span text:style-name="T151">重疊</text:span></text:p>
          </table:table-cell>
          <table:table-cell table:style-name="表格54.A3" office:value-type="string">
            <text:p text:style-name="P42" loext:marker-style-name="T149"><text:span text:style-name="T150">送出 </text:span><text:span text:style-name="T212">Offset </text:span><text:span text:style-name="T150">互相重疊的 </text:span><text:span text:style-name="T212">Fragment</text:span></text:p>
          </table:table-cell>
          <table:table-cell table:style-name="表格54.A3" office:value-type="string">
            <text:p text:style-name="P42" loext:marker-style-name="T149"><text:span text:style-name="T153">接收端須判斷哪個才是正確資料 </text:span><text:span text:style-name="T150">→ </text:span><text:span text:style-name="T212">CPU </text:span><text:span text:style-name="T150">暴增</text:span></text:p>
          </table:table-cell>
        </table:table-row>
        <table:table-row table:style-name="表格54.1">
          <table:table-cell table:style-name="表格54.A2" office:value-type="string">
            <text:p text:style-name="P42" loext:marker-style-name="T152"><text:span text:style-name="T214">3 </text:span><text:span text:style-name="T151">大量碎片</text:span></text:p>
          </table:table-cell>
          <table:table-cell table:style-name="表格54.A2" office:value-type="string">
            <text:p text:style-name="P42" loext:marker-style-name="T149"><text:span text:style-name="T150">送出數萬個 </text:span><text:span text:style-name="T212">Fragment</text:span><text:span text:style-name="T150">（同一 </text:span><text:span text:style-name="T212">ID</text:span><text:span text:style-name="T150">）</text:span></text:p>
          </table:table-cell>
          <table:table-cell table:style-name="表格54.A2" office:value-type="string">
            <text:p text:style-name="P42" loext:marker-style-name="T149"><text:span text:style-name="T150">開大量 </text:span><text:span text:style-name="T212">buffer</text:span><text:span text:style-name="T150">、持續重組 → </text:span><text:span text:style-name="T212">RAM </text:span><text:span text:style-name="T150">耗盡</text:span>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6"><text:span text:style-name="T222">🛡️ <text:s/></text:span><text:span text:style-name="T267">防禦方式</text:span></text:p>
            <text:p text:style-name="P7" loext:marker-style-name="T112"><text:span text:style-name="T111">防禦：</text:span><text:span text:style-name="T140">設定重組 </text:span><text:span text:style-name="T205">buffer </text:span><text:span text:style-name="T140">上限</text:span><text:span text:style-name="T111">避免無限占用記憶體；</text:span><text:span text:style-name="T139">丟棄等待過久或異常的 </text:span><text:span text:style-name="T204">Fragment</text:span><text:span text:style-name="T111">；</text:span><text:span text:style-name="T138">部署 </text:span><text:span text:style-name="T203">IDS / Firewall </text:span><text:span text:style-name="T138">偵測異常分段</text:span><text:span text:style-name="T111">模式。</text:span></text:p>
          </table:table-cell>
          <table:covered-table-cell/>
          <table:covered-table-cell/>
        </table:table-row>
      </table:table>
      <text:h text:style-name="P11" text:outline-level="2"><text:soft-page-break/><text:span text:style-name="T28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4" loext:marker-style-name="T71"><text:span text:style-name="T72">技術概念</text:span><text:span text:style-name="T71"/></text:p>
            </table:table-cell>
            <table:table-cell table:style-name="表格55.A1" office:value-type="string">
              <text:p text:style-name="P4" loext:marker-style-name="T71"><text:span text:style-name="T72">白話比喻</text:span><text:span text:style-name="T71"/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42" loext:marker-style-name="T85"><text:span text:style-name="T161">MTU</text:span><text:span text:style-name="T85"/></text:p>
          </table:table-cell>
          <table:table-cell table:style-name="表格55.A2" office:value-type="string">
            <text:p text:style-name="P42" loext:marker-style-name="T85"><text:span text:style-name="T86">一個貨運箱子最多裝 </text:span><text:span text:style-name="T161">1500g</text:span></text:p>
          </table:table-cell>
        </table:table-row>
        <table:table-row table:style-name="表格55.1">
          <table:table-cell table:style-name="表格55.A3" office:value-type="string">
            <text:p text:style-name="P42" loext:marker-style-name="T85"><text:span text:style-name="T161">Fragmentation</text:span><text:span text:style-name="T85"/></text:p>
          </table:table-cell>
          <table:table-cell table:style-name="表格55.A3" office:value-type="string">
            <text:p text:style-name="P42" loext:marker-style-name="T85"><text:span text:style-name="T86">東西太重 → 分成好幾箱</text:span><text:span text:style-name="T85"/></text:p>
          </table:table-cell>
        </table:table-row>
        <table:table-row table:style-name="表格55.1">
          <table:table-cell table:style-name="表格55.A2" office:value-type="string">
            <text:p text:style-name="P42" loext:marker-style-name="T98"><text:span text:style-name="T172">Identification</text:span><text:span text:style-name="T98"/></text:p>
          </table:table-cell>
          <table:table-cell table:style-name="表格55.A2" office:value-type="string">
            <text:p text:style-name="P42" loext:marker-style-name="T103"><text:span text:style-name="T101">每箱貼上同一個「訂單號碼」</text:span><text:span text:style-name="T103"/></text:p>
          </table:table-cell>
        </table:table-row>
        <table:table-row table:style-name="表格55.1">
          <table:table-cell table:style-name="表格55.A3" office:value-type="string">
            <text:p text:style-name="P42" loext:marker-style-name="T98"><text:span text:style-name="T172">Fragment Offset</text:span><text:span text:style-name="T98"/></text:p>
          </table:table-cell>
          <table:table-cell table:style-name="表格55.A3" office:value-type="string">
            <text:p text:style-name="P42" loext:marker-style-name="T85"><text:span text:style-name="T86">每箱寫上「我是第幾克開始的貨」</text:span><text:span text:style-name="T85"/></text:p>
          </table:table-cell>
        </table:table-row>
        <table:table-row table:style-name="表格55.1">
          <table:table-cell table:style-name="表格55.A2" office:value-type="string">
            <text:p text:style-name="P42" loext:marker-style-name="T85"><text:span text:style-name="T161">IPv4 / IPv6</text:span><text:span text:style-name="T85"/></text:p>
          </table:table-cell>
          <table:table-cell table:style-name="表格55.A2" office:value-type="string">
            <text:p text:style-name="P42" loext:marker-style-name="T85"><text:span text:style-name="T161">IPv4</text:span><text:span text:style-name="T86">：郵局可幫你分箱（但最好自己分）／ </text:span><text:span text:style-name="T161">IPv6</text:span><text:span text:style-name="T86">：郵局不幫分，你一定要自己分好</text:span></text:p>
          </table:table-cell>
        </table:table-row>
        <table:table-row table:style-name="表格55.1">
          <table:table-cell table:style-name="表格55.A3" office:value-type="string">
            <text:p text:style-name="P42" loext:marker-style-name="T85"><text:span text:style-name="T161">DF = 1</text:span><text:span text:style-name="T85"/></text:p>
          </table:table-cell>
          <table:table-cell table:style-name="表格55.A3" office:value-type="string">
            <text:p text:style-name="P42" loext:marker-style-name="T85"><text:span text:style-name="T86">貼上「禁止拆箱」標籤 → 太重就退件</text:span><text:span text:style-name="T85"/></text:p>
          </table:table-cell>
        </table:table-row>
        <table:table-row table:style-name="表格55.1">
          <table:table-cell table:style-name="表格55.A2" office:value-type="string">
            <text:p text:style-name="P42" loext:marker-style-name="T419"><text:span text:style-name="T445">PMTUD</text:span><text:span text:style-name="T419"/></text:p>
          </table:table-cell>
          <table:table-cell table:style-name="表格55.A2" office:value-type="string">
            <text:p text:style-name="P42" loext:marker-style-name="T106"><text:span text:style-name="T107">先試寄 → 被退 → 知道上限 → 調整大小再寄</text:span><text:span text:style-name="T106"/></text:p>
          </table:table-cell>
        </table:table-row>
        <table:table-row table:style-name="表格55.1">
          <table:table-cell table:style-name="表格55.A3" office:value-type="string">
            <text:p text:style-name="P42" loext:marker-style-name="T302"><text:span text:style-name="T339">TTL</text:span><text:span text:style-name="T302"/></text:p>
          </table:table-cell>
          <table:table-cell table:style-name="表格55.A3" office:value-type="string">
            <text:p text:style-name="P42" loext:marker-style-name="T100"><text:span text:style-name="T99">貨物限轉 </text:span><text:span text:style-name="T173">64 </text:span><text:span text:style-name="T99">次，超過就銷毀</text:span></text:p>
          </table:table-cell>
        </table:table-row>
        <table:table-row table:style-name="表格55.1">
          <table:table-cell table:style-name="表格55.A2" office:value-type="string">
            <text:p text:style-name="P42" loext:marker-style-name="T98"><text:span text:style-name="T172">MSS</text:span><text:span text:style-name="T98"/></text:p>
          </table:table-cell>
          <table:table-cell table:style-name="表格55.A2" office:value-type="string">
            <text:p text:style-name="P42" loext:marker-style-name="T103"><text:span text:style-name="T101">你自己量好每箱重量，確保不超重</text:span><text:span text:style-name="T103"/></text:p>
          </table:table-cell>
        </table:table-row>
      </table:table>
      <text:h text:style-name="P32" text:outline-level="1" loext:marker-style-name="T73"><text:span text:style-name="T74">第 三 篇　</text:span><text:span text:style-name="T73">IPv4 → IPv6 </text:span><text:span text:style-name="T74">過渡技術</text:span>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6"><text:span text:style-name="T222">💡 <text:s/></text:span><text:span text:style-name="T53">為什麼要從 </text:span><text:span text:style-name="T65">IPv4 </text:span><text:span text:style-name="T53">換到 </text:span><text:span text:style-name="T65">IPv6</text:span><text:span text:style-name="T53">？</text:span></text:p>
            <text:p text:style-name="P7" loext:marker-style-name="T112"><text:span text:style-name="T177">IPv4 </text:span><text:span text:style-name="T111">在設計之初無法預料網路規模的爆炸性成長。隨著智慧型手機、</text:span><text:span text:style-name="T177">IoT </text:span><text:span text:style-name="T111">裝置大量普及，</text:span><text:span text:style-name="T177">IPv4 </text:span><text:span text:style-name="T111">位址已幾近耗盡，並衍生多項架構缺陷，因此 </text:span><text:span text:style-name="T177">IPv6 </text:span><text:span text:style-name="T111">誕生以從根本解決這些問題。但 </text:span><text:span text:style-name="T177">IPv4 </text:span><text:span text:style-name="T111">不會一夕消失，兩種協定長期並存，因此需要過渡技術。</text:span></text:p>
          </table:table-cell>
        </table:table-row>
      </table:table>
      <text:h text:style-name="P11" text:outline-level="2" loext:marker-style-name="T27"><text:span text:style-name="T28">一、</text:span><text:span text:style-name="T27">IPv4 vs IPv6 </text:span><text:span text:style-name="T28">完整比較</text:span>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4" loext:marker-style-name="T71"><text:span text:style-name="T72">比較項目</text:span><text:span text:style-name="T71"/></text:p>
            </table:table-cell>
            <table:table-cell table:style-name="表格57.A1" office:value-type="string">
              <text:p text:style-name="P4" loext:marker-style-name="T71"><text:span text:style-name="T81">✗ IPv4 </text:span><text:span text:style-name="T72">問題</text:span></text:p>
            </table:table-cell>
            <table:table-cell table:style-name="表格57.A1" office:value-type="string">
              <text:p text:style-name="P4" loext:marker-style-name="T71"><text:span text:style-name="T81">✓ IPv6 </text:span><text:span text:style-name="T72">改進</text:span></text:p>
            </table:table-cell>
          </table:table-row>
        </table:table-header-rows>
        <table:table-row table:style-name="表格57.2">
          <table:table-cell table:style-name="表格57.A2" office:value-type="string">
            <text:p text:style-name="P42" loext:marker-style-name="T85"><text:span text:style-name="T86">位址長度</text:span><text:span text:style-name="T85"/></text:p>
          </table:table-cell>
          <table:table-cell table:style-name="表格57.A2" office:value-type="string">
            <text:p text:style-name="P42" loext:marker-style-name="T85"><text:span text:style-name="T335">32 bit</text:span><text:span text:style-name="T86">，約 </text:span><text:span text:style-name="T161">43 </text:span><text:span text:style-name="T86">億個 </text:span><text:span text:style-name="T161">IP</text:span><text:span text:style-name="T86">，已嚴重不足</text:span></text:p>
          </table:table-cell>
          <table:table-cell table:style-name="表格57.A2" office:value-type="string">
            <text:p text:style-name="P42" loext:marker-style-name="T85"><text:span text:style-name="T446">128 bit</text:span><text:span text:style-name="T86">，約 </text:span><text:span text:style-name="T161">3.4×10³⁸ </text:span><text:span text:style-name="T86">個，幾乎用不完</text:span></text:p>
          </table:table-cell>
        </table:table-row>
        <table:table-row table:style-name="表格57.3">
          <table:table-cell table:style-name="表格57.A3" office:value-type="string">
            <text:p text:style-name="P42" loext:marker-style-name="T85"><text:span text:style-name="T161">NAT </text:span><text:span text:style-name="T86">位址轉換</text:span></text:p>
          </table:table-cell>
          <table:table-cell table:style-name="表格57.A3" office:value-type="string">
            <text:p text:style-name="P42" loext:marker-style-name="T85"><text:span text:style-name="T101">需 </text:span><text:span text:style-name="T169">NAT </text:span><text:span text:style-name="T101">共用 </text:span><text:span text:style-name="T169">IP</text:span><text:span text:style-name="T86">，破壞 </text:span><text:span text:style-name="T161">End-to-End</text:span></text:p>
          </table:table-cell>
          <table:table-cell table:style-name="表格57.A3" office:value-type="string">
            <text:p text:style-name="P42" loext:marker-style-name="T85"><text:span text:style-name="T96">每裝置獨立公開 </text:span><text:span text:style-name="T172">IP</text:span><text:span text:style-name="T96">，不需 </text:span><text:span text:style-name="T172">NAT</text:span><text:span text:style-name="T86">，恢復 </text:span><text:span text:style-name="T161">E2E</text:span></text:p>
          </table:table-cell>
        </table:table-row>
        <table:table-row table:style-name="表格57.1">
          <table:table-cell table:style-name="表格57.A2" office:value-type="string">
            <text:p text:style-name="P42" loext:marker-style-name="T85"><text:span text:style-name="T86">安全性</text:span><text:span text:style-name="T85"/></text:p>
          </table:table-cell>
          <table:table-cell table:style-name="表格57.A2" office:value-type="string">
            <text:p text:style-name="P42" loext:marker-style-name="T85"><text:span text:style-name="T86">無內建加密／驗證，</text:span><text:span text:style-name="T101">須另裝 </text:span><text:span text:style-name="T169">VPN</text:span></text:p>
          </table:table-cell>
          <table:table-cell table:style-name="表格57.A2" office:value-type="string">
            <text:p text:style-name="P42" loext:marker-style-name="T85"><text:span text:style-name="T303">支援 </text:span><text:span text:style-name="T340">IPsec</text:span><text:span text:style-name="T96">（加密＋驗證）</text:span><text:span text:style-name="T86">※ </text:span><text:span text:style-name="T161">RFC 6434 </text:span><text:span text:style-name="T86">後改建議</text:span></text:p>
          </table:table-cell>
        </table:table-row>
        <table:table-row table:style-name="表格57.1">
          <table:table-cell table:style-name="表格57.A3" office:value-type="string">
            <text:p text:style-name="P42" loext:marker-style-name="T85"><text:span text:style-name="T161">Header </text:span><text:span text:style-name="T86">結構</text:span></text:p>
          </table:table-cell>
          <table:table-cell table:style-name="表格57.A3" office:value-type="string">
            <text:p text:style-name="P42" loext:marker-style-name="T85"><text:span text:style-name="T101">可變長度</text:span><text:span text:style-name="T86">含 </text:span><text:span text:style-name="T161">Options</text:span><text:span text:style-name="T86">，</text:span><text:span text:style-name="T161">Router </text:span><text:span text:style-name="T86">效率低</text:span></text:p>
          </table:table-cell>
          <table:table-cell table:style-name="表格57.A3" office:value-type="string">
            <text:p text:style-name="P42" loext:marker-style-name="T85"><text:span text:style-name="T96">固定 </text:span><text:span text:style-name="T172">40 bytes </text:span><text:span text:style-name="T86">基本 </text:span><text:span text:style-name="T161">Header</text:span><text:span text:style-name="T86">，轉送更快</text:span></text:p>
          </table:table-cell>
        </table:table-row>
        <table:table-row table:style-name="表格57.1">
          <table:table-cell table:style-name="表格57.A2" office:value-type="string">
            <text:p text:style-name="P42" loext:marker-style-name="T85"><text:span text:style-name="T86">服務品質 </text:span><text:span text:style-name="T161">QoS</text:span></text:p>
          </table:table-cell>
          <table:table-cell table:style-name="表格57.A2" office:value-type="string">
            <text:p text:style-name="P42" loext:marker-style-name="T103"><text:span text:style-name="T101">無法有效標記流量優先權</text:span><text:span text:style-name="T103"/></text:p>
          </table:table-cell>
          <table:table-cell table:style-name="表格57.A2" office:value-type="string">
            <text:p text:style-name="P42" loext:marker-style-name="T85"><text:span text:style-name="T172">Flow Label </text:span><text:span text:style-name="T96">欄位</text:span><text:span text:style-name="T86">，</text:span><text:span text:style-name="T387">可標記高優先流量</text:span></text:p>
          </table:table-cell>
        </table:table-row>
        <table:table-row table:style-name="表格57.1">
          <table:table-cell table:style-name="表格57.A3" office:value-type="string">
            <text:p text:style-name="P42" loext:marker-style-name="T85"><text:span text:style-name="T86">廣播方式</text:span><text:span text:style-name="T85"/></text:p>
          </table:table-cell>
          <table:table-cell table:style-name="表格57.A3" office:value-type="string">
            <text:p text:style-name="P42" loext:marker-style-name="T85"><text:span text:style-name="T169">Broadcast</text:span><text:span text:style-name="T86">：一次發給所有人，浪費頻寬</text:span></text:p>
          </table:table-cell>
          <table:table-cell table:style-name="表格57.A3" office:value-type="string">
            <text:p text:style-name="P42" loext:marker-style-name="T85"><text:span text:style-name="T86">改用</text:span><text:span text:style-name="T96"> </text:span><text:span text:style-name="T172">Multicast</text:span><text:span text:style-name="T96">（群播）／ </text:span><text:span text:style-name="T172">Anycast</text:span><text:span text:style-name="T96">（任播）</text:span></text:p>
          </table:table-cell>
        </table:table-row>
        <table:table-row table:style-name="表格57.1">
          <table:table-cell table:style-name="表格57.A2" office:value-type="string">
            <text:p text:style-name="P42" loext:marker-style-name="T85"><text:span text:style-name="T161">IP </text:span><text:span text:style-name="T86">配置方式</text:span></text:p>
          </table:table-cell>
          <table:table-cell table:style-name="表格57.A2" office:value-type="string">
            <text:p text:style-name="P42" loext:marker-style-name="T85"><text:span text:style-name="T99">需手動設定或 </text:span><text:span text:style-name="T173">DHCP</text:span><text:span text:style-name="T86">，管理繁瑣</text:span></text:p>
          </table:table-cell>
          <table:table-cell table:style-name="表格57.A2" office:value-type="string">
            <text:p text:style-name="P42" loext:marker-style-name="T85"><text:span text:style-name="T161">SLAAC </text:span><text:span text:style-name="T86">無狀態自動配置，</text:span><text:span text:style-name="T364">插網路即取得 </text:span><text:span text:style-name="T377">IP</text:span>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6"><text:span text:style-name="T222">📌 <text:s/></text:span><text:span text:style-name="T247">補充：</text:span><text:span text:style-name="T251">IPsec </text:span><text:span text:style-name="T247">強制 </text:span><text:span text:style-name="T251">vs </text:span><text:span text:style-name="T247">建議</text:span></text:p>
            <text:p text:style-name="P7" loext:marker-style-name="T112"><text:span text:style-name="T177">IPv6 </text:span><text:span text:style-name="T111">早期規範（</text:span><text:span text:style-name="T177">RFC 2460</text:span><text:span text:style-name="T111">）將 </text:span><text:span text:style-name="T177">IPsec </text:span><text:span text:style-name="T111">列為「強制」；</text:span><text:span text:style-name="T177">2011 </text:span><text:span text:style-name="T111">年 </text:span><text:span text:style-name="T177">RFC 6434 </text:span><text:span text:style-name="T111">修訂後改為「建議（</text:span><text:span text:style-name="T177">SHOULD</text:span><text:span text:style-name="T111">）」。考試普遍仍以「原生支援 </text:span><text:span text:style-name="T177">IPsec</text:span><text:span text:style-name="T111">」作為 </text:span><text:span text:style-name="T177">IPv6 </text:span><text:span text:style-name="T111">改進特色，此處標注供參考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二、三種 </text:span><text:span text:style-name="T27">IPv4 → IPv6 </text:span><text:span text:style-name="T28">過渡技術</text:span>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7" loext:marker-style-name="T233"><text:span text:style-name="T240">① </text:span><text:span text:style-name="T242">Dual Stack</text:span><text:span text:style-name="T234">（雙協定堆疊）</text:span><text:span text:style-name="T232">— 最常用、最推薦</text:span></text:p>
            <text:p text:style-name="P8" loext:marker-style-name="T112"><text:span text:style-name="T477">裝置同時具備 </text:span><text:span text:style-name="T490">IPv4 </text:span><text:span text:style-name="T477">與 </text:span><text:span text:style-name="T490">IPv6 </text:span><text:span text:style-name="T477">兩套協定堆疊</text:span><text:span text:style-name="T111">。</text:span><text:span text:style-name="T198">DNS A record → </text:span><text:span text:style-name="T133">回傳 </text:span><text:span text:style-name="T198">IPv4</text:span><text:span text:style-name="T133">；</text:span><text:span text:style-name="T198">DNS AAAA record → </text:span><text:span text:style-name="T133">回傳 </text:span><text:span text:style-name="T198">IPv6</text:span><text:span text:style-name="T111">。連線時優先選用 </text:span><text:span text:style-name="T177">IPv6</text:span><text:span text:style-name="T111">，對端不支援則自動退回 </text:span><text:span text:style-name="T177">IPv4</text:span><text:span text:style-name="T111">。不需任何封包轉換，效能損耗最低。</text:span></text:p>
            <text:p text:style-name="P8" loext:marker-style-name="T112"><text:span text:style-name="T111">流程：輸入 </text:span><text:span text:style-name="T177">google.com → DNS </text:span><text:span text:style-name="T111">回傳 </text:span><text:span text:style-name="T177">A</text:span><text:span text:style-name="T111">＋</text:span><text:span text:style-name="T177">AAAA → </text:span><text:span text:style-name="T111">優先選 </text:span><text:span text:style-name="T177">IPv6 → </text:span><text:span text:style-name="T111">直接連線（無需轉換）。</text:span></text:p>
          </table:table-cell>
        </table:table-row>
        <table:table-row table:style-name="表格58.1">
          <table:table-cell table:style-name="表格58.A2" office:value-type="string">
            <text:p text:style-name="P7" loext:marker-style-name="T246"><text:span text:style-name="T248">②</text:span><text:span text:style-name="T250"> Tunneling</text:span><text:span text:style-name="T245">（隧道技術）</text:span><text:span text:style-name="T243">— 過渡期橋接方案</text:span></text:p>
            <text:p text:style-name="P8" loext:marker-style-name="T112"><text:span text:style-name="T111">中間網路只支援 </text:span><text:span text:style-name="T177">IPv4</text:span><text:span text:style-name="T111">，無法直接傳送 </text:span><text:span text:style-name="T177">IPv6 </text:span><text:span text:style-name="T111">封包。解法：</text:span><text:span text:style-name="T477">將 </text:span><text:span text:style-name="T490">IPv6 </text:span><text:span text:style-name="T477">封包完整封裝進 </text:span><text:span text:style-name="T490">IPv4 </text:span><text:span text:style-name="T477">外殼，抵達目的地後拆除外層 </text:span><text:span text:style-name="T490">IPv4</text:span><text:span text:style-name="T477">、還原 </text:span><text:span text:style-name="T490">IPv6 </text:span><text:span text:style-name="T477">封包</text:span><text:span text:style-name="T111">。常見技術：</text:span><text:span text:style-name="T177">6in4</text:span><text:span text:style-name="T111">、</text:span><text:span text:style-name="T177">6to4</text:span><text:span text:style-name="T111">、</text:span><text:span text:style-name="T177">Teredo</text:span><text:span text:style-name="T111">、</text:span><text:span text:style-name="T177">ISATAP</text:span><text:span text:style-name="T111">。</text:span></text:p>
            <text:p text:style-name="P8" loext:marker-style-name="T112"><text:span text:style-name="T111">示意：</text:span><text:span text:style-name="T177">[ IPv4 </text:span><text:span text:style-name="T111">外層 </text:span><text:span text:style-name="T177">Header ][ IPv6 </text:span><text:span text:style-name="T111">封包（完整保留）</text:span><text:span text:style-name="T177">] → </text:span><text:span text:style-name="T111">目的地拆除外殼 → 還原 </text:span><text:span text:style-name="T177">IPv6</text:span><text:span text:style-name="T111">。</text:span></text:p>
          </table:table-cell>
        </table:table-row>
        <table:table-row table:style-name="表格58.1">
          <table:table-cell table:style-name="表格58.A3" office:value-type="string">
            <text:p text:style-name="P7" loext:marker-style-name="T285"><text:span text:style-name="T288">③ </text:span><text:span text:style-name="T289">Translation</text:span><text:span text:style-name="T284">（</text:span><text:span text:style-name="T289">NAT64</text:span><text:span text:style-name="T284">）</text:span><text:span text:style-name="T282">— 協定轉換、互通最後手段</text:span></text:p>
            <text:p text:style-name="P8" loext:marker-style-name="T112"><text:span text:style-name="T111">適用場景：</text:span><text:span text:style-name="T177">IPv6-only </text:span><text:span text:style-name="T111">裝置需與 </text:span><text:span text:style-name="T177">IPv4-only </text:span><text:span text:style-name="T111">裝置直接通訊。</text:span><text:span text:style-name="T322">透過轉換閘道器即時將封包表頭轉換為對方格式</text:span><text:span text:style-name="T111">。代表技術：</text:span><text:span text:style-name="T177">NAT64 + DNS64</text:span><text:span text:style-name="T111">。</text:span><text:span text:style-name="T316">複雜度最高，有額外效能損耗</text:span><text:span text:style-name="T111">。</text:span></text:p>
            <text:p text:style-name="P8" loext:marker-style-name="T112"><text:span text:style-name="T111">示意：</text:span><text:span text:style-name="T177">IPv6 </text:span><text:span text:style-name="T111">裝置 → </text:span><text:span text:style-name="T177">[ NAT64 </text:span><text:span text:style-name="T526">轉換閘道</text:span><text:span text:style-name="T111"> </text:span><text:span text:style-name="T177">] → IPv4 </text:span><text:span text:style-name="T111">裝置（雙向互轉）。</text:span></text:p>
          </table:table-cell>
        </table:table-row>
      </table:table>
      <text:h text:style-name="P11" text:outline-level="2" loext:marker-style-name="T27"><text:span text:style-name="T28">三、生活比喻（一次記住）</text:span><text:span text:style-name="T27"/>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4" loext:marker-style-name="T75"><text:span text:style-name="T76">技術</text:span><text:span text:style-name="T75"/></text:p>
            </table:table-cell>
            <table:table-cell table:style-name="表格59.A1" office:value-type="string">
              <text:p text:style-name="P4" loext:marker-style-name="T75"><text:span text:style-name="T76">生活比喻</text:span><text:span text:style-name="T75"/>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42" loext:marker-style-name="T144"><text:span text:style-name="T209">Dual Stack</text:span><text:soft-page-break/><text:span text:style-name="T144"/></text:p>
          </table:table-cell>
          <table:table-cell table:style-name="表格59.A2" office:value-type="string">
            <text:p text:style-name="P42" loext:marker-style-name="T144"><text:span text:style-name="T145">你</text:span><text:span text:style-name="T148">同時會中文 </text:span><text:span text:style-name="T210">+ </text:span><text:span text:style-name="T148">英文</text:span><text:span text:style-name="T145">，遇到誰說哪個</text:span></text:p>
          </table:table-cell>
        </table:table-row>
        <table:table-row table:style-name="表格59.1">
          <table:table-cell table:style-name="表格59.A3" office:value-type="string">
            <text:p text:style-name="P42" loext:marker-style-name="T144"><text:span text:style-name="T209">Tunneling</text:span><text:span text:style-name="T144"/></text:p>
          </table:table-cell>
          <table:table-cell table:style-name="表格59.A3" office:value-type="string">
            <text:p text:style-name="P42" loext:marker-style-name="T144"><text:span text:style-name="T376">把英文信裝進中文信封偷渡過去</text:span><text:span text:style-name="T145">，到目的地再打開</text:span></text:p>
          </table:table-cell>
        </table:table-row>
        <table:table-row table:style-name="表格59.1">
          <table:table-cell table:style-name="表格59.A2" office:value-type="string">
            <text:p text:style-name="P42" loext:marker-style-name="T144"><text:span text:style-name="T209">Translation</text:span><text:span text:style-name="T144"/></text:p>
          </table:table-cell>
          <table:table-cell table:style-name="表格59.A2" office:value-type="string">
            <text:p text:style-name="P42" loext:marker-style-name="T144"><text:span text:style-name="T588">現場請翻譯員</text:span><text:span text:style-name="T145">即時口譯</text:span>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6"><text:span text:style-name="T222">🏠 <text:s/></text:span><text:span text:style-name="T53">用「寄信</text:span><text:span text:style-name="T65">/</text:span><text:span text:style-name="T53">門牌」理解</text:span></text:p>
            <text:p text:style-name="P7"><text:span text:style-name="T400">IPv4 </text:span><text:span text:style-name="T391">的困境：整棟公寓共用一個門牌</text:span><text:span text:style-name="T528">（</text:span><text:span text:style-name="T544">NAT</text:span><text:span text:style-name="T528">）</text:span><text:span text:style-name="T111">，郵差只送到大門，裡面誰是誰要另外猜；地址快用光還在借號碼。</text:span></text:p>
            <text:p text:style-name="P8"><text:span text:style-name="T343">IPv6 </text:span><text:span text:style-name="T317">的世界：每個人都有獨立門牌（公開 </text:span><text:span text:style-name="T343">IP</text:span><text:span text:style-name="T317">）</text:span><text:span text:style-name="T111">，地址多到用不完，郵件直接送到本人手上，不需中間人轉達。</text:span></text:p>
          </table:table-cell>
          <table:covered-table-cell/>
        </table:table-row>
      </table:table>
      <text:h text:style-name="P11" text:outline-level="2" loext:marker-style-name="T27"><text:span text:style-name="T28">四、考試速記版</text:span><text:span text:style-name="T27"/>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6"><text:span text:style-name="T222">🧠 <text:s/></text:span><text:span text:style-name="T281">一句話記憶法</text:span></text:p>
            <text:p text:style-name="P7"><text:span text:style-name="T288">IPv6 </text:span><text:span text:style-name="T282">特點：</text:span><text:span text:style-name="T111">大（</text:span><text:span text:style-name="T177">128 bit</text:span><text:span text:style-name="T111">）＋ </text:span><text:span text:style-name="T439">安全（</text:span><text:span text:style-name="T460">IPsec</text:span><text:span text:style-name="T439">）</text:span><text:span text:style-name="T111">＋ </text:span><text:span text:style-name="T523">快（固定 </text:span><text:span text:style-name="T541">Header</text:span><text:span text:style-name="T523">）</text:span><text:span text:style-name="T111">＋ 自動（</text:span><text:span text:style-name="T177">SLAAC</text:span><text:span text:style-name="T111">）＋ 乾淨（無 </text:span><text:span text:style-name="T177">Broadcast</text:span><text:span text:style-name="T111">）。</text:span></text:p>
            <text:p text:style-name="P8"><text:span text:style-name="T284">過渡技術</text:span><text:span text:style-name="T282">：</text:span><text:span text:style-name="T111">雙語（</text:span><text:span text:style-name="T198">Dual Stack</text:span><text:span text:style-name="T111">）＋ 偽裝（</text:span><text:span text:style-name="T198">Tunneling</text:span><text:span text:style-name="T111">）＋ 翻譯（</text:span><text:span text:style-name="T198">Translation</text:span><text:span text:style-name="T111">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39" loext:marker-style-name="T71"><text:span text:style-name="T81">IPv4 </text:span><text:span text:style-name="T72">七大問題</text:span></text:p>
          </table:table-cell>
          <table:table-cell table:style-name="表格60.A2" office:value-type="string">
            <text:p text:style-name="P39" loext:marker-style-name="T71"><text:span text:style-name="T81">IPv6 </text:span><text:span text:style-name="T72">七大改進</text:span></text:p>
          </table:table-cell>
        </table:table-row>
        <table:table-row table:style-name="表格60.1">
          <table:table-cell table:style-name="表格60.A3" office:value-type="string">
            <text:p text:style-name="P42" loext:marker-style-name="T85"><text:span text:style-name="T86">位址不足（</text:span><text:span text:style-name="T161">32 bit</text:span><text:span text:style-name="T86">）／需 </text:span><text:span text:style-name="T161">NAT </text:span><text:span text:style-name="T86">破壞 </text:span><text:span text:style-name="T161">E2E</text:span><text:span text:style-name="T86">／無加密驗證／</text:span><text:span text:style-name="T536">Header </text:span><text:span text:style-name="T516">可變效率低</text:span><text:span text:style-name="T86">／缺 </text:span><text:span text:style-name="T161">QoS</text:span><text:span text:style-name="T86">／用 </text:span><text:span text:style-name="T161">Broadcast </text:span><text:span text:style-name="T86">浪費／</text:span><text:span text:style-name="T161">IP </text:span><text:span text:style-name="T86">需手動設定</text:span></text:p>
          </table:table-cell>
          <table:table-cell table:style-name="表格60.A3" office:value-type="string">
            <text:p text:style-name="P42" loext:marker-style-name="T85"><text:span text:style-name="T161">128 bit </text:span><text:span text:style-name="T86">近乎無限／不需 </text:span><text:span text:style-name="T161">NAT </text:span><text:span text:style-name="T86">恢復 </text:span><text:span text:style-name="T161">E2E</text:span><text:span text:style-name="T86">／</text:span><text:span text:style-name="T303">支援 </text:span><text:span text:style-name="T340">IPsec</text:span><text:span text:style-name="T86">／</text:span><text:span text:style-name="T303">固定 </text:span><text:span text:style-name="T340">40 bytes </text:span><text:span text:style-name="T303">轉送快</text:span><text:span text:style-name="T86">／</text:span><text:span text:style-name="T161">Flow Label </text:span><text:span text:style-name="T86">支援 </text:span><text:span text:style-name="T161">QoS</text:span><text:span text:style-name="T86">／改用 </text:span><text:span text:style-name="T161">Multicast/Anycast</text:span><text:span text:style-name="T86">／</text:span><text:span text:style-name="T161">SLAAC </text:span><text:span text:style-name="T86">自動配置</text:span></text:p>
          </table:table-cell>
        </table:table-row>
      </table:table>
      <text:h text:style-name="P32" text:outline-level="1" loext:marker-style-name="T73"><text:span text:style-name="T74">第 四 篇　</text:span><text:span text:style-name="T73">ARP</text:span><text:span text:style-name="T74">、</text:span><text:span text:style-name="T73">NAT </text:span><text:span text:style-name="T74">與完整上網流程</text:span>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6"><text:span text:style-name="T222">🔑 <text:s/></text:span><text:span text:style-name="T53">最基礎的比喻，先懂這個</text:span></text:p>
            <text:p text:style-name="P7" loext:marker-style-name="T112"><text:span text:style-name="T177">IP </text:span><text:span text:style-name="T111">位址決定「最終送到哪台電腦」；</text:span><text:span text:style-name="T177">MAC </text:span><text:span text:style-name="T111">位址決定「目前這一跳要交給哪個網路設備」。</text:span></text:p>
            <text:p text:style-name="P8" loext:marker-style-name="T112"><text:span text:style-name="T574">資料在網路中「實際傳送」靠 </text:span><text:span text:style-name="T597">MAC</text:span><text:span text:style-name="T111">，</text:span><text:span text:style-name="T437">但我們只知道對方的 </text:span><text:span text:style-name="T458">IP</text:span><text:span text:style-name="T177">——</text:span><text:span text:style-name="T111">所以</text:span><text:span text:style-name="T391">需要一個轉換機制</text:span><text:span text:style-name="T111">，這就是 </text:span><text:span text:style-name="T177">ARP </text:span><text:span text:style-name="T111">的工作。</text:span></text:p>
          </table:table-cell>
        </table:table-row>
      </table:table>
      <text:h text:style-name="P11" text:outline-level="2" loext:marker-style-name="T27"><text:span text:style-name="T28">一、</text:span><text:span text:style-name="T27">ARP</text:span><text:span text:style-name="T28">（</text:span><text:span text:style-name="T27">Address Resolution Protocol</text:span><text:span text:style-name="T28">）：</text:span><text:span text:style-name="T29">IP → MAC</text:span></text:h>
      <text:p text:style-name="P48" loext:marker-style-name="T112"><text:span text:style-name="T111">一句話定義：</text:span><text:span text:style-name="T200">ARP</text:span><text:span text:style-name="T177"> </text:span><text:span text:style-name="T111">＝ </text:span><text:span text:style-name="T372">用 </text:span><text:span text:style-name="T383">IP </text:span><text:span text:style-name="T372">找 </text:span><text:span text:style-name="T383">MAC</text:span><text:span text:style-name="T111">，</text:span><text:span text:style-name="T317">只在同一個區域網路（</text:span><text:span text:style-name="T343">LAN</text:span><text:span text:style-name="T317">）內使用</text:span><text:span text:style-name="T111">。</text:span>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6"><text:span text:style-name="T222">📋 <text:s/></text:span><text:span text:style-name="T65">ARP </text:span><text:span text:style-name="T53">運作流程（考試必考）</text:span></text:p>
            <text:p text:style-name="P7"><text:span text:style-name="T67">① </text:span><text:span text:style-name="T57">查 </text:span><text:span text:style-name="T66">ARP Cache</text:span><text:span text:style-name="T57">（筆記本）</text:span><text:span text:style-name="T58">：</text:span><text:span text:style-name="T111">先查自己的記錄「</text:span><text:span text:style-name="T617">我之前有沒有問過這個 </text:span><text:span text:style-name="T634">IP</text:span><text:span text:style-name="T617">？</text:span><text:span text:style-name="T111">」有 → 直接用。</text:span></text:p>
            <text:p text:style-name="P8"><text:span text:style-name="T67">② </text:span><text:span text:style-name="T57">發出 </text:span><text:span text:style-name="T66">ARP Request</text:span><text:span text:style-name="T57">（廣播）</text:span><text:span text:style-name="T58">：</text:span><text:span text:style-name="T111">沒記錄 →</text:span><text:span text:style-name="T573"> 對整個區網廣播</text:span><text:span text:style-name="T111">「誰是 </text:span><text:span text:style-name="T177">192.168.1.5</text:span><text:span text:style-name="T111">？</text:span><text:span text:style-name="T573">請告訴我你的 </text:span><text:span text:style-name="T596">MAC</text:span><text:span text:style-name="T573">！</text:span><text:span text:style-name="T111">」所有機器都收到。</text:span></text:p>
            <text:p text:style-name="P8"><text:span text:style-name="T67">③ </text:span><text:span text:style-name="T57">收到 </text:span><text:span text:style-name="T66">ARP Reply</text:span><text:span text:style-name="T57">（單播回應）</text:span><text:span text:style-name="T58">：</text:span><text:span text:style-name="T295">IP </text:span><text:span text:style-name="T294">是 </text:span><text:span text:style-name="T295">192.168.1.5 </text:span><text:span text:style-name="T294">的機器回應「我是！</text:span><text:span text:style-name="T295">MAC </text:span><text:span text:style-name="T294">是 </text:span><text:span text:style-name="T295">AA:BB:CC</text:span><text:span text:style-name="T294">」</text:span><text:span text:style-name="T111">，其餘機器靜默忽略。</text:span></text:p>
            <text:p text:style-name="P8"><text:span text:style-name="T67">④ </text:span><text:span text:style-name="T57">存進 </text:span><text:span text:style-name="T66">ARP Cache</text:span><text:span text:style-name="T58">：</text:span><text:span text:style-name="T436">把「</text:span><text:span text:style-name="T457">IP ↔ MAC</text:span><text:span text:style-name="T436">」對應記下</text:span><text:span text:style-name="T111">，</text:span><text:span text:style-name="T317">下次直接用</text:span><text:span text:style-name="T111">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4" loext:marker-style-name="T71"><text:span text:style-name="T72">項目</text:span><text:span text:style-name="T71"/></text:p>
          </table:table-cell>
          <table:table-cell table:style-name="表格62.A2" office:value-type="string">
            <text:p text:style-name="P4" loext:marker-style-name="T71"><text:span text:style-name="T72">內容</text:span><text:span text:style-name="T71"/></text:p>
          </table:table-cell>
        </table:table-row>
        <table:table-row table:style-name="表格62.1">
          <table:table-cell table:style-name="表格62.A3" office:value-type="string">
            <text:p text:style-name="P42" loext:marker-style-name="T517"><text:span text:style-name="T537">ARP Spoofing</text:span><text:span text:style-name="T518">（</text:span><text:span text:style-name="T537">ARP </text:span><text:span text:style-name="T518">欺騙）</text:span></text:p>
          </table:table-cell>
          <table:table-cell table:style-name="表格62.A3" office:value-type="string">
            <text:p text:style-name="P42" loext:marker-style-name="T85"><text:span text:style-name="T420">攻擊者</text:span><text:span text:style-name="T582">假冒他人</text:span><text:span text:style-name="T420">的 </text:span><text:span text:style-name="T446">MAC</text:span><text:span text:style-name="T420">，讓封包被送到錯的地方</text:span><text:span text:style-name="T86"> → 中間人攻擊（</text:span><text:span text:style-name="T161">MITM</text:span><text:span text:style-name="T86">）</text:span></text:p>
          </table:table-cell>
        </table:table-row>
        <table:table-row table:style-name="表格62.1">
          <table:table-cell table:style-name="表格62.A4" office:value-type="string">
            <text:p text:style-name="P42" loext:marker-style-name="T103"><text:span text:style-name="T169">arp -a</text:span><text:span text:style-name="T103"/></text:p>
          </table:table-cell>
          <table:table-cell table:style-name="表格62.A4" office:value-type="string">
            <text:p text:style-name="P42" loext:marker-style-name="T85"><text:span text:style-name="T583">查看本機的 </text:span><text:span text:style-name="T605">ARP </text:span><text:span text:style-name="T583">對應表</text:span><text:span text:style-name="T86">（</text:span><text:span text:style-name="T174">IP ↔ MAC </text:span><text:span text:style-name="T108">清單</text:span><text:span text:style-name="T86">）</text:span></text:p>
          </table:table-cell>
        </table:table-row>
        <table:table-row table:style-name="表格62.1">
          <table:table-cell table:style-name="表格62.A3" office:value-type="string">
            <text:p text:style-name="P42" loext:marker-style-name="T305"><text:span text:style-name="T340">ping [IP]</text:span><text:span text:style-name="T305"/></text:p>
          </table:table-cell>
          <table:table-cell table:style-name="表格62.A3" office:value-type="string">
            <text:p text:style-name="P42" loext:marker-style-name="T85"><text:span text:style-name="T364">觸發 </text:span><text:span text:style-name="T377">ARP </text:span><text:span text:style-name="T364">運作</text:span><text:span text:style-name="T86">，</text:span><text:span text:style-name="T298">讓電腦主動查詢對應 </text:span><text:span text:style-name="T335">MAC</text:span></text:p>
          </table:table-cell>
        </table:table-row>
      </table:table>
      <text:h text:style-name="P11" text:outline-level="2" loext:marker-style-name="T27"><text:span text:style-name="T28">二、</text:span><text:span text:style-name="T27">NAT</text:span><text:span text:style-name="T28">（</text:span><text:span text:style-name="T27">Network Address Translation</text:span><text:span text:style-name="T28">）：私網 → 公網</text:span></text:h>
      <text:p text:style-name="P48" loext:marker-style-name="T112"><text:span text:style-name="T111">一句話定義：</text:span><text:span text:style-name="T198">NAT</text:span><text:span text:style-name="T177"> </text:span><text:span text:style-name="T111">＝ </text:span><text:span text:style-name="T617">路由器幫你把「私有 </text:span><text:span text:style-name="T634">IP</text:span><text:span text:style-name="T617">」改成「公網 </text:span><text:span text:style-name="T634">IP</text:span><text:span text:style-name="T617">」</text:span><text:span text:style-name="T111">，讓內部機器能夠上網。</text:span><text:span text:style-name="T294">私有 </text:span><text:span text:style-name="T295">IP</text:span><text:span text:style-name="T294">（如 </text:span><text:span text:style-name="T295">192.168.1.2</text:span><text:span text:style-name="T294">）外網看不到，只在家裡用</text:span><text:span text:style-name="T111">；路由器的公網 </text:span><text:span text:style-name="T177">IP</text:span><text:span text:style-name="T111">（</text:span><text:span text:style-name="T177">220.x.x.x</text:span><text:span text:style-name="T111">，</text:span><text:span text:style-name="T177">ISP </text:span><text:span text:style-name="T111">分配）外網才認識。</text:span>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6"><text:span text:style-name="T222">▸ <text:s/></text:span><text:span text:style-name="T65">NAT </text:span><text:span text:style-name="T53">運作流程</text:span></text:p>
            <text:p text:style-name="P7" loext:marker-style-name="T112"><text:span text:style-name="T177">① </text:span><text:span text:style-name="T111">你的電腦（</text:span><text:span text:style-name="T177">192.168.1.2</text:span><text:span text:style-name="T111">）發送資料給 </text:span><text:span text:style-name="T177">Google → ② </text:span><text:span text:style-name="T391">封包抵達路由器</text:span><text:span text:style-name="T111">，</text:span><text:span text:style-name="T343">NAT </text:span><text:span text:style-name="T317">把來源 </text:span><text:span text:style-name="T343">IP </text:span><text:span text:style-name="T317">改成公網 </text:span><text:span text:style-name="T343">IP</text:span><text:span text:style-name="T317">（</text:span><text:span text:style-name="T343">220.x.x.x</text:span><text:span text:style-name="T317">）</text:span><text:span text:style-name="T523">對外偽裝身份</text:span><text:span text:style-name="T111"> → ③ </text:span><text:span text:style-name="T177">Google </text:span><text:span text:style-name="T111">收到，回應給公網 </text:span><text:span text:style-name="T177">IP</text:span><text:span text:style-name="T111">（</text:span><text:span text:style-name="T177">220.x.x.x</text:span><text:span text:style-name="T111">）→ ④ 路由器把目的地 </text:span><text:span text:style-name="T177">IP </text:span><text:span text:style-name="T111">換回 </text:span><text:span text:style-name="T177">192.168.1.2</text:span><text:span text:style-name="T111">，轉發給你的電腦。</text:span>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4" loext:marker-style-name="T71"><text:span text:style-name="T72">類型</text:span><text:span text:style-name="T71"/></text:p>
          </table:table-cell>
          <table:table-cell table:style-name="表格63.A2" office:value-type="string">
            <text:p text:style-name="P4" loext:marker-style-name="T71"><text:span text:style-name="T72">中文</text:span><text:span text:style-name="T71"/></text:p>
          </table:table-cell>
          <table:table-cell table:style-name="表格63.A2" office:value-type="string">
            <text:p text:style-name="P4" loext:marker-style-name="T71"><text:span text:style-name="T72">說明</text:span><text:span text:style-name="T71"/></text:p>
          </table:table-cell>
          <table:table-cell table:style-name="表格63.A2" office:value-type="string">
            <text:p text:style-name="P4" loext:marker-style-name="T71"><text:span text:style-name="T72">特點</text:span><text:span text:style-name="T71"/></text:p>
          </table:table-cell>
        </table:table-row>
        <table:table-row table:style-name="表格63.1">
          <table:table-cell table:style-name="表格63.A3" office:value-type="string">
            <text:p text:style-name="P42" loext:marker-style-name="T98"><text:span text:style-name="T172">Static NAT</text:span><text:span text:style-name="T98"/></text:p>
          </table:table-cell>
          <table:table-cell table:style-name="表格63.A3" office:value-type="string">
            <text:p text:style-name="P42" loext:marker-style-name="T85"><text:span text:style-name="T86">靜態 </text:span><text:span text:style-name="T161">NAT</text:span></text:p>
          </table:table-cell>
          <table:table-cell table:style-name="表格63.A3" office:value-type="string">
            <text:p text:style-name="P42" loext:marker-style-name="T467"><text:span text:style-name="T468">一個私有 </text:span><text:span text:style-name="T484">IP ↔ </text:span><text:span text:style-name="T468">一個公網 </text:span><text:span text:style-name="T484">IP</text:span></text:p>
          </table:table-cell>
          <table:table-cell table:style-name="表格63.A3" office:value-type="string">
            <text:p text:style-name="P42" loext:marker-style-name="T467"><text:span text:style-name="T468">固定對應</text:span><text:span text:style-name="T467"/></text:p>
          </table:table-cell>
        </table:table-row>
        <table:table-row table:style-name="表格63.1">
          <table:table-cell table:style-name="表格63.A4" office:value-type="string">
            <text:p text:style-name="P42" loext:marker-style-name="T98"><text:span text:style-name="T172">Dynamic NAT</text:span><text:span text:style-name="T98"/></text:p>
          </table:table-cell>
          <table:table-cell table:style-name="表格63.A4" office:value-type="string">
            <text:p text:style-name="P42" loext:marker-style-name="T85"><text:span text:style-name="T86">動態 </text:span><text:span text:style-name="T161">NAT</text:span></text:p>
          </table:table-cell>
          <table:table-cell table:style-name="表格63.A4" office:value-type="string">
            <text:p text:style-name="P42" loext:marker-style-name="T651"><text:span text:style-name="T652">多個私有 </text:span><text:span text:style-name="T655">IP </text:span><text:span text:style-name="T652">對應 </text:span><text:span text:style-name="T655">IP </text:span><text:span text:style-name="T652">池（</text:span><text:span text:style-name="T655">pool</text:span><text:span text:style-name="T652">）</text:span></text:p>
          </table:table-cell>
          <table:table-cell table:style-name="表格63.A4" office:value-type="string">
            <text:p text:style-name="P42" loext:marker-style-name="T651"><text:span text:style-name="T652">動態分配</text:span><text:span text:style-name="T651"/></text:p>
          </table:table-cell>
        </table:table-row>
        <table:table-row table:style-name="表格63.1">
          <table:table-cell table:style-name="表格63.A3" office:value-type="string">
            <text:p text:style-name="P42" loext:marker-style-name="T517"><text:span text:style-name="T537">PAT</text:span><text:span text:style-name="T517"/></text:p>
          </table:table-cell>
          <table:table-cell table:style-name="表格63.A3" office:value-type="string">
            <text:p text:style-name="P42" loext:marker-style-name="T85"><text:span text:style-name="T86">連接埠位址轉換</text:span><text:span text:style-name="T85"/></text:p>
          </table:table-cell>
          <table:table-cell table:style-name="表格63.A3" office:value-type="string">
            <text:p text:style-name="P42" loext:marker-style-name="T657"><text:span text:style-name="T658">多台共用一個公網 </text:span><text:span text:style-name="T659">IP</text:span></text:p>
          </table:table-cell>
          <table:table-cell table:style-name="表格63.A3" office:value-type="string">
            <text:p text:style-name="P42" loext:marker-style-name="T657"><text:span text:style-name="T658">靠 </text:span><text:span text:style-name="T659">Port </text:span><text:span text:style-name="T658">區分（最重要）</text:span>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6"><text:span text:style-name="T222">⚠️ <text:s/></text:span><text:span text:style-name="T251">NAT </text:span><text:span text:style-name="T247">的缺點（考試超愛）</text:span></text:p>
            <text:p text:style-name="P7"><text:span text:style-name="T574">破壞 </text:span><text:span text:style-name="T597">End-to-End </text:span><text:span text:style-name="T574">連線</text:span><text:span text:style-name="T243">（最重要）：</text:span><text:span text:style-name="T111">原本你↔對方是真正點對點；</text:span><text:span text:style-name="T133">有 </text:span><text:span text:style-name="T198">NAT </text:span><text:span text:style-name="T133">後變成你→</text:span><text:span text:style-name="T198">NAT→</text:span><text:span text:style-name="T133">對方，多一層轉換，不再是端對端</text:span><text:span text:style-name="T111">。</text:span></text:p>
            <text:p text:style-name="P8"><text:span text:style-name="T597">P2P / VoIP </text:span><text:span text:style-name="T574">難以運作</text:span><text:span text:style-name="T243">：</text:span><text:span text:style-name="T317">外部機器找不到你（被藏在 </text:span><text:span text:style-name="T343">NAT </text:span><text:span text:style-name="T317">後）</text:span><text:span text:style-name="T111">，</text:span><text:span text:style-name="T177">P2P </text:span><text:span text:style-name="T111">下載、</text:span><text:span text:style-name="T177">VoIP </text:span><text:span text:style-name="T111">通話等</text:span><text:span text:style-name="T653">直連功能受限</text:span><text:span text:style-name="T111">。</text:span></text:p>
            <text:p text:style-name="P8"><text:span text:style-name="T574">增加延遲</text:span><text:span text:style-name="T243">：</text:span><text:span text:style-name="T412">每個封包都需要</text:span><text:span text:style-name="T660">多一道 </text:span><text:span text:style-name="T661">IP </text:span><text:span text:style-name="T660">轉換處理</text:span><text:span text:style-name="T111">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oft-page-break/><text:span text:style-name="T28">三、解決 </text:span><text:span text:style-name="T27">NAT </text:span><text:span text:style-name="T28">限制的三種方法</text:span></text:h>
      <text:p text:style-name="P48" loext:marker-style-name="T112"><text:span text:style-name="T133">核心問題</text:span><text:span text:style-name="T111">：</text:span><text:span text:style-name="T391">外面的人只看到一個公網 </text:span><text:span text:style-name="T400">IP</text:span><text:span text:style-name="T111">，但</text:span><text:span text:style-name="T662">內部有多台機器，路由器不知道要轉給哪一台</text:span><text:span text:style-name="T111">。</text:span>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7" loext:marker-style-name="T56"><text:span text:style-name="T58">方法一：</text:span><text:span text:style-name="T66">Port Forwarding</text:span><text:span text:style-name="T57">（手動指定轉發）</text:span></text:p>
            <text:p text:style-name="P8" loext:marker-style-name="T112"><text:span text:style-name="T111">比喻：</text:span><text:span text:style-name="T458">Port</text:span><text:span text:style-name="T437">＝房間號碼</text:span><text:span text:style-name="T111">；</text:span><text:span text:style-name="T634">NAT </text:span><text:span text:style-name="T617">路由器＝大樓</text:span><text:span text:style-name="T111">；</text:span><text:span text:style-name="T458">Port Forwarding</text:span><text:span text:style-name="T437">＝門口指示牌「</text:span><text:span text:style-name="T458">80 </text:span><text:span text:style-name="T437">號房 → </text:span><text:span text:style-name="T458">192.168.1.2</text:span><text:span text:style-name="T437">」</text:span><text:span text:style-name="T111">。例：</text:span><text:span text:style-name="T177">220.x.x.x:80 → 192.168.1.2:80</text:span><text:span text:style-name="T111">（</text:span><text:span text:style-name="T622">網頁</text:span><text:span text:style-name="T111">）；</text:span><text:span text:style-name="T177">220.x.x.x:25565 → 192.168.1.2:25565</text:span><text:span text:style-name="T111">（</text:span><text:span text:style-name="T177">Minecraft</text:span><text:span text:style-name="T111">）。</text:span></text:p>
            <text:p text:style-name="P8"><text:span text:style-name="T132">優點：</text:span><text:span text:style-name="T111">設定直接、穩定，可精確控制。</text:span><text:span text:style-name="T132">缺點：</text:span><text:span text:style-name="T526">每個服務都要手動設定，</text:span><text:span text:style-name="T542">IP </text:span><text:span text:style-name="T526">改變要重設</text:span><text:span text:style-name="T111">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7" loext:marker-style-name="T233"><text:span text:style-name="T232">方法二：</text:span><text:span text:style-name="T242">UPnP</text:span><text:span text:style-name="T234">（自動版 </text:span><text:span text:style-name="T242">Port Forwarding</text:span><text:span text:style-name="T234">）</text:span></text:p>
            <text:p text:style-name="P8" loext:marker-style-name="T112"><text:span text:style-name="T323">讓裝置自動跟</text:span><text:span text:style-name="T552">路由器</text:span><text:span text:style-name="T323">要求「幫我開一個 </text:span><text:span text:style-name="T350">Port</text:span><text:span text:style-name="T323">」，不需人工設定。</text:span><text:span text:style-name="T111">① </text:span><text:span text:style-name="T619">應用程式發 </text:span><text:span text:style-name="T636">UPnP </text:span><text:span text:style-name="T619">請求</text:span><text:span text:style-name="T111"> → ② </text:span><text:span text:style-name="T553">路由器</text:span><text:span text:style-name="T619">自動新增 </text:span><text:span text:style-name="T636">Port Forwarding </text:span><text:span text:style-name="T619">規則</text:span><text:span text:style-name="T111"> → ③</text:span><text:span text:style-name="T325"> 服務結束後自動清除</text:span><text:span text:style-name="T111">（理想情況）。</text:span></text:p>
            <text:p text:style-name="P8"><text:span text:style-name="T132">優點：</text:span><text:span text:style-name="T111">全自動、對一般用戶友善。</text:span><text:span text:style-name="T257">安全風險（重要）：</text:span><text:span text:style-name="T526">惡意程式也能透過 </text:span><text:span text:style-name="T542">UPnP </text:span><text:span text:style-name="T526">自動開 </text:span><text:span text:style-name="T542">Port</text:span><text:span text:style-name="T526">，可能讓攻擊者直接連入內網</text:span><text:span text:style-name="T111">。建議不需要時關閉 </text:span><text:span text:style-name="T177">UPnP</text:span><text:span text:style-name="T111">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7" loext:marker-style-name="T285"><text:span text:style-name="T282">方法三：</text:span><text:span text:style-name="T289">STUN</text:span><text:span text:style-name="T284">（打洞技術）</text:span></text:p>
            <text:p text:style-name="P8" loext:marker-style-name="T112"><text:span text:style-name="T133">使用情境</text:span><text:span text:style-name="T111">：</text:span><text:span text:style-name="T663">兩端都在各自 </text:span><text:span text:style-name="T669">NAT </text:span><text:span text:style-name="T663">後面，彼此都是私有 </text:span><text:span text:style-name="T669">IP</text:span><text:span text:style-name="T663">、互相找不到。</text:span><text:span text:style-name="T669">STUN </text:span><text:span text:style-name="T663">先幫每端「查清楚自己對外的公網 </text:span><text:span text:style-name="T669">IP + Port</text:span><text:span text:style-name="T663">」，再交換資訊</text:span><text:span text:style-name="T111">嘗試直接打通。</text:span></text:p>
            <text:p text:style-name="P8" loext:marker-style-name="T112"><text:span text:style-name="T177">① </text:span><text:span text:style-name="T674">問 </text:span><text:span text:style-name="T677">STUN </text:span><text:span text:style-name="T674">伺服器「我對外的 </text:span><text:span text:style-name="T677">IP </text:span><text:span text:style-name="T674">和 </text:span><text:span text:style-name="T677">Port </text:span><text:span text:style-name="T674">是什麼？」</text:span><text:span text:style-name="T111">② </text:span><text:span text:style-name="T677">STUN </text:span><text:span text:style-name="T674">回「你對外是 </text:span><text:span text:style-name="T677">220.x.x.x:12345</text:span><text:span text:style-name="T674">」</text:span><text:span text:style-name="T111">③ </text:span><text:span text:style-name="T294">朋友也做同樣的事</text:span><text:span text:style-name="T111"> → ④ </text:span><text:span text:style-name="T674">兩端透過第三方交換彼此公網位址</text:span><text:span text:style-name="T111"> → ⑤ </text:span><text:span text:style-name="T674">同時互相發送封包打洞（</text:span><text:span text:style-name="T677">Hole Punching</text:span><text:span text:style-name="T674">）</text:span><text:span text:style-name="T111">。</text:span></text:p>
            <text:p text:style-name="P8"><text:span text:style-name="T257">重要限制：</text:span><text:span text:style-name="T542">STUN </text:span><text:span text:style-name="T526">只對部分 </text:span><text:span text:style-name="T542">NAT </text:span><text:span text:style-name="T526">類型有效</text:span><text:span text:style-name="T111">；若兩端都是 </text:span><text:span text:style-name="T177">Symmetric NAT</text:span><text:span text:style-name="T111">，打洞會失敗，需改用 </text:span><text:span text:style-name="T177">TURN </text:span><text:span text:style-name="T111">伺服器作為中繼轉發。（</text:span><text:span text:style-name="T177">WebRTC </text:span><text:span text:style-name="T111">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4" loext:marker-style-name="T71"><text:span text:style-name="T72">方法</text:span><text:span text:style-name="T71"/></text:p>
          </table:table-cell>
          <table:table-cell table:style-name="表格64.A4" office:value-type="string">
            <text:p text:style-name="P4" loext:marker-style-name="T71"><text:span text:style-name="T72">設定方式</text:span><text:span text:style-name="T71"/></text:p>
          </table:table-cell>
          <table:table-cell table:style-name="表格64.A4" office:value-type="string">
            <text:p text:style-name="P4" loext:marker-style-name="T71"><text:span text:style-name="T72">典型場景</text:span><text:span text:style-name="T71"/></text:p>
          </table:table-cell>
          <table:table-cell table:style-name="表格64.A4" office:value-type="string">
            <text:p text:style-name="P4" loext:marker-style-name="T71"><text:span text:style-name="T72">主要限制</text:span><text:span text:style-name="T71"/></text:p>
          </table:table-cell>
        </table:table-row>
        <table:table-row table:style-name="表格64.1">
          <table:table-cell table:style-name="表格64.A5" office:value-type="string">
            <text:p text:style-name="P42" loext:marker-style-name="T85"><text:span text:style-name="T161">Port Forwarding</text:span><text:span text:style-name="T85"/></text:p>
          </table:table-cell>
          <table:table-cell table:style-name="表格64.A5" office:value-type="string">
            <text:p text:style-name="P42" loext:marker-style-name="T98"><text:span text:style-name="T96">手動設定路由器</text:span><text:span text:style-name="T98"/></text:p>
          </table:table-cell>
          <table:table-cell table:style-name="表格64.A5" office:value-type="string">
            <text:p text:style-name="P42" loext:marker-style-name="T85"><text:span text:style-name="T86">架設網頁／遊戲伺服器</text:span><text:span text:style-name="T85"/></text:p>
          </table:table-cell>
          <table:table-cell table:style-name="表格64.A5" office:value-type="string">
            <text:p text:style-name="P42" loext:marker-style-name="T85"><text:span text:style-name="T86">需要手動維護</text:span><text:span text:style-name="T85"/></text:p>
          </table:table-cell>
        </table:table-row>
        <table:table-row table:style-name="表格64.1">
          <table:table-cell table:style-name="表格64.A6" office:value-type="string">
            <text:p text:style-name="P42" loext:marker-style-name="T85"><text:span text:style-name="T161">UPnP</text:span><text:span text:style-name="T85"/></text:p>
          </table:table-cell>
          <table:table-cell table:style-name="表格64.A6" office:value-type="string">
            <text:p text:style-name="P42" loext:marker-style-name="T98"><text:span text:style-name="T96">應用程式自動設定</text:span><text:span text:style-name="T98"/></text:p>
          </table:table-cell>
          <table:table-cell table:style-name="表格64.A6" office:value-type="string">
            <text:p text:style-name="P42" loext:marker-style-name="T85"><text:span text:style-name="T86">一般遊戲、視訊軟體</text:span><text:span text:style-name="T85"/></text:p>
          </table:table-cell>
          <table:table-cell table:style-name="表格64.A6" office:value-type="string">
            <text:p text:style-name="P42" loext:marker-style-name="T85"><text:span text:style-name="T86">惡意程式可濫用</text:span><text:span text:style-name="T85"/></text:p>
          </table:table-cell>
        </table:table-row>
        <table:table-row table:style-name="表格64.1">
          <table:table-cell table:style-name="表格64.A5" office:value-type="string">
            <text:p text:style-name="P42" loext:marker-style-name="T85"><text:span text:style-name="T161">STUN</text:span><text:span text:style-name="T85"/></text:p>
          </table:table-cell>
          <table:table-cell table:style-name="表格64.A5" office:value-type="string">
            <text:p text:style-name="P42" loext:marker-style-name="T98"><text:span text:style-name="T96">無需路由器設定</text:span><text:span text:style-name="T98"/></text:p>
          </table:table-cell>
          <table:table-cell table:style-name="表格64.A5" office:value-type="string">
            <text:p text:style-name="P42" loext:marker-style-name="T85"><text:span text:style-name="T161">WebRTC</text:span><text:span text:style-name="T86">、</text:span><text:span text:style-name="T161">P2P </text:span><text:span text:style-name="T86">通話</text:span></text:p>
          </table:table-cell>
          <table:table-cell table:style-name="表格64.A5" office:value-type="string">
            <text:p text:style-name="P42" loext:marker-style-name="T85"><text:span text:style-name="T161">Symmetric NAT </text:span><text:span text:style-name="T86">會失敗</text:span></text:p>
          </table:table-cell>
        </table:table-row>
      </table:table>
      <text:h text:style-name="P11" text:outline-level="2" loext:marker-style-name="T27"><text:span text:style-name="T28">四、完整上網流程（</text:span><text:span text:style-name="T27">ARP + NAT </text:span><text:span text:style-name="T28">合體）</text:span>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6"><text:span text:style-name="T222">🎯 <text:s/></text:span><text:span text:style-name="T281">最重要的核心觀念（先記住）</text:span></text:p>
            <text:p text:style-name="P7"><text:span text:style-name="T288">IP </text:span><text:span text:style-name="T282">位址＝</text:span><text:span text:style-name="T111">決定封包的最終目的地（整條路的終點），像信封上的收件地址。</text:span></text:p>
            <text:p text:style-name="P8"><text:span text:style-name="T288">MAC </text:span><text:span text:style-name="T282">位址＝</text:span><text:span text:style-name="T111">決定「下一站」要交給哪台機器，像快遞員每次只看下一站。</text:span></text:p>
            <text:p text:style-name="P8"><text:span text:style-name="T257">關鍵理解：</text:span><text:span text:style-name="T111">封包在傳送途中，</text:span><text:span text:style-name="T177">IP </text:span><text:span text:style-name="T111">不變（始終是 </text:span><text:span text:style-name="T177">Google </text:span><text:span text:style-name="T111">的 </text:span><text:span text:style-name="T177">IP</text:span><text:span text:style-name="T111">），但 </text:span><text:span text:style-name="T177">MAC </text:span><text:span text:style-name="T111">每一跳都會更換。</text:span></text:p>
          </table:table-cell>
        </table:table-row>
      </table:table>
      <text:p text:style-name="P48" loext:marker-style-name="T10"><text:span text:style-name="T12">場景</text:span><text:span text:style-name="T11">：</text:span><text:span text:style-name="T679">你電腦 </text:span><text:span text:style-name="T684">192.168.1.2</text:span><text:span text:style-name="T679">／路由器內網 </text:span><text:span text:style-name="T684">IP 192.168.1.1</text:span><text:span text:style-name="T679">／路由器公網 </text:span><text:span text:style-name="T684">IP 220.x.x.x</text:span><text:span text:style-name="T679">／目標 </text:span><text:span text:style-name="T684">google.com</text:span><text:span text:style-name="T11">。</text:span>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4" loext:marker-style-name="T77"><text:span text:style-name="T78">步驟</text:span><text:span text:style-name="T77"/></text:p>
            </table:table-cell>
            <table:table-cell table:style-name="表格66.A1" office:value-type="string">
              <text:p text:style-name="P4" loext:marker-style-name="T77"><text:span text:style-name="T78">動作</text:span><text:span text:style-name="T77"/></text:p>
            </table:table-cell>
            <table:table-cell table:style-name="表格66.A1" office:value-type="string">
              <text:p text:style-name="P4" loext:marker-style-name="T77"><text:span text:style-name="T78">使用技術</text:span><text:span text:style-name="T77"/></text:p>
            </table:table-cell>
            <table:table-cell table:style-name="表格66.A1" office:value-type="string">
              <text:p text:style-name="P4" loext:marker-style-name="T77"><text:span text:style-name="T78">關鍵重點</text:span><text:span text:style-name="T77"/>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42" loext:marker-style-name="T149"><text:span text:style-name="T212">① DNS</text:span><text:span text:style-name="T149"/></text:p>
          </table:table-cell>
          <table:table-cell table:style-name="表格66.A2" office:value-type="string">
            <text:p text:style-name="P42" loext:marker-style-name="T149"><text:span text:style-name="T212">google.com → 142.250.xxx.xxx(</text:span><text:span text:style-name="T216">Google </text:span><text:span text:style-name="T155">的 </text:span><text:span text:style-name="T216">IP</text:span><text:span text:style-name="T212">)</text:span></text:p>
            <text:p text:style-name="P42" loext:marker-style-name="T149"><text:span text:style-name="T212">(</text:span><text:span text:style-name="T150">電腦必須知道目的地在哪</text:span><text:span text:style-name="T212">)</text:span></text:p>
          </table:table-cell>
          <table:table-cell table:style-name="表格66.A2" office:value-type="string">
            <text:p text:style-name="P42" loext:marker-style-name="T149"><text:span text:style-name="T212">DNS</text:span><text:span text:style-name="T149"/></text:p>
          </table:table-cell>
          <table:table-cell table:style-name="表格66.A2" office:value-type="string">
            <text:p text:style-name="P42" loext:marker-style-name="T149"><text:span text:style-name="T150">網路只認 </text:span><text:span text:style-name="T212">IP</text:span><text:span text:style-name="T150">，不認名字</text:span></text:p>
          </table:table-cell>
        </table:table-row>
        <table:table-row table:style-name="表格66.1">
          <table:table-cell table:style-name="表格66.A3" office:value-type="string">
            <text:p text:style-name="P42" loext:marker-style-name="T149"><text:span text:style-name="T212">② ARP</text:span><text:span text:style-name="T149"/></text:p>
          </table:table-cell>
          <table:table-cell table:style-name="表格66.A3" office:value-type="string">
            <text:p text:style-name="P42" loext:marker-style-name="T149"><text:span text:style-name="T150">找路由器（</text:span><text:span text:style-name="T212">192.168.1.1</text:span><text:span text:style-name="T150">）的 </text:span><text:span text:style-name="T212">MAC(</text:span><text:span text:style-name="T425">發現 </text:span><text:span text:style-name="T449">Google </text:span><text:span text:style-name="T589">不在同一個區網</text:span><text:span text:style-name="T425">，必須交給路由器幫忙送</text:span><text:span text:style-name="T212">)(</text:span><text:span text:style-name="T624">查詢路由器的 </text:span><text:span text:style-name="T640">MAC</text:span><text:span text:style-name="T624">，下一站是路由器</text:span><text:span text:style-name="T212">)</text:span></text:p>
          </table:table-cell>
          <table:table-cell table:style-name="表格66.A3" office:value-type="string">
            <text:p text:style-name="P42" loext:marker-style-name="T149"><text:span text:style-name="T212">ARP</text:span><text:span text:style-name="T149"/></text:p>
          </table:table-cell>
          <table:table-cell table:style-name="表格66.A3" office:value-type="string">
            <text:p text:style-name="P42" loext:marker-style-name="T149"><text:span text:style-name="T150">找的是「路由器」，不是 </text:span><text:span text:style-name="T212">Google</text:span><text:span text:style-name="T150">！</text:span></text:p>
          </table:table-cell>
        </table:table-row>
        <table:table-row table:style-name="表格66.1">
          <table:table-cell table:style-name="表格66.A2" office:value-type="string">
            <text:p text:style-name="P42" loext:marker-style-name="T149"><text:span text:style-name="T212">③ </text:span><text:span text:style-name="T509">送封包</text:span></text:p>
          </table:table-cell>
          <table:table-cell table:style-name="表格66.A2" office:value-type="string">
            <text:p text:style-name="P42" loext:marker-style-name="T149"><text:span text:style-name="T212">IP=Google</text:span><text:span text:style-name="T150">；</text:span><text:span text:style-name="T212">MAC=</text:span><text:span text:style-name="T150">路由器</text:span><text:span text:style-name="T212">(</text:span><text:span text:style-name="T360">IP </text:span><text:span text:style-name="T309">記</text:span><text:soft-page-break/><text:span text:style-name="T309">錄最終目的地；</text:span><text:span text:style-name="T360">MAC </text:span><text:span text:style-name="T309">記錄下一站</text:span><text:span text:style-name="T212">)</text:span></text:p>
          </table:table-cell>
          <table:table-cell table:style-name="表格66.A2" office:value-type="string">
            <text:p text:style-name="P42" loext:marker-style-name="T149"><text:span text:style-name="T212">L2 </text:span><text:span text:style-name="T150">傳輸</text:span></text:p>
          </table:table-cell>
          <table:table-cell table:style-name="表格66.A2" office:value-type="string">
            <text:p text:style-name="P42" loext:marker-style-name="T149"><text:span text:style-name="T212">IP=</text:span><text:span text:style-name="T150">終點；</text:span><text:span text:style-name="T212">MAC=</text:span><text:span text:style-name="T150">下一站</text:span></text:p>
          </table:table-cell>
        </table:table-row>
        <table:table-row table:style-name="表格66.1">
          <table:table-cell table:style-name="表格66.A3" office:value-type="string">
            <text:p text:style-name="P42" loext:marker-style-name="T149"><text:span text:style-name="T212">④ NAT </text:span><text:span text:style-name="T150">去程</text:span></text:p>
          </table:table-cell>
          <table:table-cell table:style-name="表格66.A3" office:value-type="string">
            <text:p text:style-name="P42" loext:marker-style-name="T149"><text:span text:style-name="T547">192.168.1.2 → 220.x.x.x</text:span><text:span text:style-name="T212">(</text:span><text:span text:style-name="T626">路由器收到後往 </text:span><text:span text:style-name="T641">Internet </text:span><text:span text:style-name="T626">送</text:span><text:span text:style-name="T150">；路由器負責跨網路傳遞</text:span><text:span text:style-name="T212">)(</text:span><text:span text:style-name="T626">私有 </text:span><text:span text:style-name="T641">IP </text:span><text:span text:style-name="T626">換成公網 </text:span><text:span text:style-name="T641">IP</text:span><text:span text:style-name="T626">，因</text:span><text:span text:style-name="T641">Internet </text:span><text:span text:style-name="T626">不認私有 </text:span><text:span text:style-name="T641">IP</text:span><text:span text:style-name="T212">)</text:span></text:p>
          </table:table-cell>
          <table:table-cell table:style-name="表格66.A3" office:value-type="string">
            <text:p text:style-name="P42" loext:marker-style-name="T149"><text:span text:style-name="T212">NAT</text:span><text:span text:style-name="T149"/></text:p>
          </table:table-cell>
          <table:table-cell table:style-name="表格66.A3" office:value-type="string">
            <text:p text:style-name="P42" loext:marker-style-name="T149"><text:span text:style-name="T150">換身份才能上 </text:span><text:span text:style-name="T212">Internet</text:span></text:p>
          </table:table-cell>
        </table:table-row>
        <table:table-row table:style-name="表格66.1">
          <table:table-cell table:style-name="表格66.A2" office:value-type="string">
            <text:p text:style-name="P42" loext:marker-style-name="T149"><text:span text:style-name="T212">⑤ </text:span><text:span text:style-name="T150">傳到 </text:span><text:span text:style-name="T212">Google</text:span></text:p>
          </table:table-cell>
          <table:table-cell table:style-name="表格66.A2" office:value-type="string">
            <text:p text:style-name="P42" loext:marker-style-name="T149"><text:span text:style-name="T399">封包抵達目的地</text:span><text:span text:style-name="T212">(</text:span><text:span text:style-name="T671">Google </text:span><text:span text:style-name="T665">看到公網 </text:span><text:span text:style-name="T671">IP</text:span><text:span text:style-name="T212">)</text:span></text:p>
          </table:table-cell>
          <table:table-cell table:style-name="表格66.A2" office:value-type="string">
            <text:p text:style-name="P42" loext:marker-style-name="T149"><text:span text:style-name="T212">Internet</text:span><text:span text:style-name="T149"/></text:p>
          </table:table-cell>
          <table:table-cell table:style-name="表格66.A2" office:value-type="string">
            <text:p text:style-name="P42" loext:marker-style-name="T149"><text:span text:style-name="T212">Google </text:span><text:span text:style-name="T150">只看到公網 </text:span><text:span text:style-name="T212">IP</text:span></text:p>
          </table:table-cell>
        </table:table-row>
        <table:table-row table:style-name="表格66.1">
          <table:table-cell table:style-name="表格66.A3" office:value-type="string">
            <text:p text:style-name="P42" loext:marker-style-name="T149"><text:span text:style-name="T212">⑥ Google </text:span><text:span text:style-name="T150">回應</text:span></text:p>
          </table:table-cell>
          <table:table-cell table:style-name="表格66.A3" office:value-type="string">
            <text:p text:style-name="P42" loext:marker-style-name="T149"><text:span text:style-name="T510">回傳給 </text:span><text:span text:style-name="T548">220.x.x.x</text:span><text:span text:style-name="T212">(</text:span><text:span text:style-name="T676">回到路由器再回到你電腦</text:span><text:span text:style-name="T212">)</text:span></text:p>
          </table:table-cell>
          <table:table-cell table:style-name="表格66.A3" office:value-type="string">
            <text:p text:style-name="P42" loext:marker-style-name="T149"><text:span text:style-name="T212">Internet</text:span><text:span text:style-name="T149"/></text:p>
          </table:table-cell>
          <table:table-cell table:style-name="表格66.A3" office:value-type="string">
            <text:p text:style-name="P42" loext:marker-style-name="T149"><text:span text:style-name="T150">路由器收到回應</text:span><text:span text:style-name="T149"/></text:p>
          </table:table-cell>
        </table:table-row>
        <table:table-row table:style-name="表格66.1">
          <table:table-cell table:style-name="表格66.A2" office:value-type="string">
            <text:p text:style-name="P42" loext:marker-style-name="T149"><text:span text:style-name="T212">⑦ NAT </text:span><text:span text:style-name="T150">回程</text:span></text:p>
          </table:table-cell>
          <table:table-cell table:style-name="表格66.A2" office:value-type="string">
            <text:p text:style-name="P42" loext:marker-style-name="T149"><text:span text:style-name="T547">220.x.x.x → 192.168.1.2</text:span><text:span text:style-name="T212">(</text:span><text:span text:style-name="T449">NAT </text:span><text:span text:style-name="T425">依記錄轉回正確主機</text:span><text:span text:style-name="T212">)</text:span></text:p>
          </table:table-cell>
          <table:table-cell table:style-name="表格66.A2" office:value-type="string">
            <text:p text:style-name="P42" loext:marker-style-name="T149"><text:span text:style-name="T212">NAT</text:span><text:span text:style-name="T149"/></text:p>
          </table:table-cell>
          <table:table-cell table:style-name="表格66.A2" office:value-type="string">
            <text:p text:style-name="P42" loext:marker-style-name="T149"><text:span text:style-name="T150">查記錄，換回真正目標</text:span><text:span text:style-name="T149"/></text:p>
          </table:table-cell>
        </table:table-row>
        <table:table-row table:style-name="表格66.1">
          <table:table-cell table:style-name="表格66.A3" office:value-type="string">
            <text:p text:style-name="P42" loext:marker-style-name="T149"><text:span text:style-name="T212">⑧ </text:span><text:span text:style-name="T150">收到網頁</text:span></text:p>
          </table:table-cell>
          <table:table-cell table:style-name="表格66.A3" office:value-type="string">
            <text:p text:style-name="P42" loext:marker-style-name="T149"><text:span text:style-name="T150">瀏覽器顯示頁面</text:span><text:span text:style-name="T149"/></text:p>
          </table:table-cell>
          <table:table-cell table:style-name="表格66.A3" office:value-type="string">
            <text:p text:style-name="P42" loext:marker-style-name="T149"><text:span text:style-name="T212">—</text:span><text:span text:style-name="T149"/></text:p>
          </table:table-cell>
          <table:table-cell table:style-name="表格66.A3" office:value-type="string">
            <text:p text:style-name="P42" loext:marker-style-name="T149"><text:span text:style-name="T150">一次完整通信結束</text:span><text:span text:style-name="T149"/>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6"><text:span text:style-name="T222">💣 <text:s/></text:span><text:span text:style-name="T247">三個最容易搞錯的地方（考試地雷）</text:span></text:p>
            <text:p text:style-name="P7"><text:span text:style-name="T263">✗ </text:span><text:span text:style-name="T258">以為 </text:span><text:span text:style-name="T263">ARP </text:span><text:span text:style-name="T258">是找 </text:span><text:span text:style-name="T263">Google </text:span><text:span text:style-name="T258">的 </text:span><text:span text:style-name="T263">MAC</text:span><text:span text:style-name="T257">　→　</text:span><text:span text:style-name="T654">✓ </text:span><text:span text:style-name="T656">ARP </text:span><text:span text:style-name="T654">找的是「路由器」的 </text:span><text:span text:style-name="T656">MAC</text:span><text:span text:style-name="T654">！</text:span><text:span text:style-name="T111">因為 </text:span><text:span text:style-name="T177">ARP </text:span><text:span text:style-name="T111">只能在同一個 </text:span><text:span text:style-name="T177">LAN </text:span><text:span text:style-name="T111">內使用。</text:span></text:p>
            <text:p text:style-name="P8"><text:span text:style-name="T263">✗ </text:span><text:span text:style-name="T258">以為封包直接送到 </text:span><text:span text:style-name="T263">Google</text:span><text:span text:style-name="T257">　→　</text:span><text:span text:style-name="T654">✓ 封包先送給路由器，路由器再轉到 </text:span><text:span text:style-name="T656">Internet</text:span><text:span text:style-name="T111">。</text:span></text:p>
            <text:p text:style-name="P8"><text:span text:style-name="T263">✗ </text:span><text:span text:style-name="T258">以為 </text:span><text:span text:style-name="T263">IP </text:span><text:span text:style-name="T258">在傳輸過程中一直不變</text:span><text:span text:style-name="T257">　→　</text:span><text:span text:style-name="T654">✓ </text:span><text:span text:style-name="T656">NAT </text:span><text:span text:style-name="T654">會在去程改掉來源 </text:span><text:span text:style-name="T656">IP</text:span><text:span text:style-name="T654">，回程再改回去</text:span><text:span text:style-name="T111">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6"><text:span text:style-name="T222">📝 <text:s/></text:span><text:span text:style-name="T267">考試標準答案（直接背）</text:span></text:p>
            <text:p text:style-name="P7" loext:marker-style-name="T112"><text:span text:style-name="T135">使用者輸入網址後</text:span><text:span text:style-name="T111">，</text:span><text:span text:style-name="T478">先透過 </text:span><text:span text:style-name="T491">DNS </text:span><text:span text:style-name="T478">將網域名稱解析為 </text:span><text:span text:style-name="T491">IP</text:span><text:span text:style-name="T111">；</text:span><text:span text:style-name="T325">接著主機利用 </text:span><text:span text:style-name="T352">ARP </text:span><text:span text:style-name="T325">取得路由器（預設閘道）的 </text:span><text:span text:style-name="T352">MAC</text:span><text:span text:style-name="T111">，</text:span><text:span text:style-name="T325">將封包傳送至路由器</text:span><text:span text:style-name="T111">；</text:span><text:span text:style-name="T563">路由器透過 </text:span><text:span text:style-name="T558">NAT </text:span><text:span text:style-name="T563">將私有 </text:span><text:span text:style-name="T558">IP </text:span><text:span text:style-name="T563">轉換為公網 </text:span><text:span text:style-name="T558">IP </text:span><text:span text:style-name="T563">後送往 </text:span><text:span text:style-name="T558">Internet</text:span><text:span text:style-name="T111">；</text:span><text:span text:style-name="T294">目的主機回應後，路由器再透過 </text:span><text:span text:style-name="T295">NAT </text:span><text:span text:style-name="T294">將封包轉回原內部主機</text:span><text:span text:style-name="T111">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五、</text:span><text:span text:style-name="T27">ARP vs NAT </text:span><text:span text:style-name="T28">一眼看差異</text:span>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4"/>
            </table:table-cell>
            <table:table-cell table:style-name="表格67.A1" office:value-type="string">
              <text:p text:style-name="P4" loext:marker-style-name="T71"><text:span text:style-name="T81">ARP</text:span><text:span text:style-name="T71"/></text:p>
            </table:table-cell>
            <table:table-cell table:style-name="表格67.A1" office:value-type="string">
              <text:p text:style-name="P4" loext:marker-style-name="T71"><text:span text:style-name="T81">NAT</text:span><text:span text:style-name="T71"/>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42" loext:marker-style-name="T85"><text:span text:style-name="T86">目的</text:span><text:span text:style-name="T85"/></text:p>
          </table:table-cell>
          <table:table-cell table:style-name="表格67.A2" office:value-type="string">
            <text:p text:style-name="P42" loext:marker-style-name="T422"><text:span text:style-name="T423">用 </text:span><text:span text:style-name="T447">IP </text:span><text:span text:style-name="T423">找 </text:span><text:span text:style-name="T447">MAC</text:span></text:p>
          </table:table-cell>
          <table:table-cell table:style-name="表格67.A2" office:value-type="string">
            <text:p text:style-name="P42" loext:marker-style-name="T689"><text:span text:style-name="T690">私有 </text:span><text:span text:style-name="T693">IP </text:span><text:span text:style-name="T690">轉成公網 </text:span><text:span text:style-name="T693">IP</text:span></text:p>
          </table:table-cell>
        </table:table-row>
        <table:table-row table:style-name="表格67.1">
          <table:table-cell table:style-name="表格67.A3" office:value-type="string">
            <text:p text:style-name="P42" loext:marker-style-name="T85"><text:span text:style-name="T86">使用範圍</text:span><text:span text:style-name="T85"/></text:p>
          </table:table-cell>
          <table:table-cell table:style-name="表格67.A3" office:value-type="string">
            <text:p text:style-name="P42" loext:marker-style-name="T103"><text:span text:style-name="T101">區域網路（</text:span><text:span text:style-name="T169">LAN</text:span><text:span text:style-name="T101">）內</text:span></text:p>
          </table:table-cell>
          <table:table-cell table:style-name="表格67.A3" office:value-type="string">
            <text:p text:style-name="P42" loext:marker-style-name="T98"><text:span text:style-name="T96">內網與 </text:span><text:span text:style-name="T172">Internet </text:span><text:span text:style-name="T96">之間</text:span></text:p>
          </table:table-cell>
        </table:table-row>
        <table:table-row table:style-name="表格67.1">
          <table:table-cell table:style-name="表格67.A2" office:value-type="string">
            <text:p text:style-name="P42" loext:marker-style-name="T85"><text:span text:style-name="T86">運作層級</text:span><text:span text:style-name="T85"/></text:p>
          </table:table-cell>
          <table:table-cell table:style-name="表格67.A2" office:value-type="string">
            <text:p text:style-name="P42" loext:marker-style-name="T500"><text:span text:style-name="T496">L2 / L3 </text:span><text:span text:style-name="T501">交界</text:span></text:p>
          </table:table-cell>
          <table:table-cell table:style-name="表格67.A2" office:value-type="string">
            <text:p text:style-name="P42" loext:marker-style-name="T502"><text:span text:style-name="T497">L3</text:span><text:span text:style-name="T503">（網路層）</text:span></text:p>
          </table:table-cell>
        </table:table-row>
        <table:table-row table:style-name="表格67.1">
          <table:table-cell table:style-name="表格67.A3" office:value-type="string">
            <text:p text:style-name="P42" loext:marker-style-name="T85"><text:span text:style-name="T86">誰執行</text:span><text:span text:style-name="T85"/></text:p>
          </table:table-cell>
          <table:table-cell table:style-name="表格67.A3" office:value-type="string">
            <text:p text:style-name="P42" loext:marker-style-name="T85"><text:span text:style-name="T86">端點裝置（電腦）</text:span><text:span text:style-name="T85"/></text:p>
          </table:table-cell>
          <table:table-cell table:style-name="表格67.A3" office:value-type="string">
            <text:p text:style-name="P42" loext:marker-style-name="T85"><text:span text:style-name="T86">路由器</text:span><text:span text:style-name="T85"/></text:p>
          </table:table-cell>
        </table:table-row>
        <table:table-row table:style-name="表格67.1">
          <table:table-cell table:style-name="表格67.A2" office:value-type="string">
            <text:p text:style-name="P42" loext:marker-style-name="T85"><text:span text:style-name="T86">主要用途</text:span><text:span text:style-name="T85"/></text:p>
          </table:table-cell>
          <table:table-cell table:style-name="表格67.A2" office:value-type="string">
            <text:p text:style-name="P42" loext:marker-style-name="T85"><text:span text:style-name="T86">在區網內傳送封包</text:span><text:span text:style-name="T85"/></text:p>
          </table:table-cell>
          <table:table-cell table:style-name="表格67.A2" office:value-type="string">
            <text:p text:style-name="P42" loext:marker-style-name="T85"><text:span text:style-name="T86">讓內部主機能夠上網</text:span><text:span text:style-name="T85"/></text:p>
          </table:table-cell>
        </table:table-row>
      </table:table>
      <text:h text:style-name="P32" text:outline-level="1" loext:marker-style-name="T73"><text:span text:style-name="T74">第 五 篇　</text:span><text:span text:style-name="T73">TCP </text:span><text:span text:style-name="T74">傳輸控制深入：握手 </text:span><text:span text:style-name="T73">· SYN Flood · </text:span><text:span text:style-name="T74">視窗 </text:span><text:span text:style-name="T73">· </text:span><text:span text:style-name="T74">擁塞控制</text:span>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6"><text:span text:style-name="T222">🚦 <text:s/></text:span><text:span text:style-name="T53">本篇重點</text:span></text:p>
            <text:p text:style-name="P7" loext:marker-style-name="T112"><text:span text:style-name="T111">網路的本質是把資料從 </text:span><text:span text:style-name="T177">A </text:span><text:span text:style-name="T111">電腦送到 </text:span><text:span text:style-name="T177">B </text:span><text:span text:style-name="T111">電腦，但中間有四個麻煩，</text:span><text:span text:style-name="T177">TCP </text:span><text:span text:style-name="T111">各自有對策。</text:span></text:p>
          </table:table-cell>
        </table:table-row>
      </table:table>
      <text:h text:style-name="P11" text:outline-level="2" loext:marker-style-name="T27"><text:span text:style-name="T28">一、網路的四個麻煩，</text:span><text:span text:style-name="T27">TCP </text:span><text:span text:style-name="T28">如何解決</text:span>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4" loext:marker-style-name="T71"><text:span text:style-name="T72">問題</text:span><text:span text:style-name="T71"/></text:p>
            </table:table-cell>
            <table:table-cell table:style-name="表格69.A1" office:value-type="string">
              <text:p text:style-name="P4" loext:marker-style-name="T71"><text:span text:style-name="T72">說明</text:span><text:span text:style-name="T71"/></text:p>
            </table:table-cell>
            <table:table-cell table:style-name="表格69.A1" office:value-type="string">
              <text:p text:style-name="P4" loext:marker-style-name="T71"><text:span text:style-name="T81">TCP </text:span><text:span text:style-name="T72">如何解決</text:span>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42" loext:marker-style-name="T103"><text:span text:style-name="T101">資料可能丟失</text:span><text:span text:style-name="T103"/></text:p>
          </table:table-cell>
          <table:table-cell table:style-name="表格69.A2" office:value-type="string">
            <text:p text:style-name="P42" loext:marker-style-name="T85"><text:span text:style-name="T86">封包在網路中消失</text:span><text:span text:style-name="T85"/></text:p>
          </table:table-cell>
          <table:table-cell table:style-name="表格69.A2" office:value-type="string">
            <text:p text:style-name="P42" loext:marker-style-name="T85"><text:span text:style-name="T96">重傳</text:span><text:span text:style-name="T86">機制（</text:span><text:span text:style-name="T161">Retransmission</text:span><text:span text:style-name="T86">）</text:span></text:p>
          </table:table-cell>
        </table:table-row>
        <table:table-row table:style-name="表格69.1">
          <table:table-cell table:style-name="表格69.A3" office:value-type="string">
            <text:p text:style-name="P42" loext:marker-style-name="T103"><text:span text:style-name="T101">順序可能亂掉</text:span><text:span text:style-name="T103"/></text:p>
          </table:table-cell>
          <table:table-cell table:style-name="表格69.A3" office:value-type="string">
            <text:p text:style-name="P42" loext:marker-style-name="T85"><text:span text:style-name="T86">封包走不同路徑先後到達</text:span><text:span text:style-name="T85"/></text:p>
          </table:table-cell>
          <table:table-cell table:style-name="表格69.A3" office:value-type="string">
            <text:p text:style-name="P42" loext:marker-style-name="T85"><text:span text:style-name="T96">序號</text:span><text:span text:style-name="T86">機制（</text:span><text:span text:style-name="T161">Sequence Number</text:span><text:span text:style-name="T86">）</text:span></text:p>
          </table:table-cell>
        </table:table-row>
        <table:table-row table:style-name="表格69.1">
          <table:table-cell table:style-name="表格69.A2" office:value-type="string">
            <text:p text:style-name="P42" loext:marker-style-name="T103"><text:span text:style-name="T101">對方來不及收</text:span><text:span text:style-name="T103"/></text:p>
          </table:table-cell>
          <table:table-cell table:style-name="表格69.A2" office:value-type="string">
            <text:p text:style-name="P42" loext:marker-style-name="T85"><text:span text:style-name="T86">接收端 </text:span><text:span text:style-name="T161">buffer </text:span><text:span text:style-name="T86">可能爆掉</text:span></text:p>
          </table:table-cell>
          <table:table-cell table:style-name="表格69.A2" office:value-type="string">
            <text:p text:style-name="P42" loext:marker-style-name="T85"><text:span text:style-name="T96">流量</text:span><text:span text:style-name="T86">控制（</text:span><text:span text:style-name="T161">Flow Control / rwnd</text:span><text:span text:style-name="T86">）</text:span></text:p>
          </table:table-cell>
        </table:table-row>
        <table:table-row table:style-name="表格69.1">
          <table:table-cell table:style-name="表格69.A3" office:value-type="string">
            <text:p text:style-name="P42" loext:marker-style-name="T103"><text:span text:style-name="T101">網路可能塞車</text:span><text:span text:style-name="T103"/></text:p>
          </table:table-cell>
          <table:table-cell table:style-name="表格69.A3" office:value-type="string">
            <text:p text:style-name="P42" loext:marker-style-name="T85"><text:span text:style-name="T86">路由器排隊太長</text:span><text:span text:style-name="T85"/></text:p>
          </table:table-cell>
          <table:table-cell table:style-name="表格69.A3" office:value-type="string">
            <text:p text:style-name="P42" loext:marker-style-name="T85"><text:span text:style-name="T96">擁塞</text:span><text:span text:style-name="T86">控制（</text:span><text:span text:style-name="T161">Congestion Control / cwnd</text:span><text:span text:style-name="T86">）</text:span></text:p>
          </table:table-cell>
        </table:table-row>
      </table:table>
      <text:h text:style-name="P11" text:outline-level="2" loext:marker-style-name="T27"><text:span text:style-name="T28">二、</text:span><text:span text:style-name="T27">TCP vs UDP</text:span><text:span text:style-name="T28">：可靠還是快速</text:span>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4" loext:marker-style-name="T71"><text:span text:style-name="T72">特性</text:span><text:span text:style-name="T71"/></text:p>
            </table:table-cell>
            <table:table-cell table:style-name="表格70.A1" office:value-type="string">
              <text:p text:style-name="P4" loext:marker-style-name="T71"><text:span text:style-name="T81">TCP</text:span><text:span text:style-name="T72">（可靠模式）</text:span></text:p>
            </table:table-cell>
            <table:table-cell table:style-name="表格70.A1" office:value-type="string">
              <text:p text:style-name="P4" loext:marker-style-name="T71"><text:span text:style-name="T81">UDP</text:span><text:span text:style-name="T72">（快速模式）</text:span>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42" loext:marker-style-name="T85"><text:span text:style-name="T86">連線方式</text:span><text:span text:style-name="T85"/></text:p>
          </table:table-cell>
          <table:table-cell table:style-name="表格70.A2" office:value-type="string">
            <text:p text:style-name="P42" loext:marker-style-name="T421"><text:span text:style-name="T420">需要先建立連線</text:span><text:span text:style-name="T421"/></text:p>
          </table:table-cell>
          <table:table-cell table:style-name="表格70.A2" office:value-type="string">
            <text:p text:style-name="P42" loext:marker-style-name="T305"><text:span text:style-name="T303">無連線，直接送</text:span><text:span text:style-name="T305"/></text:p>
          </table:table-cell>
        </table:table-row>
        <table:table-row table:style-name="表格70.1">
          <table:table-cell table:style-name="表格70.A3" office:value-type="string">
            <text:p text:style-name="P42" loext:marker-style-name="T85"><text:span text:style-name="T86">可靠性</text:span><text:span text:style-name="T85"/></text:p>
          </table:table-cell>
          <table:table-cell table:style-name="表格70.A3" office:value-type="string">
            <text:p text:style-name="P42" loext:marker-style-name="T85"><text:span text:style-name="T86">保證送達（會重傳）</text:span><text:span text:style-name="T85"/></text:p>
          </table:table-cell>
          <table:table-cell table:style-name="表格70.A3" office:value-type="string">
            <text:p text:style-name="P42" loext:marker-style-name="T85"><text:span text:style-name="T86">不保證送達</text:span><text:span text:style-name="T85"/></text:p>
          </table:table-cell>
        </table:table-row>
        <table:table-row table:style-name="表格70.1">
          <table:table-cell table:style-name="表格70.A2" office:value-type="string">
            <text:p text:style-name="P42" loext:marker-style-name="T85"><text:span text:style-name="T86">順序</text:span><text:span text:style-name="T85"/></text:p>
          </table:table-cell>
          <table:table-cell table:style-name="表格70.A2" office:value-type="string">
            <text:p text:style-name="P42" loext:marker-style-name="T85"><text:span text:style-name="T86">保證順序正確</text:span><text:span text:style-name="T85"/></text:p>
          </table:table-cell>
          <table:table-cell table:style-name="表格70.A2" office:value-type="string">
            <text:p text:style-name="P42" loext:marker-style-name="T85"><text:span text:style-name="T86">不保證順序</text:span><text:span text:style-name="T85"/></text:p>
          </table:table-cell>
        </table:table-row>
        <table:table-row table:style-name="表格70.1">
          <table:table-cell table:style-name="表格70.A3" office:value-type="string">
            <text:p text:style-name="P42" loext:marker-style-name="T85"><text:span text:style-name="T86">速度</text:span><text:span text:style-name="T85"/></text:p>
          </table:table-cell>
          <table:table-cell table:style-name="表格70.A3" office:value-type="string">
            <text:p text:style-name="P42" loext:marker-style-name="T85"><text:span text:style-name="T86">較慢（有控制機制）</text:span><text:span text:style-name="T85"/></text:p>
          </table:table-cell>
          <table:table-cell table:style-name="表格70.A3" office:value-type="string">
            <text:p text:style-name="P42" loext:marker-style-name="T85"><text:span text:style-name="T86">較快（無額外開銷）</text:span><text:span text:style-name="T85"/></text:p>
          </table:table-cell>
        </table:table-row>
        <table:table-row table:style-name="表格70.1">
          <table:table-cell table:style-name="表格70.A2" office:value-type="string">
            <text:p text:style-name="P42" loext:marker-style-name="T85"><text:span text:style-name="T86">適合場景</text:span><text:span text:style-name="T85"/></text:p>
          </table:table-cell>
          <table:table-cell table:style-name="表格70.A2" office:value-type="string">
            <text:p text:style-name="P42" loext:marker-style-name="T98"><text:span text:style-name="T96">網頁、檔案傳輸、</text:span><text:span text:style-name="T172">Email</text:span></text:p>
          </table:table-cell>
          <table:table-cell table:style-name="表格70.A2" office:value-type="string">
            <text:p text:style-name="P42" loext:marker-style-name="T85"><text:span text:style-name="T96">直播、遊戲</text:span><text:span text:style-name="T86">、</text:span><text:span text:style-name="T161">DNS </text:span><text:span text:style-name="T86">查詢</text:span></text:p>
          </table:table-cell>
        </table:table-row>
        <table:table-row table:style-name="表格70.1">
          <table:table-cell table:style-name="表格70.A3" office:value-type="string">
            <text:p text:style-name="P42" loext:marker-style-name="T85"><text:span text:style-name="T86">比喻</text:span><text:span text:style-name="T85"/></text:p>
          </table:table-cell>
          <table:table-cell table:style-name="表格70.A3" office:value-type="string">
            <text:p text:style-name="P42" loext:marker-style-name="T103"><text:span text:style-name="T101">專業物流（簽收確認）</text:span><text:span text:style-name="T103"/></text:p>
          </table:table-cell>
          <table:table-cell table:style-name="表格70.A3" office:value-type="string">
            <text:p text:style-name="P42" loext:marker-style-name="T103"><text:span text:style-name="T101">亂丟紙飛機</text:span><text:span text:style-name="T103"/></text:p>
          </table:table-cell>
        </table:table-row>
      </table:table>
      <text:h text:style-name="P11" text:outline-level="2" loext:marker-style-name="T27"><text:span text:style-name="T28">三、建立連線：三次握手（</text:span><text:span text:style-name="T27">Three-way Handshake</text:span><text:span text:style-name="T28">）</text:span>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6"><text:span text:style-name="T222">🤝 <text:s/></text:span><text:span text:style-name="T53">握手流程</text:span></text:p>
            <text:p text:style-name="P7"><text:span text:style-name="T67">① Client → Server</text:span><text:span text:style-name="T58">：</text:span><text:span text:style-name="T66">SYN</text:span><text:span text:style-name="T58">　</text:span><text:span text:style-name="T111">「我可以傳資料給你嗎？我準備好了。」（</text:span><text:span text:style-name="T177">Synchronize </text:span><text:span text:style-name="T111">同步請求）</text:span></text:p>
            <text:p text:style-name="P8"><text:span text:style-name="T67">② Server → Client</text:span><text:span text:style-name="T58">：</text:span><text:span text:style-name="T66">SYN + ACK</text:span><text:span text:style-name="T58">　</text:span><text:span text:style-name="T111">「可以！我收到你的請求了，我也準備好了。」（確認＋同步）</text:span></text:p>
            <text:p text:style-name="P8"><text:span text:style-name="T67">③ Client → Server</text:span><text:span text:style-name="T58">：</text:span><text:span text:style-name="T66">ACK</text:span><text:span text:style-name="T58">　</text:span><text:span text:style-name="T111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6"><text:span text:style-name="T222">🎯 <text:s/></text:span><text:span text:style-name="T281">三次握手真正目的（考試必考）</text:span></text:p>
            <text:p text:style-name="P7" loext:marker-style-name="T112"><text:span text:style-name="T111">確認雙向都能傳資料（</text:span><text:span text:style-name="T177">Client → Server </text:span><text:span text:style-name="T111">和 </text:span><text:span text:style-name="T177">Server → Client </text:span><text:span text:style-name="T111">各自驗證）。</text:span></text:p>
            <text:p text:style-name="P8" loext:marker-style-name="T112"><text:span text:style-name="T696">避免「</text:span><text:span text:style-name="T564">舊封包誤觸發新連線</text:span><text:span text:style-name="T696">」</text:span><text:span text:style-name="T111">：若少一次確認，</text:span><text:span text:style-name="T323">延遲的舊 </text:span><text:span text:style-name="T350">SYN </text:span><text:span text:style-name="T323">封包可能讓 </text:span><text:span text:style-name="T350">Server </text:span><text:span text:style-name="T323">誤以為要建立新連線</text:span><text:span text:style-name="T111">。</text:span></text:p>
          </table:table-cell>
        </table:table-row>
      </table:table>
      <text:h text:style-name="P11" text:outline-level="2" loext:marker-style-name="T27"><text:span text:style-name="T28">四、攻擊：</text:span><text:span text:style-name="T27">SYN Flood</text:span></text:h>
      <text:p text:style-name="P48" loext:marker-style-name="T112"><text:span text:style-name="T111">攻擊原理：攻擊者大量發送 </text:span><text:span text:style-name="T177">SYN </text:span><text:span text:style-name="T111">封包，但</text:span><text:span text:style-name="T396">故意不完成第三次握手（</text:span><text:span text:style-name="T317">不回 </text:span><text:span text:style-name="T343">ACK</text:span><text:span text:style-name="T396">）</text:span><text:span text:style-name="T111">。</text:span>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39" loext:marker-style-name="T71"><text:span text:style-name="T72">步驟</text:span><text:span text:style-name="T71"/></text:p>
            </table:table-cell>
            <table:table-cell table:style-name="表格72.A1" office:value-type="string">
              <text:p text:style-name="P39" loext:marker-style-name="T71"><text:span text:style-name="T72">發生什麼</text:span><text:span text:style-name="T71"/>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42" loext:marker-style-name="T85"><text:span text:style-name="T161">1</text:span><text:span text:style-name="T85"/></text:p>
          </table:table-cell>
          <table:table-cell table:style-name="表格72.A2" office:value-type="string">
            <text:p text:style-name="P42" loext:marker-style-name="T85"><text:span text:style-name="T86">攻擊者</text:span><text:span text:style-name="T101">送出大量 </text:span><text:span text:style-name="T169">SYN</text:span><text:span text:style-name="T86">，每個都</text:span><text:span text:style-name="T96">假冒不同來源 </text:span><text:span text:style-name="T172">IP</text:span></text:p>
          </table:table-cell>
        </table:table-row>
        <table:table-row table:style-name="表格72.1">
          <table:table-cell table:style-name="表格72.A3" office:value-type="string">
            <text:p text:style-name="P42" loext:marker-style-name="T85"><text:span text:style-name="T161">2</text:span><text:span text:style-name="T85"/></text:p>
          </table:table-cell>
          <table:table-cell table:style-name="表格72.A3" office:value-type="string">
            <text:p text:style-name="P42" loext:marker-style-name="T85"><text:span text:style-name="T643">Server </text:span><text:span text:style-name="T628">建立「半連線（</text:span><text:span text:style-name="T643">Half-open Connection</text:span><text:span text:style-name="T628">）」</text:span><text:span text:style-name="T86">，</text:span><text:span text:style-name="T518">每個都佔記憶體等待 </text:span><text:span text:style-name="T537">ACK</text:span></text:p>
          </table:table-cell>
        </table:table-row>
        <text:soft-page-break/>
        <table:table-row table:style-name="表格72.1">
          <table:table-cell table:style-name="表格72.A2" office:value-type="string">
            <text:p text:style-name="P42" loext:marker-style-name="T85"><text:span text:style-name="T161">3</text:span><text:span text:style-name="T85"/></text:p>
          </table:table-cell>
          <table:table-cell table:style-name="表格72.A2" office:value-type="string">
            <text:p text:style-name="P42" loext:marker-style-name="T85"><text:span text:style-name="T667">攻擊者永遠不回 </text:span><text:span text:style-name="T672">ACK</text:span><text:span text:style-name="T86">，</text:span><text:span text:style-name="T161">Server </text:span><text:span text:style-name="T86">的資源被半連線耗光</text:span></text:p>
          </table:table-cell>
        </table:table-row>
        <table:table-row table:style-name="表格72.1">
          <table:table-cell table:style-name="表格72.A3" office:value-type="string">
            <text:p text:style-name="P42" loext:marker-style-name="T85"><text:span text:style-name="T161">4</text:span><text:span text:style-name="T85"/></text:p>
          </table:table-cell>
          <table:table-cell table:style-name="表格72.A3" office:value-type="string">
            <text:p text:style-name="P42" loext:marker-style-name="T85"><text:span text:style-name="T101">正常用戶連線失敗</text:span><text:span text:style-name="T86">，</text:span><text:span text:style-name="T161">Server </text:span><text:span text:style-name="T86">沒有資源再接受新連線</text:span>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6"><text:span text:style-name="T222">⚠️ <text:s/></text:span><text:span text:style-name="T247">本質</text:span></text:p>
            <text:p text:style-name="P7" loext:marker-style-name="T112"><text:span text:style-name="T111">這是一種 </text:span><text:span text:style-name="T200">DoS</text:span><text:span text:style-name="T135">（拒絕服務）攻擊</text:span><text:span text:style-name="T111">，利用 </text:span><text:span text:style-name="T177">TCP </text:span><text:span text:style-name="T111">三次握手機制的不對稱性。</text:span></text:p>
          </table:table-cell>
          <table:covered-table-cell/>
        </table:table-row>
      </table:table>
      <text:h text:style-name="P11" text:outline-level="2" loext:marker-style-name="T27"><text:span text:style-name="T28">五、傳送速度的兩個限制：</text:span><text:span text:style-name="T534">rwnd</text:span><text:span text:style-name="T27"> </text:span><text:span text:style-name="T28">與 </text:span><text:span text:style-name="T534">cwnd</text:span>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39" loext:marker-style-name="T71"><text:span text:style-name="T81">rwnd</text:span><text:span text:style-name="T72">（接收視窗）</text:span>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39" loext:marker-style-name="T71"><text:span text:style-name="T81">cwnd</text:span><text:span text:style-name="T72">（擁塞視窗）</text:span>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42" loext:marker-style-name="T85"><text:span text:style-name="T86">接收端的限制。</text:span><text:span text:style-name="T629">對方 </text:span><text:span text:style-name="T644">buffer</text:span><text:span text:style-name="T629">（暫存區）還剩多少空間</text:span><text:span text:style-name="T86">，就最多能收多少資料。由接收端告知發送端。</text:span></text:p>
          </table:table-cell>
          <table:covered-table-cell/>
          <table:covered-table-cell/>
          <table:table-cell table:style-name="表格73.A2" table:number-columns-spanned="3" office:value-type="string">
            <text:p text:style-name="P42" loext:marker-style-name="T85"><text:span text:style-name="T86">網路的限制。發送端根據網路狀況自行估計，</text:span><text:span text:style-name="T420">目前網路最多能承受多少資料量</text:span><text:span text:style-name="T86">。由發送端自行維護。</text:span>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7"><text:span text:style-name="T286">實際傳送量 ＝ </text:span><text:span text:style-name="T290">min(rwnd, cwnd)</text:span><text:span text:style-name="T282">　</text:span><text:span text:style-name="T133">取兩者最小值</text:span><text:span text:style-name="T111">。</text:span><text:span text:style-name="T141">對方吃不下就看 </text:span><text:span text:style-name="T206">rwnd</text:span><text:span text:style-name="T141">；網路塞就看 </text:span><text:span text:style-name="T206">cwnd</text:span><text:span text:style-name="T111">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39" loext:marker-style-name="T71"><text:span text:style-name="T72">情境</text:span><text:span text:style-name="T71"/></text:p>
          </table:table-cell>
          <table:table-cell table:style-name="表格73.A1" office:value-type="string">
            <text:p text:style-name="P39" loext:marker-style-name="T71"><text:span text:style-name="T81">cwnd</text:span><text:span text:style-name="T71"/></text:p>
          </table:table-cell>
          <table:table-cell table:style-name="表格73.A1" table:number-columns-spanned="2" office:value-type="string">
            <text:p text:style-name="P39" loext:marker-style-name="T71"><text:span text:style-name="T81">rwnd</text:span><text:span text:style-name="T71"/></text:p>
          </table:table-cell>
          <table:covered-table-cell/>
          <table:table-cell table:style-name="表格73.A1" office:value-type="string">
            <text:p text:style-name="P39" loext:marker-style-name="T71"><text:span text:style-name="T72">實際傳送量</text:span><text:span text:style-name="T71"/></text:p>
          </table:table-cell>
          <table:table-cell table:style-name="表格73.A1" office:value-type="string">
            <text:p text:style-name="P39" loext:marker-style-name="T71"><text:span text:style-name="T72">瓶頸原因</text:span><text:span text:style-name="T71"/></text:p>
          </table:table-cell>
        </table:table-row>
        <table:table-row table:style-name="表格73.1">
          <table:table-cell table:style-name="表格73.A2" office:value-type="string">
            <text:p text:style-name="P42" loext:marker-style-name="T85"><text:span text:style-name="T86">對方 </text:span><text:span text:style-name="T161">buffer </text:span><text:span text:style-name="T86">快滿了</text:span></text:p>
          </table:table-cell>
          <table:table-cell table:style-name="表格73.A2" office:value-type="string">
            <text:p text:style-name="P42" loext:marker-style-name="T85"><text:span text:style-name="T161">10</text:span><text:span text:style-name="T85"/></text:p>
          </table:table-cell>
          <table:table-cell table:style-name="表格73.A2" table:number-columns-spanned="2" office:value-type="string">
            <text:p text:style-name="P42" loext:marker-style-name="T85"><text:span text:style-name="T161">3</text:span><text:span text:style-name="T85"/></text:p>
          </table:table-cell>
          <table:covered-table-cell/>
          <table:table-cell table:style-name="表格73.A2" office:value-type="string">
            <text:p text:style-name="P42" loext:marker-style-name="T85"><text:span text:style-name="T161">3</text:span><text:span text:style-name="T85"/></text:p>
          </table:table-cell>
          <table:table-cell table:style-name="表格73.A2" office:value-type="string">
            <text:p text:style-name="P42" loext:marker-style-name="T85"><text:span text:style-name="T86">接收端限制（</text:span><text:span text:style-name="T161">rwnd</text:span><text:span text:style-name="T86">）</text:span></text:p>
          </table:table-cell>
        </table:table-row>
        <table:table-row table:style-name="表格73.1">
          <table:table-cell table:style-name="表格73.A6" office:value-type="string">
            <text:p text:style-name="P42" loext:marker-style-name="T85"><text:span text:style-name="T86">網路很塞</text:span><text:span text:style-name="T85"/></text:p>
          </table:table-cell>
          <table:table-cell table:style-name="表格73.A6" office:value-type="string">
            <text:p text:style-name="P42" loext:marker-style-name="T85"><text:span text:style-name="T161">2</text:span><text:span text:style-name="T85"/></text:p>
          </table:table-cell>
          <table:table-cell table:style-name="表格73.A6" table:number-columns-spanned="2" office:value-type="string">
            <text:p text:style-name="P42" loext:marker-style-name="T85"><text:span text:style-name="T161">10</text:span><text:span text:style-name="T85"/></text:p>
          </table:table-cell>
          <table:covered-table-cell/>
          <table:table-cell table:style-name="表格73.A6" office:value-type="string">
            <text:p text:style-name="P42" loext:marker-style-name="T85"><text:span text:style-name="T161">2</text:span><text:span text:style-name="T85"/></text:p>
          </table:table-cell>
          <table:table-cell table:style-name="表格73.A6" office:value-type="string">
            <text:p text:style-name="P42" loext:marker-style-name="T85"><text:span text:style-name="T86">網路限制（</text:span><text:span text:style-name="T161">cwnd</text:span><text:span text:style-name="T86">）</text:span></text:p>
          </table:table-cell>
        </table:table-row>
        <table:table-row table:style-name="表格73.1">
          <table:table-cell table:style-name="表格73.A2" office:value-type="string">
            <text:p text:style-name="P42" loext:marker-style-name="T85"><text:span text:style-name="T86">兩者相近</text:span><text:span text:style-name="T85"/></text:p>
          </table:table-cell>
          <table:table-cell table:style-name="表格73.A2" office:value-type="string">
            <text:p text:style-name="P42" loext:marker-style-name="T85"><text:span text:style-name="T161">5</text:span><text:span text:style-name="T85"/></text:p>
          </table:table-cell>
          <table:table-cell table:style-name="表格73.A2" table:number-columns-spanned="2" office:value-type="string">
            <text:p text:style-name="P42" loext:marker-style-name="T85"><text:span text:style-name="T161">6</text:span><text:span text:style-name="T85"/></text:p>
          </table:table-cell>
          <table:covered-table-cell/>
          <table:table-cell table:style-name="表格73.A2" office:value-type="string">
            <text:p text:style-name="P42" loext:marker-style-name="T85"><text:span text:style-name="T161">5</text:span><text:span text:style-name="T85"/></text:p>
          </table:table-cell>
          <table:table-cell table:style-name="表格73.A2" office:value-type="string">
            <text:p text:style-name="P42" loext:marker-style-name="T85"><text:span text:style-name="T86">網路限制（</text:span><text:span text:style-name="T161">cwnd</text:span><text:span text:style-name="T86">）</text:span></text:p>
          </table:table-cell>
        </table:table-row>
      </table:table>
      <text:h text:style-name="P11" text:outline-level="2" loext:marker-style-name="T27"><text:span text:style-name="T28">六、滑動視窗（</text:span><text:span text:style-name="T27">Sliding Window</text:span><text:span text:style-name="T28">）</text:span></text:h>
      <text:p text:style-name="P48" loext:marker-style-name="T112"><text:span text:style-name="T113">最笨的方法：送 </text:span><text:span text:style-name="T178">1 </text:span><text:span text:style-name="T113">個封包 → 等 </text:span><text:span text:style-name="T178">ACK → </text:span><text:span text:style-name="T113">再送 </text:span><text:span text:style-name="T178">1 </text:span><text:span text:style-name="T113">個 → 等 </text:span><text:span text:style-name="T178">ACK</text:span><text:span text:style-name="T111">，</text:span><text:span text:style-name="T564">大部分時間在閒置，非常浪費</text:span><text:span text:style-name="T111">。</text:span><text:span text:style-name="T200">TCP </text:span><text:span text:style-name="T135">的改進</text:span><text:span text:style-name="T111">：</text:span><text:span text:style-name="T697">不用等 </text:span><text:span text:style-name="T702">ACK</text:span><text:span text:style-name="T697">，先連續送出多個封包讓封包都在網路上飛（</text:span><text:span text:style-name="T702">in-flight</text:span><text:span text:style-name="T697">），</text:span><text:span text:style-name="T702">ACK </text:span><text:span text:style-name="T697">再慢慢回來</text:span><text:span text:style-name="T111">，這就是 </text:span><text:span text:style-name="T177">pipeline</text:span><text:span text:style-name="T111">（流水線）傳輸。</text:span>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7"><text:span text:style-name="T264">✗ </text:span><text:span text:style-name="T257">常見錯誤：</text:span><text:span text:style-name="T111">視窗 </text:span><text:span text:style-name="T177">= cwnd</text:span><text:span text:style-name="T111">（擁塞視窗）。</text:span><text:span text:style-name="T270">✓ 正確：</text:span><text:span text:style-name="T323">視窗 </text:span><text:span text:style-name="T350">= min(cwnd, rwnd)</text:span><text:span text:style-name="T323">，</text:span><text:span text:style-name="T350">cwnd </text:span><text:span text:style-name="T323">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4" loext:marker-style-name="T71"><text:span text:style-name="T72">時間點</text:span><text:span text:style-name="T71"/></text:p>
          </table:table-cell>
          <table:table-cell table:style-name="表格74.A2" office:value-type="string">
            <text:p text:style-name="P4" loext:marker-style-name="T71"><text:span text:style-name="T72">已確認</text:span><text:span text:style-name="T71"/></text:p>
          </table:table-cell>
          <table:table-cell table:style-name="表格74.A2" office:value-type="string">
            <text:p text:style-name="P4" loext:marker-style-name="T71"><text:span text:style-name="T72">視窗範圍（可送）</text:span><text:span text:style-name="T71"/></text:p>
          </table:table-cell>
          <table:table-cell table:style-name="表格74.A2" office:value-type="string">
            <text:p text:style-name="P4" loext:marker-style-name="T71"><text:span text:style-name="T72">等待中</text:span><text:span text:style-name="T71"/></text:p>
          </table:table-cell>
        </table:table-row>
        <table:table-row table:style-name="表格74.1">
          <table:table-cell table:style-name="表格74.A3" office:value-type="string">
            <text:p text:style-name="P42" loext:marker-style-name="T85"><text:span text:style-name="T86">初始狀態</text:span><text:span text:style-name="T85"/></text:p>
          </table:table-cell>
          <table:table-cell table:style-name="表格74.A3" office:value-type="string">
            <text:p text:style-name="P42" loext:marker-style-name="T85"><text:span text:style-name="T86">無</text:span><text:span text:style-name="T85"/></text:p>
          </table:table-cell>
          <table:table-cell table:style-name="表格74.A3" office:value-type="string">
            <text:p text:style-name="P42" loext:marker-style-name="T85"><text:span text:style-name="T86">封包 </text:span><text:span text:style-name="T161">1, 2, 3</text:span></text:p>
          </table:table-cell>
          <table:table-cell table:style-name="表格74.A3" office:value-type="string">
            <text:p text:style-name="P42" loext:marker-style-name="T85"><text:span text:style-name="T161">4, 5, 6 …</text:span><text:span text:style-name="T85"/></text:p>
          </table:table-cell>
        </table:table-row>
        <table:table-row table:style-name="表格74.1">
          <table:table-cell table:style-name="表格74.A4" office:value-type="string">
            <text:p text:style-name="P42" loext:marker-style-name="T104"><text:span text:style-name="T105">收到 </text:span><text:span text:style-name="T171">ACK 1</text:span></text:p>
          </table:table-cell>
          <table:table-cell table:style-name="表格74.A4" office:value-type="string">
            <text:p text:style-name="P42" loext:marker-style-name="T109"><text:span text:style-name="T110">封包 </text:span><text:span text:style-name="T175">1</text:span></text:p>
          </table:table-cell>
          <table:table-cell table:style-name="表格74.A4" office:value-type="string">
            <text:p text:style-name="P42" loext:marker-style-name="T85"><text:span text:style-name="T86">封包 </text:span><text:span text:style-name="T161">2, 3, 4</text:span></text:p>
          </table:table-cell>
          <table:table-cell table:style-name="表格74.A4" office:value-type="string">
            <text:p text:style-name="P42" loext:marker-style-name="T85"><text:span text:style-name="T161">5, 6 …</text:span><text:span text:style-name="T86">（視窗滑動了！）</text:span></text:p>
          </table:table-cell>
        </table:table-row>
        <table:table-row table:style-name="表格74.1">
          <table:table-cell table:style-name="表格74.A3" office:value-type="string">
            <text:p text:style-name="P42" loext:marker-style-name="T104"><text:span text:style-name="T105">收到 </text:span><text:span text:style-name="T171">ACK 2</text:span></text:p>
          </table:table-cell>
          <table:table-cell table:style-name="表格74.A3" office:value-type="string">
            <text:p text:style-name="P42" loext:marker-style-name="T109"><text:span text:style-name="T110">封包 </text:span><text:span text:style-name="T175">1, 2</text:span></text:p>
          </table:table-cell>
          <table:table-cell table:style-name="表格74.A3" office:value-type="string">
            <text:p text:style-name="P42" loext:marker-style-name="T85"><text:span text:style-name="T86">封包 </text:span><text:span text:style-name="T161">3, 4, 5</text:span></text:p>
          </table:table-cell>
          <table:table-cell table:style-name="表格74.A3" office:value-type="string">
            <text:p text:style-name="P42" loext:marker-style-name="T85"><text:span text:style-name="T161">6, 7 …</text:span><text:span text:style-name="T86">（繼續往右滑）</text:span></text:p>
          </table:table-cell>
        </table:table-row>
      </table:table>
      <text:p text:style-name="P48" loext:marker-style-name="T10"><text:span text:style-name="T11">關鍵理解：視窗大小決定效率（越大越快），</text:span><text:span text:style-name="T677">ACK </text:span><text:span text:style-name="T674">的回傳決定視窗位置（往前滑）</text:span><text:span text:style-name="T11">，兩者合作讓傳輸保持流暢。</text:span></text:p>
      <text:h text:style-name="P11" text:outline-level="2" loext:marker-style-name="T27"><text:span text:style-name="T28">七、擁塞控制：怎麼調整速度</text:span><text:span text:style-name="T27"/></text:h>
      <text:h text:style-name="P12" text:outline-level="3"><text:span text:style-name="T225">▍</text:span><text:span text:style-name="T226"> </text:span><text:span text:style-name="T227">階段一：</text:span><text:span text:style-name="T226">Slow Start</text:span><text:span text:style-name="T227">（慢啟動）— 指數成長</text:span></text:h>
      <text:p text:style-name="P48" loext:marker-style-name="T112"><text:span text:style-name="T111">雖叫「慢」啟動，實際成長非常快。規則：</text:span><text:span text:style-name="T526">每收到一個 </text:span><text:span text:style-name="T542">ACK</text:span><text:span text:style-name="T526">，</text:span><text:span text:style-name="T542">cwnd </text:span><text:span text:style-name="T526">就 </text:span><text:span text:style-name="T542">+1</text:span><text:span text:style-name="T111">；</text:span><text:span text:style-name="T617">送出 </text:span><text:span text:style-name="T634">N </text:span><text:span text:style-name="T617">個封包 → 收回 </text:span><text:span text:style-name="T634">N </text:span><text:span text:style-name="T617">個 </text:span><text:span text:style-name="T634">ACK → cwnd </text:span><text:span text:style-name="T617">增加 </text:span><text:span text:style-name="T634">N</text:span><text:span text:style-name="T111">，所以每輪自然翻倍。</text:span><text:span text:style-name="T177">(</text:span><text:span text:style-name="T350">Slow Start = </text:span><text:span text:style-name="T323">每一輪變 </text:span><text:span text:style-name="T350">2 </text:span><text:span text:style-name="T323">倍，</text:span><text:span text:style-name="T350">Congestion Avoidance = </text:span><text:span text:style-name="T323">每一輪只加 </text:span><text:span text:style-name="T350">1</text:span><text:span text:style-name="T177">(</text:span><text:span text:style-name="T111">「</text:span><text:span text:style-name="T559">Slow Start</text:span><text:span text:style-name="T565">翻倍，壅塞避免加一</text:span><text:span text:style-name="T111">」</text:span><text:span text:style-name="T177">))</text:span>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39" loext:marker-style-name="T71"><text:span text:style-name="T72">輪次（</text:span><text:span text:style-name="T81">RTT</text:span><text:span text:style-name="T72">）</text:span></text:p>
            </table:table-cell>
            <table:table-cell table:style-name="表格75.A1" office:value-type="string">
              <text:p text:style-name="P39" loext:marker-style-name="T71"><text:span text:style-name="T81">cwnd</text:span><text:span text:style-name="T71"/></text:p>
            </table:table-cell>
            <table:table-cell table:style-name="表格75.A1" office:value-type="string">
              <text:p text:style-name="P39" loext:marker-style-name="T71"><text:span text:style-name="T72">送出封包數</text:span><text:span text:style-name="T71"/></text:p>
            </table:table-cell>
            <table:table-cell table:style-name="表格75.A1" office:value-type="string">
              <text:p text:style-name="P39" loext:marker-style-name="T71"><text:span text:style-name="T72">收回 </text:span><text:span text:style-name="T81">ACK </text:span><text:span text:style-name="T72">數</text:span></text:p>
            </table:table-cell>
            <table:table-cell table:style-name="表格75.A1" office:value-type="string">
              <text:p text:style-name="P39" loext:marker-style-name="T71"><text:span text:style-name="T72">新 </text:span><text:span text:style-name="T81">cwnd</text:span>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42" loext:marker-style-name="T85"><text:span text:style-name="T86">第 </text:span><text:span text:style-name="T161">1 </text:span><text:span text:style-name="T86">輪</text:span></text:p>
          </table:table-cell>
          <table:table-cell table:style-name="表格75.A2" office:value-type="string">
            <text:p text:style-name="P42" loext:marker-style-name="T85"><text:span text:style-name="T161">1</text:span><text:span text:style-name="T85"/></text:p>
          </table:table-cell>
          <table:table-cell table:style-name="表格75.A2" office:value-type="string">
            <text:p text:style-name="P42" loext:marker-style-name="T85"><text:span text:style-name="T161">1</text:span><text:span text:style-name="T85"/></text:p>
          </table:table-cell>
          <table:table-cell table:style-name="表格75.A2" office:value-type="string">
            <text:p text:style-name="P42" loext:marker-style-name="T85"><text:span text:style-name="T161">1</text:span><text:span text:style-name="T85"/></text:p>
          </table:table-cell>
          <table:table-cell table:style-name="表格75.A2" office:value-type="string">
            <text:p text:style-name="P42" loext:marker-style-name="T85"><text:span text:style-name="T161">2</text:span><text:span text:style-name="T85"/></text:p>
          </table:table-cell>
        </table:table-row>
        <text:soft-page-break/>
        <table:table-row table:style-name="表格75.1">
          <table:table-cell table:style-name="表格75.A3" office:value-type="string">
            <text:p text:style-name="P42" loext:marker-style-name="T85"><text:span text:style-name="T86">第 </text:span><text:span text:style-name="T161">2 </text:span><text:span text:style-name="T86">輪</text:span></text:p>
          </table:table-cell>
          <table:table-cell table:style-name="表格75.A3" office:value-type="string">
            <text:p text:style-name="P42" loext:marker-style-name="T85"><text:span text:style-name="T161">2</text:span><text:span text:style-name="T85"/></text:p>
          </table:table-cell>
          <table:table-cell table:style-name="表格75.A3" office:value-type="string">
            <text:p text:style-name="P42" loext:marker-style-name="T85"><text:span text:style-name="T161">2</text:span><text:span text:style-name="T85"/></text:p>
          </table:table-cell>
          <table:table-cell table:style-name="表格75.A3" office:value-type="string">
            <text:p text:style-name="P42" loext:marker-style-name="T85"><text:span text:style-name="T161">2</text:span><text:span text:style-name="T85"/></text:p>
          </table:table-cell>
          <table:table-cell table:style-name="表格75.A3" office:value-type="string">
            <text:p text:style-name="P42" loext:marker-style-name="T85"><text:span text:style-name="T161">4</text:span><text:span text:style-name="T85"/></text:p>
          </table:table-cell>
        </table:table-row>
        <table:table-row table:style-name="表格75.1">
          <table:table-cell table:style-name="表格75.A2" office:value-type="string">
            <text:p text:style-name="P42" loext:marker-style-name="T85"><text:span text:style-name="T86">第 </text:span><text:span text:style-name="T161">3 </text:span><text:span text:style-name="T86">輪</text:span></text:p>
          </table:table-cell>
          <table:table-cell table:style-name="表格75.A2" office:value-type="string">
            <text:p text:style-name="P42" loext:marker-style-name="T85"><text:span text:style-name="T161">4</text:span><text:span text:style-name="T85"/></text:p>
          </table:table-cell>
          <table:table-cell table:style-name="表格75.A2" office:value-type="string">
            <text:p text:style-name="P42" loext:marker-style-name="T85"><text:span text:style-name="T161">4</text:span><text:span text:style-name="T85"/></text:p>
          </table:table-cell>
          <table:table-cell table:style-name="表格75.A2" office:value-type="string">
            <text:p text:style-name="P42" loext:marker-style-name="T85"><text:span text:style-name="T161">4</text:span><text:span text:style-name="T85"/></text:p>
          </table:table-cell>
          <table:table-cell table:style-name="表格75.A2" office:value-type="string">
            <text:p text:style-name="P42" loext:marker-style-name="T85"><text:span text:style-name="T161">8</text:span><text:span text:style-name="T85"/></text:p>
          </table:table-cell>
        </table:table-row>
        <table:table-row table:style-name="表格75.1">
          <table:table-cell table:style-name="表格75.A3" office:value-type="string">
            <text:p text:style-name="P42" loext:marker-style-name="T85"><text:span text:style-name="T86">第 </text:span><text:span text:style-name="T161">4 </text:span><text:span text:style-name="T86">輪</text:span></text:p>
          </table:table-cell>
          <table:table-cell table:style-name="表格75.A3" office:value-type="string">
            <text:p text:style-name="P42" loext:marker-style-name="T85"><text:span text:style-name="T161">8</text:span><text:span text:style-name="T85"/></text:p>
          </table:table-cell>
          <table:table-cell table:style-name="表格75.A3" office:value-type="string">
            <text:p text:style-name="P42" loext:marker-style-name="T85"><text:span text:style-name="T161">8</text:span><text:span text:style-name="T85"/></text:p>
          </table:table-cell>
          <table:table-cell table:style-name="表格75.A3" office:value-type="string">
            <text:p text:style-name="P42" loext:marker-style-name="T85"><text:span text:style-name="T161">8</text:span><text:span text:style-name="T85"/></text:p>
          </table:table-cell>
          <table:table-cell table:style-name="表格75.A3" office:value-type="string">
            <text:p text:style-name="P42" loext:marker-style-name="T85"><text:span text:style-name="T161">16</text:span><text:span text:style-name="T85"/></text:p>
          </table:table-cell>
        </table:table-row>
      </table:table>
      <text:h text:style-name="P12" text:outline-level="3"><text:span text:style-name="T225">▍</text:span><text:span text:style-name="T226"> </text:span><text:span text:style-name="T227">階段二：</text:span><text:span text:style-name="T226">Congestion Avoidance</text:span><text:span text:style-name="T227">（擁塞避免）— 線性成長</text:span></text:h>
      <text:p text:style-name="P48" loext:marker-style-name="T112"><text:span text:style-name="T458">cwnd </text:span><text:span text:style-name="T437">成長到門檻值（</text:span><text:span text:style-name="T458">ssthresh</text:span><text:span text:style-name="T437">）後，改為線性成長</text:span><text:span text:style-name="T111">（</text:span><text:span text:style-name="T526">每個 </text:span><text:span text:style-name="T542">RTT </text:span><text:span text:style-name="T526">只 </text:span><text:span text:style-name="T542">+1</text:span><text:span text:style-name="T111">），</text:span><text:span text:style-name="T133">避免增長太快讓網路過載</text:span><text:span text:style-name="T111">。</text:span>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4"/>
            </table:table-cell>
            <table:table-cell table:style-name="表格76.A1" office:value-type="string">
              <text:p text:style-name="P4" loext:marker-style-name="T71"><text:span text:style-name="T81">Slow Start</text:span><text:span text:style-name="T71"/></text:p>
            </table:table-cell>
            <table:table-cell table:style-name="表格76.A1" office:value-type="string">
              <text:p text:style-name="P4" loext:marker-style-name="T71"><text:span text:style-name="T81">Congestion Avoidance</text:span><text:span text:style-name="T71"/>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42" loext:marker-style-name="T85"><text:span text:style-name="T86">觸發條件</text:span><text:span text:style-name="T85"/></text:p>
          </table:table-cell>
          <table:table-cell table:style-name="表格76.A2" office:value-type="string">
            <text:p text:style-name="P42" loext:marker-style-name="T104"><text:span text:style-name="T171">cwnd &lt; ssthresh</text:span><text:span text:style-name="T104"/></text:p>
          </table:table-cell>
          <table:table-cell table:style-name="表格76.A2" office:value-type="string">
            <text:p text:style-name="P42" loext:marker-style-name="T104"><text:span text:style-name="T171">cwnd ≥ ssthresh</text:span><text:span text:style-name="T104"/></text:p>
          </table:table-cell>
        </table:table-row>
        <table:table-row table:style-name="表格76.1">
          <table:table-cell table:style-name="表格76.A3" office:value-type="string">
            <text:p text:style-name="P42" loext:marker-style-name="T85"><text:span text:style-name="T86">成長方式</text:span><text:span text:style-name="T85"/></text:p>
          </table:table-cell>
          <table:table-cell table:style-name="表格76.A3" office:value-type="string">
            <text:p text:style-name="P42" loext:marker-style-name="T85"><text:span text:style-name="T631">指數成長</text:span><text:span text:style-name="T86">（</text:span><text:span text:style-name="T519">每個 </text:span><text:span text:style-name="T538">ACK +1</text:span><text:span text:style-name="T86">）</text:span></text:p>
          </table:table-cell>
          <table:table-cell table:style-name="表格76.A3" office:value-type="string">
            <text:p text:style-name="P42" loext:marker-style-name="T85"><text:span text:style-name="T667">線性成長</text:span><text:span text:style-name="T86">（</text:span><text:span text:style-name="T519">每個 </text:span><text:span text:style-name="T538">RTT +1</text:span><text:span text:style-name="T86">）</text:span><text:span text:style-name="T161">(</text:span><text:span text:style-name="T703">RTT </text:span><text:span text:style-name="T698">：</text:span><text:span text:style-name="T703">Round Trip Time</text:span><text:span text:style-name="T698">（往返時間）</text:span><text:span text:style-name="T703">= </text:span><text:span text:style-name="T698">封包出去 </text:span><text:span text:style-name="T703">+ ACK </text:span><text:span text:style-name="T698">回來的一個來回時間</text:span><text:span text:style-name="T161">)</text:span></text:p>
          </table:table-cell>
        </table:table-row>
        <table:table-row table:style-name="表格76.1">
          <table:table-cell table:style-name="表格76.A2" office:value-type="string">
            <text:p text:style-name="P42" loext:marker-style-name="T85"><text:span text:style-name="T86">特性</text:span><text:span text:style-name="T85"/></text:p>
          </table:table-cell>
          <table:table-cell table:style-name="表格76.A2" office:value-type="string">
            <text:p text:style-name="P42" loext:marker-style-name="T85"><text:span text:style-name="T86">快速試探網路上限</text:span><text:span text:style-name="T85"/></text:p>
          </table:table-cell>
          <table:table-cell table:style-name="表格76.A2" office:value-type="string">
            <text:p text:style-name="P42" loext:marker-style-name="T85"><text:span text:style-name="T86">保守維持穩定傳輸</text:span><text:span text:style-name="T85"/></text:p>
          </table:table-cell>
        </table:table-row>
      </table:table>
      <text:h text:style-name="P12" text:outline-level="3"><text:span text:style-name="T225">▍</text:span><text:span text:style-name="T226"> </text:span><text:span text:style-name="T227">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4" loext:marker-style-name="T77"><text:span text:style-name="T78">丟包偵測方式</text:span><text:span text:style-name="T77"/></text:p>
            </table:table-cell>
            <table:table-cell table:style-name="表格77.A1" office:value-type="string">
              <text:p text:style-name="P4" loext:marker-style-name="T77"><text:span text:style-name="T78">說明</text:span><text:span text:style-name="T77"/></text:p>
            </table:table-cell>
            <table:table-cell table:style-name="表格77.A1" office:value-type="string">
              <text:p text:style-name="P4" loext:marker-style-name="T77"><text:span text:style-name="T83">ssthresh</text:span><text:span text:style-name="T77"/></text:p>
            </table:table-cell>
            <table:table-cell table:style-name="表格77.A1" office:value-type="string">
              <text:p text:style-name="P4" loext:marker-style-name="T77"><text:span text:style-name="T83">cwnd</text:span><text:span text:style-name="T77"/></text:p>
            </table:table-cell>
            <table:table-cell table:style-name="表格77.A1" office:value-type="string">
              <text:p text:style-name="P4" loext:marker-style-name="T77"><text:span text:style-name="T78">下一階段</text:span><text:span text:style-name="T77"/>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42" loext:marker-style-name="T154"><text:span text:style-name="T215">Timeout</text:span><text:span text:style-name="T153">（逾時）</text:span></text:p>
          </table:table-cell>
          <table:table-cell table:style-name="表格77.A2" office:value-type="string">
            <text:p text:style-name="P42" loext:marker-style-name="T149"><text:span text:style-name="T151">等太久沒 </text:span><text:span text:style-name="T214">ACK</text:span><text:span text:style-name="T150">，</text:span><text:span text:style-name="T311">網路嚴重擁塞</text:span></text:p>
          </table:table-cell>
          <table:table-cell table:style-name="表格77.A2" office:value-type="string">
            <text:p text:style-name="P42" loext:marker-style-name="T149"><text:span text:style-name="T212">= </text:span><text:span text:style-name="T361">cwnd / 2</text:span></text:p>
          </table:table-cell>
          <table:table-cell table:style-name="表格77.A2" office:value-type="string">
            <text:p text:style-name="P42" loext:marker-style-name="T252"><text:span text:style-name="T253">重設為 </text:span><text:span text:style-name="T260">1</text:span></text:p>
          </table:table-cell>
          <table:table-cell table:style-name="表格77.A2" office:value-type="string">
            <text:p text:style-name="P42" loext:marker-style-name="T371"><text:span text:style-name="T369">重新進入 </text:span><text:span text:style-name="T382">Slow Start</text:span></text:p>
          </table:table-cell>
        </table:table-row>
        <table:table-row table:style-name="表格77.1">
          <table:table-cell table:style-name="表格77.A3" office:value-type="string">
            <text:p text:style-name="P42" loext:marker-style-name="T154"><text:span text:style-name="T215">3 </text:span><text:span text:style-name="T153">個重複 </text:span><text:span text:style-name="T215">ACK (Fast Retransmit)</text:span></text:p>
          </table:table-cell>
          <table:table-cell table:style-name="表格77.A3" office:value-type="string">
            <text:p text:style-name="P42" loext:marker-style-name="T149"><text:span text:style-name="T151">連續收 </text:span><text:span text:style-name="T214">3 </text:span><text:span text:style-name="T151">個同樣 </text:span><text:span text:style-name="T214">ACK</text:span><text:span text:style-name="T150">，</text:span><text:span text:style-name="T427">單一封包丟失</text:span></text:p>
          </table:table-cell>
          <table:table-cell table:style-name="表格77.A3" office:value-type="string">
            <text:p text:style-name="P42" loext:marker-style-name="T149"><text:span text:style-name="T212">= </text:span><text:span text:style-name="T361">cwnd / 2</text:span></text:p>
          </table:table-cell>
          <table:table-cell table:style-name="表格77.A3" office:value-type="string">
            <text:p text:style-name="P42" loext:marker-style-name="T34"><text:span text:style-name="T42">= ssthresh</text:span><text:span text:style-name="T35">（直接減半）</text:span></text:p>
          </table:table-cell>
          <table:table-cell table:style-name="表格77.A3" office:value-type="string">
            <text:p text:style-name="P42" loext:marker-style-name="T371"><text:span text:style-name="T369">進入 </text:span><text:span text:style-name="T382">Congestion Avoidance</text:span>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6"><text:span text:style-name="T222">⚠️ <text:s/></text:span><text:span text:style-name="T247">重要區別</text:span></text:p>
            <text:p text:style-name="P7" loext:marker-style-name="T112"><text:span text:style-name="T684">Timeout </text:span><text:span text:style-name="T679">代表網路嚴重問題</text:span><text:span text:style-name="T111">，</text:span><text:span text:style-name="T637">cwnd </text:span><text:span text:style-name="T620">重設回 </text:span><text:span text:style-name="T637">1 </text:span><text:span text:style-name="T620">從頭來</text:span><text:span text:style-name="T111">；</text:span><text:span text:style-name="T705">3 </text:span><text:span text:style-name="T706">個重複 </text:span><text:span text:style-name="T705">ACK </text:span><text:span text:style-name="T706">只是單一封包遺失</text:span><text:span text:style-name="T111">，</text:span><text:span text:style-name="T637">cwnd </text:span><text:span text:style-name="T620">直接減半後繼續 </text:span><text:span text:style-name="T637">Congestion Avoidance</text:span><text:span text:style-name="T620">，不用從頭重來</text:span><text:span text:style-name="T111">。</text:span><text:span text:style-name="T177">(</text:span><text:span text:style-name="T353">Timeout → cwnd = 1</text:span><text:span text:style-name="T326">；</text:span><text:span text:style-name="T353">3Dup ACK → cwnd ÷ 2</text:span><text:span text:style-name="T177">)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2" text:outline-level="3"><text:span text:style-name="T225">▍</text:span><text:span text:style-name="T226"> AIMD</text:span><text:span text:style-name="T227">（加法增長 </text:span><text:span text:style-name="T226">/ </text:span><text:span text:style-name="T227">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39" loext:marker-style-name="T71"><text:span text:style-name="T81">AI</text:span><text:span text:style-name="T72">：加法增長 </text:span><text:span text:style-name="T81">Additive Increase</text:span></text:p>
            </table:table-cell>
            <table:table-cell table:style-name="表格78.A1" office:value-type="string">
              <text:p text:style-name="P39" loext:marker-style-name="T71"><text:span text:style-name="T81">MD</text:span><text:span text:style-name="T72">：乘法減少 </text:span><text:span text:style-name="T81">Multiplicative Decrease</text:span>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42" loext:marker-style-name="T85"><text:span text:style-name="T96">沒丟包 → 網路 </text:span><text:span text:style-name="T172">OK </text:span><text:span text:style-name="T161">→ CA </text:span><text:span text:style-name="T86">階段線性增加（</text:span><text:span text:style-name="T101">每 </text:span><text:span text:style-name="T169">RTT +1</text:span><text:span text:style-name="T86">），慢慢加速。</text:span></text:p>
          </table:table-cell>
          <table:table-cell table:style-name="表格78.A2" office:value-type="string">
            <text:p text:style-name="P42" loext:marker-style-name="T85"><text:span text:style-name="T96">偵測到丟包 → 網路塞了 </text:span><text:span text:style-name="T86">→ </text:span><text:span text:style-name="T169">cwnd ×0.5</text:span><text:span text:style-name="T101">（減半）</text:span><text:span text:style-name="T86">，快速降速避免繼續惡化。</text:span></text:p>
          </table:table-cell>
        </table:table-row>
      </table:table>
      <text:p text:style-name="P48" loext:marker-style-name="T10"><text:span text:style-name="T545">AIMD </text:span><text:span text:style-name="T529">本質：用 </text:span><text:span text:style-name="T545">ACK </text:span><text:span text:style-name="T529">當回饋，不斷探測網路的「最高速度」</text:span><text:span text:style-name="T11">——</text:span><text:span text:style-name="T372">慢慢加速找上限，遇到問題快速減速再重新找</text:span><text:span text:style-name="T11">，這個循環就是 </text:span><text:span text:style-name="T20">TCP </text:span><text:span text:style-name="T11">傳輸的節奏。</text:span></text:p>
      <text:h text:style-name="P11" text:outline-level="2" loext:marker-style-name="T27"><text:span text:style-name="T28">八、把整個 </text:span><text:span text:style-name="T27">TCP </text:span><text:span text:style-name="T28">串起來（完整流程）</text:span>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6"><text:span text:style-name="T222">🔄 <text:s/></text:span><text:span text:style-name="T53">完整流程</text:span></text:p>
            <text:p text:style-name="P7" loext:marker-style-name="T112"><text:span text:style-name="T177">① </text:span><text:span text:style-name="T111">建立連線：三次握手（</text:span><text:span text:style-name="T177">SYN → SYN+ACK → ACK</text:span><text:span text:style-name="T111">）確認雙向通訊正常。</text:span></text:p>
            <text:p text:style-name="P8" loext:marker-style-name="T112"><text:span text:style-name="T177">② </text:span><text:span text:style-name="T111">開始傳資料 </text:span><text:span text:style-name="T177">Slow Start</text:span><text:span text:style-name="T111">：</text:span><text:span text:style-name="T177">cwnd </text:span><text:span text:style-name="T111">從 </text:span><text:span text:style-name="T177">1 </text:span><text:span text:style-name="T111">開始，每個 </text:span><text:span text:style-name="T177">ACK +1</text:span><text:span text:style-name="T111">，指數成長快速試探上限。</text:span></text:p>
            <text:p text:style-name="P8" loext:marker-style-name="T112"><text:span text:style-name="T177">③ </text:span><text:span text:style-name="T111">達到門檻切換 </text:span><text:span text:style-name="T177">CA</text:span><text:span text:style-name="T111">：</text:span><text:span text:style-name="T177">cwnd </text:span><text:span text:style-name="T111">到 </text:span><text:span text:style-name="T177">ssthresh </text:span><text:span text:style-name="T111">後改每 </text:span><text:span text:style-name="T177">RTT +1</text:span><text:span text:style-name="T111">，線性保守維持穩定。（</text:span><text:span text:style-name="T177">RTT</text:span><text:span text:style-name="T111">＝來回時間：送出一個封包到收到 </text:span><text:span text:style-name="T177">ACK </text:span><text:span text:style-name="T111">所花的時間）</text:span></text:p>
            <text:p text:style-name="P8" loext:marker-style-name="T112"><text:span text:style-name="T177">④ </text:span><text:span text:style-name="T111">每輪都考慮兩個限制：實際傳送量 </text:span><text:span text:style-name="T177">= min(rwnd, cwnd)</text:span><text:span text:style-name="T111">。</text:span></text:p>
            <text:p text:style-name="P8" loext:marker-style-name="T112"><text:span text:style-name="T177">⑤ </text:span><text:span text:style-name="T111">視窗持續滑動：每收到一個 </text:span><text:span text:style-name="T177">ACK </text:span><text:span text:style-name="T111">視窗往前移，保持 </text:span><text:span text:style-name="T177">pipeline </text:span><text:span text:style-name="T111">流暢。</text:span></text:p>
            <text:p text:style-name="P8" loext:marker-style-name="T112"><text:span text:style-name="T177">⑥ </text:span><text:span text:style-name="T111">偵測到丟包快速反應：</text:span><text:span text:style-name="T177">Timeout → cwnd=1 </text:span><text:span text:style-name="T111">重回 </text:span><text:span text:style-name="T177">Slow Start</text:span><text:span text:style-name="T111">；</text:span><text:span text:style-name="T177">3 </text:span><text:span text:style-name="T111">重複 </text:span><text:span text:style-name="T177">ACK → cwnd </text:span><text:span text:style-name="T111">減半續 </text:span><text:span text:style-name="T177">CA</text:span><text:span text:style-name="T111">。</text:span></text:p>
            <text:p text:style-name="P8" loext:marker-style-name="T112"><text:span text:style-name="T177">⑦ </text:span><text:span text:style-name="T111">持續循環調整：送 → 收 </text:span><text:span text:style-name="T177">ACK → </text:span><text:span text:style-name="T111">調整 </text:span><text:span text:style-name="T177">cwnd → </text:span><text:span text:style-name="T111">再送，</text:span><text:span text:style-name="T526">用 </text:span><text:span text:style-name="T542">ACK </text:span><text:span text:style-name="T526">當回饋不斷自我調節</text:span><text:span text:style-name="T111">。</text:span></text:p>
          </table:table-cell>
        </table:table-row>
      </table:table>
      <text:h text:style-name="P11" text:outline-level="2" loext:marker-style-name="T333"><text:soft-page-break/><text:span text:style-name="T333">TCP </text:span><text:span text:style-name="T334">七字口訣 <text:s text:c="2"/>握</text:span><text:span text:style-name="T333">(</text:span><text:span text:style-name="T334">三次握手</text:span><text:span text:style-name="T333">) → </text:span><text:span text:style-name="T334">衝</text:span><text:span text:style-name="T333">(Slow Start </text:span><text:span text:style-name="T334">指數成長</text:span><text:span text:style-name="T333">) → </text:span><text:span text:style-name="T334">穩</text:span><text:span text:style-name="T333">(CA </text:span><text:span text:style-name="T334">線性成長</text:span><text:span text:style-name="T333">) → </text:span><text:span text:style-name="T334">看</text:span><text:span text:style-name="T333">(min(rwnd,cwnd)) → </text:span><text:span text:style-name="T334">滑</text:span><text:span text:style-name="T333">(Sliding Window) → </text:span><text:span text:style-name="T334">救</text:span><text:span text:style-name="T333">(Timeout / 3 Dup ACK) → </text:span><text:span text:style-name="T334">循</text:span><text:span text:style-name="T333">(ACK </text:span><text:span text:style-name="T334">回饋循環</text:span><text:span text:style-name="T333">)</text:span></text:h>
      <text:h text:style-name="P31" text:outline-level="2" loext:marker-style-name="T27"/>
      <text:h text:style-name="P11" text:outline-level="2" loext:marker-style-name="T27"><text:span text:style-name="T28">九、</text:span><text:span text:style-name="T27">ARP / NAT / TCP </text:span><text:span text:style-name="T28">在完整上網中的位置</text:span>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4" loext:marker-style-name="T71"><text:span text:style-name="T72">步驟</text:span><text:span text:style-name="T71"/></text:p>
            </table:table-cell>
            <table:table-cell table:style-name="表格80.A1" office:value-type="string">
              <text:p text:style-name="P4" loext:marker-style-name="T71"><text:span text:style-name="T72">發生什麼</text:span><text:span text:style-name="T71"/></text:p>
            </table:table-cell>
            <table:table-cell table:style-name="表格80.A1" office:value-type="string">
              <text:p text:style-name="P4" loext:marker-style-name="T71"><text:span text:style-name="T72">用到什麼</text:span><text:span text:style-name="T71"/>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42" loext:marker-style-name="T85"><text:span text:style-name="T161">DNS </text:span><text:span text:style-name="T86">解析</text:span></text:p>
          </table:table-cell>
          <table:table-cell table:style-name="表格80.A2" office:value-type="string">
            <text:p text:style-name="P42" loext:marker-style-name="T85"><text:span text:style-name="T161">google.com → 142.250.x.x</text:span><text:span text:style-name="T85"/></text:p>
          </table:table-cell>
          <table:table-cell table:style-name="表格80.A2" office:value-type="string">
            <text:p text:style-name="P42" loext:marker-style-name="T85"><text:span text:style-name="T161">DNS</text:span><text:span text:style-name="T85"/></text:p>
          </table:table-cell>
        </table:table-row>
        <table:table-row table:style-name="表格80.1">
          <table:table-cell table:style-name="表格80.A3" office:value-type="string">
            <text:p text:style-name="P42" loext:marker-style-name="T85"><text:span text:style-name="T161">ARP </text:span><text:span text:style-name="T86">找路由器</text:span></text:p>
          </table:table-cell>
          <table:table-cell table:style-name="表格80.A3" office:value-type="string">
            <text:p text:style-name="P42" loext:marker-style-name="T85"><text:span text:style-name="T86">找路由器的 </text:span><text:span text:style-name="T161">MAC </text:span><text:span text:style-name="T86">位址</text:span></text:p>
          </table:table-cell>
          <table:table-cell table:style-name="表格80.A3" office:value-type="string">
            <text:p text:style-name="P42" loext:marker-style-name="T85"><text:span text:style-name="T161">ARP</text:span><text:span text:style-name="T85"/></text:p>
          </table:table-cell>
        </table:table-row>
        <table:table-row table:style-name="表格80.1">
          <table:table-cell table:style-name="表格80.A2" office:value-type="string">
            <text:p text:style-name="P42" loext:marker-style-name="T85"><text:span text:style-name="T161">NAT</text:span><text:span text:style-name="T85"/></text:p>
          </table:table-cell>
          <table:table-cell table:style-name="表格80.A2" office:value-type="string">
            <text:p text:style-name="P42" loext:marker-style-name="T85"><text:span text:style-name="T86">私有 </text:span><text:span text:style-name="T161">IP </text:span><text:span text:style-name="T86">換成公網 </text:span><text:span text:style-name="T161">IP</text:span></text:p>
          </table:table-cell>
          <table:table-cell table:style-name="表格80.A2" office:value-type="string">
            <text:p text:style-name="P42" loext:marker-style-name="T85"><text:span text:style-name="T161">NAT</text:span><text:span text:style-name="T85"/></text:p>
          </table:table-cell>
        </table:table-row>
        <table:table-row table:style-name="表格80.1">
          <table:table-cell table:style-name="表格80.A3" office:value-type="string">
            <text:p text:style-name="P42" loext:marker-style-name="T85"><text:span text:style-name="T161">TCP </text:span><text:span text:style-name="T86">三次握手</text:span></text:p>
          </table:table-cell>
          <table:table-cell table:style-name="表格80.A3" office:value-type="string">
            <text:p text:style-name="P42" loext:marker-style-name="T85"><text:span text:style-name="T86">與 </text:span><text:span text:style-name="T161">Google </text:span><text:span text:style-name="T86">建立可靠連線</text:span></text:p>
          </table:table-cell>
          <table:table-cell table:style-name="表格80.A3" office:value-type="string">
            <text:p text:style-name="P42" loext:marker-style-name="T85"><text:span text:style-name="T161">TCP</text:span><text:span text:style-name="T85"/></text:p>
          </table:table-cell>
        </table:table-row>
        <table:table-row table:style-name="表格80.1">
          <table:table-cell table:style-name="表格80.A2" office:value-type="string">
            <text:p text:style-name="P42" loext:marker-style-name="T85"><text:span text:style-name="T86">傳資料（</text:span><text:span text:style-name="T161">Slow Start → CA</text:span><text:span text:style-name="T86">）</text:span></text:p>
          </table:table-cell>
          <table:table-cell table:style-name="表格80.A2" office:value-type="string">
            <text:p text:style-name="P42" loext:marker-style-name="T85"><text:span text:style-name="T161">cwnd </text:span><text:span text:style-name="T86">慢慢加速，滑動視窗持續傳送</text:span></text:p>
          </table:table-cell>
          <table:table-cell table:style-name="表格80.A2" office:value-type="string">
            <text:p text:style-name="P42" loext:marker-style-name="T85"><text:span text:style-name="T161">TCP </text:span><text:span text:style-name="T86">擁塞控制</text:span></text:p>
          </table:table-cell>
        </table:table-row>
        <table:table-row table:style-name="表格80.1">
          <table:table-cell table:style-name="表格80.A3" office:value-type="string">
            <text:p text:style-name="P42" loext:marker-style-name="T85"><text:span text:style-name="T161">Google </text:span><text:span text:style-name="T86">回應</text:span></text:p>
          </table:table-cell>
          <table:table-cell table:style-name="表格80.A3" office:value-type="string">
            <text:p text:style-name="P42" loext:marker-style-name="T85"><text:span text:style-name="T86">資料送回你的電腦</text:span><text:span text:style-name="T85"/></text:p>
          </table:table-cell>
          <table:table-cell table:style-name="表格80.A3" office:value-type="string">
            <text:p text:style-name="P42" loext:marker-style-name="T85"><text:span text:style-name="T161">TCP + NAT</text:span><text:span text:style-name="T86">（回程換 </text:span><text:span text:style-name="T161">IP</text:span><text:span text:style-name="T86">）</text:span>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6"><text:span text:style-name="T222">⚡ <text:s/></text:span><text:span text:style-name="T227">層次關係</text:span></text:p>
            <text:p text:style-name="P7" loext:marker-style-name="T112"><text:span text:style-name="T177">ARP </text:span><text:span text:style-name="T111">在 </text:span><text:span text:style-name="T177">L2/L3 </text:span><text:span text:style-name="T111">交界處工作（找 </text:span><text:span text:style-name="T177">MAC</text:span><text:span text:style-name="T111">）；</text:span><text:span text:style-name="T177">NAT </text:span><text:span text:style-name="T111">在 </text:span><text:span text:style-name="T177">L3</text:span><text:span text:style-name="T111">（換 </text:span><text:span text:style-name="T177">IP</text:span><text:span text:style-name="T111">）；</text:span><text:span text:style-name="T177">TCP </text:span><text:span text:style-name="T111">在 </text:span><text:span text:style-name="T177">L4</text:span><text:span text:style-name="T111">（控制傳輸）。三者各司其職，合作完成一次上網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十、本篇一句話總結</text:span><text:span text:style-name="T27"/>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6"><text:span text:style-name="T222">🧠 <text:s/></text:span><text:span text:style-name="T281">考試直接用</text:span></text:p>
            <text:p text:style-name="P7" loext:marker-style-name="T112"><text:span text:style-name="T177">TCP </text:span><text:span text:style-name="T111">用三次握手建立連線，</text:span><text:span text:style-name="T135">用 </text:span><text:span text:style-name="T200">rwnd</text:span><text:span text:style-name="T135">（接收端）和 </text:span><text:span text:style-name="T200">cwnd</text:span><text:span text:style-name="T135">（網路）雙重限制控制傳送速度</text:span><text:span text:style-name="T111">，透過 </text:span><text:span text:style-name="T177">Slow Start </text:span><text:span text:style-name="T111">指數試探、</text:span><text:span text:style-name="T177">Congestion Avoidance </text:span><text:span text:style-name="T111">線性增長、丟包後快速降速，</text:span><text:span text:style-name="T396">持續用 </text:span><text:span text:style-name="T402">ACK </text:span><text:span text:style-name="T396">當回饋調節</text:span><text:span text:style-name="T111">，確保資料可靠且高效地傳達。</text:span></text:p>
          </table:table-cell>
        </table:table-row>
      </table:table>
      <text:h text:style-name="P32" text:outline-level="1" loext:marker-style-name="T73"><text:span text:style-name="T74">第 六 篇　</text:span><text:span text:style-name="T73">DNS </text:span><text:span text:style-name="T74">與 </text:span><text:span text:style-name="T73">DNSSEC</text:span>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6"><text:span text:style-name="T222">💡 <text:s/></text:span><text:span text:style-name="T65">DNS </text:span><text:span text:style-name="T53">是什麼？</text:span></text:p>
            <text:p text:style-name="P7" loext:marker-style-name="T112"><text:span text:style-name="T177">DNS </text:span><text:span text:style-name="T111">就像「網路電話簿」。人類習慣記名字（</text:span><text:span text:style-name="T177">google.com</text:span><text:span text:style-name="T111">），但電腦只認識號碼（</text:span><text:span text:style-name="T177">IP </text:span><text:span text:style-name="T111">位址），</text:span><text:span text:style-name="T177">DNS </text:span><text:span text:style-name="T111">的工作就是幫你查出對應的號碼。全名 </text:span><text:span text:style-name="T177">Domain Name System</text:span><text:span text:style-name="T111">，是負責將「網域名稱」轉換為「</text:span><text:span text:style-name="T177">IP </text:span><text:span text:style-name="T111">位址」的分散式系統。</text:span></text:p>
          </table:table-cell>
        </table:table-row>
      </table:table>
      <text:h text:style-name="P11" text:outline-level="2" loext:marker-style-name="T27"><text:span text:style-name="T28">一、</text:span><text:span text:style-name="T27">DNS </text:span><text:span text:style-name="T28">資源紀錄類型</text:span>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4" loext:marker-style-name="T71"><text:span text:style-name="T72">類型</text:span><text:span text:style-name="T71"/></text:p>
            </table:table-cell>
            <table:table-cell table:style-name="表格83.A1" office:value-type="string">
              <text:p text:style-name="P4" loext:marker-style-name="T71"><text:span text:style-name="T72">全名</text:span><text:span text:style-name="T71"/></text:p>
            </table:table-cell>
            <table:table-cell table:style-name="表格83.A1" office:value-type="string">
              <text:p text:style-name="P4" loext:marker-style-name="T71"><text:span text:style-name="T72">用途</text:span><text:span text:style-name="T71"/></text:p>
            </table:table-cell>
            <table:table-cell table:style-name="表格83.A1" office:value-type="string">
              <text:p text:style-name="P4" loext:marker-style-name="T71"><text:span text:style-name="T72">範例</text:span><text:span text:style-name="T71"/>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42" loext:marker-style-name="T98"><text:span text:style-name="T172">A</text:span><text:span text:style-name="T98"/></text:p>
          </table:table-cell>
          <table:table-cell table:style-name="表格83.A2" office:value-type="string">
            <text:p text:style-name="P42" loext:marker-style-name="T103"><text:span text:style-name="T169">Address Record</text:span><text:span text:style-name="T103"/></text:p>
          </table:table-cell>
          <table:table-cell table:style-name="表格83.A2" office:value-type="string">
            <text:p text:style-name="P42" loext:marker-style-name="T85"><text:span text:style-name="T86">網域名稱 → </text:span><text:span text:style-name="T446">IPv4 </text:span><text:span text:style-name="T420">位址</text:span></text:p>
          </table:table-cell>
          <table:table-cell table:style-name="表格83.A2" office:value-type="string">
            <text:p text:style-name="P42" loext:marker-style-name="T85"><text:span text:style-name="T161">google.com → 142.250.x.x</text:span><text:span text:style-name="T85"/></text:p>
          </table:table-cell>
        </table:table-row>
        <table:table-row table:style-name="表格83.1">
          <table:table-cell table:style-name="表格83.A3" office:value-type="string">
            <text:p text:style-name="P42" loext:marker-style-name="T98"><text:span text:style-name="T172">NS</text:span><text:span text:style-name="T98"/></text:p>
          </table:table-cell>
          <table:table-cell table:style-name="表格83.A3" office:value-type="string">
            <text:p text:style-name="P42" loext:marker-style-name="T103"><text:span text:style-name="T169">Name Server</text:span><text:span text:style-name="T103"/></text:p>
          </table:table-cell>
          <table:table-cell table:style-name="表格83.A3" office:value-type="string">
            <text:p text:style-name="P42" loext:marker-style-name="T85"><text:span text:style-name="T86">指定</text:span><text:span text:style-name="T306">管理該網域的 </text:span><text:span text:style-name="T161">DNS </text:span><text:span text:style-name="T86">伺服器</text:span></text:p>
          </table:table-cell>
          <table:table-cell table:style-name="表格83.A3" office:value-type="string">
            <text:p text:style-name="P42" loext:marker-style-name="T85"><text:span text:style-name="T161">google.com → ns1.google.com</text:span><text:span text:style-name="T85"/></text:p>
          </table:table-cell>
        </table:table-row>
        <table:table-row table:style-name="表格83.1">
          <table:table-cell table:style-name="表格83.A2" office:value-type="string">
            <text:p text:style-name="P42" loext:marker-style-name="T98"><text:span text:style-name="T172">MX</text:span><text:span text:style-name="T98"/></text:p>
          </table:table-cell>
          <table:table-cell table:style-name="表格83.A2" office:value-type="string">
            <text:p text:style-name="P42" loext:marker-style-name="T103"><text:span text:style-name="T169">Mail Exchange</text:span><text:span text:style-name="T103"/></text:p>
          </table:table-cell>
          <table:table-cell table:style-name="表格83.A2" office:value-type="string">
            <text:p text:style-name="P42" loext:marker-style-name="T85"><text:span text:style-name="T86">指定</text:span><text:span text:style-name="T631">負責收發郵件的</text:span><text:span text:style-name="T86">伺服器</text:span></text:p>
          </table:table-cell>
          <table:table-cell table:style-name="表格83.A2" office:value-type="string">
            <text:p text:style-name="P42" loext:marker-style-name="T85"><text:span text:style-name="T161">google.com → mail.google.com</text:span><text:span text:style-name="T85"/></text:p>
          </table:table-cell>
        </table:table-row>
        <table:table-row table:style-name="表格83.1">
          <table:table-cell table:style-name="表格83.A3" office:value-type="string">
            <text:p text:style-name="P42" loext:marker-style-name="T98"><text:span text:style-name="T172">CNAME</text:span><text:span text:style-name="T98"/></text:p>
          </table:table-cell>
          <table:table-cell table:style-name="表格83.A3" office:value-type="string">
            <text:p text:style-name="P42" loext:marker-style-name="T103"><text:span text:style-name="T169">Canonical Name</text:span><text:span text:style-name="T103"/></text:p>
          </table:table-cell>
          <table:table-cell table:style-name="表格83.A3" office:value-type="string">
            <text:p text:style-name="P42" loext:marker-style-name="T700"><text:span text:style-name="T698">設定網域別名，指向另一個網域</text:span><text:span text:style-name="T700"/></text:p>
          </table:table-cell>
          <table:table-cell table:style-name="表格83.A3" office:value-type="string">
            <text:p text:style-name="P42" loext:marker-style-name="T85"><text:span text:style-name="T161">www → google.com</text:span><text:span text:style-name="T85"/></text:p>
          </table:table-cell>
        </table:table-row>
      </table:table>
      <text:p text:style-name="P48" loext:marker-style-name="T6"><text:span text:style-name="T7">（</text:span><text:span text:style-name="T8">補充：</text:span><text:span text:style-name="T17">AAAA record → </text:span><text:span text:style-name="T8">回傳 </text:span><text:span text:style-name="T17">IPv6 </text:span><text:span text:style-name="T8">位址，見第三篇 </text:span><text:span text:style-name="T17">Dual Stack</text:span><text:span text:style-name="T8">。</text:span><text:span text:style-name="T7">）</text:span></text:p>
      <text:h text:style-name="P11" text:outline-level="2" loext:marker-style-name="T27"><text:span text:style-name="T28">二、</text:span><text:span text:style-name="T27">DNS </text:span><text:span text:style-name="T28">查詢流程（必考重點）</text:span>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6"><text:span text:style-name="T222">📚 <text:s/></text:span><text:span text:style-name="T53">圖書館找書比喻</text:span></text:p>
            <text:p text:style-name="P7" loext:marker-style-name="T112"><text:span text:style-name="T111">你要找一本書，書名叫「</text:span><text:span text:style-name="T177">google.com</text:span><text:span text:style-name="T111">」：</text:span></text:p>
            <text:p text:style-name="P8" loext:marker-style-name="T112"><text:span text:style-name="T177">① </text:span><text:span text:style-name="T111">先翻自己的筆記本（</text:span><text:span text:style-name="T177">Cache</text:span><text:span text:style-name="T111">）→ 記得放哪就直接去</text:span></text:p>
            <text:p text:style-name="P8" loext:marker-style-name="T112"><text:span text:style-name="T177">② </text:span><text:span text:style-name="T111">問圖書館員（</text:span><text:span text:style-name="T177">Local DNS</text:span><text:span text:style-name="T111">）→「你知道這本書嗎？」</text:span></text:p>
            <text:p text:style-name="P8" loext:marker-style-name="T112"><text:span text:style-name="T177">③ </text:span><text:span text:style-name="T111">館員問館長（</text:span><text:span text:style-name="T177">Root DNS</text:span><text:span text:style-name="T111">）→「這本是哪個分類？」→「外文區」</text:span></text:p>
            <text:p text:style-name="P8" loext:marker-style-name="T112"><text:span text:style-name="T177">④ </text:span><text:span text:style-name="T111">去外文區管理員（</text:span><text:span text:style-name="T177">TLD</text:span><text:span text:style-name="T111">：</text:span><text:span text:style-name="T177">.com</text:span><text:span text:style-name="T111">）→「</text:span><text:span text:style-name="T177">google </text:span><text:span text:style-name="T111">在哪個書架？」</text:span></text:p>
            <text:p text:style-name="P8" loext:marker-style-name="T112"><text:span text:style-name="T177">⑤ </text:span><text:span text:style-name="T111">書架管理員（</text:span><text:span text:style-name="T177">Authoritative DNS</text:span><text:span text:style-name="T111">）→ 直接給你確切位置（</text:span><text:span text:style-name="T177">IP</text:span><text:span text:style-name="T111">）✓</text:span>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39" loext:marker-style-name="T77"><text:span text:style-name="T78">步驟</text:span><text:span text:style-name="T77"/></text:p>
          </table:table-cell>
          <table:table-cell table:style-name="表格84.A2" office:value-type="string">
            <text:p text:style-name="P39" loext:marker-style-name="T77"><text:span text:style-name="T78">層級</text:span><text:span text:style-name="T77"/></text:p>
          </table:table-cell>
          <table:table-cell table:style-name="表格84.A2" office:value-type="string">
            <text:p text:style-name="P39" loext:marker-style-name="T77"><text:span text:style-name="T78">說明</text:span><text:span text:style-name="T77"/></text:p>
          </table:table-cell>
        </table:table-row>
        <table:table-row table:style-name="表格84.1">
          <table:table-cell table:style-name="表格84.A3" office:value-type="string">
            <text:p text:style-name="P42" loext:marker-style-name="T149"><text:span text:style-name="T212">1</text:span><text:span text:style-name="T149"/></text:p>
          </table:table-cell>
          <table:table-cell table:style-name="表格84.A3" office:value-type="string">
            <text:p text:style-name="P42" loext:marker-style-name="T508"><text:span text:style-name="T507">本機快取（</text:span><text:span text:style-name="T547">Cache</text:span><text:span text:style-name="T507">）</text:span></text:p>
          </table:table-cell>
          <table:table-cell table:style-name="表格84.A3" office:value-type="string">
            <text:p text:style-name="P42" loext:marker-style-name="T666"><text:span text:style-name="T665">先檢查電腦或瀏覽器有無記住此網址的 </text:span><text:span text:style-name="T671">IP</text:span><text:span text:style-name="T665">。有→直接用；沒有→下一步。</text:span></text:p>
          </table:table-cell>
        </table:table-row>
        <table:table-row table:style-name="表格84.1">
          <table:table-cell table:style-name="表格84.A4" office:value-type="string">
            <text:p text:style-name="P42" loext:marker-style-name="T149"><text:span text:style-name="T212">2</text:span><text:span text:style-name="T149"/></text:p>
          </table:table-cell>
          <table:table-cell table:style-name="表格84.A4" office:value-type="string">
            <text:p text:style-name="P42" loext:marker-style-name="T310"><text:span text:style-name="T360">Local DNS </text:span><text:span text:style-name="T309">伺服器</text:span></text:p>
          </table:table-cell>
          <table:table-cell table:style-name="表格84.A4" office:value-type="string">
            <text:p text:style-name="P42" loext:marker-style-name="T149"><text:span text:style-name="T150">向 </text:span><text:span text:style-name="T214">ISP</text:span><text:span text:style-name="T151">（如中華電信）</text:span><text:span text:style-name="T150">或</text:span><text:span text:style-name="T151">自設 </text:span><text:span text:style-name="T214">DNS</text:span><text:span text:style-name="T151">（如 </text:span><text:span text:style-name="T214">8.8.8.8</text:span><text:span text:style-name="T151">）</text:span><text:span text:style-name="T150">查詢。</text:span></text:p>
          </table:table-cell>
        </table:table-row>
        <table:table-row table:style-name="表格84.1">
          <table:table-cell table:style-name="表格84.A3" office:value-type="string">
            <text:p text:style-name="P42" loext:marker-style-name="T149"><text:span text:style-name="T212">3</text:span><text:span text:style-name="T149"/></text:p>
          </table:table-cell>
          <table:table-cell table:style-name="表格84.A3" office:value-type="string">
            <text:p text:style-name="P42" loext:marker-style-name="T625"><text:span text:style-name="T640">Root DNS </text:span><text:span text:style-name="T624">伺服器</text:span></text:p>
          </table:table-cell>
          <table:table-cell table:style-name="表格84.A3" office:value-type="string">
            <text:p text:style-name="P42" loext:marker-style-name="T149"><text:span text:style-name="T590">全球共 </text:span><text:span text:style-name="T609">13 </text:span><text:span text:style-name="T590">組根 </text:span><text:span text:style-name="T609">DNS</text:span><text:span text:style-name="T150">。不知道答案，但</text:span><text:span text:style-name="T153">會指向對應的 </text:span><text:span text:style-name="T215">TLD DNS</text:span><text:span text:style-name="T150">。</text:span></text:p>
          </table:table-cell>
        </table:table-row>
        <table:table-row table:style-name="表格84.1">
          <table:table-cell table:style-name="表格84.A4" office:value-type="string">
            <text:p text:style-name="P42" loext:marker-style-name="T149"><text:span text:style-name="T212">4</text:span><text:span text:style-name="T149"/></text:p>
          </table:table-cell>
          <table:table-cell table:style-name="表格84.A4" office:value-type="string">
            <text:p text:style-name="P42" loext:marker-style-name="T426"><text:span text:style-name="T449">TLD DNS </text:span><text:span text:style-name="T425">伺服器</text:span></text:p>
          </table:table-cell>
          <table:table-cell table:style-name="表格84.A4" office:value-type="string">
            <text:p text:style-name="P42" loext:marker-style-name="T149"><text:span text:style-name="T150">負責</text:span><text:span text:style-name="T701">管理頂層網域（</text:span><text:span text:style-name="T704">.com</text:span><text:span text:style-name="T701">、</text:span><text:span text:style-name="T704">.tw</text:span><text:span text:style-name="T701">）</text:span><text:span text:style-name="T150">。</text:span><text:span text:style-name="T153">回應 </text:span><text:span text:style-name="T215">Authoritative DNS </text:span><text:span text:style-name="T153">的位置。</text:span><text:span text:style-name="T308">「</text:span><text:span text:style-name="T361">TLD </text:span><text:span text:style-name="T308">是 </text:span><text:span text:style-name="T361">Top-Level Domain</text:span><text:span text:style-name="T308">（頂級網域）」</text:span></text:p>
          </table:table-cell>
        </table:table-row>
        <table:table-row table:style-name="表格84.1">
          <table:table-cell table:style-name="表格84.A3" office:value-type="string">
            <text:p text:style-name="P42" loext:marker-style-name="T149"><text:span text:style-name="T212">5</text:span><text:span text:style-name="T149"/></text:p>
          </table:table-cell>
          <table:table-cell table:style-name="表格84.A3" office:value-type="string">
            <text:p text:style-name="P42" loext:marker-style-name="T681"><text:span text:style-name="T687">Authoritative DNS</text:span><text:span text:style-name="T681"/></text:p>
          </table:table-cell>
          <table:table-cell table:style-name="表格84.A3" office:value-type="string">
            <text:p text:style-name="P42" loext:marker-style-name="T149"><text:span text:style-name="T151">真正儲存答案的伺服器</text:span><text:span text:style-name="T150">，直接回傳正確的 </text:span><text:span text:style-name="T212">IP </text:span><text:span text:style-name="T150">位址。</text:span></text:p>
          </table:table-cell>
        </table:table-row>
        <table:table-row table:style-name="表格84.1">
          <table:table-cell table:style-name="表格84.A4" office:value-type="string">
            <text:p text:style-name="P42" loext:marker-style-name="T149"><text:span text:style-name="T212">6</text:span><text:span text:style-name="T149"/></text:p>
          </table:table-cell>
          <table:table-cell table:style-name="表格84.A4" office:value-type="string">
            <text:p text:style-name="P42" loext:marker-style-name="T149"><text:span text:style-name="T150">回傳 </text:span><text:span text:style-name="T212">IP </text:span><text:span text:style-name="T150">位址 ✓</text:span></text:p>
          </table:table-cell>
          <table:table-cell table:style-name="表格84.A4" office:value-type="string">
            <text:p text:style-name="P42" loext:marker-style-name="T149"><text:span text:style-name="T150">瀏覽器取得 </text:span><text:span text:style-name="T212">IP </text:span><text:span text:style-name="T150">開始連線，結果存入快取，下次更快。</text:span>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6"><text:span text:style-name="T222">📌 <text:s/></text:span><text:span text:style-name="T281">一句話總結</text:span></text:p>
            <text:p text:style-name="P7" loext:marker-style-name="T112"><text:span text:style-name="T177">DNS </text:span><text:span text:style-name="T111">解析為「由快取開始，經 </text:span><text:span text:style-name="T177">Local DNS</text:span><text:span text:style-name="T111">，逐層向 </text:span><text:span text:style-name="T177">Root</text:span><text:span text:style-name="T111">、</text:span><text:span text:style-name="T177">TLD</text:span><text:span text:style-name="T111">、</text:span><text:span text:style-name="T177">Authoritative DNS </text:span><text:span text:style-name="T111">查詢，最後取得 </text:span><text:span text:style-name="T177">IP </text:span><text:span text:style-name="T111">位址」。</text:span></text:p>
          </table:table-cell>
          <table:covered-table-cell/>
          <table:covered-table-cell/>
        </table:table-row>
      </table:table>
      <text:h text:style-name="P11" text:outline-level="2" loext:marker-style-name="T27"><text:soft-page-break/><text:span text:style-name="T28">三、</text:span><text:span text:style-name="T27">Recursive vs. Iterative</text:span><text:span text:style-name="T28">（超常考）</text:span>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6"><text:span text:style-name="T222">⚠️ <text:s/></text:span><text:span text:style-name="T247">最關鍵的差別</text:span></text:p>
            <text:p text:style-name="P7" loext:marker-style-name="T112"><text:span text:style-name="T135">兩種方式的路徑相同</text:span><text:span text:style-name="T111">（</text:span><text:span text:style-name="T177">Cache → Local → Root → TLD → Auth</text:span><text:span text:style-name="T111">），</text:span><text:span text:style-name="T372">唯一差別只有一件事：「誰去問」</text:span><text:span text:style-name="T111">。</text:span></text:p>
            <text:p text:style-name="P8" loext:marker-style-name="T112"><text:span text:style-name="T177">→ </text:span><text:span text:style-name="T350">DNS </text:span><text:span text:style-name="T323">幫你問完 ＝ </text:span><text:span text:style-name="T350">Recursive</text:span><text:span text:style-name="T323">（遞迴）</text:span><text:span text:style-name="T111">；</text:span><text:span text:style-name="T437">你自己去問 ＝ </text:span><text:span text:style-name="T458">Iterative</text:span><text:span text:style-name="T437">（反覆）</text:span><text:span text:style-name="T111">。</text:span>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4" loext:marker-style-name="T71"><text:span text:style-name="T72">比較項目</text:span><text:span text:style-name="T71"/></text:p>
          </table:table-cell>
          <table:table-cell table:style-name="表格85.A2" office:value-type="string">
            <text:p text:style-name="P4" loext:marker-style-name="T71"><text:span text:style-name="T81">Recursive</text:span><text:span text:style-name="T72">（遞迴）</text:span></text:p>
          </table:table-cell>
          <table:table-cell table:style-name="表格85.A2" office:value-type="string">
            <text:p text:style-name="P4" loext:marker-style-name="T71"><text:span text:style-name="T81">Iterative</text:span><text:span text:style-name="T72">（反覆）</text:span></text:p>
          </table:table-cell>
        </table:table-row>
        <table:table-row table:style-name="表格85.1">
          <table:table-cell table:style-name="表格85.A3" office:value-type="string">
            <text:p text:style-name="P42" loext:marker-style-name="T85"><text:span text:style-name="T86">誰去問</text:span><text:span text:style-name="T85"/></text:p>
          </table:table-cell>
          <table:table-cell table:style-name="表格85.A3" office:value-type="string">
            <text:p text:style-name="P42" loext:marker-style-name="T103"><text:span text:style-name="T169">DNS </text:span><text:span text:style-name="T101">伺服器代替你問完</text:span></text:p>
          </table:table-cell>
          <table:table-cell table:style-name="表格85.A3" office:value-type="string">
            <text:p text:style-name="P42" loext:marker-style-name="T98"><text:span text:style-name="T96">你自己逐層查詢</text:span><text:span text:style-name="T98"/></text:p>
          </table:table-cell>
        </table:table-row>
        <table:table-row table:style-name="表格85.1">
          <table:table-cell table:style-name="表格85.A4" office:value-type="string">
            <text:p text:style-name="P42" loext:marker-style-name="T85"><text:span text:style-name="T86">問幾次</text:span><text:span text:style-name="T85"/></text:p>
          </table:table-cell>
          <table:table-cell table:style-name="表格85.A4" office:value-type="string">
            <text:p text:style-name="P42" loext:marker-style-name="T103"><text:span text:style-name="T101">你只問 </text:span><text:span text:style-name="T169">1 </text:span><text:span text:style-name="T101">次</text:span></text:p>
          </table:table-cell>
          <table:table-cell table:style-name="表格85.A4" office:value-type="string">
            <text:p text:style-name="P42" loext:marker-style-name="T98"><text:span text:style-name="T96">每層各問一次，共多次</text:span><text:span text:style-name="T98"/></text:p>
          </table:table-cell>
        </table:table-row>
        <table:table-row table:style-name="表格85.1">
          <table:table-cell table:style-name="表格85.A3" office:value-type="string">
            <text:p text:style-name="P42" loext:marker-style-name="T85"><text:span text:style-name="T86">常見場合</text:span><text:span text:style-name="T85"/></text:p>
          </table:table-cell>
          <table:table-cell table:style-name="表格85.A3" office:value-type="string">
            <text:p text:style-name="P42" loext:marker-style-name="T85"><text:span text:style-name="T86">一般使用者 → </text:span><text:span text:style-name="T161">Local DNS</text:span></text:p>
          </table:table-cell>
          <table:table-cell table:style-name="表格85.A3" office:value-type="string">
            <text:p text:style-name="P42" loext:marker-style-name="T85"><text:span text:style-name="T161">DNS </text:span><text:span text:style-name="T86">伺服器之間互相查詢</text:span></text:p>
          </table:table-cell>
        </table:table-row>
        <table:table-row table:style-name="表格85.1">
          <table:table-cell table:style-name="表格85.A4" office:value-type="string">
            <text:p text:style-name="P42" loext:marker-style-name="T85"><text:span text:style-name="T86">記憶口訣</text:span><text:span text:style-name="T85"/></text:p>
          </table:table-cell>
          <table:table-cell table:style-name="表格85.A4" office:value-type="string">
            <text:p text:style-name="P42" loext:marker-style-name="T235"><text:span text:style-name="T236">代查到底</text:span><text:span text:style-name="T235"/></text:p>
          </table:table-cell>
          <table:table-cell table:style-name="表格85.A4" office:value-type="string">
            <text:p text:style-name="P42" loext:marker-style-name="T36"><text:span text:style-name="T37">逐層詢問</text:span><text:span text:style-name="T36"/>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6"><text:span text:style-name="T222">🗣️ <text:s/></text:span><text:span text:style-name="T53">問路比喻</text:span></text:p>
            <text:p text:style-name="P7"><text:span text:style-name="T68">Recursive</text:span><text:span text:style-name="T59">（朋友幫你問完）</text:span><text:span text:style-name="T58">：</text:span><text:span text:style-name="T133">你只問朋友（</text:span><text:span text:style-name="T198">Local DNS</text:span><text:span text:style-name="T133">）一次</text:span><text:span text:style-name="T111">「台北</text:span><text:span text:style-name="T177">101</text:span><text:span text:style-name="T111">在哪？」朋友自己跑完 </text:span><text:span text:style-name="T177">Root→TLD→Auth</text:span><text:span text:style-name="T111">，回你 </text:span><text:span text:style-name="T177">IP</text:span><text:span text:style-name="T111">，你沒動過。</text:span></text:p>
            <text:p text:style-name="P8"><text:span text:style-name="T68">Iterative</text:span><text:span text:style-name="T59">（你自己跑全程）</text:span><text:span text:style-name="T58">：</text:span><text:span text:style-name="T111">你問 </text:span><text:span text:style-name="T177">Root</text:span><text:span text:style-name="T111">「我不知道，去問 </text:span><text:span text:style-name="T177">TLD</text:span><text:span text:style-name="T111">」→ 你問 </text:span><text:span text:style-name="T177">TLD</text:span><text:span text:style-name="T111">「去問 </text:span><text:span text:style-name="T177">Auth</text:span><text:span text:style-name="T111">」→ 你問 </text:span><text:span text:style-name="T177">Auth </text:span><text:span text:style-name="T111">拿到 </text:span><text:span text:style-name="T177">IP</text:span><text:span text:style-name="T111">，全程你自己跑。</text:span></text:p>
            <text:p text:style-name="P8"><text:span text:style-name="T24">為什麼有兩種？</text:span><text:span text:style-name="T325">一般使用者採 </text:span><text:span text:style-name="T352">Recursive</text:span><text:span text:style-name="T325">（簡單方便）</text:span><text:span text:style-name="T111">；</text:span><text:span text:style-name="T460">DNS </text:span><text:span text:style-name="T439">伺服器之間採 </text:span><text:span text:style-name="T460">Iterative</text:span><text:span text:style-name="T111">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四、</text:span><text:span text:style-name="T27">Open Resolver </text:span><text:span text:style-name="T28">風險</text:span></text:h>
      <text:p text:style-name="P48" loext:marker-style-name="T112"><text:span text:style-name="T200">Open Resolver </text:span><text:span text:style-name="T111">是</text:span><text:span text:style-name="T663">對外完全開放、任何人都可以使用的 </text:span><text:span text:style-name="T669">DNS </text:span><text:span text:style-name="T663">伺服器</text:span><text:span text:style-name="T111">；因為</text:span><text:span text:style-name="T133">沒有存取限制，容易成為攻擊目標</text:span><text:span text:style-name="T111">。</text:span>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39" loext:marker-style-name="T71"><text:span text:style-name="T81">⚠️ Cache Poisoning</text:span><text:span text:style-name="T72">（快取污染）</text:span></text:p>
            </table:table-cell>
            <table:table-cell table:style-name="表格86.A1" office:value-type="string">
              <text:p text:style-name="P39" loext:marker-style-name="T71"><text:span text:style-name="T81">⚡ DDoS </text:span><text:span text:style-name="T72">放大攻擊（反射攻擊）</text:span>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42" loext:marker-style-name="T85"><text:span text:style-name="T520">攻擊者偽造 </text:span><text:span text:style-name="T539">DNS </text:span><text:span text:style-name="T520">回應</text:span><text:span text:style-name="T86">，</text:span><text:span text:style-name="T367">將惡意 </text:span><text:span text:style-name="T380">IP </text:span><text:span text:style-name="T367">植入 </text:span><text:span text:style-name="T380">DNS </text:span><text:span text:style-name="T367">快取，使用者被引導至釣魚網站</text:span><text:span text:style-name="T86">。流程：偽造回應 → </text:span><text:span text:style-name="T161">DNS </text:span><text:span text:style-name="T86">存假 </text:span><text:span text:style-name="T161">IP → </text:span><text:span text:style-name="T86">用戶連到釣魚網站。</text:span></text:p>
          </table:table-cell>
          <table:table-cell table:style-name="表格86.A2" office:value-type="string">
            <text:p text:style-name="P42" loext:marker-style-name="T85"><text:span text:style-name="T584">攻擊者偽造受害者 </text:span><text:span text:style-name="T606">IP </text:span><text:span text:style-name="T387">發送查詢</text:span><text:span text:style-name="T86">，</text:span><text:span text:style-name="T380">DNS </text:span><text:span text:style-name="T367">回傳大量資料給受害者，形成流量放大效果</text:span><text:span text:style-name="T86">。流程：小封包 → </text:span><text:span text:style-name="T161">DNS </text:span><text:span text:style-name="T86">回超大資料 → 灌爆受害者。</text:span></text:p>
          </table:table-cell>
        </table:table-row>
      </table:table>
      <text:h text:style-name="P11" text:outline-level="2" loext:marker-style-name="T27"><text:span text:style-name="T28">五、</text:span><text:span text:style-name="T27">DNSSEC — DNS </text:span><text:span text:style-name="T28">安全機制</text:span></text:h>
      <text:p text:style-name="P48" loext:marker-style-name="T112"><text:span text:style-name="T177">DNSSEC</text:span><text:span text:style-name="T111">（</text:span><text:span text:style-name="T177">DNS Security Extensions</text:span><text:span text:style-name="T111">）透過</text:span><text:span text:style-name="T530">數位簽章機制</text:span><text:span text:style-name="T111">，</text:span><text:span text:style-name="T472">讓接收方能驗證 </text:span><text:span text:style-name="T487">DNS </text:span><text:span text:style-name="T472">回應的真實性與完整性</text:span><text:span text:style-name="T111">，</text:span><text:span text:style-name="T135">防止資料被偽造或篡改</text:span><text:span text:style-name="T111">。</text:span>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39" loext:marker-style-name="T71"><text:span text:style-name="T81">✅ DNSSEC </text:span><text:span text:style-name="T72">可以防禦</text:span></text:p>
            </table:table-cell>
            <table:table-cell table:style-name="表格87.A1" office:value-type="string">
              <text:p text:style-name="P39" loext:marker-style-name="T71"><text:span text:style-name="T81">❌ DNSSEC </text:span><text:span text:style-name="T72">無法防禦</text:span>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42" loext:marker-style-name="T85"><text:span text:style-name="T86">防止 </text:span><text:span text:style-name="T161">DNS Spoofing</text:span><text:span text:style-name="T86">（假回應）／防止 </text:span><text:span text:style-name="T161">Cache Poisoning</text:span><text:span text:style-name="T86">（快取污染）／</text:span><text:span text:style-name="T521">驗證資料完整性與來源真實性</text:span></text:p>
          </table:table-cell>
          <table:table-cell table:style-name="表格87.A2" office:value-type="string">
            <text:p text:style-name="P42" loext:marker-style-name="T85"><text:span text:style-name="T86">不提供加密功能（非 </text:span><text:span text:style-name="T161">HTTPS</text:span><text:span text:style-name="T86">）／</text:span><text:span text:style-name="T306">無法防禦 </text:span><text:span text:style-name="T342">DoS / DDoS </text:span><text:span text:style-name="T306">攻擊</text:span><text:span text:style-name="T86">／無法保護隱私</text:span>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6"><text:span text:style-name="T222">⚠️ <text:s/></text:span><text:span text:style-name="T281">最重要的一句話</text:span></text:p>
            <text:p text:style-name="P7" loext:marker-style-name="T285"><text:span text:style-name="T289">DNSSEC</text:span><text:span text:style-name="T288"> = </text:span><text:span text:style-name="T286">驗證真偽，不是加密，不防 </text:span><text:span text:style-name="T290">DDoS</text:span></text:p>
          </table:table-cell>
          <table:covered-table-cell/>
        </table:table-row>
      </table:table>
      <text:h text:style-name="P11" text:outline-level="2" loext:marker-style-name="T27"><text:span text:style-name="T28">六、</text:span><text:span text:style-name="T27">DNS </text:span><text:span text:style-name="T28">故障排查與申論標準答案</text:span>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6"><text:span text:style-name="T222">🔍 <text:s/></text:span><text:span text:style-name="T53">診斷結論</text:span></text:p>
            <text:p text:style-name="P7" loext:marker-style-name="T112"><text:span text:style-name="T111">能用 </text:span><text:span text:style-name="T177">IP </text:span><text:span text:style-name="T111">連線（</text:span><text:span text:style-name="T177">ping 142.250.1.1 </text:span><text:span text:style-name="T111">成功），但無法用網域名稱連線（</text:span><text:span text:style-name="T177">ping google.com </text:span><text:span text:style-name="T111">失敗）→ </text:span><text:span text:style-name="T177">DNS </text:span><text:span text:style-name="T111">解析失敗，與網路連線本身無關。</text:span></text:p>
          </table:table-cell>
        </table:table-row>
        <text:soft-page-break/>
        <table:table-row table:style-name="表格88.1">
          <table:table-cell table:style-name="表格88.A2" office:value-type="string">
            <text:p text:style-name="P6"><text:span text:style-name="T222">📝 <text:s/></text:span><text:span text:style-name="T267">申論題標準答案</text:span></text:p>
            <text:p text:style-name="P7"><text:span text:style-name="T270">一、</text:span><text:span text:style-name="T274">DNS </text:span><text:span text:style-name="T270">功能：</text:span><text:span text:style-name="T177">DNS </text:span><text:span text:style-name="T111">為網際網路中負責</text:span><text:span text:style-name="T322">將網域名稱轉換為 </text:span><text:span text:style-name="T349">IP </text:span><text:span text:style-name="T322">位址</text:span><text:span text:style-name="T111">的分散式系統。</text:span></text:p>
            <text:p text:style-name="P8"><text:span text:style-name="T270">二、查詢流程：</text:span><text:span text:style-name="T111">由</text:span><text:span text:style-name="T135">快取</text:span><text:span text:style-name="T111">開始，依序向 </text:span><text:span text:style-name="T200">Local DNS</text:span><text:span text:style-name="T111">、</text:span><text:span text:style-name="T200">Root DNS</text:span><text:span text:style-name="T111">、</text:span><text:span text:style-name="T200">TLD DNS</text:span><text:span text:style-name="T111">、</text:span><text:span text:style-name="T200">Authoritative DN</text:span><text:span text:style-name="T177">S </text:span><text:span text:style-name="T111">查詢，最終取得 </text:span><text:span text:style-name="T177">IP </text:span><text:span text:style-name="T111">位址。</text:span></text:p>
            <text:p text:style-name="P8"><text:span text:style-name="T270">三、</text:span><text:span text:style-name="T274">Recursive</text:span><text:span text:style-name="T270">：</text:span><text:span text:style-name="T111">由 </text:span><text:span text:style-name="T177">DNS </text:span><text:span text:style-name="T111">伺服器代替用戶端完整查詢並直接回傳最終 </text:span><text:span text:style-name="T177">IP</text:span><text:span text:style-name="T111">，用戶端只需等待結果。</text:span></text:p>
            <text:p text:style-name="P8"><text:span text:style-name="T270">四、</text:span><text:span text:style-name="T274">Iterative</text:span><text:span text:style-name="T270">：</text:span><text:span text:style-name="T177">DNS </text:span><text:span text:style-name="T111">伺服器僅回應下一步查詢位置，由用戶端自行逐層向各 </text:span><text:span text:style-name="T177">DNS </text:span><text:span text:style-name="T111">查詢，直到取得 </text:span><text:span text:style-name="T177">IP</text:span><text:span text:style-name="T111">。</text:span></text:p>
            <text:p text:style-name="P8"><text:span text:style-name="T270">五、</text:span><text:span text:style-name="T274">DNSSEC</text:span><text:span text:style-name="T270">：</text:span><text:span text:style-name="T111">透過</text:span><text:span text:style-name="T135">數位簽章</text:span><text:span text:style-name="T707">驗證 </text:span><text:span text:style-name="T708">DNS </text:span><text:span text:style-name="T707">回應真實性</text:span><text:span text:style-name="T111">，可防 </text:span><text:span text:style-name="T177">DNS Spoofing </text:span><text:span text:style-name="T111">及 </text:span><text:span text:style-name="T177">Cache Poisoning</text:span><text:span text:style-name="T111">，但不提供加密，也</text:span><text:span text:style-name="T326">無法防禦 </text:span><text:span text:style-name="T353">DDoS</text:span><text:span text:style-name="T111">。</text:span></text:p>
          </table:table-cell>
        </table:table-row>
      </table:table>
      <text:h text:style-name="P32" text:outline-level="1" loext:marker-style-name="T73"><text:span text:style-name="T74">第 七 篇　路由協定：</text:span><text:span text:style-name="T73">OSPF </text:span><text:span text:style-name="T74">與 </text:span><text:span text:style-name="T73">BGP</text:span>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6"><text:span text:style-name="T222">🗺️ <text:s/></text:span><text:span text:style-name="T53">在解決什麼問題？</text:span></text:p>
            <text:p text:style-name="P7" loext:marker-style-name="T112"><text:span text:style-name="T111">網路上有無數個</text:span><text:span text:style-name="T135">路由器（</text:span><text:span text:style-name="T200">Router</text:span><text:span text:style-name="T135">）</text:span><text:span text:style-name="T111">，它們只有一個任務：「</text:span><text:span text:style-name="T317">資料要走哪條路才能抵達目的地？</text:span><text:span text:style-name="T111">」</text:span><text:span text:style-name="T372">它們需要一套共通的對話規則，這就是路由協定</text:span><text:span text:style-name="T111">。</text:span></text:p>
          </table:table-cell>
        </table:table-row>
      </table:table>
      <text:h text:style-name="P11" text:outline-level="2" loext:marker-style-name="T27"><text:span text:style-name="T28">一、路由協定兩大分類：</text:span><text:span text:style-name="T30">IGP</text:span><text:span text:style-name="T27"> vs </text:span><text:span text:style-name="T30">EGP</text:span>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39" loext:marker-style-name="T71"><text:span text:style-name="T81">🏢 IGP — </text:span><text:span text:style-name="T72">內部用</text:span></text:p>
            </table:table-cell>
            <table:table-cell table:style-name="表格90.A1" office:value-type="string">
              <text:p text:style-name="P39" loext:marker-style-name="T71"><text:span text:style-name="T81">🌍 EGP — </text:span><text:span text:style-name="T72">外部用</text:span>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42" loext:marker-style-name="T85"><text:span text:style-name="T169">Interior Gateway Protocol</text:span><text:span text:style-name="T86">，在</text:span><text:span text:style-name="T420">同一個組織內部使用</text:span><text:span text:style-name="T86">（公司內網、校園網路）。常見：</text:span><text:span text:style-name="T161">OSPF</text:span><text:span text:style-name="T86">（最主流）、</text:span><text:span text:style-name="T161">RIP</text:span><text:span text:style-name="T86">（較舊）。</text:span></text:p>
          </table:table-cell>
          <table:table-cell table:style-name="表格90.A2" office:value-type="string">
            <text:p text:style-name="P42" loext:marker-style-name="T85"><text:span text:style-name="T169">Exterior Gateway Protocol</text:span><text:span text:style-name="T86">，</text:span><text:span text:style-name="T306">在不同組織之間使用</text:span><text:span text:style-name="T86">（中華電信 ↔ </text:span><text:span text:style-name="T161">Google</text:span><text:span text:style-name="T86">、</text:span><text:span text:style-name="T161">ISP ↔ ISP</text:span><text:span text:style-name="T86">）。目前唯一在用：</text:span><text:span text:style-name="T161">BGP</text:span><text:span text:style-name="T86">（現代標準）。</text:span>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6"><text:span text:style-name="T222">⚡ <text:s/></text:span><text:span text:style-name="T227">一句話記憶法</text:span></text:p>
            <text:p text:style-name="P7" loext:marker-style-name="T112"><text:span text:style-name="T575">公司／校園內 → 用 </text:span><text:span text:style-name="T598">IGP</text:span><text:span text:style-name="T111">（</text:span><text:span text:style-name="T343">OSPF</text:span><text:span text:style-name="T177"> </text:span><text:span text:style-name="T111">或 </text:span><text:span text:style-name="T177">RIP</text:span><text:span text:style-name="T111">）；</text:span><text:span text:style-name="T576">公司與公司間 → 用 </text:span><text:span text:style-name="T599">EGP</text:span><text:span text:style-name="T111">（</text:span><text:span text:style-name="T343">BGP</text:span><text:span text:style-name="T111">）。</text:span></text:p>
          </table:table-cell>
          <table:covered-table-cell/>
        </table:table-row>
      </table:table>
      <text:h text:style-name="P11" text:outline-level="2" loext:marker-style-name="T27"><text:span text:style-name="T28">二、</text:span><text:span text:style-name="T27">OSPF </text:span><text:span text:style-name="T28">的核心概念</text:span></text:h>
      <text:p text:style-name="P48" loext:marker-style-name="T112"><text:span text:style-name="T343">OSPF</text:span><text:span text:style-name="T317">（</text:span><text:span text:style-name="T343">Open Shortest Path First</text:span><text:span text:style-name="T317">）</text:span><text:span text:style-name="T111">是 </text:span><text:span text:style-name="T200">IGP </text:span><text:span text:style-name="T135">裡最主流的協定</text:span><text:span text:style-name="T111">，最大特色是</text:span><text:span text:style-name="T531">把網路切成多個區域（</text:span><text:span text:style-name="T546">Area</text:span><text:span text:style-name="T531">）管理</text:span><text:span text:style-name="T111">。</text:span>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6"><text:span text:style-name="T222">📌 <text:s/></text:span><text:span text:style-name="T281">最重要的規定</text:span></text:p>
            <text:p text:style-name="P7" loext:marker-style-name="T112"><text:span text:style-name="T439">所有 </text:span><text:span text:style-name="T460">Area </text:span><text:span text:style-name="T439">都必須連到 </text:span><text:span text:style-name="T460">Area 0</text:span><text:span text:style-name="T439">（骨幹區域）</text:span><text:span text:style-name="T111">。</text:span><text:span text:style-name="T600">Area 0 </text:span><text:span text:style-name="T577">就像高速公路主幹道，其他 </text:span><text:span text:style-name="T600">Area </text:span><text:span text:style-name="T577">是交流道</text:span><text:span text:style-name="T111">。</text:span></text:p>
          </table:table-cell>
        </table:table-row>
      </table:table>
      <text:h text:style-name="P11" text:outline-level="2" loext:marker-style-name="T27"><text:span text:style-name="T28">三、</text:span><text:span text:style-name="T27">OSPF </text:span><text:span text:style-name="T28">的 </text:span><text:span text:style-name="T27">4 </text:span><text:span text:style-name="T28">種 </text:span><text:span text:style-name="T27">Router</text:span><text:span text:style-name="T28">（重點！）</text:span></text:h>
      <text:p text:style-name="P48" loext:marker-style-name="T112"><text:span text:style-name="T111">把整個 </text:span><text:span text:style-name="T177">OSPF </text:span><text:span text:style-name="T111">網路想像成一座城市：</text:span><text:span text:style-name="T135">城市裡有很多「區（</text:span><text:span text:style-name="T200">Area</text:span><text:span text:style-name="T135">）」像大樓</text:span><text:span text:style-name="T111">；</text:span><text:span text:style-name="T709">中間一定有「主幹道」就是 </text:span><text:span text:style-name="T710">Area 0</text:span><text:span text:style-name="T709">；所有大樓要互通都必須先連到 </text:span><text:span text:style-name="T710">Area 0</text:span><text:span text:style-name="T111">。</text:span>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4" loext:marker-style-name="T77"><text:span text:style-name="T78">類型</text:span><text:span text:style-name="T77"/></text:p>
            </table:table-cell>
            <table:table-cell table:style-name="表格92.A1" office:value-type="string">
              <text:p text:style-name="P4" loext:marker-style-name="T77"><text:span text:style-name="T78">本質</text:span><text:span text:style-name="T77"/></text:p>
            </table:table-cell>
            <table:table-cell table:style-name="表格92.A1" office:value-type="string">
              <text:p text:style-name="P4" loext:marker-style-name="T77"><text:span text:style-name="T78">核心記憶點</text:span><text:span text:style-name="T77"/></text:p>
            </table:table-cell>
            <table:table-cell table:style-name="表格92.A1" office:value-type="string">
              <text:p text:style-name="P4" loext:marker-style-name="T77"><text:span text:style-name="T78">比喻</text:span><text:span text:style-name="T77"/>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42" loext:marker-style-name="T149"><text:span text:style-name="T212">① Internal</text:span><text:span text:style-name="T149"/></text:p>
          </table:table-cell>
          <table:table-cell table:style-name="表格92.A2" office:value-type="string">
            <text:p text:style-name="P42" loext:marker-style-name="T149"><text:span text:style-name="T150">不出 </text:span><text:span text:style-name="T212">Area</text:span></text:p>
          </table:table-cell>
          <table:table-cell table:style-name="表格92.A2" office:value-type="string">
            <text:p text:style-name="P42" loext:marker-style-name="T149"><text:span text:style-name="T150">只在同一個 </text:span><text:span text:style-name="T212">Area </text:span><text:span text:style-name="T150">裡活動，對外一無所知</text:span></text:p>
          </table:table-cell>
          <table:table-cell table:style-name="表格92.A2" office:value-type="string">
            <text:p text:style-name="P42" loext:marker-style-name="T149"><text:span text:style-name="T150">只在一個辦公室活動的員工</text:span><text:span text:style-name="T149"/></text:p>
          </table:table-cell>
        </table:table-row>
        <table:table-row table:style-name="表格92.1">
          <table:table-cell table:style-name="表格92.A3" office:value-type="string">
            <text:p text:style-name="P42" loext:marker-style-name="T149"><text:span text:style-name="T212">② </text:span><text:span text:style-name="T711">Backbone</text:span></text:p>
          </table:table-cell>
          <table:table-cell table:style-name="表格92.A3" office:value-type="string">
            <text:p text:style-name="P42" loext:marker-style-name="T712"><text:span text:style-name="T713">在 </text:span><text:span text:style-name="T711">Area 0</text:span></text:p>
          </table:table-cell>
          <table:table-cell table:style-name="表格92.A3" office:value-type="string">
            <text:p text:style-name="P42" loext:marker-style-name="T149"><text:span text:style-name="T713">核心骨幹節點</text:span><text:span text:style-name="T150">，所有跨區流量都經過這裡</text:span></text:p>
          </table:table-cell>
          <table:table-cell table:style-name="表格92.A3" office:value-type="string">
            <text:p text:style-name="P42" loext:marker-style-name="T511"><text:span text:style-name="T512">高速公路主幹上的節點</text:span><text:span text:style-name="T511"/></text:p>
          </table:table-cell>
        </table:table-row>
        <table:table-row table:style-name="表格92.1">
          <table:table-cell table:style-name="表格92.A2" office:value-type="string">
            <text:p text:style-name="P42" loext:marker-style-name="T149"><text:span text:style-name="T212">③ </text:span><text:span text:style-name="T610">ABR</text:span></text:p>
          </table:table-cell>
          <table:table-cell table:style-name="表格92.A2" office:value-type="string">
            <text:p text:style-name="P42" loext:marker-style-name="T591"><text:span text:style-name="T592">跨 </text:span><text:span text:style-name="T610">Area </text:span><text:span text:style-name="T592">橋樑</text:span></text:p>
          </table:table-cell>
          <table:table-cell table:style-name="表格92.A2" office:value-type="string">
            <text:p text:style-name="P42" loext:marker-style-name="T591"><text:span text:style-name="T592">同時連 </text:span><text:span text:style-name="T610">Area 0 </text:span><text:span text:style-name="T592">與其他 </text:span><text:span text:style-name="T610">Area</text:span><text:span text:style-name="T592">，是區域間唯一合法的橋</text:span></text:p>
          </table:table-cell>
          <table:table-cell table:style-name="表格92.A2" office:value-type="string">
            <text:p text:style-name="P42" loext:marker-style-name="T371"><text:span text:style-name="T369">不同部門之間的聯絡窗口</text:span><text:span text:style-name="T371"/></text:p>
          </table:table-cell>
        </table:table-row>
        <table:table-row table:style-name="表格92.1">
          <table:table-cell table:style-name="表格92.A3" office:value-type="string">
            <text:p text:style-name="P42" loext:marker-style-name="T149"><text:span text:style-name="T212">④ </text:span><text:span text:style-name="T449">ASBR</text:span></text:p>
          </table:table-cell>
          <table:table-cell table:style-name="表格92.A3" office:value-type="string">
            <text:p text:style-name="P42" loext:marker-style-name="T149"><text:span text:style-name="T150">跨 </text:span><text:span text:style-name="T212">AS </text:span><text:span text:style-name="T150">入口</text:span></text:p>
          </table:table-cell>
          <table:table-cell table:style-name="表格92.A3" office:value-type="string">
            <text:p text:style-name="P42" loext:marker-style-name="T149"><text:span text:style-name="T150">把外部路由（</text:span><text:span text:style-name="T212">BGP/</text:span><text:span text:style-name="T150">靜態）引入 </text:span><text:span text:style-name="T212">OSPF</text:span><text:span text:style-name="T150">，</text:span><text:span text:style-name="T308">是對外入口</text:span></text:p>
          </table:table-cell>
          <table:table-cell table:style-name="表格92.A3" office:value-type="string">
            <text:p text:style-name="P42" loext:marker-style-name="T149"><text:span text:style-name="T150">公司對外的大門警衛室</text:span><text:span text:style-name="T149"/>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6"><text:span text:style-name="T222">⚠️ <text:s/></text:span><text:span text:style-name="T247">考試最愛考的三個陷阱</text:span></text:p>
            <text:p text:style-name="P7"><text:span text:style-name="T264">✗ ABR </text:span><text:span text:style-name="T257">負責連接外部網路　→　</text:span><text:span text:style-name="T111">✓</text:span><text:span text:style-name="T133"> </text:span><text:span text:style-name="T198">ABR </text:span><text:span text:style-name="T133">只負責 </text:span><text:span text:style-name="T198">Area </text:span><text:span text:style-name="T133">之間的橋樑</text:span><text:span text:style-name="T111">，對外是 </text:span><text:span text:style-name="T177">ASBR </text:span><text:span text:style-name="T111">的工作。</text:span></text:p>
            <text:p text:style-name="P8"><text:span text:style-name="T264">✗ ASBR </text:span><text:span text:style-name="T257">是用來跨越不同 </text:span><text:span text:style-name="T264">Area</text:span><text:span text:style-name="T257">　→　</text:span><text:span text:style-name="T111">✓ </text:span><text:span text:style-name="T198">ASBR </text:span><text:span text:style-name="T133">是跨越不同 </text:span><text:span text:style-name="T198">AS</text:span><text:span text:style-name="T133">（整個系統）</text:span><text:span text:style-name="T111">，不是跨 </text:span><text:span text:style-name="T177">Area</text:span><text:span text:style-name="T111">。</text:span></text:p>
            <text:p text:style-name="P8"><text:span text:style-name="T264">✗ </text:span><text:span text:style-name="T257">任意兩個 </text:span><text:span text:style-name="T264">Area </text:span><text:span text:style-name="T257">可直接相連　→　</text:span><text:span text:style-name="T111">✓ </text:span><text:span text:style-name="T372">所有 </text:span><text:span text:style-name="T383">Area </text:span><text:span text:style-name="T372">一定要透過 </text:span><text:span text:style-name="T383">Area 0 </text:span><text:span text:style-name="T372">才能互通，不能繞過</text:span><text:span text:style-name="T111">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四、</text:span><text:span text:style-name="T27">AS-PATH </text:span><text:span text:style-name="T28">到底是什麼？</text:span>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39" loext:marker-style-name="T71"><text:span text:style-name="T81">📦 Route</text:span><text:span text:style-name="T72">（路由）</text:span></text:p>
            </table:table-cell>
            <table:table-cell table:style-name="表格93.A1" office:value-type="string">
              <text:p text:style-name="P39" loext:marker-style-name="T71"><text:span text:style-name="T81">📜 AS-PATH</text:span><text:span text:style-name="T71"/>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42" loext:marker-style-name="T85"><text:span text:style-name="T86">回答「封包下一步要丟給誰？」。這是路由器最後做出</text:span><text:soft-page-break/><text:span text:style-name="T86">的轉送決定，對應到一個 </text:span><text:span text:style-name="T161">Next-Hop</text:span><text:span text:style-name="T86">（下一跳）。</text:span></text:p>
          </table:table-cell>
          <table:table-cell table:style-name="表格93.A2" office:value-type="string">
            <text:p text:style-name="P42" loext:marker-style-name="T85"><text:span text:style-name="T86">回答「這條路由消息一路經過了哪些 </text:span><text:span text:style-name="T161">AS</text:span><text:span text:style-name="T86">（自治系統）？」。它是一串 </text:span><text:span text:style-name="T161">AS </text:span><text:span text:style-name="T86">編號名單，也是 </text:span><text:span text:style-name="T335">BGP</text:span><text:span text:style-name="T161"> </text:span><text:span text:style-name="T86">用來判</text:span><text:soft-page-break/><text:span text:style-name="T86">斷路由好壞的屬性之一。</text:span></text:p>
          </table:table-cell>
        </table:table-row>
        <table:table-row table:style-name="表格93.1">
          <table:table-cell table:style-name="表格93.A2" office:value-type="string">
            <text:p text:style-name="P42" loext:marker-style-name="T85"><text:span text:style-name="T86">是</text:span><text:span text:style-name="T420">「實際的轉送動作」——封包真的會照它走</text:span><text:span text:style-name="T86">。</text:span></text:p>
          </table:table-cell>
          <table:table-cell table:style-name="表格93.A2" office:value-type="string">
            <text:p text:style-name="P42" loext:marker-style-name="T85"><text:span text:style-name="T86">是</text:span><text:span text:style-name="T585">「這條路的來歷（履歷）」——封包根本看不到它</text:span><text:span text:style-name="T86">，</text:span><text:span text:style-name="T364">它只給 </text:span><text:span text:style-name="T377">BGP </text:span><text:span text:style-name="T364">參考</text:span><text:span text:style-name="T86">。</text:span></text:p>
          </table:table-cell>
        </table:table-row>
        <table:table-row table:style-name="表格93.1">
          <table:table-cell table:style-name="表格93.A4" table:number-columns-spanned="2" office:value-type="string">
            <text:p text:style-name="P6"><text:span text:style-name="T222">🔎 <text:s/></text:span><text:span text:style-name="T53">看一個例子：兩條路由二選一</text:span></text:p>
            <text:p text:style-name="P7" loext:marker-style-name="T112"><text:span text:style-name="T198">Google </text:span><text:span text:style-name="T133">同時收到兩條到 </text:span><text:span text:style-name="T198">1.1.1.0/24 </text:span><text:span text:style-name="T133">的路由廣告</text:span><text:span text:style-name="T111">：</text:span><text:span text:style-name="T200">ISP A </text:span><text:span text:style-name="T135">的 </text:span><text:span text:style-name="T200">AS-PATH </text:span><text:span text:style-name="T135">是「</text:span><text:span text:style-name="T200">100 200 300</text:span><text:span text:style-name="T135">」（經過 </text:span><text:span text:style-name="T200">3 </text:span><text:span text:style-name="T135">個 </text:span><text:span text:style-name="T200">AS</text:span><text:span text:style-name="T135">）</text:span><text:span text:style-name="T111">，</text:span><text:span text:style-name="T200">ISP B </text:span><text:span text:style-name="T135">的 </text:span><text:span text:style-name="T200">AS-PATH </text:span><text:span text:style-name="T135">是「</text:span><text:span text:style-name="T200">400 300</text:span><text:span text:style-name="T135">」（只經過 </text:span><text:span text:style-name="T200">2 </text:span><text:span text:style-name="T135">個 </text:span><text:span text:style-name="T200">AS</text:span><text:span text:style-name="T135">）</text:span><text:span text:style-name="T111">。</text:span></text:p>
            <text:p text:style-name="P8"><text:span text:style-name="T132">在其他條件都相同時 →</text:span><text:span text:style-name="T317"> </text:span><text:span text:style-name="T343">BGP </text:span><text:span text:style-name="T317">會偏好較短的「</text:span><text:span text:style-name="T343">400 300</text:span><text:span text:style-name="T317">」</text:span><text:span text:style-name="T111">。</text:span></text:p>
            <text:p text:style-name="P8" loext:marker-style-name="T112"><text:span text:style-name="T111">小提醒：</text:span><text:span text:style-name="T383">AS-PATH </text:span><text:span text:style-name="T372">要從右邊讀起，最右邊的「</text:span><text:span text:style-name="T383">300</text:span><text:span text:style-name="T372">」才是這條路由的發源地（</text:span><text:span text:style-name="T383">Origin AS</text:span><text:span text:style-name="T372">）</text:span><text:span text:style-name="T111">。</text:span></text:p>
          </table:table-cell>
          <table:covered-table-cell/>
        </table:table-row>
        <table:table-row table:style-name="表格93.1">
          <table:table-cell table:style-name="表格93.A5" table:number-columns-spanned="2" office:value-type="string">
            <text:p text:style-name="P6"><text:span text:style-name="T218">❁</text:span><text:span text:style-name="T111">假設你收到兩條路由：</text:span><text:span text:style-name="T182"><text:line-break/>Route A: AS-PATH = 100 200 300<text:line-break/>Route B: AS-PATH = 400 300<text:line-break/><text:line-break/></text:span><text:span text:style-name="T111">你先不要管 </text:span><text:span text:style-name="T182">Route </text:span><text:span text:style-name="T111">是什麼。</text:span><text:span text:style-name="T182"><text:line-break/><text:line-break/></text:span><text:span text:style-name="T111">只看 </text:span><text:span text:style-name="T182">AS-PATH</text:span><text:span text:style-name="T111">：</text:span><text:span text:style-name="T182">100 200 300 <text:s/></text:span><text:span text:style-name="T111">意思：我 ← </text:span><text:span text:style-name="T182">AS100 ← AS200 ← AS300<text:line-break/><text:line-break/></text:span><text:span text:style-name="T111">而</text:span><text:span text:style-name="T182">400 300 <text:s/></text:span><text:span text:style-name="T111">意思：我 ← </text:span><text:span text:style-name="T182">AS400 ← AS300<text:line-break/><text:line-break/></text:span><text:span text:style-name="T685">AS-PATH </text:span><text:span text:style-name="T679">就只是：這個路由消息經過了哪些 </text:span><text:span text:style-name="T685">AS </text:span><text:span text:style-name="T679">的名單。就這樣而已。</text:span><text:span text:style-name="T182"><text:line-break/><text:line-break/></text:span><text:span text:style-name="T111">然後 </text:span><text:span text:style-name="T345">BGP</text:span><text:span text:style-name="T182"> </text:span><text:span text:style-name="T111">看到：</text:span><text:span text:style-name="T182"><text:line-break/><text:line-break/>100 200 300 <text:s/></text:span><text:span text:style-name="T111">有 </text:span><text:span text:style-name="T182">3 </text:span><text:span text:style-name="T111">個 </text:span><text:span text:style-name="T182">AS</text:span><text:span text:style-name="T111">。</text:span><text:span text:style-name="T182"><text:line-break/><text:line-break/>400 300 <text:s/></text:span><text:span text:style-name="T111">有 </text:span><text:span text:style-name="T182">2 </text:span><text:span text:style-name="T111">個 </text:span><text:span text:style-name="T182">AS</text:span><text:span text:style-name="T111">。</text:span><text:span text:style-name="T182"><text:line-break/><text:line-break/></text:span><text:span text:style-name="T111">於是它想：</text:span><text:span text:style-name="T617">「嗯，看起來第二條比較短。」然後選第二條</text:span><text:span text:style-name="T111">。</text:span></text:p>
          </table:table-cell>
          <table:covered-table-cell/>
        </table:table-row>
        <table:table-row table:style-name="表格93.1">
          <table:table-cell table:style-name="表格93.A6" table:number-columns-spanned="2" office:value-type="string">
            <text:p text:style-name="P6"><text:span text:style-name="T222">⚠️ <text:s/></text:span><text:span text:style-name="T53">新手最容易搞混的地方</text:span></text:p>
            <text:p text:style-name="P7" loext:marker-style-name="T112"><text:span text:style-name="T177">AS-PATH </text:span><text:span text:style-name="T111">不是寫在封包上的東西，也不是「下一跳」。封包只認 </text:span><text:span text:style-name="T177">Next-Hop</text:span><text:span text:style-name="T111">；</text:span><text:span text:style-name="T352">AS-PATH </text:span><text:span text:style-name="T325">純粹是 </text:span><text:span text:style-name="T352">BGP </text:span><text:span text:style-name="T325">拿來「比較哪條路由比較好」的參考資料</text:span><text:span text:style-name="T111">。</text:span></text:p>
            <text:p text:style-name="P6"><text:span text:style-name="T222">🎯 <text:s/></text:span><text:span text:style-name="T53">考點加碼：</text:span><text:span text:style-name="T65">AS-PATH </text:span><text:span text:style-name="T53">的另一個任務</text:span></text:p>
            <text:p text:style-name="P8" loext:marker-style-name="T112"><text:span text:style-name="T111">防迴圈！</text:span><text:span text:style-name="T133">當某個 </text:span><text:span text:style-name="T198">AS </text:span><text:span text:style-name="T133">發現一條路由的 </text:span><text:span text:style-name="T198">AS-PATH </text:span><text:span text:style-name="T133">裡「已經有自己的 </text:span><text:span text:style-name="T198">AS </text:span><text:span text:style-name="T133">編號」</text:span><text:span text:style-name="T111">，</text:span><text:span text:style-name="T372">就會直接丟棄這條路由，避免封包在 </text:span><text:span text:style-name="T383">AS </text:span><text:span text:style-name="T372">之間繞圈圈</text:span><text:span text:style-name="T111">。</text:span></text:p>
          </table:table-cell>
          <table:covered-table-cell/>
        </table:table-row>
      </table:table>
      <text:h text:style-name="P11" text:outline-level="2" loext:marker-style-name="T27"><text:span text:style-name="T28">五、</text:span><text:span text:style-name="T27">BGP </text:span><text:span text:style-name="T28">必背考點：高命中率一次搞懂</text:span></text:h>
      <text:p text:style-name="P49" loext:marker-style-name="T112"><text:span text:style-name="T343">BGP(Border Gateway Protocol) </text:span><text:span text:style-name="T111">不像 </text:span><text:span text:style-name="T177">OSPF </text:span><text:span text:style-name="T111">會自己算最短距離，它是在「</text:span><text:span text:style-name="T674">比條件、看政策</text:span><text:span text:style-name="T111">」。與其硬背排序表，不如先搞懂下面這 </text:span><text:span text:style-name="T182">9 </text:span><text:span text:style-name="T111">個高命中率的考點——每個都從「它在解決什麼問題」切入，記得快又不容易忘。</text:span>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39" loext:marker-style-name="T77"><text:span text:style-name="T84">#</text:span><text:span text:style-name="T77"/></text:p>
            </table:table-cell>
            <table:table-cell table:style-name="表格94.A1" office:value-type="string">
              <text:p text:style-name="P39" loext:marker-style-name="T77"><text:span text:style-name="T78">考點</text:span><text:span text:style-name="T77"/></text:p>
            </table:table-cell>
            <table:table-cell table:style-name="表格94.A1" office:value-type="string">
              <text:p text:style-name="P39" loext:marker-style-name="T77"><text:span text:style-name="T78">一句話重點</text:span><text:span text:style-name="T77"/></text:p>
            </table:table-cell>
            <table:table-cell table:style-name="表格94.A1" office:value-type="string">
              <text:p text:style-name="P39" loext:marker-style-name="T77"><text:span text:style-name="T78">白話理解 </text:span><text:span text:style-name="T84">× </text:span><text:span text:style-name="T78">怎麼考</text:span>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41" loext:marker-style-name="T85"><text:span text:style-name="T161">①</text:span><text:span text:style-name="T85"/></text:p>
          </table:table-cell>
          <table:table-cell table:style-name="表格94.A2" office:value-type="string">
            <text:p text:style-name="P14">TCP 179</text:p>
          </table:table-cell>
          <table:table-cell table:style-name="表格94.A2" office:value-type="string">
            <text:p text:style-name="P42" loext:marker-style-name="T149"><text:span text:style-name="T549">BGP </text:span><text:span text:style-name="T513">跑在 </text:span><text:span text:style-name="T549">TCP</text:span><text:span text:style-name="T150">，</text:span><text:span text:style-name="T513">埠號 </text:span><text:span text:style-name="T549">179</text:span><text:span text:style-name="T150">（不是 </text:span><text:span text:style-name="T213">UDP</text:span><text:span text:style-name="T150">）</text:span></text:p>
          </table:table-cell>
          <table:table-cell table:style-name="表格94.A2" office:value-type="string">
            <text:p text:style-name="P42" loext:marker-style-name="T149"><text:span text:style-name="T150">要傳「整個網際網路」的路由，丟包會大亂，所以需要 </text:span><text:span text:style-name="T213">TCP </text:span><text:span text:style-name="T150">的可靠重送與順序保證。考：</text:span><text:span text:style-name="T450">BGP </text:span><text:span text:style-name="T425">傳輸層協定 → </text:span><text:span text:style-name="T450">TCP</text:span><text:span text:style-name="T150">。</text:span></text:p>
          </table:table-cell>
        </table:table-row>
        <table:table-row table:style-name="表格94.1">
          <table:table-cell table:style-name="表格94.A3" office:value-type="string">
            <text:p text:style-name="P41" loext:marker-style-name="T85"><text:span text:style-name="T161">②</text:span><text:span text:style-name="T85"/></text:p>
          </table:table-cell>
          <table:table-cell table:style-name="表格94.A3" office:value-type="string">
            <text:p text:style-name="P14">Path Vector</text:p>
          </table:table-cell>
          <table:table-cell table:style-name="表格94.A3" office:value-type="string">
            <text:p text:style-name="P42" loext:marker-style-name="T149"><text:span text:style-name="T213">BGP </text:span><text:span text:style-name="T150">屬於 </text:span><text:span text:style-name="T213">Path Vector </text:span><text:span text:style-name="T150">協定</text:span></text:p>
          </table:table-cell>
          <table:table-cell table:style-name="表格94.A3" office:value-type="string">
            <text:p text:style-name="P42" loext:marker-style-name="T149"><text:span text:style-name="T150">不只報「距離」，而是</text:span><text:span text:style-name="T312">把「整條 </text:span><text:span text:style-name="T362">AS </text:span><text:span text:style-name="T312">路徑」報給你</text:span><text:span text:style-name="T150">。</text:span><text:span text:style-name="T213">RIP</text:span><text:span text:style-name="T150">＝</text:span><text:span text:style-name="T213">Distance </text:span><text:soft-page-break/><text:span text:style-name="T213">Vector</text:span><text:span text:style-name="T150">、</text:span><text:span text:style-name="T213">OSPF</text:span><text:span text:style-name="T150">＝</text:span><text:span text:style-name="T213">Link State</text:span><text:span text:style-name="T150">、</text:span><text:span text:style-name="T213">BGP</text:span><text:span text:style-name="T150">＝</text:span><text:span text:style-name="T213">Path Vector</text:span><text:span text:style-name="T150">。</text:span></text:p>
          </table:table-cell>
        </table:table-row>
        <table:table-row table:style-name="表格94.1">
          <table:table-cell table:style-name="表格94.A2" office:value-type="string">
            <text:p text:style-name="P41" loext:marker-style-name="T85"><text:span text:style-name="T161">③</text:span><text:span text:style-name="T85"/></text:p>
          </table:table-cell>
          <table:table-cell table:style-name="表格94.A2" office:value-type="string">
            <text:p text:style-name="P15"><text:span text:style-name="T217">AS-PATH</text:span><text:span text:style-name="T158">（</text:span><text:span text:style-name="T593">防迴圈</text:span><text:span text:style-name="T158">）</text:span></text:p>
          </table:table-cell>
          <table:table-cell table:style-name="表格94.A2" office:value-type="string">
            <text:p text:style-name="P42" loext:marker-style-name="T149"><text:span text:style-name="T42">✅ </text:span><text:span text:style-name="T150">最大用途＝</text:span><text:span text:style-name="T592">防 </text:span><text:span text:style-name="T611">Routing Loop</text:span></text:p>
          </table:table-cell>
          <table:table-cell table:style-name="表格94.A2" office:value-type="string">
            <text:p text:style-name="P42" loext:marker-style-name="T149"><text:span text:style-name="T450">AS </text:span><text:span text:style-name="T425">一看到 </text:span><text:span text:style-name="T450">AS-PATH </text:span><text:span text:style-name="T425">裡有「自己的 </text:span><text:span text:style-name="T450">AS </text:span><text:span text:style-name="T425">編號」就立刻丟棄，避免繞圈</text:span><text:span text:style-name="T150">。考「</text:span><text:span text:style-name="T213">AS-PATH </text:span><text:span text:style-name="T150">主要功能」→ </text:span><text:span text:style-name="T213">Loop Prevention</text:span><text:span text:style-name="T150">。</text:span></text:p>
          </table:table-cell>
        </table:table-row>
        <table:table-row table:style-name="表格94.1">
          <table:table-cell table:style-name="表格94.A3" office:value-type="string">
            <text:p text:style-name="P41" loext:marker-style-name="T85"><text:span text:style-name="T161">④</text:span><text:span text:style-name="T85"/></text:p>
          </table:table-cell>
          <table:table-cell table:style-name="表格94.A3" office:value-type="string">
            <text:p text:style-name="P14">Local Preference</text:p>
          </table:table-cell>
          <table:table-cell table:style-name="表格94.A3" office:value-type="string">
            <text:p text:style-name="P13">數值越大越優先</text:p>
          </table:table-cell>
          <table:table-cell table:style-name="表格94.A3" office:value-type="string">
            <text:p text:style-name="P42" loext:marker-style-name="T149"><text:span text:style-name="T42">✅ </text:span><text:span text:style-name="T43">通用屬性中最重要！</text:span><text:span text:style-name="T150">是</text:span><text:span text:style-name="T312"> </text:span><text:span text:style-name="T362">AS </text:span><text:span text:style-name="T312">的「內部政策」：想走哪個出口就把它設高分</text:span><text:span text:style-name="T150">。</text:span></text:p>
          </table:table-cell>
        </table:table-row>
        <table:table-row table:style-name="表格94.1">
          <table:table-cell table:style-name="表格94.A2" office:value-type="string">
            <text:p text:style-name="P41" loext:marker-style-name="T85"><text:span text:style-name="T161">⑤</text:span><text:span text:style-name="T85"/></text:p>
          </table:table-cell>
          <table:table-cell table:style-name="表格94.A2" office:value-type="string">
            <text:p text:style-name="P15"><text:span text:style-name="T217">AS-PATH</text:span><text:span text:style-name="T158">（</text:span><text:span text:style-name="T593">長度</text:span><text:span text:style-name="T158">）</text:span></text:p>
          </table:table-cell>
          <table:table-cell table:style-name="表格94.A2" office:value-type="string">
            <text:p text:style-name="P16"><text:span text:style-name="T714">路徑越短（經過 </text:span><text:span text:style-name="T717">AS </text:span><text:span text:style-name="T714">越少）越優先</text:span></text:p>
          </table:table-cell>
          <table:table-cell table:style-name="表格94.A2" office:value-type="string">
            <text:p text:style-name="P42" loext:marker-style-name="T149"><text:span text:style-name="T42">⚠️ </text:span><text:span text:style-name="T425">但要先比 </text:span><text:span text:style-name="T450">Weight</text:span><text:span text:style-name="T425">、</text:span><text:span text:style-name="T450">Local Pref</text:span><text:span text:style-name="T425">，前面平手才輪到它</text:span><text:span text:style-name="T150">——</text:span><text:span text:style-name="T399">別誤以為 </text:span><text:span text:style-name="T405">AS-PATH </text:span><text:span text:style-name="T399">最重要</text:span><text:span text:style-name="T150">。</text:span></text:p>
          </table:table-cell>
        </table:table-row>
        <table:table-row table:style-name="表格94.1">
          <table:table-cell table:style-name="表格94.A3" office:value-type="string">
            <text:p text:style-name="P41" loext:marker-style-name="T85"><text:span text:style-name="T161">⑥</text:span><text:span text:style-name="T85"/></text:p>
          </table:table-cell>
          <table:table-cell table:style-name="表格94.A3" office:value-type="string">
            <text:p text:style-name="P14">MED</text:p>
          </table:table-cell>
          <table:table-cell table:style-name="表格94.A3" office:value-type="string">
            <text:p text:style-name="P17">數值越小越優先</text:p>
          </table:table-cell>
          <table:table-cell table:style-name="表格94.A3" office:value-type="string">
            <text:p text:style-name="P42" loext:marker-style-name="T149"><text:span text:style-name="T312">告訴鄰居「請從這個入口進來」，數字小的入口優先</text:span><text:span text:style-name="T150">。</text:span></text:p>
          </table:table-cell>
        </table:table-row>
        <table:table-row table:style-name="表格94.1">
          <table:table-cell table:style-name="表格94.A2" office:value-type="string">
            <text:p text:style-name="P41" loext:marker-style-name="T85"><text:span text:style-name="T161">⑦</text:span><text:span text:style-name="T85"/></text:p>
          </table:table-cell>
          <table:table-cell table:style-name="表格94.A2" office:value-type="string">
            <text:p text:style-name="P14">eBGP vs iBGP</text:p>
          </table:table-cell>
          <table:table-cell table:style-name="表格94.A2" office:value-type="string">
            <text:p text:style-name="P18"><text:span text:style-name="T717">eBGP </text:span><text:span text:style-name="T714">優先於 </text:span><text:span text:style-name="T717">iBGP</text:span></text:p>
          </table:table-cell>
          <table:table-cell table:style-name="表格94.A2" office:value-type="string">
            <text:p text:style-name="P42" loext:marker-style-name="T149"><text:span text:style-name="T213">eBGP</text:span><text:span text:style-name="T150">＝外面直接告訴你；</text:span><text:span text:style-name="T213">iBGP</text:span><text:span text:style-name="T150">＝同事轉述——當然信「本人」，外部路由較可信。</text:span></text:p>
          </table:table-cell>
        </table:table-row>
        <table:table-row table:style-name="表格94.1">
          <table:table-cell table:style-name="表格94.A3" office:value-type="string">
            <text:p text:style-name="P41" loext:marker-style-name="T85"><text:span text:style-name="T161">⑧</text:span><text:span text:style-name="T85"/></text:p>
          </table:table-cell>
          <table:table-cell table:style-name="表格94.A3" office:value-type="string">
            <text:p text:style-name="P15"><text:span text:style-name="T217">MED</text:span><text:span text:style-name="T158">（比較範圍）</text:span></text:p>
          </table:table-cell>
          <table:table-cell table:style-name="表格94.A3" office:value-type="string">
            <text:p text:style-name="P19"><text:span text:style-name="T714">只比較同一個「來源 </text:span><text:span text:style-name="T717">AS</text:span><text:span text:style-name="T714">」</text:span></text:p>
          </table:table-cell>
          <table:table-cell table:style-name="表格94.A3" office:value-type="string">
            <text:p text:style-name="P42" loext:marker-style-name="T149"><text:span text:style-name="T42">⚠️</text:span><text:span text:style-name="T446"> </text:span><text:span text:style-name="T627">不同 </text:span><text:span text:style-name="T642">AS </text:span><text:span text:style-name="T627">的 </text:span><text:span text:style-name="T642">MED </text:span><text:span text:style-name="T627">不能互比；只在同一家公司的建議之間比大小</text:span><text:span text:style-name="T150">。最愛考！</text:span></text:p>
          </table:table-cell>
        </table:table-row>
        <table:table-row table:style-name="表格94.1">
          <table:table-cell table:style-name="表格94.A2" office:value-type="string">
            <text:p text:style-name="P41" loext:marker-style-name="T85"><text:span text:style-name="T161">⑨</text:span><text:span text:style-name="T85"/></text:p>
          </table:table-cell>
          <table:table-cell table:style-name="表格94.A2" office:value-type="string">
            <text:p text:style-name="P14">Weight</text:p>
          </table:table-cell>
          <table:table-cell table:style-name="表格94.A2" office:value-type="string">
            <text:p text:style-name="P42" loext:marker-style-name="T149"><text:span text:style-name="T44">Cisco </text:span><text:span text:style-name="T45">私有</text:span><text:span text:style-name="T150">，</text:span><text:span text:style-name="T682">非 </text:span><text:span text:style-name="T688">BGP </text:span><text:span text:style-name="T682">標準</text:span></text:p>
          </table:table-cell>
          <table:table-cell table:style-name="表格94.A2" office:value-type="string">
            <text:p text:style-name="P42" loext:marker-style-name="T149"><text:span text:style-name="T42">⚠️ </text:span><text:span text:style-name="T150">看到「</text:span><text:span text:style-name="T213">BGP </text:span><text:span text:style-name="T150">標準屬性」選項別選 </text:span><text:span text:style-name="T213">Weight</text:span><text:span text:style-name="T150">（</text:span><text:span text:style-name="T213">Juniper</text:span><text:span text:style-name="T150">／華為不一定有）。</text:span>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6"><text:span text:style-name="T222">🧠 <text:s/></text:span><text:span text:style-name="T281">白話理解（這句最重要）</text:span></text:p>
            <text:p text:style-name="P7" loext:marker-style-name="T112"><text:span text:style-name="T343">BGP </text:span><text:span text:style-name="T317">心裡在想：「哪條路比較值得信任？比較符合政策？」不是「哪條最短」</text:span><text:span text:style-name="T111">（</text:span><text:span text:style-name="T372">那是 </text:span><text:span text:style-name="T383">OSPF </text:span><text:span text:style-name="T372">在做的事</text:span><text:span text:style-name="T111">）。</text:span></text:p>
            <text:p text:style-name="P8"><text:span text:style-name="T282">一句話總結 → </text:span><text:span text:style-name="T177">BGP </text:span><text:span text:style-name="T111">是政策導向（</text:span><text:span text:style-name="T177">policy-based routing</text:span><text:span text:style-name="T111">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6"><text:span text:style-name="T222">⚡ <text:s/></text:span><text:span text:style-name="T227">考前濃縮版（</text:span><text:span text:style-name="T239">10 </text:span><text:span text:style-name="T227">秒掃過）</text:span></text:p>
            <text:p text:style-name="P7" loext:marker-style-name="T112"><text:span text:style-name="T200">BGP</text:span><text:span text:style-name="T135">＝</text:span><text:span text:style-name="T200">TCP 179</text:span><text:span text:style-name="T111">、</text:span><text:span text:style-name="T597">Path Vector</text:span><text:span text:style-name="T111">｜</text:span><text:span text:style-name="T414">AS-PATH</text:span><text:span text:style-name="T413">：防迴圈＋越短越好</text:span><text:span text:style-name="T111">｜</text:span><text:span text:style-name="T414">Local Preference</text:span><text:span text:style-name="T413">：越大越好</text:span><text:span text:style-name="T111">｜</text:span><text:span text:style-name="T414">MED</text:span><text:span text:style-name="T413">：越小越好</text:span><text:span text:style-name="T111">＋</text:span><text:span text:style-name="T372">只比同 </text:span><text:span text:style-name="T383">AS</text:span><text:span text:style-name="T111">｜</text:span><text:span text:style-name="T200">eBGP &gt; iBGP</text:span><text:span text:style-name="T111">｜</text:span><text:span text:style-name="T207">Weight</text:span><text:span text:style-name="T142">：</text:span><text:span text:style-name="T207">Cisco </text:span><text:span text:style-name="T142">私有</text:span><text:span text:style-name="T111">。</text:span></text:p>
            <text:p text:style-name="P7" loext:marker-style-name="T112"><text:span text:style-name="T111">選路優先順序：</text:span><text:span text:style-name="T177">Weight &gt; Local Pref &gt; </text:span><text:span text:style-name="T111">自己產生 </text:span><text:span text:style-name="T177">&gt; AS-PATH &gt; Origin &gt; MED &gt; eBGP &gt; IGP cost &gt; Router ID</text:span><text:span text:style-name="T111">（</text:span><text:span text:style-name="T177">Weight </text:span><text:span text:style-name="T111">為 </text:span><text:span text:style-name="T177">Cisco </text:span><text:span text:style-name="T111">私有；</text:span><text:span text:style-name="T177">Local Pref </text:span><text:span text:style-name="T111">是最重要的通用屬性）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六、</text:span><text:span text:style-name="T27">BGP </text:span><text:span text:style-name="T28">考試常見陷阱</text:span>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7"><text:span text:style-name="T264">✗ </text:span><text:span text:style-name="T263">AS-PATH </text:span><text:span text:style-name="T258">是 </text:span><text:span text:style-name="T263">BGP </text:span><text:span text:style-name="T258">選路最重要的屬性</text:span><text:span text:style-name="T257">　→　</text:span><text:span text:style-name="T111">✓ </text:span><text:span text:style-name="T458">Local Preference </text:span><text:span text:style-name="T437">才是最重要的通用屬性</text:span><text:span text:style-name="T111">（</text:span><text:span text:style-name="T177">Weight </text:span><text:span text:style-name="T111">是 </text:span><text:span text:style-name="T177">Cisco </text:span><text:span text:style-name="T111">私有）。</text:span></text:p>
            <text:p text:style-name="P8"><text:span text:style-name="T264">✗ </text:span><text:span text:style-name="T263">AS-PATH </text:span><text:span text:style-name="T258">越短就一定會選那條</text:span><text:span text:style-name="T257">　→　</text:span><text:span text:style-name="T111">✓ </text:span><text:span text:style-name="T325">只有前面的屬性（</text:span><text:span text:style-name="T352">Local Pref </text:span><text:span text:style-name="T325">等）完全相同時，才會比較 </text:span><text:span text:style-name="T352">AS-PATH</text:span><text:span text:style-name="T111">。</text:span></text:p>
            <text:p text:style-name="P8"><text:span text:style-name="T264">✗ </text:span><text:span text:style-name="T263">BGP </text:span><text:span text:style-name="T258">會自己計算最短路徑</text:span><text:span text:style-name="T257">　→　</text:span><text:span text:style-name="T111">✓ </text:span><text:span text:style-name="T177">BGP </text:span><text:span text:style-name="T111">不算距離，</text:span><text:span text:style-name="T598">OSPF </text:span><text:span text:style-name="T575">才做最短路徑計算</text:span><text:span text:style-name="T111">。</text:span></text:p>
            <text:p text:style-name="P8"><text:span text:style-name="T264">✗ </text:span><text:span text:style-name="T263">iBGP </text:span><text:span text:style-name="T258">比 </text:span><text:span text:style-name="T263">eBGP </text:span><text:span text:style-name="T258">優先</text:span><text:span text:style-name="T257">　→　</text:span><text:span text:style-name="T111">✓ </text:span><text:span text:style-name="T702">eBGP </text:span><text:span text:style-name="T697">優先於 </text:span><text:span text:style-name="T702">iBGP</text:span><text:span text:style-name="T111">（外部路由更可信）。</text:span></text:p>
            <text:p text:style-name="P8"><text:span text:style-name="T264">✗ </text:span><text:span text:style-name="T263">MED </text:span><text:span text:style-name="T258">可以跨不同 </text:span><text:span text:style-name="T263">AS </text:span><text:span text:style-name="T258">互相比較</text:span><text:span text:style-name="T257">　→　</text:span><text:span text:style-name="T111">✓</text:span><text:span text:style-name="T327"> </text:span><text:span text:style-name="T354">MED </text:span><text:span text:style-name="T327">只能比較來自同一個 </text:span><text:span text:style-name="T354">AS </text:span><text:span text:style-name="T327">的路由</text:span><text:span text:style-name="T111">。</text:span></text:p>
          </table:table-cell>
        </table:table-row>
      </table:table>
      <text:h text:style-name="P11" text:outline-level="2" loext:marker-style-name="T27"><text:soft-page-break/><text:span text:style-name="T28">七、</text:span><text:span text:style-name="T27">BGP + NAT + </text:span><text:span text:style-name="T28">防火牆 整合流程</text:span></text:h>
      <text:p text:style-name="P48" loext:marker-style-name="T112"><text:span text:style-name="T111">把三個概念串在一起，這才是實務上封包實際走的路。情境：</text:span><text:span text:style-name="T133">你的電腦要連到健保署</text:span><text:span text:style-name="T111">，</text:span><text:span text:style-name="T135">有兩條對外線路</text:span><text:span text:style-name="T111">（</text:span><text:span text:style-name="T472">中華電信 </text:span><text:span text:style-name="T487">AS-PATH </text:span><text:span text:style-name="T472">長度 </text:span><text:span text:style-name="T487">2</text:span><text:span text:style-name="T111">、</text:span><text:span text:style-name="T316">台灣固網 </text:span><text:span text:style-name="T348">AS-PATH </text:span><text:span text:style-name="T316">長度 </text:span><text:span text:style-name="T348">3</text:span><text:span text:style-name="T111">）。</text:span>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4" loext:marker-style-name="T77"><text:span text:style-name="T78">步驟</text:span><text:span text:style-name="T77"/></text:p>
            </table:table-cell>
            <table:table-cell table:style-name="表格96.A1" office:value-type="string">
              <text:p text:style-name="P4" loext:marker-style-name="T77"><text:span text:style-name="T78">動作</text:span><text:span text:style-name="T77"/></text:p>
            </table:table-cell>
            <table:table-cell table:style-name="表格96.A1" office:value-type="string">
              <text:p text:style-name="P4" loext:marker-style-name="T77"><text:span text:style-name="T78">關鍵一句</text:span><text:span text:style-name="T77"/>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42" loext:marker-style-name="T149"><text:span text:style-name="T212">1 </text:span><text:span text:style-name="T153">封包產生</text:span></text:p>
          </table:table-cell>
          <table:table-cell table:style-name="表格96.A2" office:value-type="string">
            <text:p text:style-name="P42" loext:marker-style-name="T149"><text:span text:style-name="T150">你的電腦說「我要去健保署 </text:span><text:span text:style-name="T212">IP</text:span><text:span text:style-name="T150">」</text:span></text:p>
          </table:table-cell>
          <table:table-cell table:style-name="表格96.A2" office:value-type="string">
            <text:p text:style-name="P42" loext:marker-style-name="T149"><text:span text:style-name="T150">封包準備出發</text:span><text:span text:style-name="T149"/></text:p>
          </table:table-cell>
        </table:table-row>
        <table:table-row table:style-name="表格96.1">
          <table:table-cell table:style-name="表格96.A3" office:value-type="string">
            <text:p text:style-name="P42" loext:marker-style-name="T149"><text:span text:style-name="T212">2 </text:span><text:span text:style-name="T153">防火牆 </text:span><text:span text:style-name="T215">Firewall</text:span></text:p>
          </table:table-cell>
          <table:table-cell table:style-name="表格96.A3" office:value-type="string">
            <text:p text:style-name="P42" loext:marker-style-name="T149"><text:span text:style-name="T150">看來源</text:span><text:span text:style-name="T212">/</text:span><text:span text:style-name="T150">目的 </text:span><text:span text:style-name="T212">IP</text:span><text:span text:style-name="T150">、</text:span><text:span text:style-name="T212">Port</text:span><text:span text:style-name="T150">，不符就擋掉</text:span></text:p>
          </table:table-cell>
          <table:table-cell table:style-name="表格96.A3" office:value-type="string">
            <text:p text:style-name="P42" loext:marker-style-name="T149"><text:span text:style-name="T150">防火牆決定「能不能走」</text:span><text:span text:style-name="T149"/></text:p>
          </table:table-cell>
        </table:table-row>
        <table:table-row table:style-name="表格96.1">
          <table:table-cell table:style-name="表格96.A2" office:value-type="string">
            <text:p text:style-name="P42" loext:marker-style-name="T149"><text:span text:style-name="T212">3 </text:span><text:span text:style-name="T215">NAT</text:span></text:p>
          </table:table-cell>
          <table:table-cell table:style-name="表格96.A2" office:value-type="string">
            <text:p text:style-name="P42" loext:marker-style-name="T149"><text:span text:style-name="T150">把</text:span><text:span text:style-name="T682">私有 </text:span><text:span text:style-name="T687">IP </text:span><text:span text:style-name="T682">換成公網 </text:span><text:span text:style-name="T687">IP</text:span><text:span text:style-name="T150">（</text:span><text:span text:style-name="T212">192.168.1.10 → 203.66.x.x</text:span><text:span text:style-name="T150">）</text:span></text:p>
          </table:table-cell>
          <table:table-cell table:style-name="表格96.A2" office:value-type="string">
            <text:p text:style-name="P42" loext:marker-style-name="T149"><text:span text:style-name="T212">NAT </text:span><text:span text:style-name="T150">解決「你是誰」</text:span></text:p>
          </table:table-cell>
        </table:table-row>
        <table:table-row table:style-name="表格96.1">
          <table:table-cell table:style-name="表格96.A3" office:value-type="string">
            <text:p text:style-name="P42" loext:marker-style-name="T149"><text:span text:style-name="T212">4 </text:span><text:span text:style-name="T215">BGP </text:span><text:span text:style-name="T153">選路</text:span></text:p>
          </table:table-cell>
          <table:table-cell table:style-name="表格96.A3" office:value-type="string">
            <text:p text:style-name="P42" loext:marker-style-name="T149"><text:span text:style-name="T150">比條件：</text:span><text:span text:style-name="T425">若相同選 </text:span><text:span text:style-name="T449">AS-PATH </text:span><text:span text:style-name="T425">較短路</text:span><text:span text:style-name="T449">1</text:span><text:span text:style-name="T150">；</text:span><text:span text:style-name="T566">若中華電信 </text:span><text:span text:style-name="T567">Local Pref </text:span><text:span text:style-name="T566">較高則不管長短走路</text:span><text:span text:style-name="T567">1</text:span></text:p>
          </table:table-cell>
          <table:table-cell table:style-name="表格96.A3" office:value-type="string">
            <text:p text:style-name="P42" loext:marker-style-name="T149"><text:span text:style-name="T212">BGP </text:span><text:span text:style-name="T150">決定「怎麼走」</text:span></text:p>
          </table:table-cell>
        </table:table-row>
        <table:table-row table:style-name="表格96.1">
          <table:table-cell table:style-name="表格96.A2" office:value-type="string">
            <text:p text:style-name="P42" loext:marker-style-name="T149"><text:span text:style-name="T212">5 </text:span><text:span text:style-name="T153">出 </text:span><text:span text:style-name="T215">ISP </text:span><text:span text:style-name="T153">跨 </text:span><text:span text:style-name="T215">AS</text:span></text:p>
          </table:table-cell>
          <table:table-cell table:style-name="表格96.A2" office:value-type="string">
            <text:p text:style-name="P42" loext:marker-style-name="T149"><text:span text:style-name="T309">封包經過多個 </text:span><text:span text:style-name="T360">AS</text:span><text:span text:style-name="T150">（這就是 </text:span><text:span text:style-name="T212">AS-PATH </text:span><text:span text:style-name="T150">的來源）</text:span></text:p>
          </table:table-cell>
          <table:table-cell table:style-name="表格96.A2" office:value-type="string">
            <text:p text:style-name="P42" loext:marker-style-name="T149"><text:span text:style-name="T212">—</text:span><text:span text:style-name="T149"/></text:p>
          </table:table-cell>
        </table:table-row>
        <table:table-row table:style-name="表格96.1">
          <table:table-cell table:style-name="表格96.A3" office:value-type="string">
            <text:p text:style-name="P42" loext:marker-style-name="T149"><text:span text:style-name="T212">6 </text:span><text:span text:style-name="T150">到達健保署</text:span></text:p>
          </table:table-cell>
          <table:table-cell table:style-name="表格96.A3" office:value-type="string">
            <text:p text:style-name="P42" loext:marker-style-name="T149"><text:span text:style-name="T150">健保署收到請求，完成連線</text:span><text:span text:style-name="T149"/></text:p>
          </table:table-cell>
          <table:table-cell table:style-name="表格96.A3" office:value-type="string">
            <text:p text:style-name="P42" loext:marker-style-name="T149"><text:span text:style-name="T212">—</text:span><text:span text:style-name="T149"/>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6"><text:span text:style-name="T222">🎯 <text:s/></text:span><text:span text:style-name="T281">三層分工，一句話各自記</text:span></text:p>
            <text:p text:style-name="P7"><text:span text:style-name="T282">防火牆 → </text:span><text:span text:style-name="T111">決定「能不能走」｜</text:span><text:span text:style-name="T288">NAT → </text:span><text:span text:style-name="T111">解決「你是誰」｜</text:span><text:span text:style-name="T291">BGP → </text:span><text:span text:style-name="T117">決定「要怎麼走」</text:span></text:p>
            <text:p text:style-name="P8" loext:marker-style-name="T112"><text:span text:style-name="T111">生活比喻：</text:span><text:span text:style-name="T133">海關（防火牆）</text:span><text:span text:style-name="T111">→ </text:span><text:span text:style-name="T133">換護照</text:span><text:span text:style-name="T198">/</text:span><text:span text:style-name="T133">身份（</text:span><text:span text:style-name="T198">NAT</text:span><text:span text:style-name="T133">）</text:span><text:span text:style-name="T111">→ </text:span><text:span text:style-name="T139">選航班（</text:span><text:span text:style-name="T204">BGP</text:span><text:span text:style-name="T139">）</text:span><text:span text:style-name="T111">。</text:span>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6"><text:span text:style-name="T222">⚠️ <text:s/></text:span><text:span text:style-name="T247">整合情境的考試陷阱</text:span></text:p>
            <text:p text:style-name="P7"><text:span text:style-name="T265">✗ </text:span><text:span text:style-name="T259">封包送不出去</text:span><text:span text:style-name="T257"> → 一定是 </text:span><text:span text:style-name="T264">BGP </text:span><text:span text:style-name="T257">問題　→　</text:span><text:span text:style-name="T111">✓ 應依序排查：</text:span><text:span text:style-name="T133">防火牆有沒有擋？</text:span><text:span text:style-name="T198">NAT </text:span><text:span text:style-name="T133">有沒有設？</text:span><text:span text:style-name="T198">BGP </text:span><text:span text:style-name="T133">有沒有路？</text:span></text:p>
            <text:p text:style-name="P8"><text:span text:style-name="T264">✗ </text:span><text:span text:style-name="T257">有路但連不到 → 是 </text:span><text:span text:style-name="T264">BGP </text:span><text:span text:style-name="T257">路由問題　→　</text:span><text:span text:style-name="T111">✓ 通常是防火牆或 </text:span><text:span text:style-name="T177">NAT </text:span><text:span text:style-name="T111">問題，不是 </text:span><text:span text:style-name="T177">BGP</text:span><text:span text:style-name="T111">。</text:span></text:p>
            <text:p text:style-name="P8"><text:span text:style-name="T264">✗ </text:span><text:span text:style-name="T259">走到錯誤的 </text:span><text:span text:style-name="T265">ISP </text:span><text:span text:style-name="T264">→ </text:span><text:span text:style-name="T257">是 </text:span><text:span text:style-name="T264">NAT </text:span><text:span text:style-name="T257">設定問題　→　</text:span><text:span text:style-name="T111">✓ </text:span><text:span text:style-name="T323">走到錯誤 </text:span><text:span text:style-name="T350">ISP </text:span><text:span text:style-name="T323">是 </text:span><text:span text:style-name="T350">BGP </text:span><text:span text:style-name="T323">選路問題（</text:span><text:span text:style-name="T350">Local Pref </text:span><text:span text:style-name="T323">或 </text:span><text:span text:style-name="T350">AS-PATH </text:span><text:span text:style-name="T323">設定不對）</text:span><text:span text:style-name="T111">。</text:span></text:p>
          </table:table-cell>
          <table:covered-table-cell/>
          <table:covered-table-cell/>
        </table:table-row>
      </table:table>
      <text:h text:style-name="P32" text:outline-level="1" loext:marker-style-name="T73"><text:span text:style-name="T74">第 八 篇　網路系統進階：</text:span><text:span text:style-name="T73">SDN · Load Balancing · CDN · 5G</text:span>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6"><text:span text:style-name="T222">🌐 <text:s/></text:span><text:span text:style-name="T53">本篇重點</text:span></text:p>
            <text:p text:style-name="P7" loext:marker-style-name="T112"><text:span text:style-name="T111">本篇涵蓋四大現代網路主題：</text:span><text:span text:style-name="T177">SDN</text:span><text:span text:style-name="T111">（網路如何被控制）、</text:span><text:span text:style-name="T177">Load Balancing</text:span><text:span text:style-name="T111">（流量如何分配）、</text:span><text:span text:style-name="T177">CDN</text:span><text:span text:style-name="T111">（網站如何加速）、</text:span><text:span text:style-name="T177">5G</text:span><text:span text:style-name="T111">（新世代行動網路特性）。</text:span></text:p>
          </table:table-cell>
        </table:table-row>
      </table:table>
      <text:h text:style-name="P11" text:outline-level="2" loext:marker-style-name="T27"><text:span text:style-name="T28">一、</text:span><text:span text:style-name="T27">SDN</text:span><text:span text:style-name="T28">（軟體定義網路）</text:span></text:h>
      <text:p text:style-name="P48" loext:marker-style-name="T112"><text:span text:style-name="T180">SDN</text:span><text:span text:style-name="T115">（</text:span><text:span text:style-name="T180">Software Defined Networking</text:span><text:span text:style-name="T115">）</text:span><text:span text:style-name="T111">的核心概念是：</text:span><text:span text:style-name="T294">將「控制平面」與「資料平面」分離</text:span><text:span text:style-name="T111">。</text:span><text:span text:style-name="T325">傳統網路</text:span><text:span text:style-name="T111">中</text:span><text:span text:style-name="T325">路由器和交換器同時負責「決定資料走哪條路」和「實際傳送資料」</text:span><text:span text:style-name="T111">，</text:span><text:span text:style-name="T400">SDN </text:span><text:span text:style-name="T391">則把「決策」抽出來交給集中式的 </text:span><text:span text:style-name="T400">Controller </text:span><text:span text:style-name="T391">統一管理。</text:span><text:span text:style-name="T111">（</text:span><text:span text:style-name="T177">Router</text:span><text:span text:style-name="T111">：負責「不同網路之間」傳資料；</text:span><text:span text:style-name="T177">Switch</text:span><text:span text:style-name="T111">：負責「同一個網路內」傳資料）</text:span></text:p>
      <text:p text:style-name="P50" loext:marker-style-name="T112"><text:span text:style-name="T111">傳統路由器裡面其實有兩個功能：<text:line-break/><text:line-break/>Control Plane（控制平面）負責思考：封包要走哪條路？<text:line-break/>例如：OSPF、BGP、STP，都屬於控制平面。<text:line-break/><text:line-break/>Data Plane（資料平面）負責執行：<text:line-break/>既然決定走 Port 3，那我就從 Port 3 送出去。<text:line-break/><text:line-break/>例如：收到封包 </text:span><text:span text:style-name="T219">→ </text:span><text:span text:style-name="T111">查轉送表 </text:span><text:span text:style-name="T219">→ </text:span><text:span text:style-name="T111">從指定介面送出，這叫 Data Plane。<text:line-break/><text:line-break/>三、傳統網路設備<text:line-break/><text:line-break/></text:span><draw:frame draw:style-name="fr1" draw:name="影像1" text:anchor-type="char" svg:x="-0.019cm" svg:y="5.133cm" svg:width="2.902cm" svg:height="2.044cm" draw:z-index="0"><draw:image xlink:href="Pictures/10000001000001D60000014BACF965C9.png" xlink:type="simple" xlink:show="embed" xlink:actuate="onLoad" draw:mime-type="image/png"/></draw:frame><text:span text:style-name="T111"><text:line-break/><text:line-break/></text:span></text:p>
      <text:p text:style-name="P50" loext:marker-style-name="T112"><text:span text:style-name="T111"/></text:p>
      <text:p text:style-name="P50" loext:marker-style-name="T112"><text:span text:style-name="T111">兩個都在同一台設備裡。<text:line-break/>所以它既：自己決定路徑，也自己轉送封包。</text:span>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6"><text:span text:style-name="T222">🟦 <text:s/></text:span><text:span text:style-name="T281">核心概念（考試最常考）</text:span></text:p>
            <text:p text:style-name="P7"><text:span text:style-name="T284">控制平面（</text:span><text:span text:style-name="T289">Control Plane</text:span><text:span text:style-name="T284">）：</text:span><text:span text:style-name="T115">決定資料「怎麼走」</text:span><text:span text:style-name="T111">——負責路由決策的大腦。</text:span></text:p>
            <text:p text:style-name="P8"><text:span text:style-name="T284">資料平面（</text:span><text:span text:style-name="T289">Data Plane</text:span><text:span text:style-name="T284">）：</text:span><text:span text:style-name="T115">負責資料「實際傳送」</text:span><text:span text:style-name="T111">——執行指令的手腳。</text:span></text:p>
            <text:p text:style-name="P8"><text:span text:style-name="T288">🔑 </text:span><text:span text:style-name="T282">關鍵：</text:span><text:span text:style-name="T133">兩者分離，是 </text:span><text:span text:style-name="T198">SDN </text:span><text:span text:style-name="T133">最核心的設計原則</text:span><text:span text:style-name="T111">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4" loext:marker-style-name="T77"><text:span text:style-name="T78">三層架構</text:span><text:span text:style-name="T77"/></text:p>
          </table:table-cell>
          <table:table-cell table:style-name="表格98.A2" office:value-type="string">
            <text:p text:style-name="P4" loext:marker-style-name="T77"><text:span text:style-name="T78">說明</text:span><text:span text:style-name="T77"/></text:p>
          </table:table-cell>
          <table:table-cell table:style-name="表格98.A2" office:value-type="string">
            <text:p text:style-name="P4" loext:marker-style-name="T77"><text:span text:style-name="T78">白話</text:span><text:span text:style-name="T77"/></text:p>
          </table:table-cell>
        </table:table-row>
        <table:table-row table:style-name="表格98.1">
          <table:table-cell table:style-name="表格98.A3" office:value-type="string">
            <text:p text:style-name="P22"><text:span text:style-name="T718">🟦 Application Layer </text:span><text:span text:style-name="T714">應用層</text:span></text:p>
          </table:table-cell>
          <table:table-cell table:style-name="表格98.A3" office:value-type="string">
            <text:p text:style-name="P42" loext:marker-style-name="T149"><text:span text:style-name="T150">使用者所使用的服務，如網頁、</text:span><text:span text:style-name="T212">API</text:span><text:span text:style-name="T150">、</text:span><text:span text:style-name="T212">App</text:span></text:p>
          </table:table-cell>
          <table:table-cell table:style-name="表格98.A3" office:value-type="string">
            <text:p text:style-name="P42" loext:marker-style-name="T149"><text:span text:style-name="T150">你真正在用的東西</text:span><text:span text:style-name="T149"/></text:p>
          </table:table-cell>
        </table:table-row>
        <table:table-row table:style-name="表格98.1">
          <table:table-cell table:style-name="表格98.A4" office:value-type="string">
            <text:p text:style-name="P23"><text:span text:style-name="T718">🟨 Control Layer </text:span><text:span text:style-name="T714">控制層</text:span></text:p>
          </table:table-cell>
          <table:table-cell table:style-name="表格98.A4" office:value-type="string">
            <text:p text:style-name="P42" loext:marker-style-name="T149"><text:span text:style-name="T212">SDN Controller</text:span><text:span text:style-name="T150">（大腦），決定資料流向、集中管理</text:span></text:p>
          </table:table-cell>
          <table:table-cell table:style-name="表格98.A4" office:value-type="string">
            <text:p text:style-name="P42" loext:marker-style-name="T149"><text:span text:style-name="T150">交通指揮中心</text:span><text:span text:style-name="T149"/></text:p>
          </table:table-cell>
        </table:table-row>
        <table:table-row table:style-name="表格98.1">
          <table:table-cell table:style-name="表格98.A3" office:value-type="string">
            <text:p text:style-name="P20"><text:span text:style-name="T718">🟩 Infrastructure Layer </text:span><text:span text:style-name="T714">基礎層</text:span></text:p>
          </table:table-cell>
          <table:table-cell table:style-name="表格98.A3" office:value-type="string">
            <text:p text:style-name="P42" loext:marker-style-name="T149"><text:span text:style-name="T150">真正傳送資料的設備，如 </text:span><text:span text:style-name="T212">Router</text:span><text:span text:style-name="T150">、</text:span><text:span text:style-name="T212">Switch</text:span></text:p>
          </table:table-cell>
          <table:table-cell table:style-name="表格98.A3" office:value-type="string">
            <text:p text:style-name="P42" loext:marker-style-name="T149"><text:span text:style-name="T150">路、車道和車子</text:span><text:span text:style-name="T149"/>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6"><text:span text:style-name="T222">⚡ <text:s/></text:span><text:span text:style-name="T227">記憶口訣</text:span></text:p>
            <text:p text:style-name="P7" loext:marker-style-name="T112"><text:span text:style-name="T111">「</text:span><text:span text:style-name="T177">SDN </text:span><text:span text:style-name="T111">分平面、三層 </text:span><text:span text:style-name="T177">App-</text:span><text:span text:style-name="T111">控</text:span><text:span text:style-name="T177">-</text:span><text:span text:style-name="T111">基」→ </text:span><text:span text:style-name="T133">分平面＝控制／資料分離</text:span><text:span text:style-name="T111">；</text:span><text:span text:style-name="T675">三層＝</text:span><text:span text:style-name="T678">Application / Control / Infrastructure</text:span><text:span text:style-name="T111">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二、</text:span><text:span text:style-name="T27">Load Balancing</text:span><text:span text:style-name="T28">（負載平衡）</text:span></text:h>
      <text:p text:style-name="P48" loext:marker-style-name="T112"><text:span text:style-name="T111">當大量使用者同時存取同一網站，單一台伺服器會不堪負荷。負載平衡器</text:span><text:span text:style-name="T113">把流量「智慧分配」到多台伺</text:span><text:soft-page-break/><text:span text:style-name="T113">服器，確保每台都不過載</text:span><text:span text:style-name="T111">。</text:span>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4" loext:marker-style-name="T77"><text:span text:style-name="T78">策略</text:span><text:span text:style-name="T77"/></text:p>
            </table:table-cell>
            <table:table-cell table:style-name="表格99.A1" office:value-type="string">
              <text:p text:style-name="P4" loext:marker-style-name="T77"><text:span text:style-name="T78">說明</text:span><text:span text:style-name="T77"/></text:p>
            </table:table-cell>
            <table:table-cell table:style-name="表格99.A1" office:value-type="string">
              <text:p text:style-name="P4" loext:marker-style-name="T77"><text:span text:style-name="T78">優 </text:span><text:span text:style-name="T83">/ </text:span><text:span text:style-name="T78">缺點</text:span>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42" loext:marker-style-name="T149"><text:span text:style-name="T212">① </text:span><text:span text:style-name="T215">Round Robin</text:span><text:span text:style-name="T153">（輪詢）</text:span></text:p>
          </table:table-cell>
          <table:table-cell table:style-name="表格99.A2" office:value-type="string">
            <text:p text:style-name="P42" loext:marker-style-name="T149"><text:span text:style-name="T156">依序輪流分配</text:span><text:span text:style-name="T150">，</text:span><text:span text:style-name="T157">不考慮伺服器效能或負載</text:span></text:p>
          </table:table-cell>
          <table:table-cell table:style-name="表格99.A2" office:value-type="string">
            <text:p text:style-name="P42" loext:marker-style-name="T149"><text:span text:style-name="T212">✓ </text:span><text:span text:style-name="T150">簡單易實作 ✗ 未考量能力差異</text:span></text:p>
          </table:table-cell>
        </table:table-row>
        <table:table-row table:style-name="表格99.1">
          <table:table-cell table:style-name="表格99.A3" office:value-type="string">
            <text:p text:style-name="P42" loext:marker-style-name="T149"><text:span text:style-name="T212">② </text:span><text:span text:style-name="T215">Weighted Round Robin</text:span><text:span text:style-name="T153">（加權輪詢）</text:span></text:p>
          </table:table-cell>
          <table:table-cell table:style-name="表格99.A3" office:value-type="string">
            <text:p text:style-name="P42" loext:marker-style-name="T149"><text:span text:style-name="T156">依各伺服器處理能力設「權重」</text:span><text:span text:style-name="T150">，</text:span><text:span text:style-name="T676">能力強分到更多</text:span></text:p>
          </table:table-cell>
          <table:table-cell table:style-name="表格99.A3" office:value-type="string">
            <text:p text:style-name="P42" loext:marker-style-name="T149"><text:span text:style-name="T212">✓ </text:span><text:span text:style-name="T150">更智慧利用資源 ✗ 需手動設定權重</text:span></text:p>
          </table:table-cell>
        </table:table-row>
        <table:table-row table:style-name="表格99.1">
          <table:table-cell table:style-name="表格99.A2" office:value-type="string">
            <text:p text:style-name="P42" loext:marker-style-name="T149"><text:span text:style-name="T212">③ </text:span><text:span text:style-name="T215">Session Stickiness</text:span><text:span text:style-name="T153">（會話黏著）</text:span></text:p>
          </table:table-cell>
          <table:table-cell table:style-name="表格99.A2" office:value-type="string">
            <text:p text:style-name="P42" loext:marker-style-name="T149"><text:span text:style-name="T613">同一使用者所有請求固定導向同一台</text:span><text:span text:style-name="T150">，</text:span><text:span text:style-name="T512">維持連線狀態</text:span></text:p>
          </table:table-cell>
          <table:table-cell table:style-name="表格99.A2" office:value-type="string">
            <text:p text:style-name="P42" loext:marker-style-name="T149"><text:span text:style-name="T212">✓ </text:span><text:span text:style-name="T150">狀態一致 ✗ 可能某台過載</text:span>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6"><text:span text:style-name="T222">⚡ <text:s/></text:span><text:span text:style-name="T227">記憶口訣</text:span></text:p>
            <text:p text:style-name="P7" loext:marker-style-name="T112"><text:span text:style-name="T573">「</text:span><text:span text:style-name="T596">LB </text:span><text:span text:style-name="T573">輪、重、黏」</text:span><text:span text:style-name="T111">→ </text:span><text:span text:style-name="T133">輪＝</text:span><text:span text:style-name="T198">Round Robin</text:span><text:span text:style-name="T133">（輪流）；重＝</text:span><text:span text:style-name="T198">Weighted RR</text:span><text:span text:style-name="T133">（加權）；黏＝</text:span><text:span text:style-name="T198">Stickiness</text:span><text:span text:style-name="T133">（固定同一台）</text:span><text:span text:style-name="T111">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三、</text:span><text:span text:style-name="T27">CDN</text:span><text:span text:style-name="T28">（</text:span><text:span text:style-name="T31">內容傳遞網路</text:span><text:span text:style-name="T28">）</text:span></text:h>
      <text:p text:style-name="P48" loext:marker-style-name="T112"><text:span text:style-name="T200">CDN</text:span><text:span text:style-name="T135">（</text:span><text:span text:style-name="T200">Content Delivery Network</text:span><text:span text:style-name="T135">）</text:span><text:span text:style-name="T111">透過</text:span><text:span text:style-name="T133">在全球各地部署</text:span><text:span text:style-name="T111">「</text:span><text:span text:style-name="T437">邊緣伺服器（</text:span><text:span text:style-name="T458">Edge Server</text:span><text:span text:style-name="T437">）</text:span><text:span text:style-name="T111">」加速內容傳遞。</text:span><text:span text:style-name="T617">當你開啟 </text:span><text:span text:style-name="T634">Google </text:span><text:span text:style-name="T617">或 </text:span><text:span text:style-name="T634">YouTube</text:span><text:span text:style-name="T617">，不需跨越太平洋連到美國總部，而是連到你附近的 </text:span><text:span text:style-name="T634">CDN </text:span><text:span text:style-name="T617">節點</text:span><text:span text:style-name="T111">，大幅縮短延遲。</text:span>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6"><text:span text:style-name="T222">🌍 <text:s/></text:span><text:span text:style-name="T65">CDN </text:span><text:span text:style-name="T53">完整流程（一定要記）</text:span></text:p>
            <text:p text:style-name="P7" loext:marker-style-name="T112"><text:span text:style-name="T177">Step 1 </text:span><text:span text:style-name="T113">使用者輸入網址</text:span><text:span text:style-name="T111">（</text:span><text:span text:style-name="T177">www.example.com</text:span><text:span text:style-name="T111">）</text:span></text:p>
            <text:p text:style-name="P8" loext:marker-style-name="T112"><text:span text:style-name="T177">Step 2 </text:span><text:span text:style-name="T183">DNS </text:span><text:span text:style-name="T118">解析網址</text:span><text:span text:style-name="T111">，</text:span><text:span text:style-name="T375">找到對應 </text:span><text:span text:style-name="T385">CDN </text:span><text:span text:style-name="T375">的 </text:span><text:span text:style-name="T385">CNAME </text:span><text:span text:style-name="T375">記錄</text:span></text:p>
            <text:p text:style-name="P8" loext:marker-style-name="T112"><text:span text:style-name="T177">Step 3 </text:span><text:span text:style-name="T719">CNAME </text:span><text:span text:style-name="T720">將請求轉向 </text:span><text:span text:style-name="T719">CDN </text:span><text:span text:style-name="T720">服務商</text:span><text:span text:style-name="T111">（如 </text:span><text:span text:style-name="T177">cdn.example.net</text:span><text:span text:style-name="T111">）</text:span></text:p>
            <text:p text:style-name="P8" loext:marker-style-name="T112"><text:span text:style-name="T177">Step 4 </text:span><text:span text:style-name="T353">CDN </text:span><text:span text:style-name="T326">根據使用者地理位置，選擇最近的 </text:span><text:span text:style-name="T353">Edge </text:span><text:span text:style-name="T326">伺服器</text:span></text:p>
            <text:p text:style-name="P8" loext:marker-style-name="T112"><text:span text:style-name="T177">Step 5 Edge </text:span><text:span text:style-name="T111">伺服器將</text:span><text:span text:style-name="T526">快取內容</text:span><text:span text:style-name="T111">回傳給使用者，完成請求</text:span>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4" loext:marker-style-name="T71"><text:span text:style-name="T72">關鍵名詞</text:span><text:span text:style-name="T71"/></text:p>
          </table:table-cell>
          <table:table-cell table:style-name="表格100.A2" office:value-type="string">
            <text:p text:style-name="P4" loext:marker-style-name="T71"><text:span text:style-name="T72">說明</text:span><text:span text:style-name="T71"/></text:p>
          </table:table-cell>
        </table:table-row>
        <table:table-row table:style-name="表格100.1">
          <table:table-cell table:style-name="表格100.A3" office:value-type="string">
            <text:p text:style-name="P42" loext:marker-style-name="T85"><text:span text:style-name="T161">CNAME</text:span><text:span text:style-name="T86">（別名記錄）</text:span></text:p>
          </table:table-cell>
          <table:table-cell table:style-name="表格100.A3" office:value-type="string">
            <text:p text:style-name="P42" loext:marker-style-name="T85"><text:span text:style-name="T169">DNS </text:span><text:span text:style-name="T101">的一種記錄</text:span><text:span text:style-name="T86">，作用是「</text:span><text:span text:style-name="T721">網址指向另一個網址</text:span><text:span text:style-name="T86">」（不是 </text:span><text:span text:style-name="T161">IP</text:span><text:span text:style-name="T86">）。範例：</text:span><text:span text:style-name="T568">www.example.com → cdn.example.net</text:span></text:p>
          </table:table-cell>
        </table:table-row>
        <table:table-row table:style-name="表格100.1">
          <table:table-cell table:style-name="表格100.A4" office:value-type="string">
            <text:p text:style-name="P42" loext:marker-style-name="T85"><text:span text:style-name="T161">Edge Server</text:span><text:span text:style-name="T86">（邊緣伺服器）</text:span></text:p>
          </table:table-cell>
          <table:table-cell table:style-name="表格100.A4" office:value-type="string">
            <text:p text:style-name="P42" loext:marker-style-name="T85"><text:span text:style-name="T583">部署在全球各地靠近使用者的伺服器</text:span><text:span text:style-name="T86">，負責快取並就近回應請求，大幅減少延遲。</text:span>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6"><text:span text:style-name="T222">⚡ <text:s/></text:span><text:span text:style-name="T227">記憶口訣</text:span></text:p>
            <text:p text:style-name="P7" loext:marker-style-name="T112"><text:span text:style-name="T111">「</text:span><text:span text:style-name="T177">CDN</text:span><text:span text:style-name="T111">：網址轉轉轉，資料找最近」→ </text:span><text:span text:style-name="T719">CNAME</text:span><text:span text:style-name="T720">＝網址→網址</text:span><text:span text:style-name="T111">（不是 </text:span><text:span text:style-name="T177">IP</text:span><text:span text:style-name="T111">！）；</text:span><text:span text:style-name="T177">Edge</text:span><text:span text:style-name="T111">＝就近服務，不用跑遠。</text:span></text:p>
          </table:table-cell>
          <table:covered-table-cell/>
        </table:table-row>
      </table:table>
      <text:h text:style-name="P11" text:outline-level="2" loext:marker-style-name="T27"><text:span text:style-name="T28">四、</text:span><text:span text:style-name="T27">5G </text:span><text:span text:style-name="T28">新世代行動網路</text:span>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4" loext:marker-style-name="T77"><text:span text:style-name="T78">四大核心特性</text:span><text:span text:style-name="T77"/></text:p>
            </table:table-cell>
            <table:table-cell table:style-name="表格101.A1" office:value-type="string">
              <text:p text:style-name="P4" loext:marker-style-name="T77"><text:span text:style-name="T78">說明</text:span><text:span text:style-name="T77"/>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42" loext:marker-style-name="T149"><text:span text:style-name="T212">① </text:span><text:span text:style-name="T153">高速傳輸（</text:span><text:span text:style-name="T215">eMBB</text:span><text:span text:style-name="T153">）</text:span></text:p>
          </table:table-cell>
          <table:table-cell table:style-name="表格101.A2" office:value-type="string">
            <text:p text:style-name="P42" loext:marker-style-name="T149"><text:span text:style-name="T212">Enhanced Mobile Broadband — </text:span><text:span text:style-name="T150">比 </text:span><text:span text:style-name="T212">4G </text:span><text:span text:style-name="T150">快數十倍，適合高畫質影音、</text:span><text:span text:style-name="T212">AR/VR</text:span></text:p>
          </table:table-cell>
        </table:table-row>
        <table:table-row table:style-name="表格101.1">
          <table:table-cell table:style-name="表格101.A3" office:value-type="string">
            <text:p text:style-name="P42" loext:marker-style-name="T149"><text:span text:style-name="T212">② </text:span><text:span text:style-name="T153">超低延遲（</text:span><text:span text:style-name="T215">URLLC</text:span><text:span text:style-name="T153">）</text:span></text:p>
          </table:table-cell>
          <table:table-cell table:style-name="表格101.A3" office:value-type="string">
            <text:p text:style-name="P42" loext:marker-style-name="T149"><text:span text:style-name="T212">Ultra-Reliable Low Latency — </text:span><text:span text:style-name="T150">延遲低至 </text:span><text:span text:style-name="T212">1ms </text:span><text:span text:style-name="T150">以下，適合自動駕駛、遠端手術</text:span></text:p>
          </table:table-cell>
        </table:table-row>
        <table:table-row table:style-name="表格101.1">
          <table:table-cell table:style-name="表格101.A2" office:value-type="string">
            <text:p text:style-name="P42" loext:marker-style-name="T149"><text:span text:style-name="T212">③ </text:span><text:span text:style-name="T153">大量連線（</text:span><text:span text:style-name="T215">mMTC</text:span><text:span text:style-name="T153">）</text:span></text:p>
          </table:table-cell>
          <table:table-cell table:style-name="表格101.A2" office:value-type="string">
            <text:p text:style-name="P42" loext:marker-style-name="T149"><text:span text:style-name="T212">Massive Machine Type — </text:span><text:span text:style-name="T150">每平方公里</text:span><text:span text:style-name="T425">可連數百萬台裝置</text:span><text:span text:style-name="T150">，適合 </text:span><text:span text:style-name="T212">IoT </text:span><text:span text:style-name="T150">大規模部署</text:span></text:p>
          </table:table-cell>
        </table:table-row>
        <table:table-row table:style-name="表格101.1">
          <table:table-cell table:style-name="表格101.A3" office:value-type="string">
            <text:p text:style-name="P42" loext:marker-style-name="T149"><text:span text:style-name="T212">④ </text:span><text:span text:style-name="T153">網路切片（</text:span><text:span text:style-name="T215">Network Slicing</text:span><text:span text:style-name="T153">）</text:span></text:p>
          </table:table-cell>
          <table:table-cell table:style-name="表格101.A3" office:value-type="string">
            <text:p text:style-name="P42" loext:marker-style-name="T149"><text:span text:style-name="T648">將同一物理網路虛擬化為多個獨立「切片」</text:span><text:span text:style-name="T150">，各自不同 </text:span><text:span text:style-name="T212">QoS</text:span><text:span text:style-name="T150">（如一片給醫療、一片給遊戲）</text:span>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6"><text:span text:style-name="T222">⚡ <text:s/></text:span><text:span text:style-name="T227">記憶口訣</text:span></text:p>
            <text:p text:style-name="P7" loext:marker-style-name="T112"><text:span text:style-name="T111">「</text:span><text:span text:style-name="T353">5G </text:span><text:span text:style-name="T326">快、低、多、切</text:span><text:span text:style-name="T111">」→ 快（</text:span><text:span text:style-name="T177">eMBB</text:span><text:span text:style-name="T111">）＝高速；低（</text:span><text:span text:style-name="T177">URLLC</text:span><text:span text:style-name="T111">）＝超低延遲；多（</text:span><text:span text:style-name="T177">mMTC</text:span><text:span text:style-name="T111">）＝大量連</text:span><text:soft-page-break/><text:span text:style-name="T111">線；切＝網路切片。</text:span></text:p>
          </table:table-cell>
          <table:covered-table-cell/>
        </table:table-row>
      </table:table>
      <text:h text:style-name="P11" text:outline-level="2" loext:marker-style-name="T27"><text:span text:style-name="T28">五、本篇陷阱與情境串連</text:span><text:span text:style-name="T27"/>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4" loext:marker-style-name="T77"><text:span text:style-name="T78">常見錯誤</text:span><text:span text:style-name="T77"/></text:p>
            </table:table-cell>
            <table:table-cell table:style-name="表格102.A1" office:value-type="string">
              <text:p text:style-name="P4" loext:marker-style-name="T77"><text:span text:style-name="T78">正確觀念</text:span><text:span text:style-name="T77"/></text:p>
            </table:table-cell>
            <table:table-cell table:style-name="表格102.A1" office:value-type="string">
              <text:p text:style-name="P4" loext:marker-style-name="T77"><text:span text:style-name="T78">主題</text:span><text:span text:style-name="T77"/>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42" loext:marker-style-name="T149"><text:span text:style-name="T212">SDN </text:span><text:span text:style-name="T150">是把控制與資料整合</text:span></text:p>
          </table:table-cell>
          <table:table-cell table:style-name="表格102.A2" office:value-type="string">
            <text:p text:style-name="P42" loext:marker-style-name="T149"><text:span text:style-name="T212">SDN = </text:span><text:span text:style-name="T150">控制與資料「分離」</text:span></text:p>
          </table:table-cell>
          <table:table-cell table:style-name="表格102.A2" office:value-type="string">
            <text:p text:style-name="P42" loext:marker-style-name="T149"><text:span text:style-name="T212">SDN</text:span><text:span text:style-name="T149"/></text:p>
          </table:table-cell>
        </table:table-row>
        <table:table-row table:style-name="表格102.1">
          <table:table-cell table:style-name="表格102.A3" office:value-type="string">
            <text:p text:style-name="P42" loext:marker-style-name="T149"><text:span text:style-name="T212">Round Robin </text:span><text:span text:style-name="T150">會考慮伺服器效能</text:span></text:p>
          </table:table-cell>
          <table:table-cell table:style-name="表格102.A3" office:value-type="string">
            <text:p text:style-name="P42" loext:marker-style-name="T149"><text:span text:style-name="T212">RR </text:span><text:span text:style-name="T150">不看效能，</text:span><text:span text:style-name="T212">Weighted RR </text:span><text:span text:style-name="T150">才看</text:span></text:p>
          </table:table-cell>
          <table:table-cell table:style-name="表格102.A3" office:value-type="string">
            <text:p text:style-name="P42" loext:marker-style-name="T149"><text:span text:style-name="T212">LB</text:span><text:span text:style-name="T149"/></text:p>
          </table:table-cell>
        </table:table-row>
        <table:table-row table:style-name="表格102.1">
          <table:table-cell table:style-name="表格102.A2" office:value-type="string">
            <text:p text:style-name="P42" loext:marker-style-name="T149"><text:span text:style-name="T212">Stickiness </text:span><text:span text:style-name="T150">是平均分配流量</text:span></text:p>
          </table:table-cell>
          <table:table-cell table:style-name="表格102.A2" office:value-type="string">
            <text:p text:style-name="P42" loext:marker-style-name="T149"><text:span text:style-name="T212">Stickiness = </text:span><text:span text:style-name="T150">固定同一台 </text:span><text:span text:style-name="T212">Server</text:span></text:p>
          </table:table-cell>
          <table:table-cell table:style-name="表格102.A2" office:value-type="string">
            <text:p text:style-name="P42" loext:marker-style-name="T149"><text:span text:style-name="T212">LB</text:span><text:span text:style-name="T149"/></text:p>
          </table:table-cell>
        </table:table-row>
        <table:table-row table:style-name="表格102.1">
          <table:table-cell table:style-name="表格102.A3" office:value-type="string">
            <text:p text:style-name="P42" loext:marker-style-name="T149"><text:span text:style-name="T212">CDN </text:span><text:span text:style-name="T150">是把資料放在中心機房</text:span></text:p>
          </table:table-cell>
          <table:table-cell table:style-name="表格102.A3" office:value-type="string">
            <text:p text:style-name="P42" loext:marker-style-name="T149"><text:span text:style-name="T212">CDN </text:span><text:span text:style-name="T150">放在</text:span><text:span text:style-name="T613">靠近使用者的 </text:span><text:span text:style-name="T615">Edge </text:span><text:span text:style-name="T613">節點</text:span></text:p>
          </table:table-cell>
          <table:table-cell table:style-name="表格102.A3" office:value-type="string">
            <text:p text:style-name="P42" loext:marker-style-name="T149"><text:span text:style-name="T212">CDN</text:span><text:span text:style-name="T149"/></text:p>
          </table:table-cell>
        </table:table-row>
        <table:table-row table:style-name="表格102.1">
          <table:table-cell table:style-name="表格102.A2" office:value-type="string">
            <text:p text:style-name="P42" loext:marker-style-name="T149"><text:span text:style-name="T212">CNAME </text:span><text:span text:style-name="T150">是 </text:span><text:span text:style-name="T212">IP </text:span><text:span text:style-name="T150">位址的對應</text:span></text:p>
          </table:table-cell>
          <table:table-cell table:style-name="表格102.A2" office:value-type="string">
            <text:p text:style-name="P42" loext:marker-style-name="T149"><text:span text:style-name="T382">CNAME = </text:span><text:span text:style-name="T369">網址 → 網址</text:span><text:span text:style-name="T150">（非 </text:span><text:span text:style-name="T212">IP</text:span><text:span text:style-name="T150">）</text:span></text:p>
          </table:table-cell>
          <table:table-cell table:style-name="表格102.A2" office:value-type="string">
            <text:p text:style-name="P42" loext:marker-style-name="T149"><text:span text:style-name="T212">CDN</text:span><text:span text:style-name="T149"/></text:p>
          </table:table-cell>
        </table:table-row>
        <table:table-row table:style-name="表格102.1">
          <table:table-cell table:style-name="表格102.A3" office:value-type="string">
            <text:p text:style-name="P42" loext:marker-style-name="T149"><text:span text:style-name="T212">WiFi </text:span><text:span text:style-name="T150">使用 </text:span><text:span text:style-name="T212">CSMA/CD</text:span></text:p>
          </table:table-cell>
          <table:table-cell table:style-name="表格102.A3" office:value-type="string">
            <text:p text:style-name="P42" loext:marker-style-name="T149"><text:span text:style-name="T214">WiFi </text:span><text:span text:style-name="T151">用 </text:span><text:span text:style-name="T214">CSMA/CA</text:span><text:span text:style-name="T150">（</text:span><text:span text:style-name="T212">CD </text:span><text:span text:style-name="T150">是有線網路）</text:span></text:p>
          </table:table-cell>
          <table:table-cell table:style-name="表格102.A3" office:value-type="string">
            <text:p text:style-name="P42" loext:marker-style-name="T149"><text:span text:style-name="T212">WiFi</text:span><text:span text:style-name="T149"/></text:p>
          </table:table-cell>
        </table:table-row>
        <table:table-row table:style-name="表格102.1">
          <table:table-cell table:style-name="表格102.A2" office:value-type="string">
            <text:p text:style-name="P42" loext:marker-style-name="T149"><text:span text:style-name="T212">5G </text:span><text:span text:style-name="T150">只是速度變快</text:span></text:p>
          </table:table-cell>
          <table:table-cell table:style-name="表格102.A2" office:value-type="string">
            <text:p text:style-name="P42" loext:marker-style-name="T149"><text:span text:style-name="T212">5G </text:span><text:span text:style-name="T150">還有低延遲、大量連線、網路切片</text:span></text:p>
          </table:table-cell>
          <table:table-cell table:style-name="表格102.A2" office:value-type="string">
            <text:p text:style-name="P42" loext:marker-style-name="T149"><text:span text:style-name="T212">5G</text:span><text:span text:style-name="T149"/>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6"><text:span text:style-name="T222">🔗 <text:s/></text:span><text:span text:style-name="T53">使用情境串連（理解記憶）</text:span></text:p>
            <text:p text:style-name="P7" loext:marker-style-name="T112"><text:span text:style-name="T111">想像你用手機打開 </text:span><text:span text:style-name="T177">App</text:span><text:span text:style-name="T111">：① 開啟 </text:span><text:span text:style-name="T177">App → Application Layer</text:span><text:span text:style-name="T111">；② </text:span><text:span text:style-name="T177">SDN Controller </text:span><text:span text:style-name="T111">決定資料怎麼走 → </text:span><text:span text:style-name="T177">Control Layer</text:span><text:span text:style-name="T111">；③ </text:span><text:span text:style-name="T177">Router/Switch </text:span><text:span text:style-name="T111">實際傳送 → </text:span><text:span text:style-name="T177">Infrastructure Layer</text:span><text:span text:style-name="T111">；④ </text:span><text:span text:style-name="T177">Load Balancer </text:span><text:span text:style-name="T111">把請求分配到空閒伺服器 → </text:span><text:span text:style-name="T177">Load Balancing</text:span><text:span text:style-name="T111">；⑤ </text:span><text:span text:style-name="T177">CDN </text:span><text:span text:style-name="T111">找最近節點傳回網頁 → </text:span><text:span text:style-name="T177">CDN Edge</text:span><text:span text:style-name="T111">；⑥ 資料透過 </text:span><text:span text:style-name="T177">WiFi </text:span><text:span text:style-name="T111">或 </text:span><text:span text:style-name="T177">5G </text:span><text:span text:style-name="T111">傳到你的手機。</text:span></text:p>
          </table:table-cell>
          <table:covered-table-cell/>
          <table:covered-table-cell/>
        </table:table-row>
      </table:table>
      <text:h text:style-name="P32" text:outline-level="1" loext:marker-style-name="T73"><text:span text:style-name="T74">第 九 篇　無線通訊：</text:span><text:span text:style-name="T73">WiFi vs Bluetooth</text:span>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6"><text:span text:style-name="T222">💡 <text:s/></text:span><text:span text:style-name="T53">核心問題：大家同時說話會怎樣？</text:span></text:p>
            <text:p text:style-name="P7" loext:marker-style-name="T112"><text:span text:style-name="T111">很多裝置想</text:span><text:span text:style-name="T135">用無線電波傳資料</text:span><text:span text:style-name="T111">，</text:span><text:span text:style-name="T372">若同時傳訊號會「撞在一起」</text:span><text:span text:style-name="T111">。</text:span><text:span text:style-name="T579">這個「決定誰先傳」的規則，就叫 </text:span><text:span text:style-name="T602">MAC </text:span><text:span text:style-name="T579">機制（</text:span><text:span text:style-name="T602">Media Access Control</text:span><text:span text:style-name="T579">）</text:span><text:span text:style-name="T111">。⚠️ 注意：這裡的 </text:span><text:span text:style-name="T177">MAC </text:span><text:span text:style-name="T111">指「誰先傳資料的規則」，不是 </text:span><text:span text:style-name="T177">MAC </text:span><text:span text:style-name="T111">位址（硬體位址）！</text:span></text:p>
          </table:table-cell>
        </table:table-row>
      </table:table>
      <text:h text:style-name="P11" text:outline-level="2" loext:marker-style-name="T27"><text:span text:style-name="T28">一、</text:span><text:span text:style-name="T32">WiFi</text:span><text:span text:style-name="T31">：先聽再講（</text:span><text:span text:style-name="T32">CSMA/CA</text:span><text:span text:style-name="T31">）</text:span></text:h>
      <text:p text:style-name="P48" loext:marker-style-name="T112"><text:span text:style-name="T702">WiFi </text:span><text:span text:style-name="T697">採用「先聽再講」的競爭機制</text:span><text:span text:style-name="T111">，就像一群人用對講機：① </text:span><text:span text:style-name="T135">先聽頻道有沒有人在傳</text:span><text:span text:style-name="T111">；② </text:span><text:span text:style-name="T135">沒人傳才開始傳</text:span><text:span text:style-name="T111">；③ </text:span><text:span text:style-name="T135">有人在傳就等一段隨機時間再試</text:span><text:span text:style-name="T111">。</text:span>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4" loext:marker-style-name="T71"><text:span text:style-name="T81">CSMA/CA </text:span><text:span text:style-name="T72">拆解</text:span></text:p>
            </table:table-cell>
            <table:table-cell table:style-name="表格104.A1" office:value-type="string">
              <text:p text:style-name="P4" loext:marker-style-name="T71"><text:span text:style-name="T72">意義</text:span><text:span text:style-name="T71"/>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20"><text:span text:style-name="T722">Carrier Sense</text:span><text:span text:style-name="T723"> </text:span><text:span text:style-name="T716">載波感測</text:span></text:p>
          </table:table-cell>
          <table:table-cell table:style-name="表格104.A2" office:value-type="string">
            <text:p text:style-name="P51">先聽頻道有沒有人在用</text:p>
          </table:table-cell>
        </table:table-row>
        <table:table-row table:style-name="表格104.1">
          <table:table-cell table:style-name="表格104.A3" office:value-type="string">
            <text:p text:style-name="P25"><text:span text:style-name="T722">Multiple Access </text:span><text:span text:style-name="T307">多重存取</text:span></text:p>
          </table:table-cell>
          <table:table-cell table:style-name="表格104.A3" office:value-type="string">
            <text:p text:style-name="P52">大家共用同一個頻道</text:p>
          </table:table-cell>
        </table:table-row>
        <table:table-row table:style-name="表格104.1">
          <table:table-cell table:style-name="表格104.A2" office:value-type="string">
            <text:p text:style-name="P26"><text:span text:style-name="T722">Collision Avoidance </text:span><text:span text:style-name="T522">碰撞避免</text:span></text:p>
          </table:table-cell>
          <table:table-cell table:style-name="表格104.A2" office:value-type="string">
            <text:p text:style-name="P53">盡量「避免」訊號互撞（而非偵測後再處理）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6"><text:span text:style-name="T222">📶 <text:s/></text:span><text:span text:style-name="T69">WiFi </text:span><text:span text:style-name="T60">高速基礎</text:span></text:p>
            <text:p text:style-name="P7" loext:marker-style-name="T112"><text:span text:style-name="T111">另：</text:span><text:span text:style-name="T596">OFDM</text:span><text:span text:style-name="T573">（正交分頻多工）</text:span><text:span text:style-name="T111">— </text:span><text:span text:style-name="T663">將資料分成多個子頻道同時傳輸，讓頻寬利用率大幅提升</text:span><text:span text:style-name="T111">，是現代 </text:span><text:span text:style-name="T177">WiFi </text:span><text:span text:style-name="T111">高速傳輸的基礎技術。</text:span>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6"><text:span text:style-name="T222">🚑 <text:s/></text:span><text:span text:style-name="T239">WiFi </text:span><text:span text:style-name="T227">的 </text:span><text:span text:style-name="T239">QoS</text:span><text:span text:style-name="T227">：</text:span><text:span text:style-name="T239">EDCA</text:span></text:p>
            <text:p text:style-name="P7" loext:marker-style-name="T112"><text:span text:style-name="T135">當很多人在搶頻道，某些資料（語音、視訊）需要優先通過</text:span><text:span text:style-name="T111">，這就是 </text:span><text:span text:style-name="T558">EDCA</text:span><text:span text:style-name="T563">（</text:span><text:span text:style-name="T558">Enhanced Distributed Channel Access</text:span><text:span text:style-name="T563">）</text:span><text:span text:style-name="T111">的功能。</text:span><text:span text:style-name="T479">視訊通話</text:span><text:span text:style-name="T492">/</text:span><text:span text:style-name="T479">語音→少等、優先傳</text:span><text:span text:style-name="T111">；</text:span><text:span text:style-name="T323">網頁</text:span><text:span text:style-name="T350">/</text:span><text:span text:style-name="T323">大檔下載→稍微等一下也沒關係</text:span><text:span text:style-name="T111">。</text:span></text:p>
            <text:p text:style-name="P8" loext:marker-style-name="T112"><text:span text:style-name="T111">記憶口訣：</text:span><text:span text:style-name="T177">WiFi = </text:span><text:span text:style-name="T111">急診室排隊制度（心臟病</text:span><text:span text:style-name="T177">/</text:span><text:span text:style-name="T111">語音視訊優先，小感冒</text:span><text:span text:style-name="T177">/</text:span><text:span text:style-name="T111">網頁下載等一下）。</text:span></text:p>
          </table:table-cell>
          <table:covered-table-cell/>
        </table:table-row>
      </table:table>
      <text:h text:style-name="P11" text:outline-level="2" loext:marker-style-name="T27"><text:span text:style-name="T28">二、</text:span><text:span text:style-name="T32">Bluetooth</text:span><text:span text:style-name="T31">：老大排班（</text:span><text:span text:style-name="T32">Master-Slave</text:span><text:span text:style-name="T31">）</text:span></text:h>
      <text:p text:style-name="P48" loext:marker-style-name="T112"><text:span text:style-name="T686">Bluetooth </text:span><text:span text:style-name="T680">不靠「搶」，而是由 </text:span><text:span text:style-name="T686">Master </text:span><text:span text:style-name="T680">統一分配時間</text:span><text:span text:style-name="T111">，</text:span><text:span text:style-name="T383">Slave </text:span><text:span text:style-name="T372">照順序傳資料</text:span><text:span text:style-name="T111">（</text:span><text:span text:style-name="T487">0~1ms </text:span><text:span text:style-name="T472">耳機、</text:span><text:span text:style-name="T487">1~2ms </text:span><text:span text:style-name="T472">滑鼠、</text:span><text:span text:style-name="T487">2~3ms </text:span><text:span text:style-name="T472">鍵盤、</text:span><text:span text:style-name="T487">3~4ms </text:span><text:span text:style-name="T472">再回耳機…</text:span><text:span text:style-name="T111">）。</text:span>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6"><text:span text:style-name="T222">🔵 <text:s/></text:span><text:span text:style-name="T61">為什麼要排班？</text:span></text:p>
            <text:p text:style-name="P7" loext:marker-style-name="T112"><text:span text:style-name="T111">因為</text:span><text:span text:style-name="T317">藍牙裝置大多是「即時設備」，延遲太久就沒用了</text:span><text:span text:style-name="T111">（耳機你說「你好」</text:span><text:span text:style-name="T177">2 </text:span><text:span text:style-name="T111">秒後才到→完蛋；滑鼠 </text:span><text:span text:style-name="T177">1 </text:span><text:span text:style-name="T111">秒後游標才動→無法使用）。因此 </text:span><text:span text:style-name="T177">Bluetooth </text:span><text:span text:style-name="T111">保留固定時槽（</text:span><text:span text:style-name="T177">Time Slot</text:span><text:span text:style-name="T111">），確保即時性與穩定性。</text:span></text:p>
            <text:p text:style-name="P8" loext:marker-style-name="T112"><text:span text:style-name="T111">記憶口訣：</text:span><text:span text:style-name="T603">WiFi = </text:span><text:span text:style-name="T580">菜市場（自由競爭，亂搶）；</text:span><text:span text:style-name="T603">Bluetooth = </text:span><text:span text:style-name="T580">公司會議室預約（固定排班，有秩序</text:span><text:span text:style-name="T111">）。</text:span>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4" loext:marker-style-name="T71"><text:span text:style-name="T72">即時語音</text:span><text:span text:style-name="T71"/></text:p>
          </table:table-cell>
          <table:table-cell table:style-name="表格105.A2" office:value-type="string">
            <text:p text:style-name="P4" loext:marker-style-name="T71"><text:span text:style-name="T72">全名</text:span><text:span text:style-name="T71"/></text:p>
          </table:table-cell>
          <table:table-cell table:style-name="表格105.A2" office:value-type="string">
            <text:p text:style-name="P4" loext:marker-style-name="T71"><text:span text:style-name="T72">說明</text:span><text:span text:style-name="T71"/></text:p>
          </table:table-cell>
          <table:table-cell table:style-name="表格105.A2" office:value-type="string">
            <text:p text:style-name="P4" loext:marker-style-name="T71"><text:span text:style-name="T72">用途</text:span><text:span text:style-name="T71"/></text:p>
          </table:table-cell>
        </table:table-row>
        <table:table-row table:style-name="表格105.1">
          <table:table-cell table:style-name="表格105.A3" office:value-type="string">
            <text:p text:style-name="P55">SCO</text:p>
          </table:table-cell>
          <table:table-cell table:style-name="表格105.A3" office:value-type="string">
            <text:p text:style-name="P42" loext:marker-style-name="T85"><text:span text:style-name="T161">Synchronous Connection-Oriented</text:span><text:span text:style-name="T85"/></text:p>
          </table:table-cell>
          <table:table-cell table:style-name="表格105.A3" office:value-type="string">
            <text:p text:style-name="P42" loext:marker-style-name="T85"><text:span text:style-name="T86">固定時槽、同步傳輸</text:span><text:span text:style-name="T85"/></text:p>
          </table:table-cell>
          <table:table-cell table:style-name="表格105.A3" office:value-type="string">
            <text:p text:style-name="P42" loext:marker-style-name="T85"><text:span text:style-name="T86">藍牙耳機通話</text:span><text:span text:style-name="T85"/></text:p>
          </table:table-cell>
        </table:table-row>
        <table:table-row table:style-name="表格105.1">
          <table:table-cell table:style-name="表格105.A4" office:value-type="string">
            <text:p text:style-name="P55">eSCO</text:p>
          </table:table-cell>
          <table:table-cell table:style-name="表格105.A4" office:value-type="string">
            <text:p text:style-name="P42" loext:marker-style-name="T85"><text:span text:style-name="T161">Enhanced SCO</text:span><text:span text:style-name="T85"/></text:p>
          </table:table-cell>
          <table:table-cell table:style-name="表格105.A4" office:value-type="string">
            <text:p text:style-name="P42" loext:marker-style-name="T85"><text:span text:style-name="T161">SCO </text:span><text:span text:style-name="T86">加強版、可重傳、品質更好</text:span></text:p>
          </table:table-cell>
          <table:table-cell table:style-name="表格105.A4" office:value-type="string">
            <text:p text:style-name="P42" loext:marker-style-name="T85"><text:span text:style-name="T86">高品質語音</text:span><text:span text:style-name="T85"/>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6"><text:span text:style-name="T222">🔀 </text:span><text:span text:style-name="T224"><text:s/></text:span><text:span text:style-name="T69">Bluetooth </text:span><text:span text:style-name="T60">抗干擾</text:span></text:p>
            <text:p text:style-name="P7" loext:marker-style-name="T112"><text:span text:style-name="T111">另：</text:span><text:span text:style-name="T596">FHSS</text:span><text:span text:style-name="T573">（跳頻展頻）— 在 </text:span><text:span text:style-name="T596">2.4GHz </text:span><text:span text:style-name="T573">頻段中每秒快速切換數百次</text:span><text:span text:style-name="T111">（每秒約 </text:span><text:span text:style-name="T177">1600 </text:span><text:span text:style-name="T111">次）</text:span><text:span text:style-name="T573">頻道</text:span><text:span text:style-name="T111">，</text:span><text:span text:style-name="T372">避免與其他設備干擾，提升穩定性</text:span><text:span text:style-name="T111">。白話：「一直換頻道講話，干擾者跟不上」。</text:span></text:p>
          </table:table-cell>
          <table:covered-table-cell/>
          <table:covered-table-cell/>
          <table:covered-table-cell/>
        </table:table-row>
      </table:table>
      <text:h text:style-name="P11" text:outline-level="2"><text:soft-page-break/><text:span text:style-name="T28">三、深入理解：時槽（</text:span><text:span text:style-name="T27">Time Slot</text:span><text:span text:style-name="T28">）</text:span></text:h>
      <text:p text:style-name="P48" loext:marker-style-name="T112"><text:span text:style-name="T111">時槽就是「切好的時間格子」。</text:span><text:span text:style-name="T674">藍牙頻道像一條只有一個人能講話的走廊</text:span><text:span text:style-name="T111">，如果大家同時講會混在一起亂掉。</text:span><text:span text:style-name="T177">Bluetooth </text:span><text:span text:style-name="T111">的解法：把時間先切成固定小格子，每個格子叫 </text:span><text:span text:style-name="T177">Time Slot</text:span><text:span text:style-name="T111">，每個裝置只在自己的格子裡說話。</text:span>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4" loext:marker-style-name="T77"><text:span text:style-name="T78">三大好處</text:span><text:span text:style-name="T77"/></text:p>
            </table:table-cell>
            <table:table-cell table:style-name="表格106.A1" table:number-columns-spanned="2" office:value-type="string">
              <text:p text:style-name="P4" loext:marker-style-name="T77"><text:span text:style-name="T78">說明</text:span><text:span text:style-name="T77"/></text:p>
            </table:table-cell>
            <table:covered-table-cell/>
            <table:table-cell table:style-name="表格106.A1" office:value-type="string">
              <text:p text:style-name="P4" loext:marker-style-name="T77"><text:span text:style-name="T78">比喻</text:span><text:span text:style-name="T77"/>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42" loext:marker-style-name="T149"><text:span text:style-name="T150">穩定不碰撞</text:span><text:span text:style-name="T149"/></text:p>
          </table:table-cell>
          <table:table-cell table:style-name="表格106.A2" table:number-columns-spanned="2" office:value-type="string">
            <text:p text:style-name="P42" loext:marker-style-name="T149"><text:span text:style-name="T150">每人有專屬時間，不會互相干擾</text:span><text:span text:style-name="T149"/></text:p>
          </table:table-cell>
          <table:covered-table-cell/>
          <table:table-cell table:style-name="表格106.A2" office:value-type="string">
            <text:p text:style-name="P42" loext:marker-style-name="T149"><text:span text:style-name="T150">公司會議室預約制</text:span><text:span text:style-name="T149"/></text:p>
          </table:table-cell>
        </table:table-row>
        <table:table-row table:style-name="表格106.1">
          <table:table-cell table:style-name="表格106.A3" office:value-type="string">
            <text:p text:style-name="P42" loext:marker-style-name="T149"><text:span text:style-name="T150">即時性保證</text:span><text:span text:style-name="T149"/></text:p>
          </table:table-cell>
          <table:table-cell table:style-name="表格106.A3" table:number-columns-spanned="2" office:value-type="string">
            <text:p text:style-name="P42" loext:marker-style-name="T149"><text:span text:style-name="T150">耳機每隔固定時間必定輪到，聲音不卡頓</text:span><text:span text:style-name="T149"/></text:p>
          </table:table-cell>
          <table:covered-table-cell/>
          <table:table-cell table:style-name="表格106.A3" office:value-type="string">
            <text:p text:style-name="P42" loext:marker-style-name="T149"><text:span text:style-name="T150">醫院預約制，準時看診</text:span><text:span text:style-name="T149"/></text:p>
          </table:table-cell>
        </table:table-row>
        <table:table-row table:style-name="表格106.1">
          <table:table-cell table:style-name="表格106.A2" office:value-type="string">
            <text:p text:style-name="P42" loext:marker-style-name="T149"><text:span text:style-name="T150">省電效果</text:span><text:span text:style-name="T149"/></text:p>
          </table:table-cell>
          <table:table-cell table:style-name="表格106.A2" table:number-columns-spanned="2" office:value-type="string">
            <text:p text:style-name="P42" loext:marker-style-name="T149"><text:span text:style-name="T150">裝置知道「還沒輪到我」，可先休眠等待</text:span><text:span text:style-name="T149"/></text:p>
          </table:table-cell>
          <table:covered-table-cell/>
          <table:table-cell table:style-name="表格106.A2" office:value-type="string">
            <text:p text:style-name="P42" loext:marker-style-name="T149"><text:span text:style-name="T150">等候室等叫號，先睡一下</text:span><text:span text:style-name="T149"/>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39" loext:marker-style-name="T71"><text:span text:style-name="T81">WiFi </text:span><text:span text:style-name="T72">競爭制</text:span></text:p>
          </table:table-cell>
          <table:covered-table-cell/>
          <table:table-cell table:style-name="表格106.A1" table:number-columns-spanned="2" office:value-type="string">
            <text:p text:style-name="P39" loext:marker-style-name="T71"><text:span text:style-name="T81">BT </text:span><text:span text:style-name="T72">時槽制</text:span>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42" loext:marker-style-name="T85"><text:span text:style-name="T86">菜市場：大家自由搶。吞吐量高、速度快，但可能塞車、延遲不穩定。</text:span><text:span text:style-name="T85"/></text:p>
          </table:table-cell>
          <table:covered-table-cell/>
          <table:table-cell table:style-name="表格106.A2" table:number-columns-spanned="2" office:value-type="string">
            <text:p text:style-name="P42" loext:marker-style-name="T85"><text:span text:style-name="T86">醫院預約制：輪流看診。延遲固定、穩定省電，但速度不如 </text:span><text:span text:style-name="T161">WiFi </text:span><text:span text:style-name="T86">快。</text:span>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6"><text:span text:style-name="T222">🕐 <text:s/></text:span><text:span text:style-name="T281">考試定義（背起來）</text:span></text:p>
            <text:p text:style-name="P7" loext:marker-style-name="T112"><text:span text:style-name="T597">Time Slot</text:span><text:span text:style-name="T574">（時槽）＝將時間切成固定小區段</text:span><text:span text:style-name="T111">，</text:span><text:span text:style-name="T674">由不同裝置依序使用，避免碰撞並確保即時性</text:span><text:span text:style-name="T111">。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四、</text:span><text:span text:style-name="T27">WiFi vs Bluetooth </text:span><text:span text:style-name="T28">全面比較</text:span>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4" loext:marker-style-name="T71"><text:span text:style-name="T72">項目</text:span><text:span text:style-name="T71"/></text:p>
            </table:table-cell>
            <table:table-cell table:style-name="表格107.A1" office:value-type="string">
              <text:p text:style-name="P4" loext:marker-style-name="T71"><text:span text:style-name="T81">WiFi</text:span><text:span text:style-name="T71"/></text:p>
            </table:table-cell>
            <table:table-cell table:style-name="表格107.A1" office:value-type="string">
              <text:p text:style-name="P4" loext:marker-style-name="T71"><text:span text:style-name="T81">Bluetooth</text:span><text:span text:style-name="T71"/>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54">核心機制</text:p>
          </table:table-cell>
          <table:table-cell table:style-name="表格107.A2" office:value-type="string">
            <text:p text:style-name="P21"><text:span text:style-name="T723">CSMA/CA</text:span><text:span text:style-name="T716">（先偵聽再傳）</text:span></text:p>
          </table:table-cell>
          <table:table-cell table:style-name="表格107.A2" office:value-type="string">
            <text:p text:style-name="P24"><text:span text:style-name="T723">Master-Slave</text:span><text:span text:style-name="T716">（老大排班）</text:span></text:p>
          </table:table-cell>
        </table:table-row>
        <table:table-row table:style-name="表格107.1">
          <table:table-cell table:style-name="表格107.A3" office:value-type="string">
            <text:p text:style-name="P27"><text:span text:style-name="T86">即時語音 </text:span><text:span text:style-name="T161">/ QoS</text:span></text:p>
          </table:table-cell>
          <table:table-cell table:style-name="表格107.A3" office:value-type="string">
            <text:p text:style-name="P28"><text:span text:style-name="T723">EDCA</text:span><text:span text:style-name="T716">（</text:span><text:span text:style-name="T723">QoS </text:span><text:span text:style-name="T716">優先）</text:span></text:p>
          </table:table-cell>
          <table:table-cell table:style-name="表格107.A3" office:value-type="string">
            <text:p text:style-name="P29"><text:span text:style-name="T723">SCO / eSCO</text:span><text:span text:style-name="T716">（藍牙即時語音）</text:span></text:p>
          </table:table-cell>
        </table:table-row>
        <table:table-row table:style-name="表格107.1">
          <table:table-cell table:style-name="表格107.A2" office:value-type="string">
            <text:p text:style-name="P42" loext:marker-style-name="T85"><text:span text:style-name="T86">速度</text:span><text:span text:style-name="T85"/></text:p>
          </table:table-cell>
          <table:table-cell table:style-name="表格107.A2" office:value-type="string">
            <text:p text:style-name="P42" loext:marker-style-name="T85"><text:span text:style-name="T86">高速（快）</text:span><text:span text:style-name="T85"/></text:p>
          </table:table-cell>
          <table:table-cell table:style-name="表格107.A2" office:value-type="string">
            <text:p text:style-name="P42" loext:marker-style-name="T85"><text:span text:style-name="T86">較慢</text:span><text:span text:style-name="T85"/></text:p>
          </table:table-cell>
        </table:table-row>
        <table:table-row table:style-name="表格107.1">
          <table:table-cell table:style-name="表格107.A3" office:value-type="string">
            <text:p text:style-name="P42" loext:marker-style-name="T85"><text:span text:style-name="T86">耗電量</text:span><text:span text:style-name="T85"/></text:p>
          </table:table-cell>
          <table:table-cell table:style-name="表格107.A3" office:value-type="string">
            <text:p text:style-name="P42" loext:marker-style-name="T85"><text:span text:style-name="T86">較高</text:span><text:span text:style-name="T85"/></text:p>
          </table:table-cell>
          <table:table-cell table:style-name="表格107.A3" office:value-type="string">
            <text:p text:style-name="P42" loext:marker-style-name="T85"><text:span text:style-name="T86">低功耗</text:span><text:span text:style-name="T85"/></text:p>
          </table:table-cell>
        </table:table-row>
        <table:table-row table:style-name="表格107.1">
          <table:table-cell table:style-name="表格107.A2" office:value-type="string">
            <text:p text:style-name="P42" loext:marker-style-name="T85"><text:span text:style-name="T86">傳輸距離</text:span><text:span text:style-name="T85"/></text:p>
          </table:table-cell>
          <table:table-cell table:style-name="表格107.A2" office:value-type="string">
            <text:p text:style-name="P42" loext:marker-style-name="T85"><text:span text:style-name="T86">較遠（數十</text:span><text:span text:style-name="T161">~</text:span><text:span text:style-name="T86">百公尺）</text:span></text:p>
          </table:table-cell>
          <table:table-cell table:style-name="表格107.A2" office:value-type="string">
            <text:p text:style-name="P42" loext:marker-style-name="T85"><text:span text:style-name="T86">較短（約 </text:span><text:span text:style-name="T161">10 </text:span><text:span text:style-name="T86">公尺）</text:span></text:p>
          </table:table-cell>
        </table:table-row>
        <table:table-row table:style-name="表格107.1">
          <table:table-cell table:style-name="表格107.A3" office:value-type="string">
            <text:p text:style-name="P42" loext:marker-style-name="T85"><text:span text:style-name="T86">穩定性</text:span><text:span text:style-name="T85"/></text:p>
          </table:table-cell>
          <table:table-cell table:style-name="表格107.A3" office:value-type="string">
            <text:p text:style-name="P56">受干擾影響較大</text:p>
          </table:table-cell>
          <table:table-cell table:style-name="表格107.A3" office:value-type="string">
            <text:p text:style-name="P56">固定時槽非常穩定</text:p>
          </table:table-cell>
        </table:table-row>
        <table:table-row table:style-name="表格107.1">
          <table:table-cell table:style-name="表格107.A2" office:value-type="string">
            <text:p text:style-name="P42" loext:marker-style-name="T85"><text:span text:style-name="T86">適用場景</text:span><text:span text:style-name="T85"/></text:p>
          </table:table-cell>
          <table:table-cell table:style-name="表格107.A2" office:value-type="string">
            <text:p text:style-name="P42" loext:marker-style-name="T85"><text:span text:style-name="T86">上網、看影片、大檔下載</text:span><text:span text:style-name="T85"/></text:p>
          </table:table-cell>
          <table:table-cell table:style-name="表格107.A2" office:value-type="string">
            <text:p text:style-name="P42" loext:marker-style-name="T85"><text:span text:style-name="T86">耳機、滑鼠、鍵盤、通話</text:span><text:span text:style-name="T85"/></text:p>
          </table:table-cell>
        </table:table-row>
      </table:table>
      <text:h text:style-name="P11" text:outline-level="2" loext:marker-style-name="T27"><text:span text:style-name="T28">五、</text:span><text:span text:style-name="T29">L2CAP</text:span><text:span text:style-name="T28">：</text:span><text:span text:style-name="T33">藍牙的資料管理員</text:span></text:h>
      <text:p text:style-name="P48" loext:marker-style-name="T112"><text:span text:style-name="T177">L2CAP</text:span><text:span text:style-name="T111">（</text:span><text:span text:style-name="T177">Logical Link Control and Adaptation Protocol</text:span><text:span text:style-name="T111">）是藍牙協議的重要一層，</text:span><text:span text:style-name="T440">負責：管理並分流不同類型的資料（語音、檔案、控制指令）</text:span><text:span text:style-name="T111">；</text:span><text:span text:style-name="T621">建立、管理、釋放「邏輯通道」</text:span><text:span text:style-name="T111">；</text:span><text:span text:style-name="T577">提供 </text:span><text:span text:style-name="T600">QoS </text:span><text:span text:style-name="T577">服務品質保證</text:span><text:span text:style-name="T111">。一句話記憶：</text:span><text:span text:style-name="T684">L2CAP </text:span><text:span text:style-name="T679">＝ 藍牙的資料管理中心</text:span><text:span text:style-name="T111">。</text:span>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4" loext:marker-style-name="T77"><text:span text:style-name="T78">三種</text:span><text:span text:style-name="T313">邏輯通道</text:span></text:p>
            </table:table-cell>
            <table:table-cell table:style-name="表格108.A1" table:number-columns-spanned="2" office:value-type="string">
              <text:p text:style-name="P4" loext:marker-style-name="T77"><text:span text:style-name="T78">特性</text:span><text:span text:style-name="T77"/></text:p>
            </table:table-cell>
            <table:covered-table-cell/>
            <table:table-cell table:style-name="表格108.A1" office:value-type="string">
              <text:p text:style-name="P4" loext:marker-style-name="T77"><text:span text:style-name="T78">用途</text:span><text:span text:style-name="T77"/>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15"><text:span text:style-name="T217">Connection-oriented</text:span><text:span text:style-name="T158">（連線導向）</text:span></text:p>
          </table:table-cell>
          <table:table-cell table:style-name="表格108.A2" table:number-columns-spanned="2" office:value-type="string">
            <text:p text:style-name="P42" loext:marker-style-name="T149"><text:span text:style-name="T151">有建立連線、雙方確認</text:span><text:span text:style-name="T150">，可靠、確保收到</text:span></text:p>
          </table:table-cell>
          <table:covered-table-cell/>
          <table:table-cell table:style-name="表格108.A2" office:value-type="string">
            <text:p text:style-name="P42" loext:marker-style-name="T149"><text:span text:style-name="T150">重要資料傳輸、檔案（像打電話）</text:span><text:span text:style-name="T149"/></text:p>
          </table:table-cell>
        </table:table-row>
        <table:table-row table:style-name="表格108.1">
          <table:table-cell table:style-name="表格108.A3" office:value-type="string">
            <text:p text:style-name="P15"><text:span text:style-name="T217">Connectionless</text:span><text:span text:style-name="T158">（非連線）</text:span></text:p>
          </table:table-cell>
          <table:table-cell table:style-name="表格108.A3" table:number-columns-spanned="2" office:value-type="string">
            <text:p text:style-name="P42" loext:marker-style-name="T149"><text:span text:style-name="T151">直接送出、不確認</text:span><text:span text:style-name="T150">，快速但可能遺失</text:span></text:p>
          </table:table-cell>
          <table:covered-table-cell/>
          <table:table-cell table:style-name="表格108.A3" office:value-type="string">
            <text:p text:style-name="P42" loext:marker-style-name="T149"><text:span text:style-name="T150">廣播、串流（像廣播）</text:span><text:span text:style-name="T149"/></text:p>
          </table:table-cell>
        </table:table-row>
        <table:table-row table:style-name="表格108.1">
          <table:table-cell table:style-name="表格108.A2" office:value-type="string">
            <text:p text:style-name="P15"><text:span text:style-name="T217">Signaling Channel</text:span><text:span text:style-name="T158">（信令通道）</text:span></text:p>
          </table:table-cell>
          <table:table-cell table:style-name="表格108.A2" table:number-columns-spanned="2" office:value-type="string">
            <text:p text:style-name="P57">控制管理用，不傳資料只管控制</text:p>
          </table:table-cell>
          <table:covered-table-cell/>
          <table:table-cell table:style-name="表格108.A2" office:value-type="string">
            <text:p text:style-name="P42" loext:marker-style-name="T149"><text:span text:style-name="T724">建立</text:span><text:span text:style-name="T726">/</text:span><text:span text:style-name="T724">釋放連線</text:span><text:span text:style-name="T150">、管理參數（像總控室）</text:span>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4" loext:marker-style-name="T71"><text:span text:style-name="T81">OSI </text:span><text:span text:style-name="T72">層</text:span></text:p>
          </table:table-cell>
          <table:covered-table-cell/>
          <table:table-cell table:style-name="表格108.A1" table:number-columns-spanned="2" office:value-type="string">
            <text:p text:style-name="P4" loext:marker-style-name="T71"><text:span text:style-name="T72">藍牙對應</text:span><text:span text:style-name="T71"/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42" loext:marker-style-name="T85"><text:span text:style-name="T86">應用層 </text:span><text:span text:style-name="T161">Application</text:span></text:p>
          </table:table-cell>
          <table:covered-table-cell/>
          <table:table-cell table:style-name="表格108.A2" table:number-columns-spanned="2" office:value-type="string">
            <text:p text:style-name="P42" loext:marker-style-name="T85"><text:span text:style-name="T161">App / </text:span><text:span text:style-name="T86">語音 </text:span><text:span text:style-name="T161">/ </text:span><text:span text:style-name="T86">檔案傳輸</text:span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42" loext:marker-style-name="T85"><text:span text:style-name="T86">傳輸層 </text:span><text:span text:style-name="T161">Transport</text:span></text:p>
          </table:table-cell>
          <table:covered-table-cell/>
          <table:table-cell table:style-name="表格108.A3" table:number-columns-spanned="2" office:value-type="string">
            <text:p text:style-name="P42" loext:marker-style-name="T85"><text:span text:style-name="T86">部分功能在 </text:span><text:span text:style-name="T161">L2CAP</text:span><text:span text:style-name="T86">（資料分段與重組）</text:span>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42" loext:marker-style-name="T85"><text:span text:style-name="T86">網路層 </text:span><text:span text:style-name="T161">Network</text:span></text:p>
          </table:table-cell>
          <table:covered-table-cell/>
          <table:table-cell table:style-name="表格108.A2" table:number-columns-spanned="2" office:value-type="string">
            <text:p text:style-name="P42" loext:marker-style-name="T85"><text:span text:style-name="T86">（幾乎不對應，藍牙無路由概念）</text:span><text:span text:style-name="T85"/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42" loext:marker-style-name="T85"><text:span text:style-name="T86">資料鏈結層 </text:span><text:span text:style-name="T161">Data Link</text:span></text:p>
          </table:table-cell>
          <table:covered-table-cell/>
          <table:table-cell table:style-name="表格108.A3" table:number-columns-spanned="2" office:value-type="string">
            <text:p text:style-name="P42" loext:marker-style-name="T85"><text:span text:style-name="T161">L2CAP / MAC </text:span><text:span text:style-name="T86">排程（通道管理、時槽排程）</text:span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42" loext:marker-style-name="T85"><text:span text:style-name="T86">實體層 </text:span><text:span text:style-name="T161">Physical</text:span></text:p>
          </table:table-cell>
          <table:covered-table-cell/>
          <table:table-cell table:style-name="表格108.A2" table:number-columns-spanned="2" office:value-type="string">
            <text:p text:style-name="P42" loext:marker-style-name="T85"><text:span text:style-name="T86">無線電波（</text:span><text:span text:style-name="T161">2.4GHz</text:span><text:span text:style-name="T86">）</text:span>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6"><text:span text:style-name="T222">📐 <text:s/></text:span><text:span text:style-name="T247">重要</text:span></text:p>
            <text:p text:style-name="P7" loext:marker-style-name="T112"><text:span text:style-name="T343">L2CAP </text:span><text:span text:style-name="T317">主要位於「資料鏈結層（</text:span><text:span text:style-name="T343">Data Link Layer</text:span><text:span text:style-name="T317">）」</text:span><text:span text:style-name="T111">，這是考試常考的知識點！</text:span></text:p>
          </table:table-cell>
          <table:covered-table-cell/>
          <table:covered-table-cell/>
          <table:covered-table-cell/>
        </table:table-row>
      </table:table>
      <text:h text:style-name="P11" text:outline-level="2" loext:marker-style-name="T27"><text:span text:style-name="T28">六、本篇考試陷阱整理</text:span><text:span text:style-name="T27"/>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7"><text:span text:style-name="T197">WiFi </text:span><text:span text:style-name="T132">用什麼避免碰撞？　</text:span><text:span text:style-name="T111">✗ </text:span><text:span text:style-name="T177">CSMA/CD</text:span><text:span text:style-name="T111">（有線乙太網路機制）→ ✓ </text:span><text:span text:style-name="T177">CSMA/CA</text:span><text:span text:style-name="T111">（</text:span><text:span text:style-name="T177">WiFi </text:span><text:span text:style-name="T111">用「避免」碰撞，不是「偵測」）。口訣：有線 </text:span><text:span text:style-name="T177">Ethernet = CD</text:span><text:span text:style-name="T111">（</text:span><text:span text:style-name="T177">Detect</text:span><text:span text:style-name="T111">），無線 </text:span><text:span text:style-name="T177">WiFi = CA</text:span><text:span text:style-name="T111">（</text:span><text:span text:style-name="T177">Avoid</text:span><text:span text:style-name="T111">）。</text:span></text:p>
            <text:p text:style-name="P8"><text:span text:style-name="T197">Bluetooth </text:span><text:span text:style-name="T132">是競爭制還是排程制？　</text:span><text:span text:style-name="T111">✓ 排程制（</text:span><text:span text:style-name="T177">Master-Slave</text:span><text:span text:style-name="T111">，老大安排時槽），不是競爭制。</text:span></text:p>
            <text:p text:style-name="P8"><text:span text:style-name="T132">藍牙即時語音用什麼？　</text:span><text:span text:style-name="T111">✓ </text:span><text:span text:style-name="T177">SCO</text:span><text:span text:style-name="T111">（同步連線）或 </text:span><text:span text:style-name="T177">eSCO</text:span><text:span text:style-name="T111">（加強版，可重傳）。</text:span></text:p>
            <text:p text:style-name="P8"><text:span text:style-name="T197">L2CAP </text:span><text:span text:style-name="T132">控制管理用哪個通道？　</text:span><text:span text:style-name="T111">✓ </text:span><text:span text:style-name="T177">Signaling Channel</text:span><text:span text:style-name="T111">；最可靠＝</text:span><text:span text:style-name="T177">Connection-oriented</text:span><text:span text:style-name="T111">；最快速低延遲＝</text:span><text:span text:style-name="T177">Connectionless</text:span><text:span text:style-name="T111">。</text:span></text:p>
          </table:table-cell>
        </table:table-row>
        <table:table-row table:style-name="表格109.1">
          <table:table-cell table:style-name="表格109.A2" office:value-type="string">
            <text:p text:style-name="P6"><text:span text:style-name="T222">⏱ <text:s/></text:span><text:span text:style-name="T281">考前 </text:span><text:span text:style-name="T287">30 </text:span><text:span text:style-name="T281">秒濃縮</text:span></text:p>
            <text:p text:style-name="P7" loext:marker-style-name="T112"><text:span text:style-name="T177">WiFi</text:span><text:span text:style-name="T111">＝搶頻道 </text:span><text:span text:style-name="T177">· BT</text:span><text:span text:style-name="T111">＝排班 </text:span><text:span text:style-name="T177">· </text:span><text:span text:style-name="T111">時槽＝時間格子 </text:span><text:span text:style-name="T177">· SCO</text:span><text:span text:style-name="T111">＝語音 </text:span><text:span text:style-name="T177">· L2CAP</text:span><text:span text:style-name="T111">＝三通道（位於 </text:span><text:span text:style-name="T177">Data Link </text:span><text:span text:style-name="T111">層）。</text:span></text:p>
          </table:table-cell>
        </table:table-row>
      </table:table>
      <text:h text:style-name="P32" text:outline-level="1" loext:marker-style-name="T73"><text:span text:style-name="T74">第 十 篇　資訊安全：設備防護 </text:span><text:span text:style-name="T73">· </text:span><text:span text:style-name="T74">攻防解析 </text:span><text:span text:style-name="T73">· </text:span><text:span text:style-name="T74">企業資安 </text:span><text:span text:style-name="T73">· Zero Trust</text:span>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6"><text:span text:style-name="T222">🛡️ <text:s/></text:span><text:span text:style-name="T53">本篇地圖</text:span></text:p>
            <text:p text:style-name="P7" loext:marker-style-name="T112"><text:span text:style-name="T111">本篇是全書最大主題，分六大部分：① 防護設備（</text:span><text:span text:style-name="T177">FW/WAF/NGFW/DMZ/IOC/Proxy</text:span><text:span text:style-name="T111">）；② </text:span><text:span text:style-name="T177">SQL Injection </text:span><text:span text:style-name="T111">與 </text:span><text:span text:style-name="T177">Zero-Day </text:span><text:span text:style-name="T111">攻防；③ </text:span><text:span text:style-name="T177">Firewall/IDS/IPS/SNMP/ICMP</text:span><text:span text:style-name="T111">；④ 企業資安三階段；⑤ </text:span><text:span text:style-name="T177">EDR/MDR/MITRE ATT&amp;CK/</text:span><text:span text:style-name="T111">數位韌性；⑥ </text:span><text:span text:style-name="T177">Zero Trust </text:span><text:span text:style-name="T111">零信任。</text:span></text:p>
          </table:table-cell>
        </table:table-row>
      </table:table>
      <text:h text:style-name="P11" text:outline-level="2" loext:marker-style-name="T27"><text:span text:style-name="T28">壹、資安與網路設備：</text:span><text:span text:style-name="T27">FW · WAF · NGFW · DMZ · IOC · Proxy</text:span></text:h>
      <text:p text:style-name="P48" loext:marker-style-name="T112"><text:span text:style-name="T111">想像你家是一間公司：外面是危險的 </text:span><text:span text:style-name="T177">Internet</text:span><text:span text:style-name="T111">，裡面是存放重要資料的內部網路，中間需要多層防護機制層層把關。</text:span>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4" loext:marker-style-name="T71"><text:span text:style-name="T72">名詞</text:span><text:span text:style-name="T71"/></text:p>
            </table:table-cell>
            <table:table-cell table:style-name="表格111.A1" office:value-type="string">
              <text:p text:style-name="P4" loext:marker-style-name="T71"><text:span text:style-name="T72">一行說明</text:span><text:span text:style-name="T71"/>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60"><text:span text:style-name="T176">FW</text:span></text:p>
          </table:table-cell>
          <table:table-cell table:style-name="表格111.A2" office:value-type="string">
            <text:p text:style-name="P42" loext:marker-style-name="T85"><text:span text:style-name="T86">傳統防火牆，只看</text:span><text:span text:style-name="T683">封包「外面」</text:span><text:span text:style-name="T86">的 </text:span><text:span text:style-name="T650">IP</text:span><text:span text:style-name="T649">、</text:span><text:span text:style-name="T650">Port</text:span><text:span text:style-name="T649">、</text:span><text:span text:style-name="T650">Protocol</text:span></text:p>
          </table:table-cell>
        </table:table-row>
        <table:table-row table:style-name="表格111.1">
          <table:table-cell table:style-name="表格111.A3" office:value-type="string">
            <text:p text:style-name="P60"><text:span text:style-name="T176">WAF(</text:span><text:span text:style-name="T221">Web Application Firewall</text:span><text:span text:style-name="T176">)</text:span></text:p>
          </table:table-cell>
          <table:table-cell table:style-name="表格111.A3" office:value-type="string">
            <text:p text:style-name="P42" loext:marker-style-name="T85"><text:span text:style-name="T86">網站應用防火牆，會打開</text:span><text:span text:style-name="T699">封包「裡面」(HTTP/HTTPS 應用層內容)</text:span><text:span text:style-name="T86">，</text:span><text:span text:style-name="T365">防 </text:span><text:span text:style-name="T378">SQL Injection</text:span><text:span text:style-name="T365">、</text:span><text:span text:style-name="T378">XSS</text:span></text:p>
          </table:table-cell>
        </table:table-row>
        <table:table-row table:style-name="表格111.1">
          <table:table-cell table:style-name="表格111.A2" office:value-type="string">
            <text:p text:style-name="P60"><text:span text:style-name="T176">NGFW</text:span></text:p>
          </table:table-cell>
          <table:table-cell table:style-name="表格111.A2" office:value-type="string">
            <text:p text:style-name="P42" loext:marker-style-name="T85"><text:span text:style-name="T86">次世代防火牆，</text:span><text:span text:style-name="T102">比 </text:span><text:span text:style-name="T170">FW </text:span><text:span text:style-name="T102">更聰明</text:span><text:span text:style-name="T86">，有 </text:span><text:span text:style-name="T378">DPI </text:span><text:span text:style-name="T365">深度檢查、</text:span><text:span text:style-name="T378">IPS</text:span><text:span text:style-name="T365">、</text:span><text:span text:style-name="T378">App </text:span><text:span text:style-name="T365">識別</text:span></text:p>
          </table:table-cell>
        </table:table-row>
        <table:table-row table:style-name="表格111.1">
          <table:table-cell table:style-name="表格111.A3" office:value-type="string">
            <text:p text:style-name="P60"><text:span text:style-name="T176">DMZ</text:span></text:p>
          </table:table-cell>
          <table:table-cell table:style-name="表格111.A3" office:value-type="string">
            <text:p text:style-name="P42" loext:marker-style-name="T85"><text:span text:style-name="T86">隔離區，</text:span><text:span text:style-name="T668">把對外服務（</text:span><text:span text:style-name="T673">Web</text:span><text:span text:style-name="T668">、</text:span><text:span text:style-name="T673">Mail</text:span><text:span text:style-name="T668">）放這裡</text:span><text:span text:style-name="T86">，就算被駭也不傷內部</text:span></text:p>
          </table:table-cell>
        </table:table-row>
        <table:table-row table:style-name="表格111.1">
          <table:table-cell table:style-name="表格111.A2" office:value-type="string">
            <text:p text:style-name="P60"><text:span text:style-name="T176">IOC</text:span></text:p>
          </table:table-cell>
          <table:table-cell table:style-name="表格111.A2" office:value-type="string">
            <text:p text:style-name="P42" loext:marker-style-name="T85"><text:span text:style-name="T102">入侵指標（攻擊事後證據）</text:span><text:span text:style-name="T86">：</text:span><text:span text:style-name="T336">Domain</text:span><text:span text:style-name="T299">（網）、</text:span><text:span text:style-name="T336">Hash</text:span><text:span text:style-name="T299">（檔）、</text:span><text:span text:style-name="T336">IP</text:span><text:span text:style-name="T299">（連）、</text:span><text:span text:style-name="T336">C2</text:span><text:span text:style-name="T299">（控）</text:span></text:p>
          </table:table-cell>
        </table:table-row>
        <table:table-row table:style-name="表格111.1">
          <table:table-cell table:style-name="表格111.A3" office:value-type="string">
            <text:p text:style-name="P60"><text:span text:style-name="T176">Proxy</text:span></text:p>
          </table:table-cell>
          <table:table-cell table:style-name="表格111.A3" office:value-type="string">
            <text:p text:style-name="P42" loext:marker-style-name="T85"><text:span text:style-name="T304">正向代理，幫「使用者（</text:span><text:span text:style-name="T341">Client</text:span><text:span text:style-name="T304">）」隱藏 </text:span><text:span text:style-name="T341">IP</text:span><text:span text:style-name="T86">、快取內容</text:span></text:p>
          </table:table-cell>
        </table:table-row>
        <table:table-row table:style-name="表格111.1">
          <table:table-cell table:style-name="表格111.A2" office:value-type="string">
            <text:p text:style-name="P60"><text:span text:style-name="T176">Reverse Proxy</text:span></text:p>
          </table:table-cell>
          <table:table-cell table:style-name="表格111.A2" office:value-type="string">
            <text:p text:style-name="P42" loext:marker-style-name="T85"><text:span text:style-name="T304">反向代理，幫「伺服器</text:span><text:span text:style-name="T86">（</text:span><text:span text:style-name="T161">Server</text:span><text:span text:style-name="T86">）」負載平衡、</text:span><text:span text:style-name="T304">隱藏主機</text:span></text:p>
          </table:table-cell>
        </table:table-row>
      </table:table>
      <text:h text:style-name="P12" text:outline-level="3"><text:span text:style-name="T225">▍</text:span><text:span text:style-name="T230"> </text:span><text:span text:style-name="T231">防火牆 </text:span><text:span text:style-name="T230">Firewall</text:span><text:span text:style-name="T231">（</text:span><text:span text:style-name="T230">FW</text:span><text:span text:style-name="T231">）</text:span></text:h>
      <text:p text:style-name="P48" loext:marker-style-name="T112"><text:span text:style-name="T111">最基本的網路防護設備，像公司門口的警衛。只看封包的「外部資訊」：</text:span><text:span text:style-name="T459">IP </text:span><text:span text:style-name="T438">位址（來者是誰）、</text:span><text:span text:style-name="T459">Port</text:span><text:span text:style-name="T438">（從哪個門進來）、</text:span><text:span text:style-name="T459">Protocol</text:span><text:span text:style-name="T438">（什麼類型）</text:span><text:span text:style-name="T111">。主要運作在 </text:span><text:span text:style-name="T177">L3</text:span><text:span text:style-name="T111">（網路層）與 </text:span><text:span text:style-name="T177">L4</text:span><text:span text:style-name="T111">（傳輸層）。</text:span>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6"><text:span text:style-name="T222">⚠️ <text:s/></text:span><text:span text:style-name="T247">缺點</text:span></text:p>
            <text:p text:style-name="P7" loext:marker-style-name="T112"><text:span text:style-name="T177">FW </text:span><text:span text:style-name="T111">只看外面，不看封包裡面的內容，無法防止應用層攻擊（如 </text:span><text:span text:style-name="T177">SQL Injection</text:span><text:span text:style-name="T111">）。</text:span></text:p>
          </table:table-cell>
        </table:table-row>
      </table:table>
      <text:h text:style-name="P12" text:outline-level="3"><text:span text:style-name="T225">▍</text:span><text:span text:style-name="T226"> </text:span><text:span text:style-name="T231">網站應用防火牆 </text:span><text:span text:style-name="T230">WAF</text:span></text:h>
      <text:p text:style-name="P48" loext:marker-style-name="T112"><text:span text:style-name="T111">進階版防護，會「打開包包檢查內容」，專門防禦網站層面的攻擊：</text:span><text:span text:style-name="T351">SQL Injection</text:span><text:span text:style-name="T324">（注入惡意 </text:span><text:span text:style-name="T351">SQL </text:span><text:span text:style-name="T324">竊取資料庫）、</text:span><text:span text:style-name="T351">XSS</text:span><text:span text:style-name="T324">（插入惡意 </text:span><text:span text:style-name="T351">JavaScript</text:span><text:span text:style-name="T324">）、其他 </text:span><text:span text:style-name="T351">HTTP </text:span><text:span text:style-name="T324">層攻擊（</text:span><text:span text:style-name="T351">CSRF</text:span><text:span text:style-name="T324">、</text:span><text:span text:style-name="T351">Path Traversal</text:span><text:span text:style-name="T324">）</text:span><text:span text:style-name="T111">。</text:span>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4" loext:marker-style-name="T71"><text:span text:style-name="T72">比較項目</text:span><text:span text:style-name="T71"/></text:p>
            </table:table-cell>
            <table:table-cell table:style-name="表格113.A1" office:value-type="string">
              <text:p text:style-name="P65"><text:span text:style-name="T723">FW</text:span></text:p>
            </table:table-cell>
            <table:table-cell table:style-name="表格113.A1" office:value-type="string">
              <text:p text:style-name="P63"><text:span text:style-name="T723">WAF</text:span>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42" loext:marker-style-name="T85"><text:span text:style-name="T86">檢查範圍</text:span><text:span text:style-name="T85"/></text:p>
          </table:table-cell>
          <table:table-cell table:style-name="表格113.A2" office:value-type="string">
            <text:p text:style-name="P66"><text:span text:style-name="T716">封包外面（</text:span><text:span text:style-name="T723">IP/Port</text:span><text:span text:style-name="T716">）</text:span></text:p>
          </table:table-cell>
          <table:table-cell table:style-name="表格113.A2" office:value-type="string">
            <text:p text:style-name="P64"><text:span text:style-name="T716">封包裡面（</text:span><text:span text:style-name="T723">HTTP </text:span><text:span text:style-name="T716">內容）</text:span></text:p>
          </table:table-cell>
        </table:table-row>
        <table:table-row table:style-name="表格113.1">
          <table:table-cell table:style-name="表格113.A3" office:value-type="string">
            <text:p text:style-name="P42" loext:marker-style-name="T85"><text:span text:style-name="T161">OSI </text:span><text:span text:style-name="T86">分層</text:span></text:p>
          </table:table-cell>
          <table:table-cell table:style-name="表格113.A3" office:value-type="string">
            <text:p text:style-name="P42" loext:marker-style-name="T85"><text:span text:style-name="T161">L3 / L4</text:span><text:span text:style-name="T85"/></text:p>
          </table:table-cell>
          <table:table-cell table:style-name="表格113.A3" office:value-type="string">
            <text:p text:style-name="P42" loext:marker-style-name="T85"><text:span text:style-name="T161">L7</text:span><text:span text:style-name="T86">（應用層）</text:span></text:p>
          </table:table-cell>
        </table:table-row>
        <table:table-row table:style-name="表格113.1">
          <table:table-cell table:style-name="表格113.A2" office:value-type="string">
            <text:p text:style-name="P42" loext:marker-style-name="T85"><text:span text:style-name="T86">防禦 </text:span><text:span text:style-name="T161">SQL Injection</text:span></text:p>
          </table:table-cell>
          <table:table-cell table:style-name="表格113.A2" office:value-type="string">
            <text:p text:style-name="P42" loext:marker-style-name="T85"><text:span text:style-name="T161">✗ </text:span><text:span text:style-name="T86">無法</text:span></text:p>
          </table:table-cell>
          <table:table-cell table:style-name="表格113.A2" office:value-type="string">
            <text:p text:style-name="P42" loext:marker-style-name="T85"><text:span text:style-name="T161">○ </text:span><text:span text:style-name="T86">可以</text:span></text:p>
          </table:table-cell>
        </table:table-row>
        <table:table-row table:style-name="表格113.1">
          <table:table-cell table:style-name="表格113.A3" office:value-type="string">
            <text:p text:style-name="P42" loext:marker-style-name="T85"><text:span text:style-name="T86">防禦 </text:span><text:span text:style-name="T161">XSS</text:span></text:p>
          </table:table-cell>
          <table:table-cell table:style-name="表格113.A3" office:value-type="string">
            <text:p text:style-name="P42" loext:marker-style-name="T85"><text:span text:style-name="T161">✗ </text:span><text:span text:style-name="T86">無法</text:span></text:p>
          </table:table-cell>
          <table:table-cell table:style-name="表格113.A3" office:value-type="string">
            <text:p text:style-name="P42" loext:marker-style-name="T85"><text:span text:style-name="T161">○ </text:span><text:span text:style-name="T86">可以</text:span></text:p>
          </table:table-cell>
        </table:table-row>
      </table:table>
      <text:h text:style-name="P12" text:outline-level="3"><text:span text:style-name="T225">▍</text:span><text:span text:style-name="T226"> </text:span><text:span text:style-name="T231">次世代防火牆 </text:span><text:span text:style-name="T230">NGFW</text:span></text:h>
      <text:p text:style-name="P48" loext:marker-style-name="T112"><text:span text:style-name="T111">在傳統 </text:span><text:span text:style-name="T177">FW </text:span><text:span text:style-name="T111">基礎上大幅強化：</text:span><text:span text:style-name="T459">DPI</text:span><text:span text:style-name="T438">（深度封包檢測）、</text:span><text:span text:style-name="T459">IPS</text:span><text:span text:style-name="T438">（入侵防禦）、</text:span><text:span text:style-name="T459">App </text:span><text:span text:style-name="T438">識別（知道你在用 </text:span><text:span text:style-name="T459">LINE </text:span><text:span text:style-name="T438">還是 </text:span><text:span text:style-name="T459">YouTube</text:span><text:span text:style-name="T438">）、使用者身份識別</text:span><text:span text:style-name="T111">。</text:span>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ext:soft-page-break/>
          <table:table-row table:style-name="表格114.1">
            <table:table-cell table:style-name="表格114.A1" office:value-type="string">
              <text:p text:style-name="P39" loext:marker-style-name="T71"><text:span text:style-name="T72">能力</text:span><text:span text:style-name="T71"/></text:p>
            </table:table-cell>
            <table:table-cell table:style-name="表格114.A1" office:value-type="string">
              <text:p text:style-name="P39" loext:marker-style-name="T71"><text:span text:style-name="T81">FW</text:span><text:span text:style-name="T71"/></text:p>
            </table:table-cell>
            <table:table-cell table:style-name="表格114.A1" office:value-type="string">
              <text:p text:style-name="P39" loext:marker-style-name="T71"><text:span text:style-name="T81">WAF</text:span><text:span text:style-name="T71"/></text:p>
            </table:table-cell>
            <table:table-cell table:style-name="表格114.A1" office:value-type="string">
              <text:p text:style-name="P39" loext:marker-style-name="T71"><text:span text:style-name="T81">NGFW</text:span><text:span text:style-name="T71"/>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42" loext:marker-style-name="T85"><text:span text:style-name="T161">IP/Port </text:span><text:span text:style-name="T86">過濾</text:span></text:p>
          </table:table-cell>
          <table:table-cell table:style-name="表格114.A2" office:value-type="string">
            <text:p text:style-name="P41" loext:marker-style-name="T266"><text:span text:style-name="T273">○</text:span><text:span text:style-name="T266"/></text:p>
          </table:table-cell>
          <table:table-cell table:style-name="表格114.A2" office:value-type="string">
            <text:p text:style-name="P41" loext:marker-style-name="T266"><text:span text:style-name="T273">○</text:span><text:span text:style-name="T266"/></text:p>
          </table:table-cell>
          <table:table-cell table:style-name="表格114.A2" office:value-type="string">
            <text:p text:style-name="P41" loext:marker-style-name="T266"><text:span text:style-name="T273">○</text:span><text:span text:style-name="T266"/></text:p>
          </table:table-cell>
        </table:table-row>
        <table:table-row table:style-name="表格114.1">
          <table:table-cell table:style-name="表格114.A3" office:value-type="string">
            <text:p text:style-name="P59"><text:span text:style-name="T161">HTTP </text:span><text:span text:style-name="T86">內容檢查</text:span></text:p>
          </table:table-cell>
          <table:table-cell table:style-name="表格114.A3" office:value-type="string">
            <text:p text:style-name="P41" loext:marker-style-name="T256"><text:span text:style-name="T262">✗</text:span><text:span text:style-name="T256"/></text:p>
          </table:table-cell>
          <table:table-cell table:style-name="表格114.A3" office:value-type="string">
            <text:p text:style-name="P67"><text:span text:style-name="T273">○</text:span></text:p>
          </table:table-cell>
          <table:table-cell table:style-name="表格114.A3" office:value-type="string">
            <text:p text:style-name="P41" loext:marker-style-name="T266"><text:span text:style-name="T273">○</text:span><text:span text:style-name="T266"/></text:p>
          </table:table-cell>
        </table:table-row>
        <table:table-row table:style-name="表格114.1">
          <table:table-cell table:style-name="表格114.A2" office:value-type="string">
            <text:p text:style-name="P42" loext:marker-style-name="T85"><text:span text:style-name="T161">DPI </text:span><text:span text:style-name="T86">深度檢查</text:span></text:p>
          </table:table-cell>
          <table:table-cell table:style-name="表格114.A2" office:value-type="string">
            <text:p text:style-name="P41" loext:marker-style-name="T256"><text:span text:style-name="T262">✗</text:span><text:span text:style-name="T256"/></text:p>
          </table:table-cell>
          <table:table-cell table:style-name="表格114.A2" office:value-type="string">
            <text:p text:style-name="P41" loext:marker-style-name="T256"><text:span text:style-name="T262">✗</text:span><text:span text:style-name="T256"/></text:p>
          </table:table-cell>
          <table:table-cell table:style-name="表格114.A2" office:value-type="string">
            <text:p text:style-name="P41" loext:marker-style-name="T266"><text:span text:style-name="T273">○</text:span><text:span text:style-name="T266"/></text:p>
          </table:table-cell>
        </table:table-row>
        <table:table-row table:style-name="表格114.1">
          <table:table-cell table:style-name="表格114.A3" office:value-type="string">
            <text:p text:style-name="P42" loext:marker-style-name="T85"><text:span text:style-name="T161">App </text:span><text:span text:style-name="T86">識別</text:span></text:p>
          </table:table-cell>
          <table:table-cell table:style-name="表格114.A3" office:value-type="string">
            <text:p text:style-name="P41" loext:marker-style-name="T256"><text:span text:style-name="T262">✗</text:span><text:span text:style-name="T256"/></text:p>
          </table:table-cell>
          <table:table-cell table:style-name="表格114.A3" office:value-type="string">
            <text:p text:style-name="P41" loext:marker-style-name="T256"><text:span text:style-name="T262">✗</text:span><text:span text:style-name="T256"/></text:p>
          </table:table-cell>
          <table:table-cell table:style-name="表格114.A3" office:value-type="string">
            <text:p text:style-name="P41" loext:marker-style-name="T266"><text:span text:style-name="T273">○</text:span><text:span text:style-name="T266"/></text:p>
          </table:table-cell>
        </table:table-row>
        <table:table-row table:style-name="表格114.1">
          <table:table-cell table:style-name="表格114.A2" office:value-type="string">
            <text:p text:style-name="P42" loext:marker-style-name="T85"><text:span text:style-name="T161">IPS </text:span><text:span text:style-name="T86">入侵防禦</text:span></text:p>
          </table:table-cell>
          <table:table-cell table:style-name="表格114.A2" office:value-type="string">
            <text:p text:style-name="P41" loext:marker-style-name="T256"><text:span text:style-name="T262">✗</text:span><text:span text:style-name="T256"/></text:p>
          </table:table-cell>
          <table:table-cell table:style-name="表格114.A2" office:value-type="string">
            <text:p text:style-name="P41" loext:marker-style-name="T256"><text:span text:style-name="T262">✗</text:span><text:span text:style-name="T256"/></text:p>
          </table:table-cell>
          <table:table-cell table:style-name="表格114.A2" office:value-type="string">
            <text:p text:style-name="P41" loext:marker-style-name="T266"><text:span text:style-name="T273">○</text:span><text:span text:style-name="T266"/>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6"><text:span text:style-name="T222">💡 <text:s/></text:span><text:span text:style-name="T227">實務說明</text:span></text:p>
            <text:p text:style-name="P7" loext:marker-style-name="T112"><text:span text:style-name="T177">NGFW </text:span><text:span text:style-name="T111">在現代企業通常用來「取代」傳統 </text:span><text:span text:style-name="T177">FW</text:span><text:span text:style-name="T111">，而非兩者並用。功能越全面，一台就夠了。</text:span></text:p>
          </table:table-cell>
          <table:covered-table-cell/>
          <table:covered-table-cell/>
          <table:covered-table-cell/>
        </table:table-row>
      </table:table>
      <text:h text:style-name="P12" text:outline-level="3"><text:span text:style-name="T225">▍</text:span><text:span text:style-name="T226"> DMZ</text:span><text:span text:style-name="T227">（非軍事區 </text:span><text:span text:style-name="T226">/ </text:span><text:span text:style-name="T227">隔離區）</text:span></text:h>
      <text:p text:style-name="P48" loext:marker-style-name="T112"><text:span text:style-name="T111">網路架構中的「隔離緩衝區」，</text:span><text:span text:style-name="T373">專門放置需要對外公開的服務</text:span><text:span text:style-name="T111">。生活比喻：</text:span><text:span text:style-name="T670">DMZ</text:span><text:span text:style-name="T664">＝大樓門口的接待室，訪客只能到接待室、無法進入辦公室；就算接待室被搗亂，也不影響裡面的員工與機密</text:span><text:span text:style-name="T111">。通常放：</text:span><text:span text:style-name="T177">Web Server</text:span><text:span text:style-name="T111">、</text:span><text:span text:style-name="T177">Mail Server</text:span><text:span text:style-name="T111">、</text:span><text:span text:style-name="T177">DNS Server</text:span><text:span text:style-name="T111">。</text:span>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6"><text:span text:style-name="T222">⚠️ <text:s/></text:span><text:span text:style-name="T247">考試陷阱</text:span></text:p>
            <text:p text:style-name="P7" loext:marker-style-name="T112"><text:span text:style-name="T177">DMZ </text:span><text:span text:style-name="T111">的用途是「隔離保護」（就算 </text:span><text:span text:style-name="T177">DMZ </text:span><text:span text:style-name="T111">內伺服器被駭，駭客也無法直接進入內部網路），不是提升速度，也不是加密資料！</text:span></text:p>
          </table:table-cell>
        </table:table-row>
      </table:table>
      <text:h text:style-name="P12" text:outline-level="3"><text:span text:style-name="T225">▍</text:span><text:span text:style-name="T226"> IOC</text:span><text:span text:style-name="T227">（入侵指標）</text:span></text:h>
      <text:p text:style-name="P48" loext:marker-style-name="T112"><text:span text:style-name="T177">IOC</text:span><text:span text:style-name="T111">（</text:span><text:span text:style-name="T177">Indicator of Compromise</text:span><text:span text:style-name="T111">）是「</text:span><text:span text:style-name="T318">攻擊發生後所留下的已知痕跡與線索</text:span><text:span text:style-name="T111">」，就像警察辦案蒐集到的通緝資料（車牌、電話、指紋、藏身處）。</text:span>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6"><text:span text:style-name="T222">🎯 <text:s/></text:span><text:span text:style-name="T281">核心觀念</text:span></text:p>
            <text:p text:style-name="P7" loext:marker-style-name="T112"><text:span text:style-name="T344">IOC </text:span><text:span text:style-name="T318">是「已發生攻擊的事後證據」</text:span><text:span text:style-name="T111">，</text:span><text:span text:style-name="T524">不是用來預測未來攻擊的工具！</text:span><text:span text:style-name="T111">這點非常容易考錯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39" loext:marker-style-name="T77"><text:span text:style-name="T78">口訣</text:span><text:span text:style-name="T77"/></text:p>
          </table:table-cell>
          <table:table-cell table:style-name="表格116.A2" office:value-type="string">
            <text:p text:style-name="P39" loext:marker-style-name="T77"><text:span text:style-name="T83">IOC </text:span><text:span text:style-name="T78">類型</text:span></text:p>
          </table:table-cell>
          <table:table-cell table:style-name="表格116.A2" office:value-type="string">
            <text:p text:style-name="P39" loext:marker-style-name="T77"><text:span text:style-name="T78">白話說明</text:span><text:span text:style-name="T77"/></text:p>
          </table:table-cell>
          <table:table-cell table:style-name="表格116.A2" office:value-type="string">
            <text:p text:style-name="P39" loext:marker-style-name="T77"><text:span text:style-name="T78">對應防禦工具</text:span><text:span text:style-name="T77"/></text:p>
          </table:table-cell>
        </table:table-row>
        <table:table-row table:style-name="表格116.1">
          <table:table-cell table:style-name="表格116.A3" office:value-type="string">
            <text:p text:style-name="P68"><text:span text:style-name="T280">網</text:span></text:p>
          </table:table-cell>
          <table:table-cell table:style-name="表格116.A3" office:value-type="string">
            <text:p text:style-name="P69"><text:span text:style-name="T714">惡意 </text:span><text:span text:style-name="T718">Domain</text:span><text:span text:style-name="T714">（網域）</text:span></text:p>
          </table:table-cell>
          <table:table-cell table:style-name="表格116.A3" office:value-type="string">
            <text:p text:style-name="P42" loext:marker-style-name="T149"><text:span text:style-name="T150">釣魚網站網址，用來騙帳密、假冒正規網站</text:span><text:span text:style-name="T149"/></text:p>
          </table:table-cell>
          <table:table-cell table:style-name="表格116.A3" office:value-type="string">
            <text:p text:style-name="P42" loext:marker-style-name="T149"><text:span text:style-name="T212">DNS </text:span><text:span text:style-name="T150">伺服器（封鎖惡意網域）</text:span></text:p>
          </table:table-cell>
        </table:table-row>
        <table:table-row table:style-name="表格116.1">
          <table:table-cell table:style-name="表格116.A4" office:value-type="string">
            <text:p text:style-name="P68"><text:span text:style-name="T280">檔</text:span></text:p>
          </table:table-cell>
          <table:table-cell table:style-name="表格116.A4" office:value-type="string">
            <text:p text:style-name="P70"><text:span text:style-name="T714">惡意 </text:span><text:span text:style-name="T718">Hash</text:span><text:span text:style-name="T714">（雜湊值）</text:span></text:p>
          </table:table-cell>
          <table:table-cell table:style-name="表格116.A4" office:value-type="string">
            <text:p text:style-name="P42" loext:marker-style-name="T149"><text:span text:style-name="T370">惡意程式的唯一特徵碼</text:span><text:span text:style-name="T150">，改檔名也能識別</text:span></text:p>
          </table:table-cell>
          <table:table-cell table:style-name="表格116.A4" office:value-type="string">
            <text:p text:style-name="P42" loext:marker-style-name="T149"><text:span text:style-name="T150">防毒軟體 </text:span><text:span text:style-name="T212">AV</text:span><text:span text:style-name="T150">（比對特徵碼）</text:span></text:p>
          </table:table-cell>
        </table:table-row>
        <table:table-row table:style-name="表格116.1">
          <table:table-cell table:style-name="表格116.A3" office:value-type="string">
            <text:p text:style-name="P68"><text:span text:style-name="T280">連</text:span></text:p>
          </table:table-cell>
          <table:table-cell table:style-name="表格116.A3" office:value-type="string">
            <text:p text:style-name="P71"><text:span text:style-name="T714">惡意 </text:span><text:span text:style-name="T718">IP </text:span><text:span text:style-name="T714">位址</text:span></text:p>
          </table:table-cell>
          <table:table-cell table:style-name="表格116.A3" office:value-type="string">
            <text:p text:style-name="P42" loext:marker-style-name="T149"><text:span text:style-name="T150">感染後電腦對外異常連線的目標</text:span><text:span text:style-name="T149"/></text:p>
          </table:table-cell>
          <table:table-cell table:style-name="表格116.A3" office:value-type="string">
            <text:p text:style-name="P42" loext:marker-style-name="T149"><text:span text:style-name="T150">防火牆 </text:span><text:span text:style-name="T212">FW / NGFW</text:span><text:span text:style-name="T150">（封鎖 </text:span><text:span text:style-name="T212">IP</text:span><text:span text:style-name="T150">）</text:span></text:p>
          </table:table-cell>
        </table:table-row>
        <table:table-row table:style-name="表格116.1">
          <table:table-cell table:style-name="表格116.A4" office:value-type="string">
            <text:p text:style-name="P68"><text:span text:style-name="T280">控</text:span></text:p>
          </table:table-cell>
          <table:table-cell table:style-name="表格116.A4" office:value-type="string">
            <text:p text:style-name="P58"><text:span text:style-name="T718">C2 Server</text:span><text:span text:style-name="T714">（指揮控制）</text:span></text:p>
          </table:table-cell>
          <table:table-cell table:style-name="表格116.A4" office:value-type="string">
            <text:p text:style-name="P42" loext:marker-style-name="T149"><text:span text:style-name="T150">駭客遠端操控被感染主機的總部</text:span><text:span text:style-name="T149"/></text:p>
          </table:table-cell>
          <table:table-cell table:style-name="表格116.A4" office:value-type="string">
            <text:p text:style-name="P42" loext:marker-style-name="T149"><text:span text:style-name="T212">SIEM / IDS</text:span><text:span text:style-name="T150">（偵測異常連線）</text:span></text:p>
          </table:table-cell>
        </table:table-row>
        <table:table-row table:style-name="表格116.7">
          <table:table-cell table:style-name="表格116.A7" table:number-columns-spanned="4" office:value-type="string">
            <text:p text:style-name="P6"><text:span text:style-name="T222">▸ <text:s/></text:span><text:span text:style-name="T53">攻擊全流程（</text:span><text:span text:style-name="T65">IOC </text:span><text:span text:style-name="T53">出現在哪裡？）</text:span></text:p>
            <text:p text:style-name="P7" loext:marker-style-name="T112"><text:span text:style-name="T177">①</text:span><text:span text:style-name="T201"> </text:span><text:span text:style-name="T136">駭客準備：建立釣魚網站（</text:span><text:span text:style-name="T201">Domain</text:span><text:span text:style-name="T136">）、製作惡意程式（</text:span><text:span text:style-name="T201">Hash</text:span><text:span text:style-name="T136">）、架設控制中心（</text:span><text:span text:style-name="T201">C2</text:span><text:span text:style-name="T136">）</text:span><text:span text:style-name="T111">→ ② 發動攻擊：</text:span><text:span text:style-name="T134">受害者點釣魚網站 → 下載惡意程式</text:span><text:span text:style-name="T111"> → ③ </text:span><text:span text:style-name="T480">主機感染：電腦自動連回駭客主機（</text:span><text:span text:style-name="T493">IP</text:span><text:span text:style-name="T480">）或 </text:span><text:span text:style-name="T493">C2 </text:span><text:span text:style-name="T177">→ ④ </text:span><text:span text:style-name="T392">駭客控制：下指令、偷資料、橫向移動</text:span><text:span text:style-name="T111"> → ⑤ </text:span><text:span text:style-name="T692">資安系統偵測：比對異常 </text:span><text:span text:style-name="T695">IP</text:span><text:span text:style-name="T692">、惡意 </text:span><text:span text:style-name="T695">Domain</text:span><text:span text:style-name="T692">、已知 </text:span><text:span text:style-name="T695">Hash</text:span><text:span text:style-name="T692">、</text:span><text:span text:style-name="T695">C2 </text:span><text:span text:style-name="T692">行為 →</text:span><text:span text:style-name="T111"> ⑥</text:span><text:span text:style-name="T618"> 判定中毒 → </text:span><text:span text:style-name="T635">IOC </text:span><text:span text:style-name="T618">記錄建立 </text:span><text:span text:style-name="T111">→ 回饋更新防禦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6"><text:span text:style-name="T222">⚡ <text:s/></text:span><text:span text:style-name="T239">10 </text:span><text:span text:style-name="T227">秒口訣速記</text:span></text:p>
            <text:p text:style-name="P7" loext:marker-style-name="T112"><text:span text:style-name="T111">網騙你（</text:span><text:span text:style-name="T177">Domain</text:span><text:span text:style-name="T111">）→ 檔害你（</text:span><text:span text:style-name="T177">Hash</text:span><text:span text:style-name="T111">）→ 連出去（</text:span><text:span text:style-name="T177">IP</text:span><text:span text:style-name="T111">）→ 被控制（</text:span><text:span text:style-name="T177">C2</text:span><text:span text:style-name="T111">）。口訣：「</text:span><text:span text:style-name="T318">網 → 檔 → 連 → 控</text:span><text:span text:style-name="T111">」。</text:span></text:p>
          </table:table-cell>
          <table:covered-table-cell/>
          <table:covered-table-cell/>
          <table:covered-table-cell/>
        </table:table-row>
      </table:table>
      <text:h text:style-name="P12" text:outline-level="3"><text:soft-page-break/><text:span text:style-name="T225">▍</text:span><text:span text:style-name="T226"> Proxy </text:span><text:span text:style-name="T227">與 </text:span><text:span text:style-name="T226">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39" loext:marker-style-name="T71"><text:span text:style-name="T81">🧍 Proxy</text:span><text:span text:style-name="T72">（正向代理）— 幫 </text:span><text:span text:style-name="T81">Client</text:span></text:p>
            </table:table-cell>
            <table:table-cell table:style-name="表格117.A1" office:value-type="string">
              <text:p text:style-name="P39" loext:marker-style-name="T71"><text:span text:style-name="T81">🏢 Reverse Proxy</text:span><text:span text:style-name="T72">（反向代理）— 幫 </text:span><text:span text:style-name="T81">Server</text:span>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42" loext:marker-style-name="T85"><text:span text:style-name="T86">流程：你 → </text:span><text:span text:style-name="T161">Proxy → </text:span><text:span text:style-name="T86">網站。</text:span><text:span text:style-name="T97">隱藏使用者真實</text:span><text:span text:style-name="T86"> </text:span><text:span text:style-name="T161">IP</text:span><text:span text:style-name="T86">、</text:span><text:span text:style-name="T161">Cache </text:span><text:span text:style-name="T86">加速、企業控管員工能存取哪些網站。比喻：你請朋友幫你買東西，店家不知道真正買家是你。</text:span></text:p>
          </table:table-cell>
          <table:table-cell table:style-name="表格117.A2" office:value-type="string">
            <text:p text:style-name="P42" loext:marker-style-name="T85"><text:span text:style-name="T86">流程：你 → </text:span><text:span text:style-name="T161">Reverse Proxy → </text:span><text:span text:style-name="T86">真正 </text:span><text:span text:style-name="T161">Server</text:span><text:span text:style-name="T86">。負載平衡、</text:span><text:span text:style-name="T97">隱藏後端伺服器</text:span><text:span text:style-name="T86">、</text:span><text:span text:style-name="T161">SSL </text:span><text:span text:style-name="T86">終止與安全防護。比喻：公司大廳接待員分流訪客，客人不知道真正辦公室在哪層。</text:span></text:p>
          </table:table-cell>
        </table:table-row>
      </table:table>
      <text:h text:style-name="P12" text:outline-level="3"><text:span text:style-name="T225">▍</text:span><text:span text:style-name="T226"> </text:span><text:span text:style-name="T227">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6"><text:span text:style-name="T222">🚧 <text:s/></text:span><text:span text:style-name="T53">封包闖關順序</text:span></text:p>
            <text:p text:style-name="P7" loext:marker-style-name="T112"><text:span text:style-name="T177">🧍 </text:span><text:span text:style-name="T134">使用者（</text:span><text:span text:style-name="T199">Client</text:span><text:span text:style-name="T134">）</text:span><text:span text:style-name="T111">→ 🔵 </text:span><text:span text:style-name="T199">Proxy</text:span><text:span text:style-name="T111">（選用，隱藏 </text:span><text:span text:style-name="T177">IP/</text:span><text:span text:style-name="T111">上網控管）→ 🌍 </text:span><text:span text:style-name="T199">Internet </text:span><text:span text:style-name="T177">→ 🔥 </text:span><text:span text:style-name="T199">FW/NGFW</text:span><text:span text:style-name="T111">（第一道防線，過濾 </text:span><text:span text:style-name="T177">IP/Port/</text:span><text:span text:style-name="T111">深度檢查）→ 🏝 </text:span><text:span text:style-name="T199">DMZ</text:span><text:span text:style-name="T111">（</text:span><text:span text:style-name="T177">Web/Mail/DNS </text:span><text:span text:style-name="T111">伺服器）→ 🛡</text:span><text:span text:style-name="T132"> </text:span><text:span text:style-name="T199">WAF</text:span><text:span text:style-name="T111">（深度過濾 </text:span><text:span text:style-name="T177">HTTP</text:span><text:span text:style-name="T111">，防 </text:span><text:span text:style-name="T177">SQLi/XSS</text:span><text:span text:style-name="T111">）→ 🪞 </text:span><text:span text:style-name="T179">R</text:span><text:span text:style-name="T199">everse Proxy</text:span><text:span text:style-name="T111">（負載平衡</text:span><text:span text:style-name="T177">/</text:span><text:span text:style-name="T111">隱藏後端）→ 🏢</text:span><text:span text:style-name="T134"> 內部 </text:span><text:span text:style-name="T199">Server</text:span><text:span text:style-name="T111">（核心資產）。</text:span></text:p>
            <text:p text:style-name="P8" loext:marker-style-name="T112"><text:span text:style-name="T177">📌 </text:span><text:span text:style-name="T111">越後面代表越核心、越重要，每一層都是一道關卡，讓駭客越來越難突破。</text:span></text:p>
          </table:table-cell>
        </table:table-row>
        <table:table-row table:style-name="表格118.1">
          <table:table-cell table:style-name="表格118.A2" office:value-type="string">
            <text:p text:style-name="P6"><text:span text:style-name="T222">🔑 <text:s/></text:span><text:span text:style-name="T281">萬用口訣</text:span></text:p>
            <text:p text:style-name="P7" loext:marker-style-name="T112"><text:span text:style-name="T177">FW </text:span><text:span text:style-name="T111">封外、</text:span><text:span text:style-name="T177">WAF </text:span><text:span text:style-name="T111">看內、</text:span><text:span text:style-name="T177">NGFW </text:span><text:span text:style-name="T111">最強、</text:span><text:span text:style-name="T177">DMZ </text:span><text:span text:style-name="T111">隔離、</text:span><text:span text:style-name="T177">IOC </text:span><text:span text:style-name="T111">壞人、</text:span><text:span text:style-name="T177">Proxy </text:span><text:span text:style-name="T111">幫客、</text:span><text:span text:style-name="T177">Reverse </text:span><text:span text:style-name="T111">幫服。</text:span></text:p>
          </table:table-cell>
        </table:table-row>
      </table:table>
      <text:h text:style-name="P11" text:outline-level="2" loext:marker-style-name="T27"><text:span text:style-name="T28">貳、</text:span><text:span text:style-name="T27">SQL Injection × Zero-Day × </text:span><text:span text:style-name="T28">防禦機制</text:span></text:h>
      <text:h text:style-name="P12" text:outline-level="3"><text:span text:style-name="T225">▍</text:span><text:span text:style-name="T226"> SQL Injection</text:span><text:span text:style-name="T227">（</text:span><text:span text:style-name="T226">SQL </text:span><text:span text:style-name="T227">注入攻擊）</text:span></text:h>
      <text:p text:style-name="P48" loext:marker-style-name="T112"><text:span text:style-name="T111">當你在登入頁輸入帳密，後端會把輸入組合成 </text:span><text:span text:style-name="T177">SQL </text:span><text:span text:style-name="T111">送到資料庫查詢，例如：</text:span><text:span text:style-name="T177">SELECT * FROM users WHERE account='john' AND password='1234'</text:span><text:span text:style-name="T111">。</text:span>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6"><text:span text:style-name="T222">💉 <text:s/></text:span><text:span text:style-name="T247">什麼是 </text:span><text:span text:style-name="T251">SQL Injection</text:span><text:span text:style-name="T247">？</text:span></text:p>
            <text:p text:style-name="P7"><text:span text:style-name="T243">核心一句話：</text:span><text:span text:style-name="T725">把原本只是「資料」的輸入，惡意改造成可執行的「</text:span><text:span text:style-name="T727">SQL </text:span><text:span text:style-name="T725">指令」</text:span><text:span text:style-name="T111">。</text:span></text:p>
            <text:p text:style-name="P8" loext:marker-style-name="T112"><text:span text:style-name="T111">駭客在帳號欄位輸入：</text:span><text:span text:style-name="T177">' </text:span><text:span text:style-name="T344">OR 1=1 --</text:span><text:span text:style-name="T111">，拼入後變成：…</text:span><text:span text:style-name="T459">WHERE account='' OR 1=1 -- '</text:span><text:span text:style-name="T177"> AND password='1234'</text:span><text:span text:style-name="T111">。</text:span></text:p>
            <text:p text:style-name="P8" loext:marker-style-name="T112"><text:span text:style-name="T177">OR 1=1 </text:span><text:span text:style-name="T111">永遠成立 → 查出所有使用者；</text:span><text:span text:style-name="T177">-- </text:span><text:span text:style-name="T111">是 </text:span><text:span text:style-name="T177">SQL </text:span><text:span text:style-name="T111">單行註解 → 後面的密碼驗證被忽略。</text:span>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39" loext:marker-style-name="T71"><text:span text:style-name="T81">❌ </text:span><text:span text:style-name="T72">攻擊成功的原因</text:span></text:p>
          </table:table-cell>
          <table:covered-table-cell/>
          <table:table-cell table:style-name="表格119.A2" office:value-type="string">
            <text:p text:style-name="P39" loext:marker-style-name="T71"><text:span text:style-name="T81">✅ </text:span><text:span text:style-name="T72">正確的設計應該要</text:span>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42" loext:marker-style-name="T85"><text:span text:style-name="T161">① </text:span><text:span text:style-name="T645">OR 1=1 </text:span><text:span text:style-name="T630">永遠成立，回傳全部使用者</text:span><text:span text:style-name="T86"> ② </text:span><text:span text:style-name="T607">-- </text:span><text:span text:style-name="T586">把密碼驗證段註解掉</text:span><text:span text:style-name="T86"> ③ 工程師直接用字串拼接組 </text:span><text:span text:style-name="T161">SQL</text:span><text:span text:style-name="T86">，沒有驗證輸入</text:span></text:p>
          </table:table-cell>
          <table:covered-table-cell/>
          <table:table-cell table:style-name="表格119.A3" office:value-type="string">
            <text:p text:style-name="P42" loext:marker-style-name="T85"><text:span text:style-name="T390">把使用者輸入視為「純資料」，不允許改變 </text:span><text:span text:style-name="T404">SQL </text:span><text:span text:style-name="T390">結構；</text:span><text:span text:style-name="T404">SQL </text:span><text:span text:style-name="T390">骨架固定，不因任何輸入而改變</text:span><text:span text:style-name="T86">；使用 </text:span><text:span text:style-name="T161">Prepared Statement</text:span>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6"><text:span text:style-name="T222">🛡️ <text:s/></text:span><text:span text:style-name="T269">防禦核心：</text:span><text:span text:style-name="T278">Prepared Statement</text:span><text:span text:style-name="T269">（預備語句）</text:span></text:p>
            <text:p text:style-name="P7"><text:span text:style-name="T270">概念：</text:span><text:span text:style-name="T318">先把 </text:span><text:span text:style-name="T344">SQL </text:span><text:span text:style-name="T318">骨架「鎖死」</text:span><text:span text:style-name="T111">，</text:span><text:span text:style-name="T328">使用者只能填入資料，完全無法修改 </text:span><text:span text:style-name="T355">SQL </text:span><text:span text:style-name="T328">結構</text:span><text:span text:style-name="T111">。</text:span></text:p>
            <text:p text:style-name="P8" loext:marker-style-name="T112"><text:span text:style-name="T177">❌ </text:span><text:span text:style-name="T111">危險寫法（字串拼接）：</text:span><text:span text:style-name="T177">sql = "SELECT * FROM users </text:span><text:span text:style-name="T199">WHERE id='" + input + "'"</text:span><text:span text:style-name="T134">；輸入 </text:span><text:span text:style-name="T199">' OR 1=1 -- → </text:span><text:span text:style-name="T134">結構被竄改</text:span><text:span text:style-name="T111">。</text:span></text:p>
            <text:p text:style-name="P8" loext:marker-style-name="T112"><text:span text:style-name="T177">✅ </text:span><text:span text:style-name="T111">安全寫法：</text:span><text:span text:style-name="T177">String sql = "SELECT * FROM users </text:span><text:span text:style-name="T199">WHERE id=?"</text:span><text:span text:style-name="T134">；</text:span><text:span text:style-name="T601">? </text:span><text:span text:style-name="T578">是佔位符，</text:span><text:span text:style-name="T601">input </text:span><text:span text:style-name="T578">被視為純文字，</text:span><text:span text:style-name="T601">' OR 1=1 -- </text:span><text:span text:style-name="T578">完全無效</text:span><text:span text:style-name="T111">。</text:span>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4" loext:marker-style-name="T77"><text:span text:style-name="T78">輔助防禦手段</text:span><text:span text:style-name="T77"/></text:p>
          </table:table-cell>
          <table:table-cell table:style-name="表格119.A2" table:number-columns-spanned="2" office:value-type="string">
            <text:p text:style-name="P4" loext:marker-style-name="T77"><text:span text:style-name="T78">說明</text:span><text:span text:style-name="T77"/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2" loext:marker-style-name="T149"><text:span text:style-name="T212">Prepared Statement</text:span><text:span text:style-name="T149"/></text:p>
          </table:table-cell>
          <table:table-cell table:style-name="表格119.A3" table:number-columns-spanned="2" office:value-type="string">
            <text:p text:style-name="P42" loext:marker-style-name="T149"><text:span text:style-name="T212">✅ </text:span><text:span text:style-name="T150">根本解決方案。</text:span><text:span text:style-name="T212">SQL </text:span><text:span text:style-name="T150">骨架與資料完全分離，首選防禦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2" loext:marker-style-name="T149"><text:span text:style-name="T150">輸入驗證 </text:span><text:span text:style-name="T212">(Input Validation)</text:span></text:p>
          </table:table-cell>
          <table:table-cell table:style-name="表格119.A7" table:number-columns-spanned="2" office:value-type="string">
            <text:p text:style-name="P42" loext:marker-style-name="T149"><text:span text:style-name="T150">過濾或拒絕特殊字元（如單引號），輔助手段，但單靠此法仍可能被繞過。</text:span><text:span text:style-name="T149"/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2" loext:marker-style-name="T149"><text:span text:style-name="T212">WAF</text:span><text:span text:style-name="T150">（網站應用防火牆）</text:span></text:p>
          </table:table-cell>
          <table:table-cell table:style-name="表格119.A3" table:number-columns-spanned="2" office:value-type="string">
            <text:p text:style-name="P42" loext:marker-style-name="T149"><text:span text:style-name="T150">偵測 </text:span><text:span text:style-name="T212">OR 1=1</text:span><text:span text:style-name="T150">、</text:span><text:span text:style-name="T212">UNION SELECT </text:span><text:span text:style-name="T150">等攻擊特徵，自動攔截可疑請求；屬外層防護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2" loext:marker-style-name="T149"><text:span text:style-name="T150">最小權限原則</text:span><text:span text:style-name="T149"/></text:p>
          </table:table-cell>
          <table:table-cell table:style-name="表格119.A7" table:number-columns-spanned="2" office:value-type="string">
            <text:p text:style-name="P42" loext:marker-style-name="T149"><text:span text:style-name="T150">資料庫帳號只給應用程式必要的權限，避免帳號被拿下後資料全失。</text:span><text:span text:style-name="T149"/></text:p>
          </table:table-cell>
          <table:covered-table-cell/>
        </table:table-row>
      </table:table>
      <text:h text:style-name="P12" text:outline-level="3"><text:soft-page-break/><text:span text:style-name="T225">▍</text:span><text:span text:style-name="T226"> Zero-Day Attack</text:span><text:span text:style-name="T227">（零時差攻擊）</text:span></text:h>
      <text:p text:style-name="P48" loext:marker-style-name="T112"><text:span text:style-name="T177">Zero-Day </text:span><text:span text:style-name="T111">指一個「尚未被開發商發現或公開」的安全漏洞，在廠商來得及發布修補程式（</text:span><text:span text:style-name="T177">Patch</text:span><text:span text:style-name="T111">）之前，駭客就已利用它展開攻擊。命名由來：「</text:span><text:span text:style-name="T177">Day Zero</text:span><text:span text:style-name="T111">」代表廠商只有 </text:span><text:span text:style-name="T177">0 </text:span><text:span text:style-name="T111">天的時間來應對，沒有任何緩衝期。</text:span>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able:table-row table:style-name="表格120.1">
            <table:table-cell table:style-name="表格120.A1" table:number-columns-spanned="3" office:value-type="string">
              <text:p text:style-name="P39" loext:marker-style-name="T71"><text:span text:style-name="T81">😱 </text:span><text:span text:style-name="T72">傳統防毒為何失效？</text:span></text:p>
            </table:table-cell>
            <table:covered-table-cell/>
            <table:covered-table-cell/>
            <table:table-cell table:style-name="表格120.A1" office:value-type="string">
              <text:p text:style-name="P39" loext:marker-style-name="T71"><text:span text:style-name="T81">🏠 </text:span><text:span text:style-name="T72">生活比喻</text:span>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42" loext:marker-style-name="T85"><text:span text:style-name="T86">傳統防毒靠「特徵碼（</text:span><text:span text:style-name="T161">Signature</text:span><text:span text:style-name="T86">）」辨識病毒，像通緝名單。但 </text:span><text:span text:style-name="T161">Zero-Day </text:span><text:span text:style-name="T86">是全新未知手法，根本沒有特徵碼，防毒完全認不出來。</text:span></text:p>
          </table:table-cell>
          <table:covered-table-cell/>
          <table:covered-table-cell/>
          <table:table-cell table:style-name="表格120.A2" office:value-type="string">
            <text:p text:style-name="P42" loext:marker-style-name="T85"><text:span text:style-name="T86">你家大門有個秘密漏洞，你不知道、鎖廠不知道、所有人都不知道——只有小偷知道。小偷可以天天進你家，直到漏洞被發現並修補為止。</text:span><text:span text:style-name="T85"/></text:p>
          </table:table-cell>
        </table:table-row>
        <table:table-row table:style-name="表格120.1">
          <table:table-cell table:style-name="表格120.A1" office:value-type="string">
            <text:p text:style-name="P4" loext:marker-style-name="T77"><text:span text:style-name="T78">防禦層</text:span><text:span text:style-name="T77"/></text:p>
          </table:table-cell>
          <table:table-cell table:style-name="表格120.A1" office:value-type="string">
            <text:p text:style-name="P4" loext:marker-style-name="T77"><text:span text:style-name="T78">手段</text:span><text:span text:style-name="T77"/></text:p>
          </table:table-cell>
          <table:table-cell table:style-name="表格120.A1" table:number-columns-spanned="2" office:value-type="string">
            <text:p text:style-name="P4" loext:marker-style-name="T77"><text:span text:style-name="T78">說明</text:span><text:span text:style-name="T77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60"><text:span text:style-name="T158">修補</text:span></text:p>
          </table:table-cell>
          <table:table-cell table:style-name="表格120.A2" office:value-type="string">
            <text:p text:style-name="P42" loext:marker-style-name="T149"><text:span text:style-name="T212">Patch </text:span><text:span text:style-name="T150">更新</text:span></text:p>
          </table:table-cell>
          <table:table-cell table:style-name="表格120.A2" table:number-columns-spanned="2" office:value-type="string">
            <text:p text:style-name="P42" loext:marker-style-name="T149"><text:span text:style-name="T150">漏洞公開後立即套用廠商安全更新（這是最重要的行動）</text:span><text:span text:style-name="T149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60"><text:span text:style-name="T158">偵測</text:span></text:p>
          </table:table-cell>
          <table:table-cell table:style-name="表格120.A5" office:value-type="string">
            <text:p text:style-name="P61"><text:span text:style-name="T217">IDS / IPS</text:span></text:p>
          </table:table-cell>
          <table:table-cell table:style-name="表格120.A5" table:number-columns-spanned="2" office:value-type="string">
            <text:p text:style-name="P42" loext:marker-style-name="T149"><text:span text:style-name="T212">IDS </text:span><text:span text:style-name="T150">發現異常後發警報；</text:span><text:span text:style-name="T212">IPS </text:span><text:span text:style-name="T150">直接攔截惡意流量</text:span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60"><text:span text:style-name="T158">深度檢查</text:span></text:p>
          </table:table-cell>
          <table:table-cell table:style-name="表格120.A2" office:value-type="string">
            <text:p text:style-name="P72"><text:span text:style-name="T718">DPI</text:span><text:span text:style-name="T714">（深度封包檢查）</text:span></text:p>
          </table:table-cell>
          <table:table-cell table:style-name="表格120.A2" table:number-columns-spanned="2" office:value-type="string">
            <text:p text:style-name="P42" loext:marker-style-name="T149"><text:span text:style-name="T150">拆開檢查封包內容，偵測隱藏其中的攻擊指令</text:span><text:span text:style-name="T149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60"><text:span text:style-name="T158">隔離</text:span></text:p>
          </table:table-cell>
          <table:table-cell table:style-name="表格120.A5" office:value-type="string">
            <text:p text:style-name="P73"><text:span text:style-name="T714">網路分段</text:span></text:p>
          </table:table-cell>
          <table:table-cell table:style-name="表格120.A5" table:number-columns-spanned="2" office:value-type="string">
            <text:p text:style-name="P42" loext:marker-style-name="T149"><text:span text:style-name="T150">把網路切成多區，即使入侵一區也難橫向擴散</text:span><text:span text:style-name="T149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60"><text:span text:style-name="T158">降低風險</text:span></text:p>
          </table:table-cell>
          <table:table-cell table:style-name="表格120.A2" office:value-type="string">
            <text:p text:style-name="P62"><text:span text:style-name="T158">最小權限原則</text:span></text:p>
          </table:table-cell>
          <table:table-cell table:style-name="表格120.A2" table:number-columns-spanned="2" office:value-type="string">
            <text:p text:style-name="P42" loext:marker-style-name="T149"><text:span text:style-name="T150">每個帳號只給必要的最低權限，減少淪陷後的損害</text:span><text:span text:style-name="T149"/></text:p>
          </table:table-cell>
          <table:covered-table-cell/>
        </table:table-row>
      </table:table>
      <text:h text:style-name="P12" text:outline-level="3"><text:span text:style-name="T225">▍</text:span><text:span text:style-name="T226"> </text:span><text:span text:style-name="T227">防禦機制速查：</text:span><text:span text:style-name="T226">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4" loext:marker-style-name="T77"><text:span text:style-name="T78">機制</text:span><text:span text:style-name="T77"/></text:p>
            </table:table-cell>
            <table:table-cell table:style-name="表格121.A1" office:value-type="string">
              <text:p text:style-name="P4" loext:marker-style-name="T77"><text:span text:style-name="T78">白話比喻</text:span><text:span text:style-name="T77"/></text:p>
            </table:table-cell>
            <table:table-cell table:style-name="表格121.A1" office:value-type="string">
              <text:p text:style-name="P4" loext:marker-style-name="T77"><text:span text:style-name="T78">主要功能</text:span><text:span text:style-name="T77"/></text:p>
            </table:table-cell>
            <table:table-cell table:style-name="表格121.A1" office:value-type="string">
              <text:p text:style-name="P4" loext:marker-style-name="T77"><text:span text:style-name="T78">備註</text:span><text:span text:style-name="T77"/>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42" loext:marker-style-name="T149"><text:span text:style-name="T212">Firewall</text:span><text:span text:style-name="T149"/></text:p>
          </table:table-cell>
          <table:table-cell table:style-name="表格121.A2" office:value-type="string">
            <text:p text:style-name="P42" loext:marker-style-name="T149"><text:span text:style-name="T150">社區大門保全</text:span><text:span text:style-name="T149"/></text:p>
          </table:table-cell>
          <table:table-cell table:style-name="表格121.A2" office:value-type="string">
            <text:p text:style-name="P42" loext:marker-style-name="T149"><text:span text:style-name="T150">依 </text:span><text:span text:style-name="T212">IP</text:span><text:span text:style-name="T150">、</text:span><text:span text:style-name="T212">Port</text:span><text:span text:style-name="T150">、協定決定允許或拒絕流量</text:span></text:p>
          </table:table-cell>
          <table:table-cell table:style-name="表格121.A2" office:value-type="string">
            <text:p text:style-name="P42" loext:marker-style-name="T149"><text:span text:style-name="T150">基礎但必要</text:span><text:span text:style-name="T149"/></text:p>
          </table:table-cell>
        </table:table-row>
        <table:table-row table:style-name="表格121.1">
          <table:table-cell table:style-name="表格121.A3" office:value-type="string">
            <text:p text:style-name="P42" loext:marker-style-name="T149"><text:span text:style-name="T212">IDS</text:span><text:span text:style-name="T149"/></text:p>
          </table:table-cell>
          <table:table-cell table:style-name="表格121.A3" office:value-type="string">
            <text:p text:style-name="P42" loext:marker-style-name="T149"><text:span text:style-name="T150">監視器</text:span><text:span text:style-name="T149"/></text:p>
          </table:table-cell>
          <table:table-cell table:style-name="表格121.A3" office:value-type="string">
            <text:p text:style-name="P42" loext:marker-style-name="T149"><text:span text:style-name="T150">偵測到異常流量後產生警報，不主動攔截</text:span><text:span text:style-name="T149"/></text:p>
          </table:table-cell>
          <table:table-cell table:style-name="表格121.A3" office:value-type="string">
            <text:p text:style-name="P42" loext:marker-style-name="T149"><text:span text:style-name="T150">只警告</text:span><text:span text:style-name="T149"/></text:p>
          </table:table-cell>
        </table:table-row>
        <table:table-row table:style-name="表格121.1">
          <table:table-cell table:style-name="表格121.A2" office:value-type="string">
            <text:p text:style-name="P42" loext:marker-style-name="T149"><text:span text:style-name="T212">IPS</text:span><text:span text:style-name="T149"/></text:p>
          </table:table-cell>
          <table:table-cell table:style-name="表格121.A2" office:value-type="string">
            <text:p text:style-name="P42" loext:marker-style-name="T149"><text:span text:style-name="T150">警衛直接攔人</text:span><text:span text:style-name="T149"/></text:p>
          </table:table-cell>
          <table:table-cell table:style-name="表格121.A2" office:value-type="string">
            <text:p text:style-name="P42" loext:marker-style-name="T149"><text:span text:style-name="T150">自動阻斷偵測到的攻擊流量</text:span><text:span text:style-name="T149"/></text:p>
          </table:table-cell>
          <table:table-cell table:style-name="表格121.A2" office:value-type="string">
            <text:p text:style-name="P42" loext:marker-style-name="T149"><text:span text:style-name="T150">直接阻擋</text:span><text:span text:style-name="T149"/></text:p>
          </table:table-cell>
        </table:table-row>
        <table:table-row table:style-name="表格121.1">
          <table:table-cell table:style-name="表格121.A3" office:value-type="string">
            <text:p text:style-name="P42" loext:marker-style-name="T149"><text:span text:style-name="T212">DPI</text:span><text:span text:style-name="T149"/></text:p>
          </table:table-cell>
          <table:table-cell table:style-name="表格121.A3" office:value-type="string">
            <text:p text:style-name="P42" loext:marker-style-name="T149"><text:span text:style-name="T150">海關拆包裹</text:span><text:span text:style-name="T149"/></text:p>
          </table:table-cell>
          <table:table-cell table:style-name="表格121.A3" office:value-type="string">
            <text:p text:style-name="P42" loext:marker-style-name="T149"><text:span text:style-name="T150">不只看封包表頭，深入檢查封包內容</text:span><text:span text:style-name="T149"/></text:p>
          </table:table-cell>
          <table:table-cell table:style-name="表格121.A3" office:value-type="string">
            <text:p text:style-name="P42" loext:marker-style-name="T149"><text:span text:style-name="T150">最深層檢查</text:span><text:span text:style-name="T149"/></text:p>
          </table:table-cell>
        </table:table-row>
        <table:table-row table:style-name="表格121.1">
          <table:table-cell table:style-name="表格121.A2" office:value-type="string">
            <text:p text:style-name="P42" loext:marker-style-name="T149"><text:span text:style-name="T212">WAF</text:span><text:span text:style-name="T149"/></text:p>
          </table:table-cell>
          <table:table-cell table:style-name="表格121.A2" office:value-type="string">
            <text:p text:style-name="P42" loext:marker-style-name="T149"><text:span text:style-name="T150">網站門口掃描機</text:span><text:span text:style-name="T149"/></text:p>
          </table:table-cell>
          <table:table-cell table:style-name="表格121.A2" office:value-type="string">
            <text:p text:style-name="P42" loext:marker-style-name="T149"><text:span text:style-name="T150">專門針對 </text:span><text:span text:style-name="T212">Web </text:span><text:span text:style-name="T150">攻擊（</text:span><text:span text:style-name="T212">SQLi</text:span><text:span text:style-name="T150">、</text:span><text:span text:style-name="T212">XSS</text:span><text:span text:style-name="T150">）過濾</text:span></text:p>
          </table:table-cell>
          <table:table-cell table:style-name="表格121.A2" office:value-type="string">
            <text:p text:style-name="P42" loext:marker-style-name="T149"><text:span text:style-name="T150">網站專用</text:span><text:span text:style-name="T149"/>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6"><text:span text:style-name="T222">⚠️ <text:s/></text:span><text:span text:style-name="T247">考試常考</text:span></text:p>
            <text:p text:style-name="P7" loext:marker-style-name="T112"><text:span text:style-name="T177">IDS </text:span><text:span text:style-name="T111">只發警報（不攔截）；</text:span><text:span text:style-name="T177">IPS </text:span><text:span text:style-name="T111">主動阻擋（有副作用風險，可能誤擋正常流量）。這兩個差異是必考重點。</text:span></text:p>
          </table:table-cell>
          <table:covered-table-cell/>
          <table:covered-table-cell/>
          <table:covered-table-cell/>
        </table:table-row>
      </table:table>
      <text:h text:style-name="P12" text:outline-level="3"><text:span text:style-name="T225">▍</text:span><text:span text:style-name="T226"> </text:span><text:span text:style-name="T227">駭客如何一步一步入侵網站（典型 </text:span><text:span text:style-name="T226">7 </text:span><text:span text:style-name="T227">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39" loext:marker-style-name="T77"><text:span text:style-name="T83">Step</text:span><text:span text:style-name="T77"/></text:p>
            </table:table-cell>
            <table:table-cell table:style-name="表格122.A1" office:value-type="string">
              <text:p text:style-name="P39" loext:marker-style-name="T77"><text:span text:style-name="T78">階段</text:span><text:span text:style-name="T77"/></text:p>
            </table:table-cell>
            <table:table-cell table:style-name="表格122.A1" office:value-type="string">
              <text:p text:style-name="P39" loext:marker-style-name="T77"><text:span text:style-name="T78">做什麼</text:span><text:span text:style-name="T77"/>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42" loext:marker-style-name="T149"><text:span text:style-name="T212">1</text:span><text:span text:style-name="T149"/></text:p>
          </table:table-cell>
          <table:table-cell table:style-name="表格122.A2" office:value-type="string">
            <text:p text:style-name="P42" loext:marker-style-name="T149"><text:span text:style-name="T150">偵察 </text:span><text:span text:style-name="T212">Reconnaissance</text:span></text:p>
          </table:table-cell>
          <table:table-cell table:style-name="表格122.A2" office:value-type="string">
            <text:p text:style-name="P42" loext:marker-style-name="T149"><text:span text:style-name="T150">掃描目標網站，找漏洞：</text:span><text:span text:style-name="T212">SQL Injection</text:span><text:span text:style-name="T150">、弱密碼、過時元件</text:span></text:p>
          </table:table-cell>
        </table:table-row>
        <table:table-row table:style-name="表格122.1">
          <table:table-cell table:style-name="表格122.A3" office:value-type="string">
            <text:p text:style-name="P42" loext:marker-style-name="T149"><text:span text:style-name="T212">2</text:span><text:span text:style-name="T149"/></text:p>
          </table:table-cell>
          <table:table-cell table:style-name="表格122.A3" office:value-type="string">
            <text:p text:style-name="P42" loext:marker-style-name="T149"><text:span text:style-name="T150">試探 </text:span><text:span text:style-name="T212">Probing</text:span></text:p>
          </table:table-cell>
          <table:table-cell table:style-name="表格122.A3" office:value-type="string">
            <text:p text:style-name="P42" loext:marker-style-name="T149"><text:span text:style-name="T150">嘗試輸入 </text:span><text:span text:style-name="T212">' OR 1=1 -- </text:span><text:span text:style-name="T150">等攻擊字串，觀察系統回應</text:span></text:p>
          </table:table-cell>
        </table:table-row>
        <table:table-row table:style-name="表格122.1">
          <table:table-cell table:style-name="表格122.A2" office:value-type="string">
            <text:p text:style-name="P42" loext:marker-style-name="T149"><text:span text:style-name="T212">3</text:span><text:span text:style-name="T149"/></text:p>
          </table:table-cell>
          <table:table-cell table:style-name="表格122.A2" office:value-type="string">
            <text:p text:style-name="P42" loext:marker-style-name="T149"><text:span text:style-name="T150">取得初步權限</text:span><text:span text:style-name="T149"/></text:p>
          </table:table-cell>
          <table:table-cell table:style-name="表格122.A2" office:value-type="string">
            <text:p text:style-name="P42" loext:marker-style-name="T149"><text:span text:style-name="T150">成功繞過驗證或取得資料庫讀取權，可能拿到帳密清單</text:span><text:span text:style-name="T149"/></text:p>
          </table:table-cell>
        </table:table-row>
        <table:table-row table:style-name="表格122.1">
          <table:table-cell table:style-name="表格122.A3" office:value-type="string">
            <text:p text:style-name="P42" loext:marker-style-name="T149"><text:span text:style-name="T212">4</text:span><text:span text:style-name="T149"/></text:p>
          </table:table-cell>
          <table:table-cell table:style-name="表格122.A3" office:value-type="string">
            <text:p text:style-name="P42" loext:marker-style-name="T149"><text:span text:style-name="T150">橫向移動 </text:span><text:span text:style-name="T212">Lateral Movement</text:span></text:p>
          </table:table-cell>
          <table:table-cell table:style-name="表格122.A3" office:value-type="string">
            <text:p text:style-name="P42" loext:marker-style-name="T149"><text:span text:style-name="T150">從網站主機延伸進資料庫，再滲透內網其他系統</text:span><text:span text:style-name="T149"/></text:p>
          </table:table-cell>
        </table:table-row>
        <table:table-row table:style-name="表格122.1">
          <table:table-cell table:style-name="表格122.A2" office:value-type="string">
            <text:p text:style-name="P42" loext:marker-style-name="T149"><text:span text:style-name="T212">5</text:span><text:span text:style-name="T149"/></text:p>
          </table:table-cell>
          <table:table-cell table:style-name="表格122.A2" office:value-type="string">
            <text:p text:style-name="P42" loext:marker-style-name="T149"><text:span text:style-name="T150">竊取資料 </text:span><text:span text:style-name="T212">Exfiltration</text:span></text:p>
          </table:table-cell>
          <table:table-cell table:style-name="表格122.A2" office:value-type="string">
            <text:p text:style-name="P42" loext:marker-style-name="T149"><text:span text:style-name="T150">偷取個資、信用卡資料、機密文件</text:span><text:span text:style-name="T149"/></text:p>
          </table:table-cell>
        </table:table-row>
        <table:table-row table:style-name="表格122.1">
          <table:table-cell table:style-name="表格122.A3" office:value-type="string">
            <text:p text:style-name="P42" loext:marker-style-name="T149"><text:span text:style-name="T212">6</text:span><text:span text:style-name="T149"/></text:p>
          </table:table-cell>
          <table:table-cell table:style-name="表格122.A3" office:value-type="string">
            <text:p text:style-name="P42" loext:marker-style-name="T149"><text:span text:style-name="T150">植入後門 </text:span><text:span text:style-name="T212">Backdoor</text:span></text:p>
          </table:table-cell>
          <table:table-cell table:style-name="表格122.A3" office:value-type="string">
            <text:p text:style-name="P42" loext:marker-style-name="T149"><text:span text:style-name="T150">埋下後門程式，確保下次還能輕鬆進入</text:span><text:span text:style-name="T149"/></text:p>
          </table:table-cell>
        </table:table-row>
        <table:table-row table:style-name="表格122.1">
          <table:table-cell table:style-name="表格122.A2" office:value-type="string">
            <text:p text:style-name="P42" loext:marker-style-name="T149"><text:span text:style-name="T212">7</text:span><text:span text:style-name="T149"/></text:p>
          </table:table-cell>
          <table:table-cell table:style-name="表格122.A2" office:value-type="string">
            <text:p text:style-name="P42" loext:marker-style-name="T149"><text:span text:style-name="T150">勒索或變現</text:span><text:span text:style-name="T149"/></text:p>
          </table:table-cell>
          <table:table-cell table:style-name="表格122.A2" office:value-type="string">
            <text:p text:style-name="P42" loext:marker-style-name="T149"><text:span text:style-name="T150">加密資料索取贖金，或在暗網販售竊取的資料</text:span><text:span text:style-name="T149"/>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6"><text:span text:style-name="T222">⚠️ <text:s/></text:span><text:span text:style-name="T247">公職考試常見陷阱</text:span></text:p>
            <text:p text:style-name="P7"><text:span text:style-name="T132">「輸入驗證」就足夠防 </text:span><text:span text:style-name="T197">SQLi</text:span><text:span text:style-name="T132">？　</text:span><text:span text:style-name="T111">❌ 不夠，過濾特殊字元有被繞過風險。✅ 真正防禦是 </text:span><text:span text:style-name="T177">Prepared Statement</text:span><text:span text:style-name="T111">。</text:span></text:p>
            <text:p text:style-name="P8"><text:span text:style-name="T197">WAF </text:span><text:span text:style-name="T132">可以完全防止所有攻擊？　</text:span><text:span text:style-name="T111">❌ 不能，</text:span><text:span text:style-name="T177">WAF </text:span><text:span text:style-name="T111">是輔助防禦，新型攻擊可能繞過。✅ </text:span><text:span text:style-name="T177">WAF + Prepared </text:span><text:soft-page-break/><text:span text:style-name="T177">Statement </text:span><text:span text:style-name="T111">才是正道。</text:span></text:p>
            <text:p text:style-name="P8"><text:span text:style-name="T197">Zero-Day </text:span><text:span text:style-name="T132">最危險是它「很強大」？　</text:span><text:span text:style-name="T111">❌ 不是，最危險的是「還沒人知道」，防毒無法識別。</text:span></text:p>
            <text:p text:style-name="P8"><text:span text:style-name="T197">IDS </text:span><text:span text:style-name="T132">可以阻擋攻擊？　</text:span><text:span text:style-name="T111">❌ 不行，</text:span><text:span text:style-name="T177">IDS </text:span><text:span text:style-name="T111">只能偵測警報，能阻擋的是 </text:span><text:span text:style-name="T177">IPS</text:span><text:span text:style-name="T111">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參、網路安全：</text:span><text:span text:style-name="T27">Firewall · IDS · IPS · SNMP · ICMP</text:span>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4" loext:marker-style-name="T71"><text:span text:style-name="T72">工具</text:span><text:span text:style-name="T71"/></text:p>
            </table:table-cell>
            <table:table-cell table:style-name="表格123.A1" office:value-type="string">
              <text:p text:style-name="P4" loext:marker-style-name="T71"><text:span text:style-name="T72">角色</text:span><text:span text:style-name="T71"/></text:p>
            </table:table-cell>
            <table:table-cell table:style-name="表格123.A1" office:value-type="string">
              <text:p text:style-name="P4" loext:marker-style-name="T71"><text:span text:style-name="T72">功能</text:span><text:span text:style-name="T71"/>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42" loext:marker-style-name="T85"><text:span text:style-name="T161">🚪 Firewall</text:span><text:span text:style-name="T85"/></text:p>
          </table:table-cell>
          <table:table-cell table:style-name="表格123.A2" office:value-type="string">
            <text:p text:style-name="P42" loext:marker-style-name="T85"><text:span text:style-name="T86">大門警衛</text:span><text:span text:style-name="T85"/></text:p>
          </table:table-cell>
          <table:table-cell table:style-name="表格123.A2" office:value-type="string">
            <text:p text:style-name="P42" loext:marker-style-name="T85"><text:span text:style-name="T86">過濾進出流量（擋或放）</text:span><text:span text:style-name="T85"/></text:p>
          </table:table-cell>
        </table:table-row>
        <table:table-row table:style-name="表格123.1">
          <table:table-cell table:style-name="表格123.A3" office:value-type="string">
            <text:p text:style-name="P42" loext:marker-style-name="T85"><text:span text:style-name="T161">👀 IDS</text:span><text:span text:style-name="T85"/></text:p>
          </table:table-cell>
          <table:table-cell table:style-name="表格123.A3" office:value-type="string">
            <text:p text:style-name="P42" loext:marker-style-name="T85"><text:span text:style-name="T86">監視器（只看）</text:span><text:span text:style-name="T85"/></text:p>
          </table:table-cell>
          <table:table-cell table:style-name="表格123.A3" office:value-type="string">
            <text:p text:style-name="P42" loext:marker-style-name="T85"><text:span text:style-name="T86">偵測異常、發出警報，不主動阻擋</text:span><text:span text:style-name="T85"/></text:p>
          </table:table-cell>
        </table:table-row>
        <table:table-row table:style-name="表格123.1">
          <table:table-cell table:style-name="表格123.A2" office:value-type="string">
            <text:p text:style-name="P42" loext:marker-style-name="T85"><text:span text:style-name="T161">🚨 IPS</text:span><text:span text:style-name="T85"/></text:p>
          </table:table-cell>
          <table:table-cell table:style-name="表格123.A2" office:value-type="string">
            <text:p text:style-name="P42" loext:marker-style-name="T85"><text:span text:style-name="T86">監視器＋警衛</text:span><text:span text:style-name="T85"/></text:p>
          </table:table-cell>
          <table:table-cell table:style-name="表格123.A2" office:value-type="string">
            <text:p text:style-name="P42" loext:marker-style-name="T85"><text:span text:style-name="T86">偵測異常並自動阻擋攻擊</text:span><text:span text:style-name="T85"/></text:p>
          </table:table-cell>
        </table:table-row>
        <table:table-row table:style-name="表格123.1">
          <table:table-cell table:style-name="表格123.A3" office:value-type="string">
            <text:p text:style-name="P42" loext:marker-style-name="T85"><text:span text:style-name="T161">📊 SNMP</text:span><text:span text:style-name="T85"/></text:p>
          </table:table-cell>
          <table:table-cell table:style-name="表格123.A3" office:value-type="string">
            <text:p text:style-name="P42" loext:marker-style-name="T85"><text:span text:style-name="T86">管理室</text:span><text:span text:style-name="T85"/></text:p>
          </table:table-cell>
          <table:table-cell table:style-name="表格123.A3" office:value-type="string">
            <text:p text:style-name="P42" loext:marker-style-name="T85"><text:span text:style-name="T86">監控網路設備狀態（</text:span><text:span text:style-name="T161">CPU</text:span><text:span text:style-name="T86">、流量等）</text:span></text:p>
          </table:table-cell>
        </table:table-row>
        <table:table-row table:style-name="表格123.1">
          <table:table-cell table:style-name="表格123.A2" office:value-type="string">
            <text:p text:style-name="P42" loext:marker-style-name="T85"><text:span text:style-name="T161">📶 ICMP</text:span><text:span text:style-name="T85"/></text:p>
          </table:table-cell>
          <table:table-cell table:style-name="表格123.A2" office:value-type="string">
            <text:p text:style-name="P42" loext:marker-style-name="T85"><text:span text:style-name="T86">網路測試員</text:span><text:span text:style-name="T85"/></text:p>
          </table:table-cell>
          <table:table-cell table:style-name="表格123.A2" office:value-type="string">
            <text:p text:style-name="P42" loext:marker-style-name="T85"><text:span text:style-name="T86">診斷網路連線（</text:span><text:span text:style-name="T161">Ping / Traceroute</text:span><text:span text:style-name="T86">）</text:span>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6"><text:span text:style-name="T222">⚡ <text:s/></text:span><text:span text:style-name="T227">核心記憶口訣</text:span></text:p>
            <text:p text:style-name="P7" loext:marker-style-name="T112"><text:span text:style-name="T177">Firewall </text:span><text:span text:style-name="T111">擋入口 </text:span><text:span text:style-name="T177">· IDS </text:span><text:span text:style-name="T111">只看 </text:span><text:span text:style-name="T177">· IPS </text:span><text:span text:style-name="T111">看＋擋。</text:span></text:p>
          </table:table-cell>
          <table:covered-table-cell/>
          <table:covered-table-cell/>
        </table:table-row>
      </table:table>
      <text:h text:style-name="P12" text:outline-level="3"><text:span text:style-name="T225">▍</text:span><text:span text:style-name="T226"> HIDS vs NIDS</text:span><text:span text:style-name="T227">（</text:span><text:span text:style-name="T226">IDS </text:span><text:span text:style-name="T227">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4"/>
            </table:table-cell>
            <table:table-cell table:style-name="表格124.A1" office:value-type="string">
              <text:p text:style-name="P4" loext:marker-style-name="T71"><text:span text:style-name="T81">HIDS</text:span><text:span text:style-name="T71"/></text:p>
            </table:table-cell>
            <table:table-cell table:style-name="表格124.A1" office:value-type="string">
              <text:p text:style-name="P4" loext:marker-style-name="T71"><text:span text:style-name="T81">NIDS</text:span><text:span text:style-name="T71"/>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42" loext:marker-style-name="T85"><text:span text:style-name="T86">安裝位置</text:span><text:span text:style-name="T85"/></text:p>
          </table:table-cell>
          <table:table-cell table:style-name="表格124.A2" office:value-type="string">
            <text:p text:style-name="P42" loext:marker-style-name="T85"><text:span text:style-name="T86">裝在主機（電腦）內部</text:span><text:span text:style-name="T85"/></text:p>
          </table:table-cell>
          <table:table-cell table:style-name="表格124.A2" office:value-type="string">
            <text:p text:style-name="P42" loext:marker-style-name="T85"><text:span text:style-name="T86">裝在網路節點（交換器旁）</text:span><text:span text:style-name="T85"/></text:p>
          </table:table-cell>
        </table:table-row>
        <table:table-row table:style-name="表格124.1">
          <table:table-cell table:style-name="表格124.A3" office:value-type="string">
            <text:p text:style-name="P42" loext:marker-style-name="T85"><text:span text:style-name="T86">監控內容</text:span><text:span text:style-name="T85"/></text:p>
          </table:table-cell>
          <table:table-cell table:style-name="表格124.A3" office:value-type="string">
            <text:p text:style-name="P42" loext:marker-style-name="T85"><text:span text:style-name="T86">系統 </text:span><text:span text:style-name="T161">Log</text:span><text:span text:style-name="T86">、使用者行為</text:span></text:p>
          </table:table-cell>
          <table:table-cell table:style-name="表格124.A3" office:value-type="string">
            <text:p text:style-name="P42" loext:marker-style-name="T85"><text:span text:style-name="T86">網路封包與流量</text:span><text:span text:style-name="T85"/></text:p>
          </table:table-cell>
        </table:table-row>
        <table:table-row table:style-name="表格124.1">
          <table:table-cell table:style-name="表格124.A2" office:value-type="string">
            <text:p text:style-name="P42" loext:marker-style-name="T85"><text:span text:style-name="T86">比喻</text:span><text:span text:style-name="T85"/></text:p>
          </table:table-cell>
          <table:table-cell table:style-name="表格124.A2" office:value-type="string">
            <text:p text:style-name="P42" loext:marker-style-name="T85"><text:span text:style-name="T86">電腦裡的監視器</text:span><text:span text:style-name="T85"/></text:p>
          </table:table-cell>
          <table:table-cell table:style-name="表格124.A2" office:value-type="string">
            <text:p text:style-name="P42" loext:marker-style-name="T85"><text:span text:style-name="T86">路口的交通監視器</text:span><text:span text:style-name="T85"/>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6"><text:span text:style-name="T222">⚡ <text:s/></text:span><text:span text:style-name="T227">一句話秒懂</text:span></text:p>
            <text:p text:style-name="P7" loext:marker-style-name="T112"><text:span text:style-name="T177">HIDS </text:span><text:span text:style-name="T111">看主機（</text:span><text:span text:style-name="T177">Log</text:span><text:span text:style-name="T111">）</text:span><text:span text:style-name="T177">· NIDS </text:span><text:span text:style-name="T111">看網路（封包）。</text:span></text:p>
          </table:table-cell>
          <table:covered-table-cell/>
          <table:covered-table-cell/>
        </table:table-row>
      </table:table>
      <text:h text:style-name="P12" text:outline-level="3"><text:span text:style-name="T225">▍</text:span><text:span text:style-name="T226"> SNMP vs ICMP</text:span><text:span text:style-name="T227">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4"/>
            </table:table-cell>
            <table:table-cell table:style-name="表格125.A1" office:value-type="string">
              <text:p text:style-name="P4" loext:marker-style-name="T71"><text:span text:style-name="T81">SNMP</text:span><text:span text:style-name="T71"/></text:p>
            </table:table-cell>
            <table:table-cell table:style-name="表格125.A1" office:value-type="string">
              <text:p text:style-name="P4" loext:marker-style-name="T71"><text:span text:style-name="T81">ICMP</text:span><text:span text:style-name="T71"/>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42" loext:marker-style-name="T85"><text:span text:style-name="T86">用途</text:span><text:span text:style-name="T85"/></text:p>
          </table:table-cell>
          <table:table-cell table:style-name="表格125.A2" office:value-type="string">
            <text:p text:style-name="P42" loext:marker-style-name="T85"><text:span text:style-name="T86">管理與監控網路設備</text:span><text:span text:style-name="T85"/></text:p>
          </table:table-cell>
          <table:table-cell table:style-name="表格125.A2" office:value-type="string">
            <text:p text:style-name="P42" loext:marker-style-name="T85"><text:span text:style-name="T86">測試網路是否連通</text:span><text:span text:style-name="T85"/></text:p>
          </table:table-cell>
        </table:table-row>
        <table:table-row table:style-name="表格125.1">
          <table:table-cell table:style-name="表格125.A3" office:value-type="string">
            <text:p text:style-name="P42" loext:marker-style-name="T85"><text:span text:style-name="T161">OSI </text:span><text:span text:style-name="T86">層</text:span></text:p>
          </table:table-cell>
          <table:table-cell table:style-name="表格125.A3" office:value-type="string">
            <text:p text:style-name="P42" loext:marker-style-name="T85"><text:span text:style-name="T161">Application Layer</text:span><text:span text:style-name="T86">（應用層）</text:span></text:p>
          </table:table-cell>
          <table:table-cell table:style-name="表格125.A3" office:value-type="string">
            <text:p text:style-name="P42" loext:marker-style-name="T85"><text:span text:style-name="T161">Network Layer</text:span><text:span text:style-name="T86">（網路層）</text:span></text:p>
          </table:table-cell>
        </table:table-row>
        <table:table-row table:style-name="表格125.1">
          <table:table-cell table:style-name="表格125.A2" office:value-type="string">
            <text:p text:style-name="P42" loext:marker-style-name="T85"><text:span text:style-name="T86">傳輸協定</text:span><text:span text:style-name="T85"/></text:p>
          </table:table-cell>
          <table:table-cell table:style-name="表格125.A2" office:value-type="string">
            <text:p text:style-name="P42" loext:marker-style-name="T85"><text:span text:style-name="T161">UDP</text:span><text:span text:style-name="T85"/></text:p>
          </table:table-cell>
          <table:table-cell table:style-name="表格125.A2" office:value-type="string">
            <text:p text:style-name="P42" loext:marker-style-name="T85"><text:span text:style-name="T161">IP </text:span><text:span text:style-name="T86">的附屬協定</text:span></text:p>
          </table:table-cell>
        </table:table-row>
        <table:table-row table:style-name="表格125.1">
          <table:table-cell table:style-name="表格125.A3" office:value-type="string">
            <text:p text:style-name="P42" loext:marker-style-name="T85"><text:span text:style-name="T86">常見功能</text:span><text:span text:style-name="T85"/></text:p>
          </table:table-cell>
          <table:table-cell table:style-name="表格125.A3" office:value-type="string">
            <text:p text:style-name="P42" loext:marker-style-name="T85"><text:span text:style-name="T86">看 </text:span><text:span text:style-name="T161">CPU </text:span><text:span text:style-name="T86">使用率、設備狀態、</text:span><text:span text:style-name="T161">Trap </text:span><text:span text:style-name="T86">警報</text:span></text:p>
          </table:table-cell>
          <table:table-cell table:style-name="表格125.A3" office:value-type="string">
            <text:p text:style-name="P42" loext:marker-style-name="T85"><text:span text:style-name="T161">Ping</text:span><text:span text:style-name="T86">、</text:span><text:span text:style-name="T161">Traceroute</text:span></text:p>
          </table:table-cell>
        </table:table-row>
        <table:table-row table:style-name="表格125.1">
          <table:table-cell table:style-name="表格125.A2" office:value-type="string">
            <text:p text:style-name="P42" loext:marker-style-name="T85"><text:span text:style-name="T86">比喻</text:span><text:span text:style-name="T85"/></text:p>
          </table:table-cell>
          <table:table-cell table:style-name="表格125.A2" office:value-type="string">
            <text:p text:style-name="P42" loext:marker-style-name="T85"><text:span text:style-name="T86">大樓管理室的監控系統</text:span><text:span text:style-name="T85"/></text:p>
          </table:table-cell>
          <table:table-cell table:style-name="表格125.A2" office:value-type="string">
            <text:p text:style-name="P42" loext:marker-style-name="T85"><text:span text:style-name="T86">網路連線的體溫計</text:span><text:span text:style-name="T85"/>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6"><text:span text:style-name="T222">⚡ <text:s/></text:span><text:span text:style-name="T227">核心差異</text:span></text:p>
            <text:p text:style-name="P7" loext:marker-style-name="T112"><text:span text:style-name="T177">SNMP </text:span><text:span text:style-name="T111">管理設備（應用層 </text:span><text:span text:style-name="T177">/ UDP</text:span><text:span text:style-name="T111">）</text:span><text:span text:style-name="T177">· ICMP </text:span><text:span text:style-name="T111">診斷網路（網路層）。</text:span></text:p>
          </table:table-cell>
          <table:covered-table-cell/>
          <table:covered-table-cell/>
        </table:table-row>
      </table:table>
      <text:h text:style-name="P12" text:outline-level="3"><text:span text:style-name="T225">▍</text:span><text:span text:style-name="T226"> </text:span><text:span text:style-name="T227">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6"><text:span text:style-name="T222">🗺 <text:s/></text:span><text:span text:style-name="T53">工具各自負責的位置</text:span></text:p>
            <text:p text:style-name="P7" loext:marker-style-name="T112"><text:span text:style-name="T177">🌐 </text:span><text:span text:style-name="T111">外部攻擊者 → 🚪 </text:span><text:span text:style-name="T177">Firewall</text:span><text:span text:style-name="T111">（第一道防線，依 </text:span><text:span text:style-name="T177">IP/Port </text:span><text:span text:style-name="T111">規則過濾）→ 📡 </text:span><text:span text:style-name="T177">NIDS / IPS</text:span><text:span text:style-name="T111">（網路中間監控：</text:span><text:span text:style-name="T177">IDS </text:span><text:span text:style-name="T111">分析封包發現異常只發警報；</text:span><text:span text:style-name="T177">IPS </text:span><text:span text:style-name="T111">分析封包發現異常直接阻擋）→ 🖥 主機 </text:span><text:span text:style-name="T177">/ Server → 👀 </text:span><text:soft-page-break/><text:span text:style-name="T177">HIDS</text:span><text:span text:style-name="T111">（主機內部最後防線，監控系統 </text:span><text:span text:style-name="T177">Log </text:span><text:span text:style-name="T111">與使用者行為）。旁側：📊 </text:span><text:span text:style-name="T177">SNMP </text:span><text:span text:style-name="T111">監控全域設備狀態；📶 </text:span><text:span text:style-name="T177">ICMP</text:span><text:span text:style-name="T111">（</text:span><text:span text:style-name="T177">Ping/Traceroute</text:span><text:span text:style-name="T111">）測試連線。</text:span></text:p>
          </table:table-cell>
        </table:table-row>
        <table:table-row table:style-name="表格126.1">
          <table:table-cell table:style-name="表格126.A2" office:value-type="string">
            <text:p text:style-name="P6"><text:span text:style-name="T222">⚠️ <text:s/></text:span><text:span text:style-name="T247">考試陷阱整理</text:span></text:p>
            <text:p text:style-name="P7"><text:span text:style-name="T264">① IDS </text:span><text:span text:style-name="T257">可以自動阻擋攻擊　→　</text:span><text:span text:style-name="T111">✓ </text:span><text:span text:style-name="T177">IDS </text:span><text:span text:style-name="T111">只偵測＋發警報，</text:span><text:span text:style-name="T177">IPS </text:span><text:span text:style-name="T111">才會阻擋。</text:span></text:p>
            <text:p text:style-name="P8"><text:span text:style-name="T264">② Firewall </text:span><text:span text:style-name="T257">可以偵測異常行為　→　</text:span><text:span text:style-name="T111">✓ </text:span><text:span text:style-name="T177">Firewall </text:span><text:span text:style-name="T111">依規則（</text:span><text:span text:style-name="T177">IP/Port</text:span><text:span text:style-name="T111">）過濾，不做行為分析。</text:span></text:p>
            <text:p text:style-name="P8"><text:span text:style-name="T264">③ HIDS </text:span><text:span text:style-name="T257">用來監控網路封包　→　</text:span><text:span text:style-name="T111">✓ </text:span><text:span text:style-name="T177">HIDS </text:span><text:span text:style-name="T111">監控主機 </text:span><text:span text:style-name="T177">Log </text:span><text:span text:style-name="T111">與系統行為，封包是 </text:span><text:span text:style-name="T177">NIDS </text:span><text:span text:style-name="T111">的工作。</text:span></text:p>
            <text:p text:style-name="P8"><text:span text:style-name="T264">④ ICMP </text:span><text:span text:style-name="T257">用來監控設備狀態　→　</text:span><text:span text:style-name="T111">✓ </text:span><text:span text:style-name="T177">ICMP </text:span><text:span text:style-name="T111">只診斷網路（</text:span><text:span text:style-name="T177">Ping</text:span><text:span text:style-name="T111">），監控設備是 </text:span><text:span text:style-name="T177">SNMP</text:span><text:span text:style-name="T111">。</text:span></text:p>
            <text:p text:style-name="P8"><text:span text:style-name="T264">⑤ ICMP </text:span><text:span text:style-name="T257">屬於 </text:span><text:span text:style-name="T264">Application Layer</text:span><text:span text:style-name="T257">　→　</text:span><text:span text:style-name="T111">✓ </text:span><text:span text:style-name="T177">ICMP </text:span><text:span text:style-name="T111">屬 </text:span><text:span text:style-name="T177">Network Layer</text:span><text:span text:style-name="T111">，</text:span><text:span text:style-name="T177">SNMP </text:span><text:span text:style-name="T111">才是 </text:span><text:span text:style-name="T177">Application Layer</text:span><text:span text:style-name="T111">。</text:span></text:p>
            <text:p text:style-name="P8"><text:span text:style-name="T264">⑥ IPS </text:span><text:span text:style-name="T257">就是防火牆　→　</text:span><text:span text:style-name="T111">✓ </text:span><text:span text:style-name="T177">Firewall </text:span><text:span text:style-name="T111">靜態過濾（規則），</text:span><text:span text:style-name="T177">IPS </text:span><text:span text:style-name="T111">動態偵測行為後阻擋，兩者不同。</text:span></text:p>
          </table:table-cell>
        </table:table-row>
      </table:table>
      <text:h text:style-name="P12" text:outline-level="3"><text:span text:style-name="T225">▍</text:span><text:span text:style-name="T226"> 10 </text:span><text:span text:style-name="T227">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4" loext:marker-style-name="T79"><text:span text:style-name="T80">題目</text:span><text:span text:style-name="T79"/></text:p>
            </table:table-cell>
            <table:table-cell table:style-name="表格127.A1" office:value-type="string">
              <text:p text:style-name="P4" loext:marker-style-name="T79"><text:span text:style-name="T80">答案</text:span><text:span text:style-name="T79"/></text:p>
            </table:table-cell>
            <table:table-cell table:style-name="表格127.A1" office:value-type="string">
              <text:p text:style-name="P4" loext:marker-style-name="T79"><text:span text:style-name="T80">解析</text:span><text:span text:style-name="T79"/>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42" loext:marker-style-name="T159"><text:span text:style-name="T220">Q1 </text:span><text:span text:style-name="T160">何者負責「過濾進出網路流量」？</text:span></text:p>
          </table:table-cell>
          <table:table-cell table:style-name="表格127.A2" office:value-type="string">
            <text:p text:style-name="P42" loext:marker-style-name="T159"><text:span text:style-name="T220">Firewall</text:span><text:span text:style-name="T159"/></text:p>
          </table:table-cell>
          <table:table-cell table:style-name="表格127.A2" office:value-type="string">
            <text:p text:style-name="P42" loext:marker-style-name="T159"><text:span text:style-name="T220">Firewall </text:span><text:span text:style-name="T160">是網路入口過濾工具，依規則決定放行。</text:span><text:span text:style-name="T220">IDS/IPS </text:span><text:span text:style-name="T160">是偵測系統。</text:span></text:p>
          </table:table-cell>
        </table:table-row>
        <table:table-row table:style-name="表格127.1">
          <table:table-cell table:style-name="表格127.A3" office:value-type="string">
            <text:p text:style-name="P42" loext:marker-style-name="T159"><text:span text:style-name="T220">Q2 IDS </text:span><text:span text:style-name="T160">的主要功能為何？</text:span></text:p>
          </table:table-cell>
          <table:table-cell table:style-name="表格127.A3" office:value-type="string">
            <text:p text:style-name="P42" loext:marker-style-name="T159"><text:span text:style-name="T160">偵測並發出警報</text:span><text:span text:style-name="T159"/></text:p>
          </table:table-cell>
          <table:table-cell table:style-name="表格127.A3" office:value-type="string">
            <text:p text:style-name="P42" loext:marker-style-name="T159"><text:span text:style-name="T220">IDS </text:span><text:span text:style-name="T160">只負責偵測＋警報，不會主動阻擋。</text:span></text:p>
          </table:table-cell>
        </table:table-row>
        <table:table-row table:style-name="表格127.1">
          <table:table-cell table:style-name="表格127.A2" office:value-type="string">
            <text:p text:style-name="P42" loext:marker-style-name="T159"><text:span text:style-name="T220">Q3 IPS </text:span><text:span text:style-name="T160">與 </text:span><text:span text:style-name="T220">IDS </text:span><text:span text:style-name="T160">最大差別？</text:span></text:p>
          </table:table-cell>
          <table:table-cell table:style-name="表格127.A2" office:value-type="string">
            <text:p text:style-name="P42" loext:marker-style-name="T159"><text:span text:style-name="T220">IPS </text:span><text:span text:style-name="T160">會阻擋，</text:span><text:span text:style-name="T220">IDS </text:span><text:span text:style-name="T160">不會</text:span></text:p>
          </table:table-cell>
          <table:table-cell table:style-name="表格127.A2" office:value-type="string">
            <text:p text:style-name="P42" loext:marker-style-name="T159"><text:span text:style-name="T220">IPS = IDS </text:span><text:span text:style-name="T160">全功能 </text:span><text:span text:style-name="T220">+ </text:span><text:span text:style-name="T160">主動阻擋。</text:span></text:p>
          </table:table-cell>
        </table:table-row>
        <table:table-row table:style-name="表格127.1">
          <table:table-cell table:style-name="表格127.A3" office:value-type="string">
            <text:p text:style-name="P42" loext:marker-style-name="T159"><text:span text:style-name="T220">Q4 </text:span><text:span text:style-name="T160">何者屬「主機型入侵偵測」？</text:span></text:p>
          </table:table-cell>
          <table:table-cell table:style-name="表格127.A3" office:value-type="string">
            <text:p text:style-name="P42" loext:marker-style-name="T159"><text:span text:style-name="T220">HIDS</text:span><text:span text:style-name="T159"/></text:p>
          </table:table-cell>
          <table:table-cell table:style-name="表格127.A3" office:value-type="string">
            <text:p text:style-name="P42" loext:marker-style-name="T159"><text:span text:style-name="T220">HIDS </text:span><text:span text:style-name="T160">安裝於主機內部，監控 </text:span><text:span text:style-name="T220">Log </text:span><text:span text:style-name="T160">與系統行為。</text:span></text:p>
          </table:table-cell>
        </table:table-row>
        <table:table-row table:style-name="表格127.1">
          <table:table-cell table:style-name="表格127.A2" office:value-type="string">
            <text:p text:style-name="P42" loext:marker-style-name="T159"><text:span text:style-name="T220">Q5 NIDS </text:span><text:span text:style-name="T160">主要監控什麼？</text:span></text:p>
          </table:table-cell>
          <table:table-cell table:style-name="表格127.A2" office:value-type="string">
            <text:p text:style-name="P42" loext:marker-style-name="T159"><text:span text:style-name="T160">網路封包</text:span><text:span text:style-name="T159"/></text:p>
          </table:table-cell>
          <table:table-cell table:style-name="表格127.A2" office:value-type="string">
            <text:p text:style-name="P42" loext:marker-style-name="T159"><text:span text:style-name="T220">NIDS </text:span><text:span text:style-name="T160">部署在網路節點，分析封包流量；</text:span><text:span text:style-name="T220">HIDS </text:span><text:span text:style-name="T160">才看 </text:span><text:span text:style-name="T220">Log</text:span><text:span text:style-name="T160">。</text:span></text:p>
          </table:table-cell>
        </table:table-row>
        <table:table-row table:style-name="表格127.1">
          <table:table-cell table:style-name="表格127.A3" office:value-type="string">
            <text:p text:style-name="P42" loext:marker-style-name="T159"><text:span text:style-name="T220">Q6 SNMP </text:span><text:span text:style-name="T160">的主要用途？</text:span></text:p>
          </table:table-cell>
          <table:table-cell table:style-name="表格127.A3" office:value-type="string">
            <text:p text:style-name="P42" loext:marker-style-name="T159"><text:span text:style-name="T160">管理網路設備</text:span><text:span text:style-name="T159"/></text:p>
          </table:table-cell>
          <table:table-cell table:style-name="表格127.A3" office:value-type="string">
            <text:p text:style-name="P42" loext:marker-style-name="T159"><text:span text:style-name="T220">SNMP </text:span><text:span text:style-name="T160">監控與管理路由器、交換器狀態（</text:span><text:span text:style-name="T220">CPU</text:span><text:span text:style-name="T160">、流量）。</text:span></text:p>
          </table:table-cell>
        </table:table-row>
        <table:table-row table:style-name="表格127.1">
          <table:table-cell table:style-name="表格127.A2" office:value-type="string">
            <text:p text:style-name="P42" loext:marker-style-name="T159"><text:span text:style-name="T220">Q7 ICMP </text:span><text:span text:style-name="T160">常用於哪種工具？</text:span></text:p>
          </table:table-cell>
          <table:table-cell table:style-name="表格127.A2" office:value-type="string">
            <text:p text:style-name="P42" loext:marker-style-name="T159"><text:span text:style-name="T220">Ping</text:span><text:span text:style-name="T159"/></text:p>
          </table:table-cell>
          <table:table-cell table:style-name="表格127.A2" office:value-type="string">
            <text:p text:style-name="P42" loext:marker-style-name="T159"><text:span text:style-name="T220">Ping </text:span><text:span text:style-name="T160">與 </text:span><text:span text:style-name="T220">Traceroute </text:span><text:span text:style-name="T160">都用 </text:span><text:span text:style-name="T220">ICMP </text:span><text:span text:style-name="T160">診斷網路連線。</text:span></text:p>
          </table:table-cell>
        </table:table-row>
        <table:table-row table:style-name="表格127.1">
          <table:table-cell table:style-name="表格127.A3" office:value-type="string">
            <text:p text:style-name="P42" loext:marker-style-name="T159"><text:span text:style-name="T220">Q8 ICMP </text:span><text:span text:style-name="T160">屬 </text:span><text:span text:style-name="T220">OSI </text:span><text:span text:style-name="T160">哪一層？</text:span></text:p>
          </table:table-cell>
          <table:table-cell table:style-name="表格127.A3" office:value-type="string">
            <text:p text:style-name="P42" loext:marker-style-name="T159"><text:span text:style-name="T220">Network Layer</text:span><text:span text:style-name="T159"/></text:p>
          </table:table-cell>
          <table:table-cell table:style-name="表格127.A3" office:value-type="string">
            <text:p text:style-name="P42" loext:marker-style-name="T159"><text:span text:style-name="T220">ICMP </text:span><text:span text:style-name="T160">是 </text:span><text:span text:style-name="T220">IP </text:span><text:span text:style-name="T160">的附屬協定，屬網路層；</text:span><text:span text:style-name="T220">SNMP </text:span><text:span text:style-name="T160">才是應用層。</text:span></text:p>
          </table:table-cell>
        </table:table-row>
        <table:table-row table:style-name="表格127.1">
          <table:table-cell table:style-name="表格127.A2" office:value-type="string">
            <text:p text:style-name="P42" loext:marker-style-name="T159"><text:span text:style-name="T220">Q9 </text:span><text:span text:style-name="T160">何者用 </text:span><text:span text:style-name="T220">UDP </text:span><text:span text:style-name="T160">且屬應用層？</text:span></text:p>
          </table:table-cell>
          <table:table-cell table:style-name="表格127.A2" office:value-type="string">
            <text:p text:style-name="P42" loext:marker-style-name="T159"><text:span text:style-name="T220">SNMP</text:span><text:span text:style-name="T159"/></text:p>
          </table:table-cell>
          <table:table-cell table:style-name="表格127.A2" office:value-type="string">
            <text:p text:style-name="P42" loext:marker-style-name="T159"><text:span text:style-name="T220">SNMP </text:span><text:span text:style-name="T160">用 </text:span><text:span text:style-name="T220">UDP</text:span><text:span text:style-name="T160">、屬應用層；</text:span><text:span text:style-name="T220">ICMP </text:span><text:span text:style-name="T160">是網路層。</text:span></text:p>
          </table:table-cell>
        </table:table-row>
        <table:table-row table:style-name="表格127.1">
          <table:table-cell table:style-name="表格127.A3" office:value-type="string">
            <text:p text:style-name="P42" loext:marker-style-name="T159"><text:span text:style-name="T220">Q10 </text:span><text:span text:style-name="T160">下列何者正確？</text:span></text:p>
          </table:table-cell>
          <table:table-cell table:style-name="表格127.A3" office:value-type="string">
            <text:p text:style-name="P42" loext:marker-style-name="T159"><text:span text:style-name="T220">SNMP </text:span><text:span text:style-name="T160">用於設備管理</text:span></text:p>
          </table:table-cell>
          <table:table-cell table:style-name="表格127.A3" office:value-type="string">
            <text:p text:style-name="P42" loext:marker-style-name="T159"><text:span text:style-name="T220">IDS </text:span><text:span text:style-name="T160">不阻擋；</text:span><text:span text:style-name="T220">Firewall </text:span><text:span text:style-name="T160">不做行為分析；</text:span><text:span text:style-name="T220">ICMP </text:span><text:span text:style-name="T160">只做網路診斷。</text:span></text:p>
          </table:table-cell>
        </table:table-row>
      </table:table>
      <text:h text:style-name="P11" text:outline-level="2" loext:marker-style-name="T27"><text:span text:style-name="T28">肆、企業資訊安全：預防 → 偵測 → 復原</text:span><text:span text:style-name="T27"/></text:h>
      <text:p text:style-name="P48" loext:marker-style-name="T112"><text:span text:style-name="T111">企業資訊系統（官網、資料庫、公文</text:span><text:span text:style-name="T177">/</text:span><text:span text:style-name="T111">健保</text:span><text:span text:style-name="T177">/</text:span><text:span text:style-name="T111">銀行系統）每天面臨駭客入侵、惡意程式、員工誤操作、硬體故障、天災、勒索病毒等威脅。資安不只是「裝防火牆」，而是在事情發生前、發生中、發生後，每個環節都有對應防禦。</text:span>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4" loext:marker-style-name="T77"><text:span text:style-name="T78">三大核心</text:span><text:span text:style-name="T77"/></text:p>
            </table:table-cell>
            <table:table-cell table:style-name="表格128.A1" office:value-type="string">
              <text:p text:style-name="P4" loext:marker-style-name="T77"><text:span text:style-name="T78">目標</text:span><text:span text:style-name="T77"/></text:p>
            </table:table-cell>
            <table:table-cell table:style-name="表格128.A1" office:value-type="string">
              <text:p text:style-name="P4" loext:marker-style-name="T77"><text:span text:style-name="T78">做法</text:span><text:span text:style-name="T77"/>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42" loext:marker-style-name="T149"><text:span text:style-name="T212">① </text:span><text:span text:style-name="T150">事前預防</text:span></text:p>
          </table:table-cell>
          <table:table-cell table:style-name="表格128.A2" office:value-type="string">
            <text:p text:style-name="P42" loext:marker-style-name="T149"><text:span text:style-name="T150">讓壞事不要發生</text:span><text:span text:style-name="T149"/></text:p>
          </table:table-cell>
          <table:table-cell table:style-name="表格128.A2" office:value-type="string">
            <text:p text:style-name="P42" loext:marker-style-name="T149"><text:span text:style-name="T150">設密碼、</text:span><text:span text:style-name="T212">MFA</text:span><text:span text:style-name="T150">、防火牆、教育訓練、弱點掃描、資產盤點</text:span></text:p>
          </table:table-cell>
        </table:table-row>
        <table:table-row table:style-name="表格128.1">
          <table:table-cell table:style-name="表格128.A3" office:value-type="string">
            <text:p text:style-name="P42" loext:marker-style-name="T149"><text:span text:style-name="T212">② </text:span><text:span text:style-name="T150">事中偵測</text:span></text:p>
          </table:table-cell>
          <table:table-cell table:style-name="表格128.A3" office:value-type="string">
            <text:p text:style-name="P42" loext:marker-style-name="T149"><text:span text:style-name="T150">出事時盡快發現</text:span><text:span text:style-name="T149"/></text:p>
          </table:table-cell>
          <table:table-cell table:style-name="表格128.A3" office:value-type="string">
            <text:p text:style-name="P42" loext:marker-style-name="T149"><text:span text:style-name="T150">偵測異常登入、流量、病毒警報（</text:span><text:span text:style-name="T212">IDS/IPS/NGFW/EDR/MDR</text:span><text:span text:style-name="T150">）</text:span></text:p>
          </table:table-cell>
        </table:table-row>
        <table:table-row table:style-name="表格128.1">
          <table:table-cell table:style-name="表格128.A2" office:value-type="string">
            <text:p text:style-name="P42" loext:marker-style-name="T149"><text:span text:style-name="T212">③ </text:span><text:span text:style-name="T150">事後復原</text:span></text:p>
          </table:table-cell>
          <table:table-cell table:style-name="表格128.A2" office:value-type="string">
            <text:p text:style-name="P42" loext:marker-style-name="T149"><text:span text:style-name="T150">壞掉後快速救回來</text:span><text:span text:style-name="T149"/></text:p>
          </table:table-cell>
          <table:table-cell table:style-name="表格128.A2" office:value-type="string">
            <text:p text:style-name="P42" loext:marker-style-name="T149"><text:span text:style-name="T150">備份還原、啟動備援系統、災難復原（</text:span><text:span text:style-name="T212">BCP</text:span><text:span text:style-name="T150">、</text:span><text:span text:style-name="T212">RTO/RPO</text:span><text:span text:style-name="T150">）</text:span></text:p>
          </table:table-cell>
        </table:table-row>
      </table:table>
      <text:h text:style-name="P12" text:outline-level="3"><text:span text:style-name="T225">▍</text:span><text:span text:style-name="T226"> </text:span><text:span text:style-name="T227">事前預防：</text:span><text:span text:style-name="T226">MFA</text:span><text:span text:style-name="T227">（多因素驗證）</text:span></text:h>
      <text:p text:style-name="P48" loext:marker-style-name="T112"><text:span text:style-name="T177">MFA = Multi-Factor Authentication</text:span><text:span text:style-name="T111">。登入帳號時不只輸入密碼，還要再驗證一次身份：手機簡訊驗證碼、</text:span><text:span text:style-name="T177">Google Authenticator </text:span><text:span text:style-name="T111">動態碼、指紋或臉部辨識。為什麼要 </text:span><text:span text:style-name="T177">MFA</text:span><text:span text:style-name="T111">？即使駭客知道你的密碼，沒有你</text:span><text:soft-page-break/><text:span text:style-name="T111">的手機或指紋，也無法登入。</text:span></text:p>
      <text:h text:style-name="P12" text:outline-level="3"><text:span text:style-name="T225">▍</text:span><text:span text:style-name="T226"> </text:span><text:span text:style-name="T227">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4" loext:marker-style-name="T77"><text:span text:style-name="T78">工具</text:span><text:span text:style-name="T77"/></text:p>
            </table:table-cell>
            <table:table-cell table:style-name="表格129.A1" office:value-type="string">
              <text:p text:style-name="P4" loext:marker-style-name="T77"><text:span text:style-name="T78">全名 </text:span><text:span text:style-name="T83">/ </text:span><text:span text:style-name="T78">說明</text:span></text:p>
            </table:table-cell>
            <table:table-cell table:style-name="表格129.A1" office:value-type="string">
              <text:p text:style-name="P4" loext:marker-style-name="T77"><text:span text:style-name="T78">會阻擋？</text:span><text:span text:style-name="T77"/>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42" loext:marker-style-name="T149"><text:span text:style-name="T212">Firewall</text:span><text:span text:style-name="T149"/></text:p>
          </table:table-cell>
          <table:table-cell table:style-name="表格129.A2" office:value-type="string">
            <text:p text:style-name="P42" loext:marker-style-name="T149"><text:span text:style-name="T150">控制誰能進出網路</text:span><text:span text:style-name="T149"/></text:p>
          </table:table-cell>
          <table:table-cell table:style-name="表格129.A2" office:value-type="string">
            <text:p text:style-name="P42" loext:marker-style-name="T149"><text:span text:style-name="T212">✔ </text:span><text:span text:style-name="T150">會</text:span></text:p>
          </table:table-cell>
        </table:table-row>
        <table:table-row table:style-name="表格129.1">
          <table:table-cell table:style-name="表格129.A3" office:value-type="string">
            <text:p text:style-name="P42" loext:marker-style-name="T149"><text:span text:style-name="T212">NGFW</text:span><text:span text:style-name="T149"/></text:p>
          </table:table-cell>
          <table:table-cell table:style-name="表格129.A3" office:value-type="string">
            <text:p text:style-name="P42" loext:marker-style-name="T149"><text:span text:style-name="T150">次世代防火牆，能辨識應用層威脅</text:span><text:span text:style-name="T149"/></text:p>
          </table:table-cell>
          <table:table-cell table:style-name="表格129.A3" office:value-type="string">
            <text:p text:style-name="P42" loext:marker-style-name="T149"><text:span text:style-name="T212">✔ </text:span><text:span text:style-name="T150">會</text:span></text:p>
          </table:table-cell>
        </table:table-row>
        <table:table-row table:style-name="表格129.1">
          <table:table-cell table:style-name="表格129.A2" office:value-type="string">
            <text:p text:style-name="P42" loext:marker-style-name="T149"><text:span text:style-name="T212">IDS</text:span><text:span text:style-name="T149"/></text:p>
          </table:table-cell>
          <table:table-cell table:style-name="表格129.A2" office:value-type="string">
            <text:p text:style-name="P42" loext:marker-style-name="T149"><text:span text:style-name="T150">入侵偵測系統，發現異常就發警報</text:span><text:span text:style-name="T149"/></text:p>
          </table:table-cell>
          <table:table-cell table:style-name="表格129.A2" office:value-type="string">
            <text:p text:style-name="P42" loext:marker-style-name="T149"><text:span text:style-name="T212">✘ </text:span><text:span text:style-name="T150">不會</text:span></text:p>
          </table:table-cell>
        </table:table-row>
        <table:table-row table:style-name="表格129.1">
          <table:table-cell table:style-name="表格129.A3" office:value-type="string">
            <text:p text:style-name="P42" loext:marker-style-name="T149"><text:span text:style-name="T212">IPS</text:span><text:span text:style-name="T149"/></text:p>
          </table:table-cell>
          <table:table-cell table:style-name="表格129.A3" office:value-type="string">
            <text:p text:style-name="P42" loext:marker-style-name="T149"><text:span text:style-name="T150">入侵防禦系統，發現異常直接阻擋</text:span><text:span text:style-name="T149"/></text:p>
          </table:table-cell>
          <table:table-cell table:style-name="表格129.A3" office:value-type="string">
            <text:p text:style-name="P42" loext:marker-style-name="T149"><text:span text:style-name="T212">✔ </text:span><text:span text:style-name="T150">會</text:span></text:p>
          </table:table-cell>
        </table:table-row>
        <table:table-row table:style-name="表格129.1">
          <table:table-cell table:style-name="表格129.A2" office:value-type="string">
            <text:p text:style-name="P42" loext:marker-style-name="T149"><text:span text:style-name="T212">EDR</text:span><text:span text:style-name="T149"/></text:p>
          </table:table-cell>
          <table:table-cell table:style-name="表格129.A2" office:value-type="string">
            <text:p text:style-name="P42" loext:marker-style-name="T149"><text:span text:style-name="T212">Endpoint Detection &amp; Response</text:span><text:span text:style-name="T150">，監控每台電腦行為</text:span></text:p>
          </table:table-cell>
          <table:table-cell table:style-name="表格129.A2" office:value-type="string">
            <text:p text:style-name="P42" loext:marker-style-name="T149"><text:span text:style-name="T212">✔ </text:span><text:span text:style-name="T150">會</text:span></text:p>
          </table:table-cell>
        </table:table-row>
        <table:table-row table:style-name="表格129.1">
          <table:table-cell table:style-name="表格129.A3" office:value-type="string">
            <text:p text:style-name="P42" loext:marker-style-name="T149"><text:span text:style-name="T212">MDR</text:span><text:span text:style-name="T149"/></text:p>
          </table:table-cell>
          <table:table-cell table:style-name="表格129.A3" office:value-type="string">
            <text:p text:style-name="P42" loext:marker-style-name="T149"><text:span text:style-name="T212">Managed D&amp;R</text:span><text:span text:style-name="T150">，委外資安監控服務（</text:span><text:span text:style-name="T212">24 </text:span><text:span text:style-name="T150">小時）</text:span></text:p>
          </table:table-cell>
          <table:table-cell table:style-name="表格129.A3" office:value-type="string">
            <text:p text:style-name="P42" loext:marker-style-name="T149"><text:span text:style-name="T212">✔ </text:span><text:span text:style-name="T150">會</text:span>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6"><text:span text:style-name="T222">🏠 <text:s/></text:span><text:span text:style-name="T53">比喻幫你秒懂（公司＝大樓）</text:span></text:p>
            <text:p text:style-name="P7" loext:marker-style-name="T112"><text:span text:style-name="T111">防火牆＝社區大門警衛；</text:span><text:span text:style-name="T177">NGFW</text:span><text:span text:style-name="T111">＝更聰明的警衛（還會看你帶什麼東西進來）；</text:span><text:span text:style-name="T177">IDS</text:span><text:span text:style-name="T111">＝監視器警報（只會叫，不會阻止）；</text:span><text:span text:style-name="T177">IPS</text:span><text:span text:style-name="T111">＝保全（直接壓制壞人）；</text:span><text:span text:style-name="T177">EDR</text:span><text:span text:style-name="T111">＝每個房間都裝攝影機（監控每台電腦</text:span><text:span text:style-name="T177">/</text:span><text:span text:style-name="T111">程式）；</text:span><text:span text:style-name="T177">MDR</text:span><text:span text:style-name="T111">＝把保全工作委外給專業公司 </text:span><text:span text:style-name="T177">24 </text:span><text:span text:style-name="T111">小時監控。</text:span></text:p>
          </table:table-cell>
          <table:covered-table-cell/>
          <table:covered-table-cell/>
        </table:table-row>
      </table:table>
      <text:h text:style-name="P12" text:outline-level="3"><text:span text:style-name="T225">▍</text:span><text:span text:style-name="T226"> </text:span><text:span text:style-name="T227">事後復原：備份、</text:span><text:span text:style-name="T226">RTO / RPO</text:span><text:span text:style-name="T227">、</text:span><text:span text:style-name="T226">BCP</text:span></text:h>
      <text:p text:style-name="P48" loext:marker-style-name="T112"><text:span text:style-name="T111">當資料損毀或遭加密（如勒索病毒），可透過備份救回。最佳實踐：本地備份 </text:span><text:span text:style-name="T177">+ </text:span><text:span text:style-name="T111">異地備份（台北機房同步到高雄機房）；定期測試「備份能否真的還原」；雲端備份（</text:span><text:span text:style-name="T177">AWS/Azure/GCP</text:span><text:span text:style-name="T111">）作額外保險。為什麼異地備份？若台北機房整棟失火或淹水，本地備份也跟著毀，異地備份確保資料仍有副本在另一城市。</text:span>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4" loext:marker-style-name="T77"><text:span text:style-name="T78">指標</text:span><text:span text:style-name="T77"/></text:p>
            </table:table-cell>
            <table:table-cell table:style-name="表格130.A1" office:value-type="string">
              <text:p text:style-name="P4" loext:marker-style-name="T77"><text:span text:style-name="T78">全名</text:span><text:span text:style-name="T77"/></text:p>
            </table:table-cell>
            <table:table-cell table:style-name="表格130.A1" office:value-type="string">
              <text:p text:style-name="P4" loext:marker-style-name="T77"><text:span text:style-name="T78">問什麼</text:span><text:span text:style-name="T77"/></text:p>
            </table:table-cell>
            <table:table-cell table:style-name="表格130.A1" office:value-type="string">
              <text:p text:style-name="P4" loext:marker-style-name="T77"><text:span text:style-name="T78">範例</text:span><text:span text:style-name="T77"/>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42" loext:marker-style-name="T149"><text:span text:style-name="T212">RTO</text:span><text:span text:style-name="T149"/></text:p>
          </table:table-cell>
          <table:table-cell table:style-name="表格130.A2" office:value-type="string">
            <text:p text:style-name="P42" loext:marker-style-name="T149"><text:span text:style-name="T212">Recovery Time Objective </text:span><text:span text:style-name="T150">復原時間目標</text:span></text:p>
          </table:table-cell>
          <table:table-cell table:style-name="表格130.A2" office:value-type="string">
            <text:p text:style-name="P42" loext:marker-style-name="T149"><text:span text:style-name="T150">系統出問題後，最多能停多久？</text:span><text:span text:style-name="T149"/></text:p>
          </table:table-cell>
          <table:table-cell table:style-name="表格130.A2" office:value-type="string">
            <text:p text:style-name="P42" loext:marker-style-name="T149"><text:span text:style-name="T150">銀行 </text:span><text:span text:style-name="T212">RTO 10 </text:span><text:span text:style-name="T150">分鐘；學校網站 </text:span><text:span text:style-name="T212">RTO </text:span><text:span text:style-name="T150">半天</text:span></text:p>
          </table:table-cell>
        </table:table-row>
        <table:table-row table:style-name="表格130.1">
          <table:table-cell table:style-name="表格130.A3" office:value-type="string">
            <text:p text:style-name="P42" loext:marker-style-name="T149"><text:span text:style-name="T212">RPO</text:span><text:span text:style-name="T149"/></text:p>
          </table:table-cell>
          <table:table-cell table:style-name="表格130.A3" office:value-type="string">
            <text:p text:style-name="P42" loext:marker-style-name="T149"><text:span text:style-name="T212">Recovery Point Objective </text:span><text:span text:style-name="T150">復原點目標</text:span></text:p>
          </table:table-cell>
          <table:table-cell table:style-name="表格130.A3" office:value-type="string">
            <text:p text:style-name="P42" loext:marker-style-name="T149"><text:span text:style-name="T150">最多能接受丟失幾小時的資料？</text:span><text:span text:style-name="T149"/></text:p>
          </table:table-cell>
          <table:table-cell table:style-name="表格130.A3" office:value-type="string">
            <text:p text:style-name="P42" loext:marker-style-name="T149"><text:span text:style-name="T150">銀行 </text:span><text:span text:style-name="T212">RPO </text:span><text:span text:style-name="T150">接近 </text:span><text:span text:style-name="T212">0</text:span><text:span text:style-name="T150">；一般公司 </text:span><text:span text:style-name="T212">RPO 24 </text:span><text:span text:style-name="T150">小時</text:span>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6"><text:span text:style-name="T222">⏱ <text:s/></text:span><text:span text:style-name="T281">一句話記憶法</text:span></text:p>
            <text:p text:style-name="P7"><text:span text:style-name="T288">RTO = </text:span><text:span text:style-name="T282">停機時間</text:span><text:span text:style-name="T111">（能停多久？）　</text:span><text:span text:style-name="T288">RPO = </text:span><text:span text:style-name="T282">資料損失量</text:span><text:span text:style-name="T111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6"><text:span text:style-name="T222">🏢 <text:s/></text:span><text:span text:style-name="T65">BCP</text:span><text:span text:style-name="T53">：公司炸掉了還能繼續運作嗎？</text:span></text:p>
            <text:p text:style-name="P7" loext:marker-style-name="T112"><text:span text:style-name="T177">BCP = Business Continuity Planning</text:span><text:span text:style-name="T111">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span></text:p>
          </table:table-cell>
          <table:covered-table-cell/>
          <table:covered-table-cell/>
          <table:covered-table-cell/>
        </table:table-row>
      </table:table>
      <text:h text:style-name="P12" text:outline-level="3"><text:span text:style-name="T225">▍</text:span><text:span text:style-name="T226"> SSDLC</text:span><text:span text:style-name="T227">：軟體開發的每個階段都加入資安</text:span></text:h>
      <text:p text:style-name="P48" loext:marker-style-name="T112"><text:span text:style-name="T177">SSDLC = Security Software Development Life Cycle</text:span><text:span text:style-name="T111">。以前工程師只顧「功能能動就好」，上線後才補漏洞；正確做法是每個開發階段都同時考慮「這樣做會不會被駭？」</text:span>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4" loext:marker-style-name="T77"><text:span text:style-name="T78">階段</text:span><text:span text:style-name="T77"/></text:p>
            </table:table-cell>
            <table:table-cell table:style-name="表格131.A1" office:value-type="string">
              <text:p text:style-name="P4" loext:marker-style-name="T77"><text:span text:style-name="T78">英文</text:span><text:span text:style-name="T77"/></text:p>
            </table:table-cell>
            <table:table-cell table:style-name="表格131.A1" office:value-type="string">
              <text:p text:style-name="P4" loext:marker-style-name="T77"><text:span text:style-name="T78">做什麼</text:span><text:span text:style-name="T77"/></text:p>
            </table:table-cell>
            <table:table-cell table:style-name="表格131.A1" office:value-type="string">
              <text:p text:style-name="P4" loext:marker-style-name="T77"><text:span text:style-name="T78">資安重點</text:span><text:span text:style-name="T77"/>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42" loext:marker-style-name="T149"><text:span text:style-name="T212">① </text:span><text:span text:style-name="T150">定義</text:span></text:p>
          </table:table-cell>
          <table:table-cell table:style-name="表格131.A2" office:value-type="string">
            <text:p text:style-name="P42" loext:marker-style-name="T149"><text:span text:style-name="T212">Define</text:span><text:span text:style-name="T149"/></text:p>
          </table:table-cell>
          <table:table-cell table:style-name="表格131.A2" office:value-type="string">
            <text:p text:style-name="P42" loext:marker-style-name="T149"><text:span text:style-name="T150">確認需求與範圍</text:span><text:span text:style-name="T149"/></text:p>
          </table:table-cell>
          <table:table-cell table:style-name="表格131.A2" office:value-type="string">
            <text:p text:style-name="P42" loext:marker-style-name="T149"><text:span text:style-name="T150">列出安全需求（需要登入驗證嗎？）</text:span><text:span text:style-name="T149"/></text:p>
          </table:table-cell>
        </table:table-row>
        <table:table-row table:style-name="表格131.1">
          <table:table-cell table:style-name="表格131.A3" office:value-type="string">
            <text:p text:style-name="P42" loext:marker-style-name="T149"><text:span text:style-name="T212">② </text:span><text:span text:style-name="T150">設計</text:span></text:p>
          </table:table-cell>
          <table:table-cell table:style-name="表格131.A3" office:value-type="string">
            <text:p text:style-name="P42" loext:marker-style-name="T149"><text:span text:style-name="T212">Design</text:span><text:span text:style-name="T149"/></text:p>
          </table:table-cell>
          <table:table-cell table:style-name="表格131.A3" office:value-type="string">
            <text:p text:style-name="P42" loext:marker-style-name="T149"><text:span text:style-name="T150">設計系統架構</text:span><text:span text:style-name="T149"/></text:p>
          </table:table-cell>
          <table:table-cell table:style-name="表格131.A3" office:value-type="string">
            <text:p text:style-name="P42" loext:marker-style-name="T149"><text:span text:style-name="T150">規劃權限控管、密碼加密、防 </text:span><text:span text:style-name="T212">SQL Injection</text:span></text:p>
          </table:table-cell>
        </table:table-row>
        <table:table-row table:style-name="表格131.1">
          <table:table-cell table:style-name="表格131.A2" office:value-type="string">
            <text:p text:style-name="P42" loext:marker-style-name="T149"><text:span text:style-name="T212">③ </text:span><text:span text:style-name="T150">開發</text:span></text:p>
          </table:table-cell>
          <table:table-cell table:style-name="表格131.A2" office:value-type="string">
            <text:p text:style-name="P42" loext:marker-style-name="T149"><text:span text:style-name="T212">Develop</text:span><text:span text:style-name="T149"/></text:p>
          </table:table-cell>
          <table:table-cell table:style-name="表格131.A2" office:value-type="string">
            <text:p text:style-name="P42" loext:marker-style-name="T149"><text:span text:style-name="T150">工程師寫程式</text:span><text:span text:style-name="T149"/></text:p>
          </table:table-cell>
          <table:table-cell table:style-name="表格131.A2" office:value-type="string">
            <text:p text:style-name="P42" loext:marker-style-name="T149"><text:span text:style-name="T150">遵守安全編碼規範，不寫危險程式碼</text:span><text:span text:style-name="T149"/></text:p>
          </table:table-cell>
        </table:table-row>
        <table:table-row table:style-name="表格131.1">
          <table:table-cell table:style-name="表格131.A3" office:value-type="string">
            <text:p text:style-name="P42" loext:marker-style-name="T149"><text:span text:style-name="T212">④ </text:span><text:span text:style-name="T150">測試</text:span></text:p>
          </table:table-cell>
          <table:table-cell table:style-name="表格131.A3" office:value-type="string">
            <text:p text:style-name="P42" loext:marker-style-name="T149"><text:span text:style-name="T212">Test</text:span><text:span text:style-name="T149"/></text:p>
          </table:table-cell>
          <table:table-cell table:style-name="表格131.A3" office:value-type="string">
            <text:p text:style-name="P42" loext:marker-style-name="T149"><text:span text:style-name="T150">測試功能與安全</text:span><text:span text:style-name="T149"/></text:p>
          </table:table-cell>
          <table:table-cell table:style-name="表格131.A3" office:value-type="string">
            <text:p text:style-name="P42" loext:marker-style-name="T149"><text:span text:style-name="T150">弱點掃描、滲透測試，找出漏洞</text:span><text:span text:style-name="T149"/></text:p>
          </table:table-cell>
        </table:table-row>
        <table:table-row table:style-name="表格131.1">
          <table:table-cell table:style-name="表格131.A2" office:value-type="string">
            <text:p text:style-name="P42" loext:marker-style-name="T149"><text:span text:style-name="T212">⑤ </text:span><text:span text:style-name="T150">上線</text:span></text:p>
          </table:table-cell>
          <table:table-cell table:style-name="表格131.A2" office:value-type="string">
            <text:p text:style-name="P42" loext:marker-style-name="T149"><text:span text:style-name="T212">Deploy</text:span><text:span text:style-name="T149"/></text:p>
          </table:table-cell>
          <table:table-cell table:style-name="表格131.A2" office:value-type="string">
            <text:p text:style-name="P42" loext:marker-style-name="T149"><text:span text:style-name="T150">正式發布系統</text:span><text:span text:style-name="T149"/></text:p>
          </table:table-cell>
          <table:table-cell table:style-name="表格131.A2" office:value-type="string">
            <text:p text:style-name="P42" loext:marker-style-name="T149"><text:span text:style-name="T150">確認設定沒疏漏，最小權限原則</text:span><text:span text:style-name="T149"/></text:p>
          </table:table-cell>
        </table:table-row>
        <text:soft-page-break/>
        <table:table-row table:style-name="表格131.1">
          <table:table-cell table:style-name="表格131.A3" office:value-type="string">
            <text:p text:style-name="P42" loext:marker-style-name="T149"><text:span text:style-name="T212">⑥ </text:span><text:span text:style-name="T150">維護</text:span></text:p>
          </table:table-cell>
          <table:table-cell table:style-name="表格131.A3" office:value-type="string">
            <text:p text:style-name="P42" loext:marker-style-name="T149"><text:span text:style-name="T212">Maintain</text:span><text:span text:style-name="T149"/></text:p>
          </table:table-cell>
          <table:table-cell table:style-name="表格131.A3" office:value-type="string">
            <text:p text:style-name="P42" loext:marker-style-name="T149"><text:span text:style-name="T150">持續監控與更新</text:span><text:span text:style-name="T149"/></text:p>
          </table:table-cell>
          <table:table-cell table:style-name="表格131.A3" office:value-type="string">
            <text:p text:style-name="P42" loext:marker-style-name="T149"><text:span text:style-name="T150">定期更新修補，監控異常行為</text:span><text:span text:style-name="T149"/></text:p>
          </table:table-cell>
        </table:table-row>
        <table:table-row table:style-name="表格131.1">
          <table:table-cell table:style-name="表格131.A8" table:number-columns-spanned="4" office:value-type="string">
            <text:p text:style-name="P6"><text:span text:style-name="T222">🔑 <text:s/></text:span><text:span text:style-name="T239">SSDLC </text:span><text:span text:style-name="T227">核心</text:span></text:p>
            <text:p text:style-name="P7" loext:marker-style-name="T112"><text:span text:style-name="T111">核心精神「左移（</text:span><text:span text:style-name="T177">Shift Left</text:span><text:span text:style-name="T111">）」——把資安工作從最後一步，往前移到設計和開發階段。越早發現漏洞，修復成本越低。</text:span></text:p>
          </table:table-cell>
          <table:covered-table-cell/>
          <table:covered-table-cell/>
          <table:covered-table-cell/>
        </table:table-row>
      </table:table>
      <text:h text:style-name="P12" text:outline-level="3"><text:span text:style-name="T225">▍</text:span><text:span text:style-name="T226"> ISO 27001</text:span><text:span text:style-name="T227">：用制度管理資安</text:span></text:h>
      <text:p text:style-name="P48" loext:marker-style-name="T112"><text:span text:style-name="T177">ISO 27001 </text:span><text:span text:style-name="T111">是國際公認的資安管理制度標準，建立的制度稱為 </text:span><text:span text:style-name="T177">ISMS</text:span><text:span text:style-name="T111">（</text:span><text:span text:style-name="T177">Information Security Management System</text:span><text:span text:style-name="T111">，資訊安全管理系統）。重點是：資安不只是買設備，而是建立一套完整的管理制度。</text:span>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4" loext:marker-style-name="T77"><text:span text:style-name="T78">四個面向</text:span><text:span text:style-name="T77"/></text:p>
            </table:table-cell>
            <table:table-cell table:style-name="表格132.A1" office:value-type="string">
              <text:p text:style-name="P4" loext:marker-style-name="T77"><text:span text:style-name="T78">管什麼</text:span><text:span text:style-name="T77"/></text:p>
            </table:table-cell>
            <table:table-cell table:style-name="表格132.A1" office:value-type="string">
              <text:p text:style-name="P4" loext:marker-style-name="T77"><text:span text:style-name="T78">例子</text:span><text:span text:style-name="T77"/>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42" loext:marker-style-name="T149"><text:span text:style-name="T150">人（</text:span><text:span text:style-name="T212">People</text:span><text:span text:style-name="T150">）</text:span></text:p>
          </table:table-cell>
          <table:table-cell table:style-name="表格132.A2" office:value-type="string">
            <text:p text:style-name="P42" loext:marker-style-name="T149"><text:span text:style-name="T150">管理人員的行為與責任</text:span><text:span text:style-name="T149"/></text:p>
          </table:table-cell>
          <table:table-cell table:style-name="表格132.A2" office:value-type="string">
            <text:p text:style-name="P42" loext:marker-style-name="T149"><text:span text:style-name="T150">員工教育訓練、離職員工帳號立即停用、權限最小化</text:span><text:span text:style-name="T149"/></text:p>
          </table:table-cell>
        </table:table-row>
        <table:table-row table:style-name="表格132.1">
          <table:table-cell table:style-name="表格132.A3" office:value-type="string">
            <text:p text:style-name="P42" loext:marker-style-name="T149"><text:span text:style-name="T150">技術（</text:span><text:span text:style-name="T212">Technology</text:span><text:span text:style-name="T150">）</text:span></text:p>
          </table:table-cell>
          <table:table-cell table:style-name="表格132.A3" office:value-type="string">
            <text:p text:style-name="P42" loext:marker-style-name="T149"><text:span text:style-name="T150">使用適當的安全技術</text:span><text:span text:style-name="T149"/></text:p>
          </table:table-cell>
          <table:table-cell table:style-name="表格132.A3" office:value-type="string">
            <text:p text:style-name="P42" loext:marker-style-name="T149"><text:span text:style-name="T150">防火牆、</text:span><text:span text:style-name="T212">MFA</text:span><text:span text:style-name="T150">、資料加密、</text:span><text:span text:style-name="T212">EDR</text:span></text:p>
          </table:table-cell>
        </table:table-row>
        <table:table-row table:style-name="表格132.1">
          <table:table-cell table:style-name="表格132.A2" office:value-type="string">
            <text:p text:style-name="P42" loext:marker-style-name="T149"><text:span text:style-name="T150">組織（</text:span><text:span text:style-name="T212">Organization</text:span><text:span text:style-name="T150">）</text:span></text:p>
          </table:table-cell>
          <table:table-cell table:style-name="表格132.A2" office:value-type="string">
            <text:p text:style-name="P42" loext:marker-style-name="T149"><text:span text:style-name="T150">建立流程與管理制度</text:span><text:span text:style-name="T149"/></text:p>
          </table:table-cell>
          <table:table-cell table:style-name="表格132.A2" office:value-type="string">
            <text:p text:style-name="P42" loext:marker-style-name="T149"><text:span text:style-name="T150">資安政策、</text:span><text:span text:style-name="T212">SOP</text:span><text:span text:style-name="T150">、定期審查、事件通報流程</text:span></text:p>
          </table:table-cell>
        </table:table-row>
        <table:table-row table:style-name="表格132.1">
          <table:table-cell table:style-name="表格132.A3" office:value-type="string">
            <text:p text:style-name="P42" loext:marker-style-name="T149"><text:span text:style-name="T150">實體（</text:span><text:span text:style-name="T212">Physical</text:span><text:span text:style-name="T150">）</text:span></text:p>
          </table:table-cell>
          <table:table-cell table:style-name="表格132.A3" office:value-type="string">
            <text:p text:style-name="P42" loext:marker-style-name="T149"><text:span text:style-name="T150">保護實體環境</text:span><text:span text:style-name="T149"/></text:p>
          </table:table-cell>
          <table:table-cell table:style-name="表格132.A3" office:value-type="string">
            <text:p text:style-name="P42" loext:marker-style-name="T149"><text:span text:style-name="T150">機房門禁、監視器、防止未授權人員進入</text:span><text:span text:style-name="T149"/>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6"><text:span text:style-name="T222">🌟 <text:s/></text:span><text:span text:style-name="T281">考試必背三句話</text:span></text:p>
            <text:p text:style-name="P7" loext:marker-style-name="T112"><text:span text:style-name="T177">1. </text:span><text:span text:style-name="T111">資安三階段：事前預防 → 事中偵測 → 事後復原。</text:span></text:p>
            <text:p text:style-name="P8" loext:marker-style-name="T112"><text:span text:style-name="T177">2. SSDLC</text:span><text:span text:style-name="T111">：六階段（</text:span><text:span text:style-name="T177">Define→Design→Develop→Test→Deploy→Maintain</text:span><text:span text:style-name="T111">）都加入資安。</text:span></text:p>
            <text:p text:style-name="P8" loext:marker-style-name="T112"><text:span text:style-name="T177">3. ISO 27001</text:span><text:span text:style-name="T111">：用 </text:span><text:span text:style-name="T177">ISMS </text:span><text:span text:style-name="T111">制度管理資安，涵蓋「人、技術、組織、實體」四面向。</text:span></text:p>
          </table:table-cell>
          <table:covered-table-cell/>
          <table:covered-table-cell/>
        </table:table-row>
      </table:table>
      <text:h text:style-name="P11" text:outline-level="2" loext:marker-style-name="T27"><text:span text:style-name="T28">伍、進階防禦：</text:span><text:span text:style-name="T27">EDR · MDR · MITRE ATT&amp;CK · </text:span><text:span text:style-name="T28">數位韌性</text:span></text:h>
      <text:p text:style-name="P48" loext:marker-style-name="T112"><text:span text:style-name="T111">現代駭客不一定放病毒，而是偷登入帳號偽裝成正常使用者、長期潛伏、利用合法工具發動攻擊。因此資安核心已從「防毒」轉向「持續監控電腦行為，即時偵測並快速應變」。</text:span><text:span text:style-name="T112"/></text:p>
      <text:h text:style-name="P12" text:outline-level="3"><text:span text:style-name="T225">▍</text:span><text:span text:style-name="T226"> EDR — </text:span><text:span text:style-name="T227">自己監控的資安工具</text:span></text:h>
      <text:p text:style-name="P48" loext:marker-style-name="T112"><text:span text:style-name="T177">EDR = Endpoint Detection and Response</text:span><text:span text:style-name="T111">（端點偵測回應）。想像每台電腦旁邊都站著一位保全，全程監視可疑行為。</text:span>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39" loext:marker-style-name="T71"><text:span text:style-name="T72">三大偵測範圍</text:span><text:span text:style-name="T71"/></text:p>
            </table:table-cell>
            <table:table-cell table:style-name="表格133.A1" office:value-type="string">
              <text:p text:style-name="P39" loext:marker-style-name="T71"><text:span text:style-name="T72">三大回應動作</text:span><text:span text:style-name="T71"/>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42" loext:marker-style-name="T85"><text:span text:style-name="T86">檔案行為：大量加密</text:span><text:span text:style-name="T161">/</text:span><text:span text:style-name="T86">修改系統檔案 → 可能勒索病毒｜程式行為：</text:span><text:span text:style-name="T161">Office </text:span><text:span text:style-name="T86">偷偷開命令列 → 明顯異常｜網路行為：突然連線境外 </text:span><text:span text:style-name="T161">IP → </text:span><text:span text:style-name="T86">可能已遭入侵</text:span></text:p>
          </table:table-cell>
          <table:table-cell table:style-name="表格133.A2" office:value-type="string">
            <text:p text:style-name="P42" loext:marker-style-name="T85"><text:span text:style-name="T86">中斷程序：立即殺掉可疑惡意程式｜隔離主機：切斷該電腦與內網連線，防擴散｜封鎖連線：禁止與駭客伺服器通訊</text:span><text:span text:style-name="T85"/>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6"><text:span text:style-name="T222">💡 <text:s/></text:span><text:span text:style-name="T227">核心觀念</text:span></text:p>
            <text:p text:style-name="P7" loext:marker-style-name="T112"><text:span text:style-name="T177">EDR </text:span><text:span text:style-name="T111">是「買工具、自己守」。企業需要有內部資安人員負責查看警報並處理事件。</text:span></text:p>
          </table:table-cell>
          <table:covered-table-cell/>
        </table:table-row>
      </table:table>
      <text:h text:style-name="P12" text:outline-level="3"><text:span text:style-name="T225">▍</text:span><text:span text:style-name="T226"> MDR — </text:span><text:span text:style-name="T227">委外的資安託管服務</text:span></text:h>
      <text:p text:style-name="P48" loext:marker-style-name="T112"><text:span text:style-name="T177">MDR = Managed Detection and Response</text:span><text:span text:style-name="T111">。重點在「</text:span><text:span text:style-name="T177">Managed</text:span><text:span text:style-name="T111">（託管）」——你不需要自己有資安團隊，直接花錢請外部資安公司 </text:span><text:span text:style-name="T177">24 </text:span><text:span text:style-name="T111">小時幫你守。服務包含 </text:span><text:span text:style-name="T177">SOC</text:span><text:span text:style-name="T111">（資安監控中心，專業人員 </text:span><text:span text:style-name="T177">24 </text:span><text:span text:style-name="T111">小時盯著）、</text:span><text:span text:style-name="T177">IDS</text:span><text:span text:style-name="T111">（入侵偵測警報）、漏洞掃描；應變服務包含威脅分析、應變建議、事件處理（遠端隔離、清除惡意程式、調查來源）。</text:span>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4" loext:marker-style-name="T71"><text:span text:style-name="T72">比較項目</text:span><text:span text:style-name="T71"/></text:p>
            </table:table-cell>
            <table:table-cell table:style-name="表格134.A1" office:value-type="string">
              <text:p text:style-name="P4" loext:marker-style-name="T71"><text:span text:style-name="T81">EDR</text:span><text:span text:style-name="T71"/></text:p>
            </table:table-cell>
            <table:table-cell table:style-name="表格134.A1" office:value-type="string">
              <text:p text:style-name="P4" loext:marker-style-name="T71"><text:span text:style-name="T81">MDR</text:span><text:span text:style-name="T71"/>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42" loext:marker-style-name="T85"><text:span text:style-name="T86">管理方式</text:span><text:span text:style-name="T85"/></text:p>
          </table:table-cell>
          <table:table-cell table:style-name="表格134.A2" office:value-type="string">
            <text:p text:style-name="P42" loext:marker-style-name="T85"><text:span text:style-name="T86">自行管理</text:span><text:span text:style-name="T85"/></text:p>
          </table:table-cell>
          <table:table-cell table:style-name="表格134.A2" office:value-type="string">
            <text:p text:style-name="P42" loext:marker-style-name="T85"><text:span text:style-name="T86">委外管理</text:span><text:span text:style-name="T85"/></text:p>
          </table:table-cell>
        </table:table-row>
        <text:soft-page-break/>
        <table:table-row table:style-name="表格134.1">
          <table:table-cell table:style-name="表格134.A3" office:value-type="string">
            <text:p text:style-name="P42" loext:marker-style-name="T85"><text:span text:style-name="T86">監控時間</text:span><text:span text:style-name="T85"/></text:p>
          </table:table-cell>
          <table:table-cell table:style-name="表格134.A3" office:value-type="string">
            <text:p text:style-name="P42" loext:marker-style-name="T85"><text:span text:style-name="T86">視團隊而定</text:span><text:span text:style-name="T85"/></text:p>
          </table:table-cell>
          <table:table-cell table:style-name="表格134.A3" office:value-type="string">
            <text:p text:style-name="P42" loext:marker-style-name="T85"><text:span text:style-name="T161">24 / 7 </text:span><text:span text:style-name="T86">全天</text:span></text:p>
          </table:table-cell>
        </table:table-row>
        <table:table-row table:style-name="表格134.1">
          <table:table-cell table:style-name="表格134.A2" office:value-type="string">
            <text:p text:style-name="P42" loext:marker-style-name="T85"><text:span text:style-name="T86">所需能力</text:span><text:span text:style-name="T85"/></text:p>
          </table:table-cell>
          <table:table-cell table:style-name="表格134.A2" office:value-type="string">
            <text:p text:style-name="P42" loext:marker-style-name="T85"><text:span text:style-name="T86">需內部資安人員</text:span><text:span text:style-name="T85"/></text:p>
          </table:table-cell>
          <table:table-cell table:style-name="表格134.A2" office:value-type="string">
            <text:p text:style-name="P42" loext:marker-style-name="T85"><text:span text:style-name="T86">無須自建團隊</text:span><text:span text:style-name="T85"/></text:p>
          </table:table-cell>
        </table:table-row>
        <table:table-row table:style-name="表格134.1">
          <table:table-cell table:style-name="表格134.A3" office:value-type="string">
            <text:p text:style-name="P42" loext:marker-style-name="T85"><text:span text:style-name="T86">適合對象</text:span><text:span text:style-name="T85"/></text:p>
          </table:table-cell>
          <table:table-cell table:style-name="表格134.A3" office:value-type="string">
            <text:p text:style-name="P42" loext:marker-style-name="T85"><text:span text:style-name="T86">大型企業</text:span><text:span text:style-name="T85"/></text:p>
          </table:table-cell>
          <table:table-cell table:style-name="表格134.A3" office:value-type="string">
            <text:p text:style-name="P42" loext:marker-style-name="T85"><text:span text:style-name="T86">中小企業</text:span><text:span text:style-name="T85"/></text:p>
          </table:table-cell>
        </table:table-row>
        <table:table-row table:style-name="表格134.1">
          <table:table-cell table:style-name="表格134.A2" office:value-type="string">
            <text:p text:style-name="P42" loext:marker-style-name="T85"><text:span text:style-name="T86">成本模式</text:span><text:span text:style-name="T85"/></text:p>
          </table:table-cell>
          <table:table-cell table:style-name="表格134.A2" office:value-type="string">
            <text:p text:style-name="P42" loext:marker-style-name="T85"><text:span text:style-name="T86">工具費 </text:span><text:span text:style-name="T161">+ </text:span><text:span text:style-name="T86">人力</text:span></text:p>
          </table:table-cell>
          <table:table-cell table:style-name="表格134.A2" office:value-type="string">
            <text:p text:style-name="P42" loext:marker-style-name="T85"><text:span text:style-name="T86">月費 </text:span><text:span text:style-name="T161">/ </text:span><text:span text:style-name="T86">年費訂閱</text:span></text:p>
          </table:table-cell>
        </table:table-row>
      </table:table>
      <text:h text:style-name="P12" text:outline-level="3"><text:span text:style-name="T225">▍</text:span><text:span text:style-name="T226"> MITRE ATT&amp;CK — </text:span><text:span text:style-name="T227">駭客招式大全</text:span></text:h>
      <text:p text:style-name="P48" loext:marker-style-name="T112"><text:span text:style-name="T111">資安界發現駭客攻擊模式相當固定（寄釣魚信→偷帳號→開後門→橫向移動→竊取資料）。</text:span><text:span text:style-name="T177">MITRE </text:span><text:span text:style-name="T111">公司將所有已知駭客手法整理成全球通用的知識庫，稱為 </text:span><text:span text:style-name="T177">MITRE ATT&amp;CK</text:span><text:span text:style-name="T111">（</text:span><text:span text:style-name="T177">Adversarial Tactics, Techniques, and Common Knowledge</text:span><text:span text:style-name="T111">）。</text:span>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4" loext:marker-style-name="T77"><text:span text:style-name="T83">TTP</text:span><text:span text:style-name="T77"/></text:p>
            </table:table-cell>
            <table:table-cell table:style-name="表格135.A1" office:value-type="string">
              <text:p text:style-name="P4" loext:marker-style-name="T77"><text:span text:style-name="T78">意義</text:span><text:span text:style-name="T77"/></text:p>
            </table:table-cell>
            <table:table-cell table:style-name="表格135.A1" office:value-type="string">
              <text:p text:style-name="P4" loext:marker-style-name="T77"><text:span text:style-name="T83">ATT&amp;CK </text:span><text:span text:style-name="T78">三大用途</text:span>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42" loext:marker-style-name="T149"><text:span text:style-name="T212">T - Tactics</text:span><text:span text:style-name="T149"/></text:p>
          </table:table-cell>
          <table:table-cell table:style-name="表格135.A2" office:value-type="string">
            <text:p text:style-name="P42" loext:marker-style-name="T149"><text:span text:style-name="T150">戰術（攻擊目的）</text:span><text:span text:style-name="T149"/></text:p>
          </table:table-cell>
          <table:table-cell table:style-name="表格135.A2" office:value-type="string">
            <text:p text:style-name="P42" loext:marker-style-name="T149"><text:span text:style-name="T150">威脅分析：快速定性事件性質</text:span><text:span text:style-name="T149"/></text:p>
          </table:table-cell>
        </table:table-row>
        <table:table-row table:style-name="表格135.1">
          <table:table-cell table:style-name="表格135.A3" office:value-type="string">
            <text:p text:style-name="P42" loext:marker-style-name="T149"><text:span text:style-name="T212">T - Techniques</text:span><text:span text:style-name="T149"/></text:p>
          </table:table-cell>
          <table:table-cell table:style-name="表格135.A3" office:value-type="string">
            <text:p text:style-name="P42" loext:marker-style-name="T149"><text:span text:style-name="T150">技術（使用方法）</text:span><text:span text:style-name="T149"/></text:p>
          </table:table-cell>
          <table:table-cell table:style-name="表格135.A3" office:value-type="string">
            <text:p text:style-name="P42" loext:marker-style-name="T149"><text:span text:style-name="T150">防禦對應：針對常見手法加強監控</text:span><text:span text:style-name="T149"/></text:p>
          </table:table-cell>
        </table:table-row>
        <table:table-row table:style-name="表格135.1">
          <table:table-cell table:style-name="表格135.A2" office:value-type="string">
            <text:p text:style-name="P42" loext:marker-style-name="T149"><text:span text:style-name="T212">P - Procedures</text:span><text:span text:style-name="T149"/></text:p>
          </table:table-cell>
          <table:table-cell table:style-name="表格135.A2" office:value-type="string">
            <text:p text:style-name="P42" loext:marker-style-name="T149"><text:span text:style-name="T150">流程（實際操作步驟）</text:span><text:span text:style-name="T149"/></text:p>
          </table:table-cell>
          <table:table-cell table:style-name="表格135.A2" office:value-type="string">
            <text:p text:style-name="P42" loext:marker-style-name="T149"><text:span text:style-name="T150">主動防禦：預測下一步，提前部署</text:span><text:span text:style-name="T149"/>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6"><text:span text:style-name="T222">💡 <text:s/></text:span><text:span text:style-name="T227">核心觀念</text:span></text:p>
            <text:p text:style-name="P7" loext:marker-style-name="T112"><text:span text:style-name="T177">ATT&amp;CK </text:span><text:span text:style-name="T111">就像「警察研究犯罪手法的教材」——整理成冊，讓所有人都能對照使用。</text:span></text:p>
          </table:table-cell>
          <table:covered-table-cell/>
          <table:covered-table-cell/>
        </table:table-row>
      </table:table>
      <text:h text:style-name="P12" text:outline-level="3"><text:span text:style-name="T225">▍</text:span><text:span text:style-name="T226"> </text:span><text:span text:style-name="T227">數位韌性（</text:span><text:span text:style-name="T226">Digital Resilience</text:span><text:span text:style-name="T227">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39" loext:marker-style-name="T71"><text:span text:style-name="T81">❌ </text:span><text:span text:style-name="T72">以前的想法</text:span></text:p>
            </table:table-cell>
            <table:table-cell table:style-name="表格136.A1" office:value-type="string">
              <text:p text:style-name="P39" loext:marker-style-name="T71"><text:span text:style-name="T81">✅ </text:span><text:span text:style-name="T72">現在的思維</text:span>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42" loext:marker-style-name="T85"><text:span text:style-name="T86">「不能被攻擊」——重點：阻止所有入侵。</text:span><text:span text:style-name="T85"/></text:p>
          </table:table-cell>
          <table:table-cell table:style-name="表格136.A2" office:value-type="string">
            <text:p text:style-name="P42" loext:marker-style-name="T85"><text:span text:style-name="T86">「被打了還能撐住並快速恢復」——重點：強化復原能力。</text:span><text:span text:style-name="T85"/></text:p>
          </table:table-cell>
        </table:table-row>
      </table:table>
      <text:p text:style-name="P48" loext:marker-style-name="T10"><text:span text:style-name="T11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span><text:span text:style-name="T10"/>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6"><text:span text:style-name="T222">📝 <text:s/></text:span><text:span text:style-name="T281">一行記憶法</text:span></text:p>
            <text:p text:style-name="P7"><text:span text:style-name="T288">🛡 EDR → </text:span><text:span text:style-name="T111">自己買工具守　</text:span><text:span text:style-name="T282">👥 </text:span><text:span text:style-name="T288">MDR → </text:span><text:span text:style-name="T111">請公司幫你守</text:span></text:p>
            <text:p text:style-name="P8"><text:span text:style-name="T288">📖 ATT&amp;CK → </text:span><text:span text:style-name="T111">駭客招式教材　</text:span><text:span text:style-name="T282">💪 韌性 → </text:span><text:span text:style-name="T111">撐住、快速復原</text:span></text:p>
          </table:table-cell>
        </table:table-row>
      </table:table>
      <text:h text:style-name="P11" text:outline-level="2" loext:marker-style-name="T27"><text:span text:style-name="T28">陸、</text:span><text:span text:style-name="T27">Zero Trust </text:span><text:span text:style-name="T28">零信任安全</text:span>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6"><text:span text:style-name="T222">📋 <text:s/></text:span><text:span text:style-name="T247">內容審查說明</text:span></text:p>
            <text:p text:style-name="P7" loext:marker-style-name="T112"><text:span text:style-name="T111">文中「三要素（身份</text:span><text:span text:style-name="T177">/</text:span><text:span text:style-name="T111">設備</text:span><text:span text:style-name="T177">/</text:span><text:span text:style-name="T111">情境）」源自 </text:span><text:span text:style-name="T177">Microsoft </text:span><text:span text:style-name="T111">的 </text:span><text:span text:style-name="T177">Zero Trust </text:span><text:span text:style-name="T111">簡化說法；</text:span><text:span text:style-name="T177">NIST SP 800-207 </text:span><text:span text:style-name="T111">官方定義有五大支柱（身份、設備、網路、應用程式、資料），但業界與考試通常採用三要素的通俗版，應試完全沒問題。</text:span></text:p>
          </table:table-cell>
        </table:table-row>
      </table:table>
      <text:p text:style-name="P48" loext:marker-style-name="T112"><text:span text:style-name="T111">傳統企業網路以「邊界防護」為核心，邊界之內的人員與設備幾乎被預設為可信任（城堡思維）。</text:span><text:span text:style-name="T177">Zero Trust </text:span><text:span text:style-name="T111">則完全相反。</text:span>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4"/>
            </table:table-cell>
            <table:table-cell table:style-name="表格139.A1" office:value-type="string">
              <text:p text:style-name="P4" loext:marker-style-name="T71"><text:span text:style-name="T72">傳統（城堡思維）</text:span><text:span text:style-name="T71"/></text:p>
            </table:table-cell>
            <table:table-cell table:style-name="表格139.A1" office:value-type="string">
              <text:p text:style-name="P4" loext:marker-style-name="T71"><text:span text:style-name="T81">Zero Trust</text:span><text:span text:style-name="T71"/>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42" loext:marker-style-name="T85"><text:span text:style-name="T86">核心假設</text:span><text:span text:style-name="T85"/></text:p>
          </table:table-cell>
          <table:table-cell table:style-name="表格139.A2" office:value-type="string">
            <text:p text:style-name="P42" loext:marker-style-name="T85"><text:span text:style-name="T86">內網 </text:span><text:span text:style-name="T161">= </text:span><text:span text:style-name="T86">可信任</text:span></text:p>
          </table:table-cell>
          <table:table-cell table:style-name="表格139.A2" office:value-type="string">
            <text:p text:style-name="P42" loext:marker-style-name="T85"><text:span text:style-name="T86">任何人都需持續驗證</text:span><text:span text:style-name="T85"/></text:p>
          </table:table-cell>
        </table:table-row>
        <table:table-row table:style-name="表格139.1">
          <table:table-cell table:style-name="表格139.A3" office:value-type="string">
            <text:p text:style-name="P42" loext:marker-style-name="T85"><text:span text:style-name="T86">防護重點</text:span><text:span text:style-name="T85"/></text:p>
          </table:table-cell>
          <table:table-cell table:style-name="表格139.A3" office:value-type="string">
            <text:p text:style-name="P42" loext:marker-style-name="T85"><text:span text:style-name="T86">網路邊界 </text:span><text:span text:style-name="T161">/ </text:span><text:span text:style-name="T86">防火牆</text:span></text:p>
          </table:table-cell>
          <table:table-cell table:style-name="表格139.A3" office:value-type="string">
            <text:p text:style-name="P42" loext:marker-style-name="T85"><text:span text:style-name="T86">身份 </text:span><text:span text:style-name="T161">× </text:span><text:span text:style-name="T86">設備 </text:span><text:span text:style-name="T161">× </text:span><text:span text:style-name="T86">情境</text:span></text:p>
          </table:table-cell>
        </table:table-row>
        <table:table-row table:style-name="表格139.1">
          <table:table-cell table:style-name="表格139.A2" office:value-type="string">
            <text:p text:style-name="P42" loext:marker-style-name="T85"><text:span text:style-name="T86">登入之後</text:span><text:span text:style-name="T85"/></text:p>
          </table:table-cell>
          <table:table-cell table:style-name="表格139.A2" office:value-type="string">
            <text:p text:style-name="P42" loext:marker-style-name="T85"><text:span text:style-name="T86">幾乎不再驗證</text:span><text:span text:style-name="T85"/></text:p>
          </table:table-cell>
          <table:table-cell table:style-name="表格139.A2" office:value-type="string">
            <text:p text:style-name="P42" loext:marker-style-name="T85"><text:span text:style-name="T86">每個操作持續驗證</text:span><text:span text:style-name="T85"/></text:p>
          </table:table-cell>
        </table:table-row>
        <text:soft-page-break/>
        <table:table-row table:style-name="表格139.1">
          <table:table-cell table:style-name="表格139.A3" office:value-type="string">
            <text:p text:style-name="P42" loext:marker-style-name="T85"><text:span text:style-name="T86">駭客入侵後</text:span><text:span text:style-name="T85"/></text:p>
          </table:table-cell>
          <table:table-cell table:style-name="表格139.A3" office:value-type="string">
            <text:p text:style-name="P42" loext:marker-style-name="T85"><text:span text:style-name="T86">可橫向移動整個內網</text:span><text:span text:style-name="T85"/></text:p>
          </table:table-cell>
          <table:table-cell table:style-name="表格139.A3" office:value-type="string">
            <text:p text:style-name="P42" loext:marker-style-name="T85"><text:span text:style-name="T86">被微分段限制，難以擴散</text:span><text:span text:style-name="T85"/></text:p>
          </table:table-cell>
        </table:table-row>
        <table:table-row table:style-name="表格139.1">
          <table:table-cell table:style-name="表格139.A2" office:value-type="string">
            <text:p text:style-name="P42" loext:marker-style-name="T85"><text:span text:style-name="T86">適合時代</text:span><text:span text:style-name="T85"/></text:p>
          </table:table-cell>
          <table:table-cell table:style-name="表格139.A2" office:value-type="string">
            <text:p text:style-name="P42" loext:marker-style-name="T85"><text:span text:style-name="T86">固定辦公室 </text:span><text:span text:style-name="T161">/ </text:span><text:span text:style-name="T86">單一內網</text:span></text:p>
          </table:table-cell>
          <table:table-cell table:style-name="表格139.A2" office:value-type="string">
            <text:p text:style-name="P42" loext:marker-style-name="T85"><text:span text:style-name="T161">Cloud / </text:span><text:span text:style-name="T86">遠端 </text:span><text:span text:style-name="T161">/ </text:span><text:span text:style-name="T86">多設備</text:span>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6"><text:span text:style-name="T222">🔑 <text:s/></text:span><text:span text:style-name="T281">核心一句話</text:span></text:p>
            <text:p text:style-name="P7" loext:marker-style-name="T285"><text:span text:style-name="T288">❝ </text:span><text:span text:style-name="T282">永不信任，始終驗證 ❞（</text:span><text:span text:style-name="T288">Never Trust, Always Verify</text:span><text:span text:style-name="T282">）</text:span></text:p>
            <text:p text:style-name="P8" loext:marker-style-name="T112"><text:span text:style-name="T111">無論使用者身處公司內網或外部網路，無論設備是否為公司配發，系統都不會因為「位置」就直接信任，而是透過多重機制持續確認安全性。</text:span><text:span text:style-name="T112"/></text:p>
          </table:table-cell>
          <table:covered-table-cell/>
          <table:covered-table-cell/>
        </table:table-row>
      </table:table>
      <text:h text:style-name="P12" text:outline-level="3"><text:span text:style-name="T225">▍</text:span><text:span text:style-name="T226"> </text:span><text:span text:style-name="T227">三大核心支柱：人 </text:span><text:span text:style-name="T226">· </text:span><text:span text:style-name="T227">機 </text:span><text:span text:style-name="T226">· </text:span><text:span text:style-name="T227">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4" loext:marker-style-name="T77"><text:span text:style-name="T78">支柱</text:span><text:span text:style-name="T77"/></text:p>
            </table:table-cell>
            <table:table-cell table:style-name="表格140.A1" office:value-type="string">
              <text:p text:style-name="P4" loext:marker-style-name="T77"><text:span text:style-name="T78">口訣</text:span><text:span text:style-name="T77"/></text:p>
            </table:table-cell>
            <table:table-cell table:style-name="表格140.A1" office:value-type="string">
              <text:p text:style-name="P4" loext:marker-style-name="T77"><text:span text:style-name="T78">具體內容</text:span><text:span text:style-name="T77"/>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42" loext:marker-style-name="T149"><text:span text:style-name="T212">🔑 Identity</text:span><text:span text:style-name="T150">（身份驗證）</text:span></text:p>
          </table:table-cell>
          <table:table-cell table:style-name="表格140.A2" office:value-type="string">
            <text:p text:style-name="P42" loext:marker-style-name="T149"><text:span text:style-name="T150">人</text:span><text:span text:style-name="T149"/></text:p>
          </table:table-cell>
          <table:table-cell table:style-name="表格140.A2" office:value-type="string">
            <text:p text:style-name="P42" loext:marker-style-name="T149"><text:span text:style-name="T150">確認使用者是本人：帳密、</text:span><text:span text:style-name="T212">MFA</text:span><text:span text:style-name="T150">（手機 </text:span><text:span text:style-name="T212">OTP</text:span><text:span text:style-name="T150">、指紋）、</text:span><text:span text:style-name="T212">IAM </text:span><text:span text:style-name="T150">身份與存取管理</text:span></text:p>
          </table:table-cell>
        </table:table-row>
        <table:table-row table:style-name="表格140.1">
          <table:table-cell table:style-name="表格140.A3" office:value-type="string">
            <text:p text:style-name="P42" loext:marker-style-name="T149"><text:span text:style-name="T212">💻 Device</text:span><text:span text:style-name="T150">（設備健康）</text:span></text:p>
          </table:table-cell>
          <table:table-cell table:style-name="表格140.A3" office:value-type="string">
            <text:p text:style-name="P42" loext:marker-style-name="T149"><text:span text:style-name="T150">機</text:span><text:span text:style-name="T149"/></text:p>
          </table:table-cell>
          <table:table-cell table:style-name="表格140.A3" office:value-type="string">
            <text:p text:style-name="P42" loext:marker-style-name="T149"><text:span text:style-name="T150">確認設備是否安全：防毒更新、系統版本、是否為授權設備（</text:span><text:span text:style-name="T212">Device Posture</text:span><text:span text:style-name="T150">）</text:span></text:p>
          </table:table-cell>
        </table:table-row>
        <table:table-row table:style-name="表格140.1">
          <table:table-cell table:style-name="表格140.A2" office:value-type="string">
            <text:p text:style-name="P42" loext:marker-style-name="T149"><text:span text:style-name="T212">🌐 Context</text:span><text:span text:style-name="T150">（存取情境）</text:span></text:p>
          </table:table-cell>
          <table:table-cell table:style-name="表格140.A2" office:value-type="string">
            <text:p text:style-name="P42" loext:marker-style-name="T149"><text:span text:style-name="T150">境</text:span><text:span text:style-name="T149"/></text:p>
          </table:table-cell>
          <table:table-cell table:style-name="表格140.A2" office:value-type="string">
            <text:p text:style-name="P42" loext:marker-style-name="T149"><text:span text:style-name="T150">評估環境是否異常：登入時間、地點、行為模式；凌晨從境外登入會觸發額外驗證</text:span><text:span text:style-name="T149"/></text:p>
          </table:table-cell>
        </table:table-row>
      </table:table>
      <text:h text:style-name="P12" text:outline-level="3"><text:span text:style-name="T225">▍</text:span><text:span text:style-name="T226"> </text:span><text:span text:style-name="T227">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4" loext:marker-style-name="T77"><text:span text:style-name="T78">機制</text:span><text:span text:style-name="T77"/></text:p>
            </table:table-cell>
            <table:table-cell table:style-name="表格141.A1" office:value-type="string">
              <text:p text:style-name="P4" loext:marker-style-name="T77"><text:span text:style-name="T78">說明</text:span><text:span text:style-name="T77"/>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42" loext:marker-style-name="T149"><text:span text:style-name="T212">① MFA </text:span><text:span text:style-name="T150">多因素驗證</text:span></text:p>
          </table:table-cell>
          <table:table-cell table:style-name="表格141.A2" office:value-type="string">
            <text:p text:style-name="P42" loext:marker-style-name="T149"><text:span text:style-name="T150">登入不只密碼，還需第二層驗證（手機驗證碼、指紋、硬體金鑰），密碼外洩也難入侵</text:span><text:span text:style-name="T149"/></text:p>
          </table:table-cell>
        </table:table-row>
        <table:table-row table:style-name="表格141.1">
          <table:table-cell table:style-name="表格141.A3" office:value-type="string">
            <text:p text:style-name="P42" loext:marker-style-name="T149"><text:span text:style-name="T212">② Least Privilege </text:span><text:span text:style-name="T150">最小權限</text:span></text:p>
          </table:table-cell>
          <table:table-cell table:style-name="表格141.A3" office:value-type="string">
            <text:p text:style-name="P42" loext:marker-style-name="T149"><text:span text:style-name="T150">每位使用者只獲得完成工作所需的最低權限。權限愈小，風險愈低</text:span><text:span text:style-name="T149"/></text:p>
          </table:table-cell>
        </table:table-row>
        <table:table-row table:style-name="表格141.1">
          <table:table-cell table:style-name="表格141.A2" office:value-type="string">
            <text:p text:style-name="P42" loext:marker-style-name="T149"><text:span text:style-name="T212">③ Micro-Segmentation </text:span><text:span text:style-name="T150">微分段</text:span></text:p>
          </table:table-cell>
          <table:table-cell table:style-name="表格141.A2" office:value-type="string">
            <text:p text:style-name="P42" loext:marker-style-name="T149"><text:span text:style-name="T150">將內網切成多個獨立小區段，各區設存取控制；攻破一段也無法橫向擴散</text:span><text:span text:style-name="T149"/></text:p>
          </table:table-cell>
        </table:table-row>
        <table:table-row table:style-name="表格141.1">
          <table:table-cell table:style-name="表格141.A3" office:value-type="string">
            <text:p text:style-name="P42" loext:marker-style-name="T149"><text:span text:style-name="T212">④ Continuous Monitoring </text:span><text:span text:style-name="T150">持續監控</text:span></text:p>
          </table:table-cell>
          <table:table-cell table:style-name="表格141.A3" office:value-type="string">
            <text:p text:style-name="P42" loext:marker-style-name="T149"><text:span text:style-name="T150">全天候分析行為，異常立即警示（如半夜大量下載、短時間多國登入、刪大量日誌）</text:span><text:span text:style-name="T149"/>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6"><text:span text:style-name="T222">🔥 <text:s/></text:span><text:span text:style-name="T227">考前 </text:span><text:span text:style-name="T239">10 </text:span><text:span text:style-name="T227">秒超濃縮</text:span></text:p>
            <text:p text:style-name="P7" loext:marker-style-name="T112"><text:span text:style-name="T177">ZT </text:span><text:span text:style-name="T111">核心：不信任任何人（含內網）；檢查三件事——人（</text:span><text:span text:style-name="T177">Identity</text:span><text:span text:style-name="T111">）、機（</text:span><text:span text:style-name="T177">Device</text:span><text:span text:style-name="T111">）、境（</text:span><text:span text:style-name="T177">Context</text:span><text:span text:style-name="T111">）；搭配四招——</text:span><text:span text:style-name="T177">MFA </text:span><text:span text:style-name="T111">＋ 最小權限 ＋ 微分段 ＋ 持續監控。</text:span></text:p>
            <text:p text:style-name="P8" loext:marker-style-name="T112"><text:span text:style-name="T111">口訣：人機境，多驗、少給、切塊、一直看。</text:span><text:span text:style-name="T112"/></text:p>
          </table:table-cell>
          <table:covered-table-cell/>
        </table:table-row>
      </table:table>
      <text:h text:style-name="P12" text:outline-level="3"><text:span text:style-name="T225">▍</text:span><text:span text:style-name="T226"> Zero Trust </text:span><text:span text:style-name="T227">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4" loext:marker-style-name="T77"><text:span text:style-name="T83">Step</text:span><text:span text:style-name="T77"/></text:p>
            </table:table-cell>
            <table:table-cell table:style-name="表格142.A1" office:value-type="string">
              <text:p text:style-name="P4" loext:marker-style-name="T77"><text:span text:style-name="T78">動作</text:span><text:span text:style-name="T77"/>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42" loext:marker-style-name="T149"><text:span text:style-name="T212">1 </text:span><text:span text:style-name="T150">發出存取請求</text:span></text:p>
          </table:table-cell>
          <table:table-cell table:style-name="表格142.A2" office:value-type="string">
            <text:p text:style-name="P42" loext:marker-style-name="T149"><text:span text:style-name="T150">使用者或設備嘗試存取某資源（系統 </text:span><text:span text:style-name="T212">/ </text:span><text:span text:style-name="T150">檔案 </text:span><text:span text:style-name="T212">/ </text:span><text:span text:style-name="T150">資料庫）</text:span></text:p>
          </table:table-cell>
        </table:table-row>
        <table:table-row table:style-name="表格142.1">
          <table:table-cell table:style-name="表格142.A3" office:value-type="string">
            <text:p text:style-name="P42" loext:marker-style-name="T149"><text:span text:style-name="T212">2 </text:span><text:span text:style-name="T150">身份驗證 </text:span><text:span text:style-name="T212">Identity</text:span></text:p>
          </table:table-cell>
          <table:table-cell table:style-name="表格142.A3" office:value-type="string">
            <text:p text:style-name="P42" loext:marker-style-name="T149"><text:span text:style-name="T150">確認身份：帳密 </text:span><text:span text:style-name="T212">+ MFA </text:span><text:span text:style-name="T150">驗證通過</text:span></text:p>
          </table:table-cell>
        </table:table-row>
        <table:table-row table:style-name="表格142.1">
          <table:table-cell table:style-name="表格142.A2" office:value-type="string">
            <text:p text:style-name="P42" loext:marker-style-name="T149"><text:span text:style-name="T212">3 </text:span><text:span text:style-name="T150">設備驗證 </text:span><text:span text:style-name="T212">Device</text:span></text:p>
          </table:table-cell>
          <table:table-cell table:style-name="表格142.A2" office:value-type="string">
            <text:p text:style-name="P42" loext:marker-style-name="T149"><text:span text:style-name="T150">檢查設備健康：防毒、更新、合規性符合要求</text:span><text:span text:style-name="T149"/></text:p>
          </table:table-cell>
        </table:table-row>
        <table:table-row table:style-name="表格142.1">
          <table:table-cell table:style-name="表格142.A3" office:value-type="string">
            <text:p text:style-name="P42" loext:marker-style-name="T149"><text:span text:style-name="T212">4 </text:span><text:span text:style-name="T150">情境評估 </text:span><text:span text:style-name="T212">Context</text:span></text:p>
          </table:table-cell>
          <table:table-cell table:style-name="表格142.A3" office:value-type="string">
            <text:p text:style-name="P42" loext:marker-style-name="T149"><text:span text:style-name="T150">分析存取時間、地點、行為模式，計算風險分數</text:span><text:span text:style-name="T149"/></text:p>
          </table:table-cell>
        </table:table-row>
        <table:table-row table:style-name="表格142.1">
          <table:table-cell table:style-name="表格142.A2" office:value-type="string">
            <text:p text:style-name="P42" loext:marker-style-name="T149"><text:span text:style-name="T212">5 </text:span><text:span text:style-name="T150">權限比對</text:span></text:p>
          </table:table-cell>
          <table:table-cell table:style-name="表格142.A2" office:value-type="string">
            <text:p text:style-name="P42" loext:marker-style-name="T149"><text:span text:style-name="T150">依最小權限原則，確認是否有權存取該資源</text:span><text:span text:style-name="T149"/></text:p>
          </table:table-cell>
        </table:table-row>
        <table:table-row table:style-name="表格142.1">
          <table:table-cell table:style-name="表格142.A3" office:value-type="string">
            <text:p text:style-name="P42" loext:marker-style-name="T149"><text:span text:style-name="T212">6 </text:span><text:span text:style-name="T150">授權或拒絕</text:span></text:p>
          </table:table-cell>
          <table:table-cell table:style-name="表格142.A3" office:value-type="string">
            <text:p text:style-name="P42" loext:marker-style-name="T149"><text:span text:style-name="T150">風險低且權限符合 → 授權；否則 → 要求補充驗證或拒絕</text:span><text:span text:style-name="T149"/></text:p>
          </table:table-cell>
        </table:table-row>
        <table:table-row table:style-name="表格142.1">
          <table:table-cell table:style-name="表格142.A2" office:value-type="string">
            <text:p text:style-name="P42" loext:marker-style-name="T149"><text:span text:style-name="T212">7 </text:span><text:span text:style-name="T150">持續監控</text:span><text:soft-page-break/></text:p>
          </table:table-cell>
          <table:table-cell table:style-name="表格142.A2" office:value-type="string">
            <text:p text:style-name="P42" loext:marker-style-name="T149"><text:span text:style-name="T150">授權後全程監控行為，發現異常立即告警或中斷連線</text:span><text:span text:style-name="T149"/></text:p>
          </table:table-cell>
        </table:table-row>
        <table:table-row table:style-name="表格142.1">
          <table:table-cell table:style-name="表格142.A9" table:number-columns-spanned="2" office:value-type="string">
            <text:p text:style-name="P6"><text:span text:style-name="T222">⚠️ <text:s/></text:span><text:span text:style-name="T247">公職考試陷阱整理</text:span></text:p>
            <text:p text:style-name="P7"><text:span text:style-name="T197">ZT = </text:span><text:span text:style-name="T132">完全不相信員工？　</text:span><text:span text:style-name="T111">✗ 重點是「每次都驗證」，驗證通過員工仍可正常使用，只是不再預設信任。</text:span></text:p>
            <text:p text:style-name="P8"><text:span text:style-name="T132">只有外網才危險？　</text:span><text:span text:style-name="T111">✗ 內網也可能：帳號被盜、設備中毒、內部人員惡意操作，故內網也須驗證。</text:span></text:p>
            <text:p text:style-name="P8"><text:span text:style-name="T132">登入一次後就永久可信？　</text:span><text:span text:style-name="T111">✗ 持續驗證，單次登入不代表長期信任，高風險行為會觸發重新驗證。</text:span></text:p>
            <text:p text:style-name="P8"><text:span text:style-name="T197">Zero Trust </text:span><text:span text:style-name="T132">重視網路位置？（超常考）　</text:span><text:span text:style-name="T111">✗ 完全相反！重點從「位置」轉移到「身份 </text:span><text:span text:style-name="T177">/ </text:span><text:span text:style-name="T111">設備 </text:span><text:span text:style-name="T177">/ </text:span><text:span text:style-name="T111">情境」。</text:span></text:p>
          </table:table-cell>
          <table:covered-table-cell/>
        </table:table-row>
      </table:table>
      <text:h text:style-name="P32" text:outline-level="1" loext:marker-style-name="T73"><text:span text:style-name="T74">結語　</text:span><text:span text:style-name="T73">·</text:span><text:span text:style-name="T74">　考前最後叮嚀</text:span>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6"><text:span text:style-name="T222">✅ <text:s/></text:span><text:span text:style-name="T227">你已經完成一輪</text:span></text:p>
            <text:p text:style-name="P7" loext:marker-style-name="T112"><text:span text:style-name="T111">讀到這裡，你已經把網路概論與資訊安全的核心觀念走過一遍。考前衝刺請回到「第〇篇 考前速記總表」，把口訣與必背表格反覆掃描，建立「看到關鍵字就能反射答案」的直覺。</text:span><text:span text:style-name="T112"/></text:p>
          </table:table-cell>
        </table:table-row>
        <table:table-row table:style-name="表格143.1">
          <table:table-cell table:style-name="表格143.A2" office:value-type="string">
            <text:p text:style-name="P6"><text:span text:style-name="T222">🎯 <text:s/></text:span><text:span text:style-name="T281">五個高頻拿分重點</text:span></text:p>
            <text:p text:style-name="P7" loext:marker-style-name="T112"><text:span text:style-name="T177">① </text:span><text:span text:style-name="T111">分層先記責任：應用給人用、傳輸怎麼送、網路走哪條、連結同區網。</text:span></text:p>
            <text:p text:style-name="P8" loext:marker-style-name="T112"><text:span text:style-name="T177">② </text:span><text:span text:style-name="T111">計算題動手練：</text:span><text:span text:style-name="T177">VLSM</text:span><text:span text:style-name="T111">「需求</text:span><text:span text:style-name="T177">+2→</text:span><text:span text:style-name="T111">最小 </text:span><text:span text:style-name="T177">2ⁿ→/(32−n)</text:span><text:span text:style-name="T111">」、可用主機「</text:span><text:span text:style-name="T177">2^</text:span><text:span text:style-name="T111">主機</text:span><text:span text:style-name="T177">bit −2</text:span><text:span text:style-name="T111">」。</text:span></text:p>
            <text:p text:style-name="P8" loext:marker-style-name="T112"><text:span text:style-name="T177">③ </text:span><text:span text:style-name="T111">流程要會串：上網＝</text:span><text:span text:style-name="T177">DNS→ARP→NAT</text:span><text:span text:style-name="T111">；</text:span><text:span text:style-name="T177">TCP</text:span><text:span text:style-name="T111">＝握手→</text:span><text:span text:style-name="T177">Slow Start→CA→</text:span><text:span text:style-name="T111">丟包降速。</text:span></text:p>
            <text:p text:style-name="P8" loext:marker-style-name="T112"><text:span text:style-name="T177">④ </text:span><text:span text:style-name="T111">易混成對背：</text:span><text:span text:style-name="T177">FW/WAF/NGFW</text:span><text:span text:style-name="T111">、</text:span><text:span text:style-name="T177">IDS/IPS</text:span><text:span text:style-name="T111">、</text:span><text:span text:style-name="T177">HIDS/NIDS</text:span><text:span text:style-name="T111">、</text:span><text:span text:style-name="T177">SNMP/ICMP</text:span><text:span text:style-name="T111">、</text:span><text:span text:style-name="T177">EDR/MDR</text:span><text:span text:style-name="T111">、</text:span><text:span text:style-name="T177">RTO/RPO</text:span><text:span text:style-name="T111">、</text:span><text:span text:style-name="T177">Recursive/Iterative</text:span><text:span text:style-name="T111">。</text:span></text:p>
            <text:p text:style-name="P8" loext:marker-style-name="T112"><text:span text:style-name="T177">⑤ </text:span><text:span text:style-name="T111">陷阱反著記：</text:span><text:span text:style-name="T177">ARP </text:span><text:span text:style-name="T111">找路由器不是 </text:span><text:span text:style-name="T177">Google</text:span><text:span text:style-name="T111">、</text:span><text:span text:style-name="T177">BGP </text:span><text:span text:style-name="T111">政策不是距離、</text:span><text:span text:style-name="T177">WiFi </text:span><text:span text:style-name="T111">是 </text:span><text:span text:style-name="T177">CA </text:span><text:span text:style-name="T111">不是 </text:span><text:span text:style-name="T177">CD</text:span><text:span text:style-name="T111">、</text:span><text:span text:style-name="T177">IOC </text:span><text:span text:style-name="T111">是事後不是預測、</text:span><text:span text:style-name="T177">Zero Trust </text:span><text:span text:style-name="T111">看身份不看位置。</text:span></text:p>
          </table:table-cell>
        </table:table-row>
      </table:table>
      <text:p text:style-name="P38" loext:marker-style-name="T62"><text:span text:style-name="T63">祝　金榜題名　</text:span><text:span text:style-name="T70">·</text:span><text:span text:style-name="T63">　一次上岸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fo:font-weight="bold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weight-asian="bold" style:font-name-complex="Microsoft JhengHei2" style:font-family-complex="'Microsoft JhengHei'" style:font-family-generic-complex="system" style:font-pitch-complex="variable" style:font-size-complex="10.5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T2" style:family="text">
      <style:text-properties fo:color="#555555" loext:opacity="100%" style:font-name="Microsoft JhengHei" fo:font-size="8pt" style:font-size-asian="8pt" style:font-name-complex="Microsoft JhengHei2" style:font-size-complex="8pt"/>
    </style:style>
    <style:style style:name="MT3" style:family="text">
      <style:text-properties fo:color="#555555" loext:opacity="100%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網路概論與資訊安全 </text:span><text:span text:style-name="MT3">· </text:span><text:span text:style-name="MT2">完整整合筆記</text:span></text:p>
      </style:header>
      <style:footer>
        <text:p text:style-name="MP2"><text:span text:style-name="MT2">公職考試衝刺　</text:span><text:span text:style-name="MT3">·</text:span><text:span text:style-name="MT2">　第 </text:span><text:page-number text:select-page="current">1</text:page-number><text:span text:style-name="MT2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12T00:41:46</meta:creation-date>
    <meta:initial-creator>Claude</meta:initial-creator>
    <dc:language>en-US</dc:language>
    <dc:date>2026-06-18T16:23:44.327000000</dc:date>
    <meta:editing-cycles>473</meta:editing-cycles>
    <dc:title>網路概論與資訊安全 完整整合筆記</dc:title>
    <meta:editing-duration>P3DT5H8M54S</meta:editing-duration>
    <meta:generator>MODA_ODF_Application_Tools/3.8.4.2$Windows_X86_64 LibreOffice_project/4fb77107d5af14329e08085efe4fa19b5633383a</meta:generator>
    <meta:document-statistic meta:table-count="143" meta:image-count="1" meta:object-count="0" meta:page-count="52" meta:paragraph-count="2304" meta:word-count="30731" meta:character-count="48638" meta:non-whitespace-character-count="43856"/>
    <meta:user-defined meta:name="AppVersion">15.0000</meta:user-defined>
  </office:meta>
</office:document-meta>
</file>