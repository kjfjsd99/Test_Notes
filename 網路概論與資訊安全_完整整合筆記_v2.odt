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60000014BA9746C1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88cm"/>
    </style:style>
    <style:style style:name="表格14.D" style:family="table-column">
      <style:table-column-properties style:column-width="2.651cm"/>
    </style:style>
    <style:style style:name="表格14.E" style:family="table-column">
      <style:table-column-properties style:column-width="2.641cm"/>
    </style:style>
    <style:style style:name="表格14.F" style:family="table-column">
      <style:table-column-properties style:column-width="5.12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2cm"/>
    </style:style>
    <style:style style:name="表格16.C" style:family="table-column">
      <style:table-column-properties style:column-width="6.97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1cm"/>
    </style:style>
    <style:style style:name="表格17.B" style:family="table-column">
      <style:table-column-properties style:column-width="3.268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4cm"/>
    </style:style>
    <style:style style:name="表格19.B" style:family="table-column">
      <style:table-column-properties style:column-width="3.53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5cm"/>
    </style:style>
    <style:style style:name="表格20.D" style:family="table-column">
      <style:table-column-properties style:column-width="3.88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2cm"/>
    </style:style>
    <style:style style:name="表格21.C" style:family="table-column">
      <style:table-column-properties style:column-width="10.23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699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cm"/>
    </style:style>
    <style:style style:name="表格23.C" style:family="table-column">
      <style:table-column-properties style:column-width="7.06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6cm"/>
    </style:style>
    <style:style style:name="表格24.B" style:family="table-column">
      <style:table-column-properties style:column-width="7.237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6cm"/>
    </style:style>
    <style:style style:name="表格27.C" style:family="table-column">
      <style:table-column-properties style:column-width="7.06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6cm"/>
    </style:style>
    <style:style style:name="表格28.B" style:family="table-column">
      <style:table-column-properties style:column-width="4.415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5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2cm"/>
    </style:style>
    <style:style style:name="表格32.B" style:family="table-column">
      <style:table-column-properties style:column-width="6.708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4cm"/>
    </style:style>
    <style:style style:name="表格34.B" style:family="table-column">
      <style:table-column-properties style:column-width="2.298cm"/>
    </style:style>
    <style:style style:name="表格34.C" style:family="table-column">
      <style:table-column-properties style:column-width="8.285cm"/>
    </style:style>
    <style:style style:name="表格34.D" style:family="table-column">
      <style:table-column-properties style:column-width="3.886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88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51cm"/>
    </style:style>
    <style:style style:name="表格39.D" style:family="table-column">
      <style:table-column-properties style:column-width="3.875cm"/>
    </style:style>
    <style:style style:name="表格39.E" style:family="table-column">
      <style:table-column-properties style:column-width="3.886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88cm"/>
    </style:style>
    <style:style style:name="表格40.B" style:family="table-column">
      <style:table-column-properties style:column-width="2.651cm"/>
    </style:style>
    <style:style style:name="表格40.C" style:family="table-column">
      <style:table-column-properties style:column-width="2.641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6cm"/>
    </style:style>
    <style:style style:name="表格44.B" style:family="table-column">
      <style:table-column-properties style:column-width="1.593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88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7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6cm"/>
    </style:style>
    <style:style style:name="表格49.D" style:family="table-column">
      <style:table-column-properties style:column-width="7.237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2cm"/>
    </style:style>
    <style:style style:name="表格50.C" style:family="table-column">
      <style:table-column-properties style:column-width="3.886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6cm"/>
    </style:style>
    <style:style style:name="表格51.D" style:family="table-column">
      <style:table-column-properties style:column-width="5.121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1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3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2cm"/>
    </style:style>
    <style:style style:name="表格54.C" style:family="table-column">
      <style:table-column-properties style:column-width="7.06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1cm"/>
    </style:style>
    <style:style style:name="表格55.B" style:family="table-column">
      <style:table-column-properties style:column-width="12.35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2cm"/>
    </style:style>
    <style:style style:name="表格57.C" style:family="table-column">
      <style:table-column-properties style:column-width="6.973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1cm"/>
    </style:style>
    <style:style style:name="表格62.B" style:family="table-column">
      <style:table-column-properties style:column-width="12.353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6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9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1cm"/>
    </style:style>
    <style:style style:name="表格64.D" style:family="table-column">
      <style:table-column-properties style:column-width="3.886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1cm"/>
    </style:style>
    <style:style style:name="表格66.B" style:family="table-column">
      <style:table-column-properties style:column-width="5.136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7cm"/>
    </style:style>
    <style:style style:name="表格67.C" style:family="table-column">
      <style:table-column-properties style:column-width="7.061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68cm"/>
    </style:style>
    <style:style style:name="表格69.C" style:family="table-column">
      <style:table-column-properties style:column-width="7.061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cm"/>
    </style:style>
    <style:style style:name="表格70.C" style:family="table-column">
      <style:table-column-properties style:column-width="7.06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6cm"/>
    </style:style>
    <style:style style:name="表格73.F" style:family="table-column">
      <style:table-column-properties style:column-width="4.062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2cm"/>
    </style:style>
    <style:style style:name="表格74.C" style:family="table-column">
      <style:table-column-properties style:column-width="4.768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7cm"/>
    </style:style>
    <style:style style:name="表格75.C" style:family="table-column">
      <style:table-column-properties style:column-width="3.53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7cm"/>
    </style:style>
    <style:style style:name="表格76.C" style:family="table-column">
      <style:table-column-properties style:column-width="7.061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89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41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4cm"/>
    </style:style>
    <style:style style:name="表格80.C" style:family="table-column">
      <style:table-column-properties style:column-width="4.944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88cm"/>
    </style:style>
    <style:style style:name="表格83.B" style:family="table-column">
      <style:table-column-properties style:column-width="3.709cm"/>
    </style:style>
    <style:style style:name="表格83.C" style:family="table-column">
      <style:table-column-properties style:column-width="5.816cm"/>
    </style:style>
    <style:style style:name="表格83.D" style:family="table-column">
      <style:table-column-properties style:column-width="5.121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6cm"/>
    </style:style>
    <style:style style:name="表格84.B" style:family="table-column">
      <style:table-column-properties style:column-width="4.768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3cm"/>
    </style:style>
    <style:style style:name="表格92.C" style:family="table-column">
      <style:table-column-properties style:column-width="6.884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8cm"/>
    </style:style>
    <style:style style:name="表格94.B" style:family="table-column">
      <style:table-column-properties style:column-width="3.709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6cm"/>
    </style:style>
    <style:style style:name="表格96.B" style:family="table-column">
      <style:table-column-properties style:column-width="9.001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7cm"/>
    </style:style>
    <style:style style:name="表格98.C" style:family="table-column">
      <style:table-column-properties style:column-width="4.06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3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4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88cm"/>
    </style:style>
    <style:style style:name="表格105.B" style:family="table-column">
      <style:table-column-properties style:column-width="5.826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6cm"/>
    </style:style>
    <style:style style:name="表格107.B" style:family="table-column">
      <style:table-column-properties style:column-width="6.796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3cm"/>
    </style:style>
    <style:style style:name="表格108.B" style:family="table-column">
      <style:table-column-properties style:column-width="0.182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6cm"/>
    </style:style>
    <style:style style:name="表格111.B" style:family="table-column">
      <style:table-column-properties style:column-width="13.587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1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9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5cm"/>
    </style:style>
    <style:style style:name="表格114.D" style:family="table-column">
      <style:table-column-properties style:column-width="3.886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6cm"/>
    </style:style>
    <style:style style:name="表格116.B" style:family="table-column">
      <style:table-column-properties style:column-width="4.415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7" style:family="table-row">
      <style:table-row-properties style:min-row-height="2.958cm" fo:keep-together="auto"/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4cm"/>
    </style:style>
    <style:style style:name="表格120.B" style:family="table-column">
      <style:table-column-properties style:column-width="4.768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88cm"/>
    </style:style>
    <style:style style:name="表格121.B" style:family="table-column">
      <style:table-column-properties style:column-width="3.886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6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2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6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8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2" style:family="table-row">
      <style:table-row-properties style:min-row-height="0.801cm" fo:keep-together="auto"/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7cm"/>
    </style:style>
    <style:style style:name="表格125.C" style:family="table-column">
      <style:table-column-properties style:column-width="7.061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699cm"/>
    </style:style>
    <style:style style:name="表格127.C" style:family="table-column">
      <style:table-column-properties style:column-width="7.237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6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2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6cm"/>
    </style:style>
    <style:style style:name="表格134.B" style:family="table-column">
      <style:table-column-properties style:column-width="6.796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2cm"/>
    </style:style>
    <style:style style:name="表格139.C" style:family="table-column">
      <style:table-column-properties style:column-width="6.973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1cm"/>
    </style:style>
    <style:style style:name="表格140.B" style:family="table-column">
      <style:table-column-properties style:column-width="1.593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</style:style>
    <style:style style:name="P13" style:family="paragraph" style:parent-style-name="Standard">
      <style:paragraph-properties fo:margin-top="0cm" fo:margin-bottom="0.212cm" style:contextual-spacing="false" fo:break-before="page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18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9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20" style:family="paragraph" style:parent-style-name="Standard">
      <style:paragraph-properties fo:margin-top="0.046cm" fo:margin-bottom="0.046cm" style:contextual-spacing="false" fo:line-height="0.441cm" fo:text-align="left" style:justify-single-word="false"/>
    </style:style>
    <style:style style:name="P21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22" style:family="paragraph" style:parent-style-name="Standard">
      <style:paragraph-properties fo:margin-top="0.071cm" fo:margin-bottom="0.106cm" style:contextual-spacing="false" fo:line-height="0.466cm" fo:text-align="left" style:justify-single-word="false"/>
    </style:style>
    <style:style style:name="P23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17bb8d"/>
    </style:style>
    <style:style style:name="P2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d740" style:font-weight-asian="bold" style:font-weight-complex="bold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8bbd0" loext:opacity="100%" fo:font-weight="bold" fo:background-color="#880e4f" style:font-weight-asian="bold" style:font-weight-complex="bold"/>
    </style:style>
    <style:style style:name="P2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pt" fo:font-style="normal" fo:font-weight="bold" fo:background-color="#ffff0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3d5afe" style:font-weight-asian="bold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5d4037" style:font-weight-asian="bold" style:font-weight-complex="bold"/>
    </style:style>
    <style:style style:name="P32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4942c0"/>
    </style:style>
    <style:style style:name="P3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cdd2" loext:opacity="100%" fo:font-weight="bold" fo:background-color="#b71c1c" style:font-weight-asian="bold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1a237e" style:font-weight-asian="bold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1b5e20" style:font-weight-asian="bold" style:font-weight-complex="bold"/>
    </style:style>
    <style:style style:name="P3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76ff03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fo:font-weight="bold" fo:background-color="#1b5e20" style:font-weight-asian="bold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18ff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fo:font-weight="bold" fo:background-color="#1b5e20" style:font-weight-asian="bold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fo:background-color="#ffd74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33691e" style:font-weight-asian="bold" style:font-weight-complex="bold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0d47a1" style:font-weight-asian="bold" style:font-weight-complex="bold"/>
    </style:style>
    <style:style style:name="P4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background-color="#ffd740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b71c1c" style:font-weight-asian="bold" style:font-weight-complex="bold"/>
    </style:style>
    <style:style style:name="P4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880e4f" style:font-weight-asian="bold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style:font-name="Microsoft JhengHei" fo:font-size="9.5pt" fo:font-style="normal" fo:font-weight="bold" fo:background-color="#7c4d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pt" fo:font-style="normal" fo:font-weight="bold" fo:background-color="#d500f9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0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5252" loext:opacity="100%" fo:font-size="9.5pt" fo:font-style="normal" fo:font-weight="bold" fo:background-color="#311b92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1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5252" loext:opacity="100%" fo:font-size="9.5pt" fo:font-style="normal" fo:font-weight="bold" fo:background-color="#1a237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5252" loext:opacity="100%" fo:font-weight="bold" fo:background-color="#311b92" style:font-weight-asian="bold" style:font-weight-complex="bold"/>
    </style:style>
    <style:style style:name="P5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5252" loext:opacity="100%" fo:font-weight="bold" fo:background-color="#1a237e" style:font-weight-asian="bold" style:font-weight-complex="bold"/>
    </style:style>
    <style:style style:name="P5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5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fo:background-color="#ffea0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d740" loext:opacity="100%" fo:font-weight="bold" fo:background-color="#e65100" style:font-weight-asian="bold" style:font-weight-complex="bold"/>
    </style:style>
    <style:style style:name="P5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style:font-name="Microsoft JhengHei" fo:font-size="9pt" fo:font-style="normal" fo:font-weight="bold" fo:background-color="#3d5afe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18ffff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eeee" loext:opacity="100%" fo:font-weight="bold" fo:background-color="#ff4081" style:font-weight-asian="bold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0000" loext:opacity="100%" style:font-name="Microsoft JhengHei" fo:font-size="9pt" fo:font-style="normal" fo:font-weight="bold" fo:background-color="#00e676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pt" fo:font-style="normal" fo:font-weight="bold" fo:background-color="#1b5e2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4a148c" style:font-weight-asian="bold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officeooo:paragraph-rsid="011534ca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e65100" style:font-weight-asian="bold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officeooo:paragraph-rsid="0114c74f"/>
    </style:style>
    <style:style style:name="P6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fo:font-weight="bold" fo:background-color="#b71c1c" style:font-weight-asian="bold" style:font-weight-complex="bold"/>
    </style:style>
    <style:style style:name="P68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  <style:text-properties officeooo:paragraph-rsid="01161c94"/>
    </style:style>
    <style:style style:name="P6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1b5e20" style:font-weight-asian="bold" style:font-weight-complex="bold"/>
    </style:style>
    <style:style style:name="P7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1a237e" style:font-weight-asian="bold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c400" style:font-weight-asian="bold" style:font-weight-complex="bold"/>
    </style:style>
    <style:style style:name="P7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cdd2" loext:opacity="100%" fo:font-weight="bold" fo:background-color="#b71c1c" style:font-weight-asian="bold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ccbc" loext:opacity="100%" fo:font-weight="bold" fo:background-color="#e65100" style:font-weight-asian="bold" style:font-weight-complex="bold"/>
    </style:style>
    <style:style style:name="P7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64ffda" loext:opacity="100%" fo:font-weight="bold" fo:background-color="#d500f9" style:font-weight-asian="bold" style:font-weight-complex="bold"/>
    </style:style>
    <style:style style:name="P7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d740" style:font-weight-asian="bold" style:font-weight-complex="bold"/>
    </style:style>
    <style:style style:name="P76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T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3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4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5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6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7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8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9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0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1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12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3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5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7" style:family="text">
      <style:text-properties fo:font-size="11pt" style:font-name-asian="Microsoft JhengHei2" style:font-size-asian="11pt" style:font-name-complex="Microsoft JhengHei2" style:font-size-complex="11pt"/>
    </style:style>
    <style:style style:name="T18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9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2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23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24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6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7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28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2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30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1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2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33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34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35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36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7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8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9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0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3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9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0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1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2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3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4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5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6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7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8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3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4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5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6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7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8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9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2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3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4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5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6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7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8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9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0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81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2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3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5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8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9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0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1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2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4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5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6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7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8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9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0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1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2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3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4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5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6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7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8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9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10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1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2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3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4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5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6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7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8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9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20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1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4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5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6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7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8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9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2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3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4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5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6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7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8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9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0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1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4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5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6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7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8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9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0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1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2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3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4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5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6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7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8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9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0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1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2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3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4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5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66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67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8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9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0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1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2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3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4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5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6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7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78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9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0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1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2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3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4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5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6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7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8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9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0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1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2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3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4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5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6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7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8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9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0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1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2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3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4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5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6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7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8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9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0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1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2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3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4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5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6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7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8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9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0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1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2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3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4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5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6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7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8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29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230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231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2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3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4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5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6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7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8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9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0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1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2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3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4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5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6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247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248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9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0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1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2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3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4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5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6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57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8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9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0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1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2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3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264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5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6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7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8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9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0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1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2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3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4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5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6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7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8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9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0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1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2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3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4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5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6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7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8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9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0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1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2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3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4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5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6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7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8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9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0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1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2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3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4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5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6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7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8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9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0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1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2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3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4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5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6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7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8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9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0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1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2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3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4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5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6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7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8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9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0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1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2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3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4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35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6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7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8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9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0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1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2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3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4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5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6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7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8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9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0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1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2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3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4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5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6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7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8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9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0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1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62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3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4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5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6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7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8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9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0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1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2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3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4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5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6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7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8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9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0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1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2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3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4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5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6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7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8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9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0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1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2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3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4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5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6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7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8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9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0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1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2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3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4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5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6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7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8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9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0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1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2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3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4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5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6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7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8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9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0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1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2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3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4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25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6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7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8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9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0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1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2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3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4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5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6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7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8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9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0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1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2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3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4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5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6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7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8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9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0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1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2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3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4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5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6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7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8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59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460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1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2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3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4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5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6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7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8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9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0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1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2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3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4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5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6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7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8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9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0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1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2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3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4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5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6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7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8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9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90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1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2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3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5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6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7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8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9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0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1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2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3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4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5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6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7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8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9" style:family="text">
      <style:text-properties fo:color="#2b2b2b" loext:opacity="100%" fo:font-family="OpenSymbol" style:font-family-generic="roman" style:font-pitch="variable" fo:font-size="10.5pt" fo:font-style="normal" fo:font-weight="normal" style:font-family-asian="OpenSymbol" style:font-family-generic-asian="system" style:font-pitch-asian="variable" style:font-size-asian="10.5pt" style:font-style-asian="normal" style:font-weight-asian="normal" style:font-family-complex="OpenSymbol" style:font-family-generic-complex="system" style:font-pitch-complex="variable" style:font-size-complex="10.5pt" style:font-style-complex="normal" style:font-weight-complex="normal"/>
    </style:style>
    <style:style style:name="T510" style:family="text">
      <style:text-properties fo:color="#2b2b2b" loext:opacity="100%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11" style:family="text">
      <style:text-properties fo:color="#ffcdd2" loext:opacity="100%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2" style:family="text">
      <style:text-properties fo:color="#18ffff" loext:opacity="100%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3" style:family="text">
      <style:text-properties fo:color="#ffffff" loext:opacity="100%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4" style:family="text">
      <style:text-properties fo:color="#ffff00" loext:opacity="100%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5" style:family="text">
      <style:text-properties fo:color="#ffff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6" style:family="text">
      <style:text-properties fo:color="#2b2b2b" loext:opacity="100%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517" style:family="text">
      <style:text-properties fo:color="#76ff03" loext:opacity="100%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8" style:family="text">
      <style:text-properties fo:color="#18ffff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9" style:family="text">
      <style:text-properties fo:color="#18ffff" loext:opacity="100%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0" style:family="text">
      <style:text-properties fo:color="#2b2b2b" loext:opacity="100%"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21" style:family="text">
      <style:text-properties fo:color="#2b2b2b" loext:opacity="100%"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2" style:family="text">
      <style:text-properties fo:color="#ffea00" loext:opacity="100%" style:font-name="Microsoft JhengHei" fo:font-size="9pt" fo:font-style="normal" fo:background-color="#3d5afe" loext:char-shading-value="0" style:font-size-asian="9pt" style:font-style-asian="normal" style:font-name-complex="Microsoft JhengHei2" style:font-size-complex="9pt" style:font-style-complex="normal"/>
    </style:style>
    <style:style style:name="T523" style:family="text">
      <style:text-properties fo:color="#ffea00" loext:opacity="100%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4" style:family="text">
      <style:text-properties fo:color="#c96a1e" loext:opacity="100%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5" style:family="text">
      <style:text-properties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6" style:family="text">
      <style:text-properties fo:font-size="9pt" fo:font-style="normal" style:font-size-asian="9pt" style:font-style-asian="normal" style:font-name-complex="Microsoft JhengHei2" style:font-size-complex="9pt" style:font-style-complex="normal"/>
    </style:style>
    <style:style style:name="T527" style:family="text">
      <style:text-properties fo:color="#c6ff00" loext:opacity="100%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8" style:family="text">
      <style:text-properties fo:color="#64ffda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9" style:family="text">
      <style:text-properties fo:color="#64ffda" loext:opacity="100%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0" style:family="text">
      <style:text-properties fo:color="#c96a1e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1" style:family="text">
      <style:text-properties fo:color="#c96a1e" loext:opacity="100%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2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3" style:family="text">
      <style:text-properties fo:color="#ffcdd2" loext:opacity="100%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4" style:family="text">
      <style:text-properties fo:color="#00000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5" style:family="text">
      <style:text-properties fo:color="#00000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6" style:family="text">
      <style:text-properties fo:color="#2b2b2b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7" style:family="text">
      <style:text-properties fo:color="#2b2b2b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8" style:family="text">
      <style:text-properties fo:color="#18ffff" loext:opacity="100%" style:font-name="Microsoft JhengHei" fo:font-size="10.5pt" fo:font-style="normal" fo:font-weight="bold" fo:background-color="#e040f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9" style:family="text">
      <style:text-properties fo:color="#18ffff" loext:opacity="100%" fo:font-size="10.5pt" fo:font-style="normal" fo:font-weight="bold" fo:background-color="#e040f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0" style:family="text">
      <style:text-properties fo:color="#ffd74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1" style:family="text">
      <style:text-properties fo:color="#ffd74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2" style:family="text">
      <style:text-properties fo:color="#b83c61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3" style:family="text">
      <style:text-properties fo:color="#2b2b2b" loext:opacity="100%" style:font-name="Microsoft JhengHei" fo:font-size="10.5pt" fo:font-style="normal" fo:font-weight="normal" fo:background-color="#ffea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44" style:family="text">
      <style:text-properties fo:color="#b83227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5" style:family="text">
      <style:text-properties fo:color="#b83227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6" style:family="text">
      <style:text-properties fo:color="#2b2b2b" loext:opacity="100%" fo:font-family="Arial" style:font-family-generic="swiss" fo:font-size="10.5pt" fo:font-style="normal" fo:font-weight="normal" officeooo:rsid="004849e1" style:font-family-asian="Arial" style:font-family-generic-asian="swiss" style:font-size-asian="10.5pt" style:font-style-asian="normal" style:font-weight-asian="normal" style:font-family-complex="Arial" style:font-family-generic-complex="swiss" style:font-size-complex="10.5pt" style:font-style-complex="normal" style:font-weight-complex="normal"/>
    </style:style>
    <style:style style:name="T547" style:family="text">
      <style:text-properties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48" style:family="text">
      <style:text-properties fo:color="#d1c4e9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9" style:family="text">
      <style:text-properties fo:color="#d1c4e9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0" style:family="text">
      <style:text-properties fo:color="#2b2b2b" loext:opacity="100%" style:font-name="Microsoft JhengHei" fo:font-size="9pt" fo:font-style="normal" fo:font-weight="bold" fo:background-color="#76ff03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1" style:family="text">
      <style:text-properties fo:color="#2b2b2b" loext:opacity="100%" style:font-name="Microsoft JhengHei" fo:font-size="9pt" fo:font-style="normal" fo:font-weight="bold" fo:background-color="#18fff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2" style:family="text">
      <style:text-properties fo:color="#eeeeee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3" style:family="text">
      <style:text-properties fo:color="#c96a1e" loext:opacity="100%" style:font-name="Microsoft JhengHei" fo:font-size="12.5pt" fo:font-weight="bold" fo:background-color="#ffea00" loext:char-shading-value="0" style:font-size-asian="12.5pt" style:font-weight-asian="bold" style:font-name-complex="Microsoft JhengHei2" style:font-size-complex="12.5pt" style:font-weight-complex="bold"/>
    </style:style>
    <style:style style:name="T554" style:family="text">
      <style:text-properties fo:color="#2b2b2b" loext:opacity="100%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5" style:family="text">
      <style:text-properties fo:color="#2b2b2b" loext:opacity="100%" style:font-name="Microsoft JhengHei" fo:font-size="10.5pt" fo:font-style="normal" fo:font-weight="normal" fo:background-color="#76ff03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6" style:family="text">
      <style:text-properties fo:color="#ff3d00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7" style:family="text">
      <style:text-properties fo:color="#ff3d00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8" style:family="text">
      <style:text-properties fo:color="#f5f5f5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9" style:family="text">
      <style:text-properties fo:color="#f5f5f5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0" style:family="text">
      <style:text-properties fo:color="#f5f5f5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1" style:family="text">
      <style:text-properties fo:color="#ffd740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2" style:family="text">
      <style:text-properties fo:color="#b2ff59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3" style:family="text">
      <style:text-properties fo:color="#eeeeee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4" style:family="text">
      <style:text-properties fo:color="#ffea00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5" style:family="text">
      <style:text-properties fo:color="#ffea00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6" style:family="text">
      <style:text-properties fo:color="#c96a1e" loext:opacity="100%" style:font-name="Microsoft JhengHei" fo:font-size="12.5pt" fo:font-weight="bold" fo:background-color="#ffea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567" style:family="text">
      <style:text-properties fo:color="#e040f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68" style:family="text">
      <style:text-properties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69" style:family="text">
      <style:text-properties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0" style:family="text">
      <style:text-properties fo:color="#18ffff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1" style:family="text">
      <style:text-properties fo:color="#ffff00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2" style:family="text">
      <style:text-properties fo:color="#1f3a5c" loext:opacity="100%" fo:font-size="10.5pt" fo:font-weight="bold" fo:background-color="#ffd740" loext:char-shading-value="0" style:font-name-asian="Microsoft JhengHei2" style:font-size-asian="10.5pt" style:font-weight-asian="bold" style:font-name-complex="Microsoft JhengHei2" style:font-size-complex="10.5pt" style:font-weight-complex="bold"/>
    </style:style>
    <style:style style:name="T573" style:family="text">
      <style:text-properties fo:color="#1f3a5c" loext:opacity="100%" style:font-name="Microsoft JhengHei" fo:font-size="10.5pt" fo:font-weight="bold" fo:background-color="#ffd740" loext:char-shading-value="0" style:font-size-asian="10.5pt" style:font-weight-asian="bold" style:font-name-complex="Microsoft JhengHei2" style:font-size-complex="10.5pt" style:font-weight-complex="bold"/>
    </style:style>
    <style:style style:name="T574" style:family="text">
      <style:text-properties fo:color="#00e676" loext:opacity="100%" style:font-name="Microsoft JhengHei" fo:font-size="10.5pt" fo:font-style="normal" fo:font-weight="bold" fo:background-color="#2b2b2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5" style:family="text">
      <style:text-properties fo:color="#00e676" loext:opacity="100%" fo:font-size="10.5pt" fo:font-style="normal" fo:font-weight="bold" fo:background-color="#2b2b2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6" style:family="text">
      <style:text-properties fo:color="#ffcdd2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7" style:family="text">
      <style:text-properties fo:color="#ffcdd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8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579" style:family="text">
      <style:text-properties fo:color="#ffea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0" style:family="text">
      <style:text-properties fo:color="#ffea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1" style:family="text">
      <style:text-properties fo:font-size="11pt" fo:background-color="#ffd740" loext:char-shading-value="0" style:font-name-asian="Microsoft JhengHei2" style:font-size-asian="11pt" style:font-name-complex="Microsoft JhengHei2" style:font-size-complex="11pt"/>
    </style:style>
    <style:style style:name="T582" style:family="text">
      <style:text-properties fo:color="#c96a1e" loext:opacity="100%" style:font-name="Microsoft JhengHei" fo:font-size="12.5pt" fo:font-weight="bold" fo:background-color="#00e5ff" loext:char-shading-value="0" style:font-size-asian="12.5pt" style:font-weight-asian="bold" style:font-name-complex="Microsoft JhengHei2" style:font-size-complex="12.5pt" style:font-weight-complex="bold"/>
    </style:style>
    <style:style style:name="T583" style:family="text">
      <style:text-properties fo:color="#76ff03" loext:opacity="100%" style:font-name="Microsoft JhengHei" fo:font-size="10.5pt" fo:font-style="normal" fo:font-weight="bold" fo:background-color="#2e7d3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4" style:family="text">
      <style:text-properties fo:color="#64ffda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5" style:family="text">
      <style:text-properties fo:color="#18ffff" loext:opacity="100%" style:font-name="Microsoft JhengHei" fo:font-size="9pt" fo:font-style="normal" fo:font-weight="bold" fo:background-color="#01579b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6" style:family="text">
      <style:text-properties fo:color="#ffcc8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7" style:family="text">
      <style:text-properties fo:color="#ffcc8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8" style:family="text">
      <style:text-properties fo:color="#ffcdd2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9" style:family="text">
      <style:text-properties fo:color="#b2ff59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0" style:family="text">
      <style:text-properties fo:color="#b2ff59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1" style:family="text">
      <style:text-properties fo:color="#2b2b2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92" style:family="text">
      <style:text-properties fo:color="#2b2b2b" loext:opacity="100%" fo:font-size="8pt" fo:font-style="normal" style:font-name-asian="Microsoft JhengHei2" style:font-size-asian="8pt" style:font-style-asian="normal" style:font-name-complex="Microsoft JhengHei2" style:font-size-complex="8pt" style:font-style-complex="normal"/>
    </style:style>
    <style:style style:name="T593" style:family="text">
      <style:text-properties fo:color="#1f7a70" loext:opacity="100%" style:font-name="Microsoft JhengHei" fo:font-size="11pt" fo:font-weight="bold" fo:background-color="#ffea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594" style:family="text">
      <style:text-properties fo:color="#1f7a70" loext:opacity="100%" style:font-name="Microsoft JhengHei" fo:font-size="11pt" fo:font-weight="bold" fo:background-color="#ffea00" loext:char-shading-value="0" style:font-size-asian="11pt" style:font-weight-asian="bold" style:font-name-complex="Microsoft JhengHei2" style:font-size-complex="11pt" style:font-weight-complex="bold"/>
    </style:style>
    <style:style style:name="T595" style:family="text">
      <style:text-properties fo:color="#e1bee7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6" style:family="text">
      <style:text-properties fo:color="#e1bee7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7" style:family="text">
      <style:text-properties fo:color="#00e676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8" style:family="text">
      <style:text-properties fo:color="#00e676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9" style:family="text">
      <style:text-properties fo:color="#c5ca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0" style:family="text">
      <style:text-properties fo:color="#c5ca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1" style:family="text">
      <style:text-properties fo:color="#ffcc8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2" style:family="text">
      <style:text-properties fo:color="#ffcc8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3" style:family="text">
      <style:text-properties fo:color="#ffea00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4" style:family="text">
      <style:text-properties fo:color="#ffea00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5" style:family="text">
      <style:text-properties fo:color="#c6ff00" loext:opacity="100%" style:font-name="Microsoft JhengHei" fo:font-size="9.5pt" fo:font-style="normal" fo:font-weight="bold" fo:background-color="#33691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6" style:family="text">
      <style:text-properties fo:color="#c6ff00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7" style:family="text">
      <style:text-properties fo:color="#2f7a4d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608" style:family="text">
      <style:text-properties fo:color="#2f7a4d" loext:opacity="100%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09" style:family="text">
      <style:text-properties fo:color="#18ffff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0" style:family="text">
      <style:text-properties fo:color="#18ffff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1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12" style:family="text">
      <style:text-properties fo:color="#c6ff0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3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4" style:family="text">
      <style:text-properties fo:color="#ffff00" loext:opacity="100%" style:font-name="Microsoft JhengHei" fo:font-size="10.5pt" fo:font-style="normal" fo:font-weight="bold" fo:background-color="#f57f1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5" style:family="text">
      <style:text-properties fo:color="#ffff00" loext:opacity="100%" fo:font-size="10.5pt" fo:font-style="normal" fo:font-weight="bold" fo:background-color="#f57f1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6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7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8" style:family="text">
      <style:text-properties fo:color="#2b2b2b" loext:opacity="100%" style:font-name="Microsoft JhengHei" fo:font-size="7pt" fo:font-style="normal" fo:font-weight="bold" fo:background-color="#ffff00" loext:char-shading-value="0" style:font-name-asian="Microsoft JhengHei2" style:font-size-asian="7pt" style:font-style-asian="normal" style:font-weight-asian="bold" style:font-name-complex="Microsoft JhengHei2" style:font-size-complex="7pt" style:font-style-complex="normal" style:font-weight-complex="bold"/>
    </style:style>
    <style:style style:name="T619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0" style:family="text">
      <style:text-properties fo:color="#2b2b2b" loext:opacity="100%" style:font-name="Microsoft JhengHei" fo:font-size="9.5pt" fo:font-style="normal" fo:font-weight="normal" fo:background-color="#64ffda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621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2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3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24" style:family="text">
      <style:text-properties fo:color="#1f7a70" loext:opacity="100%" style:font-name="Microsoft JhengHei" fo:font-size="7pt" fo:font-weight="bold" style:font-name-asian="Microsoft JhengHei2" style:font-size-asian="7pt" style:font-weight-asian="bold" style:font-name-complex="Microsoft JhengHei2" style:font-size-complex="7pt" style:font-weight-complex="bold"/>
    </style:style>
    <style:style style:name="T625" style:family="text">
      <style:text-properties fo:color="#1f7a70" loext:opacity="100%" style:font-name="Microsoft JhengHei" fo:font-size="7pt" fo:font-weight="bold" fo:background-color="#ffff00" loext:char-shading-value="0" style:font-name-asian="Microsoft JhengHei2" style:font-size-asian="7pt" style:font-weight-asian="bold" style:font-name-complex="Microsoft JhengHei2" style:font-size-complex="7pt" style:font-weight-complex="bold"/>
    </style:style>
    <style:style style:name="T626" style:family="text">
      <style:text-properties fo:color="#eeeeee" loext:opacity="100%" style:font-name="Microsoft JhengHei" fo:font-size="11pt" fo:font-weight="bold" fo:background-color="#b71c1c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27" style:family="text">
      <style:text-properties fo:color="#eeeeee" loext:opacity="100%" style:font-name="Microsoft JhengHei" fo:font-size="11pt" fo:font-weight="bold" fo:background-color="#b71c1c" loext:char-shading-value="0" style:font-size-asian="11pt" style:font-weight-asian="bold" style:font-name-complex="Microsoft JhengHei2" style:font-size-complex="11pt" style:font-weight-complex="bold"/>
    </style:style>
    <style:style style:name="T628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9" style:family="text">
      <style:text-properties fo:color="#2b2b2b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30" style:family="text">
      <style:text-properties fo:color="#2b2b2b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31" style:family="text">
      <style:text-properties fo:color="#2b2b2b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632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3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4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35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36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37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38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39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40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641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 loext:marker-style-name="T1"><text:span text:style-name="T2">公職考試 </text:span><text:span text:style-name="T3">· </text:span><text:span text:style-name="T2">資訊類</text:span></text:p>
      <text:p text:style-name="P3" loext:marker-style-name="T4"><text:span text:style-name="T5">網路概論 與 資訊安全</text:span><text:span text:style-name="T4"/></text:p>
      <text:p text:style-name="P4" loext:marker-style-name="T6"><text:span text:style-name="T7">完整整合筆記 </text:span><text:span text:style-name="T8">· </text:span><text:span text:style-name="T7">最終版</text:span></text:p>
      <text:p text:style-name="P5" loext:marker-style-name="T9"><text:span text:style-name="T10">OSI / TCP/IP ‧ IP </text:span><text:span text:style-name="T11">子網 ‧ </text:span><text:span text:style-name="T10">IPv6 ‧ ARP/NAT ‧ TCP ‧ DNS ‧ </text:span><text:span text:style-name="T11">路由 ‧ </text:span><text:span text:style-name="T10">SDN/CDN/5G ‧ </text:span><text:span text:style-name="T11">無線 ‧ 資安全攻防</text:span>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 loext:marker-style-name="T12"><text:span text:style-name="T13">涵蓋十大主題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前置速記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全程對照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考試導向</text:span><text:span text:style-name="T12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 loext:marker-style-name="T14"><text:span text:style-name="T15">十篇章節</text:span><text:span text:style-name="T14"/></text:p>
          </table:table-cell>
          <table:table-cell table:style-name="表格1.A2" office:value-type="string">
            <text:p text:style-name="P8" loext:marker-style-name="T14"><text:span text:style-name="T15">口訣 </text:span><text:span text:style-name="T16">+ </text:span><text:span text:style-name="T15">表格</text:span></text:p>
          </table:table-cell>
          <table:table-cell table:style-name="表格1.A2" office:value-type="string">
            <text:p text:style-name="P8" loext:marker-style-name="T14"><text:span text:style-name="T15">陷阱 </text:span><text:span text:style-name="T16">+ </text:span><text:span text:style-name="T15">正解</text:span></text:p>
          </table:table-cell>
          <table:table-cell table:style-name="表格1.A2" office:value-type="string">
            <text:p text:style-name="P8" loext:marker-style-name="T14"><text:span text:style-name="T15">申論 </text:span><text:span text:style-name="T16">+ </text:span><text:span text:style-name="T15">選擇</text:span>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7">📖 <text:s/></text:span><text:span text:style-name="T18">讀這份筆記的方法</text:span></text:p>
            <text:p text:style-name="P11"><text:span text:style-name="T19">使用方式：</text:span><text:span text:style-name="T20">第〇篇「考前速記總表」收錄全書所有口訣與必背表格，考前衝刺只看這篇即可；</text:span></text:p>
            <text:p text:style-name="P12" loext:marker-style-name="T21"><text:span text:style-name="T20">第一～十篇為完整詳解，建立觀念與申論寫法時閱讀。每篇皆附「常見陷阱」與「考試標準答案」。</text:span><text:span text:style-name="T21"/></text:p>
          </table:table-cell>
        </table:table-row>
      </table:table>
      <text:p text:style-name="P13" loext:marker-style-name="T22"><text:span text:style-name="T23">目　錄</text:span><text:span text:style-name="T22"/></text:p>
      <text:p text:style-name="P14" loext:marker-style-name="T24"><text:span text:style-name="T25">Table of Contents</text:span><text:span text:style-name="T24"/></text:p>
      <text:p text:style-name="P15"><text:span text:style-name="T18">第 〇 篇　考前速記總表 — 口訣 </text:span><text:span text:style-name="T26">× </text:span><text:span text:style-name="T18">必背表格</text:span><text:span text:style-name="T27"><text:tab/>3</text:span></text:p>
      <text:p text:style-name="P15"><text:span text:style-name="T28">　　</text:span><text:span text:style-name="T29">Part A</text:span><text:span text:style-name="T28">　口訣大全（依主題分類）</text:span><text:span text:style-name="T27"><text:tab/>3</text:span></text:p>
      <text:p text:style-name="P15"><text:span text:style-name="T28">　　</text:span><text:span text:style-name="T29">Part B</text:span><text:span text:style-name="T28">　必背表格精選</text:span><text:span text:style-name="T27"><text:tab/>5</text:span></text:p>
      <text:p text:style-name="P16"><text:span text:style-name="T30">第 一 篇　網路基礎架構：</text:span><text:span text:style-name="T31">OSI / TCP-IP · </text:span><text:span text:style-name="T30">協定 </text:span><text:span text:style-name="T31">· ARP · Traceroute</text:span><text:span text:style-name="T27"><text:tab/>9</text:span></text:p>
      <text:p text:style-name="P15"><text:span text:style-name="T30">第 二 篇　</text:span><text:span text:style-name="T31">IP </text:span><text:span text:style-name="T30">位址與封包處理：分類 </text:span><text:span text:style-name="T31">· CIDR · VLSM · Fragmentation</text:span><text:span text:style-name="T27"><text:tab/>13</text:span></text:p>
      <text:p text:style-name="P15"><text:span text:style-name="T30">第 三 篇　</text:span><text:span text:style-name="T31">IPv4 → IPv6 </text:span><text:span text:style-name="T30">過渡技術</text:span><text:span text:style-name="T27"><text:tab/>19</text:span></text:p>
      <text:p text:style-name="P15"><text:span text:style-name="T30">第 四 篇　</text:span><text:span text:style-name="T31">ARP</text:span><text:span text:style-name="T30">、</text:span><text:span text:style-name="T31">NAT </text:span><text:span text:style-name="T30">與完整上網流程</text:span><text:span text:style-name="T27"><text:tab/>21</text:span></text:p>
      <text:p text:style-name="P15"><text:span text:style-name="T30">第 五 篇　</text:span><text:span text:style-name="T31">TCP </text:span><text:span text:style-name="T30">傳輸控制深入</text:span><text:span text:style-name="T27"><text:tab/>24</text:span></text:p>
      <text:p text:style-name="P15"><text:span text:style-name="T30">第 六 篇　</text:span><text:span text:style-name="T31">DNS </text:span><text:span text:style-name="T30">與 </text:span><text:span text:style-name="T31">DNSSEC</text:span><text:span text:style-name="T27"><text:tab/>28</text:span></text:p>
      <text:p text:style-name="P15"><text:span text:style-name="T30">第 七 篇　路由協定：</text:span><text:span text:style-name="T31">OSPF </text:span><text:span text:style-name="T30">與 </text:span><text:span text:style-name="T31">BGP</text:span><text:span text:style-name="T27"><text:tab/>31</text:span></text:p>
      <text:p text:style-name="P15"><text:span text:style-name="T30">第 八 篇　網路系統進階：</text:span><text:span text:style-name="T31">SDN · LB · CDN · 5G</text:span><text:span text:style-name="T27"><text:tab/>34</text:span></text:p>
      <text:p text:style-name="P15"><text:span text:style-name="T30">第 九 篇　無線通訊：</text:span><text:span text:style-name="T31">WiFi vs Bluetooth</text:span><text:span text:style-name="T27"><text:tab/>37</text:span></text:p>
      <text:p text:style-name="P15"><text:span text:style-name="T30">第 十 篇　資訊安全：設備 </text:span><text:span text:style-name="T31">· </text:span><text:span text:style-name="T30">攻防 </text:span><text:span text:style-name="T31">· </text:span><text:span text:style-name="T30">企業資安 </text:span><text:span text:style-name="T31">· Zero Trust</text:span><text:span text:style-name="T27"><text:tab/>40</text:span></text:p>
      <text:p text:style-name="P16"><text:span text:style-name="T18">結　語　考前最後叮嚀</text:span><text:span text:style-name="T27"><text:tab/>51</text:span></text:p>
      <text:h text:style-name="P17" text:outline-level="1" loext:marker-style-name="T32"><text:span text:style-name="T33">第 〇 篇　考前速記總表 — 口訣 </text:span><text:span text:style-name="T32">× </text:span><text:span text:style-name="T33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7">⚡ <text:s/></text:span><text:span text:style-name="T30">本篇用途</text:span></text:p>
            <text:p text:style-name="P11" loext:marker-style-name="T21"><text:span text:style-name="T20">這一篇把全書最關鍵的「記憶口訣」與「必背表格」依主題集中，方便考前快速複習；每一條後方括號為對應的詳解篇章。</text:span><text:span text:style-name="T21"/></text:p>
          </table:table-cell>
        </table:table-row>
      </table:table>
      <text:h text:style-name="P18" text:outline-level="2" loext:marker-style-name="T34"><text:span text:style-name="T34">Part A</text:span><text:span text:style-name="T35">　口訣大全（依主題分類）</text:span></text:h>
      <text:h text:style-name="P19" text:outline-level="3"><text:span text:style-name="T36">▍</text:span><text:span text:style-name="T37"> </text:span><text:span text:style-name="T38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TCP/IP </text:span><text:span text:style-name="T41">四層心法：</text:span><text:span text:style-name="T20">應用層→給人用（</text:span><text:span text:style-name="T42">HTTP/DNS/DHCP/SSH/MQTT</text:span><text:span text:style-name="T20">）｜傳輸層→怎麼送（</text:span><text:span text:style-name="T42">TCP </text:span><text:span text:style-name="T20">穩、</text:span><text:span text:style-name="T42">UDP </text:span><text:span text:style-name="T20">快）｜網路層→走哪條路（</text:span><text:span text:style-name="T42">IP/ICMP</text:span><text:span text:style-name="T20">）｜連結層→同一區網怎麼接（</text:span><text:span text:style-name="T42">Ethernet/ARP</text:span><text:span text:style-name="T20">）</text:span></text:p>
            <text:p text:style-name="P12"><text:span text:style-name="T40">OSI vs TCP/IP</text:span><text:span text:style-name="T41">：</text:span><text:span text:style-name="T42">OSI 7 </text:span><text:span text:style-name="T20">層（理論）、</text:span><text:span text:style-name="T42">TCP/IP 4 </text:span><text:span text:style-name="T20">層（實際）；差別在 </text:span><text:span text:style-name="T42">TCP/IP </text:span><text:span text:style-name="T20">把 </text:span><text:span text:style-name="T42">Session</text:span><text:span text:style-name="T20">＋</text:span><text:span text:style-name="T42">Presentation </text:span><text:span text:style-name="T20">併入 </text:span><text:span text:style-name="T42">Application</text:span><text:span text:style-name="T20">。</text:span></text:p>
            <text:p text:style-name="P12"><text:span text:style-name="T40">TCP vs UDP</text:span><text:span text:style-name="T41">：</text:span><text:span text:style-name="T42">TCP</text:span><text:span text:style-name="T20">「穩定優先」（保證送達、會重傳）；</text:span><text:span text:style-name="T42">UDP</text:span><text:span text:style-name="T20">「速度優先」（不保證、不重傳）。</text:span></text:p>
            <text:p text:style-name="P12"><text:span text:style-name="T41">三件事：</text:span><text:span text:style-name="T42">IP→</text:span><text:span text:style-name="T20">定位（目的地是誰）｜</text:span><text:span text:style-name="T42">Routing→</text:span><text:span text:style-name="T20">選路（怎麼走最快）｜</text:span><text:span text:style-name="T42">ICMP→</text:span><text:span text:style-name="T20">回報（出錯通知你）。</text:span></text:p>
            <text:p text:style-name="P12"><text:span text:style-name="T40">Traceroute</text:span><text:span text:style-name="T41">＝</text:span><text:span text:style-name="T42">TTL </text:span><text:span text:style-name="T20">遞增 ＋ </text:span><text:span text:style-name="T42">ICMP </text:span><text:span text:style-name="T20">回報，逐步「炸出」完整路徑。</text:span></text:p>
            <text:p text:style-name="P12"><text:span text:style-name="T40">ARP</text:span><text:span text:style-name="T41">＝</text:span><text:span text:style-name="T20">用 </text:span><text:span text:style-name="T42">IP </text:span><text:span text:style-name="T20">找 </text:span><text:span text:style-name="T42">MAC</text:span><text:span text:style-name="T20">，只在同一個 </text:span><text:span text:style-name="T42">LAN </text:span><text:span text:style-name="T20">內使用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二、</text:span><text:span text:style-name="T37">IP </text:span><text:span text:style-name="T38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VLSM </text:span><text:span text:style-name="T41">黃金公式：</text:span><text:span text:style-name="T20">需求 ＋</text:span><text:span text:style-name="T42">2 → </text:span><text:span text:style-name="T20">找最小 </text:span><text:span text:style-name="T42">2ⁿ → </text:span><text:span text:style-name="T20">前綴 </text:span><text:span text:style-name="T42">/(32−n)</text:span><text:span text:style-name="T20">。</text:span></text:p>
            <text:p text:style-name="P12"><text:span text:style-name="T41">可用主機數：</text:span><text:span text:style-name="T42">2^(</text:span><text:span text:style-name="T20">主機 </text:span><text:span text:style-name="T42">bit) − 2</text:span><text:span text:style-name="T20">（扣掉網路位址與廣播位址）。</text:span></text:p>
            <text:p text:style-name="P12"><text:span text:style-name="T40">CIDR </text:span><text:span text:style-name="T41">合併：</text:span><text:span text:style-name="T20">連續 ＋ 數量 </text:span><text:span text:style-name="T42">2ⁿ </text:span><text:span text:style-name="T20">＋ 起點對齊 → 合併 </text:span><text:span text:style-name="T42">2ⁿ </text:span><text:span text:style-name="T20">個子網則「前綴減 </text:span><text:span text:style-name="T42">n</text:span><text:span text:style-name="T20">」。</text:span></text:p>
            <text:p text:style-name="P12"><text:span text:style-name="T41">前綴速背：</text:span><text:span text:style-name="T42">/25=126</text:span><text:span text:style-name="T20">、</text:span><text:span text:style-name="T42">/26=62</text:span><text:span text:style-name="T20">、</text:span><text:span text:style-name="T42">/27=30</text:span><text:span text:style-name="T20">、</text:span><text:span text:style-name="T42">/28=14</text:span><text:span text:style-name="T20">、</text:span><text:span text:style-name="T42">/29=6</text:span><text:span text:style-name="T20">、</text:span><text:span text:style-name="T42">/30=2</text:span><text:span text:style-name="T20">。</text:span></text:p>
            <text:p text:style-name="P12"><text:span text:style-name="T41">封包切割：</text:span><text:span text:style-name="T20">封包 </text:span><text:span text:style-name="T42">&gt; MTU </text:span><text:span text:style-name="T20">就切（</text:span><text:span text:style-name="T42">Fragmentation</text:span><text:span text:style-name="T20">）；</text:span><text:span text:style-name="T42">Fragment Offset </text:span><text:span text:style-name="T20">＝ 起始位置 </text:span><text:span text:style-name="T42">÷ 8</text:span><text:span text:style-name="T20">。</text:span></text:p>
            <text:p text:style-name="P12"><text:span text:style-name="T41">誰能切：</text:span><text:span text:style-name="T42">IPv4</text:span><text:span text:style-name="T20">＝</text:span><text:span text:style-name="T42">Router </text:span><text:span text:style-name="T20">或 </text:span><text:span text:style-name="T42">Source </text:span><text:span text:style-name="T20">可切；</text:span><text:span text:style-name="T42">IPv6</text:span><text:span text:style-name="T20">＝只有 </text:span><text:span text:style-name="T42">Source </text:span><text:span text:style-name="T20">切，必搭 </text:span><text:span text:style-name="T42">PMTUD</text:span><text:span text:style-name="T20">。</text:span></text:p>
            <text:p text:style-name="P12"><text:span text:style-name="T40">Protocol </text:span><text:span text:style-name="T41">值：</text:span><text:span text:style-name="T42">ICMP=1</text:span><text:span text:style-name="T20">、</text:span><text:span text:style-name="T42">TCP=6</text:span><text:span text:style-name="T20">、</text:span><text:span text:style-name="T42">UDP=17</text:span><text:span text:style-name="T20">｜</text:span><text:span text:style-name="T42">DF=1 </text:span><text:span text:style-name="T20">禁止切、</text:span><text:span text:style-name="T42">MF=1 </text:span><text:span text:style-name="T20">後面還有分段｜</text:span><text:span text:style-name="T42">MSS</text:span><text:span text:style-name="T20">＝</text:span><text:span text:style-name="T42">MTU−20−20</text:span><text:span text:style-name="T20">＝</text:span><text:span text:style-name="T42">1460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三、</text:span><text:span text:style-name="T37">IPv4 → IPv6</text:span><text:span text:style-name="T38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IPv6 </text:span><text:span text:style-name="T41">特點：</text:span><text:span text:style-name="T20">大（</text:span><text:span text:style-name="T42">128 bit</text:span><text:span text:style-name="T20">）＋ 安全（</text:span><text:span text:style-name="T42">IPsec</text:span><text:span text:style-name="T20">）＋ 快（固定 </text:span><text:span text:style-name="T42">Header</text:span><text:span text:style-name="T20">）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41">三種過渡技術：</text:span><text:span text:style-name="T20">雙語（</text:span><text:span text:style-name="T42">Dual Stack</text:span><text:span text:style-name="T20">）＋ 偽裝（</text:span><text:span text:style-name="T42">Tunneling</text:span><text:span text:style-name="T20">）＋ 翻譯（</text:span><text:span text:style-name="T42">Translation</text:span><text:span text:style-name="T20">）。</text:span></text:p>
            <text:p text:style-name="P12"><text:span text:style-name="T41">生活比喻：</text:span><text:span text:style-name="T42">Dual Stack</text:span><text:span text:style-name="T20">＝同時會中英文；</text:span><text:span text:style-name="T42">Tunneling</text:span><text:span text:style-name="T20">＝英文信裝進中文信封偷渡；</text:span><text:span text:style-name="T42">Translation</text:span><text:span text:style-name="T20">＝現場請翻譯口譯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四、</text:span><text:span text:style-name="T37">ARP</text:span><text:span text:style-name="T38">、</text:span><text:span text:style-name="T37">NAT </text:span><text:span text:style-name="T38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上網流程：</text:span><text:span text:style-name="T42">DNS → ARP → L2 </text:span><text:span text:style-name="T20">封包 → </text:span><text:span text:style-name="T42">NAT</text:span><text:span text:style-name="T20">（去程）→ </text:span><text:span text:style-name="T42">Internet → NAT</text:span><text:span text:style-name="T20">（回程）→ 你。</text:span></text:p>
            <text:p text:style-name="P12"><text:span text:style-name="T41">核心觀念：</text:span><text:span text:style-name="T42">IP</text:span><text:span text:style-name="T20">＝最終目的地（全程不變）；</text:span><text:span text:style-name="T42">MAC</text:span><text:span text:style-name="T20">＝下一站（每跳更換）。</text:span></text:p>
            <text:p text:style-name="P12"><text:span text:style-name="T41">最大地雷：</text:span><text:span text:style-name="T42">ARP </text:span><text:span text:style-name="T20">找的是「路由器（預設閘道）」的 </text:span><text:span text:style-name="T42">MAC</text:span><text:span text:style-name="T20">，不是 </text:span><text:span text:style-name="T42">Google </text:span><text:span text:style-name="T20">的 </text:span><text:span text:style-name="T42">MAC</text:span><text:span text:style-name="T20">。</text:span></text:p>
            <text:p text:style-name="P12"><text:span text:style-name="T40">PAT</text:span><text:span text:style-name="T41">：</text:span><text:span text:style-name="T20">多台共用一個公網 </text:span><text:span text:style-name="T42">IP</text:span><text:span text:style-name="T20">，靠 </text:span><text:span text:style-name="T42">Port </text:span><text:span text:style-name="T20">號碼區分（最重要）。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五、</text:span><text:span text:style-name="T37">TCP </text:span><text:span text:style-name="T38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三次握手：</text:span><text:span text:style-name="T42">SYN → SYN</text:span><text:span text:style-name="T20">＋</text:span><text:span text:style-name="T42">ACK → ACK</text:span><text:span text:style-name="T20">，確認雙向都能通訊。</text:span></text:p>
            <text:p text:style-name="P12"><text:span text:style-name="T41">傳送量公式：</text:span><text:span text:style-name="T20">實際傳送量 ＝ </text:span><text:span text:style-name="T42">min(rwnd, cwnd)</text:span><text:span text:style-name="T20">。</text:span><text:span text:style-name="T42">rwnd</text:span><text:span text:style-name="T20">＝接收端限制、</text:span><text:span text:style-name="T42">cwnd</text:span><text:span text:style-name="T20">＝網路限制。</text:span></text:p>
            <text:p text:style-name="P12"><text:span text:style-name="T41">擁塞控制節奏：</text:span><text:span text:style-name="T42">Slow Start</text:span><text:span text:style-name="T20">（指數成長）→ </text:span><text:span text:style-name="T42">Congestion Avoidance</text:span><text:span text:style-name="T20">（線性成長）→ 丟包（減速）。</text:span></text:p>
            <text:p text:style-name="P12"><text:span text:style-name="T41">丟包處理：</text:span><text:span text:style-name="T42">Timeout → cwnd </text:span><text:span text:style-name="T20">重設為 </text:span><text:span text:style-name="T42">1 </text:span><text:span text:style-name="T20">回 </text:span><text:span text:style-name="T42">Slow Start</text:span><text:span text:style-name="T20">；</text:span><text:span text:style-name="T42">3 </text:span><text:span text:style-name="T20">個重複 </text:span><text:span text:style-name="T42">ACK → cwnd </text:span><text:span text:style-name="T20">減半續 </text:span><text:span text:style-name="T42">CA</text:span><text:span text:style-name="T20">。</text:span></text:p>
            <text:p text:style-name="P12"><text:span text:style-name="T40">AIMD</text:span><text:span text:style-name="T41">：</text:span><text:span text:style-name="T20">沒丟包 每 </text:span><text:span text:style-name="T42">RTT</text:span><text:span text:style-name="T20">＋</text:span><text:span text:style-name="T42">1</text:span><text:span text:style-name="T20">（加法增長）；丟包 </text:span><text:span text:style-name="T42">×0.5</text:span><text:span text:style-name="T20">（乘法減少）。</text:span></text:p>
            <text:p text:style-name="P12"><text:span text:style-name="T40">SYN Flood</text:span><text:span text:style-name="T41">：</text:span><text:span text:style-name="T20">大量半連線（</text:span><text:span text:style-name="T42">Half-open</text:span><text:span text:style-name="T20">）耗盡 </text:span><text:span text:style-name="T42">Server </text:span><text:span text:style-name="T20">資源 → </text:span><text:span text:style-name="T42">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六、</text:span><text:span text:style-name="T37">DNS </text:span><text:span text:style-name="T38">與 </text:span><text:span text:style-name="T37">DNSSEC</text:span><text:span text:style-name="T38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查詢流程：</text:span><text:span text:style-name="T42">Cache → Local → Root → TLD → Authoritative → </text:span><text:span text:style-name="T20">取得 </text:span><text:span text:style-name="T42">IP</text:span><text:span text:style-name="T20">。</text:span></text:p>
            <text:p text:style-name="P12"><text:span text:style-name="T40">Recursive</text:span><text:span text:style-name="T41">：</text:span><text:span text:style-name="T20">「代查到底」（</text:span><text:span text:style-name="T42">DNS </text:span><text:span text:style-name="T20">幫你問完，你只問一次）。</text:span></text:p>
            <text:p text:style-name="P12"><text:span text:style-name="T40">Iterative</text:span><text:span text:style-name="T41">：</text:span><text:span text:style-name="T20">「逐層詢問」（你自己一層一層問）。</text:span></text:p>
            <text:p text:style-name="P12"><text:span text:style-name="T40">DNSSEC</text:span><text:span text:style-name="T41">：</text:span><text:span text:style-name="T20">驗證真偽，不是加密、不防 </text:span><text:span text:style-name="T42">D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七、路由協定 </text:span><text:span text:style-name="T37">OSPF / BGP</text:span><text:span text:style-name="T38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範圍分類：</text:span><text:span text:style-name="T20">公司／校園內 → </text:span><text:span text:style-name="T42">IGP</text:span><text:span text:style-name="T20">（</text:span><text:span text:style-name="T42">OSPF</text:span><text:span text:style-name="T20">、</text:span><text:span text:style-name="T42">RIP</text:span><text:span text:style-name="T20">）；公司與公司間 → </text:span><text:span text:style-name="T42">EGP</text:span><text:span text:style-name="T20">（</text:span><text:span text:style-name="T42">BGP</text:span><text:span text:style-name="T20">）。</text:span></text:p>
            <text:p text:style-name="P12"><text:span text:style-name="T40">OSPF </text:span><text:span text:style-name="T41">規定：</text:span><text:span text:style-name="T20">所有 </text:span><text:span text:style-name="T42">Area </text:span><text:span text:style-name="T20">一定要連到 </text:span><text:span text:style-name="T42">Area 0</text:span><text:span text:style-name="T20">（骨幹）才能互通。</text:span></text:p>
            <text:p text:style-name="P12"><text:span text:style-name="T40">OSPF </text:span><text:span text:style-name="T41">四種 </text:span><text:span text:style-name="T40">Router</text:span><text:span text:style-name="T41">：</text:span><text:span text:style-name="T42">Internal</text:span><text:span text:style-name="T20">（不出 </text:span><text:span text:style-name="T42">Area</text:span><text:span text:style-name="T20">）／</text:span><text:span text:style-name="T42">Backbone</text:span><text:span text:style-name="T20">（在 </text:span><text:span text:style-name="T42">Area 0</text:span><text:span text:style-name="T20">）／</text:span><text:span text:style-name="T42">ABR</text:span><text:span text:style-name="T20">（跨 </text:span><text:span text:style-name="T42">Area </text:span><text:span text:style-name="T20">橋樑）／</text:span><text:span text:style-name="T42">ASBR</text:span><text:span text:style-name="T20">（跨 </text:span><text:span text:style-name="T42">AS </text:span><text:span text:style-name="T20">入口）。</text:span></text:p>
            <text:p text:style-name="P12"><text:span text:style-name="T40">BGP </text:span><text:span text:style-name="T41">選路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。</text:span></text:p>
            <text:p text:style-name="P12"><text:span text:style-name="T40">BGP </text:span><text:span text:style-name="T41">本質：</text:span><text:span text:style-name="T20">政策導向（不是距離導向）；</text:span><text:span text:style-name="T42">Local Preference </text:span><text:span text:style-name="T20">才是最重要的「通用」屬性（</text:span><text:span text:style-name="T42">Weight </text:span><text:span text:style-name="T20">為 </text:span><text:span text:style-name="T42">Cisco </text:span><text:span text:style-name="T20">私有）。</text:span></text:p>
            <text:p text:style-name="P12"><text:span text:style-name="T41">三層分工：</text:span><text:span text:style-name="T20">防火牆→「能不能走」｜</text:span><text:span text:style-name="T42">NAT→</text:span><text:span text:style-name="T20">「你是誰」｜</text:span><text:span text:style-name="T42">BGP→</text:span><text:span text:style-name="T20">「怎麼走」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八、網路系統進階 </text:span><text:span text:style-name="T37">SDN / LB / CDN / 5G</text:span><text:span text:style-name="T38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SDN</text:span><text:span text:style-name="T41">：</text:span><text:span text:style-name="T20">「分平面、三層 </text:span><text:span text:style-name="T42">App-</text:span><text:span text:style-name="T20">控</text:span><text:span text:style-name="T42">-</text:span><text:span text:style-name="T20">基」＝控制／資料分離；</text:span><text:span text:style-name="T42">Application → Control → Infrastructure</text:span><text:span text:style-name="T20">。</text:span></text:p>
            <text:p text:style-name="P12"><text:span text:style-name="T40">Load Balancing</text:span><text:span text:style-name="T41">：</text:span><text:span text:style-name="T20">「</text:span><text:span text:style-name="T42">LB </text:span><text:span text:style-name="T20">輪、重、黏」＝</text:span><text:span text:style-name="T42">Round Robin</text:span><text:span text:style-name="T20">（輪流）／</text:span><text:span text:style-name="T42">Weighted RR</text:span><text:span text:style-name="T20">（加權）／</text:span><text:span text:style-name="T42">Stickiness</text:span><text:span text:style-name="T20">（同人同台）。</text:span></text:p>
            <text:p text:style-name="P12"><text:span text:style-name="T40">CDN</text:span><text:span text:style-name="T41">：</text:span><text:span text:style-name="T20">「網址轉轉轉（</text:span><text:span text:style-name="T42">CNAME</text:span><text:span text:style-name="T20">），資料找最近（</text:span><text:span text:style-name="T42">Edge</text:span><text:span text:style-name="T20">）」；</text:span><text:span text:style-name="T42">CNAME</text:span><text:span text:style-name="T20">＝網址→網址（非 </text:span><text:span text:style-name="T42">IP</text:span><text:span text:style-name="T20">）。</text:span></text:p>
            <text:p text:style-name="P12"><text:span text:style-name="T40">5G</text:span><text:span text:style-name="T41">：</text:span><text:span text:style-name="T20">「快、低、多、切」＝</text:span><text:span text:style-name="T42">eMBB</text:span><text:span text:style-name="T20">（高速）／</text:span><text:span text:style-name="T42">URLLC</text:span><text:span text:style-name="T20">（超低延遲）／</text:span><text:span text:style-name="T42">mMTC</text:span><text:span text:style-name="T20">（大量連線）／</text:span><text:span text:style-name="T42">Network Slicing</text:span><text:span text:style-name="T20">（切片）。</text:span></text:p>
            <text:p text:style-name="P12"><text:span text:style-name="T40">10 </text:span><text:span text:style-name="T41">秒總背：</text:span><text:span text:style-name="T42">SDN </text:span><text:span text:style-name="T20">分離三層、</text:span><text:span text:style-name="T42">LB </text:span><text:span text:style-name="T20">輪重黏、</text:span><text:span text:style-name="T42">CDN CNAME→</text:span><text:span text:style-name="T20">最近、</text:span><text:span text:style-name="T42">5G </text:span><text:span text:style-name="T20">快低多切、</text:span><text:span text:style-name="T42">WiFi </text:span><text:span text:style-name="T20">聽、</text:span><text:span text:style-name="T42">BT </text:span><text:span text:style-name="T20">跳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九、無線通訊 </text:span><text:span text:style-name="T37">WiFi vs Bluetooth</text:span><text:span text:style-name="T38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一句總綱：</text:span><text:span text:style-name="T20">「</text:span><text:span text:style-name="T42">WiFi </text:span><text:span text:style-name="T20">先聽再說（</text:span><text:span text:style-name="T42">CSMA/CA</text:span><text:span text:style-name="T20">），</text:span><text:span text:style-name="T42">Bluetooth </text:span><text:span text:style-name="T20">一直換頻道（</text:span><text:span text:style-name="T42">FHSS</text:span><text:span text:style-name="T20">）」。</text:span></text:p>
            <text:p text:style-name="P12"><text:span text:style-name="T41">本質對比：</text:span><text:span text:style-name="T42">WiFi</text:span><text:span text:style-name="T20">＝搶頻道（菜市場）；</text:span><text:span text:style-name="T42">BT</text:span><text:span text:style-name="T20">＝排班（會議室預約）；時槽＝時間格子；</text:span><text:span text:style-name="T42">SCO</text:span><text:span text:style-name="T20">＝語音；</text:span><text:span text:style-name="T42">L2CAP</text:span><text:span text:style-name="T20">＝三通道。</text:span></text:p>
            <text:p text:style-name="P12"><text:span text:style-name="T41">最大陷阱：</text:span><text:span text:style-name="T20">有線 </text:span><text:span text:style-name="T42">Ethernet</text:span><text:span text:style-name="T20">＝</text:span><text:span text:style-name="T42">CD</text:span><text:span text:style-name="T20">（</text:span><text:span text:style-name="T42">Detect </text:span><text:span text:style-name="T20">偵測）；無線 </text:span><text:span text:style-name="T42">WiFi</text:span><text:span text:style-name="T20">＝</text:span><text:span text:style-name="T42">CA</text:span><text:span text:style-name="T20">（</text:span><text:span text:style-name="T42">Avoid </text:span><text:span text:style-name="T20">避免）。</text:span></text:p>
            <text:p text:style-name="P12"><text:span text:style-name="T40">QoS</text:span><text:span text:style-name="T41">／語音：</text:span><text:span text:style-name="T42">WiFi QoS</text:span><text:span text:style-name="T20">＝</text:span><text:span text:style-name="T42">EDCA</text:span><text:span text:style-name="T20">（急診室分級）；藍牙即時語音＝</text:span><text:span text:style-name="T42">SCO</text:span><text:span text:style-name="T20">／</text:span><text:span text:style-name="T42">eSCO</text:span><text:span text:style-name="T20">；</text:span><text:span text:style-name="T42">L2CAP </text:span><text:span text:style-name="T20">位於 </text:span><text:span text:style-name="T42">Data </text:span><text:soft-page-break/><text:span text:style-name="T42">Link </text:span><text:span text:style-name="T20">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設備萬用口訣：</text:span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  <text:p text:style-name="P12"><text:span text:style-name="T40">IOC </text:span><text:span text:style-name="T41">四線索：</text:span><text:span text:style-name="T20">網（</text:span><text:span text:style-name="T42">Domain</text:span><text:span text:style-name="T20">）→ 檔（</text:span><text:span text:style-name="T42">Hash</text:span><text:span text:style-name="T20">）→ 連（</text:span><text:span text:style-name="T42">IP</text:span><text:span text:style-name="T20">）→ 控（</text:span><text:span text:style-name="T42">C2</text:span><text:span text:style-name="T20">）。</text:span></text:p>
            <text:p text:style-name="P12"><text:span text:style-name="T41">封包闖關順序：</text:span><text:span text:style-name="T42">Client → Proxy → Internet → FW/NGFW → DMZ → WAF → Reverse Proxy → </text:span><text:span text:style-name="T20">內部 </text:span><text:span text:style-name="T42">Server</text:span><text:span text:style-name="T20">。</text:span></text:p>
            <text:p text:style-name="P12"><text:span text:style-name="T41">三防分工：</text:span><text:span text:style-name="T42">Firewall </text:span><text:span text:style-name="T20">擋入口、</text:span><text:span text:style-name="T42">IDS </text:span><text:span text:style-name="T20">只看、</text:span><text:span text:style-name="T42">IPS </text:span><text:span text:style-name="T20">看＋擋；</text:span><text:span text:style-name="T42">HIDS </text:span><text:span text:style-name="T20">看主機（</text:span><text:span text:style-name="T42">Log</text:span><text:span text:style-name="T20">）、</text:span><text:span text:style-name="T42">NIDS </text:span><text:span text:style-name="T20">看網路（封包）。</text:span></text:p>
            <text:p text:style-name="P12"><text:span text:style-name="T41">易混兩協定：</text:span><text:span text:style-name="T42">SNMP </text:span><text:span text:style-name="T20">管理設備（應用層／</text:span><text:span text:style-name="T42">UDP</text:span><text:span text:style-name="T20">）、</text:span><text:span text:style-name="T42">ICMP </text:span><text:span text:style-name="T20">診斷網路（網路層）。</text:span></text:p>
            <text:p text:style-name="P12"><text:span text:style-name="T40">SQL Injection</text:span><text:span text:style-name="T41">：</text:span><text:span text:style-name="T20">攻擊＝</text:span><text:span text:style-name="T42">' OR 1=1 --</text:span><text:span text:style-name="T20">；防禦核心＝</text:span><text:span text:style-name="T42">Prepared Statement</text:span><text:span text:style-name="T20">（預備語句）。</text:span></text:p>
            <text:p text:style-name="P12"><text:span text:style-name="T40">Zero-Day</text:span><text:span text:style-name="T41">：</text:span><text:span text:style-name="T20">最怕「沒有 </text:span><text:span text:style-name="T42">Signature</text:span><text:span text:style-name="T20">」；防禦＝</text:span><text:span text:style-name="T42">Patch </text:span><text:span text:style-name="T20">更新 ＋ </text:span><text:span text:style-name="T42">IDS/IPS </text:span><text:span text:style-name="T20">＋ 網路分段。</text:span></text:p>
            <text:p text:style-name="P12"><text:span text:style-name="T41">企業資安三階段：</text:span><text:span text:style-name="T20">事前預防 → 事中偵測 → 事後復原。</text:span><text:span text:style-name="T42">RTO</text:span><text:span text:style-name="T20">＝停機時間、</text:span><text:span text:style-name="T42">RPO</text:span><text:span text:style-name="T20">＝資料損失量。</text:span></text:p>
            <text:p text:style-name="P12"><text:span text:style-name="T40">EDR/MDR</text:span><text:span text:style-name="T41">：</text:span><text:span text:style-name="T42">EDR</text:span><text:span text:style-name="T20">＝自己買工具守、</text:span><text:span text:style-name="T42">MDR</text:span><text:span text:style-name="T20">＝請公司幫你守、</text:span><text:span text:style-name="T42">ATT&amp;CK</text:span><text:span text:style-name="T20">＝駭客招式教材、數位韌性＝撐住快速復原。</text:span></text:p>
            <text:p text:style-name="P12"><text:span text:style-name="T40">SSDLC</text:span><text:span text:style-name="T41">：</text:span><text:span text:style-name="T42">Define→Design→Develop→Test→Deploy→Maintain</text:span><text:span text:style-name="T20">，精神是「左移（</text:span><text:span text:style-name="T42">Shift Left</text:span><text:span text:style-name="T20">）」。</text:span></text:p>
            <text:p text:style-name="P12"><text:span text:style-name="T40">Zero Trust</text:span><text:span text:style-name="T41">：</text:span><text:span text:style-name="T20">永不信任，始終驗證；查「人（</text:span><text:span text:style-name="T42">Identity</text:span><text:span text:style-name="T20">）機（</text:span><text:span text:style-name="T42">Device</text:span><text:span text:style-name="T20">）境（</text:span><text:span text:style-name="T42">Context</text:span><text:span text:style-name="T20">）」；配 </text:span><text:span text:style-name="T42">MFA</text:span><text:span text:style-name="T20">＋最小權限＋微分段＋持續監控。</text:span></text:p>
          </table:table-cell>
        </table:table-row>
      </table:table>
      <text:h text:style-name="P18" text:outline-level="2" loext:marker-style-name="T34"><text:span text:style-name="T34">Part B</text:span><text:span text:style-name="T35">　必背表格精選（考前掃一遍）</text:span></text:h>
      <text:h text:style-name="P19" text:outline-level="3"><text:span text:style-name="T36">▍</text:span><text:span text:style-name="T37"> ① </text:span><text:span text:style-name="T38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 loext:marker-style-name="T12"><text:span text:style-name="T13">前綴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主機 </text:span><text:span text:style-name="T43">bit</text:span></text:p>
            </table:table-cell>
            <table:table-cell table:style-name="表格14.A1" office:value-type="string">
              <text:p text:style-name="P7" loext:marker-style-name="T12"><text:span text:style-name="T43">IP </text:span><text:span text:style-name="T13">總數</text:span></text:p>
            </table:table-cell>
            <table:table-cell table:style-name="表格14.A1" office:value-type="string">
              <text:p text:style-name="P7" loext:marker-style-name="T12"><text:span text:style-name="T13">可用主機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區塊步長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廣播尾數範例</text:span><text:span text:style-name="T12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0" loext:marker-style-name="T14"><text:span text:style-name="T16">/24</text:span><text:span text:style-name="T14"/></text:p>
          </table:table-cell>
          <table:table-cell table:style-name="表格14.A2" office:value-type="string">
            <text:p text:style-name="P8" loext:marker-style-name="T14"><text:span text:style-name="T16">8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6</text:span><text:span text:style-name="T14"/></text:p>
          </table:table-cell>
          <table:table-cell table:style-name="表格14.A2" office:value-type="string">
            <text:p text:style-name="P8" loext:marker-style-name="T44"><text:span text:style-name="T45">25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256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5</text:span><text:span text:style-name="T14"/></text:p>
          </table:table-cell>
          <table:table-cell table:style-name="表格14.A3" office:value-type="string">
            <text:p text:style-name="P8" loext:marker-style-name="T14"><text:span text:style-name="T16">7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8</text:span><text:span text:style-name="T14"/></text:p>
          </table:table-cell>
          <table:table-cell table:style-name="表格14.A3" office:value-type="string">
            <text:p text:style-name="P8" loext:marker-style-name="T44"><text:span text:style-name="T45">12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128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7, 255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6</text:span><text:span text:style-name="T14"/></text:p>
          </table:table-cell>
          <table:table-cell table:style-name="表格14.A2" office:value-type="string">
            <text:p text:style-name="P8" loext:marker-style-name="T14"><text:span text:style-name="T16">6</text:span><text:span text:style-name="T14"/></text:p>
          </table:table-cell>
          <table:table-cell table:style-name="表格14.A2" office:value-type="string">
            <text:p text:style-name="P20" loext:marker-style-name="T14"><text:span text:style-name="T16">64</text:span><text:span text:style-name="T14"/></text:p>
          </table:table-cell>
          <table:table-cell table:style-name="表格14.A2" office:value-type="string">
            <text:p text:style-name="P8" loext:marker-style-name="T44"><text:span text:style-name="T45">6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64</text:span><text:span text:style-name="T14"/></text:p>
          </table:table-cell>
          <table:table-cell table:style-name="表格14.A2" office:value-type="string">
            <text:p text:style-name="P20" loext:marker-style-name="T14"><text:span text:style-name="T16">63, 127, 191, 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7</text:span><text:span text:style-name="T14"/></text:p>
          </table:table-cell>
          <table:table-cell table:style-name="表格14.A3" office:value-type="string">
            <text:p text:style-name="P8" loext:marker-style-name="T14"><text:span text:style-name="T16">5</text:span><text:span text:style-name="T14"/></text:p>
          </table:table-cell>
          <table:table-cell table:style-name="表格14.A3" office:value-type="string">
            <text:p text:style-name="P20" loext:marker-style-name="T14"><text:span text:style-name="T16">32</text:span><text:span text:style-name="T14"/></text:p>
          </table:table-cell>
          <table:table-cell table:style-name="表格14.A3" office:value-type="string">
            <text:p text:style-name="P8" loext:marker-style-name="T44"><text:span text:style-name="T45">30</text:span><text:span text:style-name="T44"/></text:p>
          </table:table-cell>
          <table:table-cell table:style-name="表格14.A3" office:value-type="string">
            <text:p text:style-name="P20" loext:marker-style-name="T14"><text:span text:style-name="T16">+32</text:span><text:span text:style-name="T14"/></text:p>
          </table:table-cell>
          <table:table-cell table:style-name="表格14.A3" office:value-type="string">
            <text:p text:style-name="P20" loext:marker-style-name="T14"><text:span text:style-name="T16">31, 63, 95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8</text:span><text:span text:style-name="T14"/></text:p>
          </table:table-cell>
          <table:table-cell table:style-name="表格14.A2" office:value-type="string">
            <text:p text:style-name="P8" loext:marker-style-name="T14"><text:span text:style-name="T16">4</text:span><text:span text:style-name="T14"/></text:p>
          </table:table-cell>
          <table:table-cell table:style-name="表格14.A2" office:value-type="string">
            <text:p text:style-name="P20" loext:marker-style-name="T14"><text:span text:style-name="T16">16</text:span><text:span text:style-name="T14"/></text:p>
          </table:table-cell>
          <table:table-cell table:style-name="表格14.A2" office:value-type="string">
            <text:p text:style-name="P8" loext:marker-style-name="T44"><text:span text:style-name="T45">1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16</text:span><text:span text:style-name="T14"/></text:p>
          </table:table-cell>
          <table:table-cell table:style-name="表格14.A2" office:value-type="string">
            <text:p text:style-name="P20" loext:marker-style-name="T14"><text:span text:style-name="T16">15, 31, 47 …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9</text:span><text:span text:style-name="T14"/></text:p>
          </table:table-cell>
          <table:table-cell table:style-name="表格14.A3" office:value-type="string">
            <text:p text:style-name="P8" loext:marker-style-name="T14"><text:span text:style-name="T16">3</text:span><text:span text:style-name="T14"/></text:p>
          </table:table-cell>
          <table:table-cell table:style-name="表格14.A3" office:value-type="string">
            <text:p text:style-name="P20" loext:marker-style-name="T14"><text:span text:style-name="T16">8</text:span><text:span text:style-name="T14"/></text:p>
          </table:table-cell>
          <table:table-cell table:style-name="表格14.A3" office:value-type="string">
            <text:p text:style-name="P8" loext:marker-style-name="T44"><text:span text:style-name="T45">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8</text:span><text:span text:style-name="T14"/></text:p>
          </table:table-cell>
          <table:table-cell table:style-name="表格14.A3" office:value-type="string">
            <text:p text:style-name="P20" loext:marker-style-name="T14"><text:span text:style-name="T16">7, 15, 23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30</text:span><text:span text:style-name="T14"/></text:p>
          </table:table-cell>
          <table:table-cell table:style-name="表格14.A2" office:value-type="string">
            <text:p text:style-name="P8" loext:marker-style-name="T14"><text:span text:style-name="T16">2</text:span><text:span text:style-name="T14"/></text:p>
          </table:table-cell>
          <table:table-cell table:style-name="表格14.A2" office:value-type="string">
            <text:p text:style-name="P20" loext:marker-style-name="T14"><text:span text:style-name="T16">4</text:span><text:span text:style-name="T14"/></text:p>
          </table:table-cell>
          <table:table-cell table:style-name="表格14.A2" office:value-type="string">
            <text:p text:style-name="P8" loext:marker-style-name="T44"><text:span text:style-name="T45">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4</text:span><text:span text:style-name="T14"/></text:p>
          </table:table-cell>
          <table:table-cell table:style-name="表格14.A2" office:value-type="string">
            <text:p text:style-name="P20" loext:marker-style-name="T14"><text:span text:style-name="T16">3, 7, 11 …</text:span><text:span text:style-name="T14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46">例外 </text:span><text:span text:style-name="T47">/31</text:span><text:span text:style-name="T46">：</text:span><text:span text:style-name="T20">點對點連線（</text:span><text:span text:style-name="T42">RFC 3021</text:span><text:span text:style-name="T20">），</text:span><text:span text:style-name="T42">2 </text:span><text:span text:style-name="T20">個 </text:span><text:span text:style-name="T42">IP </text:span><text:span text:style-name="T20">全部可用，無網路位址與廣播位址。</text:span><text:span text:style-name="T42">/32 </text:span><text:span text:style-name="T20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② TCP vs UDP</text:span><text:span text:style-name="T38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15.A1" office:value-type="string">
              <text:p text:style-name="P21" loext:marker-style-name="T48"><text:span text:style-name="T50">TCP</text:span><text:span text:style-name="T49">（穩定）</text:span></text:p>
            </table:table-cell>
            <table:table-cell table:style-name="表格15.A1" office:value-type="string">
              <text:p text:style-name="P21" loext:marker-style-name="T48"><text:span text:style-name="T50">UDP</text:span><text:span text:style-name="T49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三次握手才開始</text:span><text:span text:style-name="T51"/></text:p>
          </table:table-cell>
          <table:table-cell table:style-name="表格15.A2" office:value-type="string">
            <text:p text:style-name="P20" loext:marker-style-name="T51"><text:span text:style-name="T52">無連線，直接送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15.A3" office:value-type="string">
            <text:p text:style-name="P20" loext:marker-style-name="T51"><text:span text:style-name="T52">保證送達、會重傳</text:span><text:span text:style-name="T51"/></text:p>
          </table:table-cell>
          <table:table-cell table:style-name="表格15.A3" office:value-type="string">
            <text:p text:style-name="P20" loext:marker-style-name="T51"><text:span text:style-name="T52">不保證、不重傳</text:span><text:span text:style-name="T51"/></text:p>
          </table:table-cell>
        </table:table-row>
        <table:table-row table:style-name="表格15.1">
          <table:table-cell table:style-name="表格15.A2" office:value-type="string">
            <text:p text:style-name="P20" loext:marker-style-name="T51"><text:span text:style-name="T52">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保證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不保證順序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速度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慢（有控制機制）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快（無額外開銷）</text:span><text:span text:style-name="T51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0" loext:marker-style-name="T51"><text:span text:style-name="T52">適用</text:span><text:span text:style-name="T51"/></text:p>
          </table:table-cell>
          <table:table-cell table:style-name="表格15.A2" office:value-type="string">
            <text:p text:style-name="P20" loext:marker-style-name="T51"><text:span text:style-name="T52">網頁、</text:span><text:span text:style-name="T53">Email</text:span><text:span text:style-name="T52">、</text:span><text:span text:style-name="T53">FTP</text:span><text:span text:style-name="T52">、檔案</text:span></text:p>
          </table:table-cell>
          <table:table-cell table:style-name="表格15.A2" office:value-type="string">
            <text:p text:style-name="P20" loext:marker-style-name="T51"><text:span text:style-name="T52">串流、遊戲、</text:span><text:span text:style-name="T53">VoIP</text:span><text:span text:style-name="T52">、</text:span><text:span text:style-name="T53">DNS</text:span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15.A3" office:value-type="string">
            <text:p text:style-name="P20" loext:marker-style-name="T54"><text:span text:style-name="T55">「穩定優先」</text:span><text:span text:style-name="T54"/></text:p>
          </table:table-cell>
          <table:table-cell table:style-name="表格15.A3" office:value-type="string">
            <text:p text:style-name="P20" loext:marker-style-name="T56"><text:span text:style-name="T57">「速度優先」</text:span><text:span text:style-name="T56"/></text:p>
          </table:table-cell>
        </table:table-row>
      </table:table>
      <text:h text:style-name="P19" text:outline-level="3"><text:span text:style-name="T36">▍</text:span><text:span text:style-name="T37"> ③ IPv4 vs IPv6 </text:span><text:span text:style-name="T38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6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16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16.A2" office:value-type="string">
            <text:p text:style-name="P20" loext:marker-style-name="T14"><text:span text:style-name="T16">32 bit</text:span><text:span text:style-name="T15">，約 </text:span><text:span text:style-name="T16">43 </text:span><text:span text:style-name="T15">億個，已不足</text:span></text:p>
          </table:table-cell>
          <table:table-cell table:style-name="表格16.A2" office:value-type="string">
            <text:p text:style-name="P20" loext:marker-style-name="T14"><text:span text:style-name="T16">128 bit</text:span><text:span text:style-name="T15">，約 </text:span><text:span text:style-name="T16">3.4×10³⁸</text:span><text:span text:style-name="T15">，近乎無限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NAT</text:span><text:span text:style-name="T14"/></text:p>
          </table:table-cell>
          <table:table-cell table:style-name="表格16.A3" office:value-type="string">
            <text:p text:style-name="P20" loext:marker-style-name="T14"><text:span text:style-name="T15">需 </text:span><text:span text:style-name="T16">NAT </text:span><text:span text:style-name="T15">共用 </text:span><text:span text:style-name="T16">IP</text:span><text:span text:style-name="T15">，破壞 </text:span><text:span text:style-name="T16">E2E</text:span></text:p>
          </table:table-cell>
          <table:table-cell table:style-name="表格16.A3" office:value-type="string">
            <text:p text:style-name="P20" loext:marker-style-name="T14"><text:span text:style-name="T15">每裝置獨立公開 </text:span><text:span text:style-name="T16">IP</text:span><text:span text:style-name="T15">，恢復 </text:span><text:span text:style-name="T16">E2E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內建加密／驗證</text:span><text:span text:style-name="T14"/></text:p>
          </table:table-cell>
          <table:table-cell table:style-name="表格16.A2" office:value-type="string">
            <text:p text:style-name="P20" loext:marker-style-name="T14"><text:span text:style-name="T15">支援 </text:span><text:span text:style-name="T16">IPsec</text:span><text:span text:style-name="T15">（</text:span><text:span text:style-name="T16">RFC 6434 </text:span><text:span text:style-name="T15">後改建議）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Header</text:span><text:span text:style-name="T14"/></text:p>
          </table:table-cell>
          <table:table-cell table:style-name="表格16.A3" office:value-type="string">
            <text:p text:style-name="P20" loext:marker-style-name="T14"><text:span text:style-name="T15">可變長度含 </text:span><text:span text:style-name="T16">Options</text:span><text:span text:style-name="T15">，效率低</text:span></text:p>
          </table:table-cell>
          <table:table-cell table:style-name="表格16.A3" office:value-type="string">
            <text:p text:style-name="P20" loext:marker-style-name="T14"><text:span text:style-name="T15">固定 </text:span><text:span text:style-name="T16">40 bytes</text:span><text:span text:style-name="T15">，轉送更快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QoS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法標記優先權</text:span><text:span text:style-name="T14"/></text:p>
          </table:table-cell>
          <table:table-cell table:style-name="表格16.A2" office:value-type="string">
            <text:p text:style-name="P20" loext:marker-style-name="T14"><text:span text:style-name="T16">Flow Label </text:span><text:span text:style-name="T15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5">廣播</text:span><text:span text:style-name="T14"/></text:p>
          </table:table-cell>
          <table:table-cell table:style-name="表格16.A3" office:value-type="string">
            <text:p text:style-name="P20" loext:marker-style-name="T14"><text:span text:style-name="T16">Broadcast </text:span><text:span text:style-name="T15">發給所有人</text:span></text:p>
          </table:table-cell>
          <table:table-cell table:style-name="表格16.A3" office:value-type="string">
            <text:p text:style-name="P20" loext:marker-style-name="T14"><text:span text:style-name="T15">改用 </text:span><text:span text:style-name="T16">Multicast</text:span><text:span text:style-name="T15">／</text:span><text:span text:style-name="T16">Anycast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IP </text:span><text:span text:style-name="T15">配置</text:span></text:p>
          </table:table-cell>
          <table:table-cell table:style-name="表格16.A2" office:value-type="string">
            <text:p text:style-name="P20" loext:marker-style-name="T14"><text:span text:style-name="T15">手動或 </text:span><text:span text:style-name="T16">DHCP</text:span><text:span text:style-name="T15">，繁瑣</text:span></text:p>
          </table:table-cell>
          <table:table-cell table:style-name="表格16.A2" office:value-type="string">
            <text:p text:style-name="P20" loext:marker-style-name="T14"><text:span text:style-name="T16">SLAAC </text:span><text:span text:style-name="T15">無狀態自動配置</text:span></text:p>
          </table:table-cell>
        </table:table-row>
      </table:table>
      <text:h text:style-name="P19" text:outline-level="3"><text:span text:style-name="T36">▍</text:span><text:span text:style-name="T37"> ④ TCP </text:span><text:span text:style-name="T38">丟包處理（第五篇 </text:span><text:span text:style-name="T37">· </text:span><text:span text:style-name="T38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1" loext:marker-style-name="T12"><text:span text:style-name="T13">丟包偵測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代表意義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ssthresh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cwnd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下一階段</text:span><text:span text:style-name="T12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0" loext:marker-style-name="T14"><text:span text:style-name="T16">Timeout</text:span><text:span text:style-name="T15">（逾時）</text:span></text:p>
          </table:table-cell>
          <table:table-cell table:style-name="表格17.A2" office:value-type="string">
            <text:p text:style-name="P20" loext:marker-style-name="T14"><text:span text:style-name="T15">網路嚴重擁塞</text:span><text:span text:style-name="T14"/></text:p>
          </table:table-cell>
          <table:table-cell table:style-name="表格17.A2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17.A2" office:value-type="string">
            <text:p text:style-name="P20" loext:marker-style-name="T14"><text:span text:style-name="T15">重回 </text:span><text:span text:style-name="T16">Slow Start</text:span></text:p>
          </table:table-cell>
        </table:table-row>
        <table:table-row table:style-name="表格17.1">
          <table:table-cell table:style-name="表格17.A3" office:value-type="string">
            <text:p text:style-name="P20" loext:marker-style-name="T14"><text:span text:style-name="T16">3 </text:span><text:span text:style-name="T15">個重複 </text:span><text:span text:style-name="T16">ACK</text:span></text:p>
          </table:table-cell>
          <table:table-cell table:style-name="表格17.A3" office:value-type="string">
            <text:p text:style-name="P20" loext:marker-style-name="T14"><text:span text:style-name="T15">單一封包遺失</text:span><text:span text:style-name="T14"/></text:p>
          </table:table-cell>
          <table:table-cell table:style-name="表格17.A3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3" office:value-type="string">
            <text:p text:style-name="P20" loext:marker-style-name="T44"><text:span text:style-name="T45">= ssthresh</text:span><text:span text:style-name="T61">（減半）</text:span></text:p>
          </table:table-cell>
          <table:table-cell table:style-name="表格17.A3" office:value-type="string">
            <text:p text:style-name="P20" loext:marker-style-name="T14"><text:span text:style-name="T15">續 </text:span><text:span text:style-name="T16">Congestion Avoidance</text:span></text:p>
          </table:table-cell>
        </table:table-row>
      </table:table>
      <text:h text:style-name="P19" text:outline-level="3"><text:span text:style-name="T36">▍</text:span><text:span text:style-name="T37"> ⑤ BGP </text:span><text:span text:style-name="T38">選路九步（前面贏就停 </text:span><text:span text:style-name="T37">· </text:span><text:span text:style-name="T38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 loext:marker-style-name="T12"><text:span text:style-name="T13">順序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屬性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規則／備註</text:span><text:span text:style-name="T12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 loext:marker-style-name="T14"><text:span text:style-name="T16">①</text:span><text:span text:style-name="T14"/></text:p>
          </table:table-cell>
          <table:table-cell table:style-name="表格18.A2" office:value-type="string">
            <text:p text:style-name="P20" loext:marker-style-name="T14"><text:span text:style-name="T16">Weight</text:span><text:span text:style-name="T14"/></text:p>
          </table:table-cell>
          <table:table-cell table:style-name="表格18.A2" office:value-type="string">
            <text:p text:style-name="P20" loext:marker-style-name="T14"><text:span text:style-name="T15">數值越高越優先 ⚠️ </text:span><text:span text:style-name="T16">Cisco </text:span><text:span text:style-name="T15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②</text:span><text:span text:style-name="T14"/></text:p>
          </table:table-cell>
          <table:table-cell table:style-name="表格18.A3" office:value-type="string">
            <text:p text:style-name="P20" loext:marker-style-name="T44"><text:span text:style-name="T45">Local Preference</text:span><text:span text:style-name="T44"/></text:p>
          </table:table-cell>
          <table:table-cell table:style-name="表格18.A3" office:value-type="string">
            <text:p text:style-name="P20" loext:marker-style-name="T44"><text:span text:style-name="T61">數值越高越優先 ✅ 最重要的「通用」屬性</text:span><text:span text:style-name="T44"/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③</text:span><text:span text:style-name="T14"/></text:p>
          </table:table-cell>
          <table:table-cell table:style-name="表格18.A2" office:value-type="string">
            <text:p text:style-name="P20" loext:marker-style-name="T14"><text:span text:style-name="T15">本地產生</text:span><text:span text:style-name="T14"/></text:p>
          </table:table-cell>
          <table:table-cell table:style-name="表格18.A2" office:value-type="string">
            <text:p text:style-name="P20" loext:marker-style-name="T14"><text:span text:style-name="T16">network / aggregate </text:span><text:span text:style-name="T15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④</text:span><text:span text:style-name="T14"/></text:p>
          </table:table-cell>
          <table:table-cell table:style-name="表格18.A3" office:value-type="string">
            <text:p text:style-name="P20" loext:marker-style-name="T14"><text:span text:style-name="T16">AS-PATH</text:span><text:span text:style-name="T14"/></text:p>
          </table:table-cell>
          <table:table-cell table:style-name="表格18.A3" office:value-type="string">
            <text:p text:style-name="P20" loext:marker-style-name="T14"><text:span text:style-name="T15">路徑越短（經過 </text:span><text:span text:style-name="T16">AS </text:span><text:span text:style-name="T15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⑤</text:span><text:span text:style-name="T14"/></text:p>
          </table:table-cell>
          <table:table-cell table:style-name="表格18.A2" office:value-type="string">
            <text:p text:style-name="P20" loext:marker-style-name="T14"><text:span text:style-name="T16">Origin</text:span><text:span text:style-name="T14"/></text:p>
          </table:table-cell>
          <table:table-cell table:style-name="表格18.A2" office:value-type="string">
            <text:p text:style-name="P20" loext:marker-style-name="T14"><text:span text:style-name="T16">IGP &gt; EGP &gt; Incomplete</text:span><text:span text:style-name="T14"/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⑥</text:span><text:span text:style-name="T14"/></text:p>
          </table:table-cell>
          <table:table-cell table:style-name="表格18.A3" office:value-type="string">
            <text:p text:style-name="P20" loext:marker-style-name="T14"><text:span text:style-name="T16">MED</text:span><text:span text:style-name="T14"/></text:p>
          </table:table-cell>
          <table:table-cell table:style-name="表格18.A3" office:value-type="string">
            <text:p text:style-name="P20" loext:marker-style-name="T14"><text:span text:style-name="T15">數值越小越優先（只比同一 </text:span><text:span text:style-name="T16">AS </text:span><text:span text:style-name="T15">來的路由）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⑦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vs iBGP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</text:span><text:span text:style-name="T15">優先於 </text:span><text:span text:style-name="T16">iBGP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⑧</text:span><text:span text:style-name="T14"/></text:p>
          </table:table-cell>
          <table:table-cell table:style-name="表格18.A3" office:value-type="string">
            <text:p text:style-name="P20" loext:marker-style-name="T14"><text:span text:style-name="T16">IGP cost</text:span><text:span text:style-name="T14"/></text:p>
          </table:table-cell>
          <table:table-cell table:style-name="表格18.A3" office:value-type="string">
            <text:p text:style-name="P20" loext:marker-style-name="T14"><text:span text:style-name="T15">到 </text:span><text:span text:style-name="T16">next-hop </text:span><text:span text:style-name="T15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⑨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 </text:span><text:span text:style-name="T15">最小者優先（最後決勝點）</text:span></text:p>
          </table:table-cell>
        </table:table-row>
      </table:table>
      <text:h text:style-name="P19" text:outline-level="3"><text:span text:style-name="T36">▍</text:span><text:span text:style-name="T37"> ⑥ OSPF </text:span><text:span text:style-name="T38">四種 </text:span><text:span text:style-name="T37">Router</text:span><text:span text:style-name="T38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本質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核心記憶點</text:span><text:span text:style-name="T12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0" loext:marker-style-name="T14"><text:span text:style-name="T16">Internal</text:span><text:span text:style-name="T14"/></text:p>
          </table:table-cell>
          <table:table-cell table:style-name="表格19.A2" office:value-type="string">
            <text:p text:style-name="P20" loext:marker-style-name="T14"><text:span text:style-name="T15">不出 </text:span><text:span text:style-name="T16">Area</text:span></text:p>
          </table:table-cell>
          <table:table-cell table:style-name="表格19.A2" office:value-type="string">
            <text:p text:style-name="P20" loext:marker-style-name="T14"><text:span text:style-name="T15">只負責自己這一區，對外一無所知</text:span><text:span text:style-name="T14"/></text:p>
          </table:table-cell>
        </table:table-row>
        <table:table-row table:style-name="表格19.1">
          <table:table-cell table:style-name="表格19.A3" office:value-type="string">
            <text:p text:style-name="P20" loext:marker-style-name="T14"><text:span text:style-name="T16">Backbone</text:span><text:span text:style-name="T14"/></text:p>
          </table:table-cell>
          <table:table-cell table:style-name="表格19.A3" office:value-type="string">
            <text:p text:style-name="P20" loext:marker-style-name="T14"><text:span text:style-name="T15">在 </text:span><text:span text:style-name="T16">Area 0</text:span></text:p>
          </table:table-cell>
          <table:table-cell table:style-name="表格19.A3" office:value-type="string">
            <text:p text:style-name="P20" loext:marker-style-name="T14"><text:span text:style-name="T15">城市主幹道節點，跨區流量必經</text:span><text:span text:style-name="T14"/></text:p>
          </table:table-cell>
        </table:table-row>
        <table:table-row table:style-name="表格19.1">
          <table:table-cell table:style-name="表格19.A2" office:value-type="string">
            <text:p text:style-name="P20" loext:marker-style-name="T14"><text:span text:style-name="T16">ABR</text:span><text:span text:style-name="T14"/></text:p>
          </table:table-cell>
          <table:table-cell table:style-name="表格19.A2" office:value-type="string">
            <text:p text:style-name="P20" loext:marker-style-name="T14"><text:span text:style-name="T15">跨 </text:span><text:span text:style-name="T16">Area </text:span><text:span text:style-name="T15">橋樑</text:span></text:p>
          </table:table-cell>
          <table:table-cell table:style-name="表格19.A2" office:value-type="string">
            <text:p text:style-name="P20" loext:marker-style-name="T14"><text:span text:style-name="T15">一端連 </text:span><text:span text:style-name="T16">Area 0</text:span><text:span text:style-name="T15">、一端連其他 </text:span><text:span text:style-name="T16">Area</text:span><text:span text:style-name="T15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0" loext:marker-style-name="T14"><text:span text:style-name="T16">ASBR</text:span><text:span text:style-name="T14"/></text:p>
          </table:table-cell>
          <table:table-cell table:style-name="表格19.A3" office:value-type="string">
            <text:p text:style-name="P20" loext:marker-style-name="T14"><text:span text:style-name="T15">跨 </text:span><text:span text:style-name="T16">AS </text:span><text:span text:style-name="T15">入口</text:span></text:p>
          </table:table-cell>
          <table:table-cell table:style-name="表格19.A3" office:value-type="string">
            <text:p text:style-name="P20" loext:marker-style-name="T14"><text:span text:style-name="T15">把外部路由（</text:span><text:span text:style-name="T16">BGP </text:span><text:span text:style-name="T15">等）帶進 </text:span><text:span text:style-name="T16">OSPF</text:span><text:span text:style-name="T15">，是對外的大門</text:span></text:p>
          </table:table-cell>
        </table:table-row>
      </table:table>
      <text:h text:style-name="P19" text:outline-level="3"><text:span text:style-name="T36">▍</text:span><text:span text:style-name="T37"> ⑦ </text:span><text:span text:style-name="T38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0" loext:marker-style-name="T14"><text:span text:style-name="T16">IP / Port </text:span><text:span text:style-name="T15">過濾</text:span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HTTP </text:span><text:span text:style-name="T15">內容檢查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App </text:span><text:span text:style-name="T15">識別 </text:span><text:span text:style-name="T16">/ IPS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20.A2" office:value-type="string">
            <text:p text:style-name="P8" loext:marker-style-name="T14"><text:span text:style-name="T16">L3 / L4</text:span><text:span text:style-name="T14"/></text:p>
          </table:table-cell>
          <table:table-cell table:style-name="表格20.A2" office:value-type="string">
            <text:p text:style-name="P8" loext:marker-style-name="T44"><text:span text:style-name="T45">L7</text:span><text:span text:style-name="T44"/></text:p>
          </table:table-cell>
          <table:table-cell table:style-name="表格20.A2" office:value-type="string">
            <text:p text:style-name="P8" loext:marker-style-name="T14"><text:span text:style-name="T16">L3–L7</text:span><text:span text:style-name="T14"/></text:p>
          </table:table-cell>
        </table:table-row>
      </table:table>
      <text:h text:style-name="P19" text:outline-level="3"><text:span text:style-name="T36">▍</text:span><text:span text:style-name="T37"> ⑧ </text:span><text:span text:style-name="T38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關鍵差異</text:span><text:span text:style-name="T12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0" loext:marker-style-name="T14"><text:span text:style-name="T16">Firewall</text:span><text:span text:style-name="T14"/></text:p>
          </table:table-cell>
          <table:table-cell table:style-name="表格21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依 </text:span><text:span text:style-name="T16">IP / Port / </text:span><text:span text:style-name="T15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21.A3" office:value-type="string">
            <text:p text:style-name="P20" loext:marker-style-name="T14"><text:span text:style-name="T15">偵測異常 → 只發警報，不阻擋</text:span><text:span text:style-name="T14"/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P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偵測異常 → 自動阻擋（</text:span><text:span text:style-name="T16">IDS </text:span><text:span text:style-name="T15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H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主機型</text:span><text:span text:style-name="T14"/></text:p>
          </table:table-cell>
          <table:table-cell table:style-name="表格21.A3" office:value-type="string">
            <text:p text:style-name="P20" loext:marker-style-name="T14"><text:span text:style-name="T15">看主機 </text:span><text:span text:style-name="T16">Log</text:span><text:span text:style-name="T15">／系統行為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NID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型</text:span><text:span text:style-name="T14"/></text:p>
          </table:table-cell>
          <table:table-cell table:style-name="表格21.A2" office:value-type="string">
            <text:p text:style-name="P20" loext:marker-style-name="T14"><text:span text:style-name="T15">看網路封包／流量</text:span><text:span text:style-name="T14"/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SNMP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設備狀態（應用層／</text:span><text:span text:style-name="T16">UDP</text:span><text:span text:style-name="T15">）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CMP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21.A2" office:value-type="string">
            <text:p text:style-name="P20" loext:marker-style-name="T14"><text:span text:style-name="T15">診斷網路連線（網路層／</text:span><text:span text:style-name="T16">Ping</text:span><text:span text:style-name="T15">）</text:span></text:p>
          </table:table-cell>
        </table:table-row>
      </table:table>
      <text:h text:style-name="P19" text:outline-level="3"><text:span text:style-name="T36">▍</text:span><text:span text:style-name="T37"> ⑨ IOC </text:span><text:span text:style-name="T38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 loext:marker-style-name="T12"><text:span text:style-name="T13">口訣</text:span><text:span text:style-name="T12"/></text:p>
            </table:table-cell>
            <table:table-cell table:style-name="表格22.A1" office:value-type="string">
              <text:p text:style-name="P7" loext:marker-style-name="T12"><text:span text:style-name="T43">IOC </text:span><text:span text:style-name="T13">類型</text:span></text:p>
            </table:table-cell>
            <table:table-cell table:style-name="表格22.A1" office:value-type="string">
              <text:p text:style-name="P7" loext:marker-style-name="T12"><text:span text:style-name="T13">白話</text:span><text:span text:style-name="T12"/></text:p>
            </table:table-cell>
            <table:table-cell table:style-name="表格22.A1" office:value-type="string">
              <text:p text:style-name="P7" loext:marker-style-name="T12"><text:span text:style-name="T13">對應防禦</text:span><text:span text:style-name="T12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8" loext:marker-style-name="T66"><text:span text:style-name="T67">網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Domain</text:span></text:p>
          </table:table-cell>
          <table:table-cell table:style-name="表格22.A2" office:value-type="string">
            <text:p text:style-name="P20" loext:marker-style-name="T14"><text:span text:style-name="T15">釣魚網站網址</text:span><text:span text:style-name="T14"/></text:p>
          </table:table-cell>
          <table:table-cell table:style-name="表格22.A2" office:value-type="string">
            <text:p text:style-name="P20" loext:marker-style-name="T14"><text:span text:style-name="T16">DNS </text:span><text:span text:style-name="T15">封鎖網域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檔</text:span><text:span text:style-name="T66"/></text:p>
          </table:table-cell>
          <table:table-cell table:style-name="表格22.A3" office:value-type="string">
            <text:p text:style-name="P20" loext:marker-style-name="T14"><text:span text:style-name="T15">惡意 </text:span><text:span text:style-name="T16">Hash</text:span></text:p>
          </table:table-cell>
          <table:table-cell table:style-name="表格22.A3" office:value-type="string">
            <text:p text:style-name="P20" loext:marker-style-name="T14"><text:span text:style-name="T15">惡意程式特徵碼（改名也認得）</text:span><text:span text:style-name="T14"/></text:p>
          </table:table-cell>
          <table:table-cell table:style-name="表格22.A3" office:value-type="string">
            <text:p text:style-name="P20" loext:marker-style-name="T14"><text:span text:style-name="T15">防毒比對特徵</text:span><text:span text:style-name="T14"/></text:p>
          </table:table-cell>
        </table:table-row>
        <table:table-row table:style-name="表格22.1">
          <table:table-cell table:style-name="表格22.A2" office:value-type="string">
            <text:p text:style-name="P8" loext:marker-style-name="T66"><text:span text:style-name="T67">連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IP</text:span></text:p>
          </table:table-cell>
          <table:table-cell table:style-name="表格22.A2" office:value-type="string">
            <text:p text:style-name="P20" loext:marker-style-name="T14"><text:span text:style-name="T15">感染後對外異常連線目標</text:span><text:span text:style-name="T14"/></text:p>
          </table:table-cell>
          <table:table-cell table:style-name="表格22.A2" office:value-type="string">
            <text:p text:style-name="P20" loext:marker-style-name="T14"><text:span text:style-name="T16">FW / NGFW </text:span><text:span text:style-name="T15">封鎖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控</text:span><text:span text:style-name="T66"/></text:p>
          </table:table-cell>
          <table:table-cell table:style-name="表格22.A3" office:value-type="string">
            <text:p text:style-name="P20" loext:marker-style-name="T14"><text:span text:style-name="T16">C2 Server</text:span><text:span text:style-name="T14"/></text:p>
          </table:table-cell>
          <table:table-cell table:style-name="表格22.A3" office:value-type="string">
            <text:p text:style-name="P20" loext:marker-style-name="T14"><text:span text:style-name="T15">駭客遠端操控總部</text:span><text:span text:style-name="T14"/></text:p>
          </table:table-cell>
          <table:table-cell table:style-name="表格22.A3" office:value-type="string">
            <text:p text:style-name="P20" loext:marker-style-name="T14"><text:span text:style-name="T16">SIEM / IDS </text:span><text:span text:style-name="T15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46">必記：</text:span><text:span text:style-name="T42">IOC </text:span><text:span text:style-name="T20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⑩ DNS </text:span><text:span text:style-name="T38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1" loext:marker-style-name="T48"><text:span text:style-name="T49">項目</text:span><text:span text:style-name="T48"/></text:p>
            </table:table-cell>
            <table:table-cell table:style-name="表格23.A1" office:value-type="string">
              <text:p text:style-name="P21" loext:marker-style-name="T48"><text:span text:style-name="T50">Recursive </text:span><text:span text:style-name="T49">遞迴</text:span></text:p>
            </table:table-cell>
            <table:table-cell table:style-name="表格23.A1" office:value-type="string">
              <text:p text:style-name="P21" loext:marker-style-name="T48"><text:span text:style-name="T50">Iterative </text:span><text:span text:style-name="T49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0" loext:marker-style-name="T51"><text:span text:style-name="T52">口訣</text:span><text:span text:style-name="T51"/></text:p>
          </table:table-cell>
          <table:table-cell table:style-name="表格23.A2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23.A2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誰去問</text:span><text:span text:style-name="T51"/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代你問完</text:span></text:p>
          </table:table-cell>
          <table:table-cell table:style-name="表格23.A3" office:value-type="string">
            <text:p text:style-name="P20" loext:marker-style-name="T51"><text:span text:style-name="T52">你自己逐層查詢</text:span><text:span text:style-name="T51"/></text:p>
          </table:table-cell>
        </table:table-row>
        <table:table-row table:style-name="表格23.1">
          <table:table-cell table:style-name="表格23.A2" office:value-type="string">
            <text:p text:style-name="P20" loext:marker-style-name="T51"><text:span text:style-name="T52">問幾次</text:span><text:span text:style-name="T51"/></text:p>
          </table:table-cell>
          <table:table-cell table:style-name="表格23.A2" office:value-type="string">
            <text:p text:style-name="P20" loext:marker-style-name="T51"><text:span text:style-name="T52">只問 </text:span><text:span text:style-name="T53">1 </text:span><text:span text:style-name="T52">次</text:span></text:p>
          </table:table-cell>
          <table:table-cell table:style-name="表格23.A2" office:value-type="string">
            <text:p text:style-name="P20" loext:marker-style-name="T51"><text:span text:style-name="T52">每層各問一次，共多次</text:span><text:span text:style-name="T51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常見場合</text:span><text:span text:style-name="T51"/></text:p>
          </table:table-cell>
          <table:table-cell table:style-name="表格23.A3" office:value-type="string">
            <text:p text:style-name="P20" loext:marker-style-name="T51"><text:span text:style-name="T52">一般使用者 → </text:span><text:span text:style-name="T53">Local DNS</text:span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之間互查</text:span></text:p>
          </table:table-cell>
        </table:table-row>
      </table:table>
      <text:h text:style-name="P19" text:outline-level="3"><text:soft-page-break/><text:span text:style-name="T36">▍</text:span><text:span text:style-name="T37"> ⑪ </text:span><text:span text:style-name="T38">企業資安關鍵對：</text:span><text:span text:style-name="T37">RTO/RPO</text:span><text:span text:style-name="T38">、</text:span><text:span text:style-name="T37">EDR/MDR</text:span><text:span text:style-name="T38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1" loext:marker-style-name="T12"><text:span text:style-name="T13">指標 </text:span><text:span text:style-name="T43">/ </text:span><text:span text:style-name="T13">名詞</text:span></text:p>
            </table:table-cell>
            <table:table-cell table:style-name="表格24.A1" office:value-type="string">
              <text:p text:style-name="P21" loext:marker-style-name="T12"><text:span text:style-name="T13">意義</text:span><text:span text:style-name="T12"/></text:p>
            </table:table-cell>
            <table:table-cell table:style-name="表格24.A1" office:value-type="string">
              <text:p text:style-name="P21" loext:marker-style-name="T12"><text:span text:style-name="T13">一句話記憶</text:span><text:span text:style-name="T12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0" loext:marker-style-name="T14"><text:span text:style-name="T16">RTO</text:span><text:span text:style-name="T14"/></text:p>
          </table:table-cell>
          <table:table-cell table:style-name="表格24.A2" office:value-type="string">
            <text:p text:style-name="P20" loext:marker-style-name="T14"><text:span text:style-name="T16">Recovery Time Objective </text:span><text:span text:style-name="T15">復原時間目標</text:span></text:p>
          </table:table-cell>
          <table:table-cell table:style-name="表格24.A2" office:value-type="string">
            <text:p text:style-name="P20" loext:marker-style-name="T68"><text:span text:style-name="T69">停機時間（能停多久）</text:span><text:span text:style-name="T68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RPO</text:span><text:span text:style-name="T14"/></text:p>
          </table:table-cell>
          <table:table-cell table:style-name="表格24.A3" office:value-type="string">
            <text:p text:style-name="P20" loext:marker-style-name="T14"><text:span text:style-name="T16">Recovery Point Objective </text:span><text:span text:style-name="T15">復原點目標</text:span></text:p>
          </table:table-cell>
          <table:table-cell table:style-name="表格24.A3" office:value-type="string">
            <text:p text:style-name="P20" loext:marker-style-name="T68"><text:span text:style-name="T69">資料損失量（能丟幾小時）</text:span><text:span text:style-name="T68"/></text:p>
          </table:table-cell>
        </table:table-row>
        <table:table-row table:style-name="表格24.1">
          <table:table-cell table:style-name="表格24.A2" office:value-type="string">
            <text:p text:style-name="P20" loext:marker-style-name="T14"><text:span text:style-name="T16">EDR</text:span><text:span text:style-name="T14"/></text:p>
          </table:table-cell>
          <table:table-cell table:style-name="表格24.A2" office:value-type="string">
            <text:p text:style-name="P20" loext:marker-style-name="T14"><text:span text:style-name="T16">Endpoint Detection &amp; Response</text:span><text:span text:style-name="T14"/></text:p>
          </table:table-cell>
          <table:table-cell table:style-name="表格24.A2" office:value-type="string">
            <text:p text:style-name="P20" loext:marker-style-name="T14"><text:span text:style-name="T15">自己買工具守（需內部資安人員）</text:span><text:span text:style-name="T14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MDR</text:span><text:span text:style-name="T14"/></text:p>
          </table:table-cell>
          <table:table-cell table:style-name="表格24.A3" office:value-type="string">
            <text:p text:style-name="P20" loext:marker-style-name="T14"><text:span text:style-name="T16">Managed Detection &amp; Response</text:span><text:span text:style-name="T14"/></text:p>
          </table:table-cell>
          <table:table-cell table:style-name="表格24.A3" office:value-type="string">
            <text:p text:style-name="P20" loext:marker-style-name="T14"><text:span text:style-name="T15">請資安公司委外守（</text:span><text:span text:style-name="T16">24</text:span><text:span text:style-name="T15">／</text:span><text:span text:style-name="T16">7</text:span><text:span text:style-name="T15">，適合中小企業）</text:span></text:p>
          </table:table-cell>
        </table:table-row>
      </table:table>
      <text:h text:style-name="P19" text:outline-level="3"><text:span text:style-name="T36">▍</text:span><text:span text:style-name="T37"> ⑫ </text:span><text:span text:style-name="T38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 loext:marker-style-name="T12"><text:span text:style-name="T43">Protocol </text:span><text:span text:style-name="T13">值</text:span></text:p>
            </table:table-cell>
            <table:table-cell table:style-name="表格25.A1" office:value-type="string">
              <text:p text:style-name="P7" loext:marker-style-name="T12"><text:span text:style-name="T43">D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43">M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13">關鍵公式</text:span><text:span text:style-name="T12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0" loext:marker-style-name="T14"><text:span text:style-name="T16">ICMP=1 / TCP=6 / UDP=17</text:span><text:span text:style-name="T14"/></text:p>
          </table:table-cell>
          <table:table-cell table:style-name="表格25.A2" office:value-type="string">
            <text:p text:style-name="P20" loext:marker-style-name="T14"><text:span text:style-name="T16">DF=1</text:span><text:span text:style-name="T15">：禁止切，太大就丟＋</text:span><text:span text:style-name="T16">ICMP</text:span></text:p>
          </table:table-cell>
          <table:table-cell table:style-name="表格25.A2" office:value-type="string">
            <text:p text:style-name="P20" loext:marker-style-name="T14"><text:span text:style-name="T16">MF=1</text:span><text:span text:style-name="T15">：後面還有分段（最後段</text:span><text:span text:style-name="T16">=0</text:span><text:span text:style-name="T15">）</text:span></text:p>
          </table:table-cell>
          <table:table-cell table:style-name="表格25.A2" office:value-type="string">
            <text:p text:style-name="P20" loext:marker-style-name="T44"><text:span text:style-name="T45">Offset=</text:span><text:span text:style-name="T61">起始</text:span><text:span text:style-name="T45">÷8</text:span><text:span text:style-name="T61">；</text:span><text:span text:style-name="T45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7">✅ <text:s/></text:span><text:span text:style-name="T30">提醒</text:span></text:p>
            <text:p text:style-name="P11" loext:marker-style-name="T21"><text:span text:style-name="T20">以上即全書精華。接下來各篇為完整觀念詳解、生活比喻、申論寫法與考試陷阱，務必至少讀過一遍以建立理解，再用本篇反覆速記。</text:span><text:span text:style-name="T21"/></text:p>
          </table:table-cell>
          <table:covered-table-cell/>
          <table:covered-table-cell/>
          <table:covered-table-cell/>
        </table:table-row>
      </table:table>
      <text:h text:style-name="P17" text:outline-level="1" loext:marker-style-name="T32"><text:span text:style-name="T33">第 一 篇　網路基礎架構：</text:span><text:span text:style-name="T32">OSI / TCP-IP · </text:span><text:span text:style-name="T33">協定 </text:span><text:span text:style-name="T32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先建立整個網路的「分層」骨架，再逐層認識常見協定，最後切入網路層三大工作與兩個必考工具（</text:span><text:span text:style-name="T42">ARP</text:span><text:span text:style-name="T20">、</text:span><text:span text:style-name="T42">Traceroute</text:span><text:span text:style-name="T20">）。理解每一層的「責任」，比死背名詞更重要。</text:span></text:p>
          </table:table-cell>
        </table:table-row>
      </table:table>
      <text:h text:style-name="P18" text:outline-level="2" loext:marker-style-name="T34"><text:span text:style-name="T35">一、用「寄信」理解分層（修正版）</text:span><text:span text:style-name="T34"/></text:h>
      <text:p text:style-name="P22" loext:marker-style-name="T21"><text:span text:style-name="T20">每一層就像寄信流程中各自獨立的環節，各司其職、互不干涉：</text:span><text:span text:style-name="T21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1" loext:marker-style-name="T12"><text:span text:style-name="T43">TCP/IP </text:span><text:span text:style-name="T13">層</text:span></text:p>
            </table:table-cell>
            <table:table-cell table:style-name="表格27.A1" office:value-type="string">
              <text:p text:style-name="P21" loext:marker-style-name="T12"><text:span text:style-name="T13">郵寄比喻</text:span><text:span text:style-name="T12"/></text:p>
            </table:table-cell>
            <table:table-cell table:style-name="表格27.A1" office:value-type="string">
              <text:p text:style-name="P21" loext:marker-style-name="T12"><text:span text:style-name="T13">實際負責的事</text:span><text:span text:style-name="T12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0" loext:marker-style-name="T14"><text:span text:style-name="T16">🟢 </text:span><text:span text:style-name="T15">應用層 </text:span><text:span text:style-name="T16">Application</text:span></text:p>
          </table:table-cell>
          <table:table-cell table:style-name="表格27.A2" office:value-type="string">
            <text:p text:style-name="P20" loext:marker-style-name="T14"><text:span text:style-name="T15">決定「</text:span><text:span text:style-name="T70">寄什麼內容</text:span><text:span text:style-name="T15">」（信的內容與格式）</text:span></text:p>
          </table:table-cell>
          <table:table-cell table:style-name="表格27.A2" office:value-type="string">
            <text:p text:style-name="P20" loext:marker-style-name="T14"><text:span text:style-name="T16">HTTP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 …</text:span><text:span text:style-name="T15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🟡 </text:span><text:span text:style-name="T15">傳輸層 </text:span><text:span text:style-name="T16">Transport</text:span></text:p>
          </table:table-cell>
          <table:table-cell table:style-name="表格27.A3" office:value-type="string">
            <text:p text:style-name="P20" loext:marker-style-name="T71"><text:span text:style-name="T72">切分、編頁碼、確認收件</text:span><text:span text:style-name="T71"/></text:p>
          </table:table-cell>
          <table:table-cell table:style-name="表格27.A3" office:value-type="string">
            <text:p text:style-name="P20" loext:marker-style-name="T14"><text:span text:style-name="T16">TCP / UDP</text:span><text:span text:style-name="T15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20" loext:marker-style-name="T14"><text:span text:style-name="T16">🔵 </text:span><text:span text:style-name="T15">網路層 </text:span><text:span text:style-name="T16">Network</text:span></text:p>
          </table:table-cell>
          <table:table-cell table:style-name="表格27.A2" office:value-type="string">
            <text:p text:style-name="P20" loext:marker-style-name="T14"><text:span text:style-name="T73">寫地址＋規劃路線</text:span><text:span text:style-name="T15">（郵遞區號＋郵局選路）</text:span></text:p>
          </table:table-cell>
          <table:table-cell table:style-name="表格27.A2" office:value-type="string">
            <text:p text:style-name="P20" loext:marker-style-name="T74"><text:span text:style-name="T75">IP </text:span><text:span text:style-name="T76">路由、</text:span><text:span text:style-name="T75">ICMP</text:span><text:span text:style-name="T76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🟠 </text:span><text:span text:style-name="T15">連結層 </text:span><text:span text:style-name="T16">Link</text:span></text:p>
          </table:table-cell>
          <table:table-cell table:style-name="表格27.A3" office:value-type="string">
            <text:p text:style-name="P20" loext:marker-style-name="T14"><text:span text:style-name="T15">當前路段的區域配送</text:span><text:span text:style-name="T14"/></text:p>
          </table:table-cell>
          <table:table-cell table:style-name="表格27.A3" office:value-type="string">
            <text:p text:style-name="P20" loext:marker-style-name="T77"><text:span text:style-name="T78">Ethernet</text:span><text:span text:style-name="T79">、</text:span><text:span text:style-name="T78">ARP</text:span><text:span text:style-name="T79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7">⚠️ <text:s/></text:span><text:span text:style-name="T80">舊版三大比喻的錯誤</text:span></text:p>
            <text:p text:style-name="P11"><text:span text:style-name="T81">❌ </text:span><text:span text:style-name="T82">舊：「寫地址 → 應用層」　</text:span><text:span text:style-name="T42">IP </text:span><text:span text:style-name="T20">位址屬於網路層；應用層負責的是「內容與格式」，不是地址。</text:span></text:p>
            <text:p text:style-name="P12"><text:span text:style-name="T81">❌ </text:span><text:span text:style-name="T82">舊：「打包 → 傳輸層」　</text:span><text:span text:style-name="T20">傳輸層還負責切割、編號、重傳、流量控制，遠不只「打包」。</text:span></text:p>
            <text:p text:style-name="P12"><text:span text:style-name="T81">❌ </text:span><text:span text:style-name="T82">舊：「實際搬運 → 連結層」　</text:span><text:span text:style-name="T20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OSI 7 </text:span><text:span text:style-name="T35">層 </text:span><text:span text:style-name="T34">vs TCP/IP 4 </text:span><text:span text:style-name="T35">層（完整對照）</text:span></text:h>
      <text:p text:style-name="P22" loext:marker-style-name="T21"><text:span text:style-name="T83">OSI </text:span><text:span text:style-name="T84">是理論模型（</text:span><text:span text:style-name="T83">7 </text:span><text:span text:style-name="T84">層）</text:span><text:span text:style-name="T20">；</text:span><text:span text:style-name="T85">TCP/IP </text:span><text:span text:style-name="T86">是實際使用的模型（</text:span><text:span text:style-name="T85">4 </text:span><text:span text:style-name="T86">層）</text:span><text:span text:style-name="T20">。</text:span><text:span text:style-name="T42">TCP/IP </text:span><text:span text:style-name="T20">將 </text:span><text:span text:style-name="T42">OSI </text:span><text:span text:style-name="T20">的 </text:span><text:span text:style-name="T42">Session </text:span><text:span text:style-name="T20">層與 </text:span><text:span text:style-name="T42">Presentation </text:span><text:span text:style-name="T20">層併入 </text:span><text:span text:style-name="T42">Application </text:span><text:span text:style-name="T20">層，並把 </text:span><text:span text:style-name="T42">Physical </text:span><text:span text:style-name="T20">併入 </text:span><text:span text:style-name="T42">Link</text:span><text:span text:style-name="T20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 loext:marker-style-name="T12"><text:span text:style-name="T13">層號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OSI </text:span><text:span text:style-name="T13">層名</text:span></text:p>
            </table:table-cell>
            <table:table-cell table:style-name="表格28.A1" office:value-type="string">
              <text:p text:style-name="P7" loext:marker-style-name="T12"><text:span text:style-name="T13">主要功能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TCP/IP </text:span><text:span text:style-name="T13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 loext:marker-style-name="T14"><text:span text:style-name="T16">7</text:span><text:span text:style-name="T14"/></text:p>
          </table:table-cell>
          <table:table-cell table:style-name="表格28.A2" office:value-type="string">
            <text:p text:style-name="P20" loext:marker-style-name="T14"><text:span text:style-name="T16">Application </text:span><text:span text:style-name="T87">應</text:span><text:span text:style-name="T15">用層</text:span></text:p>
          </table:table-cell>
          <table:table-cell table:style-name="表格28.A2" office:value-type="string">
            <text:p text:style-name="P20" loext:marker-style-name="T14"><text:span text:style-name="T15">使用者直接操作：</text:span><text:span text:style-name="T16">HTTP</text:span><text:span text:style-name="T15">、</text:span><text:span text:style-name="T16">DNS</text:span><text:span text:style-name="T15">、</text:span><text:span text:style-name="T16">DHCP</text:span></text:p>
          </table:table-cell>
          <table:table-cell table:style-name="表格28.A2" office:value-type="string">
            <text:p text:style-name="P20" loext:marker-style-name="T14"><text:span text:style-name="T16">Application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6</text:span><text:span text:style-name="T14"/></text:p>
          </table:table-cell>
          <table:table-cell table:style-name="表格28.A3" office:value-type="string">
            <text:p text:style-name="P20" loext:marker-style-name="T14"><text:span text:style-name="T16">Presentation </text:span><text:span text:style-name="T87">表</text:span><text:span text:style-name="T15">示層</text:span></text:p>
          </table:table-cell>
          <table:table-cell table:style-name="表格28.A3" office:value-type="string">
            <text:p text:style-name="P20" loext:marker-style-name="T88"><text:span text:style-name="T89">資料格式轉換、加解密、壓縮</text:span><text:span text:style-name="T88"/></text:p>
          </table:table-cell>
          <table:table-cell table:style-name="表格28.A3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5</text:span><text:span text:style-name="T14"/></text:p>
          </table:table-cell>
          <table:table-cell table:style-name="表格28.A2" office:value-type="string">
            <text:p text:style-name="P20" loext:marker-style-name="T14"><text:span text:style-name="T16">Session </text:span><text:span text:style-name="T87">會</text:span><text:span text:style-name="T15">話層</text:span></text:p>
          </table:table-cell>
          <table:table-cell table:style-name="表格28.A2" office:value-type="string">
            <text:p text:style-name="P20" loext:marker-style-name="T90"><text:span text:style-name="T91">連線的建立、維持與終止</text:span><text:span text:style-name="T90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4</text:span><text:span text:style-name="T14"/></text:p>
          </table:table-cell>
          <table:table-cell table:style-name="表格28.A3" office:value-type="string">
            <text:p text:style-name="P20" loext:marker-style-name="T14"><text:span text:style-name="T16">Transport </text:span><text:span text:style-name="T87">傳</text:span><text:span text:style-name="T15">輸層</text:span></text:p>
          </table:table-cell>
          <table:table-cell table:style-name="表格28.A3" office:value-type="string">
            <text:p text:style-name="P20" loext:marker-style-name="T14"><text:span text:style-name="T15">端對端傳輸控制（</text:span><text:span text:style-name="T16">TCP / UDP</text:span><text:span text:style-name="T15">）</text:span></text:p>
          </table:table-cell>
          <table:table-cell table:style-name="表格28.A3" office:value-type="string">
            <text:p text:style-name="P20" loext:marker-style-name="T14"><text:span text:style-name="T16">Transport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3</text:span><text:span text:style-name="T14"/></text:p>
          </table:table-cell>
          <table:table-cell table:style-name="表格28.A2" office:value-type="string">
            <text:p text:style-name="P20" loext:marker-style-name="T14"><text:span text:style-name="T16">Network </text:span><text:span text:style-name="T87">網</text:span><text:span text:style-name="T15">路層</text:span></text:p>
          </table:table-cell>
          <table:table-cell table:style-name="表格28.A2" office:value-type="string">
            <text:p text:style-name="P20" loext:marker-style-name="T77"><text:span text:style-name="T78">IP </text:span><text:span text:style-name="T79">路由、</text:span><text:span text:style-name="T78">ICMP </text:span><text:span text:style-name="T79">錯誤回報</text:span></text:p>
          </table:table-cell>
          <table:table-cell table:style-name="表格28.A2" office:value-type="string">
            <text:p text:style-name="P20" loext:marker-style-name="T14"><text:span text:style-name="T16">Internet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2</text:span><text:span text:style-name="T14"/></text:p>
          </table:table-cell>
          <table:table-cell table:style-name="表格28.A3" office:value-type="string">
            <text:p text:style-name="P20" loext:marker-style-name="T14"><text:span text:style-name="T16">Data Link </text:span><text:span text:style-name="T92">資</text:span><text:span text:style-name="T15">料鏈結層</text:span></text:p>
          </table:table-cell>
          <table:table-cell table:style-name="表格28.A3" office:value-type="string">
            <text:p text:style-name="P20" loext:marker-style-name="T93"><text:span text:style-name="T94">MAC </text:span><text:span text:style-name="T95">位址、區域網路傳輸（</text:span><text:span text:style-name="T94">ARP</text:span><text:span text:style-name="T95">）</text:span></text:p>
          </table:table-cell>
          <table:table-cell table:style-name="表格28.A3" office:value-type="string">
            <text:p text:style-name="P20" loext:marker-style-name="T14"><text:span text:style-name="T16">Link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1</text:span><text:span text:style-name="T14"/></text:p>
          </table:table-cell>
          <table:table-cell table:style-name="表格28.A2" office:value-type="string">
            <text:p text:style-name="P20" loext:marker-style-name="T14"><text:span text:style-name="T16">Physical </text:span><text:span text:style-name="T87">實</text:span><text:span text:style-name="T15">體層</text:span></text:p>
          </table:table-cell>
          <table:table-cell table:style-name="表格28.A2" office:value-type="string">
            <text:p text:style-name="P20" loext:marker-style-name="T14"><text:span text:style-name="T15">電訊號、光訊號、無線電波</text:span><text:span text:style-name="T14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7">⚡ <text:s/></text:span><text:span text:style-name="T38">速記</text:span></text:p>
            <text:p text:style-name="P11" loext:marker-style-name="T21"><text:span text:style-name="T83">OSI → 7 </text:span><text:span text:style-name="T84">層（理論）</text:span><text:span text:style-name="T20">，</text:span><text:span text:style-name="T85">TCP/IP → 4 </text:span><text:span text:style-name="T86">層（實際）</text:span><text:span text:style-name="T20">；差別在於 </text:span><text:span text:style-name="T42">TCP/IP </text:span><text:span text:style-name="T20">少了獨立的 </text:span><text:span text:style-name="T42">Session </text:span><text:span text:style-name="T20">與 </text:span><text:span text:style-name="T42">Presentation </text:span><text:span text:style-name="T20">兩層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 loext:marker-style-name="T12"><text:span text:style-name="T43">🟢 Application </text:span><text:span text:style-name="T13">應用層</text:span></text:p>
            </table:table-cell>
            <table:table-cell table:style-name="表格29.A1" office:value-type="string">
              <text:p text:style-name="P7" loext:marker-style-name="T12"><text:span text:style-name="T43">🟡 Transport </text:span><text:span text:style-name="T13">傳輸層</text:span></text:p>
            </table:table-cell>
            <table:table-cell table:style-name="表格29.A1" office:value-type="string">
              <text:p text:style-name="P7" loext:marker-style-name="T12"><text:span text:style-name="T43">🔵 Network </text:span><text:span text:style-name="T13">網路層</text:span></text:p>
            </table:table-cell>
            <table:table-cell table:style-name="表格29.A1" office:value-type="string">
              <text:p text:style-name="P7" loext:marker-style-name="T12"><text:span text:style-name="T43">🟠 Link </text:span><text:span text:style-name="T13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0" loext:marker-style-name="T14"><text:span text:style-name="T16">HTTP / HTTPS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</text:span><text:span text:style-name="T15">、</text:span><text:span text:style-name="T16">MQTT</text:span><text:span text:style-name="T15">、</text:span><text:span text:style-name="T96">OSPF*</text:span></text:p>
          </table:table-cell>
          <table:table-cell table:style-name="表格29.A2" office:value-type="string">
            <text:p text:style-name="P20" loext:marker-style-name="T97"><text:span text:style-name="T98">TCP</text:span><text:span text:style-name="T99">（可靠傳輸）、</text:span><text:span text:style-name="T98">UDP</text:span><text:span text:style-name="T99">（高速傳輸）</text:span></text:p>
          </table:table-cell>
          <table:table-cell table:style-name="表格29.A2" office:value-type="string">
            <text:p text:style-name="P20" loext:marker-style-name="T14"><text:span text:style-name="T16">IP</text:span><text:span text:style-name="T15">（路由定址）、</text:span><text:span text:style-name="T100">ICMP</text:span><text:span text:style-name="T101">（錯誤回報 </text:span><text:span text:style-name="T100">/ ping</text:span><text:span text:style-name="T101">）</text:span></text:p>
          </table:table-cell>
          <table:table-cell table:style-name="表格29.A2" office:value-type="string">
            <text:p text:style-name="P20" loext:marker-style-name="T14"><text:span text:style-name="T16">Ethernet</text:span><text:span text:style-name="T15">（有線網路）、</text:span><text:span text:style-name="T102">ARP</text:span><text:span text:style-name="T103">（</text:span><text:span text:style-name="T102">IP → MAC</text:span><text:span text:style-name="T103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47">OSPF </text:span><text:span text:style-name="T46">分層備註：</text:span><text:span text:style-name="T42">OSPF </text:span><text:span text:style-name="T20">在 </text:span><text:span text:style-name="T42">OSI </text:span><text:span text:style-name="T20">模型屬第 </text:span><text:span text:style-name="T42">3 </text:span><text:span text:style-name="T20">層（</text:span><text:span text:style-name="T42">Network</text:span><text:span text:style-name="T20">）；但在 </text:span><text:span text:style-name="T42">TCP/IP </text:span><text:span text:style-name="T20">模型中，因為它直接跑在 </text:span><text:span text:style-name="T42">IP </text:span><text:span text:style-name="T20">上（不透過 </text:span><text:span text:style-name="T42">TCP/UDP</text:span><text:span text:style-name="T20">），通常歸為 </text:span><text:span text:style-name="T42">Application </text:span><text:span text:style-name="T20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常見協定詳解：</text:span><text:span text:style-name="T34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21" loext:marker-style-name="T104"><text:span text:style-name="T105">協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層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做什麼（白話）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生活比喻</text:span><text:span text:style-name="T104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0" loext:marker-style-name="T106"><text:span text:style-name="T107">DHCP</text:span><text:span text:style-name="T108"> Dynamic Host Configuration Protocol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0">連上 </text:span><text:span text:style-name="T111">WiFi </text:span><text:span text:style-name="T110">時不必手動設定 </text:span><text:span text:style-name="T111">IP</text:span><text:span text:style-name="T109">，</text:span><text:span text:style-name="T108">DHCP </text:span><text:span text:style-name="T109">伺服器</text:span><text:span text:style-name="T112">自動分配一個 </text:span><text:span text:style-name="T113">IP </text:span><text:span text:style-name="T112">給你</text:span><text:span text:style-name="T109">。</text:span></text:p>
          </table:table-cell>
          <table:table-cell table:style-name="表格30.A2" office:value-type="string">
            <text:p text:style-name="P20" loext:marker-style-name="T106"><text:span text:style-name="T109">進飯店前台自動安排房號</text:span><text:span text:style-name="T106"/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SSH</text:span><text:span text:style-name="T108"> Secure Shell</text:span></text:p>
          </table:table-cell>
          <table:table-cell table:style-name="表格30.A3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3" office:value-type="string">
            <text:p text:style-name="P20" loext:marker-style-name="T106"><text:span text:style-name="T114">透過加密通道遠端操控</text:span><text:span text:style-name="T109">另一台 </text:span><text:span text:style-name="T108">Linux</text:span><text:span text:style-name="T109">／伺服器的終端機。</text:span></text:p>
          </table:table-cell>
          <table:table-cell table:style-name="表格30.A3" office:value-type="string">
            <text:p text:style-name="P20" loext:marker-style-name="T106"><text:span text:style-name="T109">加密版的遠端遙控器</text:span><text:span text:style-name="T106"/></text:p>
          </table:table-cell>
        </table:table-row>
        <table:table-row table:style-name="表格30.1">
          <table:table-cell table:style-name="表格30.A2" office:value-type="string">
            <text:p text:style-name="P20" loext:marker-style-name="T106"><text:span text:style-name="T107">MQTT</text:span><text:span text:style-name="T108"> Message Queuing Telemetry Transport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5">IoT </text:span><text:span text:style-name="T116">裝置常用的輕量傳訊協定</text:span><text:span text:style-name="T109">，採</text:span><text:span text:style-name="T117">「發布／訂閱」模式</text:span><text:span text:style-name="T109">，非常省流量。</text:span></text:p>
          </table:table-cell>
          <table:table-cell table:style-name="表格30.A2" office:value-type="string">
            <text:p text:style-name="P20" loext:marker-style-name="T106"><text:span text:style-name="T109">溫度感測器發布「</text:span><text:span text:style-name="T108">30°C</text:span><text:span text:style-name="T109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OSPF</text:span><text:span text:style-name="T108"> Open Shortest Path First</text:span></text:p>
          </table:table-cell>
          <table:table-cell table:style-name="表格30.A3" office:value-type="string">
            <text:p text:style-name="P20" loext:marker-style-name="T106"><text:span text:style-name="T109">視模型而定 ⚠️</text:span><text:span text:style-name="T106"/></text:p>
          </table:table-cell>
          <table:table-cell table:style-name="表格30.A3" office:value-type="string">
            <text:p text:style-name="P20" loext:marker-style-name="T106"><text:span text:style-name="T118">路由器之間使用</text:span><text:span text:style-name="T109">，</text:span><text:span text:style-name="T119">自動計算封包走哪條路徑最短、最快</text:span><text:span text:style-name="T109">。</text:span></text:p>
          </table:table-cell>
          <table:table-cell table:style-name="表格30.A3" office:value-type="string">
            <text:p text:style-name="P20" loext:marker-style-name="T106"><text:span text:style-name="T108">Google Maps </text:span><text:span text:style-name="T109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7">💡 <text:s/></text:span><text:span text:style-name="T38">快速判斷層級的技巧</text:span></text:p>
            <text:p text:style-name="P11"><text:span text:style-name="T41">使用者／應用服務</text:span><text:span text:style-name="T20">（</text:span><text:span text:style-name="T42">SSH</text:span><text:span text:style-name="T20">、</text:span><text:span text:style-name="T42">DHCP</text:span><text:span text:style-name="T20">、</text:span><text:span text:style-name="T42">MQTT</text:span><text:span text:style-name="T20">、</text:span><text:span text:style-name="T42">HTTP</text:span><text:span text:style-name="T20">）→ 幾乎都是應用層。</text:span></text:p>
            <text:p text:style-name="P12"><text:span text:style-name="T41">幫路由器決定走哪條路</text:span><text:span text:style-name="T20">（</text:span><text:span text:style-name="T42">OSPF</text:span><text:span text:style-name="T20">、</text:span><text:span text:style-name="T42">RIP</text:span><text:span text:style-name="T20">、</text:span><text:span text:style-name="T42">BGP</text:span><text:span text:style-name="T20">）→ 在 </text:span><text:span text:style-name="T42">OSI </text:span><text:span text:style-name="T20">屬網路層，</text:span><text:span text:style-name="T42">TCP/IP </text:span><text:span text:style-name="T20">多歸應用層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網路層深度解析：</text:span><text:span text:style-name="T34">IP · Routing · ICMP</text:span></text:h>
      <text:p text:style-name="P22" loext:marker-style-name="T21"><text:span text:style-name="T20">網路層（第 </text:span><text:span text:style-name="T42">3 </text:span><text:span text:style-name="T20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 loext:marker-style-name="T12"><text:span text:style-name="T43">📍 IP</text:span><text:span text:style-name="T13">（位址）</text:span></text:p>
            </table:table-cell>
            <table:table-cell table:style-name="表格31.A1" office:value-type="string">
              <text:p text:style-name="P7" loext:marker-style-name="T12"><text:span text:style-name="T43">🗺️ Routing</text:span><text:span text:style-name="T13">（路由）</text:span></text:p>
            </table:table-cell>
            <table:table-cell table:style-name="表格31.A1" office:value-type="string">
              <text:p text:style-name="P7" loext:marker-style-name="T12"><text:span text:style-name="T43">🚨 ICMP</text:span><text:span text:style-name="T13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0" loext:marker-style-name="T14"><text:span text:style-name="T70">決定「目的地在哪」</text:span><text:span text:style-name="T15">。每台設備都有 </text:span><text:span text:style-name="T16">IP</text:span><text:span text:style-name="T15">，就像門牌；</text:span><text:span text:style-name="T16">IP </text:span><text:span text:style-name="T15">負責標記「我要送去哪裡」。</text:span></text:p>
          </table:table-cell>
          <table:table-cell table:style-name="表格31.A2" office:value-type="string">
            <text:p text:style-name="P20" loext:marker-style-name="T14"><text:span text:style-name="T70">決定「怎麼走最快」</text:span><text:span text:style-name="T15">。</text:span><text:span text:style-name="T120">封包經過很多路由器</text:span><text:span text:style-name="T15">，</text:span><text:span text:style-name="T99">每台都問「下一站往哪送？」</text:span><text:span text:style-name="T75">OSPF </text:span><text:span text:style-name="T76">等協定算出最短路徑。</text:span></text:p>
          </table:table-cell>
          <table:table-cell table:style-name="表格31.A2" office:value-type="string">
            <text:p text:style-name="P20" loext:marker-style-name="T14"><text:span text:style-name="T70">回報「出了什麼問題」</text:span><text:span text:style-name="T15">。找不到主機、路不通、</text:span><text:span text:style-name="T16">TTL </text:span><text:span text:style-name="T15">歸零 → </text:span><text:span text:style-name="T79">各自回傳對應 </text:span><text:span text:style-name="T78">ICMP </text:span><text:span text:style-name="T79">訊息</text:span><text:span text:style-name="T15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7">🔍 <text:s/></text:span><text:span text:style-name="T31">ping </text:span><text:span text:style-name="T30">是什麼？為什麼跟 </text:span><text:span text:style-name="T31">ICMP </text:span><text:span text:style-name="T30">有關？</text:span></text:p>
            <text:p text:style-name="P11" loext:marker-style-name="T121"><text:span text:style-name="T122">ping google.com </text:span><text:span text:style-name="T123">的運作</text:span><text:span text:style-name="T124">：</text:span></text:p>
            <text:p text:style-name="P12" loext:marker-style-name="T21"><text:span text:style-name="T42">① </text:span><text:span text:style-name="T20">你的電腦發出 </text:span><text:span text:style-name="T83">ICMP Echo Request</text:span><text:span text:style-name="T20">（「你在嗎？」）</text:span></text:p>
            <text:p text:style-name="P12" loext:marker-style-name="T21"><text:span text:style-name="T42">② </text:span><text:span text:style-name="T20">目標主機回傳 </text:span><text:span text:style-name="T83">ICMP Echo Reply</text:span><text:span text:style-name="T20">（「我在！」）</text:span></text:p>
            <text:p text:style-name="P12" loext:marker-style-name="T21"><text:span text:style-name="T42">③ </text:span><text:span text:style-name="T125">顯示來回時間（</text:span><text:span text:style-name="T126">ms</text:span><text:span text:style-name="T125">），數字越小代表網路越暢通</text:span></text:p>
            <text:p text:style-name="P12"><text:span text:style-name="T47">⚠️ </text:span><text:span text:style-name="T46">重點：</text:span><text:span text:style-name="T127">ping </text:span><text:span text:style-name="T128">完全使用 </text:span><text:span text:style-name="T127">ICMP</text:span><text:span text:style-name="T128">，不走 </text:span><text:span text:style-name="T127">TCP </text:span><text:span text:style-name="T128">也不走 </text:span><text:span text:style-name="T127">UDP</text:span><text:span text:style-name="T20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7">⚡ <text:s/></text:span><text:span text:style-name="T38">三個概念一次記清楚</text:span></text:p>
            <text:p text:style-name="P11"><text:span text:style-name="T40">📍 IP → </text:span><text:span text:style-name="T20">定位（目的地是誰）　</text:span><text:span text:style-name="T41">🗺️ </text:span><text:span text:style-name="T40">Routing → </text:span><text:span text:style-name="T129">選路（怎麼走最快）</text:span><text:span text:style-name="T20">　</text:span><text:span text:style-name="T41">🚨 </text:span><text:span text:style-name="T130">ICMP → </text:span><text:span text:style-name="T128">回報（出錯了通知你）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六、</text:span><text:span text:style-name="T34">TCP vs UDP </text:span><text:span text:style-name="T35">差異比較</text:span></text:h>
      <text:p text:style-name="P22" loext:marker-style-name="T21"><text:span text:style-name="T20">傳輸層最核心的兩個協定，差異在於「是否保證送達」（更深入的擁塞控制見第五篇）。</text:span><text:span text:style-name="T21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TCP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UDP</text:span><text:span text:style-name="T48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32.A2" office:value-type="string">
            <text:p text:style-name="P20" loext:marker-style-name="T51"><text:span text:style-name="T52">需要握手（三向交握）</text:span><text:span text:style-name="T51"/></text:p>
          </table:table-cell>
          <table:table-cell table:style-name="表格32.A2" office:value-type="string">
            <text:p text:style-name="P20" loext:marker-style-name="T51"><text:span text:style-name="T52">無連線，直接送出</text:span><text:span text:style-name="T51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32.A3" office:value-type="string">
            <text:p text:style-name="P20" loext:marker-style-name="T131"><text:span text:style-name="T132">保證送達，遺失會重傳</text:span><text:span text:style-name="T131"/></text:p>
          </table:table-cell>
          <table:table-cell table:style-name="表格32.A3" office:value-type="string">
            <text:p text:style-name="P20" loext:marker-style-name="T133"><text:span text:style-name="T134">不保證，遺失不補</text:span><text:span text:style-name="T133"/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速度</text:span><text:span text:style-name="T51"/></text:p>
          </table:table-cell>
          <table:table-cell table:style-name="表格32.A2" office:value-type="string">
            <text:p text:style-name="P20" loext:marker-style-name="T135"><text:span text:style-name="T136">較慢（有確認機制）</text:span><text:span text:style-name="T135"/></text:p>
          </table:table-cell>
          <table:table-cell table:style-name="表格32.A2" office:value-type="string">
            <text:p text:style-name="P20" loext:marker-style-name="T135"><text:span text:style-name="T136">較快（無確認機制）</text:span><text:span text:style-name="T135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使用情境</text:span><text:span text:style-name="T51"/></text:p>
          </table:table-cell>
          <table:table-cell table:style-name="表格32.A3" office:value-type="string">
            <text:p text:style-name="P20" loext:marker-style-name="T51"><text:span text:style-name="T53">HTTP</text:span><text:span text:style-name="T52">、</text:span><text:span text:style-name="T53">Email</text:span><text:span text:style-name="T52">、</text:span><text:span text:style-name="T53">FTP</text:span></text:p>
          </table:table-cell>
          <table:table-cell table:style-name="表格32.A3" office:value-type="string">
            <text:p text:style-name="P20" loext:marker-style-name="T51"><text:span text:style-name="T52">串流影音、</text:span><text:span text:style-name="T53">VoIP</text:span><text:span text:style-name="T52">、</text:span><text:span text:style-name="T53">DNS</text:span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32.A2" office:value-type="string">
            <text:p text:style-name="P20" loext:marker-style-name="T137"><text:span text:style-name="T138">「穩定優先」</text:span><text:span text:style-name="T137"/></text:p>
          </table:table-cell>
          <table:table-cell table:style-name="表格32.A2" office:value-type="string">
            <text:p text:style-name="P20" loext:marker-style-name="T139"><text:span text:style-name="T140">「速度優先」</text:span><text:span text:style-name="T139"/></text:p>
          </table:table-cell>
        </table:table-row>
      </table:table>
      <text:h text:style-name="P18" text:outline-level="2" loext:marker-style-name="T34"><text:span text:style-name="T35">七、</text:span><text:span text:style-name="T34">ARP — </text:span><text:span text:style-name="T35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7">🔗 <text:s/></text:span><text:span text:style-name="T31">ARP </text:span><text:span text:style-name="T30">重點</text:span></text:p>
            <text:p text:style-name="P11"><text:span text:style-name="T141">ARP </text:span><text:span text:style-name="T124">做什麼？　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20">。</text:span></text:p>
            <text:p text:style-name="P12"><text:span text:style-name="T124">為何屬於 </text:span><text:span text:style-name="T141">Link </text:span><text:span text:style-name="T124">層？　</text:span><text:span text:style-name="T127">ARP </text:span><text:span text:style-name="T128">的作用範圍僅限於同一區域網路內，</text:span><text:span text:style-name="T145">無法跨越路由器</text:span><text:span text:style-name="T20">，因此歸屬 </text:span><text:span text:style-name="T42">Link</text:span><text:span text:style-name="T20">（連結）層。</text:span></text:p>
            <text:p text:style-name="P12" loext:marker-style-name="T121"><text:span text:style-name="T124">運作流程：</text:span><text:span text:style-name="T121"/></text:p>
            <text:p text:style-name="P12" loext:marker-style-name="T21"><text:span text:style-name="T42">① </text:span><text:span text:style-name="T146">裝置 </text:span><text:span text:style-name="T147">A </text:span><text:span text:style-name="T146">廣播詢問：</text:span><text:span text:style-name="T20">「</text:span><text:span text:style-name="T84">誰的 </text:span><text:span text:style-name="T83">IP</text:span><text:span text:style-name="T42"> </text:span><text:span text:style-name="T20">是 </text:span><text:span text:style-name="T42">192.168.1.5</text:span><text:span text:style-name="T20">？」</text:span></text:p>
            <text:p text:style-name="P12" loext:marker-style-name="T21"><text:span text:style-name="T42">② </text:span><text:span text:style-name="T148">裝置 </text:span><text:span text:style-name="T149">B </text:span><text:span text:style-name="T148">回應：</text:span><text:span text:style-name="T20">「</text:span><text:span text:style-name="T86">是我！</text:span><text:span text:style-name="T85">MAC </text:span><text:span text:style-name="T86">是</text:span><text:span text:style-name="T20"> </text:span><text:span text:style-name="T42">AA:BB:CC:DD:EE:FF</text:span><text:span text:style-name="T20">」</text:span></text:p>
            <text:p text:style-name="P12" loext:marker-style-name="T21"><text:span text:style-name="T42">③ </text:span><text:span text:style-name="T20">裝置 </text:span><text:span text:style-name="T42">A </text:span><text:span text:style-name="T20">記錄此對應至 </text:span><text:span text:style-name="T42">ARP </text:span><text:span text:style-name="T20">快取，下次直接使用</text:span></text:p>
          </table:table-cell>
        </table:table-row>
      </table:table>
      <text:p text:style-name="P22" loext:marker-style-name="T150"><text:span text:style-name="T151">（</text:span><text:span text:style-name="T152">ARP </text:span><text:span text:style-name="T151">完整流程、</text:span><text:span text:style-name="T152">ARP Spoofing </text:span><text:span text:style-name="T151">與完整上網流程，詳見第四篇。）</text:span></text:p>
      <text:h text:style-name="P18" text:outline-level="2" loext:marker-style-name="T34"><text:span text:style-name="T35">八、</text:span><text:span text:style-name="T34">Traceroute </text:span><text:span text:style-name="T35">原理詳解（</text:span><text:span text:style-name="T34">TTL </text:span><text:span text:style-name="T35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19">目的：</text:span><text:span text:style-name="T153">找出封包從來源到目的地</text:span><text:span text:style-name="T154">，</text:span><text:span text:style-name="T155">中間經過哪些路由器</text:span><text:span text:style-name="T20">（完整路徑偵測）。</text:span></text:p>
            <text:p text:style-name="P12"><text:span text:style-name="T156">TTL</text:span><text:span text:style-name="T157">（</text:span><text:span text:style-name="T156">Time To Live</text:span><text:span text:style-name="T157">）</text:span><text:span text:style-name="T19">：</text:span><text:span text:style-name="T125">封包的「存活計數器」。每經過一個路由器就減 </text:span><text:span text:style-name="T126">1</text:span><text:span text:style-name="T20">；</text:span><text:span text:style-name="T158">歸零時路由器丟棄封包</text:span><text:span text:style-name="T20">，並</text:span><text:span text:style-name="T159">回傳 </text:span><text:span text:style-name="T160">ICMP Time Exceeded </text:span><text:span text:style-name="T159">給發送方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21" loext:marker-style-name="T104"><text:span text:style-name="T105">封包次數</text:span><text:span text:style-name="T104"/></text:p>
          </table:table-cell>
          <table:table-cell table:style-name="表格34.A2" office:value-type="string">
            <text:p text:style-name="P21" loext:marker-style-name="T104"><text:span text:style-name="T161">TTL </text:span><text:span text:style-name="T105">值</text:span></text:p>
          </table:table-cell>
          <table:table-cell table:style-name="表格34.A2" office:value-type="string">
            <text:p text:style-name="P21" loext:marker-style-name="T104"><text:span text:style-name="T105">發生什麼事</text:span><text:span text:style-name="T104"/></text:p>
          </table:table-cell>
          <table:table-cell table:style-name="表格34.A2" office:value-type="string">
            <text:p text:style-name="P21" loext:marker-style-name="T104"><text:span text:style-name="T105">取得資訊</text:span><text:span text:style-name="T104"/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1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1</text:span><text:span text:style-name="T106"/></text:p>
          </table:table-cell>
          <table:table-cell table:style-name="表格34.A3" office:value-type="string">
            <text:p text:style-name="P20" loext:marker-style-name="T106"><text:span text:style-name="T162">抵達第 </text:span><text:span text:style-name="T163">1 </text:span><text:span text:style-name="T162">個 </text:span><text:span text:style-name="T163">Router </text:span><text:span text:style-name="T108">→ TTL </text:span><text:span text:style-name="T109">歸零 → 回傳 </text:span><text:span text:style-name="T108">ICMP Time Exceeded</text:span></text:p>
          </table:table-cell>
          <table:table-cell table:style-name="表格34.A3" office:value-type="string">
            <text:p text:style-name="P20" loext:marker-style-name="T164"><text:span text:style-name="T110">得知第 </text:span><text:span text:style-name="T111">1 </text:span><text:span text:style-name="T110">站位置</text:span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第 </text:span><text:span text:style-name="T108">2 </text:span><text:span text:style-name="T109">次</text:span></text:p>
          </table:table-cell>
          <table:table-cell table:style-name="表格34.A4" office:value-type="string">
            <text:p text:style-name="P20" loext:marker-style-name="T106"><text:span text:style-name="T108">TTL = 2</text:span><text:span text:style-name="T106"/></text:p>
          </table:table-cell>
          <table:table-cell table:style-name="表格34.A4" office:value-type="string">
            <text:p text:style-name="P20" loext:marker-style-name="T106"><text:span text:style-name="T162">通過第 </text:span><text:span text:style-name="T163">1 </text:span><text:span text:style-name="T162">站 → 抵達第 </text:span><text:span text:style-name="T163">2 </text:span><text:span text:style-name="T162">個 </text:span><text:span text:style-name="T163">Router</text:span><text:span text:style-name="T108"> → TTL </text:span><text:span text:style-name="T109">歸零 → 回傳 </text:span><text:span text:style-name="T108">ICMP</text:span></text:p>
          </table:table-cell>
          <table:table-cell table:style-name="表格34.A4" office:value-type="string">
            <text:p text:style-name="P20" loext:marker-style-name="T164"><text:span text:style-name="T110">得知第 </text:span><text:span text:style-name="T111">2 </text:span><text:span text:style-name="T110">站位置</text:span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N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N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以此類推，每次多走一站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逐步還原完整路徑</text:span><text:span text:style-name="T106"/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最後</text:span><text:span text:style-name="T106"/></text:p>
          </table:table-cell>
          <table:table-cell table:style-name="表格34.A4" office:value-type="string">
            <text:p text:style-name="P20" loext:marker-style-name="T106"><text:span text:style-name="T108">TTL = </text:span><text:span text:style-name="T109">距離</text:span></text:p>
          </table:table-cell>
          <table:table-cell table:style-name="表格34.A4" office:value-type="string">
            <text:p text:style-name="P20" loext:marker-style-name="T106"><text:span text:style-name="T109">封包抵達目的地，回傳正常應答</text:span><text:span text:style-name="T106"/></text:p>
          </table:table-cell>
          <table:table-cell table:style-name="表格34.A4" office:value-type="string">
            <text:p text:style-name="P20" loext:marker-style-name="T106"><text:span text:style-name="T109">路徑偵測完成 ✓</text:span><text:span text:style-name="T106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7">⚡ <text:s/></text:span><text:span text:style-name="T38">一句話記憶</text:span></text:p>
            <text:p text:style-name="P11" loext:marker-style-name="T21"><text:span text:style-name="T127">Traceroute = TTL </text:span><text:span text:style-name="T128">遞增 ＋ </text:span><text:span text:style-name="T127">ICMP </text:span><text:span text:style-name="T128">回報</text:span><text:span text:style-name="T20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九、本篇考試必背心法</text:span><text:span text:style-name="T34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7">🔥 <text:s/></text:span><text:span text:style-name="T165">TCP/IP </text:span><text:span text:style-name="T166">四層心法（背這個就夠）</text:span></text:p>
            <text:p text:style-name="P11"><text:span text:style-name="T167">🟢 Application</text:span><text:span text:style-name="T168">（應用層） → </text:span><text:span text:style-name="T20">給人用（</text:span><text:span text:style-name="T42">HTTP</text:span><text:span text:style-name="T20">、</text:span><text:span text:style-name="T42">DNS</text:span><text:span text:style-name="T20">、</text:span><text:span text:style-name="T42">DHCP</text:span><text:span text:style-name="T20">、</text:span><text:span text:style-name="T42">SSH</text:span><text:span text:style-name="T20">、</text:span><text:span text:style-name="T42">MQTT</text:span><text:span text:style-name="T20">）</text:span></text:p>
            <text:p text:style-name="P12"><text:soft-page-break/><text:span text:style-name="T167">🟡 Transport</text:span><text:span text:style-name="T168">（傳輸層） → </text:span><text:span text:style-name="T20">怎麼送（</text:span><text:span text:style-name="T42">TCP</text:span><text:span text:style-name="T20">＝穩定 </text:span><text:span text:style-name="T42">/ UDP</text:span><text:span text:style-name="T20">＝快速）</text:span><text:span text:style-name="T42">(</text:span><text:span text:style-name="T72">切分、編頁碼、確認收件</text:span><text:span text:style-name="T42">)</text:span></text:p>
            <text:p text:style-name="P12"><text:span text:style-name="T167">🔵 Network</text:span><text:span text:style-name="T168">（網路層） → </text:span><text:span text:style-name="T20">走哪條路（</text:span><text:span text:style-name="T42">IP</text:span><text:span text:style-name="T20">、</text:span><text:span text:style-name="T42">ICMP</text:span><text:span text:style-name="T20">）</text:span></text:p>
            <text:p text:style-name="P12"><text:span text:style-name="T167">🟠 Link</text:span><text:span text:style-name="T168">（連結層） → </text:span><text:span text:style-name="T20">同一區網怎麼接（</text:span><text:span text:style-name="T42">Ethernet</text:span><text:span text:style-name="T20">、</text:span><text:span text:style-name="T42">ARP</text:span><text:span text:style-name="T20">）</text:span><text:span text:style-name="T42">(</text:span><text:span text:style-name="T122">ARP</text:span><text:span text:style-name="T141"> </text:span><text:span text:style-name="T124">：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42">)</text:span></text:p>
          </table:table-cell>
        </table:table-row>
      </table:table>
      <text:h text:style-name="P17" text:outline-level="1" loext:marker-style-name="T32"><text:span text:style-name="T33">第 二 篇　</text:span><text:span text:style-name="T32">IP </text:span><text:span text:style-name="T33">位址與封包處理：分類 </text:span><text:span text:style-name="T32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7">📐 <text:s/></text:span><text:span text:style-name="T30">本篇重點</text:span></text:p>
            <text:p text:style-name="P11" loext:marker-style-name="T21"><text:span text:style-name="T20">本篇分兩大主軸：前半談「</text:span><text:span text:style-name="T85">IP </text:span><text:span text:style-name="T86">位址如何劃分</text:span><text:span text:style-name="T20">」（分類、</text:span><text:span text:style-name="T42">CIDR</text:span><text:span text:style-name="T20">、子網計算、</text:span><text:span text:style-name="T42">VLSM</text:span><text:span text:style-name="T20">、</text:span><text:span text:style-name="T42">CIDR </text:span><text:span text:style-name="T20">合併）；後半談「</text:span><text:span text:style-name="T86">封包如何被切割傳送</text:span><text:span text:style-name="T20">」（</text:span><text:span text:style-name="T42">MTU</text:span><text:span text:style-name="T20">、</text:span><text:span text:style-name="T42">Fragmentation</text:span><text:span text:style-name="T20">、</text:span><text:span text:style-name="T42">IP Header</text:span><text:span text:style-name="T20">、</text:span><text:span text:style-name="T42">DF/MF</text:span><text:span text:style-name="T20">、</text:span><text:span text:style-name="T42">PMTUD</text:span><text:span text:style-name="T20">、</text:span><text:span text:style-name="T42">MSS</text:span><text:span text:style-name="T20">、</text:span><text:span text:style-name="T42">Frag DoS</text:span><text:span text:style-name="T20">）。子網計算是計算題必考，務必動手練。</text:span></text:p>
          </table:table-cell>
        </table:table-row>
      </table:table>
      <text:h text:style-name="P18" text:outline-level="2" loext:marker-style-name="T34"><text:span text:style-name="T35">壹、</text:span><text:span text:style-name="T34">IP </text:span><text:span text:style-name="T35">位址基礎</text:span></text:h>
      <text:p text:style-name="P22" loext:marker-style-name="T21"><text:span text:style-name="T83">IP </text:span><text:span text:style-name="T84">位址（</text:span><text:span text:style-name="T83">IPv4</text:span><text:span text:style-name="T84">）是</text:span><text:span text:style-name="T169">一組 </text:span><text:span text:style-name="T170">32 </text:span><text:span text:style-name="T169">個 </text:span><text:span text:style-name="T170">bit</text:span><text:span text:style-name="T20">，用來</text:span><text:span text:style-name="T171">識別網路上每一台設備的「地址」</text:span><text:span text:style-name="T20">。</text:span><text:span text:style-name="T84">為了人類方便閱讀</text:span><text:span text:style-name="T20">，</text:span><text:span text:style-name="T86">這 </text:span><text:span text:style-name="T85">32 </text:span><text:span text:style-name="T86">個 </text:span><text:span text:style-name="T85">bit </text:span><text:span text:style-name="T86">被分成 </text:span><text:span text:style-name="T85">4 </text:span><text:span text:style-name="T86">組</text:span><text:span text:style-name="T20">、</text:span><text:span text:style-name="T128">每組 </text:span><text:span text:style-name="T127">8 </text:span><text:span text:style-name="T128">個 </text:span><text:span text:style-name="T127">bit</text:span><text:span text:style-name="T128">（一個 </text:span><text:span text:style-name="T127">Octet</text:span><text:span text:style-name="T128">），再轉成十進位</text:span><text:span text:style-name="T20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7" loext:marker-style-name="T48"><text:span text:style-name="T50">Octet 1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2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3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4</text:span><text:span text:style-name="T48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0" loext:marker-style-name="T51"><text:span text:style-name="T53">192</text:span><text:span text:style-name="T51"/></text:p>
          </table:table-cell>
          <table:table-cell table:style-name="表格37.A2" office:value-type="string">
            <text:p text:style-name="P20" loext:marker-style-name="T51"><text:span text:style-name="T53">168</text:span><text:span text:style-name="T51"/></text:p>
          </table:table-cell>
          <table:table-cell table:style-name="表格37.A2" office:value-type="string">
            <text:p text:style-name="P20" loext:marker-style-name="T51"><text:span text:style-name="T53">1</text:span><text:span text:style-name="T51"/></text:p>
          </table:table-cell>
          <table:table-cell table:style-name="表格37.A2" office:value-type="string">
            <text:p text:style-name="P20" loext:marker-style-name="T51"><text:span text:style-name="T53">0</text:span><text:span text:style-name="T51"/></text:p>
          </table:table-cell>
        </table:table-row>
      </table:table>
      <text:p text:style-name="P22" loext:marker-style-name="T172"><text:span text:style-name="T173">→ </text:span><text:span text:style-name="T169">總共 </text:span><text:span text:style-name="T170">4 × 8 = 32 </text:span><text:span text:style-name="T169">個 </text:span><text:span text:style-name="T170">bit</text:span><text:span text:style-name="T174">，</text:span><text:span text:style-name="T175">每組數字範圍 </text:span><text:span text:style-name="T176">0</text:span><text:span text:style-name="T175">～</text:span><text:span text:style-name="T176">255</text:span><text:span text:style-name="T174">（因為 </text:span><text:span text:style-name="T176">2⁸ = 256 </text:span><text:span text:style-name="T175">種組合</text:span><text:span text:style-name="T174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7">💡 <text:s/></text:span><text:span text:style-name="T80">為什麼 </text:span><text:span text:style-name="T177">IP </text:span><text:span text:style-name="T80">數量一定是 </text:span><text:span text:style-name="T177">2 </text:span><text:span text:style-name="T80">的次方？</text:span></text:p>
            <text:p text:style-name="P11" loext:marker-style-name="T21"><text:span text:style-name="T86">每一個 </text:span><text:span text:style-name="T85">bit </text:span><text:span text:style-name="T86">只有 </text:span><text:span text:style-name="T85">0 </text:span><text:span text:style-name="T86">或 </text:span><text:span text:style-name="T85">1 </text:span><text:span text:style-name="T86">兩種狀態</text:span><text:span text:style-name="T20">。若有 </text:span><text:span text:style-name="T42">n </text:span><text:span text:style-name="T20">個 </text:span><text:span text:style-name="T42">bit </text:span><text:span text:style-name="T20">可自由變化，可能的組合數 ＝ </text:span><text:span text:style-name="T42">2ⁿ</text:span><text:span text:style-name="T20">。</text:span></text:p>
            <text:p text:style-name="P12" loext:marker-style-name="T21"><text:span text:style-name="T20">因此</text:span><text:span text:style-name="T154">子網路的 </text:span><text:span text:style-name="T178">IP </text:span><text:span text:style-name="T154">總數一定是 </text:span><text:span text:style-name="T178">2</text:span><text:span text:style-name="T154">、</text:span><text:span text:style-name="T178">4</text:span><text:span text:style-name="T154">、</text:span><text:span text:style-name="T178">8</text:span><text:span text:style-name="T154">、</text:span><text:span text:style-name="T178">16</text:span><text:span text:style-name="T154">、</text:span><text:span text:style-name="T178">32</text:span><text:span text:style-name="T154">、</text:span><text:span text:style-name="T178">64</text:span><text:span text:style-name="T154">、</text:span><text:span text:style-name="T178">128</text:span><text:span text:style-name="T154">、</text:span><text:span text:style-name="T178">256… </text:span><text:span text:style-name="T154">等 </text:span><text:span text:style-name="T178">2 </text:span><text:span text:style-name="T154">的次方</text:span><text:span text:style-name="T20">，不可能是 </text:span><text:span text:style-name="T42">100 </text:span><text:span text:style-name="T20">或 </text:span><text:span text:style-name="T42">50</text:span><text:span text:style-name="T20">。這就是</text:span><text:span text:style-name="T179">計算子網時必須「找最接近的 </text:span><text:span text:style-name="T180">2ⁿ</text:span><text:span text:style-name="T179">」</text:span><text:span text:style-name="T20">的根本原因。</text:span></text:p>
          </table:table-cell>
        </table:table-row>
      </table:table>
      <text:h text:style-name="P18" text:outline-level="2" loext:marker-style-name="T34"><text:span text:style-name="T35">貳、</text:span><text:span text:style-name="T34">IP </text:span><text:span text:style-name="T35">分類（</text:span><text:span text:style-name="T34">A / B / C </text:span><text:span text:style-name="T35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1" loext:marker-style-name="T12"><text:span text:style-name="T13">類別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第一組數字範圍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預設遮罩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每網路主機數</text:span><text:span text:style-name="T12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0" loext:marker-style-name="T14"><text:span text:style-name="T16">A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 </text:span><text:span text:style-name="T79">～ </text:span><text:span text:style-name="T78">126</text:span></text:p>
          </table:table-cell>
          <table:table-cell table:style-name="表格39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39.A2" office:value-type="string">
            <text:p text:style-name="P20" loext:marker-style-name="T14"><text:span text:style-name="T15">超大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5">約 </text:span><text:span text:style-name="T16">1,677 </text:span><text:span text:style-name="T15">萬</text:span></text:p>
          </table:table-cell>
        </table:table-row>
        <table:table-row table:style-name="表格39.1">
          <table:table-cell table:style-name="表格39.A3" office:value-type="string">
            <text:p text:style-name="P20" loext:marker-style-name="T14"><text:span text:style-name="T16">B </text:span><text:span text:style-name="T15">類</text:span></text:p>
          </table:table-cell>
          <table:table-cell table:style-name="表格39.A3" office:value-type="string">
            <text:p text:style-name="P20" loext:marker-style-name="T77"><text:span text:style-name="T78">128 </text:span><text:span text:style-name="T79">～ </text:span><text:span text:style-name="T78">191</text:span></text:p>
          </table:table-cell>
          <table:table-cell table:style-name="表格39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39.A3" office:value-type="string">
            <text:p text:style-name="P20" loext:marker-style-name="T14"><text:span text:style-name="T15">中型網路</text:span><text:span text:style-name="T14"/></text:p>
          </table:table-cell>
          <table:table-cell table:style-name="表格39.A3" office:value-type="string">
            <text:p text:style-name="P20" loext:marker-style-name="T14"><text:span text:style-name="T15">約 </text:span><text:span text:style-name="T16">6.5 </text:span><text:span text:style-name="T15">萬</text:span></text:p>
          </table:table-cell>
        </table:table-row>
        <table:table-row table:style-name="表格39.1">
          <table:table-cell table:style-name="表格39.A2" office:value-type="string">
            <text:p text:style-name="P20" loext:marker-style-name="T14"><text:span text:style-name="T16">C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92 </text:span><text:span text:style-name="T79">～ </text:span><text:span text:style-name="T78">223</text:span></text:p>
          </table:table-cell>
          <table:table-cell table:style-name="表格39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39.A2" office:value-type="string">
            <text:p text:style-name="P20" loext:marker-style-name="T14"><text:span text:style-name="T15">小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6">254</text:span><text:span text:style-name="T14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183">127.x.x.x </text:span><text:span text:style-name="T184">為何不在 </text:span><text:span text:style-name="T183">A </text:span><text:span text:style-name="T184">類？　</text:span><text:span text:style-name="T185">127.0.0.1 </text:span><text:span text:style-name="T186">是回送位址（</text:span><text:span text:style-name="T185">Loopback</text:span><text:span text:style-name="T186">），保留給本機自我測試</text:span><text:span text:style-name="T20">；</text:span><text:span text:style-name="T180">ping 127.0.0.1 </text:span><text:span text:style-name="T179">可測本機協定是否正常，故 </text:span><text:span text:style-name="T180">A </text:span><text:span text:style-name="T179">類跳過 </text:span><text:span text:style-name="T180">127</text:span><text:span text:style-name="T20">，只到 </text:span><text:span text:style-name="T42">126</text:span><text:span text:style-name="T20">。</text:span></text:p>
            <text:p text:style-name="P12"><text:span text:style-name="T46">其他保留位址：</text:span><text:span text:style-name="T187">0.x.x.x</text:span><text:span text:style-name="T188">＝代表「這個網路本身」</text:span><text:span text:style-name="T20">；</text:span><text:span text:style-name="T149">224</text:span><text:span text:style-name="T148">～</text:span><text:span text:style-name="T149">239</text:span><text:span text:style-name="T148">＝</text:span><text:span text:style-name="T149">D </text:span><text:span text:style-name="T148">類（群播 </text:span><text:span text:style-name="T149">Multicast</text:span><text:span text:style-name="T148">）</text:span><text:span text:style-name="T20">；</text:span><text:span text:style-name="T85">240</text:span><text:span text:style-name="T86">～</text:span><text:span text:style-name="T85">255</text:span><text:span text:style-name="T86">＝</text:span><text:span text:style-name="T85">E </text:span><text:span text:style-name="T86">類（實驗用）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參、</text:span><text:span text:style-name="T34">CIDR </text:span><text:span text:style-name="T35">表示法（斜線 </text:span><text:span text:style-name="T34">/</text:span><text:span text:style-name="T35">幾）</text:span></text:h>
      <text:p text:style-name="P22" loext:marker-style-name="T21"><text:span text:style-name="T83">CIDR</text:span><text:span text:style-name="T84">（無類別網域間路由）</text:span><text:span text:style-name="T20">以</text:span><text:span text:style-name="T169">「</text:span><text:span text:style-name="T170">IP + / + </text:span><text:span text:style-name="T169">數字」精確表示網路大小</text:span><text:span text:style-name="T20">，例如 </text:span><text:span text:style-name="T42">192.168.1.0/24</text:span><text:span text:style-name="T20">。</text:span><text:span text:style-name="T127">/ </text:span><text:span text:style-name="T128">後面的數字 ＝ 前幾個 </text:span><text:span text:style-name="T127">bit </text:span><text:span text:style-name="T128">是「網路部分」（固定不變）</text:span><text:span text:style-name="T20">，</text:span><text:span text:style-name="T154">剩下的才是「主機部分」（可變）</text:span><text:span text:style-name="T20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1" loext:marker-style-name="T12"><text:span text:style-name="T13">表示法</text:span><text:span text:style-name="T12"/></text:p>
            </table:table-cell>
            <table:table-cell table:style-name="表格40.A1" office:value-type="string">
              <text:p text:style-name="P21" loext:marker-style-name="T12"><text:span text:style-name="T13">網路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13">主機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43">IP </text:span><text:span text:style-name="T13">總數</text:span></text:p>
            </table:table-cell>
            <table:table-cell table:style-name="表格40.A1" office:value-type="string">
              <text:p text:style-name="P21" loext:marker-style-name="T12"><text:span text:style-name="T13">對應哪段固定</text:span><text:span text:style-name="T12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8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24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16,777,2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 </text:span><text:span text:style-name="T15">組（</text:span><text:span text:style-name="T16">A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16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16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65,536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2 </text:span><text:span text:style-name="T15">組（</text:span><text:span text:style-name="T16">B </text:span><text:span text:style-name="T15">類）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24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8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25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（</text:span><text:span text:style-name="T16">C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25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25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7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128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1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6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6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6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64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20" loext:marker-style-name="T181"><text:span text:style-name="T182">/27</text:span><text:span text:style-name="T181"/></text:p>
          </table:table-cell>
          <table:table-cell table:style-name="表格40.A3" office:value-type="string">
            <text:p text:style-name="P20" loext:marker-style-name="T194"><text:span text:style-name="T195">27</text:span><text:span text:style-name="T194"/></text:p>
          </table:table-cell>
          <table:table-cell table:style-name="表格40.A3" office:value-type="string">
            <text:p text:style-name="P20" loext:marker-style-name="T196"><text:span text:style-name="T197">5</text:span><text:span text:style-name="T196"/></text:p>
          </table:table-cell>
          <table:table-cell table:style-name="表格40.A3" office:value-type="string">
            <text:p text:style-name="P20" loext:marker-style-name="T193"><text:span text:style-name="T100">32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3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8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8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4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7">▸ <text:s/></text:span><text:span text:style-name="T30">用 </text:span><text:span text:style-name="T31">bit </text:span><text:span text:style-name="T30">切割理解 </text:span><text:span text:style-name="T31">/26</text:span></text:p>
            <text:p text:style-name="P11" loext:marker-style-name="T21"><text:span text:style-name="T20">以 </text:span><text:span text:style-name="T42">192.168.1.0</text:span><text:span text:style-name="T185">/26</text:span><text:span text:style-name="T42"> </text:span><text:span text:style-name="T20">為例：</text:span></text:p>
            <text:p text:style-name="P12"><text:span text:style-name="T141">11000000 . 10101000 . 00000001 . 00</text:span><text:span text:style-name="T198">|000000</text:span></text:p>
            <text:p text:style-name="P12" loext:marker-style-name="T21"><text:span text:style-name="T42">└── </text:span><text:span text:style-name="T86">前 </text:span><text:span text:style-name="T85">26 bit</text:span><text:span text:style-name="T86">（固定＝網路）</text:span><text:span text:style-name="T20">──┘ └ </text:span><text:span text:style-name="T169">後 </text:span><text:span text:style-name="T170">6 bit</text:span><text:span text:style-name="T169">（可變＝主機）</text:span><text:span text:style-name="T20">┘</text:span></text:p>
            <text:p text:style-name="P12" loext:marker-style-name="T21"><text:span text:style-name="T42">→ </text:span><text:span text:style-name="T199">主機 </text:span><text:span text:style-name="T200">bit </text:span><text:span text:style-name="T199">有 </text:span><text:span text:style-name="T200">6 </text:span><text:span text:style-name="T199">個 → </text:span><text:span text:style-name="T200">2⁶ = 64 </text:span><text:span text:style-name="T199">個 </text:span><text:span text:style-name="T200">IP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肆、為什麼可用主機數要「−</text:span><text:span text:style-name="T34">2</text:span><text:span text:style-name="T35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1" loext:marker-style-name="T12"><text:span text:style-name="T13">名稱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位置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用途</text:span><text:span text:style-name="T12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20" loext:marker-style-name="T201"><text:span text:style-name="T202">網路位址 </text:span><text:span text:style-name="T203">Network Address</text:span></text:p>
          </table:table-cell>
          <table:table-cell table:style-name="表格41.A2" office:value-type="string">
            <text:p text:style-name="P20" loext:marker-style-name="T77"><text:span text:style-name="T79">第一個 </text:span><text:span text:style-name="T78">IP</text:span><text:span text:style-name="T79">（最小）</text:span></text:p>
          </table:table-cell>
          <table:table-cell table:style-name="表格41.A2" office:value-type="string">
            <text:p text:style-name="P20" loext:marker-style-name="T14"><text:span text:style-name="T15">代表這整個子網路本身，不能分配給設備</text:span><text:span text:style-name="T14"/></text:p>
          </table:table-cell>
        </table:table-row>
        <table:table-row table:style-name="表格41.1">
          <table:table-cell table:style-name="表格41.A3" office:value-type="string">
            <text:p text:style-name="P20" loext:marker-style-name="T201"><text:span text:style-name="T202">廣播位址 </text:span><text:span text:style-name="T203">Broadcast Address</text:span></text:p>
          </table:table-cell>
          <table:table-cell table:style-name="表格41.A3" office:value-type="string">
            <text:p text:style-name="P20" loext:marker-style-name="T77"><text:span text:style-name="T79">最後一個 </text:span><text:span text:style-name="T78">IP</text:span><text:span text:style-name="T79">（最大）</text:span></text:p>
          </table:table-cell>
          <table:table-cell table:style-name="表格41.A3" office:value-type="string">
            <text:p text:style-name="P20" loext:marker-style-name="T14"><text:span text:style-name="T89">送到此位址＝網路內所有設備都收到</text:span><text:span text:style-name="T15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11" loext:marker-style-name="T204"><text:span text:style-name="T205">可用主機數 ＝ </text:span><text:span text:style-name="T206">IP </text:span><text:span text:style-name="T205">總數 − </text:span><text:span text:style-name="T206">2</text:span></text:p>
            <text:p text:style-name="P12" loext:marker-style-name="T21"><text:span text:style-name="T20">【</text:span><text:span text:style-name="T42">/24 </text:span><text:span text:style-name="T20">示範】</text:span><text:span text:style-name="T83">192.168.1.0</text:span><text:span text:style-name="T84">＝網路位址（不能用）</text:span><text:span text:style-name="T20">… </text:span><text:span text:style-name="T149">192.168.1.255</text:span><text:span text:style-name="T148">＝廣播位址（不能用）</text:span><text:span text:style-name="T20">→ </text:span><text:span text:style-name="T207">共 </text:span><text:span text:style-name="T208">256 </text:span><text:span text:style-name="T207">個，可用 </text:span><text:span text:style-name="T208">254 </text:span><text:span text:style-name="T207">個</text:span><text:span text:style-name="T20">。</text:span></text:p>
            <text:p text:style-name="P12" loext:marker-style-name="T21"><text:span text:style-name="T20">【</text:span><text:span text:style-name="T42">/26 </text:span><text:span text:style-name="T20">示範</text:span><text:span text:style-name="T42">·</text:span><text:span text:style-name="T20">最常考】</text:span><text:span text:style-name="T83">192.168.1.0</text:span><text:span text:style-name="T84">＝網路位址</text:span><text:span text:style-name="T20"> … </text:span><text:span text:style-name="T149">192.168.1.63</text:span><text:span text:style-name="T148">＝廣播位址</text:span><text:span text:style-name="T20"> → </text:span><text:span text:style-name="T207">共 </text:span><text:span text:style-name="T208">64 </text:span><text:span text:style-name="T207">個（</text:span><text:span text:style-name="T208">2⁶</text:span><text:span text:style-name="T207">），可用 </text:span><text:span text:style-name="T208">62 </text:span><text:span text:style-name="T207">個</text:span><text:span text:style-name="T20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209">唯一例外 </text:span><text:span text:style-name="T210">/31</text:span><text:span text:style-name="T209">（點對點，</text:span><text:span text:style-name="T210">RFC 3021</text:span><text:span text:style-name="T209">）：</text:span><text:span text:style-name="T211">只有 </text:span><text:span text:style-name="T212">2 </text:span><text:span text:style-name="T211">個 </text:span><text:span text:style-name="T212">IP</text:span><text:span text:style-name="T213">，</text:span><text:span text:style-name="T211">兩個都可用作主機</text:span><text:span text:style-name="T169">，沒有網路位址和廣播位址</text:span><text:span text:style-name="T20">。考試若未特別提到，預設仍要 −</text:span><text:span text:style-name="T42">2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</text:span><text:span text:style-name="T34">VLSM</text:span><text:span text:style-name="T35">（可變長度子網路遮罩）</text:span></text:h>
      <text:p text:style-name="P22" loext:marker-style-name="T21"><text:span text:style-name="T42">VLSM </text:span><text:span text:style-name="T20">的做法：</text:span><text:span text:style-name="T84">依各部門「實際需求」分配</text:span><text:span text:style-name="T214">剛剛好大小</text:span><text:span text:style-name="T84">的子網路，</text:span><text:span text:style-name="T215">不多給、不浪費</text:span><text:span text:style-name="T20">。例如 </text:span><text:span text:style-name="T42">A </text:span><text:span text:style-name="T20">部門 </text:span><text:span text:style-name="T42">100 </text:span><text:span text:style-name="T20">台、</text:span><text:span text:style-name="T42">B </text:span><text:span text:style-name="T20">部門 </text:span><text:span text:style-name="T42">50 </text:span><text:span text:style-name="T20">台、</text:span><text:span text:style-name="T42">C </text:span><text:span text:style-name="T20">部門 </text:span><text:span text:style-name="T42">10 </text:span><text:span text:style-name="T20">台，</text:span><text:span text:style-name="T216">若全用 </text:span><text:span text:style-name="T217">/24 </text:span><text:span text:style-name="T216">會浪費大量 </text:span><text:span text:style-name="T217">IP</text:span><text:span text:style-name="T20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7">📋 <text:s/></text:span><text:span text:style-name="T39">VLSM </text:span><text:span text:style-name="T38">標準流程（三步驟）</text:span></text:p>
            <text:p text:style-name="P11" loext:marker-style-name="T218"><text:span text:style-name="T40">①</text:span><text:span text:style-name="T219"> </text:span><text:span text:style-name="T220">將需求由大到小排序</text:span></text:p>
            <text:p text:style-name="P12"><text:span text:style-name="T40">② </text:span><text:span text:style-name="T220">計算每個需求所需前綴</text:span><text:span text:style-name="T41">：</text:span><text:span text:style-name="T142">需求 </text:span><text:span text:style-name="T221">+ 2 → </text:span><text:span text:style-name="T142">找最小 </text:span><text:span text:style-name="T221">2ⁿ → </text:span><text:span text:style-name="T142">前綴 </text:span><text:span text:style-name="T221">= 32 − n</text:span></text:p>
            <text:p text:style-name="P12" loext:marker-style-name="T218"><text:span text:style-name="T40">③ </text:span><text:span text:style-name="T41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46">為什麼要「由大到小」？　</text:span><text:span text:style-name="T20">因為「對齊（</text:span><text:span text:style-name="T42">Alignment</text:span><text:span text:style-name="T20">）」：</text:span><text:span text:style-name="T169">子網路的起始位址必須是其大小的整數倍</text:span><text:span text:style-name="T20">。</text:span><text:span text:style-name="T222">大小 </text:span><text:span text:style-name="T223">128 </text:span><text:span text:style-name="T222">的子網只能從 </text:span><text:span text:style-name="T223">0</text:span><text:span text:style-name="T222">、</text:span><text:span text:style-name="T223">128… </text:span><text:span text:style-name="T222">開始；大小 </text:span><text:span text:style-name="T223">64 </text:span><text:span text:style-name="T222">的只能從 </text:span><text:span text:style-name="T223">0</text:span><text:span text:style-name="T222">、</text:span><text:span text:style-name="T223">64</text:span><text:span text:style-name="T222">、</text:span><text:span text:style-name="T223">128… </text:span><text:span text:style-name="T222">開始</text:span><text:span text:style-name="T20">。</text:span></text:p>
            <text:p text:style-name="P12"><text:span text:style-name="T46">反面示範：</text:span><text:span text:style-name="T20">若先切小的 </text:span><text:span text:style-name="T42">C</text:span><text:span text:style-name="T20">（</text:span><text:span text:style-name="T42">/28</text:span><text:span text:style-name="T20">，</text:span><text:span text:style-name="T42">0</text:span><text:span text:style-name="T20">～</text:span><text:span text:style-name="T42">15</text:span><text:span text:style-name="T20">），</text:span><text:span text:style-name="T224">再切大的 </text:span><text:span text:style-name="T225">A</text:span><text:span text:style-name="T224">（</text:span><text:span text:style-name="T225">/25</text:span><text:span text:style-name="T224">，</text:span><text:span text:style-name="T225">128 </text:span><text:span text:style-name="T224">個），最近可用對齊位址是 </text:span><text:span text:style-name="T225">128</text:span><text:span text:style-name="T42"> → </text:span><text:span text:style-name="T226">中間 </text:span><text:span text:style-name="T227">16</text:span><text:span text:style-name="T226">～</text:span><text:span text:style-name="T227">127 </text:span><text:span text:style-name="T226">共 </text:span><text:span text:style-name="T227">112 </text:span><text:span text:style-name="T226">個 </text:span><text:span text:style-name="T227">IP </text:span><text:span text:style-name="T226">全浪費！</text:span><text:span text:style-name="T20">正解：</text:span><text:span text:style-name="T128">先切大的，大的天然對齊，小的再從後面切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228">前綴計算公式詳解</text:span><text:span text:style-name="T38">（以</text:span><text:span text:style-name="T229">需要 </text:span><text:span text:style-name="T230">100 </text:span><text:span text:style-name="T229">台主機為例</text:span><text:span text:style-name="T38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" loext:marker-style-name="T21"><text:span text:style-name="T42">① </text:span><text:span text:style-name="T86">加 </text:span><text:span text:style-name="T85">2</text:span><text:span text:style-name="T86">（預留網路 </text:span><text:span text:style-name="T85">+ </text:span><text:span text:style-name="T86">廣播）</text:span><text:span text:style-name="T20">：</text:span><text:span text:style-name="T185">100 + 2 = 102</text:span></text:p>
            <text:p text:style-name="P12" loext:marker-style-name="T21"><text:span text:style-name="T42">② </text:span><text:span text:style-name="T231">找「大於等於 </text:span><text:span text:style-name="T232">102</text:span><text:span text:style-name="T231">」的最小 </text:span><text:span text:style-name="T232">2ⁿ</text:span><text:span text:style-name="T20">：</text:span><text:span text:style-name="T42">2⁶ = 64</text:span><text:span text:style-name="T20">（太小）、</text:span><text:span text:style-name="T170">2⁷ = 128</text:span><text:span text:style-name="T169">（夠）→ </text:span><text:span text:style-name="T170">n = 7</text:span></text:p>
            <text:p text:style-name="P12" loext:marker-style-name="T21"><text:span text:style-name="T42">③ </text:span><text:span text:style-name="T128">前綴 </text:span><text:span text:style-name="T127">= 32 − n = 32 − 7 = 25</text:span><text:span text:style-name="T42"> →</text:span><text:span text:style-name="T233"> </text:span><text:span text:style-name="T234">使用 </text:span><text:span text:style-name="T235">/25</text:span><text:span text:style-name="T234">（驗證：</text:span><text:span text:style-name="T235">2⁷ = 128</text:span><text:span text:style-name="T234">，可用 </text:span><text:span text:style-name="T235">126 ≥ 100 ✔</text:span><text:span text:style-name="T234">）</text:span></text:p>
            <text:p text:style-name="P12" loext:marker-style-name="T236"><text:span text:style-name="T237">公式一句話</text:span><text:span text:style-name="T19">：</text:span><text:span text:style-name="T238">需求 </text:span><text:span text:style-name="T239">+2 → </text:span><text:span text:style-name="T238">找最小 </text:span><text:span text:style-name="T239">2ⁿ</text:span><text:span text:style-name="T198"> → </text:span><text:span text:style-name="T170">/(32−n)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完整範例：起始 </text:span><text:span text:style-name="T37">192.168.1.0/24</text:span><text:span text:style-name="T38">，需求 </text:span><text:span text:style-name="T37">A=100</text:span><text:span text:style-name="T38">、</text:span><text:span text:style-name="T37">B=50</text:span><text:span text:style-name="T38">、</text:span><text:span text:style-name="T37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21" loext:marker-style-name="T104"><text:span text:style-name="T105">部門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需求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+2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2ⁿ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前綴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切割結果（範圍）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可用 </text:span><text:span text:style-name="T161">/ </text:span><text:span text:style-name="T105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0" loext:marker-style-name="T106"><text:span text:style-name="T108">A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8</text:span><text:span text:style-name="T109">（</text:span><text:span text:style-name="T108">2</text:span><text:span text:style-name="T111">⁷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5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0</text:span><text:span text:style-name="T163">/25</text:span><text:span text:style-name="T109">（</text:span><text:span text:style-name="T108">0</text:span><text:span text:style-name="T109">～</text:span><text:span text:style-name="T115">12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26 ≥ 100 ✔</text:span><text:span text:style-name="T106"/></text:p>
          </table:table-cell>
        </table:table-row>
        <table:table-row table:style-name="表格44.1">
          <table:table-cell table:style-name="表格44.A3" office:value-type="string">
            <text:p text:style-name="P20" loext:marker-style-name="T106"><text:span text:style-name="T108">B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0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2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64</text:span><text:span text:style-name="T109">（</text:span><text:span text:style-name="T108">2</text:span><text:span text:style-name="T111">⁶</text:span><text:span text:style-name="T109">）</text:span></text:p>
          </table:table-cell>
          <table:table-cell table:style-name="表格44.A3" office:value-type="string">
            <text:p text:style-name="P20" loext:marker-style-name="T240"><text:span text:style-name="T163">/26</text:span><text:span text:style-name="T240"/></text:p>
          </table:table-cell>
          <table:table-cell table:style-name="表格44.A3" office:value-type="string">
            <text:p text:style-name="P20" loext:marker-style-name="T106"><text:span text:style-name="T108">192.168.1.128</text:span><text:span text:style-name="T163">/26</text:span><text:span text:style-name="T109">（</text:span><text:span text:style-name="T108">128</text:span><text:span text:style-name="T109">～</text:span><text:span text:style-name="T115">191</text:span><text:span text:style-name="T109">）</text:span></text:p>
          </table:table-cell>
          <table:table-cell table:style-name="表格44.A3" office:value-type="string">
            <text:p text:style-name="P20" loext:marker-style-name="T106"><text:span text:style-name="T108">62 ≥ 50 ✔</text:span><text:span text:style-name="T106"/></text:p>
          </table:table-cell>
        </table:table-row>
        <table:table-row table:style-name="表格44.1">
          <table:table-cell table:style-name="表格44.A2" office:value-type="string">
            <text:p text:style-name="P20" loext:marker-style-name="T106"><text:span text:style-name="T108">C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6</text:span><text:span text:style-name="T109">（</text:span><text:span text:style-name="T108">2</text:span><text:span text:style-name="T111">⁴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8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192</text:span><text:span text:style-name="T163">/28</text:span><text:span text:style-name="T109">（</text:span><text:span text:style-name="T108">192</text:span><text:span text:style-name="T109">～</text:span><text:span text:style-name="T115">20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4 ≥ 10 ✔</text:span><text:span text:style-name="T106"/></text:p>
          </table:table-cell>
        </table:table-row>
      </table:table>
      <text:p text:style-name="P22" loext:marker-style-name="T172"><text:span text:style-name="T174">剩餘 </text:span><text:span text:style-name="T173">192.168.1.208 </text:span><text:span text:style-name="T174">～ </text:span><text:span text:style-name="T173">.255</text:span><text:span text:style-name="T174">（</text:span><text:span text:style-name="T173">48 </text:span><text:span text:style-name="T174">個 </text:span><text:span text:style-name="T173">IP</text:span><text:span text:style-name="T174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7">💡 <text:s/></text:span><text:span text:style-name="T166">考試技巧</text:span></text:p>
            <text:p text:style-name="P11" loext:marker-style-name="T21"><text:span text:style-name="T241">快速判斷一個 </text:span><text:span text:style-name="T242">IP </text:span><text:span text:style-name="T241">屬於哪個 </text:span><text:span text:style-name="T242">/26 </text:span><text:span text:style-name="T241">子網</text:span><text:span text:style-name="T20">（</text:span><text:span text:style-name="T169">每段 </text:span><text:span text:style-name="T170">64 </text:span><text:span text:style-name="T169">個，起點 </text:span><text:span text:style-name="T170">0</text:span><text:span text:style-name="T169">、</text:span><text:span text:style-name="T170">64</text:span><text:span text:style-name="T169">、</text:span><text:span text:style-name="T170">128</text:span><text:span text:style-name="T169">、</text:span><text:span text:style-name="T170">192</text:span><text:span text:style-name="T20">）：</text:span><text:span text:style-name="T84">看最後一個 </text:span><text:span text:style-name="T83">Octet </text:span><text:span text:style-name="T84">落在哪個區間 </text:span><text:span text:style-name="T20">→</text:span></text:p>
            <text:p text:style-name="P12" loext:marker-style-name="T21"><text:span text:style-name="T85">0</text:span><text:span text:style-name="T86">～</text:span><text:span text:style-name="T85">63</text:span><text:span text:style-name="T42"> → x.0/26</text:span><text:span text:style-name="T20">　｜　</text:span><text:span text:style-name="T85">64</text:span><text:span text:style-name="T86">～</text:span><text:span text:style-name="T85">127</text:span><text:span text:style-name="T42"> → x.64/26</text:span><text:span text:style-name="T20">　｜　</text:span><text:span text:style-name="T85">128</text:span><text:span text:style-name="T86">～</text:span><text:span text:style-name="T85">191</text:span><text:span text:style-name="T42"> → x.128/26</text:span><text:span text:style-name="T20">　｜　</text:span><text:span text:style-name="T85">192</text:span><text:span text:style-name="T86">～</text:span><text:span text:style-name="T85">255</text:span><text:span text:style-name="T42"> → x.192/26</text:span></text:p>
          </table:table-cell>
        </table:table-row>
      </table:table>
      <text:h text:style-name="P18" text:outline-level="2" loext:marker-style-name="T34"><text:span text:style-name="T35">陸、</text:span><text:span text:style-name="T34">CIDR</text:span><text:span text:style-name="T35">（路由聚合 </text:span><text:span text:style-name="T34">/ </text:span><text:span text:style-name="T35">超網合併）</text:span></text:h>
      <text:p text:style-name="P22" loext:marker-style-name="T21"><text:span text:style-name="T42">CIDR </text:span><text:span text:style-name="T20">的合併功能是 </text:span><text:span text:style-name="T42">VLSM </text:span><text:span text:style-name="T20">的「反向操作」：</text:span><text:span text:style-name="T243">VLSM </text:span><text:span text:style-name="T171">把大網路切小</text:span><text:span text:style-name="T20">；</text:span><text:span text:style-name="T244">CIDR </text:span><text:span text:style-name="T245">合併把小網路合成一個大網路表示</text:span><text:span text:style-name="T20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7">🔑 </text:span><text:span text:style-name="T246"><text:s/></text:span><text:span text:style-name="T247">合併三條件（缺一不可）</text:span></text:p>
            <text:p text:style-name="P11"><text:span text:style-name="T40">① </text:span><text:span text:style-name="T220">連續（</text:span><text:span text:style-name="T219">Contiguous</text:span><text:span text:style-name="T220">）</text:span><text:span text:style-name="T41">：</text:span><text:span text:style-name="T170">IP </text:span><text:span text:style-name="T169">範圍必須緊鄰</text:span><text:span text:style-name="T20">，</text:span><text:span text:style-name="T128">中間不能有空缺</text:span><text:span text:style-name="T20">。</text:span></text:p>
            <text:p text:style-name="P12"><text:span text:style-name="T40">② </text:span><text:span text:style-name="T220">數量是 </text:span><text:span text:style-name="T219">2ⁿ</text:span><text:span text:style-name="T41">：</text:span><text:span text:style-name="T42">2</text:span><text:span text:style-name="T20">、</text:span><text:span text:style-name="T42">4</text:span><text:span text:style-name="T20">、</text:span><text:span text:style-name="T42">8…</text:span><text:span text:style-name="T20">。</text:span></text:p>
            <text:p text:style-name="P12"><text:span text:style-name="T40">③ </text:span><text:span text:style-name="T220">起始位址對齊</text:span><text:span text:style-name="T41">：</text:span><text:span text:style-name="T20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7">▸ <text:s/></text:span><text:span text:style-name="T30">合併範例與反例</text:span></text:p>
            <text:p text:style-name="P11"><text:span text:style-name="T82">範例：</text:span><text:span text:style-name="T248">2 </text:span><text:span text:style-name="T249">個 </text:span><text:span text:style-name="T248">/25 → 1 </text:span><text:span text:style-name="T249">個 </text:span><text:span text:style-name="T248">/24</text:span><text:span text:style-name="T82">　</text:span><text:span text:style-name="T42">192.168.1</text:span><text:span text:style-name="T83">.0</text:span><text:span text:style-name="T42">/25 </text:span><text:span text:style-name="T20">＋ </text:span><text:span text:style-name="T42">192.168.1</text:span><text:span text:style-name="T83">.128</text:span><text:span text:style-name="T42">/25 → ① </text:span><text:span text:style-name="T20">緊鄰✔ ② </text:span><text:span text:style-name="T42">2 </text:span><text:span text:style-name="T20">個（</text:span><text:span text:style-name="T42">2¹</text:span><text:span text:style-name="T20">）✔ ③ 起點 </text:span><text:span text:style-name="T42">.0</text:span><text:span text:style-name="T20">，</text:span><text:span text:style-name="T42">0÷256=0✔ → </text:span><text:span text:style-name="T20">合併為 </text:span><text:span text:style-name="T42">192.168.1</text:span><text:span text:style-name="T83">.0</text:span><text:span text:style-name="T42">/24</text:span><text:span text:style-name="T20">。</text:span></text:p>
            <text:p text:style-name="P12"><text:span text:style-name="T82">範例：</text:span><text:span text:style-name="T248">4 </text:span><text:span text:style-name="T249">個 </text:span><text:span text:style-name="T248">/24 → 1 </text:span><text:span text:style-name="T249">個 </text:span><text:span text:style-name="T248">/22</text:span><text:span text:style-name="T82">　</text:span><text:span text:style-name="T42">192.168</text:span><text:span text:style-name="T85">.0/1/2/3</text:span><text:span text:style-name="T42">.0/</text:span><text:span text:style-name="T185">24</text:span><text:span text:style-name="T42"> → </text:span><text:span text:style-name="T20">連續✔、</text:span><text:span text:style-name="T42">4 </text:span><text:span text:style-name="T20">個（</text:span><text:span text:style-name="T42">2²</text:span><text:span text:style-name="T20">）✔、對齊✔ → 合併為 </text:span><text:span text:style-name="T42">192.168</text:span><text:span text:style-name="T232">.0</text:span><text:span text:style-name="T42">.0/</text:span><text:span text:style-name="T185">22</text:span><text:span text:style-name="T20">。</text:span></text:p>
            <text:p text:style-name="P12"><text:span text:style-name="T250">反例（無法合併）：</text:span><text:span text:style-name="T251">192.168.1.0/24 </text:span><text:span text:style-name="T252">＋ </text:span><text:span text:style-name="T251">192.168.2.0/24 → </text:span><text:span text:style-name="T252">雖數量為 </text:span><text:span text:style-name="T251">2</text:span><text:span text:style-name="T252">，但起點 </text:span><text:span text:style-name="T251">.1 </text:span><text:span text:style-name="T252">不對齊</text:span><text:span text:style-name="T20">（</text:span><text:span text:style-name="T42">/23 </text:span><text:span text:style-name="T20">起點只能是偶數倍 </text:span><text:span text:style-name="T42">.0 </text:span><text:span text:style-name="T20">或 </text:span><text:span text:style-name="T42">.2</text:span><text:span text:style-name="T20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168">合併後前綴公式：</text:span><text:span text:style-name="T20">合併 </text:span><text:span text:style-name="T42">2ⁿ </text:span><text:span text:style-name="T20">個子網 → 前綴減 </text:span><text:span text:style-name="T42">n</text:span><text:span text:style-name="T20">（</text:span><text:span text:style-name="T128">每合併一倍，</text:span><text:span text:style-name="T127">/ </text:span><text:span text:style-name="T128">的數字減 </text:span><text:span text:style-name="T127">1</text:span><text:span text:style-name="T20">）。</text:span></text:p>
            <text:p text:style-name="P12" loext:marker-style-name="T21"><text:span text:style-name="T253">2 </text:span><text:span text:style-name="T254">個 </text:span><text:span text:style-name="T253">/26 → /25</text:span><text:span text:style-name="T254">；</text:span><text:span text:style-name="T253">4 </text:span><text:span text:style-name="T254">個 </text:span><text:span text:style-name="T253">/26 → /24</text:span><text:span text:style-name="T254">；</text:span><text:span text:style-name="T253">2 </text:span><text:span text:style-name="T254">個 </text:span><text:span text:style-name="T253">/24 → /23</text:span><text:span text:style-name="T20">。</text:span></text:p>
          </table:table-cell>
        </table:table-row>
      </table:table>
      <text:h text:style-name="P18" text:outline-level="2" loext:marker-style-name="T34"><text:span text:style-name="T35">柒、子網路三大概念與解題流程</text:span><text:span text:style-name="T34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1" loext:marker-style-name="T12"><text:span text:style-name="T13">概念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關鍵字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核心規則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比喻</text:span><text:span text:style-name="T12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0" loext:marker-style-name="T14"><text:span text:style-name="T16">IP </text:span><text:span text:style-name="T15">分類</text:span></text:p>
          </table:table-cell>
          <table:table-cell table:style-name="表格47.A2" office:value-type="string">
            <text:p text:style-name="P20" loext:marker-style-name="T14"><text:span text:style-name="T16">A/B/C </text:span><text:span text:style-name="T15">類</text:span></text:p>
          </table:table-cell>
          <table:table-cell table:style-name="表格47.A2" office:value-type="string">
            <text:p text:style-name="P20" loext:marker-style-name="T77"><text:span text:style-name="T79">看第一組數字判斷類別</text:span><text:span text:style-name="T77"/></text:p>
          </table:table-cell>
          <table:table-cell table:style-name="表格47.A2" office:value-type="string">
            <text:p text:style-name="P20" loext:marker-style-name="T14"><text:span text:style-name="T15">土地大小分類</text:span><text:span text:style-name="T14"/></text:p>
          </table:table-cell>
        </table:table-row>
        <table:table-row table:style-name="表格47.1">
          <table:table-cell table:style-name="表格47.A3" office:value-type="string">
            <text:p text:style-name="P20" loext:marker-style-name="T14"><text:span text:style-name="T16">VLSM</text:span><text:span text:style-name="T14"/></text:p>
          </table:table-cell>
          <table:table-cell table:style-name="表格47.A3" office:value-type="string">
            <text:p text:style-name="P20" loext:marker-style-name="T14"><text:span text:style-name="T15">切子網路</text:span><text:span text:style-name="T14"/></text:p>
          </table:table-cell>
          <table:table-cell table:style-name="表格47.A3" office:value-type="string">
            <text:p text:style-name="P20" loext:marker-style-name="T14"><text:span text:style-name="T70">由大到小</text:span><text:span text:style-name="T15">；</text:span><text:span text:style-name="T76">需求</text:span><text:span text:style-name="T75">+2→2ⁿ→/(32−n)</text:span></text:p>
          </table:table-cell>
          <table:table-cell table:style-name="表格47.A3" office:value-type="string">
            <text:p text:style-name="P20" loext:marker-style-name="T14"><text:span text:style-name="T15">把大地切成不同大小的小塊</text:span><text:span text:style-name="T14"/></text:p>
          </table:table-cell>
        </table:table-row>
        <table:table-row table:style-name="表格47.1">
          <table:table-cell table:style-name="表格47.A2" office:value-type="string">
            <text:p text:style-name="P20" loext:marker-style-name="T14"><text:span text:style-name="T16">CIDR </text:span><text:span text:style-name="T15">合併</text:span></text:p>
          </table:table-cell>
          <table:table-cell table:style-name="表格47.A2" office:value-type="string">
            <text:p text:style-name="P20" loext:marker-style-name="T14"><text:span text:style-name="T15">聚合路由</text:span><text:span text:style-name="T14"/></text:p>
          </table:table-cell>
          <table:table-cell table:style-name="表格47.A2" office:value-type="string">
            <text:p text:style-name="P20" loext:marker-style-name="T14"><text:span text:style-name="T79">連續</text:span><text:span text:style-name="T15"> </text:span><text:span text:style-name="T16">+ </text:span><text:span text:style-name="T15">數量 </text:span><text:span text:style-name="T16">2ⁿ + </text:span><text:span text:style-name="T15">對齊；</text:span><text:span text:style-name="T120">前綴減 </text:span><text:span text:style-name="T255">n</text:span></text:p>
          </table:table-cell>
          <table:table-cell table:style-name="表格47.A2" office:value-type="string">
            <text:p text:style-name="P20" loext:marker-style-name="T14"><text:span text:style-name="T15">把相鄰小地合成大地</text:span><text:span text:style-name="T14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7">🎯 <text:s/></text:span><text:span text:style-name="T256">考試標準解題流程</text:span></text:p>
            <text:p text:style-name="P11"><text:span text:style-name="T257">遇到 </text:span><text:span text:style-name="T258">VLSM </text:span><text:span text:style-name="T257">題：</text:span><text:span text:style-name="T207">確認起始網路</text:span><text:span text:style-name="T20"> → </text:span><text:span text:style-name="T259">需求由大到小</text:span><text:span text:style-name="T20"> → </text:span><text:span text:style-name="T260">各需求 </text:span><text:span text:style-name="T261">+2 </text:span><text:span text:style-name="T260">找 </text:span><text:span text:style-name="T261">2ⁿ </text:span><text:span text:style-name="T260">算前綴</text:span><text:span text:style-name="T20"> → </text:span><text:span text:style-name="T216">大的先切</text:span><text:span text:style-name="T20">依序往後 → </text:span><text:span text:style-name="T215">驗證網路位址</text:span><text:span text:style-name="T262">/</text:span><text:span text:style-name="T215">廣播位址</text:span><text:span text:style-name="T262">/</text:span><text:span text:style-name="T215">可用範圍</text:span><text:span text:style-name="T20">。</text:span></text:p>
            <text:p text:style-name="P12"><text:span text:style-name="T257">遇到 </text:span><text:span text:style-name="T258">CIDR </text:span><text:span text:style-name="T257">合併題：</text:span><text:span text:style-name="T20">列出網路確認連續 → 確認數量 </text:span><text:span text:style-name="T42">2ⁿ → </text:span><text:span text:style-name="T20">確認起點對齊（起點</text:span><text:span text:style-name="T42">÷</text:span><text:span text:style-name="T20">合併後大小</text:span><text:span text:style-name="T42">=</text:span><text:span text:style-name="T20">整數）→ 前綴 </text:span><text:span text:style-name="T42">= </text:span><text:span text:style-name="T20">原前綴 − </text:span><text:span text:style-name="T42">n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捌、</text:span><text:span text:style-name="T34">MTU</text:span><text:span text:style-name="T35">（最大傳輸單位）</text:span><text:span text:style-name="T34">(</text:span><text:span text:style-name="T263">一條網路，一次最多</text:span><text:span text:style-name="T34">)</text:span></text:h>
      <text:p text:style-name="P22" loext:marker-style-name="T21"><text:span text:style-name="T83">MTU</text:span><text:span text:style-name="T42"> </text:span><text:span text:style-name="T20">＝ </text:span><text:span text:style-name="T264">Maximum Transmission Unit</text:span><text:span text:style-name="T265">，</text:span><text:span text:style-name="T266">一條網路</text:span><text:span text:style-name="T265">「</text:span><text:span text:style-name="T267">一次最多</text:span><text:span text:style-name="T265">能傳送的</text:span><text:span text:style-name="T268">封包大小</text:span><text:span text:style-name="T265">」</text:span><text:span text:style-name="T20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1" loext:marker-style-name="T12"><text:span text:style-name="T13">網路類型</text:span><text:span text:style-name="T12"/></text:p>
            </table:table-cell>
            <table:table-cell table:style-name="表格48.A1" office:value-type="string">
              <text:p text:style-name="P21" loext:marker-style-name="T12"><text:span text:style-name="T43">MTU </text:span><text:span text:style-name="T13">值</text:span></text:p>
            </table:table-cell>
            <table:table-cell table:style-name="表格48.A1" office:value-type="string">
              <text:p text:style-name="P21" loext:marker-style-name="T12"><text:span text:style-name="T13">說明</text:span><text:span text:style-name="T12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0" loext:marker-style-name="T14"><text:span text:style-name="T16">Ethernet</text:span><text:span text:style-name="T15">（乙太網）</text:span></text:p>
          </table:table-cell>
          <table:table-cell table:style-name="表格48.A2" office:value-type="string">
            <text:p text:style-name="P20" loext:marker-style-name="T14"><text:span text:style-name="T16">1500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最常見，</text:span><text:span text:style-name="T16">99% </text:span><text:span text:style-name="T15">環境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Wi-Fi (802.11)</text:span><text:span text:style-name="T14"/></text:p>
          </table:table-cell>
          <table:table-cell table:style-name="表格48.A3" office:value-type="string">
            <text:p text:style-name="P20" loext:marker-style-name="T14"><text:span text:style-name="T16">2304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無線區域網路</text:span><text:span text:style-name="T14"/></text:p>
          </table:table-cell>
        </table:table-row>
        <table:table-row table:style-name="表格48.1">
          <table:table-cell table:style-name="表格48.A2" office:value-type="string">
            <text:p text:style-name="P20" loext:marker-style-name="T14"><text:span text:style-name="T16">PPPoE</text:span><text:span text:style-name="T15">（</text:span><text:span text:style-name="T16">ADSL</text:span><text:span text:style-name="T15">）</text:span></text:p>
          </table:table-cell>
          <table:table-cell table:style-name="表格48.A2" office:value-type="string">
            <text:p text:style-name="P20" loext:marker-style-name="T14"><text:span text:style-name="T16">1492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需扣掉 </text:span><text:span text:style-name="T16">PPPoE header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Loopback</text:span><text:span text:style-name="T15">（本機）</text:span></text:p>
          </table:table-cell>
          <table:table-cell table:style-name="表格48.A3" office:value-type="string">
            <text:p text:style-name="P20" loext:marker-style-name="T14"><text:span text:style-name="T16">65536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本機內部通訊</text:span><text:span text:style-name="T14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7">❗ <text:s/></text:span><text:span text:style-name="T80">重點</text:span></text:p>
            <text:p text:style-name="P11" loext:marker-style-name="T21"><text:span text:style-name="T128">若封包大小 </text:span><text:span text:style-name="T127">&gt; MTU</text:span><text:span text:style-name="T128">，就必須「切開」才能傳送</text:span><text:span text:style-name="T20">，這個動作就叫 </text:span><text:span text:style-name="T208">Fragmentation</text:span><text:span text:style-name="T207">（分段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玖、</text:span><text:span text:style-name="T34">Fragmentation</text:span><text:span text:style-name="T35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7">📦 <text:s/></text:span><text:span text:style-name="T30">怎麼切？</text:span></text:p>
            <text:p text:style-name="P11" loext:marker-style-name="T21"><text:span text:style-name="T20">範例：送出 </text:span><text:span text:style-name="T42">4000 bytes</text:span><text:span text:style-name="T20">、</text:span><text:span text:style-name="T85">MTU = 1500</text:span><text:span text:style-name="T20">（</text:span><text:span text:style-name="T169">每段扣掉 </text:span><text:span text:style-name="T170">20 bytes IP Header</text:span><text:span text:style-name="T20">，</text:span><text:span text:style-name="T84">剩 </text:span><text:span text:style-name="T83">1480 </text:span><text:span text:style-name="T84">可放資料</text:span><text:span text:style-name="T20">）</text:span></text:p>
            <text:p text:style-name="P12" loext:marker-style-name="T269"><text:span text:style-name="T143">第 </text:span><text:span text:style-name="T144">1 </text:span><text:span text:style-name="T143">段：</text:span><text:span text:style-name="T144">1480 bytes</text:span><text:span text:style-name="T143">｜第 </text:span><text:span text:style-name="T144">2 </text:span><text:span text:style-name="T143">段：</text:span><text:span text:style-name="T144">1480 bytes</text:span><text:span text:style-name="T143">｜第 </text:span><text:span text:style-name="T144">3 </text:span><text:span text:style-name="T143">段：</text:span><text:span text:style-name="T144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1" loext:marker-style-name="T12"><text:span text:style-name="T13">版本</text:span><text:span text:style-name="T12"/></text:p>
          </table:table-cell>
          <table:table-cell table:style-name="表格49.A2" office:value-type="string">
            <text:p text:style-name="P21" loext:marker-style-name="T12"><text:span text:style-name="T13">誰負責分段</text:span><text:span text:style-name="T12"/></text:p>
          </table:table-cell>
          <table:table-cell table:style-name="表格49.A2" office:value-type="string">
            <text:p text:style-name="P21" loext:marker-style-name="T12"><text:span text:style-name="T43">Router </text:span><text:span text:style-name="T13">可切？</text:span></text:p>
          </table:table-cell>
          <table:table-cell table:style-name="表格49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49.1">
          <table:table-cell table:style-name="表格49.A3" office:value-type="string">
            <text:p text:style-name="P20" loext:marker-style-name="T270"><text:span text:style-name="T96">IPv4</text:span><text:span text:style-name="T270"/></text:p>
          </table:table-cell>
          <table:table-cell table:style-name="表格49.A3" office:value-type="string">
            <text:p text:style-name="P20" loext:marker-style-name="T14"><text:span text:style-name="T16">Router </text:span><text:span text:style-name="T15">或 </text:span><text:span text:style-name="T16">Source</text:span></text:p>
          </table:table-cell>
          <table:table-cell table:style-name="表格49.A3" office:value-type="string">
            <text:p text:style-name="P20" loext:marker-style-name="T271"><text:span text:style-name="T272">✅ </text:span><text:span text:style-name="T273">可以</text:span></text:p>
          </table:table-cell>
          <table:table-cell table:style-name="表格49.A3" office:value-type="string">
            <text:p text:style-name="P20" loext:marker-style-name="T274"><text:span text:style-name="T275">封包到 </text:span><text:span text:style-name="T276">Router </text:span><text:span text:style-name="T275">太大時，</text:span><text:span text:style-name="T276">Router </text:span><text:span text:style-name="T275">直接幫你切</text:span></text:p>
          </table:table-cell>
        </table:table-row>
        <table:table-row table:style-name="表格49.1">
          <table:table-cell table:style-name="表格49.A4" office:value-type="string">
            <text:p text:style-name="P20" loext:marker-style-name="T270"><text:span text:style-name="T96">IPv6</text:span><text:span text:style-name="T270"/></text:p>
          </table:table-cell>
          <table:table-cell table:style-name="表格49.A4" office:value-type="string">
            <text:p text:style-name="P20" loext:marker-style-name="T14"><text:span text:style-name="T15">僅 </text:span><text:span text:style-name="T16">Source</text:span><text:span text:style-name="T15">（送端）</text:span></text:p>
          </table:table-cell>
          <table:table-cell table:style-name="表格49.A4" office:value-type="string">
            <text:p text:style-name="P20" loext:marker-style-name="T277"><text:span text:style-name="T278">❌ </text:span><text:span text:style-name="T279">不行</text:span></text:p>
          </table:table-cell>
          <table:table-cell table:style-name="表格49.A4" office:value-type="string">
            <text:p text:style-name="P20" loext:marker-style-name="T14"><text:span text:style-name="T280">Router </text:span><text:span text:style-name="T281">不分段</text:span><text:span text:style-name="T15">，</text:span><text:span text:style-name="T99">由送端自行處理</text:span><text:span text:style-name="T15">，搭配 </text:span><text:span text:style-name="T16">PMTUD</text:span></text:p>
          </table:table-cell>
        </table:table-row>
      </table:table>
      <text:h text:style-name="P18" text:outline-level="2" loext:marker-style-name="T34"><text:span text:style-name="T35">拾、</text:span><text:span text:style-name="T34">IP Header </text:span><text:span text:style-name="T35">關鍵欄位</text:span></text:h>
      <text:p text:style-name="P22" loext:marker-style-name="T21"><text:span text:style-name="T20">每個封包都有一個「說明書」（</text:span><text:span text:style-name="T42">IP Header</text:span><text:span text:style-name="T20">），無選項時長度固定 </text:span><text:span text:style-name="T42">20 bytes</text:span><text:span text:style-name="T20">。最重要的 </text:span><text:span text:style-name="T42">5 </text:span><text:span text:style-name="T20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141">(1) </text:span><text:span text:style-name="T122">Total Length</text:span><text:span text:style-name="T124">：</text:span><text:span text:style-name="T20">封包總大小（</text:span><text:span text:style-name="T42">Header + Data</text:span><text:span text:style-name="T20">），最大 </text:span><text:span text:style-name="T42">65535 bytes</text:span><text:span text:style-name="T20">（</text:span><text:span text:style-name="T42">16 bits</text:span><text:span text:style-name="T20">）。</text:span></text:p>
            <text:p text:style-name="P12"><text:span text:style-name="T141">(2) </text:span><text:span text:style-name="T122">Identification</text:span><text:span text:style-name="T124">：</text:span><text:span text:style-name="T169">同一原始封包的所有分段共用同一 </text:span><text:span text:style-name="T170">ID</text:span><text:span text:style-name="T20">；</text:span><text:span text:style-name="T282">接收端靠此 </text:span><text:span text:style-name="T283">ID </text:span><text:span text:style-name="T282">判斷哪些 </text:span><text:span text:style-name="T283">fragment </text:span><text:span text:style-name="T282">要拼在一起</text:span><text:span text:style-name="T20">。</text:span></text:p>
            <text:p text:style-name="P12"><text:span text:style-name="T141">(3) </text:span><text:span text:style-name="T122">Fragment Offset</text:span><text:span text:style-name="T124">：</text:span><text:span text:style-name="T128">這段資料在原始封包中的「起始位置」</text:span><text:span text:style-name="T20">。⚠️ 單位是 </text:span><text:span text:style-name="T42">8 bytes</text:span><text:span text:style-name="T20">（欄位僅 </text:span><text:span text:style-name="T42">13 bits</text:span><text:span text:style-name="T20">）→ </text:span><text:span text:style-name="T127">Offset = </text:span><text:span text:style-name="T128">起始位置 </text:span><text:span text:style-name="T127">÷ 8</text:span><text:span text:style-name="T20">。</text:span></text:p>
            <text:p text:style-name="P12"><text:span text:style-name="T141">(4) </text:span><text:span text:style-name="T122">TTL</text:span><text:span text:style-name="T124">：</text:span><text:span text:style-name="T284">最多可經過幾個 </text:span><text:span text:style-name="T285">Router</text:span><text:span text:style-name="T284">；每經過一個 −</text:span><text:span text:style-name="T285">1</text:span><text:span text:style-name="T20">，</text:span><text:span text:style-name="T215">歸零時 </text:span><text:span text:style-name="T262">Router </text:span><text:span text:style-name="T215">丟棄並回 </text:span><text:span text:style-name="T262">ICMP</text:span><text:span text:style-name="T215">「</text:span><text:span text:style-name="T262">Time Exceeded</text:span><text:span text:style-name="T215">」</text:span><text:span text:style-name="T20">。常見初始值 </text:span><text:span text:style-name="T42">Linux=64</text:span><text:span text:style-name="T20">、</text:span><text:span text:style-name="T42">Windows=128</text:span><text:span text:style-name="T20">。</text:span><text:span text:style-name="T42">traceroute </text:span><text:span text:style-name="T20">即利用 </text:span><text:span text:style-name="T42">TTL</text:span><text:span text:style-name="T20">。</text:span></text:p>
            <text:p text:style-name="P12"><text:span text:style-name="T141">(5) </text:span><text:span text:style-name="T122">Protocol</text:span><text:span text:style-name="T124">：</text:span><text:span text:style-name="T20">告訴 </text:span><text:span text:style-name="T42">OS </text:span><text:span text:style-name="T20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1" loext:marker-style-name="T12"><text:span text:style-name="T13">計算範例（</text:span><text:span text:style-name="T43">MTU=1500, Header=20, </text:span><text:span text:style-name="T13">資料</text:span><text:span text:style-name="T43">=4000</text:span><text:span text:style-name="T13">）</text:span></text:p>
          </table:table-cell>
          <table:covered-table-cell/>
          <table:covered-table-cell/>
          <table:table-cell table:style-name="表格50.A2" office:value-type="string">
            <text:p text:style-name="P21" loext:marker-style-name="T12"><text:span text:style-name="T43">Offset </text:span><text:span text:style-name="T13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1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270"><text:span text:style-name="T96">0 ÷ 8 = 0</text:span><text:span text:style-name="T270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0" loext:marker-style-name="T14"><text:span text:style-name="T15">第 </text:span><text:span text:style-name="T16">2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4" office:value-type="string">
            <text:p text:style-name="P20" loext:marker-style-name="T14"><text:span text:style-name="T96">1480 ÷ 8 </text:span><text:span text:style-name="T16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3 </text:span><text:span text:style-name="T15">段：資料 </text:span><text:span text:style-name="T16">104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14"><text:span text:style-name="T96">2960 ÷ 8</text:span><text:span text:style-name="T16"> = 370</text:span></text:p>
          </table:table-cell>
        </table:table-row>
        <table:table-row table:style-name="表格50.1">
          <table:table-cell table:style-name="表格50.A2" office:value-type="string">
            <text:p text:style-name="P7" loext:marker-style-name="T12"><text:span text:style-name="T43">Protocol </text:span><text:span text:style-name="T13">值</text:span></text:p>
          </table:table-cell>
          <table:table-cell table:style-name="表格50.A2" office:value-type="string">
            <text:p text:style-name="P7" loext:marker-style-name="T12"><text:span text:style-name="T13">對應協定</text:span><text:span text:style-name="T12"/></text:p>
          </table:table-cell>
          <table:table-cell table:style-name="表格50.A2" table:number-columns-spanned="2" office:value-type="string">
            <text:p text:style-name="P7" loext:marker-style-name="T12"><text:span text:style-name="T13">常見用途</text:span><text:span text:style-name="T12"/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</text:span><text:span text:style-name="T14"/></text:p>
          </table:table-cell>
          <table:table-cell table:style-name="表格50.A3" office:value-type="string">
            <text:p text:style-name="P20" loext:marker-style-name="T286"><text:span text:style-name="T287">ICMP</text:span><text:span text:style-name="T286"/></text:p>
          </table:table-cell>
          <table:table-cell table:style-name="表格50.A3" table:number-columns-spanned="2" office:value-type="string">
            <text:p text:style-name="P20" loext:marker-style-name="T288"><text:span text:style-name="T289">ping</text:span><text:span text:style-name="T290">、</text:span><text:span text:style-name="T289">TTL </text:span><text:span text:style-name="T290">超時通知、</text:span><text:span text:style-name="T289">Fragmentation </text:span><text:span text:style-name="T290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0" loext:marker-style-name="T14"><text:span text:style-name="T16">6</text:span><text:span text:style-name="T14"/></text:p>
          </table:table-cell>
          <table:table-cell table:style-name="表格50.A4" office:value-type="string">
            <text:p text:style-name="P20" loext:marker-style-name="T14"><text:span text:style-name="T16">TCP</text:span><text:span text:style-name="T14"/></text:p>
          </table:table-cell>
          <table:table-cell table:style-name="表格50.A4" table:number-columns-spanned="2" office:value-type="string">
            <text:p text:style-name="P20" loext:marker-style-name="T14"><text:span text:style-name="T16">HTTP</text:span><text:span text:style-name="T15">、</text:span><text:span text:style-name="T16">HTTPS</text:span><text:span text:style-name="T15">、</text:span><text:span text:style-name="T16">SSH</text:span><text:span text:style-name="T15">、</text:span><text:span text:style-name="T16">FTP </text:span><text:span text:style-name="T15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7</text:span><text:span text:style-name="T14"/></text:p>
          </table:table-cell>
          <table:table-cell table:style-name="表格50.A3" office:value-type="string">
            <text:p text:style-name="P20" loext:marker-style-name="T14"><text:span text:style-name="T16">UDP</text:span><text:span text:style-name="T14"/></text:p>
          </table:table-cell>
          <table:table-cell table:style-name="表格50.A3" table:number-columns-spanned="2" office:value-type="string">
            <text:p text:style-name="P20" loext:marker-style-name="T14"><text:span text:style-name="T16">DNS</text:span><text:span text:style-name="T15">、</text:span><text:span text:style-name="T16">DHCP</text:span><text:span text:style-name="T15">、影音串流等速度優先</text:span></text:p>
          </table:table-cell>
          <table:covered-table-cell/>
        </table:table-row>
      </table:table>
      <text:h text:style-name="P18" text:outline-level="2"><text:soft-page-break/><text:span text:style-name="T35">拾壹、</text:span><text:span text:style-name="T34">Fragmentation Flags</text:span><text:span text:style-name="T35">（</text:span><text:span text:style-name="T34">DF / MF</text:span><text:span text:style-name="T35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1" loext:marker-style-name="T12"><text:span text:style-name="T43">Flag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1 </text:span><text:span text:style-name="T13">代表</text:span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0 </text:span><text:span text:style-name="T13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0" loext:marker-style-name="T77"><text:span text:style-name="T78">DF</text:span><text:span text:style-name="T77"/></text:p>
          </table:table-cell>
          <table:table-cell table:style-name="表格51.A2" office:value-type="string">
            <text:p text:style-name="P20" loext:marker-style-name="T77"><text:span text:style-name="T78">Don't Fragment</text:span><text:span text:style-name="T77"/></text:p>
          </table:table-cell>
          <table:table-cell table:style-name="表格51.A2" office:value-type="string">
            <text:p text:style-name="P20" loext:marker-style-name="T14"><text:span text:style-name="T16">❌ </text:span><text:span text:style-name="T15">不准切！超大就丟並回 </text:span><text:span text:style-name="T16">ICMP</text:span></text:p>
          </table:table-cell>
          <table:table-cell table:style-name="表格51.A2" office:value-type="string">
            <text:p text:style-name="P20" loext:marker-style-name="T14"><text:span text:style-name="T15">允許分段（一般封包）</text:span><text:span text:style-name="T14"/></text:p>
          </table:table-cell>
        </table:table-row>
        <table:table-row table:style-name="表格51.1">
          <table:table-cell table:style-name="表格51.A3" office:value-type="string">
            <text:p text:style-name="P20" loext:marker-style-name="T74"><text:span text:style-name="T75">MF</text:span><text:span text:style-name="T74"/></text:p>
          </table:table-cell>
          <table:table-cell table:style-name="表格51.A3" office:value-type="string">
            <text:p text:style-name="P20" loext:marker-style-name="T74"><text:span text:style-name="T75">More Fragments</text:span><text:span text:style-name="T74"/></text:p>
          </table:table-cell>
          <table:table-cell table:style-name="表格51.A3" office:value-type="string">
            <text:p text:style-name="P20" loext:marker-style-name="T14"><text:span text:style-name="T15">後面還有更多分段</text:span><text:span text:style-name="T14"/></text:p>
          </table:table-cell>
          <table:table-cell table:style-name="表格51.A3" office:value-type="string">
            <text:p text:style-name="P20" loext:marker-style-name="T14"><text:span text:style-name="T15">這是最後一段（或未分段）</text:span><text:span text:style-name="T14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7">▸ <text:s/></text:span><text:span text:style-name="T31">DF = 1 </text:span><text:span text:style-name="T30">的完整流程</text:span></text:p>
            <text:p text:style-name="P11" loext:marker-style-name="T21"><text:span text:style-name="T42">① </text:span><text:span text:style-name="T20">送出封包（</text:span><text:span text:style-name="T83">DF=1</text:span><text:span text:style-name="T84">，不准切</text:span><text:span text:style-name="T20">）→ ② 到某 </text:span><text:span text:style-name="T42">Router</text:span><text:span text:style-name="T20">，發現</text:span><text:span text:style-name="T158">封包 </text:span><text:span text:style-name="T291">&gt; </text:span><text:span text:style-name="T158">該路段 </text:span><text:span text:style-name="T291">MTU</text:span><text:span text:style-name="T42"> → ③ </text:span><text:span text:style-name="T292">Router </text:span><text:span text:style-name="T129">不能切，直接丟棄 </text:span><text:span text:style-name="T20">→ ④ </text:span><text:span text:style-name="T285">Router </text:span><text:span text:style-name="T284">回傳 </text:span><text:span text:style-name="T285">ICMP</text:span><text:span text:style-name="T284">「</text:span><text:span text:style-name="T285">Fragmentation Needed</text:span><text:span text:style-name="T284">」（含可用 </text:span><text:span text:style-name="T285">MTU </text:span><text:span text:style-name="T284">大小）</text:span><text:span text:style-name="T20">→ ⑤ </text:span><text:span text:style-name="T169">送端調整封包大小後</text:span><text:span text:style-name="T293">重送</text:span><text:span text:style-name="T20">。這就是 </text:span><text:span text:style-name="T85">PMTUD </text:span><text:span text:style-name="T86">的核心機制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拾貳、</text:span><text:span text:style-name="T34">PMTUD</text:span><text:span text:style-name="T35">（路徑 </text:span><text:span text:style-name="T34">MTU </text:span><text:span text:style-name="T35">探測）</text:span></text:h>
      <text:p text:style-name="P22" loext:marker-style-name="T21"><text:span text:style-name="T83">PMTUD </text:span><text:span text:style-name="T20">＝</text:span><text:span text:style-name="T293"> </text:span><text:span text:style-name="T294">Path MTU Discovery</text:span><text:span text:style-name="T293">，自動找出</text:span><text:span text:style-name="T295">來源到目的地</text:span><text:span text:style-name="T293">整條路徑中</text:span><text:span text:style-name="T296">最小的 </text:span><text:span text:style-name="T297">MTU </text:span><text:span text:style-name="T296">值</text:span><text:span text:style-name="T20">。</text:span><text:span text:style-name="T148">網路路徑可能途經不同網路</text:span><text:span text:style-name="T20">（</text:span><text:span text:style-name="T42">Ethernet → PPPoE → Wi-Fi</text:span><text:span text:style-name="T20">），封包必須符合「最小的那個 </text:span><text:span text:style-name="T42">MTU</text:span><text:span text:style-name="T20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1" loext:marker-style-name="T12"><text:span text:style-name="T13">版本</text:span><text:span text:style-name="T12"/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可分段？</text:span></text:p>
            </table:table-cell>
            <table:table-cell table:style-name="表格52.A1" office:value-type="string">
              <text:p text:style-name="P21" loext:marker-style-name="T12"><text:span text:style-name="T43">PMTUD </text:span><text:span text:style-name="T13">必要性</text:span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0" loext:marker-style-name="T298"><text:span text:style-name="T255">IPv4</text:span><text:span text:style-name="T298"/></text:p>
          </table:table-cell>
          <table:table-cell table:style-name="表格52.A2" office:value-type="string">
            <text:p text:style-name="P20" loext:marker-style-name="T299"><text:span text:style-name="T300">✅ </text:span><text:span text:style-name="T70">可以（但不推薦）</text:span></text:p>
          </table:table-cell>
          <table:table-cell table:style-name="表格52.A2" office:value-type="string">
            <text:p text:style-name="P20" loext:marker-style-name="T14"><text:span text:style-name="T15">可選，但建議使用</text:span><text:span text:style-name="T14"/></text:p>
          </table:table-cell>
          <table:table-cell table:style-name="表格52.A2" office:value-type="string">
            <text:p text:style-name="P20" loext:marker-style-name="T14"><text:span text:style-name="T16">ICMP Fragmentation Needed</text:span><text:span text:style-name="T14"/></text:p>
          </table:table-cell>
        </table:table-row>
        <table:table-row table:style-name="表格52.1">
          <table:table-cell table:style-name="表格52.A3" office:value-type="string">
            <text:p text:style-name="P20" loext:marker-style-name="T298"><text:span text:style-name="T255">IPv6</text:span><text:span text:style-name="T298"/></text:p>
          </table:table-cell>
          <table:table-cell table:style-name="表格52.A3" office:value-type="string">
            <text:p text:style-name="P20" loext:marker-style-name="T299"><text:span text:style-name="T300">❌ </text:span><text:span text:style-name="T70">不行</text:span></text:p>
          </table:table-cell>
          <table:table-cell table:style-name="表格52.A3" office:value-type="string">
            <text:p text:style-name="P20" loext:marker-style-name="T14"><text:span text:style-name="T16">⚠️ </text:span><text:span text:style-name="T15">必須使用</text:span></text:p>
          </table:table-cell>
          <table:table-cell table:style-name="表格52.A3" office:value-type="string">
            <text:p text:style-name="P20" loext:marker-style-name="T14"><text:span text:style-name="T16">ICMPv6 Packet Too Big</text:span><text:span text:style-name="T14"/></text:p>
          </table:table-cell>
        </table:table-row>
      </table:table>
      <text:h text:style-name="P18" text:outline-level="2" loext:marker-style-name="T34"><text:span text:style-name="T35">拾參、</text:span><text:span text:style-name="T34">TCP </text:span><text:span text:style-name="T35">如何避免 </text:span><text:span text:style-name="T34">Fragmentation</text:span><text:span text:style-name="T35">？</text:span></text:h>
      <text:p text:style-name="P22" loext:marker-style-name="T21"><text:span text:style-name="T127">TCP </text:span><text:span text:style-name="T128">不依賴 </text:span><text:span text:style-name="T127">IP </text:span><text:span text:style-name="T128">層切封包，而是「自己先控制好大小」</text:span><text:span text:style-name="T20">，</text:span><text:span text:style-name="T84">讓 </text:span><text:span text:style-name="T83">IP </text:span><text:span text:style-name="T84">層根本不需要切</text:span><text:span text:style-name="T20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141">MSS</text:span><text:span text:style-name="T124">（</text:span><text:span text:style-name="T141">Maximum Segment Size</text:span><text:span text:style-name="T124">）：</text:span><text:span text:style-name="T301">MSS = MTU − IP Header − TCP Header </text:span><text:span text:style-name="T42">= </text:span><text:span text:style-name="T83">1500 − 20 − 20 = 1460 bytes</text:span><text:span text:style-name="T20">。</text:span><text:span text:style-name="T302">三向交握時雙方各自宣告 </text:span><text:span text:style-name="T303">MSS</text:span><text:span text:style-name="T302">，之後每段 ≤ </text:span><text:span text:style-name="T303">MSS</text:span><text:span text:style-name="T20">，</text:span><text:span text:style-name="T84">讓 </text:span><text:span text:style-name="T83">IP </text:span><text:span text:style-name="T84">層不需分段</text:span><text:span text:style-name="T20">。</text:span></text:p>
            <text:p text:style-name="P12"><text:span text:style-name="T124">搭配 </text:span><text:span text:style-name="T141">DF=1 + PMTUD</text:span><text:span text:style-name="T124">：</text:span><text:span text:style-name="T42">TCP </text:span><text:span text:style-name="T20">連線設 </text:span><text:span text:style-name="T42">DF=1 </text:span><text:span text:style-name="T20">禁止 </text:span><text:span text:style-name="T42">Router </text:span><text:span text:style-name="T20">分段；</text:span><text:span text:style-name="T169">若收到 </text:span><text:span text:style-name="T170">ICMP</text:span><text:span text:style-name="T169">「</text:span><text:span text:style-name="T170">Fragmentation Needed</text:span><text:span text:style-name="T169">」，自動調低 </text:span><text:span text:style-name="T170">MSS </text:span><text:span text:style-name="T169">重試</text:span><text:span text:style-name="T20">，最終找到整條路徑都能通過的最佳 </text:span><text:span text:style-name="T42">MSS</text:span><text:span text:style-name="T20">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7">✅ <text:s/></text:span><text:span text:style-name="T256">結論</text:span></text:p>
            <text:p text:style-name="P11" loext:marker-style-name="T21"><text:span text:style-name="T208">TCP = </text:span><text:span text:style-name="T207">主動控制大小（</text:span><text:span text:style-name="T208">MSS</text:span><text:span text:style-name="T207">）＋ </text:span><text:span text:style-name="T208">DF=1 </text:span><text:span text:style-name="T207">＋ </text:span><text:span text:style-name="T208">PMTUD</text:span><text:span text:style-name="T20">，</text:span><text:span text:style-name="T304">從源頭就避免 </text:span><text:span text:style-name="T301">Fragmentation </text:span><text:span text:style-name="T304">發生</text:span><text:span text:style-name="T20">。</text:span><text:span text:style-name="T283">TCP </text:span><text:span text:style-name="T282">做 </text:span><text:span text:style-name="T283">Segmentation </text:span><text:span text:style-name="T282">的主要目的之一，就是讓每個封包符合 </text:span><text:span text:style-name="T283">MTU</text:span><text:span text:style-name="T20">，從而避免 </text:span><text:span text:style-name="T42">IP </text:span><text:span text:style-name="T20">再做 </text:span><text:span text:style-name="T42">Fragmentation</text:span><text:span text:style-name="T20">。</text:span></text:p>
          </table:table-cell>
        </table:table-row>
      </table:table>
      <text:h text:style-name="P18" text:outline-level="2" loext:marker-style-name="T34"><text:span text:style-name="T35">拾肆、</text:span><text:span text:style-name="T34">Fragmentation DoS </text:span><text:span text:style-name="T35">攻擊</text:span></text:h>
      <text:p text:style-name="P22" loext:marker-style-name="T21"><text:span text:style-name="T169">攻擊者利用「接收端重組封包很耗資源」這個特性</text:span><text:span text:style-name="T20">，</text:span><text:span text:style-name="T128">刻意製造大量異常 </text:span><text:span text:style-name="T127">Fragment</text:span><text:span text:style-name="T20">。正常重組流程：收到 </text:span><text:span text:style-name="T42">Fragment </text:span><text:span text:style-name="T265">放入緩衝區 </text:span><text:span text:style-name="T20">→ </text:span><text:span text:style-name="T284">等同一 </text:span><text:span text:style-name="T285">ID </text:span><text:span text:style-name="T284">的所有 </text:span><text:span text:style-name="T285">Fragment </text:span><text:span text:style-name="T284">到齊 → 依</text:span><text:span text:style-name="T305"> </text:span><text:span text:style-name="T306">Offset </text:span><text:span text:style-name="T284">排序 → 拼回原始封包</text:span><text:span text:style-name="T20">；每步都消耗 </text:span><text:span text:style-name="T42">RAM </text:span><text:span text:style-name="T20">與 </text:span><text:span text:style-name="T42">CPU</text:span><text:span text:style-name="T20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1" loext:marker-style-name="T104"><text:span text:style-name="T105">攻擊手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做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後果</text:span><text:span text:style-name="T104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0" loext:marker-style-name="T164"><text:span text:style-name="T111">1 </text:span><text:span text:style-name="T110">不完整 </text:span><text:span text:style-name="T111">Fragment</text:span></text:p>
          </table:table-cell>
          <table:table-cell table:style-name="表格54.A2" office:value-type="string">
            <text:p text:style-name="P20" loext:marker-style-name="T106"><text:span text:style-name="T109">只送部分分段（缺其中一段）</text:span><text:span text:style-name="T106"/></text:p>
          </table:table-cell>
          <table:table-cell table:style-name="表格54.A2" office:value-type="string">
            <text:p text:style-name="P20" loext:marker-style-name="T106"><text:span text:style-name="T109">接收端一直等待不敢丟棄 → </text:span><text:span text:style-name="T108">RAM </text:span><text:span text:style-name="T109">持續被占用</text:span></text:p>
          </table:table-cell>
        </table:table-row>
        <table:table-row table:style-name="表格54.1">
          <table:table-cell table:style-name="表格54.A3" office:value-type="string">
            <text:p text:style-name="P20" loext:marker-style-name="T164"><text:span text:style-name="T111">2 Offset </text:span><text:span text:style-name="T110">重疊</text:span></text:p>
          </table:table-cell>
          <table:table-cell table:style-name="表格54.A3" office:value-type="string">
            <text:p text:style-name="P20" loext:marker-style-name="T106"><text:span text:style-name="T109">送出 </text:span><text:span text:style-name="T108">Offset </text:span><text:span text:style-name="T109">互相重疊的 </text:span><text:span text:style-name="T108">Fragment</text:span></text:p>
          </table:table-cell>
          <table:table-cell table:style-name="表格54.A3" office:value-type="string">
            <text:p text:style-name="P20" loext:marker-style-name="T106"><text:span text:style-name="T162">接收端須判斷哪個才是正確資料 </text:span><text:span text:style-name="T109">→ </text:span><text:span text:style-name="T108">CPU </text:span><text:span text:style-name="T109">暴增</text:span></text:p>
          </table:table-cell>
        </table:table-row>
        <table:table-row table:style-name="表格54.1">
          <table:table-cell table:style-name="表格54.A2" office:value-type="string">
            <text:p text:style-name="P20" loext:marker-style-name="T164"><text:span text:style-name="T111">3 </text:span><text:span text:style-name="T110">大量碎片</text:span></text:p>
          </table:table-cell>
          <table:table-cell table:style-name="表格54.A2" office:value-type="string">
            <text:p text:style-name="P20" loext:marker-style-name="T106"><text:span text:style-name="T109">送出數萬個 </text:span><text:span text:style-name="T108">Fragment</text:span><text:span text:style-name="T109">（同一 </text:span><text:span text:style-name="T108">ID</text:span><text:span text:style-name="T109">）</text:span></text:p>
          </table:table-cell>
          <table:table-cell table:style-name="表格54.A2" office:value-type="string">
            <text:p text:style-name="P20" loext:marker-style-name="T106"><text:span text:style-name="T109">開大量 </text:span><text:span text:style-name="T108">buffer</text:span><text:span text:style-name="T109">、持續重組 → </text:span><text:span text:style-name="T108">RAM </text:span><text:span text:style-name="T109">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7">🛡️ <text:s/></text:span><text:span text:style-name="T256">防禦方式</text:span></text:p>
            <text:p text:style-name="P11" loext:marker-style-name="T21"><text:span text:style-name="T20">防禦：</text:span><text:span text:style-name="T307">設定重組 </text:span><text:span text:style-name="T308">buffer </text:span><text:span text:style-name="T307">上限</text:span><text:span text:style-name="T20">避免無限占用記憶體；</text:span><text:span text:style-name="T188">丟棄等待過久或異常的 </text:span><text:span text:style-name="T187">Fragment</text:span><text:span text:style-name="T20">；</text:span><text:span text:style-name="T148">部署 </text:span><text:span text:style-name="T149">IDS / Firewall </text:span><text:span text:style-name="T148">偵測異常分段</text:span><text:span text:style-name="T20">模式。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1" loext:marker-style-name="T12"><text:span text:style-name="T13">技術概念</text:span><text:span text:style-name="T12"/></text:p>
            </table:table-cell>
            <table:table-cell table:style-name="表格55.A1" office:value-type="string">
              <text:p text:style-name="P21" loext:marker-style-name="T12"><text:span text:style-name="T13">白話比喻</text:span><text:span text:style-name="T12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0" loext:marker-style-name="T14"><text:span text:style-name="T16">MTU</text:span><text:span text:style-name="T14"/></text:p>
          </table:table-cell>
          <table:table-cell table:style-name="表格55.A2" office:value-type="string">
            <text:p text:style-name="P20" loext:marker-style-name="T14"><text:span text:style-name="T15">一個貨運箱子最多裝 </text:span><text:span text:style-name="T16">1500g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Fragmentation</text:span><text:span text:style-name="T14"/></text:p>
          </table:table-cell>
          <table:table-cell table:style-name="表格55.A3" office:value-type="string">
            <text:p text:style-name="P20" loext:marker-style-name="T14"><text:span text:style-name="T15">東西太重 → 分成好幾箱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Identification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每箱貼上同一個「訂單號碼」</text:span><text:span text:style-name="T298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299"><text:span text:style-name="T300">Fragment Offset</text:span><text:span text:style-name="T299"/></text:p>
          </table:table-cell>
          <table:table-cell table:style-name="表格55.A3" office:value-type="string">
            <text:p text:style-name="P20" loext:marker-style-name="T14"><text:span text:style-name="T15">每箱寫上「我是第幾克開始的貨」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14"><text:span text:style-name="T16">IPv4 / IPv6</text:span><text:span text:style-name="T14"/></text:p>
          </table:table-cell>
          <table:table-cell table:style-name="表格55.A2" office:value-type="string">
            <text:p text:style-name="P20" loext:marker-style-name="T14"><text:span text:style-name="T16">IPv4</text:span><text:span text:style-name="T15">：郵局可幫你分箱（但最好自己分）／ </text:span><text:span text:style-name="T16">IPv6</text:span><text:span text:style-name="T15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DF = 1</text:span><text:span text:style-name="T14"/></text:p>
          </table:table-cell>
          <table:table-cell table:style-name="表格55.A3" office:value-type="string">
            <text:p text:style-name="P20" loext:marker-style-name="T14"><text:span text:style-name="T15">貼上「禁止拆箱」標籤 → 太重就退件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309"><text:span text:style-name="T310">PMTUD</text:span><text:span text:style-name="T309"/></text:p>
          </table:table-cell>
          <table:table-cell table:style-name="表格55.A2" office:value-type="string">
            <text:p text:style-name="P20" loext:marker-style-name="T311"><text:span text:style-name="T312">先試寄 → 被退 → 知道上限 → 調整大小再寄</text:span><text:span text:style-name="T311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313"><text:span text:style-name="T314">TTL</text:span><text:span text:style-name="T313"/></text:p>
          </table:table-cell>
          <table:table-cell table:style-name="表格55.A3" office:value-type="string">
            <text:p text:style-name="P20" loext:marker-style-name="T315"><text:span text:style-name="T87">貨物限轉 </text:span><text:span text:style-name="T316">64 </text:span><text:span text:style-name="T87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MSS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你自己量好每箱重量，確保不超重</text:span><text:span text:style-name="T298"/></text:p>
          </table:table-cell>
        </table:table-row>
      </table:table>
      <text:h text:style-name="P17" text:outline-level="1" loext:marker-style-name="T32"><text:span text:style-name="T33">第 三 篇　</text:span><text:span text:style-name="T32">IPv4 → IPv6 </text:span><text:span text:style-name="T33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7">💡 <text:s/></text:span><text:span text:style-name="T30">為什麼要從 </text:span><text:span text:style-name="T31">IPv4 </text:span><text:span text:style-name="T30">換到 </text:span><text:span text:style-name="T31">IPv6</text:span><text:span text:style-name="T30">？</text:span></text:p>
            <text:p text:style-name="P11" loext:marker-style-name="T21"><text:span text:style-name="T42">IPv4 </text:span><text:span text:style-name="T20">在設計之初無法預料網路規模的爆炸性成長。隨著智慧型手機、</text:span><text:span text:style-name="T42">IoT </text:span><text:span text:style-name="T20">裝置大量普及，</text:span><text:span text:style-name="T42">IPv4 </text:span><text:span text:style-name="T20">位址已幾近耗盡，並衍生多項架構缺陷，因此 </text:span><text:span text:style-name="T42">IPv6 </text:span><text:span text:style-name="T20">誕生以從根本解決這些問題。但 </text:span><text:span text:style-name="T42">IPv4 </text:span><text:span text:style-name="T20">不會一夕消失，兩種協定長期並存，因此需要過渡技術。</text:span></text:p>
          </table:table-cell>
        </table:table-row>
      </table:table>
      <text:h text:style-name="P18" text:outline-level="2" loext:marker-style-name="T34"><text:span text:style-name="T35">一、</text:span><text:span text:style-name="T34">IPv4 vs IPv6 </text:span><text:span text:style-name="T35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57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57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57.A2" office:value-type="string">
            <text:p text:style-name="P20" loext:marker-style-name="T14"><text:span text:style-name="T75">32 bit</text:span><text:span text:style-name="T15">，約 </text:span><text:span text:style-name="T16">43 </text:span><text:span text:style-name="T15">億個 </text:span><text:span text:style-name="T16">IP</text:span><text:span text:style-name="T15">，已嚴重不足</text:span></text:p>
          </table:table-cell>
          <table:table-cell table:style-name="表格57.A2" office:value-type="string">
            <text:p text:style-name="P20" loext:marker-style-name="T14"><text:span text:style-name="T317">128 bit</text:span><text:span text:style-name="T15">，約 </text:span><text:span text:style-name="T16">3.4×10³⁸ </text:span><text:span text:style-name="T15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20" loext:marker-style-name="T14"><text:span text:style-name="T16">NAT </text:span><text:span text:style-name="T15">位址轉換</text:span></text:p>
          </table:table-cell>
          <table:table-cell table:style-name="表格57.A3" office:value-type="string">
            <text:p text:style-name="P20" loext:marker-style-name="T14"><text:span text:style-name="T120">需 </text:span><text:span text:style-name="T255">NAT </text:span><text:span text:style-name="T120">共用 </text:span><text:span text:style-name="T255">IP</text:span><text:span text:style-name="T15">，破壞 </text:span><text:span text:style-name="T16">End-to-End</text:span></text:p>
          </table:table-cell>
          <table:table-cell table:style-name="表格57.A3" office:value-type="string">
            <text:p text:style-name="P20" loext:marker-style-name="T14"><text:span text:style-name="T70">每裝置獨立公開 </text:span><text:span text:style-name="T300">IP</text:span><text:span text:style-name="T70">，不需 </text:span><text:span text:style-name="T300">NAT</text:span><text:span text:style-name="T15">，恢復 </text:span><text:span text:style-name="T16">E2E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57.A2" office:value-type="string">
            <text:p text:style-name="P20" loext:marker-style-name="T14"><text:span text:style-name="T15">無內建加密／驗證，</text:span><text:span text:style-name="T120">須另裝 </text:span><text:span text:style-name="T255">VPN</text:span></text:p>
          </table:table-cell>
          <table:table-cell table:style-name="表格57.A2" office:value-type="string">
            <text:p text:style-name="P20" loext:marker-style-name="T14"><text:span text:style-name="T318">支援 </text:span><text:span text:style-name="T319">IPsec</text:span><text:span text:style-name="T70">（加密＋驗證）</text:span><text:span text:style-name="T15">※ </text:span><text:span text:style-name="T16">RFC 6434 </text:span><text:span text:style-name="T15">後改建議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6">Header </text:span><text:span text:style-name="T15">結構</text:span></text:p>
          </table:table-cell>
          <table:table-cell table:style-name="表格57.A3" office:value-type="string">
            <text:p text:style-name="P20" loext:marker-style-name="T14"><text:span text:style-name="T120">可變長度</text:span><text:span text:style-name="T15">含 </text:span><text:span text:style-name="T16">Options</text:span><text:span text:style-name="T15">，</text:span><text:span text:style-name="T16">Router </text:span><text:span text:style-name="T15">效率低</text:span></text:p>
          </table:table-cell>
          <table:table-cell table:style-name="表格57.A3" office:value-type="string">
            <text:p text:style-name="P20" loext:marker-style-name="T14"><text:span text:style-name="T70">固定 </text:span><text:span text:style-name="T300">40 bytes </text:span><text:span text:style-name="T15">基本 </text:span><text:span text:style-name="T16">Header</text:span><text:span text:style-name="T15">，轉送更快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服務品質 </text:span><text:span text:style-name="T16">QoS</text:span></text:p>
          </table:table-cell>
          <table:table-cell table:style-name="表格57.A2" office:value-type="string">
            <text:p text:style-name="P20" loext:marker-style-name="T298"><text:span text:style-name="T120">無法有效標記流量優先權</text:span><text:span text:style-name="T298"/></text:p>
          </table:table-cell>
          <table:table-cell table:style-name="表格57.A2" office:value-type="string">
            <text:p text:style-name="P20" loext:marker-style-name="T14"><text:span text:style-name="T300">Flow Label </text:span><text:span text:style-name="T70">欄位</text:span><text:span text:style-name="T15">，</text:span><text:span text:style-name="T89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5">廣播方式</text:span><text:span text:style-name="T14"/></text:p>
          </table:table-cell>
          <table:table-cell table:style-name="表格57.A3" office:value-type="string">
            <text:p text:style-name="P20" loext:marker-style-name="T14"><text:span text:style-name="T255">Broadcast</text:span><text:span text:style-name="T15">：一次發給所有人，浪費頻寬</text:span></text:p>
          </table:table-cell>
          <table:table-cell table:style-name="表格57.A3" office:value-type="string">
            <text:p text:style-name="P20" loext:marker-style-name="T14"><text:span text:style-name="T15">改用</text:span><text:span text:style-name="T70"> </text:span><text:span text:style-name="T300">Multicast</text:span><text:span text:style-name="T70">（群播）／ </text:span><text:span text:style-name="T300">Anycast</text:span><text:span text:style-name="T70">（任播）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6">IP </text:span><text:span text:style-name="T15">配置方式</text:span></text:p>
          </table:table-cell>
          <table:table-cell table:style-name="表格57.A2" office:value-type="string">
            <text:p text:style-name="P20" loext:marker-style-name="T14"><text:span text:style-name="T87">需手動設定或 </text:span><text:span text:style-name="T316">DHCP</text:span><text:span text:style-name="T15">，管理繁瑣</text:span></text:p>
          </table:table-cell>
          <table:table-cell table:style-name="表格57.A2" office:value-type="string">
            <text:p text:style-name="P20" loext:marker-style-name="T14"><text:span text:style-name="T16">SLAAC </text:span><text:span text:style-name="T15">無狀態自動配置，</text:span><text:span text:style-name="T79">插網路即取得 </text:span><text:span text:style-name="T78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7">📌 <text:s/></text:span><text:span text:style-name="T80">補充：</text:span><text:span text:style-name="T177">IPsec </text:span><text:span text:style-name="T80">強制 </text:span><text:span text:style-name="T177">vs </text:span><text:span text:style-name="T80">建議</text:span></text:p>
            <text:p text:style-name="P11" loext:marker-style-name="T21"><text:span text:style-name="T42">IPv6 </text:span><text:span text:style-name="T20">早期規範（</text:span><text:span text:style-name="T42">RFC 2460</text:span><text:span text:style-name="T20">）將 </text:span><text:span text:style-name="T42">IPsec </text:span><text:span text:style-name="T20">列為「強制」；</text:span><text:span text:style-name="T42">2011 </text:span><text:span text:style-name="T20">年 </text:span><text:span text:style-name="T42">RFC 6434 </text:span><text:span text:style-name="T20">修訂後改為「建議（</text:span><text:span text:style-name="T42">SHOULD</text:span><text:span text:style-name="T20">）」。考試普遍仍以「原生支援 </text:span><text:span text:style-name="T42">IPsec</text:span><text:span text:style-name="T20">」作為 </text:span><text:span text:style-name="T42">IPv6 </text:span><text:span text:style-name="T20">改進特色，此處標注供參考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三種 </text:span><text:span text:style-name="T34">IPv4 → IPv6 </text:span><text:span text:style-name="T35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 loext:marker-style-name="T218"><text:span text:style-name="T40">① </text:span><text:span text:style-name="T219">Dual Stack</text:span><text:span text:style-name="T220">（雙協定堆疊）</text:span><text:span text:style-name="T41">— 最常用、最推薦</text:span></text:p>
            <text:p text:style-name="P12" loext:marker-style-name="T21"><text:span text:style-name="T320">裝置同時具備 </text:span><text:span text:style-name="T321">IPv4 </text:span><text:span text:style-name="T320">與 </text:span><text:span text:style-name="T321">IPv6 </text:span><text:span text:style-name="T320">兩套協定堆疊</text:span><text:span text:style-name="T20">。</text:span><text:span text:style-name="T83">DNS A record → </text:span><text:span text:style-name="T84">回傳 </text:span><text:span text:style-name="T83">IPv4</text:span><text:span text:style-name="T84">；</text:span><text:span text:style-name="T83">DNS AAAA record → </text:span><text:span text:style-name="T84">回傳 </text:span><text:span text:style-name="T83">IPv6</text:span><text:span text:style-name="T20">。連線時優先選用 </text:span><text:span text:style-name="T42">IPv6</text:span><text:span text:style-name="T20">，對端不支援則自動退回 </text:span><text:span text:style-name="T42">IPv4</text:span><text:span text:style-name="T20">。不需任何封包轉換，效能損耗最低。</text:span></text:p>
            <text:p text:style-name="P12" loext:marker-style-name="T21"><text:span text:style-name="T20">流程：輸入 </text:span><text:span text:style-name="T42">google.com → DNS </text:span><text:span text:style-name="T20">回傳 </text:span><text:span text:style-name="T42">A</text:span><text:span text:style-name="T20">＋</text:span><text:span text:style-name="T42">AAAA → </text:span><text:span text:style-name="T20">優先選 </text:span><text:span text:style-name="T42">IPv6 → </text:span><text:span text:style-name="T20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11" loext:marker-style-name="T322"><text:span text:style-name="T47">②</text:span><text:span text:style-name="T210"> Tunneling</text:span><text:span text:style-name="T209">（隧道技術）</text:span><text:span text:style-name="T46">— 過渡期橋接方案</text:span></text:p>
            <text:p text:style-name="P12" loext:marker-style-name="T21"><text:span text:style-name="T20">中間網路只支援 </text:span><text:span text:style-name="T42">IPv4</text:span><text:span text:style-name="T20">，無法直接傳送 </text:span><text:span text:style-name="T42">IPv6 </text:span><text:span text:style-name="T20">封包。解法：</text:span><text:span text:style-name="T320">將 </text:span><text:span text:style-name="T321">IPv6 </text:span><text:span text:style-name="T320">封包完整封裝進 </text:span><text:span text:style-name="T321">IPv4 </text:span><text:span text:style-name="T320">外殼，抵達目的地後拆除外層 </text:span><text:span text:style-name="T321">IPv4</text:span><text:span text:style-name="T320">、還原 </text:span><text:span text:style-name="T321">IPv6 </text:span><text:span text:style-name="T320">封包</text:span><text:span text:style-name="T20">。常見技術：</text:span><text:span text:style-name="T42">6in4</text:span><text:span text:style-name="T20">、</text:span><text:span text:style-name="T42">6to4</text:span><text:span text:style-name="T20">、</text:span><text:span text:style-name="T42">Teredo</text:span><text:span text:style-name="T20">、</text:span><text:span text:style-name="T42">ISATAP</text:span><text:span text:style-name="T20">。</text:span></text:p>
            <text:p text:style-name="P12" loext:marker-style-name="T21"><text:span text:style-name="T20">示意：</text:span><text:span text:style-name="T42">[ IPv4 </text:span><text:span text:style-name="T20">外層 </text:span><text:span text:style-name="T42">Header ][ IPv6 </text:span><text:span text:style-name="T20">封包（完整保留）</text:span><text:span text:style-name="T42">] → </text:span><text:span text:style-name="T20">目的地拆除外殼 → 還原 </text:span><text:span text:style-name="T42">IPv6</text:span><text:span text:style-name="T20">。</text:span></text:p>
          </table:table-cell>
        </table:table-row>
        <table:table-row table:style-name="表格58.1">
          <table:table-cell table:style-name="表格58.A3" office:value-type="string">
            <text:p text:style-name="P11" loext:marker-style-name="T323"><text:span text:style-name="T167">③ </text:span><text:span text:style-name="T206">Translation</text:span><text:span text:style-name="T205">（</text:span><text:span text:style-name="T206">NAT64</text:span><text:span text:style-name="T205">）</text:span><text:span text:style-name="T168">— 協定轉換、互通最後手段</text:span></text:p>
            <text:p text:style-name="P12" loext:marker-style-name="T21"><text:span text:style-name="T20">適用場景：</text:span><text:span text:style-name="T42">IPv6-only </text:span><text:span text:style-name="T20">裝置需與 </text:span><text:span text:style-name="T42">IPv4-only </text:span><text:span text:style-name="T20">裝置直接通訊。</text:span><text:span text:style-name="T304">透過轉換閘道器即時將封包表頭轉換為對方格式</text:span><text:span text:style-name="T20">。代表技術：</text:span><text:span text:style-name="T42">NAT64 + DNS64</text:span><text:span text:style-name="T20">。</text:span><text:span text:style-name="T158">複雜度最高，有額外效能損耗</text:span><text:span text:style-name="T20">。</text:span></text:p>
            <text:p text:style-name="P12" loext:marker-style-name="T21"><text:span text:style-name="T20">示意：</text:span><text:span text:style-name="T42">IPv6 </text:span><text:span text:style-name="T20">裝置 → </text:span><text:span text:style-name="T42">[ NAT64 </text:span><text:span text:style-name="T265">轉換閘道</text:span><text:span text:style-name="T20"> </text:span><text:span text:style-name="T42">] → IPv4 </text:span><text:span text:style-name="T20">裝置（雙向互轉）。</text:span></text:p>
          </table:table-cell>
        </table:table-row>
      </table:table>
      <text:h text:style-name="P18" text:outline-level="2" loext:marker-style-name="T34"><text:span text:style-name="T35">三、生活比喻（一次記住）</text:span><text:span text:style-name="T34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1" loext:marker-style-name="T48"><text:span text:style-name="T49">技術</text:span><text:span text:style-name="T48"/></text:p>
            </table:table-cell>
            <table:table-cell table:style-name="表格59.A1" office:value-type="string">
              <text:p text:style-name="P21" loext:marker-style-name="T48"><text:span text:style-name="T49">生活比喻</text:span><text:span text:style-name="T48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0" loext:marker-style-name="T51"><text:span text:style-name="T53">Dual Stack</text:span><text:span text:style-name="T51"/></text:p>
          </table:table-cell>
          <table:table-cell table:style-name="表格59.A2" office:value-type="string">
            <text:p text:style-name="P20" loext:marker-style-name="T51"><text:span text:style-name="T52">你</text:span><text:span text:style-name="T324">同時會中文 </text:span><text:span text:style-name="T325">+ </text:span><text:span text:style-name="T324">英文</text:span><text:span text:style-name="T52">，遇到誰說哪個</text:span><text:soft-page-break/></text:p>
          </table:table-cell>
        </table:table-row>
        <table:table-row table:style-name="表格59.1">
          <table:table-cell table:style-name="表格59.A3" office:value-type="string">
            <text:p text:style-name="P20" loext:marker-style-name="T51"><text:span text:style-name="T53">Tunneling</text:span><text:span text:style-name="T51"/></text:p>
          </table:table-cell>
          <table:table-cell table:style-name="表格59.A3" office:value-type="string">
            <text:p text:style-name="P20" loext:marker-style-name="T51"><text:span text:style-name="T326">把英文信裝進中文信封偷渡過去</text:span><text:span text:style-name="T52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20" loext:marker-style-name="T51"><text:span text:style-name="T53">Translation</text:span><text:span text:style-name="T51"/></text:p>
          </table:table-cell>
          <table:table-cell table:style-name="表格59.A2" office:value-type="string">
            <text:p text:style-name="P20" loext:marker-style-name="T51"><text:span text:style-name="T327">現場請翻譯員</text:span><text:span text:style-name="T52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7">🏠 <text:s/></text:span><text:span text:style-name="T30">用「寄信</text:span><text:span text:style-name="T31">/</text:span><text:span text:style-name="T30">門牌」理解</text:span></text:p>
            <text:p text:style-name="P11"><text:span text:style-name="T126">IPv4 </text:span><text:span text:style-name="T125">的困境：整棟公寓共用一個門牌</text:span><text:span text:style-name="T328">（</text:span><text:span text:style-name="T329">NAT</text:span><text:span text:style-name="T328">）</text:span><text:span text:style-name="T20">，郵差只送到大門，裡面誰是誰要另外猜；地址快用光還在借號碼。</text:span></text:p>
            <text:p text:style-name="P12"><text:span text:style-name="T170">IPv6 </text:span><text:span text:style-name="T169">的世界：每個人都有獨立門牌（公開 </text:span><text:span text:style-name="T170">IP</text:span><text:span text:style-name="T169">）</text:span><text:span text:style-name="T20">，地址多到用不完，郵件直接送到本人手上，不需中間人轉達。</text:span></text:p>
          </table:table-cell>
          <table:covered-table-cell/>
        </table:table-row>
      </table:table>
      <text:h text:style-name="P18" text:outline-level="2" loext:marker-style-name="T34"><text:span text:style-name="T35">四、考試速記版</text:span><text:span text:style-name="T34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7">🧠 <text:s/></text:span><text:span text:style-name="T166">一句話記憶法</text:span></text:p>
            <text:p text:style-name="P11"><text:span text:style-name="T167">IPv6 </text:span><text:span text:style-name="T168">特點：</text:span><text:span text:style-name="T20">大（</text:span><text:span text:style-name="T42">128 bit</text:span><text:span text:style-name="T20">）＋ </text:span><text:span text:style-name="T330">安全（</text:span><text:span text:style-name="T331">IPsec</text:span><text:span text:style-name="T330">）</text:span><text:span text:style-name="T20">＋ </text:span><text:span text:style-name="T215">快（固定 </text:span><text:span text:style-name="T262">Header</text:span><text:span text:style-name="T215">）</text:span><text:span text:style-name="T20">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205">過渡技術</text:span><text:span text:style-name="T168">：</text:span><text:span text:style-name="T20">雙語（</text:span><text:span text:style-name="T83">Dual Stack</text:span><text:span text:style-name="T20">）＋ 偽裝（</text:span><text:span text:style-name="T83">Tunneling</text:span><text:span text:style-name="T20">）＋ 翻譯（</text:span><text:span text:style-name="T83">Translation</text:span><text:span text:style-name="T20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 loext:marker-style-name="T12"><text:span text:style-name="T43">IPv4 </text:span><text:span text:style-name="T13">七大問題</text:span></text:p>
          </table:table-cell>
          <table:table-cell table:style-name="表格60.A2" office:value-type="string">
            <text:p text:style-name="P7" loext:marker-style-name="T12"><text:span text:style-name="T43">IPv6 </text:span><text:span text:style-name="T13">七大改進</text:span></text:p>
          </table:table-cell>
        </table:table-row>
        <table:table-row table:style-name="表格60.1">
          <table:table-cell table:style-name="表格60.A3" office:value-type="string">
            <text:p text:style-name="P20" loext:marker-style-name="T14"><text:span text:style-name="T15">位址不足（</text:span><text:span text:style-name="T16">32 bit</text:span><text:span text:style-name="T15">）／需 </text:span><text:span text:style-name="T16">NAT </text:span><text:span text:style-name="T15">破壞 </text:span><text:span text:style-name="T16">E2E</text:span><text:span text:style-name="T15">／無加密驗證／</text:span><text:span text:style-name="T332">Header </text:span><text:span text:style-name="T333">可變效率低</text:span><text:span text:style-name="T15">／缺 </text:span><text:span text:style-name="T16">QoS</text:span><text:span text:style-name="T15">／用 </text:span><text:span text:style-name="T16">Broadcast </text:span><text:span text:style-name="T15">浪費／</text:span><text:span text:style-name="T16">IP </text:span><text:span text:style-name="T15">需手動設定</text:span></text:p>
          </table:table-cell>
          <table:table-cell table:style-name="表格60.A3" office:value-type="string">
            <text:p text:style-name="P20" loext:marker-style-name="T14"><text:span text:style-name="T16">128 bit </text:span><text:span text:style-name="T15">近乎無限／不需 </text:span><text:span text:style-name="T16">NAT </text:span><text:span text:style-name="T15">恢復 </text:span><text:span text:style-name="T16">E2E</text:span><text:span text:style-name="T15">／</text:span><text:span text:style-name="T318">支援 </text:span><text:span text:style-name="T319">IPsec</text:span><text:span text:style-name="T15">／</text:span><text:span text:style-name="T318">固定 </text:span><text:span text:style-name="T319">40 bytes </text:span><text:span text:style-name="T318">轉送快</text:span><text:span text:style-name="T15">／</text:span><text:span text:style-name="T16">Flow Label </text:span><text:span text:style-name="T15">支援 </text:span><text:span text:style-name="T16">QoS</text:span><text:span text:style-name="T15">／改用 </text:span><text:span text:style-name="T16">Multicast/Anycast</text:span><text:span text:style-name="T15">／</text:span><text:span text:style-name="T16">SLAAC </text:span><text:span text:style-name="T15">自動配置</text:span></text:p>
          </table:table-cell>
        </table:table-row>
      </table:table>
      <text:h text:style-name="P17" text:outline-level="1" loext:marker-style-name="T32"><text:span text:style-name="T33">第 四 篇　</text:span><text:span text:style-name="T32">ARP</text:span><text:span text:style-name="T33">、</text:span><text:span text:style-name="T32">NAT </text:span><text:span text:style-name="T33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7">🔑 <text:s/></text:span><text:span text:style-name="T30">最基礎的比喻，先懂這個</text:span></text:p>
            <text:p text:style-name="P11" loext:marker-style-name="T21"><text:span text:style-name="T42">IP </text:span><text:span text:style-name="T20">位址決定「最終送到哪台電腦」；</text:span><text:span text:style-name="T42">MAC </text:span><text:span text:style-name="T20">位址決定「目前這一跳要交給哪個網路設備」。</text:span></text:p>
            <text:p text:style-name="P12" loext:marker-style-name="T21"><text:span text:style-name="T296">資料在網路中「實際傳送」靠 </text:span><text:span text:style-name="T297">MAC</text:span><text:span text:style-name="T20">，</text:span><text:span text:style-name="T282">但我們只知道對方的 </text:span><text:span text:style-name="T283">IP</text:span><text:span text:style-name="T42">——</text:span><text:span text:style-name="T20">所以</text:span><text:span text:style-name="T125">需要一個轉換機制</text:span><text:span text:style-name="T20">，這就是 </text:span><text:span text:style-name="T42">ARP </text:span><text:span text:style-name="T20">的工作。</text:span></text:p>
          </table:table-cell>
        </table:table-row>
      </table:table>
      <text:h text:style-name="P18" text:outline-level="2" loext:marker-style-name="T34"><text:span text:style-name="T35">一、</text:span><text:span text:style-name="T34">ARP</text:span><text:span text:style-name="T35">（</text:span><text:span text:style-name="T34">Address Resolution Protocol</text:span><text:span text:style-name="T35">）：</text:span><text:span text:style-name="T334">IP → MAC</text:span></text:h>
      <text:p text:style-name="P22" loext:marker-style-name="T21"><text:span text:style-name="T20">一句話定義：</text:span><text:span text:style-name="T85">ARP</text:span><text:span text:style-name="T42"> </text:span><text:span text:style-name="T20">＝ </text:span><text:span text:style-name="T128">用 </text:span><text:span text:style-name="T127">IP </text:span><text:span text:style-name="T128">找 </text:span><text:span text:style-name="T127">MAC</text:span><text:span text:style-name="T20">，</text:span><text:span text:style-name="T169">只在同一個區域網路（</text:span><text:span text:style-name="T170">LAN</text:span><text:span text:style-name="T169">）內使用</text:span><text:span text:style-name="T20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7">📋 <text:s/></text:span><text:span text:style-name="T31">ARP </text:span><text:span text:style-name="T30">運作流程（考試必考）</text:span></text:p>
            <text:p text:style-name="P11"><text:span text:style-name="T141">① </text:span><text:span text:style-name="T123">查 </text:span><text:span text:style-name="T122">ARP Cache</text:span><text:span text:style-name="T123">（筆記本）</text:span><text:span text:style-name="T124">：</text:span><text:span text:style-name="T20">先查自己的記錄「</text:span><text:span text:style-name="T335">我之前有沒有問過這個 </text:span><text:span text:style-name="T336">IP</text:span><text:span text:style-name="T335">？</text:span><text:span text:style-name="T20">」有 → 直接用。</text:span></text:p>
            <text:p text:style-name="P12"><text:span text:style-name="T141">② </text:span><text:span text:style-name="T123">發出 </text:span><text:span text:style-name="T122">ARP Request</text:span><text:span text:style-name="T123">（廣播）</text:span><text:span text:style-name="T124">：</text:span><text:span text:style-name="T20">沒記錄 →</text:span><text:span text:style-name="T284"> 對整個區網廣播</text:span><text:span text:style-name="T20">「誰是 </text:span><text:span text:style-name="T42">192.168.1.5</text:span><text:span text:style-name="T20">？</text:span><text:span text:style-name="T284">請告訴我你的 </text:span><text:span text:style-name="T285">MAC</text:span><text:span text:style-name="T284">！</text:span><text:span text:style-name="T20">」所有機器都收到。</text:span></text:p>
            <text:p text:style-name="P12"><text:span text:style-name="T141">③ </text:span><text:span text:style-name="T123">收到 </text:span><text:span text:style-name="T122">ARP Reply</text:span><text:span text:style-name="T123">（單播回應）</text:span><text:span text:style-name="T124">：</text:span><text:span text:style-name="T178">IP </text:span><text:span text:style-name="T154">是 </text:span><text:span text:style-name="T178">192.168.1.5 </text:span><text:span text:style-name="T154">的機器回應「我是！</text:span><text:span text:style-name="T178">MAC </text:span><text:span text:style-name="T154">是 </text:span><text:span text:style-name="T178">AA:BB:CC</text:span><text:span text:style-name="T154">」</text:span><text:span text:style-name="T20">，其餘機器靜默忽略。</text:span></text:p>
            <text:p text:style-name="P12"><text:span text:style-name="T141">④ </text:span><text:span text:style-name="T123">存進 </text:span><text:span text:style-name="T122">ARP Cache</text:span><text:span text:style-name="T124">：</text:span><text:span text:style-name="T249">把「</text:span><text:span text:style-name="T248">IP ↔ MAC</text:span><text:span text:style-name="T249">」對應記下</text:span><text:span text:style-name="T20">，</text:span><text:span text:style-name="T169">下次直接用</text:span><text:span text:style-name="T20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1" loext:marker-style-name="T12"><text:span text:style-name="T13">項目</text:span><text:span text:style-name="T12"/></text:p>
          </table:table-cell>
          <table:table-cell table:style-name="表格62.A2" office:value-type="string">
            <text:p text:style-name="P21" loext:marker-style-name="T12"><text:span text:style-name="T13">內容</text:span><text:span text:style-name="T12"/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37"><text:span text:style-name="T338">ARP Spoofing</text:span><text:span text:style-name="T339">（</text:span><text:span text:style-name="T338">ARP </text:span><text:span text:style-name="T339">欺騙）</text:span></text:p>
          </table:table-cell>
          <table:table-cell table:style-name="表格62.A3" office:value-type="string">
            <text:p text:style-name="P20" loext:marker-style-name="T14"><text:span text:style-name="T340">攻擊者</text:span><text:span text:style-name="T341">假冒他人</text:span><text:span text:style-name="T340">的 </text:span><text:span text:style-name="T317">MAC</text:span><text:span text:style-name="T340">，讓封包被送到錯的地方</text:span><text:span text:style-name="T15"> → 中間人攻擊（</text:span><text:span text:style-name="T16">MITM</text:span><text:span text:style-name="T15">）</text:span></text:p>
          </table:table-cell>
        </table:table-row>
        <table:table-row table:style-name="表格62.1">
          <table:table-cell table:style-name="表格62.A4" office:value-type="string">
            <text:p text:style-name="P20" loext:marker-style-name="T298"><text:span text:style-name="T255">arp -a</text:span><text:span text:style-name="T298"/></text:p>
          </table:table-cell>
          <table:table-cell table:style-name="表格62.A4" office:value-type="string">
            <text:p text:style-name="P20" loext:marker-style-name="T14"><text:span text:style-name="T342">查看本機的 </text:span><text:span text:style-name="T343">ARP </text:span><text:span text:style-name="T342">對應表</text:span><text:span text:style-name="T15">（</text:span><text:span text:style-name="T344">IP ↔ MAC </text:span><text:span text:style-name="T345">清單</text:span><text:span text:style-name="T15">）</text:span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46"><text:span text:style-name="T319">ping [IP]</text:span><text:span text:style-name="T346"/></text:p>
          </table:table-cell>
          <table:table-cell table:style-name="表格62.A3" office:value-type="string">
            <text:p text:style-name="P20" loext:marker-style-name="T14"><text:span text:style-name="T79">觸發 </text:span><text:span text:style-name="T78">ARP </text:span><text:span text:style-name="T79">運作</text:span><text:span text:style-name="T15">，</text:span><text:span text:style-name="T76">讓電腦主動查詢對應 </text:span><text:span text:style-name="T75">MAC</text:span></text:p>
          </table:table-cell>
        </table:table-row>
      </table:table>
      <text:h text:style-name="P18" text:outline-level="2" loext:marker-style-name="T34"><text:span text:style-name="T35">二、</text:span><text:span text:style-name="T34">NAT</text:span><text:span text:style-name="T35">（</text:span><text:span text:style-name="T34">Network Address Translation</text:span><text:span text:style-name="T35">）：私網 → 公網</text:span></text:h>
      <text:p text:style-name="P22" loext:marker-style-name="T21"><text:span text:style-name="T20">一句話定義：</text:span><text:span text:style-name="T83">NAT</text:span><text:span text:style-name="T42"> </text:span><text:span text:style-name="T20">＝ </text:span><text:span text:style-name="T335">路由器幫你把「私有 </text:span><text:span text:style-name="T336">IP</text:span><text:span text:style-name="T335">」改成「公網 </text:span><text:span text:style-name="T336">IP</text:span><text:span text:style-name="T335">」</text:span><text:span text:style-name="T20">，讓內部機器能夠上網。</text:span><text:span text:style-name="T154">私有 </text:span><text:span text:style-name="T178">IP</text:span><text:span text:style-name="T154">（如 </text:span><text:span text:style-name="T178">192.168.1.2</text:span><text:span text:style-name="T154">）外網看不到，只在家裡用</text:span><text:span text:style-name="T20">；路由器的公網 </text:span><text:span text:style-name="T42">IP</text:span><text:span text:style-name="T20">（</text:span><text:span text:style-name="T42">220.x.x.x</text:span><text:span text:style-name="T20">，</text:span><text:span text:style-name="T42">ISP </text:span><text:span text:style-name="T20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7">▸ <text:s/></text:span><text:span text:style-name="T31">NAT </text:span><text:span text:style-name="T30">運作流程</text:span></text:p>
            <text:p text:style-name="P11" loext:marker-style-name="T21"><text:span text:style-name="T42">① </text:span><text:span text:style-name="T20">你的電腦（</text:span><text:span text:style-name="T42">192.168.1.2</text:span><text:span text:style-name="T20">）發送資料給 </text:span><text:span text:style-name="T42">Google → ② </text:span><text:span text:style-name="T125">封包抵達路由器</text:span><text:span text:style-name="T20">，</text:span><text:span text:style-name="T170">NAT </text:span><text:span text:style-name="T169">把來源 </text:span><text:span text:style-name="T170">IP </text:span><text:span text:style-name="T169">改成公網 </text:span><text:span text:style-name="T170">IP</text:span><text:span text:style-name="T169">（</text:span><text:span text:style-name="T170">220.x.x.x</text:span><text:span text:style-name="T169">）</text:span><text:span text:style-name="T215">對外偽裝身份</text:span><text:span text:style-name="T20"> → ③ </text:span><text:span text:style-name="T42">Google </text:span><text:span text:style-name="T20">收到，回應給公網 </text:span><text:span text:style-name="T42">IP</text:span><text:span text:style-name="T20">（</text:span><text:span text:style-name="T42">220.x.x.x</text:span><text:span text:style-name="T20">）→ ④ 路由器把目的地 </text:span><text:span text:style-name="T42">IP </text:span><text:span text:style-name="T20">換回 </text:span><text:span text:style-name="T42">192.168.1.2</text:span><text:span text:style-name="T20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1" loext:marker-style-name="T12"><text:span text:style-name="T13">類型</text:span><text:span text:style-name="T12"/></text:p>
          </table:table-cell>
          <table:table-cell table:style-name="表格63.A2" office:value-type="string">
            <text:p text:style-name="P21" loext:marker-style-name="T12"><text:span text:style-name="T13">中文</text:span><text:span text:style-name="T12"/></text:p>
          </table:table-cell>
          <table:table-cell table:style-name="表格63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63.A2" office:value-type="string">
            <text:p text:style-name="P21" loext:marker-style-name="T12"><text:span text:style-name="T13">特點</text:span><text:span text:style-name="T12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299"><text:span text:style-name="T300">Static NAT</text:span><text:span text:style-name="T299"/></text:p>
          </table:table-cell>
          <table:table-cell table:style-name="表格63.A3" office:value-type="string">
            <text:p text:style-name="P20" loext:marker-style-name="T14"><text:span text:style-name="T15">靜態 </text:span><text:span text:style-name="T16">NAT</text:span></text:p>
          </table:table-cell>
          <table:table-cell table:style-name="表格63.A3" office:value-type="string">
            <text:p text:style-name="P20" loext:marker-style-name="T347"><text:span text:style-name="T348">一個私有 </text:span><text:span text:style-name="T349">IP ↔ </text:span><text:span text:style-name="T348">一個公網 </text:span><text:span text:style-name="T349">IP</text:span></text:p>
          </table:table-cell>
          <table:table-cell table:style-name="表格63.A3" office:value-type="string">
            <text:p text:style-name="P20" loext:marker-style-name="T347"><text:span text:style-name="T348">固定對應</text:span><text:span text:style-name="T347"/></text:p>
          </table:table-cell>
        </table:table-row>
        <table:table-row table:style-name="表格63.1">
          <table:table-cell table:style-name="表格63.A4" office:value-type="string">
            <text:p text:style-name="P20" loext:marker-style-name="T299"><text:span text:style-name="T300">Dynamic NAT</text:span><text:span text:style-name="T299"/></text:p>
          </table:table-cell>
          <table:table-cell table:style-name="表格63.A4" office:value-type="string">
            <text:p text:style-name="P20" loext:marker-style-name="T14"><text:span text:style-name="T15">動態 </text:span><text:span text:style-name="T16">NAT</text:span></text:p>
          </table:table-cell>
          <table:table-cell table:style-name="表格63.A4" office:value-type="string">
            <text:p text:style-name="P20" loext:marker-style-name="T350"><text:span text:style-name="T351">多個私有 </text:span><text:span text:style-name="T352">IP </text:span><text:span text:style-name="T351">對應 </text:span><text:span text:style-name="T352">IP </text:span><text:span text:style-name="T351">池（</text:span><text:span text:style-name="T352">pool</text:span><text:span text:style-name="T351">）</text:span></text:p>
          </table:table-cell>
          <table:table-cell table:style-name="表格63.A4" office:value-type="string">
            <text:p text:style-name="P20" loext:marker-style-name="T350"><text:span text:style-name="T351">動態分配</text:span><text:span text:style-name="T350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337"><text:span text:style-name="T338">PAT</text:span><text:span text:style-name="T337"/></text:p>
          </table:table-cell>
          <table:table-cell table:style-name="表格63.A3" office:value-type="string">
            <text:p text:style-name="P20" loext:marker-style-name="T14"><text:span text:style-name="T15">連接埠位址轉換</text:span><text:span text:style-name="T14"/></text:p>
          </table:table-cell>
          <table:table-cell table:style-name="表格63.A3" office:value-type="string">
            <text:p text:style-name="P20" loext:marker-style-name="T353"><text:span text:style-name="T354">多台共用一個公網 </text:span><text:span text:style-name="T355">IP</text:span></text:p>
          </table:table-cell>
          <table:table-cell table:style-name="表格63.A3" office:value-type="string">
            <text:p text:style-name="P20" loext:marker-style-name="T353"><text:span text:style-name="T354">靠 </text:span><text:span text:style-name="T355">Port </text:span><text:span text:style-name="T354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7">⚠️ <text:s/></text:span><text:span text:style-name="T177">NAT </text:span><text:span text:style-name="T80">的缺點（考試超愛）</text:span></text:p>
            <text:p text:style-name="P11"><text:span text:style-name="T296">破壞 </text:span><text:span text:style-name="T297">End-to-End </text:span><text:span text:style-name="T296">連線</text:span><text:span text:style-name="T46">（最重要）：</text:span><text:span text:style-name="T20">原本你↔對方是真正點對點；</text:span><text:span text:style-name="T84">有 </text:span><text:span text:style-name="T83">NAT </text:span><text:span text:style-name="T84">後變成你→</text:span><text:span text:style-name="T83">NAT→</text:span><text:span text:style-name="T84">對方，多一層轉換，不再是端對端</text:span><text:span text:style-name="T20">。</text:span></text:p>
            <text:p text:style-name="P12"><text:span text:style-name="T297">P2P / VoIP </text:span><text:span text:style-name="T296">難以運作</text:span><text:span text:style-name="T46">：</text:span><text:span text:style-name="T169">外部機器找不到你（被藏在 </text:span><text:span text:style-name="T170">NAT </text:span><text:span text:style-name="T169">後）</text:span><text:span text:style-name="T20">，</text:span><text:span text:style-name="T42">P2P </text:span><text:span text:style-name="T20">下載、</text:span><text:span text:style-name="T42">VoIP </text:span><text:span text:style-name="T20">通話等</text:span><text:span text:style-name="T356">直連功能受限</text:span><text:span text:style-name="T20">。</text:span></text:p>
            <text:p text:style-name="P12"><text:span text:style-name="T296">增加延遲</text:span><text:span text:style-name="T46">：</text:span><text:span text:style-name="T357">每個封包都需要</text:span><text:span text:style-name="T358">多一道 </text:span><text:span text:style-name="T359">IP </text:span><text:span text:style-name="T358">轉換處理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oft-page-break/><text:span text:style-name="T35">三、解決 </text:span><text:span text:style-name="T34">NAT </text:span><text:span text:style-name="T35">限制的三種方法</text:span></text:h>
      <text:p text:style-name="P22" loext:marker-style-name="T21"><text:span text:style-name="T84">核心問題</text:span><text:span text:style-name="T20">：</text:span><text:span text:style-name="T125">外面的人只看到一個公網 </text:span><text:span text:style-name="T126">IP</text:span><text:span text:style-name="T20">，但</text:span><text:span text:style-name="T360">內部有多台機器，路由器不知道要轉給哪一台</text:span><text:span text:style-name="T20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1" loext:marker-style-name="T121"><text:span text:style-name="T124">方法一：</text:span><text:span text:style-name="T122">Port Forwarding</text:span><text:span text:style-name="T123">（手動指定轉發）</text:span></text:p>
            <text:p text:style-name="P12" loext:marker-style-name="T21"><text:span text:style-name="T20">比喻：</text:span><text:span text:style-name="T283">Port</text:span><text:span text:style-name="T282">＝房間號碼</text:span><text:span text:style-name="T20">；</text:span><text:span text:style-name="T336">NAT </text:span><text:span text:style-name="T335">路由器＝大樓</text:span><text:span text:style-name="T20">；</text:span><text:span text:style-name="T283">Port Forwarding</text:span><text:span text:style-name="T282">＝門口指示牌「</text:span><text:span text:style-name="T283">80 </text:span><text:span text:style-name="T282">號房 → </text:span><text:span text:style-name="T283">192.168.1.2</text:span><text:span text:style-name="T282">」</text:span><text:span text:style-name="T20">。例：</text:span><text:span text:style-name="T42">220.x.x.x:80 → 192.168.1.2:80</text:span><text:span text:style-name="T20">（</text:span><text:span text:style-name="T361">網頁</text:span><text:span text:style-name="T20">）；</text:span><text:span text:style-name="T42">220.x.x.x:25565 → 192.168.1.2:25565</text:span><text:span text:style-name="T20">（</text:span><text:span text:style-name="T42">Minecraft</text:span><text:span text:style-name="T20">）。</text:span></text:p>
            <text:p text:style-name="P12"><text:span text:style-name="T82">優點：</text:span><text:span text:style-name="T20">設定直接、穩定，可精確控制。</text:span><text:span text:style-name="T82">缺點：</text:span><text:span text:style-name="T265">每個服務都要手動設定，</text:span><text:span text:style-name="T264">IP </text:span><text:span text:style-name="T265">改變要重設</text:span><text:span text:style-name="T20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11" loext:marker-style-name="T218"><text:span text:style-name="T41">方法二：</text:span><text:span text:style-name="T219">UPnP</text:span><text:span text:style-name="T220">（自動版 </text:span><text:span text:style-name="T219">Port Forwarding</text:span><text:span text:style-name="T220">）</text:span></text:p>
            <text:p text:style-name="P12" loext:marker-style-name="T21"><text:span text:style-name="T362">讓裝置自動跟</text:span><text:span text:style-name="T363">路由器</text:span><text:span text:style-name="T362">要求「幫我開一個 </text:span><text:span text:style-name="T364">Port</text:span><text:span text:style-name="T362">」，不需人工設定。</text:span><text:span text:style-name="T20">① </text:span><text:span text:style-name="T365">應用程式發 </text:span><text:span text:style-name="T366">UPnP </text:span><text:span text:style-name="T365">請求</text:span><text:span text:style-name="T20"> → ② </text:span><text:span text:style-name="T367">路由器</text:span><text:span text:style-name="T365">自動新增 </text:span><text:span text:style-name="T366">Port Forwarding </text:span><text:span text:style-name="T365">規則</text:span><text:span text:style-name="T20"> → ③</text:span><text:span text:style-name="T368"> 服務結束後自動清除</text:span><text:span text:style-name="T20">（理想情況）。</text:span></text:p>
            <text:p text:style-name="P12"><text:span text:style-name="T82">優點：</text:span><text:span text:style-name="T20">全自動、對一般用戶友善。</text:span><text:span text:style-name="T250">安全風險（重要）：</text:span><text:span text:style-name="T265">惡意程式也能透過 </text:span><text:span text:style-name="T264">UPnP </text:span><text:span text:style-name="T265">自動開 </text:span><text:span text:style-name="T264">Port</text:span><text:span text:style-name="T265">，可能讓攻擊者直接連入內網</text:span><text:span text:style-name="T20">。建議不需要時關閉 </text:span><text:span text:style-name="T42">UPnP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11" loext:marker-style-name="T323"><text:span text:style-name="T168">方法三：</text:span><text:span text:style-name="T206">STUN</text:span><text:span text:style-name="T205">（打洞技術）</text:span></text:p>
            <text:p text:style-name="P12" loext:marker-style-name="T21"><text:span text:style-name="T84">使用情境</text:span><text:span text:style-name="T20">：</text:span><text:span text:style-name="T369">兩端都在各自 </text:span><text:span text:style-name="T370">NAT </text:span><text:span text:style-name="T369">後面，彼此都是私有 </text:span><text:span text:style-name="T370">IP</text:span><text:span text:style-name="T369">、互相找不到。</text:span><text:span text:style-name="T370">STUN </text:span><text:span text:style-name="T369">先幫每端「查清楚自己對外的公網 </text:span><text:span text:style-name="T370">IP + Port</text:span><text:span text:style-name="T369">」，再交換資訊</text:span><text:span text:style-name="T20">嘗試直接打通。</text:span></text:p>
            <text:p text:style-name="P12" loext:marker-style-name="T21"><text:span text:style-name="T42">① </text:span><text:span text:style-name="T371">問 </text:span><text:span text:style-name="T372">STUN </text:span><text:span text:style-name="T371">伺服器「我對外的 </text:span><text:span text:style-name="T372">IP </text:span><text:span text:style-name="T371">和 </text:span><text:span text:style-name="T372">Port </text:span><text:span text:style-name="T371">是什麼？」</text:span><text:span text:style-name="T20">② </text:span><text:span text:style-name="T372">STUN </text:span><text:span text:style-name="T371">回「你對外是 </text:span><text:span text:style-name="T372">220.x.x.x:12345</text:span><text:span text:style-name="T371">」</text:span><text:span text:style-name="T20">③ </text:span><text:span text:style-name="T154">朋友也做同樣的事</text:span><text:span text:style-name="T20"> → ④ </text:span><text:span text:style-name="T371">兩端透過第三方交換彼此公網位址</text:span><text:span text:style-name="T20"> → ⑤ </text:span><text:span text:style-name="T371">同時互相發送封包打洞（</text:span><text:span text:style-name="T372">Hole Punching</text:span><text:span text:style-name="T371">）</text:span><text:span text:style-name="T20">。</text:span></text:p>
            <text:p text:style-name="P12"><text:span text:style-name="T250">重要限制：</text:span><text:span text:style-name="T264">STUN </text:span><text:span text:style-name="T265">只對部分 </text:span><text:span text:style-name="T264">NAT </text:span><text:span text:style-name="T265">類型有效</text:span><text:span text:style-name="T20">；若兩端都是 </text:span><text:span text:style-name="T42">Symmetric NAT</text:span><text:span text:style-name="T20">，打洞會失敗，需改用 </text:span><text:span text:style-name="T42">TURN </text:span><text:span text:style-name="T20">伺服器作為中繼轉發。（</text:span><text:span text:style-name="T42">WebRTC </text:span><text:span text:style-name="T20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1" loext:marker-style-name="T12"><text:span text:style-name="T13">方法</text:span><text:span text:style-name="T12"/></text:p>
          </table:table-cell>
          <table:table-cell table:style-name="表格64.A4" office:value-type="string">
            <text:p text:style-name="P21" loext:marker-style-name="T12"><text:span text:style-name="T13">設定方式</text:span><text:span text:style-name="T12"/></text:p>
          </table:table-cell>
          <table:table-cell table:style-name="表格64.A4" office:value-type="string">
            <text:p text:style-name="P21" loext:marker-style-name="T12"><text:span text:style-name="T13">典型場景</text:span><text:span text:style-name="T12"/></text:p>
          </table:table-cell>
          <table:table-cell table:style-name="表格64.A4" office:value-type="string">
            <text:p text:style-name="P21" loext:marker-style-name="T12"><text:span text:style-name="T13">主要限制</text:span><text:span text:style-name="T12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Port Forwarding</text:span><text:span text:style-name="T14"/></text:p>
          </table:table-cell>
          <table:table-cell table:style-name="表格64.A5" office:value-type="string">
            <text:p text:style-name="P20" loext:marker-style-name="T299"><text:span text:style-name="T70">手動設定路由器</text:span><text:span text:style-name="T299"/></text:p>
          </table:table-cell>
          <table:table-cell table:style-name="表格64.A5" office:value-type="string">
            <text:p text:style-name="P20" loext:marker-style-name="T14"><text:span text:style-name="T15">架設網頁／遊戲伺服器</text:span><text:span text:style-name="T14"/></text:p>
          </table:table-cell>
          <table:table-cell table:style-name="表格64.A5" office:value-type="string">
            <text:p text:style-name="P20" loext:marker-style-name="T14"><text:span text:style-name="T15">需要手動維護</text:span><text:span text:style-name="T14"/></text:p>
          </table:table-cell>
        </table:table-row>
        <table:table-row table:style-name="表格64.1">
          <table:table-cell table:style-name="表格64.A6" office:value-type="string">
            <text:p text:style-name="P20" loext:marker-style-name="T14"><text:span text:style-name="T16">UPnP</text:span><text:span text:style-name="T14"/></text:p>
          </table:table-cell>
          <table:table-cell table:style-name="表格64.A6" office:value-type="string">
            <text:p text:style-name="P20" loext:marker-style-name="T299"><text:span text:style-name="T70">應用程式自動設定</text:span><text:span text:style-name="T299"/></text:p>
          </table:table-cell>
          <table:table-cell table:style-name="表格64.A6" office:value-type="string">
            <text:p text:style-name="P20" loext:marker-style-name="T14"><text:span text:style-name="T15">一般遊戲、視訊軟體</text:span><text:span text:style-name="T14"/></text:p>
          </table:table-cell>
          <table:table-cell table:style-name="表格64.A6" office:value-type="string">
            <text:p text:style-name="P20" loext:marker-style-name="T14"><text:span text:style-name="T15">惡意程式可濫用</text:span><text:span text:style-name="T14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STUN</text:span><text:span text:style-name="T14"/></text:p>
          </table:table-cell>
          <table:table-cell table:style-name="表格64.A5" office:value-type="string">
            <text:p text:style-name="P20" loext:marker-style-name="T299"><text:span text:style-name="T70">無需路由器設定</text:span><text:span text:style-name="T299"/></text:p>
          </table:table-cell>
          <table:table-cell table:style-name="表格64.A5" office:value-type="string">
            <text:p text:style-name="P20" loext:marker-style-name="T14"><text:span text:style-name="T16">WebRTC</text:span><text:span text:style-name="T15">、</text:span><text:span text:style-name="T16">P2P </text:span><text:span text:style-name="T15">通話</text:span></text:p>
          </table:table-cell>
          <table:table-cell table:style-name="表格64.A5" office:value-type="string">
            <text:p text:style-name="P20" loext:marker-style-name="T14"><text:span text:style-name="T16">Symmetric NAT </text:span><text:span text:style-name="T15">會失敗</text:span></text:p>
          </table:table-cell>
        </table:table-row>
      </table:table>
      <text:h text:style-name="P18" text:outline-level="2" loext:marker-style-name="T34"><text:span text:style-name="T35">四、完整上網流程（</text:span><text:span text:style-name="T34">ARP + NAT </text:span><text:span text:style-name="T35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7">🎯 <text:s/></text:span><text:span text:style-name="T166">最重要的核心觀念（先記住）</text:span></text:p>
            <text:p text:style-name="P11"><text:span text:style-name="T167">IP </text:span><text:span text:style-name="T168">位址＝</text:span><text:span text:style-name="T20">決定封包的最終目的地（整條路的終點），像信封上的收件地址。</text:span></text:p>
            <text:p text:style-name="P12"><text:span text:style-name="T167">MAC </text:span><text:span text:style-name="T168">位址＝</text:span><text:span text:style-name="T20">決定「下一站」要交給哪台機器，像快遞員每次只看下一站。</text:span></text:p>
            <text:p text:style-name="P12"><text:span text:style-name="T250">關鍵理解：</text:span><text:span text:style-name="T20">封包在傳送途中，</text:span><text:span text:style-name="T42">IP </text:span><text:span text:style-name="T20">不變（始終是 </text:span><text:span text:style-name="T42">Google </text:span><text:span text:style-name="T20">的 </text:span><text:span text:style-name="T42">IP</text:span><text:span text:style-name="T20">），但 </text:span><text:span text:style-name="T42">MAC </text:span><text:span text:style-name="T20">每一跳都會更換。</text:span></text:p>
          </table:table-cell>
        </table:table-row>
      </table:table>
      <text:p text:style-name="P22" loext:marker-style-name="T172"><text:span text:style-name="T373">場景</text:span><text:span text:style-name="T174">：</text:span><text:span text:style-name="T374">你電腦 </text:span><text:span text:style-name="T375">192.168.1.2</text:span><text:span text:style-name="T374">／路由器內網 </text:span><text:span text:style-name="T375">IP 192.168.1.1</text:span><text:span text:style-name="T374">／路由器公網 </text:span><text:span text:style-name="T375">IP 220.x.x.x</text:span><text:span text:style-name="T374">／目標 </text:span><text:span text:style-name="T375">google.com</text:span><text:span text:style-name="T174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使用技術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關鍵重點</text:span><text:span text:style-name="T104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20" loext:marker-style-name="T106"><text:span text:style-name="T108">① 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.com → 142.250.xxx.xxx(</text:span><text:span text:style-name="T376">Google </text:span><text:span text:style-name="T377">的 </text:span><text:span text:style-name="T376">IP</text:span><text:span text:style-name="T108">)</text:span></text:p>
            <text:p text:style-name="P20" loext:marker-style-name="T106"><text:span text:style-name="T108">(</text:span><text:span text:style-name="T109">電腦必須知道目的地在哪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網路只認 </text:span><text:span text:style-name="T108">IP</text:span><text:span text:style-name="T109">，不認名字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② 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路由器（</text:span><text:span text:style-name="T108">192.168.1.1</text:span><text:span text:style-name="T109">）的 </text:span><text:span text:style-name="T108">MAC(</text:span><text:span text:style-name="T378">發現 </text:span><text:span text:style-name="T379">Google </text:span><text:span text:style-name="T380">不在同一個區網</text:span><text:span text:style-name="T378">，必須交給路由器幫忙送</text:span><text:span text:style-name="T108">)(</text:span><text:span text:style-name="T381">查詢路由器的 </text:span><text:span text:style-name="T382">MAC</text:span><text:span text:style-name="T381">，下一站是路由器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的是「路由器」，不是 </text:span><text:span text:style-name="T108">Google</text:span><text:span text:style-name="T109">！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③ </text:span><text:span text:style-name="T383">送封包</text:span></text:p>
          </table:table-cell>
          <table:table-cell table:style-name="表格66.A2" office:value-type="string">
            <text:p text:style-name="P20" loext:marker-style-name="T106"><text:span text:style-name="T108">IP=Google</text:span><text:span text:style-name="T109">；</text:span><text:span text:style-name="T108">MAC=</text:span><text:span text:style-name="T109">路由器</text:span><text:span text:style-name="T108">(</text:span><text:span text:style-name="T384">IP </text:span><text:span text:style-name="T385">記</text:span><text:soft-page-break/><text:span text:style-name="T385">錄最終目的地；</text:span><text:span text:style-name="T384">MAC </text:span><text:span text:style-name="T385">記錄下一站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L2 </text:span><text:span text:style-name="T109">傳輸</text:span></text:p>
          </table:table-cell>
          <table:table-cell table:style-name="表格66.A2" office:value-type="string">
            <text:p text:style-name="P20" loext:marker-style-name="T106"><text:span text:style-name="T108">IP=</text:span><text:span text:style-name="T109">終點；</text:span><text:span text:style-name="T108">MAC=</text:span><text:span text:style-name="T109">下一站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④ NAT </text:span><text:span text:style-name="T109">去程</text:span></text:p>
          </table:table-cell>
          <table:table-cell table:style-name="表格66.A3" office:value-type="string">
            <text:p text:style-name="P20" loext:marker-style-name="T106"><text:span text:style-name="T386">192.168.1.2 → 220.x.x.x</text:span><text:span text:style-name="T108">(</text:span><text:span text:style-name="T387">路由器收到後往 </text:span><text:span text:style-name="T388">Internet </text:span><text:span text:style-name="T387">送</text:span><text:span text:style-name="T109">；路由器負責跨網路傳遞</text:span><text:span text:style-name="T108">)(</text:span><text:span text:style-name="T387">私有 </text:span><text:span text:style-name="T388">IP </text:span><text:span text:style-name="T387">換成公網 </text:span><text:span text:style-name="T388">IP</text:span><text:span text:style-name="T387">，因</text:span><text:span text:style-name="T388">Internet </text:span><text:span text:style-name="T387">不認私有 </text:span><text:span text:style-name="T388">IP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換身份才能上 </text:span><text:span text:style-name="T108">Internet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⑤ </text:span><text:span text:style-name="T109">傳到 </text:span><text:span text:style-name="T108">Google</text:span></text:p>
          </table:table-cell>
          <table:table-cell table:style-name="表格66.A2" office:value-type="string">
            <text:p text:style-name="P20" loext:marker-style-name="T106"><text:span text:style-name="T389">封包抵達目的地</text:span><text:span text:style-name="T108">(</text:span><text:span text:style-name="T390">Google </text:span><text:span text:style-name="T391">看到公網 </text:span><text:span text:style-name="T390">IP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 </text:span><text:span text:style-name="T109">只看到公網 </text:span><text:span text:style-name="T108">IP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⑥ Google </text:span><text:span text:style-name="T109">回應</text:span></text:p>
          </table:table-cell>
          <table:table-cell table:style-name="表格66.A3" office:value-type="string">
            <text:p text:style-name="P20" loext:marker-style-name="T106"><text:span text:style-name="T392">回傳給 </text:span><text:span text:style-name="T393">220.x.x.x</text:span><text:span text:style-name="T108">(</text:span><text:span text:style-name="T394">回到路由器再回到你電腦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路由器收到回應</text:span><text:span text:style-name="T106"/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⑦ NAT </text:span><text:span text:style-name="T109">回程</text:span></text:p>
          </table:table-cell>
          <table:table-cell table:style-name="表格66.A2" office:value-type="string">
            <text:p text:style-name="P20" loext:marker-style-name="T106"><text:span text:style-name="T386">220.x.x.x → 192.168.1.2</text:span><text:span text:style-name="T108">(</text:span><text:span text:style-name="T379">NAT </text:span><text:span text:style-name="T378">依記錄轉回正確主機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查記錄，換回真正目標</text:span><text:span text:style-name="T106"/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⑧ </text:span><text:span text:style-name="T109">收到網頁</text:span></text:p>
          </table:table-cell>
          <table:table-cell table:style-name="表格66.A3" office:value-type="string">
            <text:p text:style-name="P20" loext:marker-style-name="T106"><text:span text:style-name="T109">瀏覽器顯示頁面</text:span><text:span text:style-name="T106"/></text:p>
          </table:table-cell>
          <table:table-cell table:style-name="表格66.A3" office:value-type="string">
            <text:p text:style-name="P20" loext:marker-style-name="T106"><text:span text:style-name="T108">—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一次完整通信結束</text:span><text:span text:style-name="T106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7">💣 <text:s/></text:span><text:span text:style-name="T80">三個最容易搞錯的地方（考試地雷）</text:span></text:p>
            <text:p text:style-name="P11"><text:span text:style-name="T395">✗ </text:span><text:span text:style-name="T396">以為 </text:span><text:span text:style-name="T395">ARP </text:span><text:span text:style-name="T396">是找 </text:span><text:span text:style-name="T395">Google </text:span><text:span text:style-name="T396">的 </text:span><text:span text:style-name="T395">MAC</text:span><text:span text:style-name="T250">　→　</text:span><text:span text:style-name="T397">✓ </text:span><text:span text:style-name="T398">ARP </text:span><text:span text:style-name="T397">找的是「路由器」的 </text:span><text:span text:style-name="T398">MAC</text:span><text:span text:style-name="T397">！</text:span><text:span text:style-name="T20">因為 </text:span><text:span text:style-name="T42">ARP </text:span><text:span text:style-name="T20">只能在同一個 </text:span><text:span text:style-name="T42">LAN </text:span><text:span text:style-name="T20">內使用。</text:span></text:p>
            <text:p text:style-name="P12"><text:span text:style-name="T395">✗ </text:span><text:span text:style-name="T396">以為封包直接送到 </text:span><text:span text:style-name="T395">Google</text:span><text:span text:style-name="T250">　→　</text:span><text:span text:style-name="T397">✓ 封包先送給路由器，路由器再轉到 </text:span><text:span text:style-name="T398">Internet</text:span><text:span text:style-name="T20">。</text:span></text:p>
            <text:p text:style-name="P12"><text:span text:style-name="T395">✗ </text:span><text:span text:style-name="T396">以為 </text:span><text:span text:style-name="T395">IP </text:span><text:span text:style-name="T396">在傳輸過程中一直不變</text:span><text:span text:style-name="T250">　→　</text:span><text:span text:style-name="T397">✓ </text:span><text:span text:style-name="T398">NAT </text:span><text:span text:style-name="T397">會在去程改掉來源 </text:span><text:span text:style-name="T398">IP</text:span><text:span text:style-name="T397">，回程再改回去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7">📝 <text:s/></text:span><text:span text:style-name="T256">考試標準答案（直接背）</text:span></text:p>
            <text:p text:style-name="P11" loext:marker-style-name="T21"><text:span text:style-name="T86">使用者輸入網址後</text:span><text:span text:style-name="T20">，</text:span><text:span text:style-name="T399">先透過 </text:span><text:span text:style-name="T400">DNS </text:span><text:span text:style-name="T399">將網域名稱解析為 </text:span><text:span text:style-name="T400">IP</text:span><text:span text:style-name="T20">；</text:span><text:span text:style-name="T368">接著主機利用 </text:span><text:span text:style-name="T401">ARP </text:span><text:span text:style-name="T368">取得路由器（預設閘道）的 </text:span><text:span text:style-name="T401">MAC</text:span><text:span text:style-name="T20">，</text:span><text:span text:style-name="T368">將封包傳送至路由器</text:span><text:span text:style-name="T20">；</text:span><text:span text:style-name="T402">路由器透過 </text:span><text:span text:style-name="T403">NAT </text:span><text:span text:style-name="T402">將私有 </text:span><text:span text:style-name="T403">IP </text:span><text:span text:style-name="T402">轉換為公網 </text:span><text:span text:style-name="T403">IP </text:span><text:span text:style-name="T402">後送往 </text:span><text:span text:style-name="T403">Internet</text:span><text:span text:style-name="T20">；</text:span><text:span text:style-name="T154">目的主機回應後，路由器再透過 </text:span><text:span text:style-name="T178">NAT </text:span><text:span text:style-name="T154">將封包轉回原內部主機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</text:span><text:span text:style-name="T34">ARP vs NAT </text:span><text:span text:style-name="T35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21"/>
            </table:table-cell>
            <table:table-cell table:style-name="表格67.A1" office:value-type="string">
              <text:p text:style-name="P21" loext:marker-style-name="T12"><text:span text:style-name="T43">ARP</text:span><text:span text:style-name="T12"/></text:p>
            </table:table-cell>
            <table:table-cell table:style-name="表格67.A1" office:value-type="string">
              <text:p text:style-name="P21" loext:marker-style-name="T12"><text:span text:style-name="T43">NAT</text:span><text:span text:style-name="T12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0" loext:marker-style-name="T14"><text:span text:style-name="T15">目的</text:span><text:span text:style-name="T14"/></text:p>
          </table:table-cell>
          <table:table-cell table:style-name="表格67.A2" office:value-type="string">
            <text:p text:style-name="P20" loext:marker-style-name="T404"><text:span text:style-name="T405">用 </text:span><text:span text:style-name="T406">IP </text:span><text:span text:style-name="T405">找 </text:span><text:span text:style-name="T406">MAC</text:span></text:p>
          </table:table-cell>
          <table:table-cell table:style-name="表格67.A2" office:value-type="string">
            <text:p text:style-name="P20" loext:marker-style-name="T407"><text:span text:style-name="T408">私有 </text:span><text:span text:style-name="T409">IP </text:span><text:span text:style-name="T408">轉成公網 </text:span><text:span text:style-name="T409">IP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使用範圍</text:span><text:span text:style-name="T14"/></text:p>
          </table:table-cell>
          <table:table-cell table:style-name="表格67.A3" office:value-type="string">
            <text:p text:style-name="P20" loext:marker-style-name="T298"><text:span text:style-name="T120">區域網路（</text:span><text:span text:style-name="T255">LAN</text:span><text:span text:style-name="T120">）內</text:span></text:p>
          </table:table-cell>
          <table:table-cell table:style-name="表格67.A3" office:value-type="string">
            <text:p text:style-name="P20" loext:marker-style-name="T299"><text:span text:style-name="T70">內網與 </text:span><text:span text:style-name="T300">Internet </text:span><text:span text:style-name="T70">之間</text:span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運作層級</text:span><text:span text:style-name="T14"/></text:p>
          </table:table-cell>
          <table:table-cell table:style-name="表格67.A2" office:value-type="string">
            <text:p text:style-name="P20" loext:marker-style-name="T410"><text:span text:style-name="T411">L2 / L3 </text:span><text:span text:style-name="T412">交界</text:span></text:p>
          </table:table-cell>
          <table:table-cell table:style-name="表格67.A2" office:value-type="string">
            <text:p text:style-name="P20" loext:marker-style-name="T413"><text:span text:style-name="T414">L3</text:span><text:span text:style-name="T415">（網路層）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誰執行</text:span><text:span text:style-name="T14"/></text:p>
          </table:table-cell>
          <table:table-cell table:style-name="表格67.A3" office:value-type="string">
            <text:p text:style-name="P20" loext:marker-style-name="T14"><text:span text:style-name="T15">端點裝置（電腦）</text:span><text:span text:style-name="T14"/></text:p>
          </table:table-cell>
          <table:table-cell table:style-name="表格67.A3" office:value-type="string">
            <text:p text:style-name="P20" loext:marker-style-name="T14"><text:span text:style-name="T15">路由器</text:span><text:span text:style-name="T14"/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主要用途</text:span><text:span text:style-name="T14"/></text:p>
          </table:table-cell>
          <table:table-cell table:style-name="表格67.A2" office:value-type="string">
            <text:p text:style-name="P20" loext:marker-style-name="T14"><text:span text:style-name="T15">在區網內傳送封包</text:span><text:span text:style-name="T14"/></text:p>
          </table:table-cell>
          <table:table-cell table:style-name="表格67.A2" office:value-type="string">
            <text:p text:style-name="P20" loext:marker-style-name="T14"><text:span text:style-name="T15">讓內部主機能夠上網</text:span><text:span text:style-name="T14"/></text:p>
          </table:table-cell>
        </table:table-row>
      </table:table>
      <text:h text:style-name="P17" text:outline-level="1" loext:marker-style-name="T32"><text:span text:style-name="T33">第 五 篇　</text:span><text:span text:style-name="T32">TCP </text:span><text:span text:style-name="T33">傳輸控制深入：握手 </text:span><text:span text:style-name="T32">· SYN Flood · </text:span><text:span text:style-name="T33">視窗 </text:span><text:span text:style-name="T32">· </text:span><text:span text:style-name="T33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7">🚦 <text:s/></text:span><text:span text:style-name="T30">本篇重點</text:span></text:p>
            <text:p text:style-name="P11" loext:marker-style-name="T21"><text:span text:style-name="T20">網路的本質是把資料從 </text:span><text:span text:style-name="T42">A </text:span><text:span text:style-name="T20">電腦送到 </text:span><text:span text:style-name="T42">B </text:span><text:span text:style-name="T20">電腦，但中間有四個麻煩，</text:span><text:span text:style-name="T42">TCP </text:span><text:span text:style-name="T20">各自有對策。</text:span></text:p>
          </table:table-cell>
        </table:table-row>
      </table:table>
      <text:h text:style-name="P18" text:outline-level="2" loext:marker-style-name="T34"><text:span text:style-name="T35">一、網路的四個麻煩，</text:span><text:span text:style-name="T34">TCP </text:span><text:span text:style-name="T35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1" loext:marker-style-name="T12"><text:span text:style-name="T13">問題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13">說明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43">TCP </text:span><text:span text:style-name="T13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0" loext:marker-style-name="T298"><text:span text:style-name="T120">資料可能丟失</text:span><text:span text:style-name="T298"/></text:p>
          </table:table-cell>
          <table:table-cell table:style-name="表格69.A2" office:value-type="string">
            <text:p text:style-name="P20" loext:marker-style-name="T14"><text:span text:style-name="T15">封包在網路中消失</text:span><text:span text:style-name="T14"/></text:p>
          </table:table-cell>
          <table:table-cell table:style-name="表格69.A2" office:value-type="string">
            <text:p text:style-name="P20" loext:marker-style-name="T14"><text:span text:style-name="T70">重傳</text:span><text:span text:style-name="T15">機制（</text:span><text:span text:style-name="T16">Retransmission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順序可能亂掉</text:span><text:span text:style-name="T298"/></text:p>
          </table:table-cell>
          <table:table-cell table:style-name="表格69.A3" office:value-type="string">
            <text:p text:style-name="P20" loext:marker-style-name="T14"><text:span text:style-name="T15">封包走不同路徑先後到達</text:span><text:span text:style-name="T14"/></text:p>
          </table:table-cell>
          <table:table-cell table:style-name="表格69.A3" office:value-type="string">
            <text:p text:style-name="P20" loext:marker-style-name="T14"><text:span text:style-name="T70">序號</text:span><text:span text:style-name="T15">機制（</text:span><text:span text:style-name="T16">Sequence Number</text:span><text:span text:style-name="T15">）</text:span></text:p>
          </table:table-cell>
        </table:table-row>
        <table:table-row table:style-name="表格69.1">
          <table:table-cell table:style-name="表格69.A2" office:value-type="string">
            <text:p text:style-name="P20" loext:marker-style-name="T298"><text:span text:style-name="T120">對方來不及收</text:span><text:span text:style-name="T298"/></text:p>
          </table:table-cell>
          <table:table-cell table:style-name="表格69.A2" office:value-type="string">
            <text:p text:style-name="P20" loext:marker-style-name="T14"><text:span text:style-name="T15">接收端 </text:span><text:span text:style-name="T16">buffer </text:span><text:span text:style-name="T15">可能爆掉</text:span></text:p>
          </table:table-cell>
          <table:table-cell table:style-name="表格69.A2" office:value-type="string">
            <text:p text:style-name="P20" loext:marker-style-name="T14"><text:span text:style-name="T70">流量</text:span><text:span text:style-name="T15">控制（</text:span><text:span text:style-name="T16">Flow Control / rwnd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網路可能塞車</text:span><text:span text:style-name="T298"/></text:p>
          </table:table-cell>
          <table:table-cell table:style-name="表格69.A3" office:value-type="string">
            <text:p text:style-name="P20" loext:marker-style-name="T14"><text:span text:style-name="T15">路由器排隊太長</text:span><text:span text:style-name="T14"/></text:p>
          </table:table-cell>
          <table:table-cell table:style-name="表格69.A3" office:value-type="string">
            <text:p text:style-name="P20" loext:marker-style-name="T14"><text:span text:style-name="T70">擁塞</text:span><text:span text:style-name="T15">控制（</text:span><text:span text:style-name="T16">Congestion Control / cwnd</text:span><text:span text:style-name="T15">）</text:span></text:p>
          </table:table-cell>
        </table:table-row>
      </table:table>
      <text:h text:style-name="P18" text:outline-level="2" loext:marker-style-name="T34"><text:span text:style-name="T35">二、</text:span><text:span text:style-name="T34">TCP vs UDP</text:span><text:span text:style-name="T35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1" loext:marker-style-name="T12"><text:span text:style-name="T13">特性</text:span><text:span text:style-name="T12"/></text:p>
            </table:table-cell>
            <table:table-cell table:style-name="表格70.A1" office:value-type="string">
              <text:p text:style-name="P21" loext:marker-style-name="T12"><text:span text:style-name="T43">TCP</text:span><text:span text:style-name="T13">（可靠模式）</text:span></text:p>
            </table:table-cell>
            <table:table-cell table:style-name="表格70.A1" office:value-type="string">
              <text:p text:style-name="P21" loext:marker-style-name="T12"><text:span text:style-name="T43">UDP</text:span><text:span text:style-name="T13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0" loext:marker-style-name="T14"><text:span text:style-name="T15">連線方式</text:span><text:span text:style-name="T14"/></text:p>
          </table:table-cell>
          <table:table-cell table:style-name="表格70.A2" office:value-type="string">
            <text:p text:style-name="P20" loext:marker-style-name="T416"><text:span text:style-name="T340">需要先建立連線</text:span><text:span text:style-name="T416"/></text:p>
          </table:table-cell>
          <table:table-cell table:style-name="表格70.A2" office:value-type="string">
            <text:p text:style-name="P20" loext:marker-style-name="T346"><text:span text:style-name="T318">無連線，直接送</text:span><text:span text:style-name="T346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可靠性</text:span><text:span text:style-name="T14"/></text:p>
          </table:table-cell>
          <table:table-cell table:style-name="表格70.A3" office:value-type="string">
            <text:p text:style-name="P20" loext:marker-style-name="T14"><text:span text:style-name="T15">保證送達（會重傳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不保證送達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順序</text:span><text:span text:style-name="T14"/></text:p>
          </table:table-cell>
          <table:table-cell table:style-name="表格70.A2" office:value-type="string">
            <text:p text:style-name="P20" loext:marker-style-name="T14"><text:span text:style-name="T15">保證順序正確</text:span><text:span text:style-name="T14"/></text:p>
          </table:table-cell>
          <table:table-cell table:style-name="表格70.A2" office:value-type="string">
            <text:p text:style-name="P20" loext:marker-style-name="T14"><text:span text:style-name="T15">不保證順序</text:span><text:span text:style-name="T14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速度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慢（有控制機制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快（無額外開銷）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適合場景</text:span><text:span text:style-name="T14"/></text:p>
          </table:table-cell>
          <table:table-cell table:style-name="表格70.A2" office:value-type="string">
            <text:p text:style-name="P20" loext:marker-style-name="T299"><text:span text:style-name="T70">網頁、檔案傳輸、</text:span><text:span text:style-name="T300">Email</text:span></text:p>
          </table:table-cell>
          <table:table-cell table:style-name="表格70.A2" office:value-type="string">
            <text:p text:style-name="P20" loext:marker-style-name="T14"><text:span text:style-name="T70">直播、遊戲</text:span><text:span text:style-name="T15">、</text:span><text:span text:style-name="T16">DNS </text:span><text:span text:style-name="T15">查詢</text:span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比喻</text:span><text:span text:style-name="T14"/></text:p>
          </table:table-cell>
          <table:table-cell table:style-name="表格70.A3" office:value-type="string">
            <text:p text:style-name="P20" loext:marker-style-name="T298"><text:span text:style-name="T120">專業物流（簽收確認）</text:span><text:span text:style-name="T298"/></text:p>
          </table:table-cell>
          <table:table-cell table:style-name="表格70.A3" office:value-type="string">
            <text:p text:style-name="P20" loext:marker-style-name="T298"><text:span text:style-name="T120">亂丟紙飛機</text:span><text:span text:style-name="T298"/></text:p>
          </table:table-cell>
        </table:table-row>
      </table:table>
      <text:h text:style-name="P18" text:outline-level="2" loext:marker-style-name="T34"><text:span text:style-name="T35">三、建立連線：三次握手（</text:span><text:span text:style-name="T34">Three-way Handshake</text:span><text:span text:style-name="T35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7">🤝 <text:s/></text:span><text:span text:style-name="T30">握手流程</text:span></text:p>
            <text:p text:style-name="P11"><text:span text:style-name="T141">① Client → Server</text:span><text:span text:style-name="T124">：</text:span><text:span text:style-name="T122">SYN</text:span><text:span text:style-name="T124">　</text:span><text:span text:style-name="T20">「我可以傳資料給你嗎？我準備好了。」（</text:span><text:span text:style-name="T42">Synchronize </text:span><text:span text:style-name="T20">同步請求）</text:span></text:p>
            <text:p text:style-name="P12"><text:span text:style-name="T141">② Server → Client</text:span><text:span text:style-name="T124">：</text:span><text:span text:style-name="T122">SYN + ACK</text:span><text:span text:style-name="T124">　</text:span><text:span text:style-name="T20">「可以！我收到你的請求了，我也準備好了。」（確認＋同步）</text:span></text:p>
            <text:p text:style-name="P12"><text:span text:style-name="T141">③ Client → Server</text:span><text:span text:style-name="T124">：</text:span><text:span text:style-name="T122">ACK</text:span><text:span text:style-name="T124">　</text:span><text:span text:style-name="T20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7">🎯 <text:s/></text:span><text:span text:style-name="T166">三次握手真正目的（考試必考）</text:span></text:p>
            <text:p text:style-name="P11" loext:marker-style-name="T21"><text:span text:style-name="T20">確認雙向都能傳資料（</text:span><text:span text:style-name="T42">Client → Server </text:span><text:span text:style-name="T20">和 </text:span><text:span text:style-name="T42">Server → Client </text:span><text:span text:style-name="T20">各自驗證）。</text:span></text:p>
            <text:p text:style-name="P12" loext:marker-style-name="T21"><text:span text:style-name="T417">避免「</text:span><text:span text:style-name="T418">舊封包誤觸發新連線</text:span><text:span text:style-name="T417">」</text:span><text:span text:style-name="T20">：若少一次確認，</text:span><text:span text:style-name="T362">延遲的舊 </text:span><text:span text:style-name="T364">SYN </text:span><text:span text:style-name="T362">封包可能讓 </text:span><text:span text:style-name="T364">Server </text:span><text:span text:style-name="T362">誤以為要建立新連線</text:span><text:span text:style-name="T20">。</text:span></text:p>
          </table:table-cell>
        </table:table-row>
      </table:table>
      <text:h text:style-name="P18" text:outline-level="2" loext:marker-style-name="T34"><text:span text:style-name="T35">四、攻擊：</text:span><text:span text:style-name="T34">SYN Flood</text:span></text:h>
      <text:p text:style-name="P22" loext:marker-style-name="T21"><text:span text:style-name="T20">攻擊原理：攻擊者大量發送 </text:span><text:span text:style-name="T42">SYN </text:span><text:span text:style-name="T20">封包，但</text:span><text:span text:style-name="T419">故意不完成第三次握手（</text:span><text:span text:style-name="T169">不回 </text:span><text:span text:style-name="T170">ACK</text:span><text:span text:style-name="T419">）</text:span><text:span text:style-name="T20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 loext:marker-style-name="T12"><text:span text:style-name="T13">步驟</text:span><text:span text:style-name="T12"/></text:p>
            </table:table-cell>
            <table:table-cell table:style-name="表格72.A1" office:value-type="string">
              <text:p text:style-name="P7" loext:marker-style-name="T12"><text:span text:style-name="T13">發生什麼</text:span><text:span text:style-name="T12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0" loext:marker-style-name="T14"><text:span text:style-name="T16">1</text:span><text:span text:style-name="T14"/></text:p>
          </table:table-cell>
          <table:table-cell table:style-name="表格72.A2" office:value-type="string">
            <text:p text:style-name="P20" loext:marker-style-name="T14"><text:span text:style-name="T15">攻擊者</text:span><text:span text:style-name="T120">送出大量 </text:span><text:span text:style-name="T255">SYN</text:span><text:span text:style-name="T15">，每個都</text:span><text:span text:style-name="T70">假冒不同來源 </text:span><text:span text:style-name="T300">IP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2</text:span><text:span text:style-name="T14"/></text:p>
          </table:table-cell>
          <table:table-cell table:style-name="表格72.A3" office:value-type="string">
            <text:p text:style-name="P20" loext:marker-style-name="T14"><text:span text:style-name="T420">Server </text:span><text:span text:style-name="T421">建立「半連線（</text:span><text:span text:style-name="T420">Half-open Connection</text:span><text:span text:style-name="T421">）」</text:span><text:span text:style-name="T15">，</text:span><text:span text:style-name="T339">每個都佔記憶體等待 </text:span><text:span text:style-name="T338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0" loext:marker-style-name="T14"><text:span text:style-name="T16">3</text:span><text:span text:style-name="T14"/></text:p>
          </table:table-cell>
          <table:table-cell table:style-name="表格72.A2" office:value-type="string">
            <text:p text:style-name="P20" loext:marker-style-name="T14"><text:span text:style-name="T422">攻擊者永遠不回 </text:span><text:span text:style-name="T423">ACK</text:span><text:span text:style-name="T15">，</text:span><text:span text:style-name="T16">Server </text:span><text:span text:style-name="T15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4</text:span><text:span text:style-name="T14"/></text:p>
          </table:table-cell>
          <table:table-cell table:style-name="表格72.A3" office:value-type="string">
            <text:p text:style-name="P20" loext:marker-style-name="T14"><text:span text:style-name="T120">正常用戶連線失敗</text:span><text:span text:style-name="T15">，</text:span><text:span text:style-name="T16">Server </text:span><text:span text:style-name="T15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7">⚠️ <text:s/></text:span><text:span text:style-name="T80">本質</text:span></text:p>
            <text:p text:style-name="P11" loext:marker-style-name="T21"><text:span text:style-name="T20">這是一種 </text:span><text:span text:style-name="T85">DoS</text:span><text:span text:style-name="T86">（拒絕服務）攻擊</text:span><text:span text:style-name="T20">，利用 </text:span><text:span text:style-name="T42">TCP </text:span><text:span text:style-name="T20">三次握手機制的不對稱性。</text:span></text:p>
          </table:table-cell>
          <table:covered-table-cell/>
        </table:table-row>
      </table:table>
      <text:h text:style-name="P18" text:outline-level="2" loext:marker-style-name="T34"><text:span text:style-name="T35">五、傳送速度的兩個限制：</text:span><text:span text:style-name="T424">rwnd</text:span><text:span text:style-name="T34"> </text:span><text:span text:style-name="T35">與 </text:span><text:span text:style-name="T424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 loext:marker-style-name="T12"><text:span text:style-name="T43">rwnd</text:span><text:span text:style-name="T13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 loext:marker-style-name="T12"><text:span text:style-name="T43">cwnd</text:span><text:span text:style-name="T13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0" loext:marker-style-name="T14"><text:span text:style-name="T15">接收端的限制。</text:span><text:span text:style-name="T425">對方 </text:span><text:span text:style-name="T426">buffer</text:span><text:span text:style-name="T425">（暫存區）還剩多少空間</text:span><text:span text:style-name="T15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20" loext:marker-style-name="T14"><text:span text:style-name="T15">網路的限制。發送端根據網路狀況自行估計，</text:span><text:span text:style-name="T340">目前網路最多能承受多少資料量</text:span><text:span text:style-name="T15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27">實際傳送量 ＝ </text:span><text:span text:style-name="T428">min(rwnd, cwnd)</text:span><text:span text:style-name="T168">　</text:span><text:span text:style-name="T84">取兩者最小值</text:span><text:span text:style-name="T20">。</text:span><text:span text:style-name="T429">對方吃不下就看 </text:span><text:span text:style-name="T430">rwnd</text:span><text:span text:style-name="T429">；網路塞就看 </text:span><text:span text:style-name="T430">cwnd</text:span><text:span text:style-name="T20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 loext:marker-style-name="T12"><text:span text:style-name="T13">情境</text:span><text:span text:style-name="T12"/></text:p>
          </table:table-cell>
          <table:table-cell table:style-name="表格73.A1" office:value-type="string">
            <text:p text:style-name="P7" loext:marker-style-name="T12"><text:span text:style-name="T43">cwnd</text:span><text:span text:style-name="T12"/></text:p>
          </table:table-cell>
          <table:table-cell table:style-name="表格73.A1" table:number-columns-spanned="2" office:value-type="string">
            <text:p text:style-name="P7" loext:marker-style-name="T12"><text:span text:style-name="T43">rwnd</text:span><text:span text:style-name="T12"/></text:p>
          </table:table-cell>
          <table:covered-table-cell/>
          <table:table-cell table:style-name="表格73.A1" office:value-type="string">
            <text:p text:style-name="P7" loext:marker-style-name="T12"><text:span text:style-name="T13">實際傳送量</text:span><text:span text:style-name="T12"/></text:p>
          </table:table-cell>
          <table:table-cell table:style-name="表格73.A1" office:value-type="string">
            <text:p text:style-name="P7" loext:marker-style-name="T12"><text:span text:style-name="T13">瓶頸原因</text:span><text:span text:style-name="T12"/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對方 </text:span><text:span text:style-name="T16">buffer </text:span><text:span text:style-name="T15">快滿了</text:span></text:p>
          </table:table-cell>
          <table:table-cell table:style-name="表格73.A2" office:value-type="string">
            <text:p text:style-name="P20" loext:marker-style-name="T14"><text:span text:style-name="T16">10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3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3</text:span><text:span text:style-name="T14"/></text:p>
          </table:table-cell>
          <table:table-cell table:style-name="表格73.A2" office:value-type="string">
            <text:p text:style-name="P20" loext:marker-style-name="T14"><text:span text:style-name="T15">接收端限制（</text:span><text:span text:style-name="T16">rwnd</text:span><text:span text:style-name="T15">）</text:span></text:p>
          </table:table-cell>
        </table:table-row>
        <table:table-row table:style-name="表格73.1">
          <table:table-cell table:style-name="表格73.A6" office:value-type="string">
            <text:p text:style-name="P20" loext:marker-style-name="T14"><text:span text:style-name="T15">網路很塞</text:span><text:span text:style-name="T14"/></text:p>
          </table:table-cell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table:number-columns-spanned="2" office:value-type="string">
            <text:p text:style-name="P20" loext:marker-style-name="T14"><text:span text:style-name="T16">10</text:span><text:span text:style-name="T14"/></text:p>
          </table:table-cell>
          <table:covered-table-cell/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兩者相近</text:span><text:span text:style-name="T14"/></text:p>
          </table:table-cell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6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</table:table>
      <text:h text:style-name="P18" text:outline-level="2" loext:marker-style-name="T34"><text:span text:style-name="T35">六、滑動視窗（</text:span><text:span text:style-name="T34">Sliding Window</text:span><text:span text:style-name="T35">）</text:span></text:h>
      <text:p text:style-name="P22" loext:marker-style-name="T21"><text:span text:style-name="T186">最笨的方法：送 </text:span><text:span text:style-name="T185">1 </text:span><text:span text:style-name="T186">個封包 → 等 </text:span><text:span text:style-name="T185">ACK → </text:span><text:span text:style-name="T186">再送 </text:span><text:span text:style-name="T185">1 </text:span><text:span text:style-name="T186">個 → 等 </text:span><text:span text:style-name="T185">ACK</text:span><text:span text:style-name="T20">，</text:span><text:span text:style-name="T418">大部分時間在閒置，非常浪費</text:span><text:span text:style-name="T20">。</text:span><text:span text:style-name="T85">TCP </text:span><text:span text:style-name="T86">的改進</text:span><text:span text:style-name="T20">：</text:span><text:span text:style-name="T431">不用等 </text:span><text:span text:style-name="T432">ACK</text:span><text:span text:style-name="T431">，先連續送出多個封包讓封包都在網路上飛（</text:span><text:span text:style-name="T432">in-flight</text:span><text:span text:style-name="T431">），</text:span><text:span text:style-name="T432">ACK </text:span><text:span text:style-name="T431">再慢慢回來</text:span><text:span text:style-name="T20">，這就是 </text:span><text:span text:style-name="T42">pipeline</text:span><text:span text:style-name="T20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433">✗ </text:span><text:span text:style-name="T250">常見錯誤：</text:span><text:span text:style-name="T20">視窗 </text:span><text:span text:style-name="T42">= cwnd</text:span><text:span text:style-name="T20">（擁塞視窗）。</text:span><text:span text:style-name="T257">✓ 正確：</text:span><text:span text:style-name="T362">視窗 </text:span><text:span text:style-name="T364">= min(cwnd, rwnd)</text:span><text:span text:style-name="T362">，</text:span><text:span text:style-name="T364">cwnd </text:span><text:span text:style-name="T362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1" loext:marker-style-name="T12"><text:span text:style-name="T13">時間點</text:span><text:span text:style-name="T12"/></text:p>
          </table:table-cell>
          <table:table-cell table:style-name="表格74.A2" office:value-type="string">
            <text:p text:style-name="P21" loext:marker-style-name="T12"><text:span text:style-name="T13">已確認</text:span><text:span text:style-name="T12"/></text:p>
          </table:table-cell>
          <table:table-cell table:style-name="表格74.A2" office:value-type="string">
            <text:p text:style-name="P21" loext:marker-style-name="T12"><text:span text:style-name="T13">視窗範圍（可送）</text:span><text:span text:style-name="T12"/></text:p>
          </table:table-cell>
          <table:table-cell table:style-name="表格74.A2" office:value-type="string">
            <text:p text:style-name="P21" loext:marker-style-name="T12"><text:span text:style-name="T13">等待中</text:span><text:span text:style-name="T12"/></text:p>
          </table:table-cell>
        </table:table-row>
        <table:table-row table:style-name="表格74.1">
          <table:table-cell table:style-name="表格74.A3" office:value-type="string">
            <text:p text:style-name="P20" loext:marker-style-name="T14"><text:span text:style-name="T15">初始狀態</text:span><text:span text:style-name="T14"/></text:p>
          </table:table-cell>
          <table:table-cell table:style-name="表格74.A3" office:value-type="string">
            <text:p text:style-name="P20" loext:marker-style-name="T14"><text:span text:style-name="T15">無</text:span><text:span text:style-name="T14"/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1, 2, 3</text:span></text:p>
          </table:table-cell>
          <table:table-cell table:style-name="表格74.A3" office:value-type="string">
            <text:p text:style-name="P20" loext:marker-style-name="T14"><text:span text:style-name="T16">4, 5, 6 …</text:span><text:span text:style-name="T14"/></text:p>
          </table:table-cell>
        </table:table-row>
        <table:table-row table:style-name="表格74.1">
          <table:table-cell table:style-name="表格74.A4" office:value-type="string">
            <text:p text:style-name="P20" loext:marker-style-name="T286"><text:span text:style-name="T434">收到 </text:span><text:span text:style-name="T287">ACK 1</text:span></text:p>
          </table:table-cell>
          <table:table-cell table:style-name="表格74.A4" office:value-type="string">
            <text:p text:style-name="P20" loext:marker-style-name="T435"><text:span text:style-name="T436">封包 </text:span><text:span text:style-name="T437">1</text:span></text:p>
          </table:table-cell>
          <table:table-cell table:style-name="表格74.A4" office:value-type="string">
            <text:p text:style-name="P20" loext:marker-style-name="T14"><text:span text:style-name="T15">封包 </text:span><text:span text:style-name="T16">2, 3, 4</text:span></text:p>
          </table:table-cell>
          <table:table-cell table:style-name="表格74.A4" office:value-type="string">
            <text:p text:style-name="P20" loext:marker-style-name="T14"><text:span text:style-name="T16">5, 6 …</text:span><text:span text:style-name="T15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20" loext:marker-style-name="T286"><text:span text:style-name="T434">收到 </text:span><text:span text:style-name="T287">ACK 2</text:span></text:p>
          </table:table-cell>
          <table:table-cell table:style-name="表格74.A3" office:value-type="string">
            <text:p text:style-name="P20" loext:marker-style-name="T435"><text:span text:style-name="T436">封包 </text:span><text:span text:style-name="T437">1, 2</text:span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3, 4, 5</text:span></text:p>
          </table:table-cell>
          <table:table-cell table:style-name="表格74.A3" office:value-type="string">
            <text:p text:style-name="P20" loext:marker-style-name="T14"><text:span text:style-name="T16">6, 7 …</text:span><text:span text:style-name="T15">（繼續往右滑）</text:span></text:p>
          </table:table-cell>
        </table:table-row>
      </table:table>
      <text:p text:style-name="P22" loext:marker-style-name="T172"><text:span text:style-name="T174">關鍵理解：視窗大小決定效率（越大越快），</text:span><text:span text:style-name="T372">ACK </text:span><text:span text:style-name="T371">的回傳決定視窗位置（往前滑）</text:span><text:span text:style-name="T174">，兩者合作讓傳輸保持流暢。</text:span></text:p>
      <text:h text:style-name="P18" text:outline-level="2" loext:marker-style-name="T34"><text:span text:style-name="T35">七、擁塞控制：怎麼調整速度</text:span><text:span text:style-name="T34"/></text:h>
      <text:h text:style-name="P19" text:outline-level="3"><text:span text:style-name="T36">▍</text:span><text:span text:style-name="T37"> </text:span><text:span text:style-name="T38">階段一：</text:span><text:span text:style-name="T37">Slow Start</text:span><text:span text:style-name="T38">（慢啟動）— 指數成長</text:span></text:h>
      <text:p text:style-name="P22" loext:marker-style-name="T21"><text:span text:style-name="T20">雖叫「慢」啟動，實際成長非常快。規則：</text:span><text:span text:style-name="T265">每收到一個 </text:span><text:span text:style-name="T264">ACK</text:span><text:span text:style-name="T265">，</text:span><text:span text:style-name="T264">cwnd </text:span><text:span text:style-name="T265">就 </text:span><text:span text:style-name="T264">+1</text:span><text:span text:style-name="T20">；</text:span><text:span text:style-name="T335">送出 </text:span><text:span text:style-name="T336">N </text:span><text:span text:style-name="T335">個封包 → 收回 </text:span><text:span text:style-name="T336">N </text:span><text:span text:style-name="T335">個 </text:span><text:span text:style-name="T336">ACK → cwnd </text:span><text:span text:style-name="T335">增加 </text:span><text:span text:style-name="T336">N</text:span><text:span text:style-name="T20">，所以每輪自然翻倍。</text:span><text:span text:style-name="T42">(</text:span><text:span text:style-name="T364">Slow Start = </text:span><text:span text:style-name="T362">每一輪變 </text:span><text:span text:style-name="T364">2 </text:span><text:span text:style-name="T362">倍，</text:span><text:span text:style-name="T364">Congestion Avoidance = </text:span><text:span text:style-name="T362">每一輪只加 </text:span><text:span text:style-name="T364">1</text:span><text:span text:style-name="T42">(</text:span><text:span text:style-name="T20">「</text:span><text:span text:style-name="T438">Slow Start</text:span><text:span text:style-name="T439">翻倍，壅塞避免加一</text:span><text:span text:style-name="T20">」</text:span><text:span text:style-name="T42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 loext:marker-style-name="T12"><text:span text:style-name="T13">輪次（</text:span><text:span text:style-name="T43">RTT</text:span><text:span text:style-name="T13">）</text:span></text:p>
            </table:table-cell>
            <table:table-cell table:style-name="表格75.A1" office:value-type="string">
              <text:p text:style-name="P7" loext:marker-style-name="T12"><text:span text:style-name="T43">cwnd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送出封包數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收回 </text:span><text:span text:style-name="T43">ACK </text:span><text:span text:style-name="T13">數</text:span></text:p>
            </table:table-cell>
            <table:table-cell table:style-name="表格75.A1" office:value-type="string">
              <text:p text:style-name="P7" loext:marker-style-name="T12"><text:span text:style-name="T13">新 </text:span><text:span text:style-name="T43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1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2</text:span><text:span text:style-name="T14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2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4</text:span><text:span text:style-name="T14"/></text:p>
          </table:table-cell>
        </table:table-row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3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8</text:span><text:span text:style-name="T14"/></text:p>
          </table:table-cell>
        </table:table-row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4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16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二：</text:span><text:span text:style-name="T37">Congestion Avoidance</text:span><text:span text:style-name="T38">（擁塞避免）— 線性成長</text:span></text:h>
      <text:p text:style-name="P22" loext:marker-style-name="T21"><text:span text:style-name="T283">cwnd </text:span><text:span text:style-name="T282">成長到門檻值（</text:span><text:span text:style-name="T283">ssthresh</text:span><text:span text:style-name="T282">）後，改為線性成長</text:span><text:span text:style-name="T20">（</text:span><text:span text:style-name="T265">每個 </text:span><text:span text:style-name="T264">RTT </text:span><text:span text:style-name="T265">只 </text:span><text:span text:style-name="T264">+1</text:span><text:span text:style-name="T20">），</text:span><text:span text:style-name="T84">避免增長太快讓網路過載</text:span><text:span text:style-name="T20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21"/>
            </table:table-cell>
            <table:table-cell table:style-name="表格76.A1" office:value-type="string">
              <text:p text:style-name="P21" loext:marker-style-name="T12"><text:span text:style-name="T43">Slow Start</text:span><text:span text:style-name="T12"/></text:p>
            </table:table-cell>
            <table:table-cell table:style-name="表格76.A1" office:value-type="string">
              <text:p text:style-name="P21" loext:marker-style-name="T12"><text:span text:style-name="T43">Congestion Avoidance</text:span><text:span text:style-name="T12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0" loext:marker-style-name="T14"><text:span text:style-name="T15">觸發條件</text:span><text:span text:style-name="T14"/></text:p>
          </table:table-cell>
          <table:table-cell table:style-name="表格76.A2" office:value-type="string">
            <text:p text:style-name="P20" loext:marker-style-name="T286"><text:span text:style-name="T287">cwnd &lt; ssthresh</text:span><text:span text:style-name="T286"/></text:p>
          </table:table-cell>
          <table:table-cell table:style-name="表格76.A2" office:value-type="string">
            <text:p text:style-name="P20" loext:marker-style-name="T286"><text:span text:style-name="T287">cwnd ≥ ssthresh</text:span><text:span text:style-name="T286"/></text:p>
          </table:table-cell>
        </table:table-row>
        <table:table-row table:style-name="表格76.1">
          <table:table-cell table:style-name="表格76.A3" office:value-type="string">
            <text:p text:style-name="P20" loext:marker-style-name="T14"><text:span text:style-name="T15">成長方式</text:span><text:span text:style-name="T14"/></text:p>
          </table:table-cell>
          <table:table-cell table:style-name="表格76.A3" office:value-type="string">
            <text:p text:style-name="P20" loext:marker-style-name="T14"><text:span text:style-name="T440">指數成長</text:span><text:span text:style-name="T15">（</text:span><text:span text:style-name="T441">每個 </text:span><text:span text:style-name="T442">ACK +1</text:span><text:span text:style-name="T15">）</text:span></text:p>
          </table:table-cell>
          <table:table-cell table:style-name="表格76.A3" office:value-type="string">
            <text:p text:style-name="P20" loext:marker-style-name="T14"><text:span text:style-name="T422">線性成長</text:span><text:span text:style-name="T15">（</text:span><text:span text:style-name="T441">每個 </text:span><text:span text:style-name="T442">RTT +1</text:span><text:span text:style-name="T15">）</text:span><text:span text:style-name="T16">(</text:span><text:span text:style-name="T443">RTT </text:span><text:span text:style-name="T444">：</text:span><text:span text:style-name="T443">Round Trip Time</text:span><text:span text:style-name="T444">（往返時間）</text:span><text:span text:style-name="T443">= </text:span><text:span text:style-name="T444">封包出去 </text:span><text:span text:style-name="T443">+ ACK </text:span><text:span text:style-name="T444">回來的一個來回時間</text:span><text:span text:style-name="T16">)</text:span></text:p>
          </table:table-cell>
        </table:table-row>
        <table:table-row table:style-name="表格76.1">
          <table:table-cell table:style-name="表格76.A2" office:value-type="string">
            <text:p text:style-name="P20" loext:marker-style-name="T14"><text:span text:style-name="T15">特性</text:span><text:span text:style-name="T14"/></text:p>
          </table:table-cell>
          <table:table-cell table:style-name="表格76.A2" office:value-type="string">
            <text:p text:style-name="P20" loext:marker-style-name="T14"><text:span text:style-name="T15">快速試探網路上限</text:span><text:span text:style-name="T14"/></text:p>
          </table:table-cell>
          <table:table-cell table:style-name="表格76.A2" office:value-type="string">
            <text:p text:style-name="P20" loext:marker-style-name="T14"><text:span text:style-name="T15">保守維持穩定傳輸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21" loext:marker-style-name="T104"><text:span text:style-name="T105">丟包偵測方式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ssthresh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cwnd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下一階段</text:span><text:span text:style-name="T104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20" loext:marker-style-name="T240"><text:span text:style-name="T163">Timeout</text:span><text:span text:style-name="T162">（逾時）</text:span></text:p>
          </table:table-cell>
          <table:table-cell table:style-name="表格77.A2" office:value-type="string">
            <text:p text:style-name="P20" loext:marker-style-name="T106"><text:span text:style-name="T110">等太久沒 </text:span><text:span text:style-name="T111">ACK</text:span><text:span text:style-name="T109">，</text:span><text:span text:style-name="T445">網路嚴重擁塞</text:span></text:p>
          </table:table-cell>
          <table:table-cell table:style-name="表格77.A2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77.A2" office:value-type="string">
            <text:p text:style-name="P20" loext:marker-style-name="T447"><text:span text:style-name="T119">重新進入 </text:span><text:span text:style-name="T448">Slow Start</text:span></text:p>
          </table:table-cell>
        </table:table-row>
        <table:table-row table:style-name="表格77.1">
          <table:table-cell table:style-name="表格77.A3" office:value-type="string">
            <text:p text:style-name="P20" loext:marker-style-name="T240"><text:span text:style-name="T163">3 </text:span><text:span text:style-name="T162">個重複 </text:span><text:span text:style-name="T163">ACK (Fast Retransmit)</text:span></text:p>
          </table:table-cell>
          <table:table-cell table:style-name="表格77.A3" office:value-type="string">
            <text:p text:style-name="P20" loext:marker-style-name="T106"><text:span text:style-name="T110">連續收 </text:span><text:span text:style-name="T111">3 </text:span><text:span text:style-name="T110">個同樣 </text:span><text:span text:style-name="T111">ACK</text:span><text:span text:style-name="T109">，</text:span><text:span text:style-name="T449">單一封包丟失</text:span></text:p>
          </table:table-cell>
          <table:table-cell table:style-name="表格77.A3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3" office:value-type="string">
            <text:p text:style-name="P20" loext:marker-style-name="T44"><text:span text:style-name="T45">= ssthresh</text:span><text:span text:style-name="T61">（直接減半）</text:span></text:p>
          </table:table-cell>
          <table:table-cell table:style-name="表格77.A3" office:value-type="string">
            <text:p text:style-name="P20" loext:marker-style-name="T447"><text:span text:style-name="T119">進入 </text:span><text:span text:style-name="T448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7">⚠️ <text:s/></text:span><text:span text:style-name="T80">重要區別</text:span></text:p>
            <text:p text:style-name="P11" loext:marker-style-name="T21"><text:span text:style-name="T375">Timeout </text:span><text:span text:style-name="T374">代表網路嚴重問題</text:span><text:span text:style-name="T20">，</text:span><text:span text:style-name="T450">cwnd </text:span><text:span text:style-name="T451">重設回 </text:span><text:span text:style-name="T450">1 </text:span><text:span text:style-name="T451">從頭來</text:span><text:span text:style-name="T20">；</text:span><text:span text:style-name="T452">3 </text:span><text:span text:style-name="T453">個重複 </text:span><text:span text:style-name="T452">ACK </text:span><text:span text:style-name="T453">只是單一封包遺失</text:span><text:span text:style-name="T20">，</text:span><text:span text:style-name="T450">cwnd </text:span><text:span text:style-name="T451">直接減半後繼續 </text:span><text:span text:style-name="T450">Congestion Avoidance</text:span><text:span text:style-name="T451">，不用從頭重來</text:span><text:span text:style-name="T20">。</text:span><text:span text:style-name="T42">(</text:span><text:span text:style-name="T454">Timeout → cwnd = 1</text:span><text:span text:style-name="T455">；</text:span><text:span text:style-name="T454">3Dup ACK → cwnd ÷ 2</text:span><text:span text:style-name="T42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AIMD</text:span><text:span text:style-name="T38">（加法增長 </text:span><text:span text:style-name="T37">/ </text:span><text:span text:style-name="T38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 loext:marker-style-name="T12"><text:span text:style-name="T43">AI</text:span><text:span text:style-name="T13">：加法增長 </text:span><text:span text:style-name="T43">Additive Increase</text:span></text:p>
            </table:table-cell>
            <table:table-cell table:style-name="表格78.A1" office:value-type="string">
              <text:p text:style-name="P7" loext:marker-style-name="T12"><text:span text:style-name="T43">MD</text:span><text:span text:style-name="T13">：乘法減少 </text:span><text:span text:style-name="T43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0" loext:marker-style-name="T14"><text:span text:style-name="T70">沒丟包 → 網路 </text:span><text:span text:style-name="T300">OK </text:span><text:span text:style-name="T16">→ CA </text:span><text:span text:style-name="T15">階段線性增加（</text:span><text:span text:style-name="T120">每 </text:span><text:span text:style-name="T255">RTT +1</text:span><text:span text:style-name="T15">），慢慢加速。</text:span></text:p>
          </table:table-cell>
          <table:table-cell table:style-name="表格78.A2" office:value-type="string">
            <text:p text:style-name="P20" loext:marker-style-name="T14"><text:span text:style-name="T70">偵測到丟包 → 網路塞了 </text:span><text:span text:style-name="T15">→ </text:span><text:span text:style-name="T255">cwnd ×0.5</text:span><text:span text:style-name="T120">（減半）</text:span><text:span text:style-name="T15">，快速降速避免繼續惡化。</text:span></text:p>
          </table:table-cell>
        </table:table-row>
      </table:table>
      <text:p text:style-name="P22" loext:marker-style-name="T172"><text:span text:style-name="T456">AIMD </text:span><text:span text:style-name="T457">本質：用 </text:span><text:span text:style-name="T456">ACK </text:span><text:span text:style-name="T457">當回饋，不斷探測網路的「最高速度」</text:span><text:span text:style-name="T174">——</text:span><text:span text:style-name="T128">慢慢加速找上限，遇到問題快速減速再重新找</text:span><text:span text:style-name="T174">，這個循環就是 </text:span><text:span text:style-name="T173">TCP </text:span><text:span text:style-name="T174">傳輸的節奏。</text:span></text:p>
      <text:h text:style-name="P18" text:outline-level="2" loext:marker-style-name="T34"><text:span text:style-name="T35">八、把整個 </text:span><text:span text:style-name="T34">TCP </text:span><text:span text:style-name="T35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7">🔄 <text:s/></text:span><text:span text:style-name="T30">完整流程</text:span></text:p>
            <text:p text:style-name="P11" loext:marker-style-name="T21"><text:span text:style-name="T42">① </text:span><text:span text:style-name="T20">建立連線：三次握手（</text:span><text:span text:style-name="T42">SYN → SYN+ACK → ACK</text:span><text:span text:style-name="T20">）確認雙向通訊正常。</text:span></text:p>
            <text:p text:style-name="P12" loext:marker-style-name="T21"><text:span text:style-name="T42">② </text:span><text:span text:style-name="T20">開始傳資料 </text:span><text:span text:style-name="T42">Slow Start</text:span><text:span text:style-name="T20">：</text:span><text:span text:style-name="T42">cwnd </text:span><text:span text:style-name="T20">從 </text:span><text:span text:style-name="T42">1 </text:span><text:span text:style-name="T20">開始，每個 </text:span><text:span text:style-name="T42">ACK +1</text:span><text:span text:style-name="T20">，指數成長快速試探上限。</text:span></text:p>
            <text:p text:style-name="P12" loext:marker-style-name="T21"><text:span text:style-name="T42">③ </text:span><text:span text:style-name="T20">達到門檻切換 </text:span><text:span text:style-name="T42">CA</text:span><text:span text:style-name="T20">：</text:span><text:span text:style-name="T42">cwnd </text:span><text:span text:style-name="T20">到 </text:span><text:span text:style-name="T42">ssthresh </text:span><text:span text:style-name="T20">後改每 </text:span><text:span text:style-name="T42">RTT +1</text:span><text:span text:style-name="T20">，線性保守維持穩定。（</text:span><text:span text:style-name="T42">RTT</text:span><text:span text:style-name="T20">＝來回時間：送出一個封包到收到 </text:span><text:span text:style-name="T42">ACK </text:span><text:span text:style-name="T20">所花的時間）</text:span></text:p>
            <text:p text:style-name="P12" loext:marker-style-name="T21"><text:span text:style-name="T42">④ </text:span><text:span text:style-name="T20">每輪都考慮兩個限制：實際傳送量 </text:span><text:span text:style-name="T42">= min(rwnd, cwnd)</text:span><text:span text:style-name="T20">。</text:span></text:p>
            <text:p text:style-name="P12" loext:marker-style-name="T21"><text:span text:style-name="T42">⑤ </text:span><text:span text:style-name="T20">視窗持續滑動：每收到一個 </text:span><text:span text:style-name="T42">ACK </text:span><text:span text:style-name="T20">視窗往前移，保持 </text:span><text:span text:style-name="T42">pipeline </text:span><text:span text:style-name="T20">流暢。</text:span></text:p>
            <text:p text:style-name="P12" loext:marker-style-name="T21"><text:span text:style-name="T42">⑥ </text:span><text:span text:style-name="T20">偵測到丟包快速反應：</text:span><text:span text:style-name="T42">Timeout → cwnd=1 </text:span><text:span text:style-name="T20">重回 </text:span><text:span text:style-name="T42">Slow Start</text:span><text:span text:style-name="T20">；</text:span><text:span text:style-name="T42">3 </text:span><text:span text:style-name="T20">重複 </text:span><text:span text:style-name="T42">ACK → cwnd </text:span><text:span text:style-name="T20">減半續 </text:span><text:span text:style-name="T42">CA</text:span><text:span text:style-name="T20">。</text:span></text:p>
            <text:p text:style-name="P12" loext:marker-style-name="T21"><text:span text:style-name="T42">⑦ </text:span><text:span text:style-name="T20">持續循環調整：送 → 收 </text:span><text:span text:style-name="T42">ACK → </text:span><text:span text:style-name="T20">調整 </text:span><text:span text:style-name="T42">cwnd → </text:span><text:span text:style-name="T20">再送，</text:span><text:span text:style-name="T265">用 </text:span><text:span text:style-name="T264">ACK </text:span><text:span text:style-name="T265">當回饋不斷自我調節</text:span><text:span text:style-name="T20">。</text:span></text:p>
          </table:table-cell>
        </table:table-row>
      </table:table>
      <text:h text:style-name="P18" text:outline-level="2" loext:marker-style-name="T458"><text:soft-page-break/><text:span text:style-name="T458">TCP </text:span><text:span text:style-name="T459">七字口訣 <text:s text:c="2"/>握</text:span><text:span text:style-name="T458">(</text:span><text:span text:style-name="T459">三次握手</text:span><text:span text:style-name="T458">) → </text:span><text:span text:style-name="T459">衝</text:span><text:span text:style-name="T458">(Slow Start </text:span><text:span text:style-name="T459">指數成長</text:span><text:span text:style-name="T458">) → </text:span><text:span text:style-name="T459">穩</text:span><text:span text:style-name="T458">(CA </text:span><text:span text:style-name="T459">線性成長</text:span><text:span text:style-name="T458">) → </text:span><text:span text:style-name="T459">看</text:span><text:span text:style-name="T458">(min(rwnd,cwnd)) → </text:span><text:span text:style-name="T459">滑</text:span><text:span text:style-name="T458">(Sliding Window) → </text:span><text:span text:style-name="T459">救</text:span><text:span text:style-name="T458">(Timeout / 3 Dup ACK) → </text:span><text:span text:style-name="T459">循</text:span><text:span text:style-name="T458">(ACK </text:span><text:span text:style-name="T459">回饋循環</text:span><text:span text:style-name="T458">)</text:span></text:h>
      <text:h text:style-name="P23" text:outline-level="2" loext:marker-style-name="T34"/>
      <text:h text:style-name="P18" text:outline-level="2" loext:marker-style-name="T34"><text:span text:style-name="T35">九、</text:span><text:span text:style-name="T34">ARP / NAT / TCP </text:span><text:span text:style-name="T35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1" loext:marker-style-name="T12"><text:span text:style-name="T13">步驟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發生什麼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用到什麼</text:span><text:span text:style-name="T12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0" loext:marker-style-name="T14"><text:span text:style-name="T16">DNS </text:span><text:span text:style-name="T15">解析</text:span></text:p>
          </table:table-cell>
          <table:table-cell table:style-name="表格80.A2" office:value-type="string">
            <text:p text:style-name="P20" loext:marker-style-name="T14"><text:span text:style-name="T16">google.com → 142.250.x.x</text:span><text:span text:style-name="T14"/></text:p>
          </table:table-cell>
          <table:table-cell table:style-name="表格80.A2" office:value-type="string">
            <text:p text:style-name="P20" loext:marker-style-name="T14"><text:span text:style-name="T16">DNS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ARP </text:span><text:span text:style-name="T15">找路由器</text:span></text:p>
          </table:table-cell>
          <table:table-cell table:style-name="表格80.A3" office:value-type="string">
            <text:p text:style-name="P20" loext:marker-style-name="T14"><text:span text:style-name="T15">找路由器的 </text:span><text:span text:style-name="T16">MAC </text:span><text:span text:style-name="T15">位址</text:span></text:p>
          </table:table-cell>
          <table:table-cell table:style-name="表格80.A3" office:value-type="string">
            <text:p text:style-name="P20" loext:marker-style-name="T14"><text:span text:style-name="T16">AR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  <table:table-cell table:style-name="表格80.A2" office:value-type="string">
            <text:p text:style-name="P20" loext:marker-style-name="T14"><text:span text:style-name="T15">私有 </text:span><text:span text:style-name="T16">IP </text:span><text:span text:style-name="T15">換成公網 </text:span><text:span text:style-name="T16">IP</text:span></text:p>
          </table:table-cell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TCP </text:span><text:span text:style-name="T15">三次握手</text:span></text:p>
          </table:table-cell>
          <table:table-cell table:style-name="表格80.A3" office:value-type="string">
            <text:p text:style-name="P20" loext:marker-style-name="T14"><text:span text:style-name="T15">與 </text:span><text:span text:style-name="T16">Google </text:span><text:span text:style-name="T15">建立可靠連線</text:span></text:p>
          </table:table-cell>
          <table:table-cell table:style-name="表格80.A3" office:value-type="string">
            <text:p text:style-name="P20" loext:marker-style-name="T14"><text:span text:style-name="T16">TC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5">傳資料（</text:span><text:span text:style-name="T16">Slow Start → CA</text:span><text:span text:style-name="T15">）</text:span></text:p>
          </table:table-cell>
          <table:table-cell table:style-name="表格80.A2" office:value-type="string">
            <text:p text:style-name="P20" loext:marker-style-name="T14"><text:span text:style-name="T16">cwnd </text:span><text:span text:style-name="T15">慢慢加速，滑動視窗持續傳送</text:span></text:p>
          </table:table-cell>
          <table:table-cell table:style-name="表格80.A2" office:value-type="string">
            <text:p text:style-name="P20" loext:marker-style-name="T14"><text:span text:style-name="T16">TCP </text:span><text:span text:style-name="T15">擁塞控制</text:span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Google </text:span><text:span text:style-name="T15">回應</text:span></text:p>
          </table:table-cell>
          <table:table-cell table:style-name="表格80.A3" office:value-type="string">
            <text:p text:style-name="P20" loext:marker-style-name="T14"><text:span text:style-name="T15">資料送回你的電腦</text:span><text:span text:style-name="T14"/></text:p>
          </table:table-cell>
          <table:table-cell table:style-name="表格80.A3" office:value-type="string">
            <text:p text:style-name="P20" loext:marker-style-name="T14"><text:span text:style-name="T16">TCP + NAT</text:span><text:span text:style-name="T15">（回程換 </text:span><text:span text:style-name="T16">IP</text:span><text:span text:style-name="T15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7">⚡ <text:s/></text:span><text:span text:style-name="T38">層次關係</text:span></text:p>
            <text:p text:style-name="P11" loext:marker-style-name="T21"><text:span text:style-name="T42">ARP </text:span><text:span text:style-name="T20">在 </text:span><text:span text:style-name="T42">L2/L3 </text:span><text:span text:style-name="T20">交界處工作（找 </text:span><text:span text:style-name="T42">MAC</text:span><text:span text:style-name="T20">）；</text:span><text:span text:style-name="T42">NAT </text:span><text:span text:style-name="T20">在 </text:span><text:span text:style-name="T42">L3</text:span><text:span text:style-name="T20">（換 </text:span><text:span text:style-name="T42">IP</text:span><text:span text:style-name="T20">）；</text:span><text:span text:style-name="T42">TCP </text:span><text:span text:style-name="T20">在 </text:span><text:span text:style-name="T42">L4</text:span><text:span text:style-name="T20">（控制傳輸）。三者各司其職，合作完成一次上網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十、本篇一句話總結</text:span><text:span text:style-name="T34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7">🧠 <text:s/></text:span><text:span text:style-name="T166">考試直接用</text:span></text:p>
            <text:p text:style-name="P11" loext:marker-style-name="T21"><text:span text:style-name="T42">TCP </text:span><text:span text:style-name="T20">用三次握手建立連線，</text:span><text:span text:style-name="T86">用 </text:span><text:span text:style-name="T85">rwnd</text:span><text:span text:style-name="T86">（接收端）和 </text:span><text:span text:style-name="T85">cwnd</text:span><text:span text:style-name="T86">（網路）雙重限制控制傳送速度</text:span><text:span text:style-name="T20">，透過 </text:span><text:span text:style-name="T42">Slow Start </text:span><text:span text:style-name="T20">指數試探、</text:span><text:span text:style-name="T42">Congestion Avoidance </text:span><text:span text:style-name="T20">線性增長、丟包後快速降速，</text:span><text:span text:style-name="T419">持續用 </text:span><text:span text:style-name="T460">ACK </text:span><text:span text:style-name="T419">當回饋調節</text:span><text:span text:style-name="T20">，確保資料可靠且高效地傳達。</text:span></text:p>
          </table:table-cell>
        </table:table-row>
      </table:table>
      <text:h text:style-name="P17" text:outline-level="1" loext:marker-style-name="T32"><text:span text:style-name="T33">第 六 篇　</text:span><text:span text:style-name="T32">DNS </text:span><text:span text:style-name="T33">與 </text:span><text:span text:style-name="T32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7">💡 <text:s/></text:span><text:span text:style-name="T31">DNS </text:span><text:span text:style-name="T30">是什麼？</text:span></text:p>
            <text:p text:style-name="P11" loext:marker-style-name="T21"><text:span text:style-name="T42">DNS </text:span><text:span text:style-name="T20">就像「網路電話簿」。人類習慣記名字（</text:span><text:span text:style-name="T42">google.com</text:span><text:span text:style-name="T20">），但電腦只認識號碼（</text:span><text:span text:style-name="T42">IP </text:span><text:span text:style-name="T20">位址），</text:span><text:span text:style-name="T42">DNS </text:span><text:span text:style-name="T20">的工作就是幫你查出對應的號碼。全名 </text:span><text:span text:style-name="T42">Domain Name System</text:span><text:span text:style-name="T20">，是負責將「網域名稱」轉換為「</text:span><text:span text:style-name="T42">IP </text:span><text:span text:style-name="T20">位址」的分散式系統。</text:span></text:p>
          </table:table-cell>
        </table:table-row>
      </table:table>
      <text:h text:style-name="P18" text:outline-level="2" loext:marker-style-name="T34"><text:span text:style-name="T35">一、</text:span><text:span text:style-name="T34">DNS </text:span><text:span text:style-name="T35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範例</text:span><text:span text:style-name="T12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0" loext:marker-style-name="T299"><text:span text:style-name="T300">A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Address Record</text:span><text:span text:style-name="T298"/></text:p>
          </table:table-cell>
          <table:table-cell table:style-name="表格83.A2" office:value-type="string">
            <text:p text:style-name="P20" loext:marker-style-name="T14"><text:span text:style-name="T15">網域名稱 → </text:span><text:span text:style-name="T317">IPv4 </text:span><text:span text:style-name="T340">位址</text:span></text:p>
          </table:table-cell>
          <table:table-cell table:style-name="表格83.A2" office:value-type="string">
            <text:p text:style-name="P20" loext:marker-style-name="T14"><text:span text:style-name="T16">google.com → 142.250.x.x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NS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Name Server</text:span><text:span text:style-name="T298"/></text:p>
          </table:table-cell>
          <table:table-cell table:style-name="表格83.A3" office:value-type="string">
            <text:p text:style-name="P20" loext:marker-style-name="T14"><text:span text:style-name="T15">指定</text:span><text:span text:style-name="T461">管理該網域的 </text:span><text:span text:style-name="T16">DNS </text:span><text:span text:style-name="T15">伺服器</text:span></text:p>
          </table:table-cell>
          <table:table-cell table:style-name="表格83.A3" office:value-type="string">
            <text:p text:style-name="P20" loext:marker-style-name="T14"><text:span text:style-name="T16">google.com → ns1.google.com</text:span><text:span text:style-name="T14"/></text:p>
          </table:table-cell>
        </table:table-row>
        <table:table-row table:style-name="表格83.1">
          <table:table-cell table:style-name="表格83.A2" office:value-type="string">
            <text:p text:style-name="P20" loext:marker-style-name="T299"><text:span text:style-name="T300">MX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Mail Exchange</text:span><text:span text:style-name="T298"/></text:p>
          </table:table-cell>
          <table:table-cell table:style-name="表格83.A2" office:value-type="string">
            <text:p text:style-name="P20" loext:marker-style-name="T14"><text:span text:style-name="T15">指定</text:span><text:span text:style-name="T440">負責收發郵件的</text:span><text:span text:style-name="T15">伺服器</text:span></text:p>
          </table:table-cell>
          <table:table-cell table:style-name="表格83.A2" office:value-type="string">
            <text:p text:style-name="P20" loext:marker-style-name="T14"><text:span text:style-name="T16">google.com → mail.google.com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CNAME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Canonical Name</text:span><text:span text:style-name="T298"/></text:p>
          </table:table-cell>
          <table:table-cell table:style-name="表格83.A3" office:value-type="string">
            <text:p text:style-name="P20" loext:marker-style-name="T462"><text:span text:style-name="T444">設定網域別名，指向另一個網域</text:span><text:span text:style-name="T462"/></text:p>
          </table:table-cell>
          <table:table-cell table:style-name="表格83.A3" office:value-type="string">
            <text:p text:style-name="P20" loext:marker-style-name="T14"><text:span text:style-name="T16">www → google.com</text:span><text:span text:style-name="T14"/></text:p>
          </table:table-cell>
        </table:table-row>
      </table:table>
      <text:p text:style-name="P22" loext:marker-style-name="T150"><text:span text:style-name="T151">（</text:span><text:span text:style-name="T463">補充：</text:span><text:span text:style-name="T464">AAAA record → </text:span><text:span text:style-name="T463">回傳 </text:span><text:span text:style-name="T464">IPv6 </text:span><text:span text:style-name="T463">位址，見第三篇 </text:span><text:span text:style-name="T464">Dual Stack</text:span><text:span text:style-name="T463">。</text:span><text:span text:style-name="T151">）</text:span></text:p>
      <text:h text:style-name="P18" text:outline-level="2" loext:marker-style-name="T34"><text:span text:style-name="T35">二、</text:span><text:span text:style-name="T34">DNS </text:span><text:span text:style-name="T35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7">📚 <text:s/></text:span><text:span text:style-name="T30">圖書館找書比喻</text:span></text:p>
            <text:p text:style-name="P11" loext:marker-style-name="T21"><text:span text:style-name="T20">你要找一本書，書名叫「</text:span><text:span text:style-name="T42">google.com</text:span><text:span text:style-name="T20">」：</text:span></text:p>
            <text:p text:style-name="P12" loext:marker-style-name="T21"><text:span text:style-name="T42">① </text:span><text:span text:style-name="T20">先翻自己的筆記本（</text:span><text:span text:style-name="T42">Cache</text:span><text:span text:style-name="T20">）→ 記得放哪就直接去</text:span></text:p>
            <text:p text:style-name="P12" loext:marker-style-name="T21"><text:span text:style-name="T42">② </text:span><text:span text:style-name="T20">問圖書館員（</text:span><text:span text:style-name="T42">Local DNS</text:span><text:span text:style-name="T20">）→「你知道這本書嗎？」</text:span></text:p>
            <text:p text:style-name="P12" loext:marker-style-name="T21"><text:span text:style-name="T42">③ </text:span><text:span text:style-name="T20">館員問館長（</text:span><text:span text:style-name="T42">Root DNS</text:span><text:span text:style-name="T20">）→「這本是哪個分類？」→「外文區」</text:span></text:p>
            <text:p text:style-name="P12" loext:marker-style-name="T21"><text:span text:style-name="T42">④ </text:span><text:span text:style-name="T20">去外文區管理員（</text:span><text:span text:style-name="T42">TLD</text:span><text:span text:style-name="T20">：</text:span><text:span text:style-name="T42">.com</text:span><text:span text:style-name="T20">）→「</text:span><text:span text:style-name="T42">google </text:span><text:span text:style-name="T20">在哪個書架？」</text:span></text:p>
            <text:p text:style-name="P12" loext:marker-style-name="T21"><text:span text:style-name="T42">⑤ </text:span><text:span text:style-name="T20">書架管理員（</text:span><text:span text:style-name="T42">Authoritative DNS</text:span><text:span text:style-name="T20">）→ 直接給你確切位置（</text:span><text:span text:style-name="T42">IP</text:span><text:span text:style-name="T20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7" loext:marker-style-name="T104"><text:span text:style-name="T105">步驟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層級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說明</text:span><text:span text:style-name="T104"/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1</text:span><text:span text:style-name="T106"/></text:p>
          </table:table-cell>
          <table:table-cell table:style-name="表格84.A3" office:value-type="string">
            <text:p text:style-name="P20" loext:marker-style-name="T465"><text:span text:style-name="T117">本機快取（</text:span><text:span text:style-name="T386">Cache</text:span><text:span text:style-name="T117">）</text:span></text:p>
          </table:table-cell>
          <table:table-cell table:style-name="表格84.A3" office:value-type="string">
            <text:p text:style-name="P20" loext:marker-style-name="T466"><text:span text:style-name="T391">先檢查電腦或瀏覽器有無記住此網址的 </text:span><text:span text:style-name="T390">IP</text:span><text:span text:style-name="T391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2</text:span><text:span text:style-name="T106"/></text:p>
          </table:table-cell>
          <table:table-cell table:style-name="表格84.A4" office:value-type="string">
            <text:p text:style-name="P20" loext:marker-style-name="T467"><text:span text:style-name="T384">Local DNS </text:span><text:span text:style-name="T385">伺服器</text:span></text:p>
          </table:table-cell>
          <table:table-cell table:style-name="表格84.A4" office:value-type="string">
            <text:p text:style-name="P20" loext:marker-style-name="T106"><text:span text:style-name="T109">向 </text:span><text:span text:style-name="T111">ISP</text:span><text:span text:style-name="T110">（如中華電信）</text:span><text:span text:style-name="T109">或</text:span><text:span text:style-name="T110">自設 </text:span><text:span text:style-name="T111">DNS</text:span><text:span text:style-name="T110">（如 </text:span><text:span text:style-name="T111">8.8.8.8</text:span><text:span text:style-name="T110">）</text:span><text:span text:style-name="T109">查詢。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3</text:span><text:span text:style-name="T106"/></text:p>
          </table:table-cell>
          <table:table-cell table:style-name="表格84.A3" office:value-type="string">
            <text:p text:style-name="P20" loext:marker-style-name="T468"><text:span text:style-name="T382">Root DNS </text:span><text:span text:style-name="T381">伺服器</text:span></text:p>
          </table:table-cell>
          <table:table-cell table:style-name="表格84.A3" office:value-type="string">
            <text:p text:style-name="P20" loext:marker-style-name="T106"><text:span text:style-name="T469">全球共 </text:span><text:span text:style-name="T470">13 </text:span><text:span text:style-name="T469">組根 </text:span><text:span text:style-name="T470">DNS</text:span><text:span text:style-name="T109">。不知道答案，但</text:span><text:span text:style-name="T162">會指向對應的 </text:span><text:span text:style-name="T163">TLD DNS</text:span><text:span text:style-name="T109">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4</text:span><text:span text:style-name="T106"/></text:p>
          </table:table-cell>
          <table:table-cell table:style-name="表格84.A4" office:value-type="string">
            <text:p text:style-name="P20" loext:marker-style-name="T471"><text:span text:style-name="T379">TLD DNS </text:span><text:span text:style-name="T378">伺服器</text:span></text:p>
          </table:table-cell>
          <table:table-cell table:style-name="表格84.A4" office:value-type="string">
            <text:p text:style-name="P20" loext:marker-style-name="T106"><text:span text:style-name="T109">負責</text:span><text:span text:style-name="T472">管理頂層網域（</text:span><text:span text:style-name="T473">.com</text:span><text:span text:style-name="T472">、</text:span><text:span text:style-name="T473">.tw</text:span><text:span text:style-name="T472">）</text:span><text:span text:style-name="T109">。</text:span><text:span text:style-name="T162">回應 </text:span><text:span text:style-name="T163">Authoritative DNS </text:span><text:span text:style-name="T162">的位置。</text:span><text:span text:style-name="T118">「</text:span><text:span text:style-name="T446">TLD </text:span><text:span text:style-name="T118">是 </text:span><text:span text:style-name="T446">Top-Level Domain</text:span><text:span text:style-name="T118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5</text:span><text:span text:style-name="T106"/></text:p>
          </table:table-cell>
          <table:table-cell table:style-name="表格84.A3" office:value-type="string">
            <text:p text:style-name="P20" loext:marker-style-name="T474"><text:span text:style-name="T475">Authoritative DNS</text:span><text:span text:style-name="T474"/></text:p>
          </table:table-cell>
          <table:table-cell table:style-name="表格84.A3" office:value-type="string">
            <text:p text:style-name="P20" loext:marker-style-name="T106"><text:span text:style-name="T110">真正儲存答案的伺服器</text:span><text:span text:style-name="T109">，直接回傳正確的 </text:span><text:span text:style-name="T108">IP </text:span><text:span text:style-name="T109">位址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6</text:span><text:span text:style-name="T106"/></text:p>
          </table:table-cell>
          <table:table-cell table:style-name="表格84.A4" office:value-type="string">
            <text:p text:style-name="P20" loext:marker-style-name="T106"><text:span text:style-name="T109">回傳 </text:span><text:span text:style-name="T108">IP </text:span><text:span text:style-name="T109">位址 ✓</text:span></text:p>
          </table:table-cell>
          <table:table-cell table:style-name="表格84.A4" office:value-type="string">
            <text:p text:style-name="P20" loext:marker-style-name="T106"><text:span text:style-name="T109">瀏覽器取得 </text:span><text:span text:style-name="T108">IP </text:span><text:span text:style-name="T109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7">📌 <text:s/></text:span><text:span text:style-name="T166">一句話總結</text:span></text:p>
            <text:p text:style-name="P11" loext:marker-style-name="T21"><text:span text:style-name="T42">DNS </text:span><text:span text:style-name="T20">解析為「由快取開始，經 </text:span><text:span text:style-name="T42">Local DNS</text:span><text:span text:style-name="T20">，逐層向 </text:span><text:span text:style-name="T42">Root</text:span><text:span text:style-name="T20">、</text:span><text:span text:style-name="T42">TLD</text:span><text:span text:style-name="T20">、</text:span><text:span text:style-name="T42">Authoritative DNS </text:span><text:span text:style-name="T20">查詢，最後取得 </text:span><text:span text:style-name="T42">IP </text:span><text:span text:style-name="T20">位址」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三、</text:span><text:span text:style-name="T34">Recursive vs. Iterative</text:span><text:span text:style-name="T35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7">⚠️ <text:s/></text:span><text:span text:style-name="T80">最關鍵的差別</text:span></text:p>
            <text:p text:style-name="P11" loext:marker-style-name="T21"><text:span text:style-name="T86">兩種方式的路徑相同</text:span><text:span text:style-name="T20">（</text:span><text:span text:style-name="T42">Cache → Local → Root → TLD → Auth</text:span><text:span text:style-name="T20">），</text:span><text:span text:style-name="T128">唯一差別只有一件事：「誰去問」</text:span><text:span text:style-name="T20">。</text:span></text:p>
            <text:p text:style-name="P12" loext:marker-style-name="T21"><text:span text:style-name="T42">→ </text:span><text:span text:style-name="T364">DNS </text:span><text:span text:style-name="T362">幫你問完 ＝ </text:span><text:span text:style-name="T364">Recursive</text:span><text:span text:style-name="T362">（遞迴）</text:span><text:span text:style-name="T20">；</text:span><text:span text:style-name="T282">你自己去問 ＝ </text:span><text:span text:style-name="T283">Iterative</text:span><text:span text:style-name="T282">（反覆）</text:span><text:span text:style-name="T20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1" loext:marker-style-name="T12"><text:span text:style-name="T13">比較項目</text:span><text:span text:style-name="T12"/></text:p>
          </table:table-cell>
          <table:table-cell table:style-name="表格85.A2" office:value-type="string">
            <text:p text:style-name="P21" loext:marker-style-name="T12"><text:span text:style-name="T43">Recursive</text:span><text:span text:style-name="T13">（遞迴）</text:span></text:p>
          </table:table-cell>
          <table:table-cell table:style-name="表格85.A2" office:value-type="string">
            <text:p text:style-name="P21" loext:marker-style-name="T12"><text:span text:style-name="T43">Iterative</text:span><text:span text:style-name="T13">（反覆）</text:span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誰去問</text:span><text:span text:style-name="T14"/></text:p>
          </table:table-cell>
          <table:table-cell table:style-name="表格85.A3" office:value-type="string">
            <text:p text:style-name="P20" loext:marker-style-name="T298"><text:span text:style-name="T255">DNS </text:span><text:span text:style-name="T120">伺服器代替你問完</text:span></text:p>
          </table:table-cell>
          <table:table-cell table:style-name="表格85.A3" office:value-type="string">
            <text:p text:style-name="P20" loext:marker-style-name="T299"><text:span text:style-name="T70">你自己逐層查詢</text:span><text:span text:style-name="T299"/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問幾次</text:span><text:span text:style-name="T14"/></text:p>
          </table:table-cell>
          <table:table-cell table:style-name="表格85.A4" office:value-type="string">
            <text:p text:style-name="P20" loext:marker-style-name="T298"><text:span text:style-name="T120">你只問 </text:span><text:span text:style-name="T255">1 </text:span><text:span text:style-name="T120">次</text:span></text:p>
          </table:table-cell>
          <table:table-cell table:style-name="表格85.A4" office:value-type="string">
            <text:p text:style-name="P20" loext:marker-style-name="T299"><text:span text:style-name="T70">每層各問一次，共多次</text:span><text:span text:style-name="T299"/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常見場合</text:span><text:span text:style-name="T14"/></text:p>
          </table:table-cell>
          <table:table-cell table:style-name="表格85.A3" office:value-type="string">
            <text:p text:style-name="P20" loext:marker-style-name="T14"><text:span text:style-name="T15">一般使用者 → </text:span><text:span text:style-name="T16">Local DNS</text:span></text:p>
          </table:table-cell>
          <table:table-cell table:style-name="表格85.A3" office:value-type="string">
            <text:p text:style-name="P20" loext:marker-style-name="T14"><text:span text:style-name="T16">DNS </text:span><text:span text:style-name="T15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記憶口訣</text:span><text:span text:style-name="T14"/></text:p>
          </table:table-cell>
          <table:table-cell table:style-name="表格85.A4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85.A4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7">🗣️ <text:s/></text:span><text:span text:style-name="T30">問路比喻</text:span></text:p>
            <text:p text:style-name="P11"><text:span text:style-name="T476">Recursive</text:span><text:span text:style-name="T477">（朋友幫你問完）</text:span><text:span text:style-name="T124">：</text:span><text:span text:style-name="T84">你只問朋友（</text:span><text:span text:style-name="T83">Local DNS</text:span><text:span text:style-name="T84">）一次</text:span><text:span text:style-name="T20">「台北</text:span><text:span text:style-name="T42">101</text:span><text:span text:style-name="T20">在哪？」朋友自己跑完 </text:span><text:span text:style-name="T42">Root→TLD→Auth</text:span><text:span text:style-name="T20">，回你 </text:span><text:span text:style-name="T42">IP</text:span><text:span text:style-name="T20">，你沒動過。</text:span></text:p>
            <text:p text:style-name="P12"><text:span text:style-name="T476">Iterative</text:span><text:span text:style-name="T477">（你自己跑全程）</text:span><text:span text:style-name="T124">：</text:span><text:span text:style-name="T20">你問 </text:span><text:span text:style-name="T42">Root</text:span><text:span text:style-name="T20">「我不知道，去問 </text:span><text:span text:style-name="T42">TLD</text:span><text:span text:style-name="T20">」→ 你問 </text:span><text:span text:style-name="T42">TLD</text:span><text:span text:style-name="T20">「去問 </text:span><text:span text:style-name="T42">Auth</text:span><text:span text:style-name="T20">」→ 你問 </text:span><text:span text:style-name="T42">Auth </text:span><text:span text:style-name="T20">拿到 </text:span><text:span text:style-name="T42">IP</text:span><text:span text:style-name="T20">，全程你自己跑。</text:span></text:p>
            <text:p text:style-name="P12"><text:span text:style-name="T19">為什麼有兩種？</text:span><text:span text:style-name="T368">一般使用者採 </text:span><text:span text:style-name="T401">Recursive</text:span><text:span text:style-name="T368">（簡單方便）</text:span><text:span text:style-name="T20">；</text:span><text:span text:style-name="T331">DNS </text:span><text:span text:style-name="T330">伺服器之間採 </text:span><text:span text:style-name="T331">Iterative</text:span><text:span text:style-name="T20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Open Resolver </text:span><text:span text:style-name="T35">風險</text:span></text:h>
      <text:p text:style-name="P22" loext:marker-style-name="T21"><text:span text:style-name="T85">Open Resolver </text:span><text:span text:style-name="T20">是</text:span><text:span text:style-name="T369">對外完全開放、任何人都可以使用的 </text:span><text:span text:style-name="T370">DNS </text:span><text:span text:style-name="T369">伺服器</text:span><text:span text:style-name="T20">；因為</text:span><text:span text:style-name="T84">沒有存取限制，容易成為攻擊目標</text:span><text:span text:style-name="T20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 loext:marker-style-name="T12"><text:span text:style-name="T43">⚠️ Cache Poisoning</text:span><text:span text:style-name="T13">（快取污染）</text:span></text:p>
            </table:table-cell>
            <table:table-cell table:style-name="表格86.A1" office:value-type="string">
              <text:p text:style-name="P7" loext:marker-style-name="T12"><text:span text:style-name="T43">⚡ DDoS </text:span><text:span text:style-name="T13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0" loext:marker-style-name="T14"><text:span text:style-name="T478">攻擊者偽造 </text:span><text:span text:style-name="T479">DNS </text:span><text:span text:style-name="T478">回應</text:span><text:span text:style-name="T15">，</text:span><text:span text:style-name="T480">將惡意 </text:span><text:span text:style-name="T481">IP </text:span><text:span text:style-name="T480">植入 </text:span><text:span text:style-name="T481">DNS </text:span><text:span text:style-name="T480">快取，使用者被引導至釣魚網站</text:span><text:span text:style-name="T15">。流程：偽造回應 → </text:span><text:span text:style-name="T16">DNS </text:span><text:span text:style-name="T15">存假 </text:span><text:span text:style-name="T16">IP → </text:span><text:span text:style-name="T15">用戶連到釣魚網站。</text:span></text:p>
          </table:table-cell>
          <table:table-cell table:style-name="表格86.A2" office:value-type="string">
            <text:p text:style-name="P20" loext:marker-style-name="T14"><text:span text:style-name="T482">攻擊者偽造受害者 </text:span><text:span text:style-name="T483">IP </text:span><text:span text:style-name="T89">發送查詢</text:span><text:span text:style-name="T15">，</text:span><text:span text:style-name="T481">DNS </text:span><text:span text:style-name="T480">回傳大量資料給受害者，形成流量放大效果</text:span><text:span text:style-name="T15">。流程：小封包 → </text:span><text:span text:style-name="T16">DNS </text:span><text:span text:style-name="T15">回超大資料 → 灌爆受害者。</text:span></text:p>
          </table:table-cell>
        </table:table-row>
      </table:table>
      <text:h text:style-name="P18" text:outline-level="2" loext:marker-style-name="T34"><text:span text:style-name="T35">五、</text:span><text:span text:style-name="T34">DNSSEC — DNS </text:span><text:span text:style-name="T35">安全機制</text:span></text:h>
      <text:p text:style-name="P22" loext:marker-style-name="T21"><text:span text:style-name="T42">DNSSEC</text:span><text:span text:style-name="T20">（</text:span><text:span text:style-name="T42">DNS Security Extensions</text:span><text:span text:style-name="T20">）透過</text:span><text:span text:style-name="T484">數位簽章機制</text:span><text:span text:style-name="T20">，</text:span><text:span text:style-name="T171">讓接收方能驗證 </text:span><text:span text:style-name="T243">DNS </text:span><text:span text:style-name="T171">回應的真實性與完整性</text:span><text:span text:style-name="T20">，</text:span><text:span text:style-name="T86">防止資料被偽造或篡改</text:span><text:span text:style-name="T20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 loext:marker-style-name="T12"><text:span text:style-name="T43">✅ DNSSEC </text:span><text:span text:style-name="T13">可以防禦</text:span></text:p>
            </table:table-cell>
            <table:table-cell table:style-name="表格87.A1" office:value-type="string">
              <text:p text:style-name="P7" loext:marker-style-name="T12"><text:span text:style-name="T43">❌ DNSSEC </text:span><text:span text:style-name="T13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0" loext:marker-style-name="T14"><text:span text:style-name="T15">防止 </text:span><text:span text:style-name="T16">DNS Spoofing</text:span><text:span text:style-name="T15">（假回應）／防止 </text:span><text:span text:style-name="T16">Cache Poisoning</text:span><text:span text:style-name="T15">（快取污染）／</text:span><text:span text:style-name="T485">驗證資料完整性與來源真實性</text:span></text:p>
          </table:table-cell>
          <table:table-cell table:style-name="表格87.A2" office:value-type="string">
            <text:p text:style-name="P20" loext:marker-style-name="T14"><text:span text:style-name="T15">不提供加密功能（非 </text:span><text:span text:style-name="T16">HTTPS</text:span><text:span text:style-name="T15">）／</text:span><text:span text:style-name="T461">無法防禦 </text:span><text:span text:style-name="T486">DoS / DDoS </text:span><text:span text:style-name="T461">攻擊</text:span><text:span text:style-name="T15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7">⚠️ <text:s/></text:span><text:span text:style-name="T166">最重要的一句話</text:span></text:p>
            <text:p text:style-name="P11" loext:marker-style-name="T323"><text:span text:style-name="T206">DNSSEC</text:span><text:span text:style-name="T167"> = </text:span><text:span text:style-name="T427">驗證真偽，不是加密，不防 </text:span><text:span text:style-name="T428">DDoS</text:span></text:p>
          </table:table-cell>
          <table:covered-table-cell/>
        </table:table-row>
      </table:table>
      <text:h text:style-name="P18" text:outline-level="2" loext:marker-style-name="T34"><text:span text:style-name="T35">六、</text:span><text:span text:style-name="T34">DNS </text:span><text:span text:style-name="T35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7">🔍 <text:s/></text:span><text:span text:style-name="T30">診斷結論</text:span></text:p>
            <text:p text:style-name="P11" loext:marker-style-name="T21"><text:span text:style-name="T20">能用 </text:span><text:span text:style-name="T42">IP </text:span><text:span text:style-name="T20">連線（</text:span><text:span text:style-name="T42">ping 142.250.1.1 </text:span><text:span text:style-name="T20">成功），但無法用網域名稱連線（</text:span><text:span text:style-name="T42">ping google.com </text:span><text:span text:style-name="T20">失敗）→ </text:span><text:span text:style-name="T42">DNS </text:span><text:span text:style-name="T20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10"><text:span text:style-name="T17">📝 <text:s/></text:span><text:span text:style-name="T256">申論題標準答案</text:span></text:p>
            <text:p text:style-name="P11"><text:span text:style-name="T257">一、</text:span><text:span text:style-name="T258">DNS </text:span><text:span text:style-name="T257">功能：</text:span><text:span text:style-name="T42">DNS </text:span><text:span text:style-name="T20">為網際網路中負責</text:span><text:span text:style-name="T304">將網域名稱轉換為 </text:span><text:span text:style-name="T301">IP </text:span><text:span text:style-name="T304">位址</text:span><text:span text:style-name="T20">的分散式系統。</text:span></text:p>
            <text:p text:style-name="P12"><text:span text:style-name="T257">二、查詢流程：</text:span><text:span text:style-name="T20">由</text:span><text:span text:style-name="T86">快取</text:span><text:span text:style-name="T20">開始，依序向 </text:span><text:span text:style-name="T85">Local DNS</text:span><text:span text:style-name="T20">、</text:span><text:span text:style-name="T85">Root DNS</text:span><text:span text:style-name="T20">、</text:span><text:span text:style-name="T85">TLD DNS</text:span><text:span text:style-name="T20">、</text:span><text:span text:style-name="T85">Authoritative DN</text:span><text:span text:style-name="T42">S </text:span><text:span text:style-name="T20">查詢，最終取得 </text:span><text:span text:style-name="T42">IP </text:span><text:span text:style-name="T20">位址。</text:span></text:p>
            <text:p text:style-name="P12"><text:span text:style-name="T257">三、</text:span><text:span text:style-name="T258">Recursive</text:span><text:span text:style-name="T257">：</text:span><text:span text:style-name="T20">由 </text:span><text:span text:style-name="T42">DNS </text:span><text:span text:style-name="T20">伺服器代替用戶端完整查詢並直接回傳最終 </text:span><text:span text:style-name="T42">IP</text:span><text:span text:style-name="T20">，用戶端只需等待結果。</text:span></text:p>
            <text:p text:style-name="P12"><text:span text:style-name="T257">四、</text:span><text:span text:style-name="T258">Iterative</text:span><text:span text:style-name="T257">：</text:span><text:span text:style-name="T42">DNS </text:span><text:span text:style-name="T20">伺服器僅回應下一步查詢位置，由用戶端自行逐層向各 </text:span><text:span text:style-name="T42">DNS </text:span><text:span text:style-name="T20">查詢，直到取得 </text:span><text:span text:style-name="T42">IP</text:span><text:span text:style-name="T20">。</text:span></text:p>
            <text:p text:style-name="P12"><text:span text:style-name="T257">五、</text:span><text:span text:style-name="T258">DNSSEC</text:span><text:span text:style-name="T257">：</text:span><text:span text:style-name="T20">透過</text:span><text:span text:style-name="T86">數位簽章</text:span><text:span text:style-name="T487">驗證 </text:span><text:span text:style-name="T488">DNS </text:span><text:span text:style-name="T487">回應真實性</text:span><text:span text:style-name="T20">，可防 </text:span><text:span text:style-name="T42">DNS Spoofing </text:span><text:span text:style-name="T20">及 </text:span><text:span text:style-name="T42">Cache Poisoning</text:span><text:span text:style-name="T20">，但不提供加密，也</text:span><text:span text:style-name="T455">無法防禦 </text:span><text:span text:style-name="T454">DDoS</text:span><text:span text:style-name="T20">。</text:span></text:p>
          </table:table-cell>
        </table:table-row>
      </table:table>
      <text:h text:style-name="P17" text:outline-level="1" loext:marker-style-name="T32"><text:span text:style-name="T33">第 七 篇　路由協定：</text:span><text:span text:style-name="T32">OSPF </text:span><text:span text:style-name="T33">與 </text:span><text:span text:style-name="T32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7">🗺️ <text:s/></text:span><text:span text:style-name="T30">在解決什麼問題？</text:span></text:p>
            <text:p text:style-name="P11" loext:marker-style-name="T21"><text:span text:style-name="T20">網路上有無數個</text:span><text:span text:style-name="T86">路由器（</text:span><text:span text:style-name="T85">Router</text:span><text:span text:style-name="T86">）</text:span><text:span text:style-name="T20">，它們只有一個任務：「</text:span><text:span text:style-name="T169">資料要走哪條路才能抵達目的地？</text:span><text:span text:style-name="T20">」</text:span><text:span text:style-name="T128">它們需要一套共通的對話規則，這就是路由協定</text:span><text:span text:style-name="T20">。</text:span></text:p>
          </table:table-cell>
        </table:table-row>
      </table:table>
      <text:h text:style-name="P18" text:outline-level="2" loext:marker-style-name="T34"><text:span text:style-name="T35">一、路由協定兩大分類：</text:span><text:span text:style-name="T489">IGP</text:span><text:span text:style-name="T34"> vs </text:span><text:span text:style-name="T489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 loext:marker-style-name="T12"><text:span text:style-name="T43">🏢 IGP — </text:span><text:span text:style-name="T13">內部用</text:span></text:p>
            </table:table-cell>
            <table:table-cell table:style-name="表格90.A1" office:value-type="string">
              <text:p text:style-name="P7" loext:marker-style-name="T12"><text:span text:style-name="T43">🌍 EGP — </text:span><text:span text:style-name="T13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0" loext:marker-style-name="T14"><text:span text:style-name="T255">Interior Gateway Protocol</text:span><text:span text:style-name="T15">，在</text:span><text:span text:style-name="T340">同一個組織內部使用</text:span><text:span text:style-name="T15">（公司內網、校園網路）。常見：</text:span><text:span text:style-name="T16">OSPF</text:span><text:span text:style-name="T15">（最主流）、</text:span><text:span text:style-name="T16">RIP</text:span><text:span text:style-name="T15">（較舊）。</text:span></text:p>
          </table:table-cell>
          <table:table-cell table:style-name="表格90.A2" office:value-type="string">
            <text:p text:style-name="P20" loext:marker-style-name="T14"><text:span text:style-name="T255">Exterior Gateway Protocol</text:span><text:span text:style-name="T15">，</text:span><text:span text:style-name="T461">在不同組織之間使用</text:span><text:span text:style-name="T15">（中華電信 ↔ </text:span><text:span text:style-name="T16">Google</text:span><text:span text:style-name="T15">、</text:span><text:span text:style-name="T16">ISP ↔ ISP</text:span><text:span text:style-name="T15">）。目前唯一在用：</text:span><text:span text:style-name="T16">BGP</text:span><text:span text:style-name="T15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7">⚡ <text:s/></text:span><text:span text:style-name="T38">一句話記憶法</text:span></text:p>
            <text:p text:style-name="P11" loext:marker-style-name="T21"><text:span text:style-name="T490">公司／校園內 → 用 </text:span><text:span text:style-name="T491">IGP</text:span><text:span text:style-name="T20">（</text:span><text:span text:style-name="T170">OSPF</text:span><text:span text:style-name="T42"> </text:span><text:span text:style-name="T20">或 </text:span><text:span text:style-name="T42">RIP</text:span><text:span text:style-name="T20">）；</text:span><text:span text:style-name="T492">公司與公司間 → 用 </text:span><text:span text:style-name="T493">EGP</text:span><text:span text:style-name="T20">（</text:span><text:span text:style-name="T170">BGP</text:span><text:span text:style-name="T20">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34">OSPF </text:span><text:span text:style-name="T35">的核心概念</text:span></text:h>
      <text:p text:style-name="P22" loext:marker-style-name="T21"><text:span text:style-name="T170">OSPF</text:span><text:span text:style-name="T169">（</text:span><text:span text:style-name="T170">Open Shortest Path First</text:span><text:span text:style-name="T169">）</text:span><text:span text:style-name="T20">是 </text:span><text:span text:style-name="T85">IGP </text:span><text:span text:style-name="T86">裡最主流的協定</text:span><text:span text:style-name="T20">，最大特色是</text:span><text:span text:style-name="T494">把網路切成多個區域（</text:span><text:span text:style-name="T495">Area</text:span><text:span text:style-name="T494">）管理</text:span><text:span text:style-name="T20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7">📌 <text:s/></text:span><text:span text:style-name="T166">最重要的規定</text:span></text:p>
            <text:p text:style-name="P11" loext:marker-style-name="T21"><text:span text:style-name="T330">所有 </text:span><text:span text:style-name="T331">Area </text:span><text:span text:style-name="T330">都必須連到 </text:span><text:span text:style-name="T331">Area 0</text:span><text:span text:style-name="T330">（骨幹區域）</text:span><text:span text:style-name="T20">。</text:span><text:span text:style-name="T496">Area 0 </text:span><text:span text:style-name="T497">就像高速公路主幹道，其他 </text:span><text:span text:style-name="T496">Area </text:span><text:span text:style-name="T497">是交流道</text:span><text:span text:style-name="T20">。</text:span></text:p>
          </table:table-cell>
        </table:table-row>
      </table:table>
      <text:h text:style-name="P18" text:outline-level="2" loext:marker-style-name="T34"><text:span text:style-name="T35">三、</text:span><text:span text:style-name="T34">OSPF </text:span><text:span text:style-name="T35">的 </text:span><text:span text:style-name="T34">4 </text:span><text:span text:style-name="T35">種 </text:span><text:span text:style-name="T34">Router</text:span><text:span text:style-name="T35">（重點！）</text:span></text:h>
      <text:p text:style-name="P22" loext:marker-style-name="T21"><text:span text:style-name="T20">把整個 </text:span><text:span text:style-name="T42">OSPF </text:span><text:span text:style-name="T20">網路想像成一座城市：</text:span><text:span text:style-name="T86">城市裡有很多「區（</text:span><text:span text:style-name="T85">Area</text:span><text:span text:style-name="T86">）」像大樓</text:span><text:span text:style-name="T20">；</text:span><text:span text:style-name="T498">中間一定有「主幹道」就是 </text:span><text:span text:style-name="T499">Area 0</text:span><text:span text:style-name="T498">；所有大樓要互通都必須先連到 </text:span><text:span text:style-name="T499">Area 0</text:span><text:span text:style-name="T20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21" loext:marker-style-name="T104"><text:span text:style-name="T105">類型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本質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核心記憶點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0" loext:marker-style-name="T106"><text:span text:style-name="T108">① Internal</text:span><text:span text:style-name="T106"/></text:p>
          </table:table-cell>
          <table:table-cell table:style-name="表格92.A2" office:value-type="string">
            <text:p text:style-name="P20" loext:marker-style-name="T106"><text:span text:style-name="T109">不出 </text:span><text:span text:style-name="T108">Area</text:span></text:p>
          </table:table-cell>
          <table:table-cell table:style-name="表格92.A2" office:value-type="string">
            <text:p text:style-name="P20" loext:marker-style-name="T106"><text:span text:style-name="T109">只在同一個 </text:span><text:span text:style-name="T108">Area </text:span><text:span text:style-name="T109">裡活動，對外一無所知</text:span></text:p>
          </table:table-cell>
          <table:table-cell table:style-name="表格92.A2" office:value-type="string">
            <text:p text:style-name="P20" loext:marker-style-name="T106"><text:span text:style-name="T109">只在一個辦公室活動的員工</text:span><text:span text:style-name="T106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② </text:span><text:span text:style-name="T500">Backbone</text:span></text:p>
          </table:table-cell>
          <table:table-cell table:style-name="表格92.A3" office:value-type="string">
            <text:p text:style-name="P20" loext:marker-style-name="T501"><text:span text:style-name="T502">在 </text:span><text:span text:style-name="T500">Area 0</text:span></text:p>
          </table:table-cell>
          <table:table-cell table:style-name="表格92.A3" office:value-type="string">
            <text:p text:style-name="P20" loext:marker-style-name="T106"><text:span text:style-name="T502">核心骨幹節點</text:span><text:span text:style-name="T109">，所有跨區流量都經過這裡</text:span></text:p>
          </table:table-cell>
          <table:table-cell table:style-name="表格92.A3" office:value-type="string">
            <text:p text:style-name="P20" loext:marker-style-name="T503"><text:span text:style-name="T504">高速公路主幹上的節點</text:span><text:span text:style-name="T503"/></text:p>
          </table:table-cell>
        </table:table-row>
        <table:table-row table:style-name="表格92.1">
          <table:table-cell table:style-name="表格92.A2" office:value-type="string">
            <text:p text:style-name="P20" loext:marker-style-name="T106"><text:span text:style-name="T108">③ </text:span><text:span text:style-name="T505">ABR</text:span></text:p>
          </table:table-cell>
          <table:table-cell table:style-name="表格92.A2" office:value-type="string">
            <text:p text:style-name="P20" loext:marker-style-name="T506"><text:span text:style-name="T507">跨 </text:span><text:span text:style-name="T505">Area </text:span><text:span text:style-name="T507">橋樑</text:span></text:p>
          </table:table-cell>
          <table:table-cell table:style-name="表格92.A2" office:value-type="string">
            <text:p text:style-name="P20" loext:marker-style-name="T506"><text:span text:style-name="T507">同時連 </text:span><text:span text:style-name="T505">Area 0 </text:span><text:span text:style-name="T507">與其他 </text:span><text:span text:style-name="T505">Area</text:span><text:span text:style-name="T507">，是區域間唯一合法的橋</text:span></text:p>
          </table:table-cell>
          <table:table-cell table:style-name="表格92.A2" office:value-type="string">
            <text:p text:style-name="P20" loext:marker-style-name="T447"><text:span text:style-name="T119">不同部門之間的聯絡窗口</text:span><text:span text:style-name="T447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④ </text:span><text:span text:style-name="T379">ASBR</text:span></text:p>
          </table:table-cell>
          <table:table-cell table:style-name="表格92.A3" office:value-type="string">
            <text:p text:style-name="P20" loext:marker-style-name="T106"><text:span text:style-name="T109">跨 </text:span><text:span text:style-name="T108">AS </text:span><text:span text:style-name="T109">入口</text:span></text:p>
          </table:table-cell>
          <table:table-cell table:style-name="表格92.A3" office:value-type="string">
            <text:p text:style-name="P20" loext:marker-style-name="T106"><text:span text:style-name="T109">把外部路由（</text:span><text:span text:style-name="T108">BGP/</text:span><text:span text:style-name="T109">靜態）引入 </text:span><text:span text:style-name="T108">OSPF</text:span><text:span text:style-name="T109">，</text:span><text:span text:style-name="T118">是對外入口</text:span></text:p>
          </table:table-cell>
          <table:table-cell table:style-name="表格92.A3" office:value-type="string">
            <text:p text:style-name="P20" loext:marker-style-name="T106"><text:span text:style-name="T109">公司對外的大門警衛室</text:span><text:span text:style-name="T106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7">⚠️ <text:s/></text:span><text:span text:style-name="T80">考試最愛考的三個陷阱</text:span></text:p>
            <text:p text:style-name="P11"><text:span text:style-name="T433">✗ ABR </text:span><text:span text:style-name="T250">負責連接外部網路　→　</text:span><text:span text:style-name="T20">✓</text:span><text:span text:style-name="T84"> </text:span><text:span text:style-name="T83">ABR </text:span><text:span text:style-name="T84">只負責 </text:span><text:span text:style-name="T83">Area </text:span><text:span text:style-name="T84">之間的橋樑</text:span><text:span text:style-name="T20">，對外是 </text:span><text:span text:style-name="T42">ASBR </text:span><text:span text:style-name="T20">的工作。</text:span></text:p>
            <text:p text:style-name="P12"><text:span text:style-name="T433">✗ ASBR </text:span><text:span text:style-name="T250">是用來跨越不同 </text:span><text:span text:style-name="T433">Area</text:span><text:span text:style-name="T250">　→　</text:span><text:span text:style-name="T20">✓ </text:span><text:span text:style-name="T83">ASBR </text:span><text:span text:style-name="T84">是跨越不同 </text:span><text:span text:style-name="T83">AS</text:span><text:span text:style-name="T84">（整個系統）</text:span><text:span text:style-name="T20">，不是跨 </text:span><text:span text:style-name="T42">Area</text:span><text:span text:style-name="T20">。</text:span></text:p>
            <text:p text:style-name="P12"><text:span text:style-name="T433">✗ </text:span><text:span text:style-name="T250">任意兩個 </text:span><text:span text:style-name="T433">Area </text:span><text:span text:style-name="T250">可直接相連　→　</text:span><text:span text:style-name="T20">✓ </text:span><text:span text:style-name="T128">所有 </text:span><text:span text:style-name="T127">Area </text:span><text:span text:style-name="T128">一定要透過 </text:span><text:span text:style-name="T127">Area 0 </text:span><text:span text:style-name="T128">才能互通，不能繞過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AS-PATH </text:span><text:span text:style-name="T35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 loext:marker-style-name="T12"><text:span text:style-name="T43">📦 Route</text:span><text:span text:style-name="T13">（路由）</text:span></text:p>
            </table:table-cell>
            <table:table-cell table:style-name="表格93.A1" office:value-type="string">
              <text:p text:style-name="P7" loext:marker-style-name="T12"><text:span text:style-name="T43">📜 AS-PATH</text:span><text:span text:style-name="T12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0" loext:marker-style-name="T14"><text:span text:style-name="T15">回答「封包下一步要丟給誰？」。這是路由器最後做出</text:span><text:soft-page-break/><text:span text:style-name="T15">的轉送決定，對應到一個 </text:span><text:span text:style-name="T16">Next-Hop</text:span><text:span text:style-name="T15">（下一跳）。</text:span></text:p>
          </table:table-cell>
          <table:table-cell table:style-name="表格93.A2" office:value-type="string">
            <text:p text:style-name="P20" loext:marker-style-name="T14"><text:span text:style-name="T15">回答「這條路由消息一路經過了哪些 </text:span><text:span text:style-name="T16">AS</text:span><text:span text:style-name="T15">（自治系統）？」。它是一串 </text:span><text:span text:style-name="T16">AS </text:span><text:span text:style-name="T15">編號名單，也是 </text:span><text:span text:style-name="T75">BGP</text:span><text:span text:style-name="T16"> </text:span><text:span text:style-name="T15">用來判</text:span><text:soft-page-break/><text:span text:style-name="T15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20" loext:marker-style-name="T14"><text:span text:style-name="T15">是</text:span><text:span text:style-name="T340">「實際的轉送動作」——封包真的會照它走</text:span><text:span text:style-name="T15">。</text:span></text:p>
          </table:table-cell>
          <table:table-cell table:style-name="表格93.A2" office:value-type="string">
            <text:p text:style-name="P20" loext:marker-style-name="T14"><text:span text:style-name="T15">是</text:span><text:span text:style-name="T508">「這條路的來歷（履歷）」——封包根本看不到它</text:span><text:span text:style-name="T15">，</text:span><text:span text:style-name="T79">它只給 </text:span><text:span text:style-name="T78">BGP </text:span><text:span text:style-name="T79">參考</text:span><text:span text:style-name="T15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10"><text:span text:style-name="T17">🔎 <text:s/></text:span><text:span text:style-name="T30">看一個例子：兩條路由二選一</text:span></text:p>
            <text:p text:style-name="P11" loext:marker-style-name="T21"><text:span text:style-name="T83">Google </text:span><text:span text:style-name="T84">同時收到兩條到 </text:span><text:span text:style-name="T83">1.1.1.0/24 </text:span><text:span text:style-name="T84">的路由廣告</text:span><text:span text:style-name="T20">：</text:span><text:span text:style-name="T85">ISP A </text:span><text:span text:style-name="T86">的 </text:span><text:span text:style-name="T85">AS-PATH </text:span><text:span text:style-name="T86">是「</text:span><text:span text:style-name="T85">100 200 300</text:span><text:span text:style-name="T86">」（經過 </text:span><text:span text:style-name="T85">3 </text:span><text:span text:style-name="T86">個 </text:span><text:span text:style-name="T85">AS</text:span><text:span text:style-name="T86">）</text:span><text:span text:style-name="T20">，</text:span><text:span text:style-name="T85">ISP B </text:span><text:span text:style-name="T86">的 </text:span><text:span text:style-name="T85">AS-PATH </text:span><text:span text:style-name="T86">是「</text:span><text:span text:style-name="T85">400 300</text:span><text:span text:style-name="T86">」（只經過 </text:span><text:span text:style-name="T85">2 </text:span><text:span text:style-name="T86">個 </text:span><text:span text:style-name="T85">AS</text:span><text:span text:style-name="T86">）</text:span><text:span text:style-name="T20">。</text:span></text:p>
            <text:p text:style-name="P12"><text:span text:style-name="T82">在其他條件都相同時 →</text:span><text:span text:style-name="T169"> </text:span><text:span text:style-name="T170">BGP </text:span><text:span text:style-name="T169">會偏好較短的「</text:span><text:span text:style-name="T170">400 300</text:span><text:span text:style-name="T169">」</text:span><text:span text:style-name="T20">。</text:span></text:p>
            <text:p text:style-name="P12" loext:marker-style-name="T21"><text:span text:style-name="T20">小提醒：</text:span><text:span text:style-name="T127">AS-PATH </text:span><text:span text:style-name="T128">要從右邊讀起，最右邊的「</text:span><text:span text:style-name="T127">300</text:span><text:span text:style-name="T128">」才是這條路由的發源地（</text:span><text:span text:style-name="T127">Origin AS</text:span><text:span text:style-name="T128">）</text:span><text:span text:style-name="T20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10"><text:span text:style-name="T509">❁</text:span><text:span text:style-name="T20">假設你收到兩條路由：</text:span><text:span text:style-name="T510"><text:line-break/>Route A: AS-PATH = 100 200 300<text:line-break/>Route B: AS-PATH = 400 300<text:line-break/><text:line-break/></text:span><text:span text:style-name="T20">你先不要管 </text:span><text:span text:style-name="T510">Route </text:span><text:span text:style-name="T20">是什麼。</text:span><text:span text:style-name="T510"><text:line-break/><text:line-break/></text:span><text:span text:style-name="T20">只看 </text:span><text:span text:style-name="T510">AS-PATH</text:span><text:span text:style-name="T20">：</text:span><text:span text:style-name="T510">100 200 300 <text:s/></text:span><text:span text:style-name="T20">意思：我 ← </text:span><text:span text:style-name="T510">AS100 ← AS200 ← AS300<text:line-break/><text:line-break/></text:span><text:span text:style-name="T20">而</text:span><text:span text:style-name="T510">400 300 <text:s/></text:span><text:span text:style-name="T20">意思：我 ← </text:span><text:span text:style-name="T510">AS400 ← AS300<text:line-break/><text:line-break/></text:span><text:span text:style-name="T511">AS-PATH </text:span><text:span text:style-name="T374">就只是：這個路由消息經過了哪些 </text:span><text:span text:style-name="T511">AS </text:span><text:span text:style-name="T374">的名單。就這樣而已。</text:span><text:span text:style-name="T510"><text:line-break/><text:line-break/></text:span><text:span text:style-name="T20">然後 </text:span><text:span text:style-name="T512">BGP</text:span><text:span text:style-name="T510"> </text:span><text:span text:style-name="T20">看到：</text:span><text:span text:style-name="T510"><text:line-break/><text:line-break/>100 200 300 <text:s/></text:span><text:span text:style-name="T20">有 </text:span><text:span text:style-name="T510">3 </text:span><text:span text:style-name="T20">個 </text:span><text:span text:style-name="T510">AS</text:span><text:span text:style-name="T20">。</text:span><text:span text:style-name="T510"><text:line-break/><text:line-break/>400 300 <text:s/></text:span><text:span text:style-name="T20">有 </text:span><text:span text:style-name="T510">2 </text:span><text:span text:style-name="T20">個 </text:span><text:span text:style-name="T510">AS</text:span><text:span text:style-name="T20">。</text:span><text:span text:style-name="T510"><text:line-break/><text:line-break/></text:span><text:span text:style-name="T20">於是它想：</text:span><text:span text:style-name="T335">「嗯，看起來第二條比較短。」然後選第二條</text:span><text:span text:style-name="T20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10"><text:span text:style-name="T17">⚠️ <text:s/></text:span><text:span text:style-name="T30">新手最容易搞混的地方</text:span></text:p>
            <text:p text:style-name="P11" loext:marker-style-name="T21"><text:span text:style-name="T42">AS-PATH </text:span><text:span text:style-name="T20">不是寫在封包上的東西，也不是「下一跳」。封包只認 </text:span><text:span text:style-name="T42">Next-Hop</text:span><text:span text:style-name="T20">；</text:span><text:span text:style-name="T401">AS-PATH </text:span><text:span text:style-name="T368">純粹是 </text:span><text:span text:style-name="T401">BGP </text:span><text:span text:style-name="T368">拿來「比較哪條路由比較好」的參考資料</text:span><text:span text:style-name="T20">。</text:span></text:p>
            <text:p text:style-name="P10"><text:span text:style-name="T17">🎯 <text:s/></text:span><text:span text:style-name="T30">考點加碼：</text:span><text:span text:style-name="T31">AS-PATH </text:span><text:span text:style-name="T30">的另一個任務</text:span></text:p>
            <text:p text:style-name="P12" loext:marker-style-name="T21"><text:span text:style-name="T20">防迴圈！</text:span><text:span text:style-name="T84">當某個 </text:span><text:span text:style-name="T83">AS </text:span><text:span text:style-name="T84">發現一條路由的 </text:span><text:span text:style-name="T83">AS-PATH </text:span><text:span text:style-name="T84">裡「已經有自己的 </text:span><text:span text:style-name="T83">AS </text:span><text:span text:style-name="T84">編號」</text:span><text:span text:style-name="T20">，</text:span><text:span text:style-name="T128">就會直接丟棄這條路由，避免封包在 </text:span><text:span text:style-name="T127">AS </text:span><text:span text:style-name="T128">之間繞圈圈</text:span><text:span text:style-name="T20">。</text:span></text:p>
          </table:table-cell>
          <table:covered-table-cell/>
        </table:table-row>
      </table:table>
      <text:h text:style-name="P18" text:outline-level="2" loext:marker-style-name="T34"><text:span text:style-name="T35">五、</text:span><text:span text:style-name="T34">BGP </text:span><text:span text:style-name="T35">必背考點：高命中率一次搞懂</text:span></text:h>
      <text:p text:style-name="P24" loext:marker-style-name="T21"><text:span text:style-name="T170">BGP(Border Gateway Protocol) </text:span><text:span text:style-name="T20">不像 </text:span><text:span text:style-name="T42">OSPF </text:span><text:span text:style-name="T20">會自己算最短距離，它是在「</text:span><text:span text:style-name="T371">比條件、看政策</text:span><text:span text:style-name="T20">」。與其硬背排序表，不如先搞懂下面這 </text:span><text:span text:style-name="T510">9 </text:span><text:span text:style-name="T20">個高命中率的考點——每個都從「它在解決什麼問題」切入，記得快又不容易忘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7" loext:marker-style-name="T104"><text:span text:style-name="T513">#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考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一句話重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白話理解 </text:span><text:span text:style-name="T513">× </text:span><text:span text:style-name="T105">怎麼考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 loext:marker-style-name="T14"><text:span text:style-name="T16">①</text:span><text:span text:style-name="T14"/></text:p>
          </table:table-cell>
          <table:table-cell table:style-name="表格94.A2" office:value-type="string">
            <text:p text:style-name="P25">TCP 179</text:p>
          </table:table-cell>
          <table:table-cell table:style-name="表格94.A2" office:value-type="string">
            <text:p text:style-name="P20" loext:marker-style-name="T106"><text:span text:style-name="T514">BGP </text:span><text:span text:style-name="T515">跑在 </text:span><text:span text:style-name="T514">TCP</text:span><text:span text:style-name="T109">，</text:span><text:span text:style-name="T515">埠號 </text:span><text:span text:style-name="T514">179</text:span><text:span text:style-name="T109">（不是 </text:span><text:span text:style-name="T516">UDP</text:span><text:span text:style-name="T109">）</text:span></text:p>
          </table:table-cell>
          <table:table-cell table:style-name="表格94.A2" office:value-type="string">
            <text:p text:style-name="P20" loext:marker-style-name="T106"><text:span text:style-name="T109">要傳「整個網際網路」的路由，丟包會大亂，所以需要 </text:span><text:span text:style-name="T516">TCP </text:span><text:span text:style-name="T109">的可靠重送與順序保證。考：</text:span><text:span text:style-name="T517">BGP </text:span><text:span text:style-name="T378">傳輸層協定 → </text:span><text:span text:style-name="T517">TCP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②</text:span><text:span text:style-name="T14"/></text:p>
          </table:table-cell>
          <table:table-cell table:style-name="表格94.A3" office:value-type="string">
            <text:p text:style-name="P25">Path Vector</text:p>
          </table:table-cell>
          <table:table-cell table:style-name="表格94.A3" office:value-type="string">
            <text:p text:style-name="P20" loext:marker-style-name="T106"><text:span text:style-name="T516">BGP </text:span><text:span text:style-name="T109">屬於 </text:span><text:span text:style-name="T516">Path Vector </text:span><text:span text:style-name="T109">協定</text:span></text:p>
          </table:table-cell>
          <table:table-cell table:style-name="表格94.A3" office:value-type="string">
            <text:p text:style-name="P20" loext:marker-style-name="T106"><text:span text:style-name="T109">不只報「距離」，而是</text:span><text:span text:style-name="T518">把「整條 </text:span><text:span text:style-name="T519">AS </text:span><text:span text:style-name="T518">路徑」報給你</text:span><text:span text:style-name="T109">。</text:span><text:span text:style-name="T516">RIP</text:span><text:span text:style-name="T109">＝</text:span><text:span text:style-name="T516">Distance </text:span><text:soft-page-break/><text:span text:style-name="T516">Vector</text:span><text:span text:style-name="T109">、</text:span><text:span text:style-name="T516">OSPF</text:span><text:span text:style-name="T109">＝</text:span><text:span text:style-name="T516">Link State</text:span><text:span text:style-name="T109">、</text:span><text:span text:style-name="T516">BGP</text:span><text:span text:style-name="T109">＝</text:span><text:span text:style-name="T516">Path Vector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③</text:span><text:span text:style-name="T14"/></text:p>
          </table:table-cell>
          <table:table-cell table:style-name="表格94.A2" office:value-type="string">
            <text:p text:style-name="P26"><text:span text:style-name="T520">AS-PATH</text:span><text:span text:style-name="T521">（</text:span><text:span text:style-name="T522">防迴圈</text:span><text:span text:style-name="T521">）</text:span></text:p>
          </table:table-cell>
          <table:table-cell table:style-name="表格94.A2" office:value-type="string">
            <text:p text:style-name="P20" loext:marker-style-name="T106"><text:span text:style-name="T45">✅ </text:span><text:span text:style-name="T109">最大用途＝</text:span><text:span text:style-name="T507">防 </text:span><text:span text:style-name="T523">Routing Loop</text:span></text:p>
          </table:table-cell>
          <table:table-cell table:style-name="表格94.A2" office:value-type="string">
            <text:p text:style-name="P20" loext:marker-style-name="T106"><text:span text:style-name="T517">AS </text:span><text:span text:style-name="T378">一看到 </text:span><text:span text:style-name="T517">AS-PATH </text:span><text:span text:style-name="T378">裡有「自己的 </text:span><text:span text:style-name="T517">AS </text:span><text:span text:style-name="T378">編號」就立刻丟棄，避免繞圈</text:span><text:span text:style-name="T109">。考「</text:span><text:span text:style-name="T516">AS-PATH </text:span><text:span text:style-name="T109">主要功能」→ </text:span><text:span text:style-name="T516">Loop Prevention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④</text:span><text:span text:style-name="T14"/></text:p>
          </table:table-cell>
          <table:table-cell table:style-name="表格94.A3" office:value-type="string">
            <text:p text:style-name="P25">Local Preference</text:p>
          </table:table-cell>
          <table:table-cell table:style-name="表格94.A3" office:value-type="string">
            <text:p text:style-name="P27">數值越大越優先</text:p>
          </table:table-cell>
          <table:table-cell table:style-name="表格94.A3" office:value-type="string">
            <text:p text:style-name="P20" loext:marker-style-name="T106"><text:span text:style-name="T45">✅ </text:span><text:span text:style-name="T524">通用屬性中最重要！</text:span><text:span text:style-name="T109">是</text:span><text:span text:style-name="T518"> </text:span><text:span text:style-name="T519">AS </text:span><text:span text:style-name="T518">的「內部政策」：想走哪個出口就把它設高分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⑤</text:span><text:span text:style-name="T14"/></text:p>
          </table:table-cell>
          <table:table-cell table:style-name="表格94.A2" office:value-type="string">
            <text:p text:style-name="P26"><text:span text:style-name="T520">AS-PATH</text:span><text:span text:style-name="T521">（</text:span><text:span text:style-name="T522">長度</text:span><text:span text:style-name="T521">）</text:span></text:p>
          </table:table-cell>
          <table:table-cell table:style-name="表格94.A2" office:value-type="string">
            <text:p text:style-name="P28"><text:span text:style-name="T525">路徑越短（經過 </text:span><text:span text:style-name="T526">AS </text:span><text:span text:style-name="T525">越少）越優先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378">但要先比 </text:span><text:span text:style-name="T517">Weight</text:span><text:span text:style-name="T378">、</text:span><text:span text:style-name="T517">Local Pref</text:span><text:span text:style-name="T378">，前面平手才輪到它</text:span><text:span text:style-name="T109">——</text:span><text:span text:style-name="T389">別誤以為 </text:span><text:span text:style-name="T527">AS-PATH </text:span><text:span text:style-name="T389">最重要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⑥</text:span><text:span text:style-name="T14"/></text:p>
          </table:table-cell>
          <table:table-cell table:style-name="表格94.A3" office:value-type="string">
            <text:p text:style-name="P25">MED</text:p>
          </table:table-cell>
          <table:table-cell table:style-name="表格94.A3" office:value-type="string">
            <text:p text:style-name="P29">數值越小越優先</text:p>
          </table:table-cell>
          <table:table-cell table:style-name="表格94.A3" office:value-type="string">
            <text:p text:style-name="P20" loext:marker-style-name="T106"><text:span text:style-name="T518">告訴鄰居「請從這個入口進來」，數字小的入口優先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⑦</text:span><text:span text:style-name="T14"/></text:p>
          </table:table-cell>
          <table:table-cell table:style-name="表格94.A2" office:value-type="string">
            <text:p text:style-name="P25">eBGP vs iBGP</text:p>
          </table:table-cell>
          <table:table-cell table:style-name="表格94.A2" office:value-type="string">
            <text:p text:style-name="P30"><text:span text:style-name="T526">eBGP </text:span><text:span text:style-name="T525">優先於 </text:span><text:span text:style-name="T526">iBGP</text:span></text:p>
          </table:table-cell>
          <table:table-cell table:style-name="表格94.A2" office:value-type="string">
            <text:p text:style-name="P20" loext:marker-style-name="T106"><text:span text:style-name="T516">eBGP</text:span><text:span text:style-name="T109">＝外面直接告訴你；</text:span><text:span text:style-name="T516">iBGP</text:span><text:span text:style-name="T109">＝同事轉述——當然信「本人」，外部路由較可信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⑧</text:span><text:span text:style-name="T14"/></text:p>
          </table:table-cell>
          <table:table-cell table:style-name="表格94.A3" office:value-type="string">
            <text:p text:style-name="P26"><text:span text:style-name="T520">MED</text:span><text:span text:style-name="T521">（比較範圍）</text:span></text:p>
          </table:table-cell>
          <table:table-cell table:style-name="表格94.A3" office:value-type="string">
            <text:p text:style-name="P31"><text:span text:style-name="T525">只比較同一個「來源 </text:span><text:span text:style-name="T526">AS</text:span><text:span text:style-name="T525">」</text:span></text:p>
          </table:table-cell>
          <table:table-cell table:style-name="表格94.A3" office:value-type="string">
            <text:p text:style-name="P20" loext:marker-style-name="T106"><text:span text:style-name="T45">⚠️</text:span><text:span text:style-name="T317"> </text:span><text:span text:style-name="T528">不同 </text:span><text:span text:style-name="T529">AS </text:span><text:span text:style-name="T528">的 </text:span><text:span text:style-name="T529">MED </text:span><text:span text:style-name="T528">不能互比；只在同一家公司的建議之間比大小</text:span><text:span text:style-name="T109">。最愛考！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⑨</text:span><text:span text:style-name="T14"/></text:p>
          </table:table-cell>
          <table:table-cell table:style-name="表格94.A2" office:value-type="string">
            <text:p text:style-name="P25">Weight</text:p>
          </table:table-cell>
          <table:table-cell table:style-name="表格94.A2" office:value-type="string">
            <text:p text:style-name="P20" loext:marker-style-name="T106"><text:span text:style-name="T530">Cisco </text:span><text:span text:style-name="T531">私有</text:span><text:span text:style-name="T109">，</text:span><text:span text:style-name="T532">非 </text:span><text:span text:style-name="T533">BGP </text:span><text:span text:style-name="T532">標準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109">看到「</text:span><text:span text:style-name="T516">BGP </text:span><text:span text:style-name="T109">標準屬性」選項別選 </text:span><text:span text:style-name="T516">Weight</text:span><text:span text:style-name="T109">（</text:span><text:span text:style-name="T516">Juniper</text:span><text:span text:style-name="T109">／華為不一定有）。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7">🧠 <text:s/></text:span><text:span text:style-name="T166">白話理解（這句最重要）</text:span></text:p>
            <text:p text:style-name="P11" loext:marker-style-name="T21"><text:span text:style-name="T170">BGP </text:span><text:span text:style-name="T169">心裡在想：「哪條路比較值得信任？比較符合政策？」不是「哪條最短」</text:span><text:span text:style-name="T20">（</text:span><text:span text:style-name="T128">那是 </text:span><text:span text:style-name="T127">OSPF </text:span><text:span text:style-name="T128">在做的事</text:span><text:span text:style-name="T20">）。</text:span></text:p>
            <text:p text:style-name="P12"><text:span text:style-name="T168">一句話總結 → </text:span><text:span text:style-name="T42">BGP </text:span><text:span text:style-name="T20">是政策導向（</text:span><text:span text:style-name="T42">policy-based routing</text:span><text:span text:style-name="T20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7">⚡ <text:s/></text:span><text:span text:style-name="T38">考前濃縮版（</text:span><text:span text:style-name="T39">10 </text:span><text:span text:style-name="T38">秒掃過）</text:span></text:p>
            <text:p text:style-name="P11" loext:marker-style-name="T21"><text:span text:style-name="T85">BGP</text:span><text:span text:style-name="T86">＝</text:span><text:span text:style-name="T85">TCP 179</text:span><text:span text:style-name="T20">、</text:span><text:span text:style-name="T297">Path Vector</text:span><text:span text:style-name="T20">｜</text:span><text:span text:style-name="T534">AS-PATH</text:span><text:span text:style-name="T535">：防迴圈＋越短越好</text:span><text:span text:style-name="T20">｜</text:span><text:span text:style-name="T534">Local Preference</text:span><text:span text:style-name="T535">：越大越好</text:span><text:span text:style-name="T20">｜</text:span><text:span text:style-name="T534">MED</text:span><text:span text:style-name="T535">：越小越好</text:span><text:span text:style-name="T20">＋</text:span><text:span text:style-name="T128">只比同 </text:span><text:span text:style-name="T127">AS</text:span><text:span text:style-name="T20">｜</text:span><text:span text:style-name="T85">eBGP &gt; iBGP</text:span><text:span text:style-name="T20">｜</text:span><text:span text:style-name="T536">Weight</text:span><text:span text:style-name="T537">：</text:span><text:span text:style-name="T536">Cisco </text:span><text:span text:style-name="T537">私有</text:span><text:span text:style-name="T20">。</text:span></text:p>
            <text:p text:style-name="P11" loext:marker-style-name="T21"><text:span text:style-name="T20">選路優先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（</text:span><text:span text:style-name="T42">Weight </text:span><text:span text:style-name="T20">為 </text:span><text:span text:style-name="T42">Cisco </text:span><text:span text:style-name="T20">私有；</text:span><text:span text:style-name="T42">Local Pref </text:span><text:span text:style-name="T20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</text:span><text:span text:style-name="T34">BGP </text:span><text:span text:style-name="T35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433">✗ </text:span><text:span text:style-name="T395">AS-PATH </text:span><text:span text:style-name="T396">是 </text:span><text:span text:style-name="T395">BGP </text:span><text:span text:style-name="T396">選路最重要的屬性</text:span><text:span text:style-name="T250">　→　</text:span><text:span text:style-name="T20">✓ </text:span><text:span text:style-name="T283">Local Preference </text:span><text:span text:style-name="T282">才是最重要的通用屬性</text:span><text:span text:style-name="T20">（</text:span><text:span text:style-name="T42">Weight </text:span><text:span text:style-name="T20">是 </text:span><text:span text:style-name="T42">Cisco </text:span><text:span text:style-name="T20">私有）。</text:span></text:p>
            <text:p text:style-name="P12"><text:span text:style-name="T433">✗ </text:span><text:span text:style-name="T395">AS-PATH </text:span><text:span text:style-name="T396">越短就一定會選那條</text:span><text:span text:style-name="T250">　→　</text:span><text:span text:style-name="T20">✓ </text:span><text:span text:style-name="T368">只有前面的屬性（</text:span><text:span text:style-name="T401">Local Pref </text:span><text:span text:style-name="T368">等）完全相同時，才會比較 </text:span><text:span text:style-name="T401">AS-PATH</text:span><text:span text:style-name="T20">。</text:span></text:p>
            <text:p text:style-name="P12"><text:span text:style-name="T433">✗ </text:span><text:span text:style-name="T395">BGP </text:span><text:span text:style-name="T396">會自己計算最短路徑</text:span><text:span text:style-name="T250">　→　</text:span><text:span text:style-name="T20">✓ </text:span><text:span text:style-name="T42">BGP </text:span><text:span text:style-name="T20">不算距離，</text:span><text:span text:style-name="T491">OSPF </text:span><text:span text:style-name="T490">才做最短路徑計算</text:span><text:span text:style-name="T20">。</text:span></text:p>
            <text:p text:style-name="P12"><text:span text:style-name="T433">✗ </text:span><text:span text:style-name="T395">iBGP </text:span><text:span text:style-name="T396">比 </text:span><text:span text:style-name="T395">eBGP </text:span><text:span text:style-name="T396">優先</text:span><text:span text:style-name="T250">　→　</text:span><text:span text:style-name="T20">✓ </text:span><text:span text:style-name="T432">eBGP </text:span><text:span text:style-name="T431">優先於 </text:span><text:span text:style-name="T432">iBGP</text:span><text:span text:style-name="T20">（外部路由更可信）。</text:span></text:p>
            <text:p text:style-name="P12"><text:span text:style-name="T433">✗ </text:span><text:span text:style-name="T395">MED </text:span><text:span text:style-name="T396">可以跨不同 </text:span><text:span text:style-name="T395">AS </text:span><text:span text:style-name="T396">互相比較</text:span><text:span text:style-name="T250">　→　</text:span><text:span text:style-name="T20">✓</text:span><text:span text:style-name="T538"> </text:span><text:span text:style-name="T539">MED </text:span><text:span text:style-name="T538">只能比較來自同一個 </text:span><text:span text:style-name="T539">AS </text:span><text:span text:style-name="T538">的路由</text:span><text:span text:style-name="T20">。</text:span></text:p>
          </table:table-cell>
        </table:table-row>
      </table:table>
      <text:h text:style-name="P18" text:outline-level="2" loext:marker-style-name="T34"><text:soft-page-break/><text:span text:style-name="T35">七、</text:span><text:span text:style-name="T34">BGP + NAT + </text:span><text:span text:style-name="T35">防火牆 整合流程</text:span></text:h>
      <text:p text:style-name="P22" loext:marker-style-name="T21"><text:span text:style-name="T20">把三個概念串在一起，這才是實務上封包實際走的路。情境：</text:span><text:span text:style-name="T84">你的電腦要連到健保署</text:span><text:span text:style-name="T20">，</text:span><text:span text:style-name="T86">有兩條對外線路</text:span><text:span text:style-name="T20">（</text:span><text:span text:style-name="T171">中華電信 </text:span><text:span text:style-name="T243">AS-PATH </text:span><text:span text:style-name="T171">長度 </text:span><text:span text:style-name="T243">2</text:span><text:span text:style-name="T20">、</text:span><text:span text:style-name="T158">台灣固網 </text:span><text:span text:style-name="T291">AS-PATH </text:span><text:span text:style-name="T158">長度 </text:span><text:span text:style-name="T291">3</text:span><text:span text:style-name="T20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關鍵一句</text:span><text:span text:style-name="T104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0" loext:marker-style-name="T106"><text:span text:style-name="T108">1 </text:span><text:span text:style-name="T162">封包產生</text:span></text:p>
          </table:table-cell>
          <table:table-cell table:style-name="表格96.A2" office:value-type="string">
            <text:p text:style-name="P20" loext:marker-style-name="T106"><text:span text:style-name="T109">你的電腦說「我要去健保署 </text:span><text:span text:style-name="T108">IP</text:span><text:span text:style-name="T109">」</text:span></text:p>
          </table:table-cell>
          <table:table-cell table:style-name="表格96.A2" office:value-type="string">
            <text:p text:style-name="P20" loext:marker-style-name="T106"><text:span text:style-name="T109">封包準備出發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2 </text:span><text:span text:style-name="T162">防火牆 </text:span><text:span text:style-name="T163">Firewall</text:span></text:p>
          </table:table-cell>
          <table:table-cell table:style-name="表格96.A3" office:value-type="string">
            <text:p text:style-name="P20" loext:marker-style-name="T106"><text:span text:style-name="T109">看來源</text:span><text:span text:style-name="T108">/</text:span><text:span text:style-name="T109">目的 </text:span><text:span text:style-name="T108">IP</text:span><text:span text:style-name="T109">、</text:span><text:span text:style-name="T108">Port</text:span><text:span text:style-name="T109">，不符就擋掉</text:span></text:p>
          </table:table-cell>
          <table:table-cell table:style-name="表格96.A3" office:value-type="string">
            <text:p text:style-name="P20" loext:marker-style-name="T106"><text:span text:style-name="T109">防火牆決定「能不能走」</text:span><text:span text:style-name="T106"/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3 </text:span><text:span text:style-name="T163">NAT</text:span></text:p>
          </table:table-cell>
          <table:table-cell table:style-name="表格96.A2" office:value-type="string">
            <text:p text:style-name="P20" loext:marker-style-name="T106"><text:span text:style-name="T109">把</text:span><text:span text:style-name="T532">私有 </text:span><text:span text:style-name="T475">IP </text:span><text:span text:style-name="T532">換成公網 </text:span><text:span text:style-name="T475">IP</text:span><text:span text:style-name="T109">（</text:span><text:span text:style-name="T108">192.168.1.10 → 203.66.x.x</text:span><text:span text:style-name="T109">）</text:span></text:p>
          </table:table-cell>
          <table:table-cell table:style-name="表格96.A2" office:value-type="string">
            <text:p text:style-name="P20" loext:marker-style-name="T106"><text:span text:style-name="T108">NAT </text:span><text:span text:style-name="T109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4 </text:span><text:span text:style-name="T163">BGP </text:span><text:span text:style-name="T162">選路</text:span></text:p>
          </table:table-cell>
          <table:table-cell table:style-name="表格96.A3" office:value-type="string">
            <text:p text:style-name="P20" loext:marker-style-name="T106"><text:span text:style-name="T109">比條件：</text:span><text:span text:style-name="T378">若相同選 </text:span><text:span text:style-name="T379">AS-PATH </text:span><text:span text:style-name="T378">較短路</text:span><text:span text:style-name="T379">1</text:span><text:span text:style-name="T109">；</text:span><text:span text:style-name="T540">若中華電信 </text:span><text:span text:style-name="T541">Local Pref </text:span><text:span text:style-name="T540">較高則不管長短走路</text:span><text:span text:style-name="T541">1</text:span></text:p>
          </table:table-cell>
          <table:table-cell table:style-name="表格96.A3" office:value-type="string">
            <text:p text:style-name="P20" loext:marker-style-name="T106"><text:span text:style-name="T108">BGP </text:span><text:span text:style-name="T109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5 </text:span><text:span text:style-name="T162">出 </text:span><text:span text:style-name="T163">ISP </text:span><text:span text:style-name="T162">跨 </text:span><text:span text:style-name="T163">AS</text:span></text:p>
          </table:table-cell>
          <table:table-cell table:style-name="表格96.A2" office:value-type="string">
            <text:p text:style-name="P20" loext:marker-style-name="T106"><text:span text:style-name="T385">封包經過多個 </text:span><text:span text:style-name="T384">AS</text:span><text:span text:style-name="T109">（這就是 </text:span><text:span text:style-name="T108">AS-PATH </text:span><text:span text:style-name="T109">的來源）</text:span></text:p>
          </table:table-cell>
          <table:table-cell table:style-name="表格96.A2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6 </text:span><text:span text:style-name="T109">到達健保署</text:span></text:p>
          </table:table-cell>
          <table:table-cell table:style-name="表格96.A3" office:value-type="string">
            <text:p text:style-name="P20" loext:marker-style-name="T106"><text:span text:style-name="T109">健保署收到請求，完成連線</text:span><text:span text:style-name="T106"/></text:p>
          </table:table-cell>
          <table:table-cell table:style-name="表格96.A3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7">🎯 <text:s/></text:span><text:span text:style-name="T166">三層分工，一句話各自記</text:span></text:p>
            <text:p text:style-name="P11"><text:span text:style-name="T168">防火牆 → </text:span><text:span text:style-name="T20">決定「能不能走」｜</text:span><text:span text:style-name="T167">NAT → </text:span><text:span text:style-name="T20">解決「你是誰」｜</text:span><text:span text:style-name="T542">BGP → </text:span><text:span text:style-name="T543">決定「要怎麼走」</text:span></text:p>
            <text:p text:style-name="P12" loext:marker-style-name="T21"><text:span text:style-name="T20">生活比喻：</text:span><text:span text:style-name="T84">海關（防火牆）</text:span><text:span text:style-name="T20">→ </text:span><text:span text:style-name="T84">換護照</text:span><text:span text:style-name="T83">/</text:span><text:span text:style-name="T84">身份（</text:span><text:span text:style-name="T83">NAT</text:span><text:span text:style-name="T84">）</text:span><text:span text:style-name="T20">→ </text:span><text:span text:style-name="T188">選航班（</text:span><text:span text:style-name="T187">BGP</text:span><text:span text:style-name="T188">）</text:span><text:span text:style-name="T20">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7">⚠️ <text:s/></text:span><text:span text:style-name="T80">整合情境的考試陷阱</text:span></text:p>
            <text:p text:style-name="P11"><text:span text:style-name="T544">✗ </text:span><text:span text:style-name="T545">封包送不出去</text:span><text:span text:style-name="T250"> → 一定是 </text:span><text:span text:style-name="T433">BGP </text:span><text:span text:style-name="T250">問題　→　</text:span><text:span text:style-name="T20">✓ 應依序排查：</text:span><text:span text:style-name="T84">防火牆有沒有擋？</text:span><text:span text:style-name="T83">NAT </text:span><text:span text:style-name="T84">有沒有設？</text:span><text:span text:style-name="T83">BGP </text:span><text:span text:style-name="T84">有沒有路？</text:span></text:p>
            <text:p text:style-name="P12"><text:span text:style-name="T433">✗ </text:span><text:span text:style-name="T250">有路但連不到 → 是 </text:span><text:span text:style-name="T433">BGP </text:span><text:span text:style-name="T250">路由問題　→　</text:span><text:span text:style-name="T20">✓ 通常是防火牆或 </text:span><text:span text:style-name="T42">NAT </text:span><text:span text:style-name="T20">問題，不是 </text:span><text:span text:style-name="T42">BGP</text:span><text:span text:style-name="T20">。</text:span></text:p>
            <text:p text:style-name="P12"><text:span text:style-name="T433">✗ </text:span><text:span text:style-name="T545">走到錯誤的 </text:span><text:span text:style-name="T544">ISP </text:span><text:span text:style-name="T433">→ </text:span><text:span text:style-name="T250">是 </text:span><text:span text:style-name="T433">NAT </text:span><text:span text:style-name="T250">設定問題　→　</text:span><text:span text:style-name="T20">✓ </text:span><text:span text:style-name="T362">走到錯誤 </text:span><text:span text:style-name="T364">ISP </text:span><text:span text:style-name="T362">是 </text:span><text:span text:style-name="T364">BGP </text:span><text:span text:style-name="T362">選路問題（</text:span><text:span text:style-name="T364">Local Pref </text:span><text:span text:style-name="T362">或 </text:span><text:span text:style-name="T364">AS-PATH </text:span><text:span text:style-name="T362">設定不對）</text:span><text:span text:style-name="T20">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八 篇　網路系統進階：</text:span><text:span text:style-name="T32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涵蓋四大現代網路主題：</text:span><text:span text:style-name="T42">SDN</text:span><text:span text:style-name="T20">（網路如何被控制）、</text:span><text:span text:style-name="T42">Load Balancing</text:span><text:span text:style-name="T20">（流量如何分配）、</text:span><text:span text:style-name="T42">CDN</text:span><text:span text:style-name="T20">（網站如何加速）、</text:span><text:span text:style-name="T42">5G</text:span><text:span text:style-name="T20">（新世代行動網路特性）。</text:span></text:p>
          </table:table-cell>
        </table:table-row>
      </table:table>
      <text:h text:style-name="P18" text:outline-level="2" loext:marker-style-name="T34"><text:span text:style-name="T35">一、</text:span><text:span text:style-name="T34">SDN</text:span><text:span text:style-name="T35">（軟體定義網路）</text:span></text:h>
      <text:p text:style-name="P22" loext:marker-style-name="T21"><text:span text:style-name="T232">SDN</text:span><text:span text:style-name="T231">（</text:span><text:span text:style-name="T232">Software Defined Networking</text:span><text:span text:style-name="T231">）</text:span><text:span text:style-name="T20">的核心概念是：</text:span><text:span text:style-name="T154">將「控制平面」與「資料平面」分離</text:span><text:span text:style-name="T20">。</text:span><text:span text:style-name="T368">傳統網路</text:span><text:span text:style-name="T20">中</text:span><text:span text:style-name="T368">路由器和交換器同時負責「決定資料走哪條路」和「實際傳送資料」</text:span><text:span text:style-name="T20">，</text:span><text:span text:style-name="T126">SDN </text:span><text:span text:style-name="T125">則把「決策」抽出來交給集中式的 </text:span><text:span text:style-name="T126">Controller </text:span><text:span text:style-name="T125">統一管理。</text:span><text:span text:style-name="T20">（</text:span><text:span text:style-name="T42">Router</text:span><text:span text:style-name="T20">：負責「不同網路之間」傳資料；</text:span><text:span text:style-name="T42">Switch</text:span><text:span text:style-name="T20">：負責「同一個網路內」傳資料）</text:span></text:p>
      <text:p text:style-name="P32" loext:marker-style-name="T21"><text:span text:style-name="T20">傳統路由器裡面其實有兩個功能：<text:line-break/><text:line-break/>Control Plane（控制平面）負責思考：封包要走哪條路？<text:line-break/>例如：OSPF、BGP、STP，都屬於控制平面。<text:line-break/><text:line-break/>Data Plane（資料平面）負責執行：<text:line-break/>既然決定走 Port 3，那我就從 Port 3 送出去。<text:line-break/><text:line-break/>例如：收到封包 </text:span><text:span text:style-name="T546">→ </text:span><text:span text:style-name="T20">查轉送表 </text:span><text:span text:style-name="T546">→ </text:span><text:span text:style-name="T20">從指定介面送出，這叫 Data Plane。<text:line-break/><text:line-break/>三、傳統網路設備<text:line-break/><text:line-break/></text:span><draw:frame draw:style-name="fr1" draw:name="影像1" text:anchor-type="char" svg:x="-0.019cm" svg:y="5.133cm" svg:width="2.902cm" svg:height="2.044cm" draw:z-index="0"><draw:image xlink:href="Pictures/10000001000001D60000014BA9746C1B.png" xlink:type="simple" xlink:show="embed" xlink:actuate="onLoad" draw:mime-type="image/png"/></draw:frame><text:span text:style-name="T20"><text:line-break/><text:line-break/></text:span></text:p>
      <text:p text:style-name="P32" loext:marker-style-name="T21"><text:span text:style-name="T20"/></text:p>
      <text:p text:style-name="P32" loext:marker-style-name="T21"><text:span text:style-name="T20">兩個都在同一台設備裡。<text:line-break/>所以它既：自己決定路徑，也自己轉送封包。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7">🟦 <text:s/></text:span><text:span text:style-name="T166">核心概念（考試最常考）</text:span></text:p>
            <text:p text:style-name="P11"><text:span text:style-name="T205">控制平面（</text:span><text:span text:style-name="T206">Control Plane</text:span><text:span text:style-name="T205">）：</text:span><text:span text:style-name="T231">決定資料「怎麼走」</text:span><text:span text:style-name="T20">——負責路由決策的大腦。</text:span></text:p>
            <text:p text:style-name="P12"><text:span text:style-name="T205">資料平面（</text:span><text:span text:style-name="T206">Data Plane</text:span><text:span text:style-name="T205">）：</text:span><text:span text:style-name="T231">負責資料「實際傳送」</text:span><text:span text:style-name="T20">——執行指令的手腳。</text:span></text:p>
            <text:p text:style-name="P12"><text:span text:style-name="T167">🔑 </text:span><text:span text:style-name="T168">關鍵：</text:span><text:span text:style-name="T84">兩者分離，是 </text:span><text:span text:style-name="T83">SDN </text:span><text:span text:style-name="T84">最核心的設計原則</text:span><text:span text:style-name="T20">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21" loext:marker-style-name="T104"><text:span text:style-name="T105">三層架構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說明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白話</text:span><text:span text:style-name="T104"/></text:p>
          </table:table-cell>
        </table:table-row>
        <table:table-row table:style-name="表格98.1">
          <table:table-cell table:style-name="表格98.A3" office:value-type="string">
            <text:p text:style-name="P33"><text:span text:style-name="T547">🟦 Application Layer </text:span><text:span text:style-name="T525">應用層</text:span></text:p>
          </table:table-cell>
          <table:table-cell table:style-name="表格98.A3" office:value-type="string">
            <text:p text:style-name="P20" loext:marker-style-name="T106"><text:span text:style-name="T109">使用者所使用的服務，如網頁、</text:span><text:span text:style-name="T108">API</text:span><text:span text:style-name="T109">、</text:span><text:span text:style-name="T108">App</text:span></text:p>
          </table:table-cell>
          <table:table-cell table:style-name="表格98.A3" office:value-type="string">
            <text:p text:style-name="P20" loext:marker-style-name="T106"><text:span text:style-name="T109">你真正在用的東西</text:span><text:span text:style-name="T106"/></text:p>
          </table:table-cell>
        </table:table-row>
        <table:table-row table:style-name="表格98.1">
          <table:table-cell table:style-name="表格98.A4" office:value-type="string">
            <text:p text:style-name="P34"><text:span text:style-name="T547">🟨 Control Layer </text:span><text:span text:style-name="T525">控制層</text:span></text:p>
          </table:table-cell>
          <table:table-cell table:style-name="表格98.A4" office:value-type="string">
            <text:p text:style-name="P20" loext:marker-style-name="T106"><text:span text:style-name="T108">SDN Controller</text:span><text:span text:style-name="T109">（大腦），決定資料流向、集中管理</text:span></text:p>
          </table:table-cell>
          <table:table-cell table:style-name="表格98.A4" office:value-type="string">
            <text:p text:style-name="P20" loext:marker-style-name="T106"><text:span text:style-name="T109">交通指揮中心</text:span><text:span text:style-name="T106"/></text:p>
          </table:table-cell>
        </table:table-row>
        <table:table-row table:style-name="表格98.1">
          <table:table-cell table:style-name="表格98.A3" office:value-type="string">
            <text:p text:style-name="P35"><text:span text:style-name="T547">🟩 Infrastructure Layer </text:span><text:span text:style-name="T525">基礎層</text:span></text:p>
          </table:table-cell>
          <table:table-cell table:style-name="表格98.A3" office:value-type="string">
            <text:p text:style-name="P20" loext:marker-style-name="T106"><text:span text:style-name="T109">真正傳送資料的設備，如 </text:span><text:span text:style-name="T108">Router</text:span><text:span text:style-name="T109">、</text:span><text:span text:style-name="T108">Switch</text:span></text:p>
          </table:table-cell>
          <table:table-cell table:style-name="表格98.A3" office:value-type="string">
            <text:p text:style-name="P20" loext:marker-style-name="T106"><text:span text:style-name="T109">路、車道和車子</text:span><text:span text:style-name="T106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SDN </text:span><text:span text:style-name="T20">分平面、三層 </text:span><text:span text:style-name="T42">App-</text:span><text:span text:style-name="T20">控</text:span><text:span text:style-name="T42">-</text:span><text:span text:style-name="T20">基」→ </text:span><text:span text:style-name="T84">分平面＝控制／資料分離</text:span><text:span text:style-name="T20">；</text:span><text:span text:style-name="T548">三層＝</text:span><text:span text:style-name="T549">Application / Control / Infrastructure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Load Balancing</text:span><text:span text:style-name="T35">（負載平衡）</text:span></text:h>
      <text:p text:style-name="P22" loext:marker-style-name="T21"><text:span text:style-name="T20">當大量使用者同時存取同一網站，單一台伺服器會不堪負荷。負載平衡器</text:span><text:span text:style-name="T186">把流量「智慧分配」到多台伺</text:span><text:soft-page-break/><text:span text:style-name="T186">服器，確保每台都不過載</text:span><text:span text:style-name="T20">。</text:span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21" loext:marker-style-name="T104"><text:span text:style-name="T105">策略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優 </text:span><text:span text:style-name="T161">/ </text:span><text:span text:style-name="T105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20" loext:marker-style-name="T106"><text:span text:style-name="T108">① </text:span><text:span text:style-name="T163">Round Robin</text:span><text:span text:style-name="T162">（輪詢）</text:span></text:p>
          </table:table-cell>
          <table:table-cell table:style-name="表格99.A2" office:value-type="string">
            <text:p text:style-name="P20" loext:marker-style-name="T106"><text:span text:style-name="T550">依序輪流分配</text:span><text:span text:style-name="T109">，</text:span><text:span text:style-name="T551">不考慮伺服器效能或負載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20" loext:marker-style-name="T106"><text:span text:style-name="T108">② </text:span><text:span text:style-name="T163">Weighted Round Robin</text:span><text:span text:style-name="T162">（加權輪詢）</text:span></text:p>
          </table:table-cell>
          <table:table-cell table:style-name="表格99.A3" office:value-type="string">
            <text:p text:style-name="P20" loext:marker-style-name="T106"><text:span text:style-name="T550">依各伺服器處理能力設「權重」</text:span><text:span text:style-name="T109">，</text:span><text:span text:style-name="T394">能力強分到更多</text:span></text:p>
          </table:table-cell>
          <table:table-cell table:style-name="表格99.A3" office:value-type="string">
            <text:p text:style-name="P20" loext:marker-style-name="T106"><text:span text:style-name="T108">✓ </text:span><text:span text:style-name="T109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20" loext:marker-style-name="T106"><text:span text:style-name="T108">③ </text:span><text:span text:style-name="T163">Session Stickiness</text:span><text:span text:style-name="T162">（會話黏著）</text:span></text:p>
          </table:table-cell>
          <table:table-cell table:style-name="表格99.A2" office:value-type="string">
            <text:p text:style-name="P20" loext:marker-style-name="T106"><text:span text:style-name="T552">同一使用者所有請求固定導向同一台</text:span><text:span text:style-name="T109">，</text:span><text:span text:style-name="T504">維持連線狀態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84">「</text:span><text:span text:style-name="T285">LB </text:span><text:span text:style-name="T284">輪、重、黏」</text:span><text:span text:style-name="T20">→ </text:span><text:span text:style-name="T84">輪＝</text:span><text:span text:style-name="T83">Round Robin</text:span><text:span text:style-name="T84">（輪流）；重＝</text:span><text:span text:style-name="T83">Weighted RR</text:span><text:span text:style-name="T84">（加權）；黏＝</text:span><text:span text:style-name="T83">Stickiness</text:span><text:span text:style-name="T84">（固定同一台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三、</text:span><text:span text:style-name="T34">CDN</text:span><text:span text:style-name="T35">（</text:span><text:span text:style-name="T553">內容傳遞網路</text:span><text:span text:style-name="T35">）</text:span></text:h>
      <text:p text:style-name="P22" loext:marker-style-name="T21"><text:span text:style-name="T85">CDN</text:span><text:span text:style-name="T86">（</text:span><text:span text:style-name="T85">Content Delivery Network</text:span><text:span text:style-name="T86">）</text:span><text:span text:style-name="T20">透過</text:span><text:span text:style-name="T84">在全球各地部署</text:span><text:span text:style-name="T20">「</text:span><text:span text:style-name="T282">邊緣伺服器（</text:span><text:span text:style-name="T283">Edge Server</text:span><text:span text:style-name="T282">）</text:span><text:span text:style-name="T20">」加速內容傳遞。</text:span><text:span text:style-name="T335">當你開啟 </text:span><text:span text:style-name="T336">Google </text:span><text:span text:style-name="T335">或 </text:span><text:span text:style-name="T336">YouTube</text:span><text:span text:style-name="T335">，不需跨越太平洋連到美國總部，而是連到你附近的 </text:span><text:span text:style-name="T336">CDN </text:span><text:span text:style-name="T335">節點</text:span><text:span text:style-name="T20">，大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7">🌍 <text:s/></text:span><text:span text:style-name="T31">CDN </text:span><text:span text:style-name="T30">完整流程（一定要記）</text:span></text:p>
            <text:p text:style-name="P11" loext:marker-style-name="T21"><text:span text:style-name="T42">Step 1 </text:span><text:span text:style-name="T186">使用者輸入網址</text:span><text:span text:style-name="T20">（</text:span><text:span text:style-name="T42">www.example.com</text:span><text:span text:style-name="T20">）</text:span></text:p>
            <text:p text:style-name="P12" loext:marker-style-name="T21"><text:span text:style-name="T42">Step 2 </text:span><text:span text:style-name="T554">DNS </text:span><text:span text:style-name="T555">解析網址</text:span><text:span text:style-name="T20">，</text:span><text:span text:style-name="T556">找到對應 </text:span><text:span text:style-name="T557">CDN </text:span><text:span text:style-name="T556">的 </text:span><text:span text:style-name="T557">CNAME </text:span><text:span text:style-name="T556">記錄</text:span></text:p>
            <text:p text:style-name="P12" loext:marker-style-name="T21"><text:span text:style-name="T42">Step 3 </text:span><text:span text:style-name="T558">CNAME </text:span><text:span text:style-name="T559">將請求轉向 </text:span><text:span text:style-name="T558">CDN </text:span><text:span text:style-name="T559">服務商</text:span><text:span text:style-name="T20">（如 </text:span><text:span text:style-name="T42">cdn.example.net</text:span><text:span text:style-name="T20">）</text:span></text:p>
            <text:p text:style-name="P12" loext:marker-style-name="T21"><text:span text:style-name="T42">Step 4 </text:span><text:span text:style-name="T454">CDN </text:span><text:span text:style-name="T455">根據使用者地理位置，選擇最近的 </text:span><text:span text:style-name="T454">Edge </text:span><text:span text:style-name="T455">伺服器</text:span></text:p>
            <text:p text:style-name="P12" loext:marker-style-name="T21"><text:span text:style-name="T42">Step 5 Edge </text:span><text:span text:style-name="T20">伺服器將</text:span><text:span text:style-name="T265">快取內容</text:span><text:span text:style-name="T20">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1" loext:marker-style-name="T12"><text:span text:style-name="T13">關鍵名詞</text:span><text:span text:style-name="T12"/></text:p>
          </table:table-cell>
          <table:table-cell table:style-name="表格100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100.1">
          <table:table-cell table:style-name="表格100.A3" office:value-type="string">
            <text:p text:style-name="P20" loext:marker-style-name="T14"><text:span text:style-name="T16">CNAME</text:span><text:span text:style-name="T15">（別名記錄）</text:span></text:p>
          </table:table-cell>
          <table:table-cell table:style-name="表格100.A3" office:value-type="string">
            <text:p text:style-name="P20" loext:marker-style-name="T14"><text:span text:style-name="T255">DNS </text:span><text:span text:style-name="T120">的一種記錄</text:span><text:span text:style-name="T15">，作用是「</text:span><text:span text:style-name="T560">網址指向另一個網址</text:span><text:span text:style-name="T15">」（不是 </text:span><text:span text:style-name="T16">IP</text:span><text:span text:style-name="T15">）。範例：</text:span><text:span text:style-name="T561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20" loext:marker-style-name="T14"><text:span text:style-name="T16">Edge Server</text:span><text:span text:style-name="T15">（邊緣伺服器）</text:span></text:p>
          </table:table-cell>
          <table:table-cell table:style-name="表格100.A4" office:value-type="string">
            <text:p text:style-name="P20" loext:marker-style-name="T14"><text:span text:style-name="T342">部署在全球各地靠近使用者的伺服器</text:span><text:span text:style-name="T15">，負責快取並就近回應請求，大幅減少延遲。</text:span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CDN</text:span><text:span text:style-name="T20">：網址轉轉轉，資料找最近」→ </text:span><text:span text:style-name="T558">CNAME</text:span><text:span text:style-name="T559">＝網址→網址</text:span><text:span text:style-name="T20">（不是 </text:span><text:span text:style-name="T42">IP</text:span><text:span text:style-name="T20">！）；</text:span><text:span text:style-name="T42">Edge</text:span><text:span text:style-name="T20">＝就近服務，不用跑遠。</text:span></text:p>
          </table:table-cell>
          <table:covered-table-cell/>
        </table:table-row>
      </table:table>
      <text:h text:style-name="P18" text:outline-level="2" loext:marker-style-name="T34"><text:span text:style-name="T35">四、</text:span><text:span text:style-name="T34">5G </text:span><text:span text:style-name="T35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21" loext:marker-style-name="T104"><text:span text:style-name="T105">四大核心特性</text:span><text:span text:style-name="T104"/></text:p>
            </table:table-cell>
            <table:table-cell table:style-name="表格10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20" loext:marker-style-name="T106"><text:span text:style-name="T108">① </text:span><text:span text:style-name="T162">高速傳輸（</text:span><text:span text:style-name="T163">eMBB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Enhanced Mobile Broadband — </text:span><text:span text:style-name="T109">比 </text:span><text:span text:style-name="T108">4G </text:span><text:span text:style-name="T109">快數十倍，適合高畫質影音、</text:span><text:span text:style-name="T108">AR/VR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② </text:span><text:span text:style-name="T162">超低延遲（</text:span><text:span text:style-name="T163">URLLC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108">Ultra-Reliable Low Latency — </text:span><text:span text:style-name="T109">延遲低至 </text:span><text:span text:style-name="T108">1ms </text:span><text:span text:style-name="T109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20" loext:marker-style-name="T106"><text:span text:style-name="T108">③ </text:span><text:span text:style-name="T162">大量連線（</text:span><text:span text:style-name="T163">mMTC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Massive Machine Type — </text:span><text:span text:style-name="T109">每平方公里</text:span><text:span text:style-name="T378">可連數百萬台裝置</text:span><text:span text:style-name="T109">，適合 </text:span><text:span text:style-name="T108">IoT </text:span><text:span text:style-name="T109">大規模部署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④ </text:span><text:span text:style-name="T162">網路切片（</text:span><text:span text:style-name="T163">Network Slicing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562">將同一物理網路虛擬化為多個獨立「切片」</text:span><text:span text:style-name="T109">，各自不同 </text:span><text:span text:style-name="T108">QoS</text:span><text:span text:style-name="T109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54">5G </text:span><text:span text:style-name="T455">快、低、多、切</text:span><text:span text:style-name="T20">」→ 快（</text:span><text:span text:style-name="T42">eMBB</text:span><text:span text:style-name="T20">）＝高速；低（</text:span><text:span text:style-name="T42">URLLC</text:span><text:span text:style-name="T20">）＝超低延遲；多（</text:span><text:span text:style-name="T42">mMTC</text:span><text:span text:style-name="T20">）＝大量連線；切＝網路切片。</text:span></text:p>
          </table:table-cell>
          <table:covered-table-cell/>
        </table:table-row>
      </table:table>
      <text:h text:style-name="P18" text:outline-level="2" loext:marker-style-name="T34"><text:soft-page-break/><text:span text:style-name="T35">五、本篇陷阱與情境串連</text:span><text:span text:style-name="T34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1" loext:marker-style-name="T104"><text:span text:style-name="T105">常見錯誤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正確觀念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主題</text:span><text:span text:style-name="T104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0" loext:marker-style-name="T106"><text:span text:style-name="T108">SDN </text:span><text:span text:style-name="T109">是把控制與資料整合</text:span></text:p>
          </table:table-cell>
          <table:table-cell table:style-name="表格102.A2" office:value-type="string">
            <text:p text:style-name="P20" loext:marker-style-name="T106"><text:span text:style-name="T108">SDN = </text:span><text:span text:style-name="T109">控制與資料「分離」</text:span></text:p>
          </table:table-cell>
          <table:table-cell table:style-name="表格102.A2" office:value-type="string">
            <text:p text:style-name="P20" loext:marker-style-name="T106"><text:span text:style-name="T108">S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Round Robin </text:span><text:span text:style-name="T109">會考慮伺服器效能</text:span></text:p>
          </table:table-cell>
          <table:table-cell table:style-name="表格102.A3" office:value-type="string">
            <text:p text:style-name="P20" loext:marker-style-name="T106"><text:span text:style-name="T108">RR </text:span><text:span text:style-name="T109">不看效能，</text:span><text:span text:style-name="T108">Weighted RR </text:span><text:span text:style-name="T109">才看</text:span></text:p>
          </table:table-cell>
          <table:table-cell table:style-name="表格102.A3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Stickiness </text:span><text:span text:style-name="T109">是平均分配流量</text:span></text:p>
          </table:table-cell>
          <table:table-cell table:style-name="表格102.A2" office:value-type="string">
            <text:p text:style-name="P20" loext:marker-style-name="T106"><text:span text:style-name="T108">Stickiness = </text:span><text:span text:style-name="T109">固定同一台 </text:span><text:span text:style-name="T108">Server</text:span></text:p>
          </table:table-cell>
          <table:table-cell table:style-name="表格102.A2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CDN </text:span><text:span text:style-name="T109">是把資料放在中心機房</text:span></text:p>
          </table:table-cell>
          <table:table-cell table:style-name="表格102.A3" office:value-type="string">
            <text:p text:style-name="P20" loext:marker-style-name="T106"><text:span text:style-name="T108">CDN </text:span><text:span text:style-name="T109">放在</text:span><text:span text:style-name="T552">靠近使用者的 </text:span><text:span text:style-name="T563">Edge </text:span><text:span text:style-name="T552">節點</text:span></text:p>
          </table:table-cell>
          <table:table-cell table:style-name="表格102.A3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CNAME </text:span><text:span text:style-name="T109">是 </text:span><text:span text:style-name="T108">IP </text:span><text:span text:style-name="T109">位址的對應</text:span></text:p>
          </table:table-cell>
          <table:table-cell table:style-name="表格102.A2" office:value-type="string">
            <text:p text:style-name="P20" loext:marker-style-name="T106"><text:span text:style-name="T448">CNAME = </text:span><text:span text:style-name="T119">網址 → 網址</text:span><text:span text:style-name="T109">（非 </text:span><text:span text:style-name="T108">IP</text:span><text:span text:style-name="T109">）</text:span></text:p>
          </table:table-cell>
          <table:table-cell table:style-name="表格102.A2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WiFi </text:span><text:span text:style-name="T109">使用 </text:span><text:span text:style-name="T108">CSMA/CD</text:span></text:p>
          </table:table-cell>
          <table:table-cell table:style-name="表格102.A3" office:value-type="string">
            <text:p text:style-name="P20" loext:marker-style-name="T106"><text:span text:style-name="T111">WiFi </text:span><text:span text:style-name="T110">用 </text:span><text:span text:style-name="T111">CSMA/CA</text:span><text:span text:style-name="T109">（</text:span><text:span text:style-name="T108">CD </text:span><text:span text:style-name="T109">是有線網路）</text:span></text:p>
          </table:table-cell>
          <table:table-cell table:style-name="表格102.A3" office:value-type="string">
            <text:p text:style-name="P20" loext:marker-style-name="T106"><text:span text:style-name="T108">WiFi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5G </text:span><text:span text:style-name="T109">只是速度變快</text:span></text:p>
          </table:table-cell>
          <table:table-cell table:style-name="表格102.A2" office:value-type="string">
            <text:p text:style-name="P20" loext:marker-style-name="T106"><text:span text:style-name="T108">5G </text:span><text:span text:style-name="T109">還有低延遲、大量連線、網路切片</text:span></text:p>
          </table:table-cell>
          <table:table-cell table:style-name="表格102.A2" office:value-type="string">
            <text:p text:style-name="P20" loext:marker-style-name="T106"><text:span text:style-name="T108">5G</text:span><text:span text:style-name="T106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7">🔗 <text:s/></text:span><text:span text:style-name="T30">使用情境串連（理解記憶）</text:span></text:p>
            <text:p text:style-name="P11" loext:marker-style-name="T21"><text:span text:style-name="T20">想像你用手機打開 </text:span><text:span text:style-name="T42">App</text:span><text:span text:style-name="T20">：① 開啟 </text:span><text:span text:style-name="T42">App → Application Layer</text:span><text:span text:style-name="T20">；② </text:span><text:span text:style-name="T42">SDN Controller </text:span><text:span text:style-name="T20">決定資料怎麼走 → </text:span><text:span text:style-name="T42">Control Layer</text:span><text:span text:style-name="T20">；③ </text:span><text:span text:style-name="T42">Router/Switch </text:span><text:span text:style-name="T20">實際傳送 → </text:span><text:span text:style-name="T42">Infrastructure Layer</text:span><text:span text:style-name="T20">；④ </text:span><text:span text:style-name="T42">Load Balancer </text:span><text:span text:style-name="T20">把請求分配到空閒伺服器 → </text:span><text:span text:style-name="T42">Load Balancing</text:span><text:span text:style-name="T20">；⑤ </text:span><text:span text:style-name="T42">CDN </text:span><text:span text:style-name="T20">找最近節點傳回網頁 → </text:span><text:span text:style-name="T42">CDN Edge</text:span><text:span text:style-name="T20">；⑥ 資料透過 </text:span><text:span text:style-name="T42">WiFi </text:span><text:span text:style-name="T20">或 </text:span><text:span text:style-name="T42">5G </text:span><text:span text:style-name="T20">傳到你的手機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九 篇　無線通訊：</text:span><text:span text:style-name="T32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7">💡 <text:s/></text:span><text:span text:style-name="T30">核心問題：大家同時說話會怎樣？</text:span></text:p>
            <text:p text:style-name="P11" loext:marker-style-name="T21"><text:span text:style-name="T20">很多裝置想</text:span><text:span text:style-name="T86">用無線電波傳資料</text:span><text:span text:style-name="T20">，</text:span><text:span text:style-name="T128">若同時傳訊號會「撞在一起」</text:span><text:span text:style-name="T20">。</text:span><text:span text:style-name="T564">這個「決定誰先傳」的規則，就叫 </text:span><text:span text:style-name="T565">MAC </text:span><text:span text:style-name="T564">機制（</text:span><text:span text:style-name="T565">Media Access Control</text:span><text:span text:style-name="T564">）</text:span><text:span text:style-name="T20">。⚠️ 注意：這裡的 </text:span><text:span text:style-name="T42">MAC </text:span><text:span text:style-name="T20">指「誰先傳資料的規則」，不是 </text:span><text:span text:style-name="T42">MAC </text:span><text:span text:style-name="T20">位址（硬體位址）！</text:span></text:p>
          </table:table-cell>
        </table:table-row>
      </table:table>
      <text:h text:style-name="P18" text:outline-level="2" loext:marker-style-name="T34"><text:span text:style-name="T35">一、</text:span><text:span text:style-name="T566">WiFi</text:span><text:span text:style-name="T553">：先聽再講（</text:span><text:span text:style-name="T566">CSMA/CA</text:span><text:span text:style-name="T553">）</text:span></text:h>
      <text:p text:style-name="P22" loext:marker-style-name="T21"><text:span text:style-name="T432">WiFi </text:span><text:span text:style-name="T431">採用「先聽再講」的競爭機制</text:span><text:span text:style-name="T20">，就像一群人用對講機：① </text:span><text:span text:style-name="T86">先聽頻道有沒有人在傳</text:span><text:span text:style-name="T20">；② </text:span><text:span text:style-name="T86">沒人傳才開始傳</text:span><text:span text:style-name="T20">；③ </text:span><text:span text:style-name="T86">有人在傳就等一段隨機時間再試</text:span><text:span text:style-name="T20">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1" loext:marker-style-name="T12"><text:span text:style-name="T43">CSMA/CA </text:span><text:span text:style-name="T13">拆解</text:span></text:p>
            </table:table-cell>
            <table:table-cell table:style-name="表格104.A1" office:value-type="string">
              <text:p text:style-name="P21" loext:marker-style-name="T12"><text:span text:style-name="T13">意義</text:span><text:span text:style-name="T12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35"><text:span text:style-name="T567">Carrier Sense</text:span><text:span text:style-name="T568"> </text:span><text:span text:style-name="T569">載波感測</text:span></text:p>
          </table:table-cell>
          <table:table-cell table:style-name="表格104.A2" office:value-type="string">
            <text:p text:style-name="P36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37"><text:span text:style-name="T567">Multiple Access </text:span><text:span text:style-name="T570">多重存取</text:span></text:p>
          </table:table-cell>
          <table:table-cell table:style-name="表格104.A3" office:value-type="string">
            <text:p text:style-name="P38">大家共用同一個頻道</text:p>
          </table:table-cell>
        </table:table-row>
        <table:table-row table:style-name="表格104.1">
          <table:table-cell table:style-name="表格104.A2" office:value-type="string">
            <text:p text:style-name="P39"><text:span text:style-name="T567">Collision Avoidance </text:span><text:span text:style-name="T571">碰撞避免</text:span></text:p>
          </table:table-cell>
          <table:table-cell table:style-name="表格104.A2" office:value-type="string">
            <text:p text:style-name="P40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7">📶 <text:s/></text:span><text:span text:style-name="T572">WiFi </text:span><text:span text:style-name="T573">高速基礎</text:span></text:p>
            <text:p text:style-name="P11" loext:marker-style-name="T21"><text:span text:style-name="T20">另：</text:span><text:span text:style-name="T285">OFDM</text:span><text:span text:style-name="T284">（正交分頻多工）</text:span><text:span text:style-name="T20">— </text:span><text:span text:style-name="T369">將資料分成多個子頻道同時傳輸，讓頻寬利用率大幅提升</text:span><text:span text:style-name="T20">，是現代 </text:span><text:span text:style-name="T42">WiFi </text:span><text:span text:style-name="T20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7">🚑 <text:s/></text:span><text:span text:style-name="T39">WiFi </text:span><text:span text:style-name="T38">的 </text:span><text:span text:style-name="T39">QoS</text:span><text:span text:style-name="T38">：</text:span><text:span text:style-name="T39">EDCA</text:span></text:p>
            <text:p text:style-name="P11" loext:marker-style-name="T21"><text:span text:style-name="T86">當很多人在搶頻道，某些資料（語音、視訊）需要優先通過</text:span><text:span text:style-name="T20">，這就是 </text:span><text:span text:style-name="T403">EDCA</text:span><text:span text:style-name="T402">（</text:span><text:span text:style-name="T403">Enhanced Distributed Channel Access</text:span><text:span text:style-name="T402">）</text:span><text:span text:style-name="T20">的功能。</text:span><text:span text:style-name="T574">視訊通話</text:span><text:span text:style-name="T575">/</text:span><text:span text:style-name="T574">語音→少等、優先傳</text:span><text:span text:style-name="T20">；</text:span><text:span text:style-name="T362">網頁</text:span><text:span text:style-name="T364">/</text:span><text:span text:style-name="T362">大檔下載→稍微等一下也沒關係</text:span><text:span text:style-name="T20">。</text:span></text:p>
            <text:p text:style-name="P12" loext:marker-style-name="T21"><text:span text:style-name="T20">記憶口訣：</text:span><text:span text:style-name="T42">WiFi = </text:span><text:span text:style-name="T20">急診室排隊制度（心臟病</text:span><text:span text:style-name="T42">/</text:span><text:span text:style-name="T20">語音視訊優先，小感冒</text:span><text:span text:style-name="T42">/</text:span><text:span text:style-name="T20">網頁下載等一下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566">Bluetooth</text:span><text:span text:style-name="T553">：老大排班（</text:span><text:span text:style-name="T566">Master-Slave</text:span><text:span text:style-name="T553">）</text:span></text:h>
      <text:p text:style-name="P22" loext:marker-style-name="T21"><text:span text:style-name="T576">Bluetooth </text:span><text:span text:style-name="T577">不靠「搶」，而是由 </text:span><text:span text:style-name="T576">Master </text:span><text:span text:style-name="T577">統一分配時間</text:span><text:span text:style-name="T20">，</text:span><text:span text:style-name="T127">Slave </text:span><text:span text:style-name="T128">照順序傳資料</text:span><text:span text:style-name="T20">（</text:span><text:span text:style-name="T243">0~1ms </text:span><text:span text:style-name="T171">耳機、</text:span><text:span text:style-name="T243">1~2ms </text:span><text:span text:style-name="T171">滑鼠、</text:span><text:span text:style-name="T243">2~3ms </text:span><text:span text:style-name="T171">鍵盤、</text:span><text:span text:style-name="T243">3~4ms </text:span><text:span text:style-name="T171">再回耳機…</text:span><text:span text:style-name="T20">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7">🔵 <text:s/></text:span><text:span text:style-name="T578">為什麼要排班？</text:span></text:p>
            <text:p text:style-name="P11" loext:marker-style-name="T21"><text:span text:style-name="T20">因為</text:span><text:span text:style-name="T169">藍牙裝置大多是「即時設備」，延遲太久就沒用了</text:span><text:span text:style-name="T20">（耳機你說「你好」</text:span><text:span text:style-name="T42">2 </text:span><text:span text:style-name="T20">秒後才到→完蛋；滑鼠 </text:span><text:span text:style-name="T42">1 </text:span><text:span text:style-name="T20">秒後游標才動→無法使用）。因此 </text:span><text:span text:style-name="T42">Bluetooth </text:span><text:span text:style-name="T20">保留固定時槽（</text:span><text:span text:style-name="T42">Time Slot</text:span><text:span text:style-name="T20">），確保即時性與穩定性。</text:span></text:p>
            <text:p text:style-name="P12" loext:marker-style-name="T21"><text:span text:style-name="T20">記憶口訣：</text:span><text:span text:style-name="T579">WiFi = </text:span><text:span text:style-name="T580">菜市場（自由競爭，亂搶）；</text:span><text:span text:style-name="T579">Bluetooth = </text:span><text:span text:style-name="T580">公司會議室預約（固定排班，有秩序</text:span><text:span text:style-name="T20">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1" loext:marker-style-name="T12"><text:span text:style-name="T13">即時語音</text:span><text:span text:style-name="T12"/></text:p>
          </table:table-cell>
          <table:table-cell table:style-name="表格105.A2" office:value-type="string">
            <text:p text:style-name="P21" loext:marker-style-name="T12"><text:span text:style-name="T13">全名</text:span><text:span text:style-name="T12"/></text:p>
          </table:table-cell>
          <table:table-cell table:style-name="表格105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105.A2" office:value-type="string">
            <text:p text:style-name="P21" loext:marker-style-name="T12"><text:span text:style-name="T13">用途</text:span><text:span text:style-name="T12"/></text:p>
          </table:table-cell>
        </table:table-row>
        <table:table-row table:style-name="表格105.1">
          <table:table-cell table:style-name="表格105.A3" office:value-type="string">
            <text:p text:style-name="P41">SCO</text:p>
          </table:table-cell>
          <table:table-cell table:style-name="表格105.A3" office:value-type="string">
            <text:p text:style-name="P20" loext:marker-style-name="T14"><text:span text:style-name="T16">Synchronous Connection-Oriented</text:span><text:span text:style-name="T14"/></text:p>
          </table:table-cell>
          <table:table-cell table:style-name="表格105.A3" office:value-type="string">
            <text:p text:style-name="P20" loext:marker-style-name="T14"><text:span text:style-name="T15">固定時槽、同步傳輸</text:span><text:span text:style-name="T14"/></text:p>
          </table:table-cell>
          <table:table-cell table:style-name="表格105.A3" office:value-type="string">
            <text:p text:style-name="P20" loext:marker-style-name="T14"><text:span text:style-name="T15">藍牙耳機通話</text:span><text:span text:style-name="T14"/></text:p>
          </table:table-cell>
        </table:table-row>
        <table:table-row table:style-name="表格105.1">
          <table:table-cell table:style-name="表格105.A4" office:value-type="string">
            <text:p text:style-name="P41">eSCO</text:p>
          </table:table-cell>
          <table:table-cell table:style-name="表格105.A4" office:value-type="string">
            <text:p text:style-name="P20" loext:marker-style-name="T14"><text:span text:style-name="T16">Enhanced SCO</text:span><text:span text:style-name="T14"/></text:p>
          </table:table-cell>
          <table:table-cell table:style-name="表格105.A4" office:value-type="string">
            <text:p text:style-name="P20" loext:marker-style-name="T14"><text:span text:style-name="T16">SCO </text:span><text:span text:style-name="T15">加強版、可重傳、品質更好</text:span></text:p>
          </table:table-cell>
          <table:table-cell table:style-name="表格105.A4" office:value-type="string">
            <text:p text:style-name="P20" loext:marker-style-name="T14"><text:span text:style-name="T15">高品質語音</text:span><text:span text:style-name="T14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7">🔀 </text:span><text:span text:style-name="T581"><text:s/></text:span><text:span text:style-name="T572">Bluetooth </text:span><text:span text:style-name="T573">抗干擾</text:span></text:p>
            <text:p text:style-name="P11" loext:marker-style-name="T21"><text:span text:style-name="T20">另：</text:span><text:span text:style-name="T285">FHSS</text:span><text:span text:style-name="T284">（跳頻展頻）— 在 </text:span><text:span text:style-name="T285">2.4GHz </text:span><text:span text:style-name="T284">頻段中每秒快速切換數百次</text:span><text:span text:style-name="T20">（每秒約 </text:span><text:span text:style-name="T42">1600 </text:span><text:span text:style-name="T20">次）</text:span><text:span text:style-name="T284">頻道</text:span><text:span text:style-name="T20">，</text:span><text:span text:style-name="T128">避免與其他設備干擾，提升穩定性</text:span><text:span text:style-name="T20">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深入理解：時槽（</text:span><text:span text:style-name="T34">Time Slot</text:span><text:span text:style-name="T35">）</text:span></text:h>
      <text:p text:style-name="P22" loext:marker-style-name="T21"><text:span text:style-name="T20">時槽就是「切好的時間格子」。</text:span><text:span text:style-name="T371">藍牙頻道像一條只有一個人能講話的走廊</text:span><text:span text:style-name="T20">，如果大家同時講會混在一起亂掉。</text:span><text:span text:style-name="T42">Bluetooth </text:span><text:span text:style-name="T20">的解法：把時間先切成固定小格子，每個格子叫 </text:span><text:span text:style-name="T42">Time Slot</text:span><text:span text:style-name="T20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21" loext:marker-style-name="T104"><text:span text:style-name="T105">三大好處</text:span><text:span text:style-name="T104"/></text:p>
            </table:table-cell>
            <table:table-cell table:style-name="表格106.A1" table:number-columns-spanned="2" office:value-type="string">
              <text:p text:style-name="P21" loext:marker-style-name="T104"><text:span text:style-name="T105">說明</text:span><text:span text:style-name="T104"/></text:p>
            </table:table-cell>
            <table:covered-table-cell/>
            <table:table-cell table:style-name="表格106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0" loext:marker-style-name="T106"><text:span text:style-name="T109">穩定不碰撞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每人有專屬時間，不會互相干擾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公司會議室預約制</text:span><text:span text:style-name="T106"/></text:p>
          </table:table-cell>
        </table:table-row>
        <table:table-row table:style-name="表格106.1">
          <table:table-cell table:style-name="表格106.A3" office:value-type="string">
            <text:p text:style-name="P20" loext:marker-style-name="T106"><text:span text:style-name="T109">即時性保證</text:span><text:span text:style-name="T106"/></text:p>
          </table:table-cell>
          <table:table-cell table:style-name="表格106.A3" table:number-columns-spanned="2" office:value-type="string">
            <text:p text:style-name="P20" loext:marker-style-name="T106"><text:span text:style-name="T109">耳機每隔固定時間必定輪到，聲音不卡頓</text:span><text:span text:style-name="T106"/></text:p>
          </table:table-cell>
          <table:covered-table-cell/>
          <table:table-cell table:style-name="表格106.A3" office:value-type="string">
            <text:p text:style-name="P20" loext:marker-style-name="T106"><text:span text:style-name="T109">醫院預約制，準時看診</text:span><text:span text:style-name="T106"/></text:p>
          </table:table-cell>
        </table:table-row>
        <table:table-row table:style-name="表格106.1">
          <table:table-cell table:style-name="表格106.A2" office:value-type="string">
            <text:p text:style-name="P20" loext:marker-style-name="T106"><text:span text:style-name="T109">省電效果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裝置知道「還沒輪到我」，可先休眠等待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等候室等叫號，先睡一下</text:span><text:span text:style-name="T106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 loext:marker-style-name="T12"><text:span text:style-name="T43">WiFi </text:span><text:span text:style-name="T13">競爭制</text:span></text:p>
          </table:table-cell>
          <table:covered-table-cell/>
          <table:table-cell table:style-name="表格106.A1" table:number-columns-spanned="2" office:value-type="string">
            <text:p text:style-name="P7" loext:marker-style-name="T12"><text:span text:style-name="T43">BT </text:span><text:span text:style-name="T13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0" loext:marker-style-name="T14"><text:span text:style-name="T15">菜市場：大家自由搶。吞吐量高、速度快，但可能塞車、延遲不穩定。</text:span><text:span text:style-name="T14"/></text:p>
          </table:table-cell>
          <table:covered-table-cell/>
          <table:table-cell table:style-name="表格106.A2" table:number-columns-spanned="2" office:value-type="string">
            <text:p text:style-name="P20" loext:marker-style-name="T14"><text:span text:style-name="T15">醫院預約制：輪流看診。延遲固定、穩定省電，但速度不如 </text:span><text:span text:style-name="T16">WiFi </text:span><text:span text:style-name="T15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7">🕐 <text:s/></text:span><text:span text:style-name="T166">考試定義（背起來）</text:span></text:p>
            <text:p text:style-name="P11" loext:marker-style-name="T21"><text:span text:style-name="T297">Time Slot</text:span><text:span text:style-name="T296">（時槽）＝將時間切成固定小區段</text:span><text:span text:style-name="T20">，</text:span><text:span text:style-name="T371">由不同裝置依序使用，避免碰撞並確保即時性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WiFi vs Bluetooth </text:span><text:span text:style-name="T35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1" loext:marker-style-name="T12"><text:span text:style-name="T13">項目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WiFi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Bluetooth</text:span><text:span text:style-name="T12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42">核心機制</text:p>
          </table:table-cell>
          <table:table-cell table:style-name="表格107.A2" office:value-type="string">
            <text:p text:style-name="P43"><text:span text:style-name="T568">CSMA/CA</text:span><text:span text:style-name="T569">（先偵聽再傳）</text:span></text:p>
          </table:table-cell>
          <table:table-cell table:style-name="表格107.A2" office:value-type="string">
            <text:p text:style-name="P44"><text:span text:style-name="T568">Master-Slave</text:span><text:span text:style-name="T569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45"><text:span text:style-name="T15">即時語音 </text:span><text:span text:style-name="T16">/ QoS</text:span></text:p>
          </table:table-cell>
          <table:table-cell table:style-name="表格107.A3" office:value-type="string">
            <text:p text:style-name="P46"><text:span text:style-name="T568">EDCA</text:span><text:span text:style-name="T569">（</text:span><text:span text:style-name="T568">QoS </text:span><text:span text:style-name="T569">優先）</text:span></text:p>
          </table:table-cell>
          <table:table-cell table:style-name="表格107.A3" office:value-type="string">
            <text:p text:style-name="P47"><text:span text:style-name="T568">SCO / eSCO</text:span><text:span text:style-name="T569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速度</text:span><text:span text:style-name="T14"/></text:p>
          </table:table-cell>
          <table:table-cell table:style-name="表格107.A2" office:value-type="string">
            <text:p text:style-name="P20" loext:marker-style-name="T14"><text:span text:style-name="T15">高速（快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慢</text:span><text:span text:style-name="T14"/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耗電量</text:span><text:span text:style-name="T14"/></text:p>
          </table:table-cell>
          <table:table-cell table:style-name="表格107.A3" office:value-type="string">
            <text:p text:style-name="P20" loext:marker-style-name="T14"><text:span text:style-name="T15">較高</text:span><text:span text:style-name="T14"/></text:p>
          </table:table-cell>
          <table:table-cell table:style-name="表格107.A3" office:value-type="string">
            <text:p text:style-name="P20" loext:marker-style-name="T14"><text:span text:style-name="T15">低功耗</text:span><text:span text:style-name="T14"/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傳輸距離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遠（數十</text:span><text:span text:style-name="T16">~</text:span><text:span text:style-name="T15">百公尺）</text:span></text:p>
          </table:table-cell>
          <table:table-cell table:style-name="表格107.A2" office:value-type="string">
            <text:p text:style-name="P20" loext:marker-style-name="T14"><text:span text:style-name="T15">較短（約 </text:span><text:span text:style-name="T16">10 </text:span><text:span text:style-name="T15">公尺）</text:span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穩定性</text:span><text:span text:style-name="T14"/></text:p>
          </table:table-cell>
          <table:table-cell table:style-name="表格107.A3" office:value-type="string">
            <text:p text:style-name="P48">受干擾影響較大</text:p>
          </table:table-cell>
          <table:table-cell table:style-name="表格107.A3" office:value-type="string">
            <text:p text:style-name="P48">固定時槽非常穩定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適用場景</text:span><text:span text:style-name="T14"/></text:p>
          </table:table-cell>
          <table:table-cell table:style-name="表格107.A2" office:value-type="string">
            <text:p text:style-name="P20" loext:marker-style-name="T14"><text:span text:style-name="T15">上網、看影片、大檔下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耳機、滑鼠、鍵盤、通話</text:span><text:span text:style-name="T14"/></text:p>
          </table:table-cell>
        </table:table-row>
      </table:table>
      <text:h text:style-name="P18" text:outline-level="2" loext:marker-style-name="T34"><text:span text:style-name="T35">五、</text:span><text:span text:style-name="T334">L2CAP</text:span><text:span text:style-name="T35">：</text:span><text:span text:style-name="T582">藍牙的資料管理員</text:span></text:h>
      <text:p text:style-name="P22" loext:marker-style-name="T21"><text:span text:style-name="T42">L2CAP</text:span><text:span text:style-name="T20">（</text:span><text:span text:style-name="T42">Logical Link Control and Adaptation Protocol</text:span><text:span text:style-name="T20">）是藍牙協議的重要一層，</text:span><text:span text:style-name="T583">負責：管理並分流不同類型的資料（語音、檔案、控制指令）</text:span><text:span text:style-name="T20">；</text:span><text:span text:style-name="T584">建立、管理、釋放「邏輯通道」</text:span><text:span text:style-name="T20">；</text:span><text:span text:style-name="T497">提供 </text:span><text:span text:style-name="T496">QoS </text:span><text:span text:style-name="T497">服務品質保證</text:span><text:span text:style-name="T20">。一句話記憶：</text:span><text:span text:style-name="T375">L2CAP </text:span><text:span text:style-name="T374">＝ 藍牙的資料管理中心</text:span><text:span text:style-name="T20">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21" loext:marker-style-name="T104"><text:span text:style-name="T105">三種</text:span><text:span text:style-name="T585">邏輯通道</text:span></text:p>
            </table:table-cell>
            <table:table-cell table:style-name="表格108.A1" table:number-columns-spanned="2" office:value-type="string">
              <text:p text:style-name="P21" loext:marker-style-name="T104"><text:span text:style-name="T105">特性</text:span><text:span text:style-name="T104"/></text:p>
            </table:table-cell>
            <table:covered-table-cell/>
            <table:table-cell table:style-name="表格108.A1" office:value-type="string">
              <text:p text:style-name="P21" loext:marker-style-name="T104"><text:span text:style-name="T105">用途</text:span><text:span text:style-name="T104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26"><text:span text:style-name="T520">Connection-oriented</text:span><text:span text:style-name="T521">（連線導向）</text:span></text:p>
          </table:table-cell>
          <table:table-cell table:style-name="表格108.A2" table:number-columns-spanned="2" office:value-type="string">
            <text:p text:style-name="P20" loext:marker-style-name="T106"><text:span text:style-name="T110">有建立連線、雙方確認</text:span><text:span text:style-name="T109">，可靠、確保收到</text:span></text:p>
          </table:table-cell>
          <table:covered-table-cell/>
          <table:table-cell table:style-name="表格108.A2" office:value-type="string">
            <text:p text:style-name="P20" loext:marker-style-name="T106"><text:span text:style-name="T109">重要資料傳輸、檔案（像打電話）</text:span><text:span text:style-name="T106"/></text:p>
          </table:table-cell>
        </table:table-row>
        <table:table-row table:style-name="表格108.1">
          <table:table-cell table:style-name="表格108.A3" office:value-type="string">
            <text:p text:style-name="P26"><text:span text:style-name="T520">Connectionless</text:span><text:span text:style-name="T521">（非連線）</text:span></text:p>
          </table:table-cell>
          <table:table-cell table:style-name="表格108.A3" table:number-columns-spanned="2" office:value-type="string">
            <text:p text:style-name="P20" loext:marker-style-name="T106"><text:span text:style-name="T110">直接送出、不確認</text:span><text:span text:style-name="T109">，快速但可能遺失</text:span></text:p>
          </table:table-cell>
          <table:covered-table-cell/>
          <table:table-cell table:style-name="表格108.A3" office:value-type="string">
            <text:p text:style-name="P20" loext:marker-style-name="T106"><text:span text:style-name="T109">廣播、串流（像廣播）</text:span><text:span text:style-name="T106"/></text:p>
          </table:table-cell>
        </table:table-row>
        <table:table-row table:style-name="表格108.1">
          <table:table-cell table:style-name="表格108.A2" office:value-type="string">
            <text:p text:style-name="P26"><text:span text:style-name="T520">Signaling Channel</text:span><text:span text:style-name="T521">（信令通道）</text:span></text:p>
          </table:table-cell>
          <table:table-cell table:style-name="表格108.A2" table:number-columns-spanned="2" office:value-type="string">
            <text:p text:style-name="P49">控制管理用，不傳資料只管控制</text:p>
          </table:table-cell>
          <table:covered-table-cell/>
          <table:table-cell table:style-name="表格108.A2" office:value-type="string">
            <text:p text:style-name="P20" loext:marker-style-name="T106"><text:span text:style-name="T586">建立</text:span><text:span text:style-name="T587">/</text:span><text:span text:style-name="T586">釋放連線</text:span><text:span text:style-name="T109">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1" loext:marker-style-name="T12"><text:span text:style-name="T43">OSI </text:span><text:span text:style-name="T13">層</text:span></text:p>
          </table:table-cell>
          <table:covered-table-cell/>
          <table:table-cell table:style-name="表格108.A1" table:number-columns-spanned="2" office:value-type="string">
            <text:p text:style-name="P21" loext:marker-style-name="T12"><text:span text:style-name="T13">藍牙對應</text:span><text:span text:style-name="T12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應用層 </text:span><text:span text:style-name="T16">Application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6">App / </text:span><text:span text:style-name="T15">語音 </text:span><text:span text:style-name="T16">/ </text:span><text:span text:style-name="T15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傳輸層 </text:span><text:span text:style-name="T16">Transport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5">部分功能在 </text:span><text:span text:style-name="T16">L2CAP</text:span><text:span text:style-name="T15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網路層 </text:span><text:span text:style-name="T16">Network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（幾乎不對應，藍牙無路由概念）</text:span><text:span text:style-name="T14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資料鏈結層 </text:span><text:span text:style-name="T16">Data Link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6">L2CAP / MAC </text:span><text:span text:style-name="T15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實體層 </text:span><text:span text:style-name="T16">Physical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無線電波（</text:span><text:span text:style-name="T16">2.4GHz</text:span><text:span text:style-name="T15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7">📐 <text:s/></text:span><text:span text:style-name="T80">重要</text:span></text:p>
            <text:p text:style-name="P11" loext:marker-style-name="T21"><text:span text:style-name="T170">L2CAP </text:span><text:span text:style-name="T169">主要位於「資料鏈結層（</text:span><text:span text:style-name="T170">Data Link Layer</text:span><text:span text:style-name="T169">）」</text:span><text:span text:style-name="T20">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本篇考試陷阱整理</text:span><text:span text:style-name="T34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81">WiFi </text:span><text:span text:style-name="T82">用什麼避免碰撞？　</text:span><text:span text:style-name="T20">✗ </text:span><text:span text:style-name="T42">CSMA/CD</text:span><text:span text:style-name="T20">（有線乙太網路機制）→ ✓ </text:span><text:span text:style-name="T42">CSMA/CA</text:span><text:span text:style-name="T20">（</text:span><text:span text:style-name="T42">WiFi </text:span><text:span text:style-name="T20">用「避免」碰撞，不是「偵測」）。口訣：有線 </text:span><text:span text:style-name="T42">Ethernet = CD</text:span><text:span text:style-name="T20">（</text:span><text:span text:style-name="T42">Detect</text:span><text:span text:style-name="T20">），無線 </text:span><text:span text:style-name="T42">WiFi = CA</text:span><text:span text:style-name="T20">（</text:span><text:span text:style-name="T42">Avoid</text:span><text:span text:style-name="T20">）。</text:span></text:p>
            <text:p text:style-name="P12"><text:span text:style-name="T81">Bluetooth </text:span><text:span text:style-name="T82">是競爭制還是排程制？　</text:span><text:span text:style-name="T20">✓ 排程制（</text:span><text:span text:style-name="T42">Master-Slave</text:span><text:span text:style-name="T20">，老大安排時槽），不是競爭制。</text:span></text:p>
            <text:p text:style-name="P12"><text:span text:style-name="T82">藍牙即時語音用什麼？　</text:span><text:span text:style-name="T20">✓ </text:span><text:span text:style-name="T42">SCO</text:span><text:span text:style-name="T20">（同步連線）或 </text:span><text:span text:style-name="T42">eSCO</text:span><text:span text:style-name="T20">（加強版，可重傳）。</text:span></text:p>
            <text:p text:style-name="P12"><text:span text:style-name="T81">L2CAP </text:span><text:span text:style-name="T82">控制管理用哪個通道？　</text:span><text:span text:style-name="T20">✓ </text:span><text:span text:style-name="T42">Signaling Channel</text:span><text:span text:style-name="T20">；最可靠＝</text:span><text:span text:style-name="T42">Connection-oriented</text:span><text:span text:style-name="T20">；最快速低延遲＝</text:span><text:span text:style-name="T42">Connectionless</text:span><text:span text:style-name="T20">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7">⏱ <text:s/></text:span><text:span text:style-name="T166">考前 </text:span><text:span text:style-name="T165">30 </text:span><text:span text:style-name="T166">秒濃縮</text:span></text:p>
            <text:p text:style-name="P11" loext:marker-style-name="T21"><text:span text:style-name="T42">WiFi</text:span><text:span text:style-name="T20">＝搶頻道 </text:span><text:span text:style-name="T42">· BT</text:span><text:span text:style-name="T20">＝排班 </text:span><text:span text:style-name="T42">· </text:span><text:span text:style-name="T20">時槽＝時間格子 </text:span><text:span text:style-name="T42">· SCO</text:span><text:span text:style-name="T20">＝語音 </text:span><text:span text:style-name="T42">· L2CAP</text:span><text:span text:style-name="T20">＝三通道（位於 </text:span><text:span text:style-name="T42">Data Link </text:span><text:span text:style-name="T20">層）。</text:span></text:p>
          </table:table-cell>
        </table:table-row>
      </table:table>
      <text:h text:style-name="P17" text:outline-level="1" loext:marker-style-name="T32"><text:span text:style-name="T33">第 十 篇　資訊安全：設備防護 </text:span><text:span text:style-name="T32">· </text:span><text:span text:style-name="T33">攻防解析 </text:span><text:span text:style-name="T32">· </text:span><text:span text:style-name="T33">企業資安 </text:span><text:span text:style-name="T32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7">🛡️ <text:s/></text:span><text:span text:style-name="T30">本篇地圖</text:span></text:p>
            <text:p text:style-name="P11" loext:marker-style-name="T21"><text:span text:style-name="T20">本篇是全書最大主題，分六大部分：① 防護設備（</text:span><text:span text:style-name="T42">FW/WAF/NGFW/DMZ/IOC/Proxy</text:span><text:span text:style-name="T20">）；② </text:span><text:span text:style-name="T42">SQL Injection </text:span><text:span text:style-name="T20">與 </text:span><text:span text:style-name="T42">Zero-Day </text:span><text:span text:style-name="T20">攻防；③ </text:span><text:span text:style-name="T42">Firewall/IDS/IPS/SNMP/ICMP</text:span><text:span text:style-name="T20">；④ 企業資安三階段；⑤ </text:span><text:span text:style-name="T42">EDR/MDR/MITRE ATT&amp;CK/</text:span><text:span text:style-name="T20">數位韌性；⑥ </text:span><text:span text:style-name="T42">Zero Trust </text:span><text:span text:style-name="T20">零信任。</text:span></text:p>
          </table:table-cell>
        </table:table-row>
      </table:table>
      <text:h text:style-name="P18" text:outline-level="2" loext:marker-style-name="T34"><text:span text:style-name="T35">壹、資安與網路設備：</text:span><text:span text:style-name="T34">FW · WAF · NGFW · DMZ · IOC · Proxy</text:span></text:h>
      <text:p text:style-name="P22" loext:marker-style-name="T21"><text:span text:style-name="T20">想像你家是一間公司：外面是危險的 </text:span><text:span text:style-name="T42">Internet</text:span><text:span text:style-name="T20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1" loext:marker-style-name="T12"><text:span text:style-name="T13">名詞</text:span><text:span text:style-name="T12"/></text:p>
            </table:table-cell>
            <table:table-cell table:style-name="表格111.A1" office:value-type="string">
              <text:p text:style-name="P21" loext:marker-style-name="T12"><text:span text:style-name="T13">一行說明</text:span><text:span text:style-name="T12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41">FW</text:p>
          </table:table-cell>
          <table:table-cell table:style-name="表格111.A2" office:value-type="string">
            <text:p text:style-name="P20" loext:marker-style-name="T14"><text:span text:style-name="T15">傳統防火牆，只看</text:span><text:span text:style-name="T588">封包「外面」</text:span><text:span text:style-name="T15">的 </text:span><text:span text:style-name="T589">IP</text:span><text:span text:style-name="T590">、</text:span><text:span text:style-name="T589">Port</text:span><text:span text:style-name="T590">、</text:span><text:span text:style-name="T589">Protocol</text:span></text:p>
          </table:table-cell>
        </table:table-row>
        <table:table-row table:style-name="表格111.1">
          <table:table-cell table:style-name="表格111.A3" office:value-type="string">
            <text:p text:style-name="P26"><text:span text:style-name="T591">WAF(</text:span><text:span text:style-name="T592">Web Application Firewall</text:span><text:span text:style-name="T591">)</text:span></text:p>
          </table:table-cell>
          <table:table-cell table:style-name="表格111.A3" office:value-type="string">
            <text:p text:style-name="P20" loext:marker-style-name="T14"><text:span text:style-name="T15">網站應用防火牆，會打開</text:span><text:span text:style-name="T444">封包「裡面」(HTTP/HTTPS 應用層內容)</text:span><text:span text:style-name="T15">，</text:span><text:span text:style-name="T79">防 </text:span><text:span text:style-name="T78">SQL Injection</text:span><text:span text:style-name="T79">、</text:span><text:span text:style-name="T78">XSS</text:span></text:p>
          </table:table-cell>
        </table:table-row>
        <table:table-row table:style-name="表格111.1">
          <table:table-cell table:style-name="表格111.A2" office:value-type="string">
            <text:p text:style-name="P41">NGFW</text:p>
          </table:table-cell>
          <table:table-cell table:style-name="表格111.A2" office:value-type="string">
            <text:p text:style-name="P20" loext:marker-style-name="T14"><text:span text:style-name="T15">次世代防火牆，</text:span><text:span text:style-name="T120">比 </text:span><text:span text:style-name="T255">FW </text:span><text:span text:style-name="T120">更聰明</text:span><text:span text:style-name="T15">，有 </text:span><text:span text:style-name="T78">DPI </text:span><text:span text:style-name="T79">深度檢查、</text:span><text:span text:style-name="T78">IPS</text:span><text:span text:style-name="T79">、</text:span><text:span text:style-name="T78">App </text:span><text:span text:style-name="T79">識別</text:span></text:p>
          </table:table-cell>
        </table:table-row>
        <table:table-row table:style-name="表格111.1">
          <table:table-cell table:style-name="表格111.A3" office:value-type="string">
            <text:p text:style-name="P41">DMZ</text:p>
          </table:table-cell>
          <table:table-cell table:style-name="表格111.A3" office:value-type="string">
            <text:p text:style-name="P20" loext:marker-style-name="T14"><text:span text:style-name="T15">隔離區，</text:span><text:span text:style-name="T422">把對外服務（</text:span><text:span text:style-name="T423">Web</text:span><text:span text:style-name="T422">、</text:span><text:span text:style-name="T423">Mail</text:span><text:span text:style-name="T422">）放這裡</text:span><text:span text:style-name="T15">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41">IOC</text:p>
          </table:table-cell>
          <table:table-cell table:style-name="表格111.A2" office:value-type="string">
            <text:p text:style-name="P20" loext:marker-style-name="T14"><text:span text:style-name="T120">入侵指標（攻擊事後證據）</text:span><text:span text:style-name="T15">：</text:span><text:span text:style-name="T75">Domain</text:span><text:span text:style-name="T76">（網）、</text:span><text:span text:style-name="T75">Hash</text:span><text:span text:style-name="T76">（檔）、</text:span><text:span text:style-name="T75">IP</text:span><text:span text:style-name="T76">（連）、</text:span><text:span text:style-name="T75">C2</text:span><text:span text:style-name="T76">（控）</text:span></text:p>
          </table:table-cell>
        </table:table-row>
        <table:table-row table:style-name="表格111.1">
          <table:table-cell table:style-name="表格111.A3" office:value-type="string">
            <text:p text:style-name="P41">Proxy</text:p>
          </table:table-cell>
          <table:table-cell table:style-name="表格111.A3" office:value-type="string">
            <text:p text:style-name="P20" loext:marker-style-name="T14"><text:span text:style-name="T318">正向代理，幫「使用者（</text:span><text:span text:style-name="T319">Client</text:span><text:span text:style-name="T318">）」隱藏 </text:span><text:span text:style-name="T319">IP</text:span><text:span text:style-name="T15">、快取內容</text:span></text:p>
          </table:table-cell>
        </table:table-row>
        <table:table-row table:style-name="表格111.1">
          <table:table-cell table:style-name="表格111.A2" office:value-type="string">
            <text:p text:style-name="P41">Reverse Proxy</text:p>
          </table:table-cell>
          <table:table-cell table:style-name="表格111.A2" office:value-type="string">
            <text:p text:style-name="P20" loext:marker-style-name="T14"><text:span text:style-name="T318">反向代理，幫「伺服器</text:span><text:span text:style-name="T15">（</text:span><text:span text:style-name="T16">Server</text:span><text:span text:style-name="T15">）」負載平衡、</text:span><text:span text:style-name="T318">隱藏主機</text:span></text:p>
          </table:table-cell>
        </table:table-row>
      </table:table>
      <text:h text:style-name="P19" text:outline-level="3"><text:span text:style-name="T36">▍</text:span><text:span text:style-name="T593"> </text:span><text:span text:style-name="T594">防火牆 </text:span><text:span text:style-name="T593">Firewall</text:span><text:span text:style-name="T594">（</text:span><text:span text:style-name="T593">FW</text:span><text:span text:style-name="T594">）</text:span></text:h>
      <text:p text:style-name="P22" loext:marker-style-name="T21"><text:span text:style-name="T20">最基本的網路防護設備，像公司門口的警衛。只看封包的「外部資訊」：</text:span><text:span text:style-name="T283">IP </text:span><text:span text:style-name="T282">位址（來者是誰）、</text:span><text:span text:style-name="T283">Port</text:span><text:span text:style-name="T282">（從哪個門進來）、</text:span><text:span text:style-name="T283">Protocol</text:span><text:span text:style-name="T282">（什麼類型）</text:span><text:span text:style-name="T20">。主要運作在 </text:span><text:span text:style-name="T42">L3</text:span><text:span text:style-name="T20">（網路層）與 </text:span><text:span text:style-name="T42">L4</text:span><text:span text:style-name="T20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7">⚠️ <text:s/></text:span><text:span text:style-name="T80">缺點</text:span></text:p>
            <text:p text:style-name="P11" loext:marker-style-name="T21"><text:span text:style-name="T42">FW </text:span><text:span text:style-name="T20">只看外面，不看封包裡面的內容，無法防止應用層攻擊（如 </text:span><text:span text:style-name="T42">SQL Injection</text:span><text:span text:style-name="T20">）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594">網站應用防火牆 </text:span><text:span text:style-name="T593">WAF</text:span></text:h>
      <text:p text:style-name="P22" loext:marker-style-name="T21"><text:span text:style-name="T20">進階版防護，會「打開包包檢查內容」，專門防禦網站層面的攻擊：</text:span><text:span text:style-name="T364">SQL Injection</text:span><text:span text:style-name="T362">（注入惡意 </text:span><text:span text:style-name="T364">SQL </text:span><text:span text:style-name="T362">竊取資料庫）、</text:span><text:span text:style-name="T364">XSS</text:span><text:span text:style-name="T362">（插入惡意 </text:span><text:span text:style-name="T364">JavaScript</text:span><text:span text:style-name="T362">）、其他 </text:span><text:span text:style-name="T364">HTTP </text:span><text:span text:style-name="T362">層攻擊（</text:span><text:span text:style-name="T364">CSRF</text:span><text:span text:style-name="T362">、</text:span><text:span text:style-name="T364">Path Traversal</text:span><text:span text:style-name="T362">）</text:span><text:span text:style-name="T20">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13.A1" office:value-type="string">
              <text:p text:style-name="P50">FW</text:p>
            </table:table-cell>
            <table:table-cell table:style-name="表格113.A1" office:value-type="string">
              <text:p text:style-name="P51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0" loext:marker-style-name="T14"><text:span text:style-name="T15">檢查範圍</text:span><text:span text:style-name="T14"/></text:p>
          </table:table-cell>
          <table:table-cell table:style-name="表格113.A2" office:value-type="string">
            <text:p text:style-name="P52"><text:span text:style-name="T569">封包外面（</text:span><text:span text:style-name="T568">IP/Port</text:span><text:span text:style-name="T569">）</text:span></text:p>
          </table:table-cell>
          <table:table-cell table:style-name="表格113.A2" office:value-type="string">
            <text:p text:style-name="P53"><text:span text:style-name="T569">封包裡面（</text:span><text:span text:style-name="T568">HTTP </text:span><text:span text:style-name="T569">內容）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6">OSI </text:span><text:span text:style-name="T15">分層</text:span></text:p>
          </table:table-cell>
          <table:table-cell table:style-name="表格113.A3" office:value-type="string">
            <text:p text:style-name="P20" loext:marker-style-name="T14"><text:span text:style-name="T16">L3 / L4</text:span><text:span text:style-name="T14"/></text:p>
          </table:table-cell>
          <table:table-cell table:style-name="表格113.A3" office:value-type="string">
            <text:p text:style-name="P20" loext:marker-style-name="T14"><text:span text:style-name="T16">L7</text:span><text:span text:style-name="T15">（應用層）</text:span></text:p>
          </table:table-cell>
        </table:table-row>
        <table:table-row table:style-name="表格113.1">
          <table:table-cell table:style-name="表格113.A2" office:value-type="string">
            <text:p text:style-name="P20" loext:marker-style-name="T14"><text:span text:style-name="T15">防禦 </text:span><text:span text:style-name="T16">SQL Injection</text:span></text:p>
          </table:table-cell>
          <table:table-cell table:style-name="表格113.A2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2" office:value-type="string">
            <text:p text:style-name="P20" loext:marker-style-name="T14"><text:span text:style-name="T16">○ </text:span><text:span text:style-name="T15">可以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5">防禦 </text:span><text:span text:style-name="T16">XSS</text:span></text:p>
          </table:table-cell>
          <table:table-cell table:style-name="表格113.A3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3" office:value-type="string">
            <text:p text:style-name="P20" loext:marker-style-name="T14"><text:span text:style-name="T16">○ </text:span><text:span text:style-name="T15">可以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594">次世代防火牆 </text:span><text:span text:style-name="T593">NGFW</text:span></text:h>
      <text:p text:style-name="P22" loext:marker-style-name="T21"><text:span text:style-name="T20">在傳統 </text:span><text:span text:style-name="T42">FW </text:span><text:span text:style-name="T20">基礎上大幅強化：</text:span><text:span text:style-name="T283">DPI</text:span><text:span text:style-name="T282">（深度封包檢測）、</text:span><text:span text:style-name="T283">IPS</text:span><text:span text:style-name="T282">（入侵防禦）、</text:span><text:span text:style-name="T283">App </text:span><text:span text:style-name="T282">識別（知道你在用 </text:span><text:span text:style-name="T283">LINE </text:span><text:span text:style-name="T282">還是 </text:span><text:span text:style-name="T283">YouTube</text:span><text:span text:style-name="T282">）、使用者身份識別</text:span><text:span text:style-name="T20">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0" loext:marker-style-name="T14"><text:span text:style-name="T16">IP/Port </text:span><text:span text:style-name="T15">過濾</text:span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45"><text:span text:style-name="T16">HTTP </text:span><text:span text:style-name="T15">內容檢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54">○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20" loext:marker-style-name="T14"><text:span text:style-name="T16">App </text:span><text:span text:style-name="T15">識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IPS </text:span><text:span text:style-name="T15">入侵防禦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7">💡 <text:s/></text:span><text:span text:style-name="T38">實務說明</text:span></text:p>
            <text:p text:style-name="P11" loext:marker-style-name="T21"><text:span text:style-name="T42">NGFW </text:span><text:span text:style-name="T20">在現代企業通常用來「取代」傳統 </text:span><text:span text:style-name="T42">FW</text:span><text:span text:style-name="T20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DMZ</text:span><text:span text:style-name="T38">（非軍事區 </text:span><text:span text:style-name="T37">/ </text:span><text:span text:style-name="T38">隔離區）</text:span></text:h>
      <text:p text:style-name="P22" loext:marker-style-name="T21"><text:span text:style-name="T20">網路架構中的「隔離緩衝區」，</text:span><text:span text:style-name="T128">專門放置需要對外公開的服務</text:span><text:span text:style-name="T20">。生活比喻：</text:span><text:span text:style-name="T595">DMZ</text:span><text:span text:style-name="T596">＝大樓門口的接待室，訪客只能到接待室、無法進入辦公室；就算接待室被搗亂，也不影響裡面的員工與機密</text:span><text:span text:style-name="T20">。通常放：</text:span><text:span text:style-name="T42">Web Server</text:span><text:span text:style-name="T20">、</text:span><text:span text:style-name="T42">Mail Server</text:span><text:span text:style-name="T20">、</text:span><text:span text:style-name="T42">DNS Server</text:span><text:span text:style-name="T20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7">⚠️ <text:s/></text:span><text:span text:style-name="T80">考試陷阱</text:span></text:p>
            <text:p text:style-name="P11" loext:marker-style-name="T21"><text:span text:style-name="T42">DMZ </text:span><text:span text:style-name="T20">的用途是「隔離保護」（就算 </text:span><text:span text:style-name="T42">DMZ </text:span><text:span text:style-name="T20">內伺服器被駭，駭客也無法直接進入內部網路），不是提升速度，也不是加密資料！</text:span></text:p>
          </table:table-cell>
        </table:table-row>
      </table:table>
      <text:h text:style-name="P19" text:outline-level="3"><text:span text:style-name="T36">▍</text:span><text:span text:style-name="T37"> IOC</text:span><text:span text:style-name="T38">（入侵指標）</text:span></text:h>
      <text:p text:style-name="P22" loext:marker-style-name="T21"><text:span text:style-name="T42">IOC</text:span><text:span text:style-name="T20">（</text:span><text:span text:style-name="T42">Indicator of Compromise</text:span><text:span text:style-name="T20">）是「</text:span><text:span text:style-name="T169">攻擊發生後所留下的已知痕跡與線索</text:span><text:span text:style-name="T20">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7">🎯 <text:s/></text:span><text:span text:style-name="T166">核心觀念</text:span></text:p>
            <text:p text:style-name="P11" loext:marker-style-name="T21"><text:span text:style-name="T170">IOC </text:span><text:span text:style-name="T169">是「已發生攻擊的事後證據」</text:span><text:span text:style-name="T20">，</text:span><text:span text:style-name="T215">不是用來預測未來攻擊的工具！</text:span><text:span text:style-name="T20">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7" loext:marker-style-name="T104"><text:span text:style-name="T105">口訣</text:span><text:span text:style-name="T104"/></text:p>
          </table:table-cell>
          <table:table-cell table:style-name="表格116.A2" office:value-type="string">
            <text:p text:style-name="P7" loext:marker-style-name="T104"><text:span text:style-name="T161">IOC </text:span><text:span text:style-name="T105">類型</text:span></text:p>
          </table:table-cell>
          <table:table-cell table:style-name="表格116.A2" office:value-type="string">
            <text:p text:style-name="P7" loext:marker-style-name="T104"><text:span text:style-name="T105">白話說明</text:span><text:span text:style-name="T104"/></text:p>
          </table:table-cell>
          <table:table-cell table:style-name="表格116.A2" office:value-type="string">
            <text:p text:style-name="P7" loext:marker-style-name="T104"><text:span text:style-name="T105">對應防禦工具</text:span><text:span text:style-name="T104"/></text:p>
          </table:table-cell>
        </table:table-row>
        <table:table-row table:style-name="表格116.1">
          <table:table-cell table:style-name="表格116.A3" office:value-type="string">
            <text:p text:style-name="P55">網</text:p>
          </table:table-cell>
          <table:table-cell table:style-name="表格116.A3" office:value-type="string">
            <text:p text:style-name="P33"><text:span text:style-name="T525">惡意 </text:span><text:span text:style-name="T547">Domain</text:span><text:span text:style-name="T525">（網域）</text:span></text:p>
          </table:table-cell>
          <table:table-cell table:style-name="表格116.A3" office:value-type="string">
            <text:p text:style-name="P20" loext:marker-style-name="T106"><text:span text:style-name="T109">釣魚網站網址，用來騙帳密、假冒正規網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8">DNS </text:span><text:span text:style-name="T109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55">檔</text:p>
          </table:table-cell>
          <table:table-cell table:style-name="表格116.A4" office:value-type="string">
            <text:p text:style-name="P56"><text:span text:style-name="T525">惡意 </text:span><text:span text:style-name="T547">Hash</text:span><text:span text:style-name="T525">（雜湊值）</text:span></text:p>
          </table:table-cell>
          <table:table-cell table:style-name="表格116.A4" office:value-type="string">
            <text:p text:style-name="P20" loext:marker-style-name="T106"><text:span text:style-name="T119">惡意程式的唯一特徵碼</text:span><text:span text:style-name="T109">，改檔名也能識別</text:span></text:p>
          </table:table-cell>
          <table:table-cell table:style-name="表格116.A4" office:value-type="string">
            <text:p text:style-name="P20" loext:marker-style-name="T106"><text:span text:style-name="T109">防毒軟體 </text:span><text:span text:style-name="T108">AV</text:span><text:span text:style-name="T109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55">連</text:p>
          </table:table-cell>
          <table:table-cell table:style-name="表格116.A3" office:value-type="string">
            <text:p text:style-name="P35"><text:span text:style-name="T525">惡意 </text:span><text:span text:style-name="T547">IP </text:span><text:span text:style-name="T525">位址</text:span></text:p>
          </table:table-cell>
          <table:table-cell table:style-name="表格116.A3" office:value-type="string">
            <text:p text:style-name="P20" loext:marker-style-name="T106"><text:span text:style-name="T109">感染後電腦對外異常連線的目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9">防火牆 </text:span><text:span text:style-name="T108">FW / NGFW</text:span><text:span text:style-name="T109">（封鎖 </text:span><text:span text:style-name="T108">IP</text:span><text:span text:style-name="T109">）</text:span></text:p>
          </table:table-cell>
        </table:table-row>
        <table:table-row table:style-name="表格116.1">
          <table:table-cell table:style-name="表格116.A4" office:value-type="string">
            <text:p text:style-name="P55">控</text:p>
          </table:table-cell>
          <table:table-cell table:style-name="表格116.A4" office:value-type="string">
            <text:p text:style-name="P44"><text:span text:style-name="T547">C2 Server</text:span><text:span text:style-name="T525">（指揮控制）</text:span></text:p>
          </table:table-cell>
          <table:table-cell table:style-name="表格116.A4" office:value-type="string">
            <text:p text:style-name="P20" loext:marker-style-name="T106"><text:span text:style-name="T109">駭客遠端操控被感染主機的總部</text:span><text:span text:style-name="T106"/></text:p>
          </table:table-cell>
          <table:table-cell table:style-name="表格116.A4" office:value-type="string">
            <text:p text:style-name="P20" loext:marker-style-name="T106"><text:span text:style-name="T108">SIEM / IDS</text:span><text:span text:style-name="T109">（偵測異常連線）</text:span></text:p>
          </table:table-cell>
        </table:table-row>
        <table:table-row table:style-name="表格116.7">
          <table:table-cell table:style-name="表格116.A7" table:number-columns-spanned="4" office:value-type="string">
            <text:p text:style-name="P10"><text:span text:style-name="T17">▸ <text:s/></text:span><text:span text:style-name="T30">攻擊全流程（</text:span><text:span text:style-name="T31">IOC </text:span><text:span text:style-name="T30">出現在哪裡？）</text:span></text:p>
            <text:p text:style-name="P11" loext:marker-style-name="T21"><text:span text:style-name="T42">①</text:span><text:span text:style-name="T85"> </text:span><text:span text:style-name="T86">駭客準備：建立釣魚網站（</text:span><text:span text:style-name="T85">Domain</text:span><text:span text:style-name="T86">）、製作惡意程式（</text:span><text:span text:style-name="T85">Hash</text:span><text:span text:style-name="T86">）、架設控制中心（</text:span><text:span text:style-name="T85">C2</text:span><text:span text:style-name="T86">）</text:span><text:span text:style-name="T20">→ ② 發動攻擊：</text:span><text:span text:style-name="T84">受害者點釣魚網站 → 下載惡意程式</text:span><text:span text:style-name="T20"> → ③ </text:span><text:span text:style-name="T597">主機感染：電腦自動連回駭客主機（</text:span><text:span text:style-name="T598">IP</text:span><text:span text:style-name="T597">）或 </text:span><text:span text:style-name="T598">C2 </text:span><text:span text:style-name="T42">→ ④ </text:span><text:span text:style-name="T125">駭客控制：下指令、偷資料、橫向移動</text:span><text:span text:style-name="T20"> → ⑤ </text:span><text:span text:style-name="T599">資安系統偵測：比對異常 </text:span><text:span text:style-name="T600">IP</text:span><text:span text:style-name="T599">、惡意 </text:span><text:span text:style-name="T600">Domain</text:span><text:span text:style-name="T599">、已知 </text:span><text:span text:style-name="T600">Hash</text:span><text:span text:style-name="T599">、</text:span><text:span text:style-name="T600">C2 </text:span><text:span text:style-name="T599">行為 →</text:span><text:span text:style-name="T20"> ⑥</text:span><text:span text:style-name="T335"> 判定中毒 → </text:span><text:span text:style-name="T336">IOC </text:span><text:span text:style-name="T335">記錄建立 </text:span><text:span text:style-name="T20">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7">⚡ <text:s/></text:span><text:span text:style-name="T39">10 </text:span><text:span text:style-name="T38">秒口訣速記</text:span></text:p>
            <text:p text:style-name="P11" loext:marker-style-name="T21"><text:span text:style-name="T20">網騙你（</text:span><text:span text:style-name="T42">Domain</text:span><text:span text:style-name="T20">）→ 檔害你（</text:span><text:span text:style-name="T42">Hash</text:span><text:span text:style-name="T20">）→ 連出去（</text:span><text:span text:style-name="T42">IP</text:span><text:span text:style-name="T20">）→ 被控制（</text:span><text:span text:style-name="T42">C2</text:span><text:span text:style-name="T20">）。口訣：「</text:span><text:span text:style-name="T169">網 → 檔 → 連 → 控</text:span><text:span text:style-name="T20">」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oft-page-break/><text:span text:style-name="T36">▍</text:span><text:span text:style-name="T37"> Proxy </text:span><text:span text:style-name="T38">與 </text:span><text:span text:style-name="T37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 loext:marker-style-name="T12"><text:span text:style-name="T43">🧍 Proxy</text:span><text:span text:style-name="T13">（正向代理）— 幫 </text:span><text:span text:style-name="T43">Client</text:span></text:p>
            </table:table-cell>
            <table:table-cell table:style-name="表格117.A1" office:value-type="string">
              <text:p text:style-name="P7" loext:marker-style-name="T12"><text:span text:style-name="T43">🏢 Reverse Proxy</text:span><text:span text:style-name="T13">（反向代理）— 幫 </text:span><text:span text:style-name="T43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0" loext:marker-style-name="T14"><text:span text:style-name="T15">流程：你 → </text:span><text:span text:style-name="T16">Proxy → </text:span><text:span text:style-name="T15">網站。</text:span><text:span text:style-name="T70">隱藏使用者真實</text:span><text:span text:style-name="T15"> </text:span><text:span text:style-name="T16">IP</text:span><text:span text:style-name="T15">、</text:span><text:span text:style-name="T16">Cache </text:span><text:span text:style-name="T15">加速、企業控管員工能存取哪些網站。比喻：你請朋友幫你買東西，店家不知道真正買家是你。</text:span></text:p>
          </table:table-cell>
          <table:table-cell table:style-name="表格117.A2" office:value-type="string">
            <text:p text:style-name="P20" loext:marker-style-name="T14"><text:span text:style-name="T15">流程：你 → </text:span><text:span text:style-name="T16">Reverse Proxy → </text:span><text:span text:style-name="T15">真正 </text:span><text:span text:style-name="T16">Server</text:span><text:span text:style-name="T15">。負載平衡、</text:span><text:span text:style-name="T70">隱藏後端伺服器</text:span><text:span text:style-name="T15">、</text:span><text:span text:style-name="T16">SSL </text:span><text:span text:style-name="T15">終止與安全防護。比喻：公司大廳接待員分流訪客，客人不知道真正辦公室在哪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7">🚧 <text:s/></text:span><text:span text:style-name="T30">封包闖關順序</text:span></text:p>
            <text:p text:style-name="P11" loext:marker-style-name="T21"><text:span text:style-name="T42">🧍 </text:span><text:span text:style-name="T84">使用者（</text:span><text:span text:style-name="T83">Client</text:span><text:span text:style-name="T84">）</text:span><text:span text:style-name="T20">→ 🔵 </text:span><text:span text:style-name="T83">Proxy</text:span><text:span text:style-name="T20">（選用，隱藏 </text:span><text:span text:style-name="T42">IP/</text:span><text:span text:style-name="T20">上網控管）→ 🌍 </text:span><text:span text:style-name="T83">Internet </text:span><text:span text:style-name="T42">→ 🔥 </text:span><text:span text:style-name="T83">FW/NGFW</text:span><text:span text:style-name="T20">（第一道防線，過濾 </text:span><text:span text:style-name="T42">IP/Port/</text:span><text:span text:style-name="T20">深度檢查）→ 🏝 </text:span><text:span text:style-name="T83">DMZ</text:span><text:span text:style-name="T20">（</text:span><text:span text:style-name="T42">Web/Mail/DNS </text:span><text:span text:style-name="T20">伺服器）→ 🛡</text:span><text:span text:style-name="T82"> </text:span><text:span text:style-name="T83">WAF</text:span><text:span text:style-name="T20">（深度過濾 </text:span><text:span text:style-name="T42">HTTP</text:span><text:span text:style-name="T20">，防 </text:span><text:span text:style-name="T42">SQLi/XSS</text:span><text:span text:style-name="T20">）→ 🪞 </text:span><text:span text:style-name="T185">R</text:span><text:span text:style-name="T83">everse Proxy</text:span><text:span text:style-name="T20">（負載平衡</text:span><text:span text:style-name="T42">/</text:span><text:span text:style-name="T20">隱藏後端）→ 🏢</text:span><text:span text:style-name="T84"> 內部 </text:span><text:span text:style-name="T83">Server</text:span><text:span text:style-name="T20">（核心資產）。</text:span></text:p>
            <text:p text:style-name="P12" loext:marker-style-name="T21"><text:span text:style-name="T42">📌 </text:span><text:span text:style-name="T20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7">🔑 <text:s/></text:span><text:span text:style-name="T166">萬用口訣</text:span></text:p>
            <text:p text:style-name="P11" loext:marker-style-name="T21"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</table:table-cell>
        </table:table-row>
      </table:table>
      <text:h text:style-name="P18" text:outline-level="2" loext:marker-style-name="T34"><text:span text:style-name="T35">貳、</text:span><text:span text:style-name="T34">SQL Injection × Zero-Day × </text:span><text:span text:style-name="T35">防禦機制</text:span></text:h>
      <text:h text:style-name="P19" text:outline-level="3"><text:span text:style-name="T36">▍</text:span><text:span text:style-name="T37"> SQL Injection</text:span><text:span text:style-name="T38">（</text:span><text:span text:style-name="T37">SQL </text:span><text:span text:style-name="T38">注入攻擊）</text:span></text:h>
      <text:p text:style-name="P22" loext:marker-style-name="T21"><text:span text:style-name="T20">當你在登入頁輸入帳密，後端會把輸入組合成 </text:span><text:span text:style-name="T42">SQL </text:span><text:span text:style-name="T20">送到資料庫查詢，例如：</text:span><text:span text:style-name="T42">SELECT * FROM users WHERE account='john' AND password='1234'</text:span><text:span text:style-name="T20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7">💉 <text:s/></text:span><text:span text:style-name="T80">什麼是 </text:span><text:span text:style-name="T177">SQL Injection</text:span><text:span text:style-name="T80">？</text:span></text:p>
            <text:p text:style-name="P11"><text:span text:style-name="T46">核心一句話：</text:span><text:span text:style-name="T601">把原本只是「資料」的輸入，惡意改造成可執行的「</text:span><text:span text:style-name="T602">SQL </text:span><text:span text:style-name="T601">指令」</text:span><text:span text:style-name="T20">。</text:span></text:p>
            <text:p text:style-name="P12" loext:marker-style-name="T21"><text:span text:style-name="T20">駭客在帳號欄位輸入：</text:span><text:span text:style-name="T42">' </text:span><text:span text:style-name="T170">OR 1=1 --</text:span><text:span text:style-name="T20">，拼入後變成：…</text:span><text:span text:style-name="T283">WHERE account='' OR 1=1 -- '</text:span><text:span text:style-name="T42"> AND password='1234'</text:span><text:span text:style-name="T20">。</text:span></text:p>
            <text:p text:style-name="P12" loext:marker-style-name="T21"><text:span text:style-name="T42">OR 1=1 </text:span><text:span text:style-name="T20">永遠成立 → 查出所有使用者；</text:span><text:span text:style-name="T42">-- </text:span><text:span text:style-name="T20">是 </text:span><text:span text:style-name="T42">SQL </text:span><text:span text:style-name="T20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 loext:marker-style-name="T12"><text:span text:style-name="T43">❌ </text:span><text:span text:style-name="T13">攻擊成功的原因</text:span></text:p>
          </table:table-cell>
          <table:covered-table-cell/>
          <table:table-cell table:style-name="表格119.A2" office:value-type="string">
            <text:p text:style-name="P7" loext:marker-style-name="T12"><text:span text:style-name="T43">✅ </text:span><text:span text:style-name="T13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0" loext:marker-style-name="T14"><text:span text:style-name="T16">① </text:span><text:span text:style-name="T426">OR 1=1 </text:span><text:span text:style-name="T425">永遠成立，回傳全部使用者</text:span><text:span text:style-name="T15"> ② </text:span><text:span text:style-name="T603">-- </text:span><text:span text:style-name="T604">把密碼驗證段註解掉</text:span><text:span text:style-name="T15"> ③ 工程師直接用字串拼接組 </text:span><text:span text:style-name="T16">SQL</text:span><text:span text:style-name="T15">，沒有驗證輸入</text:span></text:p>
          </table:table-cell>
          <table:covered-table-cell/>
          <table:table-cell table:style-name="表格119.A3" office:value-type="string">
            <text:p text:style-name="P20" loext:marker-style-name="T14"><text:span text:style-name="T605">把使用者輸入視為「純資料」，不允許改變 </text:span><text:span text:style-name="T606">SQL </text:span><text:span text:style-name="T605">結構；</text:span><text:span text:style-name="T606">SQL </text:span><text:span text:style-name="T605">骨架固定，不因任何輸入而改變</text:span><text:span text:style-name="T15">；使用 </text:span><text:span text:style-name="T16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7">🛡️ <text:s/></text:span><text:span text:style-name="T607">防禦核心：</text:span><text:span text:style-name="T608">Prepared Statement</text:span><text:span text:style-name="T607">（預備語句）</text:span></text:p>
            <text:p text:style-name="P11"><text:span text:style-name="T257">概念：</text:span><text:span text:style-name="T169">先把 </text:span><text:span text:style-name="T170">SQL </text:span><text:span text:style-name="T169">骨架「鎖死」</text:span><text:span text:style-name="T20">，</text:span><text:span text:style-name="T609">使用者只能填入資料，完全無法修改 </text:span><text:span text:style-name="T610">SQL </text:span><text:span text:style-name="T609">結構</text:span><text:span text:style-name="T20">。</text:span></text:p>
            <text:p text:style-name="P12" loext:marker-style-name="T21"><text:span text:style-name="T42">❌ </text:span><text:span text:style-name="T20">危險寫法（字串拼接）：</text:span><text:span text:style-name="T42">sql = "SELECT * FROM users </text:span><text:span text:style-name="T83">WHERE id='" + input + "'"</text:span><text:span text:style-name="T84">；輸入 </text:span><text:span text:style-name="T83">' OR 1=1 -- → </text:span><text:span text:style-name="T84">結構被竄改</text:span><text:span text:style-name="T20">。</text:span></text:p>
            <text:p text:style-name="P12" loext:marker-style-name="T21"><text:span text:style-name="T42">✅ </text:span><text:span text:style-name="T20">安全寫法：</text:span><text:span text:style-name="T42">String sql = "SELECT * FROM users </text:span><text:span text:style-name="T83">WHERE id=?"</text:span><text:span text:style-name="T84">；</text:span><text:span text:style-name="T496">? </text:span><text:span text:style-name="T497">是佔位符，</text:span><text:span text:style-name="T496">input </text:span><text:span text:style-name="T497">被視為純文字，</text:span><text:span text:style-name="T496">' OR 1=1 -- </text:span><text:span text:style-name="T497">完全無效</text:span><text:span text:style-name="T20">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21" loext:marker-style-name="T104"><text:span text:style-name="T105">輔助防禦手段</text:span><text:span text:style-name="T104"/></text:p>
          </table:table-cell>
          <table:table-cell table:style-name="表格119.A2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5">Prepared Statement</text:p>
          </table:table-cell>
          <table:table-cell table:style-name="表格119.A3" table:number-columns-spanned="2" office:value-type="string">
            <text:p text:style-name="P20" loext:marker-style-name="T106"><text:span text:style-name="T108">✅ </text:span><text:span text:style-name="T118">根本解決方案。</text:span><text:span text:style-name="T446">SQL </text:span><text:span text:style-name="T118">骨架與資料完全分離</text:span><text:span text:style-name="T109">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6"><text:span text:style-name="T521">輸入驗證 </text:span><text:span text:style-name="T520">(Input Validation)</text:span></text:p>
          </table:table-cell>
          <table:table-cell table:style-name="表格119.A7" table:number-columns-spanned="2" office:value-type="string">
            <text:p text:style-name="P20" loext:marker-style-name="T106"><text:span text:style-name="T118">過濾或拒絕特殊字元</text:span><text:span text:style-name="T109">（如單引號），輔助手段，但</text:span><text:span text:style-name="T378">單靠此法仍可能被繞過</text:span><text:span text:style-name="T109">。</text:span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6"><text:span text:style-name="T520">WAF</text:span><text:span text:style-name="T521">（網站應用防火牆）</text:span></text:p>
          </table:table-cell>
          <table:table-cell table:style-name="表格119.A3" table:number-columns-spanned="2" office:value-type="string">
            <text:p text:style-name="P20" loext:marker-style-name="T106"><text:span text:style-name="T109">偵測 </text:span><text:span text:style-name="T108">OR 1=1</text:span><text:span text:style-name="T109">、</text:span><text:span text:style-name="T108">UNION SELECT </text:span><text:span text:style-name="T109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57">最小權限原則</text:p>
          </table:table-cell>
          <table:table-cell table:style-name="表格119.A7" table:number-columns-spanned="2" office:value-type="string">
            <text:p text:style-name="P20" loext:marker-style-name="T106"><text:span text:style-name="T118">資料庫帳號只給應用程式必要的權限</text:span><text:span text:style-name="T109">，避免帳號被拿下後資料全失。</text:span></text:p>
          </table:table-cell>
          <table:covered-table-cell/>
        </table:table-row>
      </table:table>
      <text:h text:style-name="P19" text:outline-level="3"><text:soft-page-break/><text:span text:style-name="T36">▍</text:span><text:span text:style-name="T37"> </text:span><text:span text:style-name="T611">Zero-Day Attack</text:span><text:span text:style-name="T228">（零時差攻擊）</text:span></text:h>
      <text:p text:style-name="P22" loext:marker-style-name="T21"><text:span text:style-name="T42">Zero-Day </text:span><text:span text:style-name="T20">指一個</text:span><text:span text:style-name="T612">「尚未被開發商發現或公開」的安全漏洞</text:span><text:span text:style-name="T20">，</text:span><text:span text:style-name="T282">在廠商來得及發布修補程式（</text:span><text:span text:style-name="T613">Patch</text:span><text:span text:style-name="T282">）之前，駭客就已利用它展開攻擊</text:span><text:span text:style-name="T20">。命名由來：</text:span><text:span text:style-name="T614">「</text:span><text:span text:style-name="T615">Day Zero</text:span><text:span text:style-name="T614">」代表廠商只有 </text:span><text:span text:style-name="T615">0 </text:span><text:span text:style-name="T614">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7" loext:marker-style-name="T12"><text:span text:style-name="T43">😱 </text:span><text:span text:style-name="T13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7" loext:marker-style-name="T12"><text:span text:style-name="T43">🏠 </text:span><text:span text:style-name="T13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0" loext:marker-style-name="T14"><text:span text:style-name="T15">傳統防毒靠「特徵碼（</text:span><text:span text:style-name="T16">Signature</text:span><text:span text:style-name="T15">）」辨識病毒，像通緝名單。但 </text:span><text:span text:style-name="T16">Zero-Day </text:span><text:span text:style-name="T15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20" loext:marker-style-name="T14"><text:span text:style-name="T15">你家大門有個秘密漏洞，你不知道、鎖廠不知道、所有人都不知道——只有小偷知道。小偷可以天天進你家，直到漏洞被發現並修補為止。</text:span><text:span text:style-name="T14"/></text:p>
          </table:table-cell>
        </table:table-row>
        <table:table-row table:style-name="表格120.1">
          <table:table-cell table:style-name="表格120.A1" office:value-type="string">
            <text:p text:style-name="P21" loext:marker-style-name="T104"><text:span text:style-name="T105">防禦層</text:span><text:span text:style-name="T104"/></text:p>
          </table:table-cell>
          <table:table-cell table:style-name="表格120.A1" office:value-type="string">
            <text:p text:style-name="P21" loext:marker-style-name="T104"><text:span text:style-name="T105">手段</text:span><text:span text:style-name="T104"/></text:p>
          </table:table-cell>
          <table:table-cell table:style-name="表格120.A1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8">修補</text:p>
          </table:table-cell>
          <table:table-cell table:style-name="表格120.A2" office:value-type="string">
            <text:p text:style-name="P20" loext:marker-style-name="T106"><text:span text:style-name="T108">Patch </text:span><text:span text:style-name="T109">更新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漏洞公開後立即套用廠商安全更新（這是最重要的行動）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58">偵測</text:p>
          </table:table-cell>
          <table:table-cell table:style-name="表格120.A5" office:value-type="string">
            <text:p text:style-name="P59">IDS / IPS</text:p>
          </table:table-cell>
          <table:table-cell table:style-name="表格120.A5" table:number-columns-spanned="2" office:value-type="string">
            <text:p text:style-name="P20" loext:marker-style-name="T106"><text:span text:style-name="T108">IDS </text:span><text:span text:style-name="T109">發現異常後發警報；</text:span><text:span text:style-name="T108">IPS </text:span><text:span text:style-name="T109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8">深度檢查</text:p>
          </table:table-cell>
          <table:table-cell table:style-name="表格120.A2" office:value-type="string">
            <text:p text:style-name="P60"><text:span text:style-name="T547">DPI</text:span><text:span text:style-name="T525">（深度封包檢查）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拆開檢查封包內容，偵測隱藏其中的攻擊指令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58">隔離</text:p>
          </table:table-cell>
          <table:table-cell table:style-name="表格120.A5" office:value-type="string">
            <text:p text:style-name="P61">網路分段</text:p>
          </table:table-cell>
          <table:table-cell table:style-name="表格120.A5" table:number-columns-spanned="2" office:value-type="string">
            <text:p text:style-name="P20" loext:marker-style-name="T106"><text:span text:style-name="T109">把網路切成多區，即使入侵一區也難橫向擴散</text:span><text:span text:style-name="T106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8">降低風險</text:p>
          </table:table-cell>
          <table:table-cell table:style-name="表格120.A2" office:value-type="string">
            <text:p text:style-name="P57">最小權限原則</text:p>
          </table:table-cell>
          <table:table-cell table:style-name="表格120.A2" table:number-columns-spanned="2" office:value-type="string">
            <text:p text:style-name="P20" loext:marker-style-name="T106"><text:span text:style-name="T109">每個帳號只給必要的最低權限，減少淪陷後的損害</text:span><text:span text:style-name="T106"/></text:p>
          </table:table-cell>
          <table:covered-table-cell/>
        </table:table-row>
      </table:table>
      <text:h text:style-name="P19" text:outline-level="3"><text:span text:style-name="T36">▍</text:span><text:span text:style-name="T37"> </text:span><text:span text:style-name="T38">防禦機制速查：</text:span><text:span text:style-name="T37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白話比喻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主要功能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備註</text:span><text:span text:style-name="T104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社區大門保全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依 </text:span><text:span text:style-name="T108">IP</text:span><text:span text:style-name="T109">、</text:span><text:span text:style-name="T108">Port</text:span><text:span text:style-name="T109">、協定決定允許或拒絕流量</text:span></text:p>
          </table:table-cell>
          <table:table-cell table:style-name="表格121.A2" office:value-type="string">
            <text:p text:style-name="P20" loext:marker-style-name="T106"><text:span text:style-name="T109">基礎但必要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5">IDS</text:p>
          </table:table-cell>
          <table:table-cell table:style-name="表格121.A3" office:value-type="string">
            <text:p text:style-name="P20" loext:marker-style-name="T106"><text:span text:style-name="T109">監視器</text:span><text:span text:style-name="T106"/></text:p>
          </table:table-cell>
          <table:table-cell table:style-name="表格121.A3" office:value-type="string">
            <text:p text:style-name="P20" loext:marker-style-name="T106"><text:span text:style-name="T585">偵測到異常流量後產生警報</text:span><text:span text:style-name="T109">，</text:span><text:span text:style-name="T472">不主動攔截</text:span></text:p>
          </table:table-cell>
          <table:table-cell table:style-name="表格121.A3" office:value-type="string">
            <text:p text:style-name="P20" loext:marker-style-name="T106"><text:span text:style-name="T109">只警告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5">IPS</text:p>
          </table:table-cell>
          <table:table-cell table:style-name="表格121.A2" office:value-type="string">
            <text:p text:style-name="P20" loext:marker-style-name="T106"><text:span text:style-name="T109">警衛直接攔人</text:span><text:span text:style-name="T106"/></text:p>
          </table:table-cell>
          <table:table-cell table:style-name="表格121.A2" office:value-type="string">
            <text:p text:style-name="P62">自動阻斷偵測到的攻擊流量</text:p>
          </table:table-cell>
          <table:table-cell table:style-name="表格121.A2" office:value-type="string">
            <text:p text:style-name="P20" loext:marker-style-name="T106"><text:span text:style-name="T109">直接阻擋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5">DPI</text:p>
          </table:table-cell>
          <table:table-cell table:style-name="表格121.A3" office:value-type="string">
            <text:p text:style-name="P20" loext:marker-style-name="T106"><text:span text:style-name="T109">海關拆包裹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不只看封包表頭，</text:span><text:span text:style-name="T504">深入檢查封包內容</text:span></text:p>
          </table:table-cell>
          <table:table-cell table:style-name="表格121.A3" office:value-type="string">
            <text:p text:style-name="P20" loext:marker-style-name="T106"><text:span text:style-name="T109">最深層檢查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5">WAF</text:p>
          </table:table-cell>
          <table:table-cell table:style-name="表格121.A2" office:value-type="string">
            <text:p text:style-name="P20" loext:marker-style-name="T106"><text:span text:style-name="T109">網站門口掃描機</text:span><text:span text:style-name="T106"/></text:p>
          </table:table-cell>
          <table:table-cell table:style-name="表格121.A2" office:value-type="string">
            <text:p text:style-name="P63"><text:span text:style-name="T525">專門針對 </text:span><text:span text:style-name="T547">Web </text:span><text:span text:style-name="T525">攻擊（</text:span><text:span text:style-name="T547">SQLi</text:span><text:span text:style-name="T525">、</text:span><text:span text:style-name="T547">XSS</text:span><text:span text:style-name="T525">）過濾</text:span></text:p>
          </table:table-cell>
          <table:table-cell table:style-name="表格121.A2" office:value-type="string">
            <text:p text:style-name="P20" loext:marker-style-name="T106"><text:span text:style-name="T109">網站專用</text:span><text:span text:style-name="T106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7">⚠️ <text:s/></text:span><text:span text:style-name="T80">考試常考</text:span></text:p>
            <text:p text:style-name="P11" loext:marker-style-name="T21"><text:span text:style-name="T170">IDS </text:span><text:span text:style-name="T169">只發警報（不攔截）；</text:span><text:span text:style-name="T170">IPS </text:span><text:span text:style-name="T169">主動阻擋（有副作用風險，可能誤擋正常流量）</text:span><text:span text:style-name="T20">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駭客如何一步一步入侵網站（典型 </text:span><text:span text:style-name="T37">7 </text:span><text:span text:style-name="T38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7" loext:marker-style-name="T104"><text:span text:style-name="T161">Step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階段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做什麼</text:span><text:span text:style-name="T104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20" loext:marker-style-name="T106"><text:span text:style-name="T108">1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偵察 </text:span><text:span text:style-name="T108">Reconnaissance</text:span></text:p>
          </table:table-cell>
          <table:table-cell table:style-name="表格122.A2" office:value-type="string">
            <text:p text:style-name="P20" loext:marker-style-name="T106"><text:span text:style-name="T109">掃描目標網站，找漏洞：</text:span><text:span text:style-name="T108">SQL Injection</text:span><text:span text:style-name="T109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2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試探 </text:span><text:span text:style-name="T108">Probing</text:span></text:p>
          </table:table-cell>
          <table:table-cell table:style-name="表格122.A3" office:value-type="string">
            <text:p text:style-name="P20" loext:marker-style-name="T106"><text:span text:style-name="T109">嘗試輸入 </text:span><text:span text:style-name="T108">' OR 1=1 -- </text:span><text:span text:style-name="T109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3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取得初步權限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成功繞過驗證或取得資料庫讀取權，可能拿到帳密清單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4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橫向移動 </text:span><text:span text:style-name="T108">Lateral Movement</text:span></text:p>
          </table:table-cell>
          <table:table-cell table:style-name="表格122.A3" office:value-type="string">
            <text:p text:style-name="P20" loext:marker-style-name="T106"><text:span text:style-name="T109">從網站主機延伸進資料庫，再滲透內網其他系統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5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竊取資料 </text:span><text:span text:style-name="T108">Exfiltration</text:span></text:p>
          </table:table-cell>
          <table:table-cell table:style-name="表格122.A2" office:value-type="string">
            <text:p text:style-name="P20" loext:marker-style-name="T106"><text:span text:style-name="T109">偷取個資、信用卡資料、機密文件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6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植入後門 </text:span><text:span text:style-name="T108">Backdoor</text:span></text:p>
          </table:table-cell>
          <table:table-cell table:style-name="表格122.A3" office:value-type="string">
            <text:p text:style-name="P20" loext:marker-style-name="T106"><text:span text:style-name="T109">埋下後門程式，確保下次還能輕鬆進入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7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勒索或變現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加密資料索取贖金，或在暗網販售竊取的資料</text:span><text:span text:style-name="T106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7">⚠️ <text:s/></text:span><text:span text:style-name="T80">公職考試常見陷阱</text:span></text:p>
            <text:p text:style-name="P11"><text:span text:style-name="T82">「輸入驗證」就足夠防 </text:span><text:span text:style-name="T81">SQLi</text:span><text:span text:style-name="T82">？　</text:span><text:span text:style-name="T20">❌ 不夠，過濾特殊字元有被繞過風險。✅</text:span><text:span text:style-name="T169"> 真正防禦是 </text:span><text:span text:style-name="T170">Prepared Statement</text:span><text:span text:style-name="T20">。</text:span></text:p>
            <text:p text:style-name="P12"><text:span text:style-name="T81">WAF </text:span><text:span text:style-name="T82">可以完全防止所有攻擊？　</text:span><text:span text:style-name="T20">❌ 不能，</text:span><text:span text:style-name="T42">WAF </text:span><text:span text:style-name="T20">是輔助防禦，新型攻擊可能繞過。✅ </text:span><text:span text:style-name="T42">WAF + </text:span><text:soft-page-break/><text:span text:style-name="T170">Prepared Statement </text:span><text:span text:style-name="T169">才是正道</text:span><text:span text:style-name="T20">。</text:span></text:p>
            <text:p text:style-name="P12"><text:span text:style-name="T81">Zero-Day </text:span><text:span text:style-name="T82">最危險是它「很強大」？　</text:span><text:span text:style-name="T20">❌ 不是，最危險的是「還沒人知道」，防毒無法識別。</text:span></text:p>
            <text:p text:style-name="P12"><text:span text:style-name="T81">IDS </text:span><text:span text:style-name="T82">可以阻擋攻擊？　</text:span><text:span text:style-name="T20">❌ 不行，</text:span><text:span text:style-name="T42">IDS </text:span><text:span text:style-name="T20">只能偵測警報，能阻擋的是 </text:span><text:span text:style-name="T42">IPS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參、網路安全：</text:span><text:span text:style-name="T34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功能</text:span><text:span text:style-name="T12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0" loext:marker-style-name="T14"><text:span text:style-name="T16">🚪 Firewall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過濾進出流量（擋或放）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64" loext:marker-style-name="T14"><text:span text:style-name="T16">👀 </text:span><text:span text:style-name="T616">IDS</text:span><text:span text:style-name="T617">(</text:span><text:span text:style-name="T618">Intrusion Detection System</text:span><text:span text:style-name="T617">)</text:span></text:p>
          </table:table-cell>
          <table:table-cell table:style-name="表格123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123.A3" office:value-type="string">
            <text:p text:style-name="P20" loext:marker-style-name="T14"><text:span text:style-name="T15">偵測異常、發出警報，</text:span><text:span text:style-name="T619">不主動阻擋</text:span></text:p>
          </table:table-cell>
        </table:table-row>
        <table:table-row table:style-name="表格123.1">
          <table:table-cell table:style-name="表格123.A2" office:value-type="string">
            <text:p text:style-name="P64" loext:marker-style-name="T14"><text:span text:style-name="T16">🚨 </text:span><text:span text:style-name="T616">IPS</text:span><text:span text:style-name="T620">(</text:span><text:span text:style-name="T618">Intrusion Prevention System</text:span><text:span text:style-name="T617">)</text:span></text:p>
          </table:table-cell>
          <table:table-cell table:style-name="表格123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偵測異常並</text:span><text:span text:style-name="T621">自動阻擋攻擊</text:span></text:p>
          </table:table-cell>
        </table:table-row>
        <table:table-row table:style-name="表格123.1">
          <table:table-cell table:style-name="表格123.A3" office:value-type="string">
            <text:p text:style-name="P20" loext:marker-style-name="T14"><text:span text:style-name="T16">📊 </text:span><text:span text:style-name="T622">SNMP</text:span><text:span text:style-name="T617">(</text:span><text:span text:style-name="T618">Simple Network Management Protocol，簡易網路管理協定</text:span><text:span text:style-name="T617">)</text:span></text:p>
          </table:table-cell>
          <table:table-cell table:style-name="表格123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123.A3" office:value-type="string">
            <text:p text:style-name="P65"><text:span text:style-name="T569">監控網路設備狀態（</text:span><text:span text:style-name="T568">CPU</text:span><text:span text:style-name="T569">、流量等）</text:span></text:p>
          </table:table-cell>
        </table:table-row>
        <table:table-row table:style-name="表格123.1">
          <table:table-cell table:style-name="表格123.A2" office:value-type="string">
            <text:p text:style-name="P66" loext:marker-style-name="T14"><text:span text:style-name="T16">📶 </text:span><text:span text:style-name="T622">ICMP</text:span><text:span text:style-name="T617">(</text:span><text:span text:style-name="T618">Internet Control Message Protocol，網際網路控制訊息協定</text:span><text:span text:style-name="T617">)</text:span></text:p>
          </table:table-cell>
          <table:table-cell table:style-name="表格123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123.A2" office:value-type="string">
            <text:p text:style-name="P67"><text:span text:style-name="T569">診斷網路連線（</text:span><text:span text:style-name="T568">Ping / Traceroute</text:span><text:span text:style-name="T569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7">⚡ <text:s/></text:span><text:span text:style-name="T38">核心記憶口訣</text:span></text:p>
            <text:p text:style-name="P11" loext:marker-style-name="T21"><text:span text:style-name="T42">Firewall </text:span><text:span text:style-name="T20">擋入口 </text:span><text:span text:style-name="T42">· IDS </text:span><text:span text:style-name="T20">只看 </text:span><text:span text:style-name="T42">· IPS </text:span><text:span text:style-name="T20">看＋擋。</text:span></text:p>
          </table:table-cell>
          <table:covered-table-cell/>
          <table:covered-table-cell/>
        </table:table-row>
      </table:table>
      <text:h text:style-name="P68" text:outline-level="3"><text:span text:style-name="T36">▍</text:span><text:span text:style-name="T37"> </text:span><text:span text:style-name="T623">HIDS</text:span><text:span text:style-name="T624">(</text:span><text:span text:style-name="T625">Host-based Intrusion Detection System</text:span><text:span text:style-name="T624">)</text:span><text:span text:style-name="T37"> vs </text:span><text:span text:style-name="T623">NIDS</text:span><text:span text:style-name="T624">(</text:span><text:span text:style-name="T625">Network Intrusion Detection System</text:span><text:span text:style-name="T624">)</text:span><text:span text:style-name="T38">（</text:span><text:span text:style-name="T626">IDS </text:span><text:span text:style-name="T627">的兩種部署</text:span><text:span text:style-name="T38">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21"/>
            </table:table-cell>
            <table:table-cell table:style-name="表格124.A1" office:value-type="string">
              <text:p text:style-name="P21" loext:marker-style-name="T12"><text:span text:style-name="T43">HIDS</text:span><text:span text:style-name="T12">(</text:span><text:span text:style-name="T628">主機型入侵偵測系統</text:span><text:span text:style-name="T12">)</text:span></text:p>
            </table:table-cell>
            <table:table-cell table:style-name="表格124.A1" office:value-type="string">
              <text:p text:style-name="P21" loext:marker-style-name="T12"><text:span text:style-name="T43">NIDS</text:span><text:span text:style-name="T12">(</text:span><text:span text:style-name="T628">網路型入侵偵測系統</text:span><text:span text:style-name="T12">)</text:span></text:p>
            </table:table-cell>
          </table:table-row>
        </table:table-header-rows>
        <table:table-row table:style-name="表格124.2">
          <table:table-cell table:style-name="表格124.A2" office:value-type="string">
            <text:p text:style-name="P20" loext:marker-style-name="T14"><text:span text:style-name="T15">安裝位置</text:span><text:span text:style-name="T14"/></text:p>
          </table:table-cell>
          <table:table-cell table:style-name="表格124.A2" office:value-type="string">
            <text:p text:style-name="P69"><text:span text:style-name="T569">裝在主機（電腦）內部</text:span></text:p>
          </table:table-cell>
          <table:table-cell table:style-name="表格124.A2" office:value-type="string">
            <text:p text:style-name="P70"><text:span text:style-name="T569">裝在網路節點（交換器旁）</text:span></text:p>
          </table:table-cell>
        </table:table-row>
        <table:table-row table:style-name="表格124.1">
          <table:table-cell table:style-name="表格124.A3" office:value-type="string">
            <text:p text:style-name="P20" loext:marker-style-name="T14"><text:span text:style-name="T15">監控內容</text:span><text:span text:style-name="T14"/></text:p>
          </table:table-cell>
          <table:table-cell table:style-name="表格124.A3" office:value-type="string">
            <text:p text:style-name="P20" loext:marker-style-name="T14"><text:span text:style-name="T629">系統 </text:span><text:span text:style-name="T630">Log</text:span><text:span text:style-name="T15">、使用者行為</text:span></text:p>
          </table:table-cell>
          <table:table-cell table:style-name="表格124.A3" office:value-type="string">
            <text:p text:style-name="P71"><text:span text:style-name="T631">網路封包與流量</text:span></text:p>
          </table:table-cell>
        </table:table-row>
        <table:table-row table:style-name="表格124.1">
          <table:table-cell table:style-name="表格124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4.A2" office:value-type="string">
            <text:p text:style-name="P20" loext:marker-style-name="T14"><text:span text:style-name="T15">電腦裡的監視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路口的交通監視器</text:span><text:span text:style-name="T14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7">⚡ <text:s/></text:span><text:span text:style-name="T38">一句話秒懂</text:span></text:p>
            <text:p text:style-name="P11" loext:marker-style-name="T21"><text:span text:style-name="T632">HIDS </text:span><text:span text:style-name="T633">看主機（</text:span><text:span text:style-name="T632">Log</text:span><text:span text:style-name="T633">）</text:span><text:span text:style-name="T632">· NIDS </text:span><text:span text:style-name="T633">看網路（封包）</text:span><text:span text:style-name="T20">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SNMP vs ICMP</text:span><text:span text:style-name="T38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21"/>
            </table:table-cell>
            <table:table-cell table:style-name="表格125.A1" office:value-type="string">
              <text:p text:style-name="P21" loext:marker-style-name="T12"><text:span text:style-name="T43">SNMP</text:span><text:span text:style-name="T12"/></text:p>
            </table:table-cell>
            <table:table-cell table:style-name="表格125.A1" office:value-type="string">
              <text:p text:style-name="P21" loext:marker-style-name="T12"><text:span text:style-name="T43">ICMP</text:span><text:span text:style-name="T12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0" loext:marker-style-name="T14"><text:span text:style-name="T15">用途</text:span><text:span text:style-name="T14"/></text:p>
          </table:table-cell>
          <table:table-cell table:style-name="表格125.A2" office:value-type="string">
            <text:p text:style-name="P69"><text:span text:style-name="T569">管理與監控網路設備</text:span></text:p>
          </table:table-cell>
          <table:table-cell table:style-name="表格125.A2" office:value-type="string">
            <text:p text:style-name="P70"><text:span text:style-name="T569">測試網路是否連通</text:span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125.A3" office:value-type="string">
            <text:p text:style-name="P72"><text:span text:style-name="T568">Application Layer</text:span><text:span text:style-name="T569">（應用層）</text:span></text:p>
          </table:table-cell>
          <table:table-cell table:style-name="表格125.A3" office:value-type="string">
            <text:p text:style-name="P73"><text:span text:style-name="T568">Network Layer</text:span><text:span text:style-name="T569">（網路層）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傳輸協定</text:span><text:span text:style-name="T14"/></text:p>
          </table:table-cell>
          <table:table-cell table:style-name="表格125.A2" office:value-type="string">
            <text:p text:style-name="P74"><text:span text:style-name="T568">UDP</text:span></text:p>
          </table:table-cell>
          <table:table-cell table:style-name="表格125.A2" office:value-type="string">
            <text:p text:style-name="P74"><text:span text:style-name="T568">IP </text:span><text:span text:style-name="T569">的附屬協定</text:span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5">常見功能</text:span><text:span text:style-name="T14"/></text:p>
          </table:table-cell>
          <table:table-cell table:style-name="表格125.A3" office:value-type="string">
            <text:p text:style-name="P20" loext:marker-style-name="T14"><text:span text:style-name="T15">看 </text:span><text:span text:style-name="T16">CPU </text:span><text:span text:style-name="T15">使用率、設備狀態、</text:span><text:span text:style-name="T16">Trap </text:span><text:span text:style-name="T15">警報</text:span></text:p>
          </table:table-cell>
          <table:table-cell table:style-name="表格125.A3" office:value-type="string">
            <text:p text:style-name="P20" loext:marker-style-name="T14"><text:span text:style-name="T16">Ping</text:span><text:span text:style-name="T15">、</text:span><text:span text:style-name="T16">Traceroute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5.A2" office:value-type="string">
            <text:p text:style-name="P75"><text:span text:style-name="T631">大樓管理室的監控系統</text:span></text:p>
          </table:table-cell>
          <table:table-cell table:style-name="表格125.A2" office:value-type="string">
            <text:p text:style-name="P75"><text:span text:style-name="T631">網路連線的體溫計</text:span>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7">⚡ <text:s/></text:span><text:span text:style-name="T38">核心差異</text:span></text:p>
            <text:p text:style-name="P11" loext:marker-style-name="T21"><text:soft-page-break/><text:span text:style-name="T632">SNMP </text:span><text:span text:style-name="T633">管理設備（應用層 </text:span><text:span text:style-name="T632">/ UDP</text:span><text:span text:style-name="T633">）</text:span><text:span text:style-name="T632">· ICMP </text:span><text:span text:style-name="T633">診斷網路（網路層）</text:span><text:span text:style-name="T20">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7">🗺 <text:s/></text:span><text:span text:style-name="T30">工具各自負責的位置</text:span></text:p>
            <text:p text:style-name="P11" loext:marker-style-name="T21"><text:span text:style-name="T42">🌐 </text:span><text:span text:style-name="T20">外部攻擊者 → 🚪 </text:span><text:span text:style-name="T42">Firewall</text:span><text:span text:style-name="T20">（第一道防線，依 </text:span><text:span text:style-name="T42">IP/Port </text:span><text:span text:style-name="T20">規則過濾）→ 📡 </text:span><text:span text:style-name="T42">NIDS / IPS</text:span><text:span text:style-name="T20">（網路中間監控：</text:span><text:span text:style-name="T42">IDS </text:span><text:span text:style-name="T20">分析封包發現異常只發警報；</text:span><text:span text:style-name="T42">IPS </text:span><text:span text:style-name="T20">分析封包發現異常直接阻擋）→ 🖥 主機 </text:span><text:span text:style-name="T42">/ Server → 👀 HIDS</text:span><text:span text:style-name="T20">（主機內部最後防線，監控系統 </text:span><text:span text:style-name="T42">Log </text:span><text:span text:style-name="T20">與使用者行為）。旁側：📊 </text:span><text:span text:style-name="T42">SNMP </text:span><text:span text:style-name="T20">監控全域設備狀態；📶 </text:span><text:span text:style-name="T42">ICMP</text:span><text:span text:style-name="T20">（</text:span><text:span text:style-name="T42">Ping/Traceroute</text:span><text:span text:style-name="T20">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7">⚠️ <text:s/></text:span><text:span text:style-name="T80">考試陷阱整理</text:span></text:p>
            <text:p text:style-name="P11"><text:span text:style-name="T433">① IDS </text:span><text:span text:style-name="T250">可以自動阻擋攻擊　→　</text:span><text:span text:style-name="T20">✓ </text:span><text:span text:style-name="T42">IDS </text:span><text:span text:style-name="T20">只偵測＋發警報，</text:span><text:span text:style-name="T42">IPS </text:span><text:span text:style-name="T20">才會阻擋。</text:span></text:p>
            <text:p text:style-name="P12"><text:span text:style-name="T433">② Firewall </text:span><text:span text:style-name="T250">可以偵測異常行為　→　</text:span><text:span text:style-name="T20">✓ </text:span><text:span text:style-name="T42">Firewall </text:span><text:span text:style-name="T20">依規則（</text:span><text:span text:style-name="T42">IP/Port</text:span><text:span text:style-name="T20">）過濾，不做行為分析。</text:span></text:p>
            <text:p text:style-name="P12"><text:span text:style-name="T433">③ HIDS </text:span><text:span text:style-name="T250">用來監控網路封包　→　</text:span><text:span text:style-name="T20">✓ </text:span><text:span text:style-name="T42">HIDS </text:span><text:span text:style-name="T20">監控主機 </text:span><text:span text:style-name="T42">Log </text:span><text:span text:style-name="T20">與系統行為，封包是 </text:span><text:span text:style-name="T42">NIDS </text:span><text:span text:style-name="T20">的工作。</text:span></text:p>
            <text:p text:style-name="P12"><text:span text:style-name="T433">④ ICMP </text:span><text:span text:style-name="T250">用來監控設備狀態　→　</text:span><text:span text:style-name="T20">✓ </text:span><text:span text:style-name="T42">ICMP </text:span><text:span text:style-name="T20">只診斷網路（</text:span><text:span text:style-name="T42">Ping</text:span><text:span text:style-name="T20">），監控設備是 </text:span><text:span text:style-name="T42">SNMP</text:span><text:span text:style-name="T20">。</text:span></text:p>
            <text:p text:style-name="P12"><text:span text:style-name="T433">⑤ ICMP </text:span><text:span text:style-name="T250">屬於 </text:span><text:span text:style-name="T433">Application Layer</text:span><text:span text:style-name="T250">　→　</text:span><text:span text:style-name="T20">✓ </text:span><text:span text:style-name="T42">ICMP </text:span><text:span text:style-name="T20">屬 </text:span><text:span text:style-name="T42">Network Layer</text:span><text:span text:style-name="T20">，</text:span><text:span text:style-name="T42">SNMP </text:span><text:span text:style-name="T20">才是 </text:span><text:span text:style-name="T42">Application Layer</text:span><text:span text:style-name="T20">。</text:span></text:p>
            <text:p text:style-name="P12"><text:span text:style-name="T433">⑥ IPS </text:span><text:span text:style-name="T250">就是防火牆　→　</text:span><text:span text:style-name="T20">✓ </text:span><text:span text:style-name="T42">Firewall </text:span><text:span text:style-name="T20">靜態過濾（規則），</text:span><text:span text:style-name="T42">IPS </text:span><text:span text:style-name="T20">動態偵測行為後阻擋，兩者不同。</text:span></text:p>
          </table:table-cell>
        </table:table-row>
      </table:table>
      <text:h text:style-name="P19" text:outline-level="3"><text:span text:style-name="T36">▍</text:span><text:span text:style-name="T37"> 10 </text:span><text:span text:style-name="T38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21" loext:marker-style-name="T634"><text:span text:style-name="T635">題目</text:span><text:span text:style-name="T634"/></text:p>
            </table:table-cell>
            <table:table-cell table:style-name="表格127.A1" office:value-type="string">
              <text:p text:style-name="P21" loext:marker-style-name="T634"><text:span text:style-name="T635">答案</text:span><text:span text:style-name="T634"/></text:p>
            </table:table-cell>
            <table:table-cell table:style-name="表格127.A1" office:value-type="string">
              <text:p text:style-name="P21" loext:marker-style-name="T634"><text:span text:style-name="T635">解析</text:span><text:span text:style-name="T634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20" loext:marker-style-name="T636"><text:span text:style-name="T637">Q1 </text:span><text:span text:style-name="T638">何者負責「過濾進出網路流量」？</text:span></text:p>
          </table:table-cell>
          <table:table-cell table:style-name="表格127.A2" office:value-type="string">
            <text:p text:style-name="P20" loext:marker-style-name="T636"><text:span text:style-name="T637">Firewall</text:span><text:span text:style-name="T636"/></text:p>
          </table:table-cell>
          <table:table-cell table:style-name="表格127.A2" office:value-type="string">
            <text:p text:style-name="P20" loext:marker-style-name="T636"><text:span text:style-name="T637">Firewall </text:span><text:span text:style-name="T638">是網路入口過濾工具，依規則決定放行。</text:span><text:span text:style-name="T637">IDS/IPS </text:span><text:span text:style-name="T638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36"><text:span text:style-name="T637">Q2 IDS </text:span><text:span text:style-name="T638">的主要功能為何？</text:span></text:p>
          </table:table-cell>
          <table:table-cell table:style-name="表格127.A3" office:value-type="string">
            <text:p text:style-name="P20" loext:marker-style-name="T636"><text:span text:style-name="T638">偵測並發出警報</text:span><text:span text:style-name="T636"/></text:p>
          </table:table-cell>
          <table:table-cell table:style-name="表格127.A3" office:value-type="string">
            <text:p text:style-name="P20" loext:marker-style-name="T636"><text:span text:style-name="T637">IDS </text:span><text:span text:style-name="T638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36"><text:span text:style-name="T637">Q3 IPS </text:span><text:span text:style-name="T638">與 </text:span><text:span text:style-name="T637">IDS </text:span><text:span text:style-name="T638">最大差別？</text:span></text:p>
          </table:table-cell>
          <table:table-cell table:style-name="表格127.A2" office:value-type="string">
            <text:p text:style-name="P20" loext:marker-style-name="T636"><text:span text:style-name="T637">IPS </text:span><text:span text:style-name="T638">會阻擋，</text:span><text:span text:style-name="T637">IDS </text:span><text:span text:style-name="T638">不會</text:span></text:p>
          </table:table-cell>
          <table:table-cell table:style-name="表格127.A2" office:value-type="string">
            <text:p text:style-name="P20" loext:marker-style-name="T636"><text:span text:style-name="T637">IPS = IDS </text:span><text:span text:style-name="T638">全功能 </text:span><text:span text:style-name="T637">+ </text:span><text:span text:style-name="T638">主動阻擋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36"><text:span text:style-name="T637">Q4 </text:span><text:span text:style-name="T638">何者屬「主機型入侵偵測」？</text:span></text:p>
          </table:table-cell>
          <table:table-cell table:style-name="表格127.A3" office:value-type="string">
            <text:p text:style-name="P20" loext:marker-style-name="T636"><text:span text:style-name="T637">HIDS</text:span><text:span text:style-name="T636"/></text:p>
          </table:table-cell>
          <table:table-cell table:style-name="表格127.A3" office:value-type="string">
            <text:p text:style-name="P20" loext:marker-style-name="T636"><text:span text:style-name="T637">HIDS </text:span><text:span text:style-name="T638">安裝於主機內部，監控 </text:span><text:span text:style-name="T637">Log </text:span><text:span text:style-name="T638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36"><text:span text:style-name="T637">Q5 NIDS </text:span><text:span text:style-name="T638">主要監控什麼？</text:span></text:p>
          </table:table-cell>
          <table:table-cell table:style-name="表格127.A2" office:value-type="string">
            <text:p text:style-name="P20" loext:marker-style-name="T636"><text:span text:style-name="T638">網路封包</text:span><text:span text:style-name="T636"/></text:p>
          </table:table-cell>
          <table:table-cell table:style-name="表格127.A2" office:value-type="string">
            <text:p text:style-name="P20" loext:marker-style-name="T636"><text:span text:style-name="T637">NIDS </text:span><text:span text:style-name="T638">部署在網路節點，分析封包流量；</text:span><text:span text:style-name="T637">HIDS </text:span><text:span text:style-name="T638">才看 </text:span><text:span text:style-name="T637">Log</text:span><text:span text:style-name="T638">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36"><text:span text:style-name="T637">Q6 SNMP </text:span><text:span text:style-name="T638">的主要用途？</text:span></text:p>
          </table:table-cell>
          <table:table-cell table:style-name="表格127.A3" office:value-type="string">
            <text:p text:style-name="P20" loext:marker-style-name="T636"><text:span text:style-name="T638">管理網路設備</text:span><text:span text:style-name="T636"/></text:p>
          </table:table-cell>
          <table:table-cell table:style-name="表格127.A3" office:value-type="string">
            <text:p text:style-name="P20" loext:marker-style-name="T636"><text:span text:style-name="T637">SNMP </text:span><text:span text:style-name="T638">監控與管理路由器、交換器狀態（</text:span><text:span text:style-name="T637">CPU</text:span><text:span text:style-name="T638">、流量）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36"><text:span text:style-name="T637">Q7 ICMP </text:span><text:span text:style-name="T638">常用於哪種工具？</text:span></text:p>
          </table:table-cell>
          <table:table-cell table:style-name="表格127.A2" office:value-type="string">
            <text:p text:style-name="P20" loext:marker-style-name="T636"><text:span text:style-name="T637">Ping</text:span><text:span text:style-name="T636"/></text:p>
          </table:table-cell>
          <table:table-cell table:style-name="表格127.A2" office:value-type="string">
            <text:p text:style-name="P20" loext:marker-style-name="T636"><text:span text:style-name="T637">Ping </text:span><text:span text:style-name="T638">與 </text:span><text:span text:style-name="T637">Traceroute </text:span><text:span text:style-name="T638">都用 </text:span><text:span text:style-name="T637">ICMP </text:span><text:span text:style-name="T638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36"><text:span text:style-name="T637">Q8 ICMP </text:span><text:span text:style-name="T638">屬 </text:span><text:span text:style-name="T637">OSI </text:span><text:span text:style-name="T638">哪一層？</text:span></text:p>
          </table:table-cell>
          <table:table-cell table:style-name="表格127.A3" office:value-type="string">
            <text:p text:style-name="P20" loext:marker-style-name="T636"><text:span text:style-name="T637">Network Layer</text:span><text:span text:style-name="T636"/></text:p>
          </table:table-cell>
          <table:table-cell table:style-name="表格127.A3" office:value-type="string">
            <text:p text:style-name="P20" loext:marker-style-name="T636"><text:span text:style-name="T637">ICMP </text:span><text:span text:style-name="T638">是 </text:span><text:span text:style-name="T637">IP </text:span><text:span text:style-name="T638">的附屬協定，屬網路層；</text:span><text:span text:style-name="T637">SNMP </text:span><text:span text:style-name="T638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36"><text:span text:style-name="T637">Q9 </text:span><text:span text:style-name="T638">何者用 </text:span><text:span text:style-name="T637">UDP </text:span><text:span text:style-name="T638">且屬應用層？</text:span></text:p>
          </table:table-cell>
          <table:table-cell table:style-name="表格127.A2" office:value-type="string">
            <text:p text:style-name="P20" loext:marker-style-name="T636"><text:span text:style-name="T637">SNMP</text:span><text:span text:style-name="T636"/></text:p>
          </table:table-cell>
          <table:table-cell table:style-name="表格127.A2" office:value-type="string">
            <text:p text:style-name="P20" loext:marker-style-name="T636"><text:span text:style-name="T637">SNMP </text:span><text:span text:style-name="T638">用 </text:span><text:span text:style-name="T637">UDP</text:span><text:span text:style-name="T638">、屬應用層；</text:span><text:span text:style-name="T637">ICMP </text:span><text:span text:style-name="T638">是網路層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36"><text:span text:style-name="T637">Q10 </text:span><text:span text:style-name="T638">下列何者正確？</text:span></text:p>
          </table:table-cell>
          <table:table-cell table:style-name="表格127.A3" office:value-type="string">
            <text:p text:style-name="P20" loext:marker-style-name="T636"><text:span text:style-name="T637">SNMP </text:span><text:span text:style-name="T638">用於設備管理</text:span></text:p>
          </table:table-cell>
          <table:table-cell table:style-name="表格127.A3" office:value-type="string">
            <text:p text:style-name="P20" loext:marker-style-name="T636"><text:span text:style-name="T637">IDS </text:span><text:span text:style-name="T638">不阻擋；</text:span><text:span text:style-name="T637">Firewall </text:span><text:span text:style-name="T638">不做行為分析；</text:span><text:span text:style-name="T637">ICMP </text:span><text:span text:style-name="T638">只做網路診斷。</text:span></text:p>
          </table:table-cell>
        </table:table-row>
      </table:table>
      <text:h text:style-name="P18" text:outline-level="2" loext:marker-style-name="T34"><text:span text:style-name="T35">肆、企業資訊安全：預防 → 偵測 → 復原</text:span><text:span text:style-name="T34"/></text:h>
      <text:p text:style-name="P22" loext:marker-style-name="T21"><text:span text:style-name="T20">企業資訊系統（官網、資料庫、公文</text:span><text:span text:style-name="T42">/</text:span><text:span text:style-name="T20">健保</text:span><text:span text:style-name="T42">/</text:span><text:span text:style-name="T20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ext:soft-page-break/>
          <table:table-row table:style-name="表格128.1">
            <table:table-cell table:style-name="表格128.A1" office:value-type="string">
              <text:p text:style-name="P21" loext:marker-style-name="T104"><text:span text:style-name="T105">三大核心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目標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做法</text:span><text:span text:style-name="T104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20" loext:marker-style-name="T106"><text:span text:style-name="T108">① </text:span><text:span text:style-name="T109">事前預防</text:span></text:p>
          </table:table-cell>
          <table:table-cell table:style-name="表格128.A2" office:value-type="string">
            <text:p text:style-name="P20" loext:marker-style-name="T106"><text:span text:style-name="T109">讓壞事不要發生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設密碼、</text:span><text:span text:style-name="T108">MFA</text:span><text:span text:style-name="T109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20" loext:marker-style-name="T106"><text:span text:style-name="T108">② </text:span><text:span text:style-name="T109">事中偵測</text:span></text:p>
          </table:table-cell>
          <table:table-cell table:style-name="表格128.A3" office:value-type="string">
            <text:p text:style-name="P20" loext:marker-style-name="T106"><text:span text:style-name="T109">出事時盡快發現</text:span><text:span text:style-name="T106"/></text:p>
          </table:table-cell>
          <table:table-cell table:style-name="表格128.A3" office:value-type="string">
            <text:p text:style-name="P20" loext:marker-style-name="T106"><text:span text:style-name="T109">偵測異常登入、流量、病毒警報（</text:span><text:span text:style-name="T108">IDS/IPS/NGFW/EDR/MDR</text:span><text:span text:style-name="T109">）</text:span></text:p>
          </table:table-cell>
        </table:table-row>
        <table:table-row table:style-name="表格128.1">
          <table:table-cell table:style-name="表格128.A2" office:value-type="string">
            <text:p text:style-name="P20" loext:marker-style-name="T106"><text:span text:style-name="T108">③ </text:span><text:span text:style-name="T109">事後復原</text:span></text:p>
          </table:table-cell>
          <table:table-cell table:style-name="表格128.A2" office:value-type="string">
            <text:p text:style-name="P20" loext:marker-style-name="T106"><text:span text:style-name="T109">壞掉後快速救回來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備份還原、啟動備援系統、災難復原（</text:span><text:span text:style-name="T108">BCP</text:span><text:span text:style-name="T109">、</text:span><text:span text:style-name="T108">RTO/RPO</text:span><text:span text:style-name="T109">）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事前預防：</text:span><text:span text:style-name="T37">MFA</text:span><text:span text:style-name="T38">（多因素驗證）</text:span></text:h>
      <text:p text:style-name="P22" loext:marker-style-name="T21"><text:span text:style-name="T42">MFA = Multi-Factor Authentication</text:span><text:span text:style-name="T20">。登入帳號時不只輸入密碼，還要再驗證一次身份：手機簡訊驗證碼、</text:span><text:span text:style-name="T42">Google Authenticator </text:span><text:span text:style-name="T20">動態碼、指紋或臉部辨識。為什麼要 </text:span><text:span text:style-name="T42">MFA</text:span><text:span text:style-name="T20">？即使駭客知道你的密碼，沒有你的手機或指紋，也無法登入。</text:span></text:p>
      <text:h text:style-name="P19" text:outline-level="3"><text:span text:style-name="T36">▍</text:span><text:span text:style-name="T37"> </text:span><text:span text:style-name="T38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21" loext:marker-style-name="T104"><text:span text:style-name="T105">工具</text:span><text:span text:style-name="T104"/></text:p>
            </table:table-cell>
            <table:table-cell table:style-name="表格129.A1" office:value-type="string">
              <text:p text:style-name="P21" loext:marker-style-name="T104"><text:span text:style-name="T105">全名 </text:span><text:span text:style-name="T161">/ </text:span><text:span text:style-name="T105">說明</text:span></text:p>
            </table:table-cell>
            <table:table-cell table:style-name="表格129.A1" office:value-type="string">
              <text:p text:style-name="P21" loext:marker-style-name="T104"><text:span text:style-name="T105">會阻擋？</text:span><text:span text:style-name="T104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控制誰能進出網路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NGFW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次世代防火牆，能辨識應用層威脅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IDS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入侵偵測系統，發現異常就發警報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✘ </text:span><text:span text:style-name="T109">不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IPS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入侵防禦系統，發現異常直接阻擋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EDR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Endpoint Detection &amp; Response</text:span><text:span text:style-name="T109">，監控每台電腦行為</text:span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MDR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Managed D&amp;R</text:span><text:span text:style-name="T109">，委外資安監控服務（</text:span><text:span text:style-name="T108">24 </text:span><text:span text:style-name="T109">小時）</text:span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7">🏠 <text:s/></text:span><text:span text:style-name="T30">比喻幫你秒懂（公司＝大樓）</text:span></text:p>
            <text:p text:style-name="P11" loext:marker-style-name="T21"><text:span text:style-name="T20">防火牆＝社區大門警衛；</text:span><text:span text:style-name="T42">NGFW</text:span><text:span text:style-name="T20">＝更聰明的警衛（還會看你帶什麼東西進來）；</text:span><text:span text:style-name="T42">IDS</text:span><text:span text:style-name="T20">＝監視器警報（只會叫，不會阻止）；</text:span><text:span text:style-name="T42">IPS</text:span><text:span text:style-name="T20">＝保全（直接壓制壞人）；</text:span><text:span text:style-name="T42">EDR</text:span><text:span text:style-name="T20">＝每個房間都裝攝影機（監控每台電腦</text:span><text:span text:style-name="T42">/</text:span><text:span text:style-name="T20">程式）；</text:span><text:span text:style-name="T42">MDR</text:span><text:span text:style-name="T20">＝把保全工作委外給專業公司 </text:span><text:span text:style-name="T42">24 </text:span><text:span text:style-name="T20">小時監控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事後復原：備份、</text:span><text:span text:style-name="T37">RTO / RPO</text:span><text:span text:style-name="T38">、</text:span><text:span text:style-name="T37">BCP</text:span></text:h>
      <text:p text:style-name="P22" loext:marker-style-name="T21"><text:span text:style-name="T20">當資料損毀或遭加密（如勒索病毒），可透過備份救回。最佳實踐：本地備份 </text:span><text:span text:style-name="T42">+ </text:span><text:span text:style-name="T20">異地備份（台北機房同步到高雄機房）；定期測試「備份能否真的還原」；雲端備份（</text:span><text:span text:style-name="T42">AWS/Azure/GCP</text:span><text:span text:style-name="T20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21" loext:marker-style-name="T104"><text:span text:style-name="T105">指標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全名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問什麼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範例</text:span><text:span text:style-name="T104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20" loext:marker-style-name="T106"><text:span text:style-name="T108">RTO</text:span><text:span text:style-name="T106"/></text:p>
          </table:table-cell>
          <table:table-cell table:style-name="表格130.A2" office:value-type="string">
            <text:p text:style-name="P20" loext:marker-style-name="T106"><text:span text:style-name="T108">Recovery Time Objective </text:span><text:span text:style-name="T109">復原時間目標</text:span></text:p>
          </table:table-cell>
          <table:table-cell table:style-name="表格130.A2" office:value-type="string">
            <text:p text:style-name="P20" loext:marker-style-name="T106"><text:span text:style-name="T109">系統出問題後，最多能停多久？</text:span><text:span text:style-name="T106"/></text:p>
          </table:table-cell>
          <table:table-cell table:style-name="表格130.A2" office:value-type="string">
            <text:p text:style-name="P20" loext:marker-style-name="T106"><text:span text:style-name="T109">銀行 </text:span><text:span text:style-name="T108">RTO 10 </text:span><text:span text:style-name="T109">分鐘；學校網站 </text:span><text:span text:style-name="T108">RTO </text:span><text:span text:style-name="T109">半天</text:span></text:p>
          </table:table-cell>
        </table:table-row>
        <table:table-row table:style-name="表格130.1">
          <table:table-cell table:style-name="表格130.A3" office:value-type="string">
            <text:p text:style-name="P20" loext:marker-style-name="T106"><text:span text:style-name="T108">RPO</text:span><text:span text:style-name="T106"/></text:p>
          </table:table-cell>
          <table:table-cell table:style-name="表格130.A3" office:value-type="string">
            <text:p text:style-name="P20" loext:marker-style-name="T106"><text:span text:style-name="T108">Recovery Point Objective </text:span><text:span text:style-name="T109">復原點目標</text:span></text:p>
          </table:table-cell>
          <table:table-cell table:style-name="表格130.A3" office:value-type="string">
            <text:p text:style-name="P20" loext:marker-style-name="T106"><text:span text:style-name="T109">最多能接受丟失幾小時的資料？</text:span><text:span text:style-name="T106"/></text:p>
          </table:table-cell>
          <table:table-cell table:style-name="表格130.A3" office:value-type="string">
            <text:p text:style-name="P20" loext:marker-style-name="T106"><text:span text:style-name="T109">銀行 </text:span><text:span text:style-name="T108">RPO </text:span><text:span text:style-name="T109">接近 </text:span><text:span text:style-name="T108">0</text:span><text:span text:style-name="T109">；一般公司 </text:span><text:span text:style-name="T108">RPO 24 </text:span><text:span text:style-name="T109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7">⏱ <text:s/></text:span><text:span text:style-name="T166">一句話記憶法</text:span></text:p>
            <text:p text:style-name="P11"><text:span text:style-name="T167">RTO = </text:span><text:span text:style-name="T168">停機時間</text:span><text:span text:style-name="T20">（能停多久？）　</text:span><text:span text:style-name="T167">RPO = </text:span><text:span text:style-name="T168">資料損失量</text:span><text:span text:style-name="T20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7">🏢 <text:s/></text:span><text:span text:style-name="T31">BCP</text:span><text:span text:style-name="T30">：公司炸掉了還能繼續運作嗎？</text:span></text:p>
            <text:p text:style-name="P11" loext:marker-style-name="T21"><text:span text:style-name="T42">BCP = Business Continuity Planning</text:span><text:span text:style-name="T20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SSDLC</text:span><text:span text:style-name="T38">：軟體開發的每個階段都加入資安</text:span></text:h>
      <text:p text:style-name="P22" loext:marker-style-name="T21"><text:span text:style-name="T42">SSDLC = Security Software Development Life Cycle</text:span><text:span text:style-name="T20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ext:soft-page-break/>
          <table:table-row table:style-name="表格131.1">
            <table:table-cell table:style-name="表格131.A1" office:value-type="string">
              <text:p text:style-name="P21" loext:marker-style-name="T104"><text:span text:style-name="T105">階段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英文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做什麼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資安重點</text:span><text:span text:style-name="T104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20" loext:marker-style-name="T106"><text:span text:style-name="T108">① </text:span><text:span text:style-name="T109">定義</text:span></text:p>
          </table:table-cell>
          <table:table-cell table:style-name="表格131.A2" office:value-type="string">
            <text:p text:style-name="P20" loext:marker-style-name="T106"><text:span text:style-name="T108">Define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需求與範圍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列出安全需求（需要登入驗證嗎？）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② </text:span><text:span text:style-name="T109">設計</text:span></text:p>
          </table:table-cell>
          <table:table-cell table:style-name="表格131.A3" office:value-type="string">
            <text:p text:style-name="P20" loext:marker-style-name="T106"><text:span text:style-name="T108">Desig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設計系統架構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規劃權限控管、密碼加密、防 </text:span><text:span text:style-name="T108">SQL Injection</text:span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③ </text:span><text:span text:style-name="T109">開發</text:span></text:p>
          </table:table-cell>
          <table:table-cell table:style-name="表格131.A2" office:value-type="string">
            <text:p text:style-name="P20" loext:marker-style-name="T106"><text:span text:style-name="T108">Develop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工程師寫程式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遵守安全編碼規範，不寫危險程式碼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④ </text:span><text:span text:style-name="T109">測試</text:span></text:p>
          </table:table-cell>
          <table:table-cell table:style-name="表格131.A3" office:value-type="string">
            <text:p text:style-name="P20" loext:marker-style-name="T106"><text:span text:style-name="T108">Test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測試功能與安全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弱點掃描、滲透測試，找出漏洞</text:span><text:span text:style-name="T106"/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⑤ </text:span><text:span text:style-name="T109">上線</text:span></text:p>
          </table:table-cell>
          <table:table-cell table:style-name="表格131.A2" office:value-type="string">
            <text:p text:style-name="P20" loext:marker-style-name="T106"><text:span text:style-name="T108">Deploy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正式發布系統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設定沒疏漏，最小權限原則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⑥ </text:span><text:span text:style-name="T109">維護</text:span></text:p>
          </table:table-cell>
          <table:table-cell table:style-name="表格131.A3" office:value-type="string">
            <text:p text:style-name="P20" loext:marker-style-name="T106"><text:span text:style-name="T108">Maintai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持續監控與更新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定期更新修補，監控異常行為</text:span><text:span text:style-name="T106"/>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7">🔑 <text:s/></text:span><text:span text:style-name="T39">SSDLC </text:span><text:span text:style-name="T38">核心</text:span></text:p>
            <text:p text:style-name="P11" loext:marker-style-name="T21"><text:span text:style-name="T20">核心精神「左移（</text:span><text:span text:style-name="T42">Shift Left</text:span><text:span text:style-name="T20">）」——把資安工作從最後一步，往前移到設計和開發階段。越早發現漏洞，修復成本越低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ISO 27001</text:span><text:span text:style-name="T38">：用制度管理資安</text:span></text:h>
      <text:p text:style-name="P22" loext:marker-style-name="T21"><text:span text:style-name="T42">ISO 27001 </text:span><text:span text:style-name="T20">是國際公認的資安管理制度標準，建立的制度稱為 </text:span><text:span text:style-name="T42">ISMS</text:span><text:span text:style-name="T20">（</text:span><text:span text:style-name="T42">Information Security Management System</text:span><text:span text:style-name="T20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21" loext:marker-style-name="T104"><text:span text:style-name="T105">四個面向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管什麼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例子</text:span><text:span text:style-name="T104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20" loext:marker-style-name="T106"><text:span text:style-name="T109">人（</text:span><text:span text:style-name="T108">People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管理人員的行為與責任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員工教育訓練、離職員工帳號立即停用、權限最小化</text:span><text:span text:style-name="T106"/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技術（</text:span><text:span text:style-name="T108">Technology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使用適當的安全技術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防火牆、</text:span><text:span text:style-name="T108">MFA</text:span><text:span text:style-name="T109">、資料加密、</text:span><text:span text:style-name="T108">EDR</text:span></text:p>
          </table:table-cell>
        </table:table-row>
        <table:table-row table:style-name="表格132.1">
          <table:table-cell table:style-name="表格132.A2" office:value-type="string">
            <text:p text:style-name="P20" loext:marker-style-name="T106"><text:span text:style-name="T109">組織（</text:span><text:span text:style-name="T108">Organization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建立流程與管理制度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資安政策、</text:span><text:span text:style-name="T108">SOP</text:span><text:span text:style-name="T109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實體（</text:span><text:span text:style-name="T108">Physical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保護實體環境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機房門禁、監視器、防止未授權人員進入</text:span><text:span text:style-name="T106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7">🌟 <text:s/></text:span><text:span text:style-name="T166">考試必背三句話</text:span></text:p>
            <text:p text:style-name="P11" loext:marker-style-name="T21"><text:span text:style-name="T42">1. </text:span><text:span text:style-name="T20">資安三階段：事前預防 → 事中偵測 → 事後復原。</text:span></text:p>
            <text:p text:style-name="P12" loext:marker-style-name="T21"><text:span text:style-name="T42">2. SSDLC</text:span><text:span text:style-name="T20">：六階段（</text:span><text:span text:style-name="T42">Define→Design→Develop→Test→Deploy→Maintain</text:span><text:span text:style-name="T20">）都加入資安。</text:span></text:p>
            <text:p text:style-name="P12" loext:marker-style-name="T21"><text:span text:style-name="T42">3. ISO 27001</text:span><text:span text:style-name="T20">：用 </text:span><text:span text:style-name="T42">ISMS </text:span><text:span text:style-name="T20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進階防禦：</text:span><text:span text:style-name="T34">EDR · MDR · MITRE ATT&amp;CK · </text:span><text:span text:style-name="T35">數位韌性</text:span></text:h>
      <text:p text:style-name="P22" loext:marker-style-name="T21"><text:span text:style-name="T20">現代駭客不一定放病毒，而是偷登入帳號偽裝成正常使用者、長期潛伏、利用合法工具發動攻擊。因此資安核心已從「防毒」轉向「持續監控電腦行為，即時偵測並快速應變」。</text:span><text:span text:style-name="T21"/></text:p>
      <text:h text:style-name="P19" text:outline-level="3"><text:span text:style-name="T36">▍</text:span><text:span text:style-name="T37"> EDR — </text:span><text:span text:style-name="T38">自己監控的資安工具</text:span></text:h>
      <text:p text:style-name="P22" loext:marker-style-name="T21"><text:span text:style-name="T42">EDR = Endpoint Detection and Response</text:span><text:span text:style-name="T20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 loext:marker-style-name="T12"><text:span text:style-name="T13">三大偵測範圍</text:span><text:span text:style-name="T12"/></text:p>
            </table:table-cell>
            <table:table-cell table:style-name="表格133.A1" office:value-type="string">
              <text:p text:style-name="P7" loext:marker-style-name="T12"><text:span text:style-name="T13">三大回應動作</text:span><text:span text:style-name="T12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0" loext:marker-style-name="T14"><text:span text:style-name="T15">檔案行為：大量加密</text:span><text:span text:style-name="T16">/</text:span><text:span text:style-name="T15">修改系統檔案 → 可能勒索病毒｜程式行為：</text:span><text:span text:style-name="T16">Office </text:span><text:span text:style-name="T15">偷偷開命令列 → 明顯異常｜網路行為：突然連線境外 </text:span><text:span text:style-name="T16">IP → </text:span><text:span text:style-name="T15">可能已遭入侵</text:span></text:p>
          </table:table-cell>
          <table:table-cell table:style-name="表格133.A2" office:value-type="string">
            <text:p text:style-name="P20" loext:marker-style-name="T14"><text:span text:style-name="T15">中斷程序：立即殺掉可疑惡意程式｜隔離主機：切斷該電腦與內網連線，防擴散｜封鎖連線：禁止與駭客伺服器通訊</text:span><text:span text:style-name="T14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EDR </text:span><text:span text:style-name="T20">是「買工具、自己守」。企業需要有內部資安人員負責查看警報並處理事件。</text:span></text:p>
          </table:table-cell>
          <table:covered-table-cell/>
        </table:table-row>
      </table:table>
      <text:h text:style-name="P19" text:outline-level="3"><text:soft-page-break/><text:span text:style-name="T36">▍</text:span><text:span text:style-name="T37"> MDR — </text:span><text:span text:style-name="T38">委外的資安託管服務</text:span></text:h>
      <text:p text:style-name="P22" loext:marker-style-name="T21"><text:span text:style-name="T42">MDR = Managed Detection and Response</text:span><text:span text:style-name="T20">。重點在「</text:span><text:span text:style-name="T42">Managed</text:span><text:span text:style-name="T20">（託管）」——你不需要自己有資安團隊，直接花錢請外部資安公司 </text:span><text:span text:style-name="T42">24 </text:span><text:span text:style-name="T20">小時幫你守。服務包含 </text:span><text:span text:style-name="T42">SOC</text:span><text:span text:style-name="T20">（資安監控中心，專業人員 </text:span><text:span text:style-name="T42">24 </text:span><text:span text:style-name="T20">小時盯著）、</text:span><text:span text:style-name="T42">IDS</text:span><text:span text:style-name="T20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EDR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MDR</text:span><text:span text:style-name="T12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0" loext:marker-style-name="T14"><text:span text:style-name="T15">管理方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自行管理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委外管理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監控時間</text:span><text:span text:style-name="T14"/></text:p>
          </table:table-cell>
          <table:table-cell table:style-name="表格134.A3" office:value-type="string">
            <text:p text:style-name="P20" loext:marker-style-name="T14"><text:span text:style-name="T15">視團隊而定</text:span><text:span text:style-name="T14"/></text:p>
          </table:table-cell>
          <table:table-cell table:style-name="表格134.A3" office:value-type="string">
            <text:p text:style-name="P20" loext:marker-style-name="T14"><text:span text:style-name="T16">24 / 7 </text:span><text:span text:style-name="T15">全天</text:span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所需能力</text:span><text:span text:style-name="T14"/></text:p>
          </table:table-cell>
          <table:table-cell table:style-name="表格134.A2" office:value-type="string">
            <text:p text:style-name="P20" loext:marker-style-name="T14"><text:span text:style-name="T15">需內部資安人員</text:span><text:span text:style-name="T14"/></text:p>
          </table:table-cell>
          <table:table-cell table:style-name="表格134.A2" office:value-type="string">
            <text:p text:style-name="P20" loext:marker-style-name="T14"><text:span text:style-name="T15">無須自建團隊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適合對象</text:span><text:span text:style-name="T14"/></text:p>
          </table:table-cell>
          <table:table-cell table:style-name="表格134.A3" office:value-type="string">
            <text:p text:style-name="P20" loext:marker-style-name="T14"><text:span text:style-name="T15">大型企業</text:span><text:span text:style-name="T14"/></text:p>
          </table:table-cell>
          <table:table-cell table:style-name="表格134.A3" office:value-type="string">
            <text:p text:style-name="P20" loext:marker-style-name="T14"><text:span text:style-name="T15">中小企業</text:span><text:span text:style-name="T14"/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成本模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工具費 </text:span><text:span text:style-name="T16">+ </text:span><text:span text:style-name="T15">人力</text:span></text:p>
          </table:table-cell>
          <table:table-cell table:style-name="表格134.A2" office:value-type="string">
            <text:p text:style-name="P20" loext:marker-style-name="T14"><text:span text:style-name="T15">月費 </text:span><text:span text:style-name="T16">/ </text:span><text:span text:style-name="T15">年費訂閱</text:span></text:p>
          </table:table-cell>
        </table:table-row>
      </table:table>
      <text:h text:style-name="P19" text:outline-level="3"><text:span text:style-name="T36">▍</text:span><text:span text:style-name="T37"> MITRE ATT&amp;CK — </text:span><text:span text:style-name="T38">駭客招式大全</text:span></text:h>
      <text:p text:style-name="P22" loext:marker-style-name="T21"><text:span text:style-name="T20">資安界發現駭客攻擊模式相當固定（寄釣魚信→偷帳號→開後門→橫向移動→竊取資料）。</text:span><text:span text:style-name="T42">MITRE </text:span><text:span text:style-name="T20">公司將所有已知駭客手法整理成全球通用的知識庫，稱為 </text:span><text:span text:style-name="T42">MITRE ATT&amp;CK</text:span><text:span text:style-name="T20">（</text:span><text:span text:style-name="T42">Adversarial Tactics, Techniques, and Common Knowledge</text:span><text:span text:style-name="T20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21" loext:marker-style-name="T104"><text:span text:style-name="T161">TTP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05">意義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61">ATT&amp;CK </text:span><text:span text:style-name="T105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20" loext:marker-style-name="T106"><text:span text:style-name="T108">T - Tactic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戰術（攻擊目的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威脅分析：快速定性事件性質</text:span><text:span text:style-name="T106"/></text:p>
          </table:table-cell>
        </table:table-row>
        <table:table-row table:style-name="表格135.1">
          <table:table-cell table:style-name="表格135.A3" office:value-type="string">
            <text:p text:style-name="P20" loext:marker-style-name="T106"><text:span text:style-name="T108">T - Techniques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技術（使用方法）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防禦對應：針對常見手法加強監控</text:span><text:span text:style-name="T106"/></text:p>
          </table:table-cell>
        </table:table-row>
        <table:table-row table:style-name="表格135.1">
          <table:table-cell table:style-name="表格135.A2" office:value-type="string">
            <text:p text:style-name="P20" loext:marker-style-name="T106"><text:span text:style-name="T108">P - Procedure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流程（實際操作步驟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主動防禦：預測下一步，提前部署</text:span><text:span text:style-name="T106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ATT&amp;CK </text:span><text:span text:style-name="T20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數位韌性（</text:span><text:span text:style-name="T37">Digital Resilience</text:span><text:span text:style-name="T38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 loext:marker-style-name="T12"><text:span text:style-name="T43">❌ </text:span><text:span text:style-name="T13">以前的想法</text:span></text:p>
            </table:table-cell>
            <table:table-cell table:style-name="表格136.A1" office:value-type="string">
              <text:p text:style-name="P7" loext:marker-style-name="T12"><text:span text:style-name="T43">✅ </text:span><text:span text:style-name="T13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0" loext:marker-style-name="T14"><text:span text:style-name="T15">「不能被攻擊」——重點：阻止所有入侵。</text:span><text:span text:style-name="T14"/></text:p>
          </table:table-cell>
          <table:table-cell table:style-name="表格136.A2" office:value-type="string">
            <text:p text:style-name="P20" loext:marker-style-name="T14"><text:span text:style-name="T15">「被打了還能撐住並快速恢復」——重點：強化復原能力。</text:span><text:span text:style-name="T14"/></text:p>
          </table:table-cell>
        </table:table-row>
      </table:table>
      <text:p text:style-name="P22" loext:marker-style-name="T172"><text:span text:style-name="T174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72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7">📝 <text:s/></text:span><text:span text:style-name="T166">一行記憶法</text:span></text:p>
            <text:p text:style-name="P11"><text:span text:style-name="T167">🛡 EDR → </text:span><text:span text:style-name="T20">自己買工具守　</text:span><text:span text:style-name="T168">👥 </text:span><text:span text:style-name="T167">MDR → </text:span><text:span text:style-name="T20">請公司幫你守</text:span></text:p>
            <text:p text:style-name="P12"><text:span text:style-name="T167">📖 ATT&amp;CK → </text:span><text:span text:style-name="T20">駭客招式教材　</text:span><text:span text:style-name="T168">💪 韌性 → </text:span><text:span text:style-name="T20">撐住、快速復原</text:span></text:p>
          </table:table-cell>
        </table:table-row>
      </table:table>
      <text:h text:style-name="P18" text:outline-level="2" loext:marker-style-name="T34"><text:span text:style-name="T35">陸、</text:span><text:span text:style-name="T34">Zero Trust </text:span><text:span text:style-name="T35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7">📋 <text:s/></text:span><text:span text:style-name="T80">內容審查說明</text:span></text:p>
            <text:p text:style-name="P11" loext:marker-style-name="T21"><text:span text:style-name="T20">文中「三要素（身份</text:span><text:span text:style-name="T42">/</text:span><text:span text:style-name="T20">設備</text:span><text:span text:style-name="T42">/</text:span><text:span text:style-name="T20">情境）」源自 </text:span><text:span text:style-name="T42">Microsoft </text:span><text:span text:style-name="T20">的 </text:span><text:span text:style-name="T42">Zero Trust </text:span><text:span text:style-name="T20">簡化說法；</text:span><text:span text:style-name="T42">NIST SP 800-207 </text:span><text:span text:style-name="T20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22" loext:marker-style-name="T21"><text:span text:style-name="T20">傳統企業網路以「邊界防護」為核心，邊界之內的人員與設備幾乎被預設為可信任（城堡思維）。</text:span><text:span text:style-name="T42">Zero Trust </text:span><text:span text:style-name="T20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ext:soft-page-break/>
          <table:table-row table:style-name="表格139.1">
            <table:table-cell table:style-name="表格139.A1" office:value-type="string">
              <text:p text:style-name="P21"/>
            </table:table-cell>
            <table:table-cell table:style-name="表格139.A1" office:value-type="string">
              <text:p text:style-name="P21" loext:marker-style-name="T12"><text:span text:style-name="T13">傳統（城堡思維）</text:span><text:span text:style-name="T12"/></text:p>
            </table:table-cell>
            <table:table-cell table:style-name="表格139.A1" office:value-type="string">
              <text:p text:style-name="P21" loext:marker-style-name="T12"><text:span text:style-name="T43">Zero Trust</text:span><text:span text:style-name="T12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0" loext:marker-style-name="T14"><text:span text:style-name="T15">核心假設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內網 </text:span><text:span text:style-name="T16">= </text:span><text:span text:style-name="T15">可信任</text:span></text:p>
          </table:table-cell>
          <table:table-cell table:style-name="表格139.A2" office:value-type="string">
            <text:p text:style-name="P20" loext:marker-style-name="T14"><text:span text:style-name="T15">任何人都需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防護重點</text:span><text:span text:style-name="T14"/></text:p>
          </table:table-cell>
          <table:table-cell table:style-name="表格139.A3" office:value-type="string">
            <text:p text:style-name="P20" loext:marker-style-name="T14"><text:span text:style-name="T15">網路邊界 </text:span><text:span text:style-name="T16">/ </text:span><text:span text:style-name="T15">防火牆</text:span></text:p>
          </table:table-cell>
          <table:table-cell table:style-name="表格139.A3" office:value-type="string">
            <text:p text:style-name="P20" loext:marker-style-name="T14"><text:span text:style-name="T15">身份 </text:span><text:span text:style-name="T16">× </text:span><text:span text:style-name="T15">設備 </text:span><text:span text:style-name="T16">× </text:span><text:span text:style-name="T15">情境</text:span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登入之後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幾乎不再驗證</text:span><text:span text:style-name="T14"/></text:p>
          </table:table-cell>
          <table:table-cell table:style-name="表格139.A2" office:value-type="string">
            <text:p text:style-name="P20" loext:marker-style-name="T14"><text:span text:style-name="T15">每個操作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駭客入侵後</text:span><text:span text:style-name="T14"/></text:p>
          </table:table-cell>
          <table:table-cell table:style-name="表格139.A3" office:value-type="string">
            <text:p text:style-name="P20" loext:marker-style-name="T14"><text:span text:style-name="T15">可橫向移動整個內網</text:span><text:span text:style-name="T14"/></text:p>
          </table:table-cell>
          <table:table-cell table:style-name="表格139.A3" office:value-type="string">
            <text:p text:style-name="P20" loext:marker-style-name="T14"><text:span text:style-name="T15">被微分段限制，難以擴散</text:span><text:span text:style-name="T14"/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適合時代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固定辦公室 </text:span><text:span text:style-name="T16">/ </text:span><text:span text:style-name="T15">單一內網</text:span></text:p>
          </table:table-cell>
          <table:table-cell table:style-name="表格139.A2" office:value-type="string">
            <text:p text:style-name="P20" loext:marker-style-name="T14"><text:span text:style-name="T16">Cloud / </text:span><text:span text:style-name="T15">遠端 </text:span><text:span text:style-name="T16">/ </text:span><text:span text:style-name="T15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7">🔑 <text:s/></text:span><text:span text:style-name="T166">核心一句話</text:span></text:p>
            <text:p text:style-name="P11" loext:marker-style-name="T323"><text:span text:style-name="T167">❝ </text:span><text:span text:style-name="T168">永不信任，始終驗證 ❞（</text:span><text:span text:style-name="T167">Never Trust, Always Verify</text:span><text:span text:style-name="T168">）</text:span></text:p>
            <text:p text:style-name="P12" loext:marker-style-name="T21"><text:span text:style-name="T20">無論使用者身處公司內網或外部網路，無論設備是否為公司配發，系統都不會因為「位置」就直接信任，而是透過多重機制持續確認安全性。</text:span><text:span text:style-name="T21"/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三大核心支柱：人 </text:span><text:span text:style-name="T37">· </text:span><text:span text:style-name="T38">機 </text:span><text:span text:style-name="T37">· </text:span><text:span text:style-name="T38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21" loext:marker-style-name="T104"><text:span text:style-name="T105">支柱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口訣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具體內容</text:span><text:span text:style-name="T104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20" loext:marker-style-name="T106"><text:span text:style-name="T108">🔑 Identity</text:span><text:span text:style-name="T109">（身份驗證）</text:span></text:p>
          </table:table-cell>
          <table:table-cell table:style-name="表格140.A2" office:value-type="string">
            <text:p text:style-name="P20" loext:marker-style-name="T106"><text:span text:style-name="T109">人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確認使用者是本人：帳密、</text:span><text:span text:style-name="T108">MFA</text:span><text:span text:style-name="T109">（手機 </text:span><text:span text:style-name="T108">OTP</text:span><text:span text:style-name="T109">、指紋）、</text:span><text:span text:style-name="T108">IAM </text:span><text:span text:style-name="T109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20" loext:marker-style-name="T106"><text:span text:style-name="T108">💻 Device</text:span><text:span text:style-name="T109">（設備健康）</text:span></text:p>
          </table:table-cell>
          <table:table-cell table:style-name="表格140.A3" office:value-type="string">
            <text:p text:style-name="P20" loext:marker-style-name="T106"><text:span text:style-name="T109">機</text:span><text:span text:style-name="T106"/></text:p>
          </table:table-cell>
          <table:table-cell table:style-name="表格140.A3" office:value-type="string">
            <text:p text:style-name="P20" loext:marker-style-name="T106"><text:span text:style-name="T109">確認設備是否安全：防毒更新、系統版本、是否為授權設備（</text:span><text:span text:style-name="T108">Device Posture</text:span><text:span text:style-name="T109">）</text:span></text:p>
          </table:table-cell>
        </table:table-row>
        <table:table-row table:style-name="表格140.1">
          <table:table-cell table:style-name="表格140.A2" office:value-type="string">
            <text:p text:style-name="P20" loext:marker-style-name="T106"><text:span text:style-name="T108">🌐 Context</text:span><text:span text:style-name="T109">（存取情境）</text:span></text:p>
          </table:table-cell>
          <table:table-cell table:style-name="表格140.A2" office:value-type="string">
            <text:p text:style-name="P20" loext:marker-style-name="T106"><text:span text:style-name="T109">境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評估環境是否異常：登入時間、地點、行為模式；凌晨從境外登入會觸發額外驗證</text:span><text:span text:style-name="T106"/></text:p>
          </table:table-cell>
        </table:table-row>
      </table:table>
      <text:h text:style-name="P19" text:outline-level="3"><text:span text:style-name="T36">▍</text:span><text:span text:style-name="T37"> </text:span><text:span text:style-name="T38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4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20" loext:marker-style-name="T106"><text:span text:style-name="T108">① MFA </text:span><text:span text:style-name="T109">多因素驗證</text:span></text:p>
          </table:table-cell>
          <table:table-cell table:style-name="表格141.A2" office:value-type="string">
            <text:p text:style-name="P20" loext:marker-style-name="T106"><text:span text:style-name="T109">登入不只密碼，還需第二層驗證（手機驗證碼、指紋、硬體金鑰），密碼外洩也難入侵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② Least Privilege </text:span><text:span text:style-name="T109">最小權限</text:span></text:p>
          </table:table-cell>
          <table:table-cell table:style-name="表格141.A3" office:value-type="string">
            <text:p text:style-name="P20" loext:marker-style-name="T106"><text:span text:style-name="T109">每位使用者只獲得完成工作所需的最低權限。權限愈小，風險愈低</text:span><text:span text:style-name="T106"/></text:p>
          </table:table-cell>
        </table:table-row>
        <table:table-row table:style-name="表格141.1">
          <table:table-cell table:style-name="表格141.A2" office:value-type="string">
            <text:p text:style-name="P20" loext:marker-style-name="T106"><text:span text:style-name="T108">③ Micro-Segmentation </text:span><text:span text:style-name="T109">微分段</text:span></text:p>
          </table:table-cell>
          <table:table-cell table:style-name="表格141.A2" office:value-type="string">
            <text:p text:style-name="P20" loext:marker-style-name="T106"><text:span text:style-name="T109">將內網切成多個獨立小區段，各區設存取控制；攻破一段也無法橫向擴散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④ Continuous Monitoring </text:span><text:span text:style-name="T109">持續監控</text:span></text:p>
          </table:table-cell>
          <table:table-cell table:style-name="表格141.A3" office:value-type="string">
            <text:p text:style-name="P20" loext:marker-style-name="T106"><text:span text:style-name="T109">全天候分析行為，異常立即警示（如半夜大量下載、短時間多國登入、刪大量日誌）</text:span><text:span text:style-name="T106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7">🔥 <text:s/></text:span><text:span text:style-name="T38">考前 </text:span><text:span text:style-name="T39">10 </text:span><text:span text:style-name="T38">秒超濃縮</text:span></text:p>
            <text:p text:style-name="P11" loext:marker-style-name="T21"><text:span text:style-name="T42">ZT </text:span><text:span text:style-name="T20">核心：不信任任何人（含內網）；檢查三件事——人（</text:span><text:span text:style-name="T42">Identity</text:span><text:span text:style-name="T20">）、機（</text:span><text:span text:style-name="T42">Device</text:span><text:span text:style-name="T20">）、境（</text:span><text:span text:style-name="T42">Context</text:span><text:span text:style-name="T20">）；搭配四招——</text:span><text:span text:style-name="T42">MFA </text:span><text:span text:style-name="T20">＋ 最小權限 ＋ 微分段 ＋ 持續監控。</text:span></text:p>
            <text:p text:style-name="P12" loext:marker-style-name="T21"><text:span text:style-name="T20">口訣：人機境，多驗、少給、切塊、一直看。</text:span><text:span text:style-name="T21"/></text:p>
          </table:table-cell>
          <table:covered-table-cell/>
        </table:table-row>
      </table:table>
      <text:h text:style-name="P19" text:outline-level="3"><text:span text:style-name="T36">▍</text:span><text:span text:style-name="T37"> Zero Trust </text:span><text:span text:style-name="T38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21" loext:marker-style-name="T104"><text:span text:style-name="T161">Step</text:span><text:span text:style-name="T104"/></text:p>
            </table:table-cell>
            <table:table-cell table:style-name="表格142.A1" office:value-type="string">
              <text:p text:style-name="P21" loext:marker-style-name="T104"><text:span text:style-name="T105">動作</text:span><text:span text:style-name="T104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20" loext:marker-style-name="T106"><text:span text:style-name="T108">1 </text:span><text:span text:style-name="T109">發出存取請求</text:span></text:p>
          </table:table-cell>
          <table:table-cell table:style-name="表格142.A2" office:value-type="string">
            <text:p text:style-name="P20" loext:marker-style-name="T106"><text:span text:style-name="T109">使用者或設備嘗試存取某資源（系統 </text:span><text:span text:style-name="T108">/ </text:span><text:span text:style-name="T109">檔案 </text:span><text:span text:style-name="T108">/ </text:span><text:span text:style-name="T109">資料庫）</text:span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2 </text:span><text:span text:style-name="T109">身份驗證 </text:span><text:span text:style-name="T108">Identity</text:span></text:p>
          </table:table-cell>
          <table:table-cell table:style-name="表格142.A3" office:value-type="string">
            <text:p text:style-name="P20" loext:marker-style-name="T106"><text:span text:style-name="T109">確認身份：帳密 </text:span><text:span text:style-name="T108">+ MFA </text:span><text:span text:style-name="T109">驗證通過</text:span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3 </text:span><text:span text:style-name="T109">設備驗證 </text:span><text:span text:style-name="T108">Device</text:span></text:p>
          </table:table-cell>
          <table:table-cell table:style-name="表格142.A2" office:value-type="string">
            <text:p text:style-name="P20" loext:marker-style-name="T106"><text:span text:style-name="T109">檢查設備健康：防毒、更新、合規性符合要求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4 </text:span><text:span text:style-name="T109">情境評估 </text:span><text:span text:style-name="T108">Context</text:span></text:p>
          </table:table-cell>
          <table:table-cell table:style-name="表格142.A3" office:value-type="string">
            <text:p text:style-name="P20" loext:marker-style-name="T106"><text:span text:style-name="T109">分析存取時間、地點、行為模式，計算風險分數</text:span><text:soft-page-break/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5 </text:span><text:span text:style-name="T109">權限比對</text:span></text:p>
          </table:table-cell>
          <table:table-cell table:style-name="表格142.A2" office:value-type="string">
            <text:p text:style-name="P20" loext:marker-style-name="T106"><text:span text:style-name="T109">依最小權限原則，確認是否有權存取該資源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6 </text:span><text:span text:style-name="T109">授權或拒絕</text:span></text:p>
          </table:table-cell>
          <table:table-cell table:style-name="表格142.A3" office:value-type="string">
            <text:p text:style-name="P20" loext:marker-style-name="T106"><text:span text:style-name="T109">風險低且權限符合 → 授權；否則 → 要求補充驗證或拒絕</text:span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7 </text:span><text:span text:style-name="T109">持續監控</text:span></text:p>
          </table:table-cell>
          <table:table-cell table:style-name="表格142.A2" office:value-type="string">
            <text:p text:style-name="P20" loext:marker-style-name="T106"><text:span text:style-name="T109">授權後全程監控行為，發現異常立即告警或中斷連線</text:span><text:span text:style-name="T106"/>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7">⚠️ <text:s/></text:span><text:span text:style-name="T80">公職考試陷阱整理</text:span></text:p>
            <text:p text:style-name="P11"><text:span text:style-name="T81">ZT = </text:span><text:span text:style-name="T82">完全不相信員工？　</text:span><text:span text:style-name="T20">✗ 重點是「每次都驗證」，驗證通過員工仍可正常使用，只是不再預設信任。</text:span></text:p>
            <text:p text:style-name="P12"><text:span text:style-name="T82">只有外網才危險？　</text:span><text:span text:style-name="T20">✗ 內網也可能：帳號被盜、設備中毒、內部人員惡意操作，故內網也須驗證。</text:span></text:p>
            <text:p text:style-name="P12"><text:span text:style-name="T82">登入一次後就永久可信？　</text:span><text:span text:style-name="T20">✗ 持續驗證，單次登入不代表長期信任，高風險行為會觸發重新驗證。</text:span></text:p>
            <text:p text:style-name="P12"><text:span text:style-name="T81">Zero Trust </text:span><text:span text:style-name="T82">重視網路位置？（超常考）　</text:span><text:span text:style-name="T20">✗ 完全相反！重點從「位置」轉移到「身份 </text:span><text:span text:style-name="T42">/ </text:span><text:span text:style-name="T20">設備 </text:span><text:span text:style-name="T42">/ </text:span><text:span text:style-name="T20">情境」。</text:span></text:p>
          </table:table-cell>
          <table:covered-table-cell/>
        </table:table-row>
      </table:table>
      <text:h text:style-name="P17" text:outline-level="1" loext:marker-style-name="T32"><text:span text:style-name="T33">結語　</text:span><text:span text:style-name="T32">·</text:span><text:span text:style-name="T33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7">✅ <text:s/></text:span><text:span text:style-name="T38">你已經完成一輪</text:span></text:p>
            <text:p text:style-name="P11" loext:marker-style-name="T21"><text:span text:style-name="T20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21"/>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7">🎯 <text:s/></text:span><text:span text:style-name="T166">五個高頻拿分重點</text:span></text:p>
            <text:p text:style-name="P11" loext:marker-style-name="T21"><text:span text:style-name="T42">① </text:span><text:span text:style-name="T20">分層先記責任：應用給人用、傳輸怎麼送、網路走哪條、連結同區網。</text:span></text:p>
            <text:p text:style-name="P12" loext:marker-style-name="T21"><text:span text:style-name="T42">② </text:span><text:span text:style-name="T20">計算題動手練：</text:span><text:span text:style-name="T42">VLSM</text:span><text:span text:style-name="T20">「需求</text:span><text:span text:style-name="T42">+2→</text:span><text:span text:style-name="T20">最小 </text:span><text:span text:style-name="T42">2ⁿ→/(32−n)</text:span><text:span text:style-name="T20">」、可用主機「</text:span><text:span text:style-name="T42">2^</text:span><text:span text:style-name="T20">主機</text:span><text:span text:style-name="T42">bit −2</text:span><text:span text:style-name="T20">」。</text:span></text:p>
            <text:p text:style-name="P12" loext:marker-style-name="T21"><text:span text:style-name="T42">③ </text:span><text:span text:style-name="T20">流程要會串：上網＝</text:span><text:span text:style-name="T42">DNS→ARP→NAT</text:span><text:span text:style-name="T20">；</text:span><text:span text:style-name="T42">TCP</text:span><text:span text:style-name="T20">＝握手→</text:span><text:span text:style-name="T42">Slow Start→CA→</text:span><text:span text:style-name="T20">丟包降速。</text:span></text:p>
            <text:p text:style-name="P12" loext:marker-style-name="T21"><text:span text:style-name="T42">④ </text:span><text:span text:style-name="T20">易混成對背：</text:span><text:span text:style-name="T42">FW/WAF/NGFW</text:span><text:span text:style-name="T20">、</text:span><text:span text:style-name="T42">IDS/IPS</text:span><text:span text:style-name="T20">、</text:span><text:span text:style-name="T42">HIDS/NIDS</text:span><text:span text:style-name="T20">、</text:span><text:span text:style-name="T42">SNMP/ICMP</text:span><text:span text:style-name="T20">、</text:span><text:span text:style-name="T42">EDR/MDR</text:span><text:span text:style-name="T20">、</text:span><text:span text:style-name="T42">RTO/RPO</text:span><text:span text:style-name="T20">、</text:span><text:span text:style-name="T42">Recursive/Iterative</text:span><text:span text:style-name="T20">。</text:span></text:p>
            <text:p text:style-name="P12" loext:marker-style-name="T21"><text:span text:style-name="T42">⑤ </text:span><text:span text:style-name="T20">陷阱反著記：</text:span><text:span text:style-name="T42">ARP </text:span><text:span text:style-name="T20">找路由器不是 </text:span><text:span text:style-name="T42">Google</text:span><text:span text:style-name="T20">、</text:span><text:span text:style-name="T42">BGP </text:span><text:span text:style-name="T20">政策不是距離、</text:span><text:span text:style-name="T42">WiFi </text:span><text:span text:style-name="T20">是 </text:span><text:span text:style-name="T42">CA </text:span><text:span text:style-name="T20">不是 </text:span><text:span text:style-name="T42">CD</text:span><text:span text:style-name="T20">、</text:span><text:span text:style-name="T42">IOC </text:span><text:span text:style-name="T20">是事後不是預測、</text:span><text:span text:style-name="T42">Zero Trust </text:span><text:span text:style-name="T20">看身份不看位置。</text:span></text:p>
          </table:table-cell>
        </table:table-row>
      </table:table>
      <text:p text:style-name="P76" loext:marker-style-name="T639"><text:span text:style-name="T640">祝　金榜題名　</text:span><text:span text:style-name="T641">·</text:span><text:span text:style-name="T640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52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2T00:41:46</meta:creation-date>
    <meta:initial-creator>Claude</meta:initial-creator>
    <dc:language>en-US</dc:language>
    <dc:date>2026-06-18T23:33:51.500304500</dc:date>
    <meta:editing-cycles>507</meta:editing-cycles>
    <dc:title>網路概論與資訊安全 完整整合筆記</dc:title>
    <meta:editing-duration>P3DT7H42M58S</meta:editing-duration>
    <meta:generator>LibreOffice/26.2.3.2$Windows_X86_64 LibreOffice_project/70e089b17412e4cb7773e41413306b17a2328c34</meta:generator>
    <meta:document-statistic meta:table-count="143" meta:image-count="1" meta:object-count="0" meta:page-count="52" meta:paragraph-count="2304" meta:word-count="30782" meta:character-count="48883" meta:non-whitespace-character-count="44078"/>
    <meta:user-defined meta:name="AppVersion">15.0000</meta:user-defined>
  </office:meta>
</office:document-meta>
</file>