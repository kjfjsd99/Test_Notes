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  <style:font-face style:name="細明體" svg:font-family="細明體" style:font-family-generic="modern" style:font-pitch="fixed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我幫你<text:span text:style-name="Strong_20_Emphasis">從 0 → 一步一步 → 用一條「真的會發生的流程」帶你走</text:span>。你只要跟著想像「一封信怎麼送出去再回來」就行。</text:p>
      <text:p text:style-name="Horizontal_20_Line"/>
      <text:h text:style-name="Heading_20_1" text:outline-level="1">🧱 先建立場景（你現在在哪裡）</text:h>
      <text:p text:style-name="Text_20_body">你家網路：</text:p>
      <text:list text:style-name="L1">
        <text:list-item>
          <text:p text:style-name="P1">你電腦：<text:span text:style-name="Source_20_Text">192.168.1.2</text:span> </text:p>
        </text:list-item>
        <text:list-item>
          <text:p text:style-name="P1">路由器（家裡出口）： </text:p>
          <text:list>
            <text:list-item>
              <text:p text:style-name="P1">內網 IP：<text:span text:style-name="Source_20_Text">192.168.1.1</text:span> </text:p>
            </text:list-item>
            <text:list-item>
              <text:p text:style-name="P2">公網 IP：<text:span text:style-name="Source_20_Text">220.x.x.x</text:span> </text:p>
            </text:list-item>
          </text:list>
        </text:list-item>
      </text:list>
      <text:p text:style-name="Text_20_body">👉 你要做的事：打開 Google</text:p>
      <text:p text:style-name="Horizontal_20_Line"/>
      <text:h text:style-name="Heading_20_1" text:outline-level="1">🚶‍♂️ 整個流程（我先講人話版）</text:h>
      <text:p text:style-name="Text_20_body">👉 你要送一封信給 Google：</text:p>
      <text:p text:style-name="Text_20_body">1️⃣ 先查 Google 在哪（DNS）<text:line-break/>2️⃣ 把信交給「門口警衛」（路由器）<text:line-break/>3️⃣ 警衛幫你寄出去（NAT）<text:line-break/>4️⃣ Google 回信<text:line-break/>5️⃣ 警衛再轉交給你</text:p>
      <text:p text:style-name="Horizontal_20_Line"/>
      <text:p text:style-name="Text_20_body">下面我們開始「每一步拆開講清楚」</text:p>
      <text:p text:style-name="Horizontal_20_Line"/>
      <text:h text:style-name="Heading_20_1" text:outline-level="1">🔍 Step 1：輸入 google.com（DNS）</text:h>
      <text:p text:style-name="Text_20_body">👉 你在瀏覽器打：</text:p>
      <text:section text:style-name="Sect1" text:name="code-block-viewer">
        <text:p text:style-name="P3">google.com</text:p>
      </text:section>
      <text:p text:style-name="Text_20_body">👉 電腦會問 DNS：</text:p>
      <text:p text:style-name="Text_20_body">🗣️「google.com 的 IP 是多少？」</text:p>
      <text:p text:style-name="Text_20_body">👉 DNS 回：</text:p>
      <text:section text:style-name="Sect1" text:name="區段1">
        <text:p text:style-name="P3"><text:bookmark text:name="code-block-viewer"/>142.250.xxx.xxx</text:p>
      </text:section>
      <text:p text:style-name="Horizontal_20_Line"/>
      <text:h text:style-name="Heading_20_2" text:outline-level="2"><text:soft-page-break/>🎯 到這裡你要懂：</text:h>
      <text:p text:style-name="Text_20_body">👉 網路只認 <text:span text:style-name="Strong_20_Emphasis">IP，不認名字</text:span></text:p>
      <text:p text:style-name="Horizontal_20_Line"/>
      <text:h text:style-name="Heading_20_1" text:outline-level="1">🚪 Step 2：用 ARP 找「路由器的 MAC」</text:h>
      <text:p text:style-name="Text_20_body">👉 現在你知道 Google 的 IP 了</text:p>
      <text:p text:style-name="Text_20_body">但你不能直接送給 Google ❗</text:p>
      <text:p text:style-name="Text_20_body">👉 因為你在「家裡內網」</text:p>
      <text:p text:style-name="Horizontal_20_Line"/>
      <text:h text:style-name="Heading_20_2" text:outline-level="2">❗ 重要觀念（很多人卡這裡）</text:h>
      <text:p text:style-name="Text_20_body">👉 你第一站不是 Google<text:line-break/>👉 是「路由器」（出口）</text:p>
      <text:p text:style-name="Horizontal_20_Line"/>
      <text:h text:style-name="Heading_20_2" text:outline-level="2">🧪 所以你要做：</text:h>
      <text:p text:style-name="Text_20_body">👉 找路由器：</text:p>
      <text:section text:style-name="Sect1" text:name="區段2">
        <text:p text:style-name="P3"><text:bookmark text:name="code-block-viewer 副本 1"/>192.168.1.1</text:p>
      </text:section>
      <text:p text:style-name="Text_20_body">👉 用 ARP 問：</text:p>
      <text:p text:style-name="Text_20_body">🗣️「誰是 192.168.1.1？」</text:p>
      <text:p text:style-name="Text_20_body">👉 路由器回：</text:p>
      <text:p text:style-name="Text_20_body">🗣️「我是，我的 MAC 是 AA:BB:CC」</text:p>
      <text:p text:style-name="Horizontal_20_Line"/>
      <text:h text:style-name="Heading_20_2" text:outline-level="2">🎯 到這裡你要懂：</text:h>
      <text:p text:style-name="Text_20_body">👉 ARP 是用來找「下一站的 MAC」<text:line-break/>👉 不是找 Google！</text:p>
      <text:p text:style-name="Horizontal_20_Line"/>
      <text:h text:style-name="Heading_20_1" text:outline-level="1">📦 Step 3：把封包送給路由器（L2 傳輸）</text:h>
      <text:p text:style-name="Text_20_body">👉 現在你有：</text:p>
      <text:list text:style-name="L2">
        <text:list-item>
          <text:p text:style-name="P4">目標 IP：Google </text:p>
        </text:list-item>
        <text:list-item>
          <text:p text:style-name="P5"><text:soft-page-break/>下一站 MAC：路由器 </text:p>
        </text:list-item>
      </text:list>
      <text:p text:style-name="Horizontal_20_Line"/>
      <text:p text:style-name="Text_20_body">👉 你送出一個封包：</text:p>
      <text:p text:style-name="Text_20_body">（重點來了🔥）</text:p>
      <text:section text:style-name="Sect1" text:name="區段3">
        <text:p text:style-name="P3"><text:bookmark text:name="code-block-viewer 副本 2"/>來源 IP：192.168.1.2</text:p>
        <text:p text:style-name="Preformatted_20_Text">目的 IP：142.250.xxx.xxx（Google）</text:p>
        <text:p text:style-name="Preformatted_20_Text">來源 MAC：你</text:p>
        <text:p text:style-name="Preformatted_20_Text">目的 MAC：路由器</text:p>
      </text:section>
      <text:p text:style-name="Horizontal_20_Line"/>
      <text:h text:style-name="Heading_20_2" text:outline-level="2">🎯 超重要觀念</text:h>
      <text:p text:style-name="Text_20_body">👉 IP = 最終目的地<text:line-break/>👉 MAC = 下一站</text:p>
      <text:p text:style-name="Horizontal_20_Line"/>
      <text:p text:style-name="Text_20_body">👉 所以封包：</text:p>
      <text:p text:style-name="Text_20_body">👉 「IP 是 Google，但先交給路由器」</text:p>
      <text:p text:style-name="Horizontal_20_Line"/>
      <text:h text:style-name="Heading_20_1" text:outline-level="1">🔄 Step 4：路由器做 NAT（超關鍵🔥）</text:h>
      <text:p text:style-name="Text_20_body">👉 路由器收到封包後，做一件事：</text:p>
      <text:p text:style-name="Text_20_body">👉 把你的 IP 改掉！</text:p>
      <text:p text:style-name="Horizontal_20_Line"/>
      <text:h text:style-name="Heading_20_2" text:outline-level="2">🧪 原本：</text:h>
      <text:section text:style-name="Sect1" text:name="區段4">
        <text:p text:style-name="P3"><text:bookmark text:name="code-block-viewer 副本 3"/>192.168.1.2 → Google</text:p>
      </text:section>
      <text:p text:style-name="Horizontal_20_Line"/>
      <text:h text:style-name="Heading_20_2" text:outline-level="2">👉 改成：</text:h>
      <text:section text:style-name="Sect1" text:name="區段5">
        <text:p text:style-name="P3"><text:bookmark text:name="code-block-viewer 副本 4"/>220.x.x.x → Google</text:p>
      </text:section>
      <text:p text:style-name="Text_20_body">👉 才送到 Internet</text:p>
      <text:p text:style-name="Horizontal_20_Line"/>
      <text:h text:style-name="Heading_20_2" text:outline-level="2">❗ 為什麼？</text:h>
      <text:p text:style-name="Text_20_body">👉 因為：</text:p>
      <text:p text:style-name="Text_20_body">👉 Google 不認 192.168.x.x（私有 IP）</text:p>
      <text:p text:style-name="Horizontal_20_Line"><text:soft-page-break/></text:p>
      <text:h text:style-name="Heading_20_2" text:outline-level="2">🎯 到這裡你要懂：</text:h>
      <text:p text:style-name="Text_20_body">👉 NAT = 「換身份出去」</text:p>
      <text:p text:style-name="Horizontal_20_Line"/>
      <text:h text:style-name="Heading_20_1" text:outline-level="1">🌐 Step 5：Google 回應</text:h>
      <text:p text:style-name="Text_20_body">👉 Google 收到：</text:p>
      <text:section text:style-name="Sect1" text:name="區段6">
        <text:p text:style-name="P3"><text:bookmark text:name="code-block-viewer 副本 5"/>220.x.x.x</text:p>
      </text:section>
      <text:p text:style-name="Text_20_body">👉 回傳資料：</text:p>
      <text:section text:style-name="Sect1" text:name="區段7">
        <text:p text:style-name="P3"><text:bookmark text:name="code-block-viewer 副本 6"/>Google → 220.x.x.x</text:p>
      </text:section>
      <text:p text:style-name="Horizontal_20_Line"/>
      <text:h text:style-name="Heading_20_1" text:outline-level="1">🔙 Step 6：路由器再做 NAT（回程）</text:h>
      <text:p text:style-name="Text_20_body">👉 路由器收到後：</text:p>
      <text:p text:style-name="Text_20_body">👉 查記錄（超重要）</text:p>
      <text:p text:style-name="Text_20_body">👉 知道：</text:p>
      <text:section text:style-name="Sect1" text:name="區段8">
        <text:p text:style-name="P3"><text:bookmark text:name="code-block-viewer 副本 7"/>220.x.x.x 其實是 192.168.1.2</text:p>
      </text:section>
      <text:p text:style-name="Horizontal_20_Line"/>
      <text:p text:style-name="Text_20_body">👉 所以改回：</text:p>
      <text:section text:style-name="Sect1" text:name="區段9">
        <text:p text:style-name="P3"><text:bookmark text:name="code-block-viewer 副本 8"/>192.168.1.2</text:p>
      </text:section>
      <text:p text:style-name="Text_20_body">👉 再送回你電腦</text:p>
      <text:p text:style-name="Horizontal_20_Line"/>
      <text:h text:style-name="Heading_20_1" text:outline-level="1">🎉 Step 7：你看到網頁</text:h>
      <text:p text:style-name="Text_20_body">👉 完整完成一次通信</text:p>
      <text:p text:style-name="Horizontal_20_Line"/>
      <text:h text:style-name="Heading_20_1" text:outline-level="1">🔥 幫你整理成「超清楚版本」</text:h>
      <text:h text:style-name="Heading_20_2" text:outline-level="2">🧩 真正流程（簡化）</text:h>
      <text:p text:style-name="Text_20_body">1️⃣ DNS：名字 → IP<text:line-break/>2️⃣ ARP：找路由器 MAC<text:line-break/><text:soft-page-break/>3️⃣ 傳給路由器<text:line-break/>4️⃣ NAT：換成公網 IP<text:line-break/>5️⃣ 傳到 Google<text:line-break/>6️⃣ 回來 → NAT 改回<text:line-break/>7️⃣ 到你電腦</text:p>
      <text:p text:style-name="Horizontal_20_Line"/>
      <text:h text:style-name="Heading_20_1" text:outline-level="1">💣 最容易搞錯的 3 件事（你剛剛卡的點）</text:h>
      <text:h text:style-name="Heading_20_2" text:outline-level="2">❌ 1. 以為 ARP 是找 Google</text:h>
      <text:p text:style-name="Text_20_body">👉 ✔️ 錯！是找「路由器」</text:p>
      <text:p text:style-name="Horizontal_20_Line"/>
      <text:h text:style-name="Heading_20_2" text:outline-level="2">❌ 2. 以為直接送到 Google</text:h>
      <text:p text:style-name="Text_20_body">👉 ✔️ 錯！先送給路由器</text:p>
      <text:p text:style-name="Horizontal_20_Line"/>
      <text:h text:style-name="Heading_20_2" text:outline-level="2">❌ 3. 以為 IP 一直不變</text:h>
      <text:p text:style-name="Text_20_body">👉 ✔️ 錯！NAT 會改</text:p>
      <text:p text:style-name="Horizontal_20_Line"/>
      <text:h text:style-name="Heading_20_1" text:outline-level="1">🧠 最後一句話（讓你真的懂）</text:h>
      <text:p text:style-name="Text_20_body">👉 封包其實在做：</text:p>
      <text:section text:style-name="Sect1" text:name="區段10">
        <text:p text:style-name="P3"><text:bookmark text:name="code-block-viewer 副本 9"/>IP：決定最終去哪裡</text:p>
        <text:p text:style-name="Preformatted_20_Text">MAC：決定下一步怎麼走</text:p>
        <text:p text:style-name="Preformatted_20_Text">NAT：讓你能離開家上網</text:p>
      </text:section>
      <text:p text:style-name="Horizontal_20_Line"/>
      <text:p text:style-name="Text_20_body">如果你願意，我可以幫你做下一步👇</text:p>
      <text:p text:style-name="Text_20_body">👉 畫一張「整條路徑圖」（你會瞬間通）<text:line-break/>👉 或用「考試 25 分寫法」整理給你背</text:p>
      <text:p text:style-name="Text_20_body">你現在已經理解 70% 了，差最後一點點「視覺化」。</text:p>
      <text:p text:style-name="Text_20_body">好</text:p>
      <text:p text:style-name="Text_20_body">很好，我幫你做一個<text:span text:style-name="Strong_20_Emphasis">真正讓你「一眼看懂」的完整流程圖 + 超精簡筆記</text:span>。你可以把這當作考試用的最終版。</text:p>
      <text:p text:style-name="Horizontal_20_Line"><text:soft-page-break/></text:p>
      <text:h text:style-name="Heading_20_1" text:outline-level="1">🗺️ 一張圖搞懂整個流程（最重要🔥）</text:h>
      <text:section text:style-name="Sect1" text:name="區段11">
        <text:p text:style-name="P3"><text:bookmark text:name="code-block-viewer 副本 10"/>你電腦 <text:s text:c="20"/>路由器（NAT） <text:s text:c="15"/>Internet（Google）</text:p>
        <text:p text:style-name="Preformatted_20_Text">192.168.1.2 <text:s text:c="14"/>192.168.1.1 / 220.x.x.x <text:s text:c="6"/>142.250.xxx.xxx</text:p>
        <text:p text:style-name="Preformatted_20_Text"><text:s text:c="3"/>│</text:p>
        <text:p text:style-name="Preformatted_20_Text"><text:s text:c="3"/>│ ① DNS：google.com → 142.250.xxx.xxx</text:p>
        <text:p text:style-name="Preformatted_20_Text"><text:s text:c="3"/>│</text:p>
        <text:p text:style-name="Preformatted_20_Text"><text:s text:c="3"/>│ ② ARP：找路由器 MAC</text:p>
        <text:p text:style-name="Preformatted_20_Text"><text:s text:c="3"/>│</text:p>
        <text:p text:style-name="Preformatted_20_Text"><text:s text:c="3"/>│ ③ 封包送出（交給路由器）</text:p>
        <text:p text:style-name="Preformatted_20_Text"><text:s text:c="3"/>│ <text:s text:c="2"/>IP: 192.168.1.2 → 142.250.xxx.xxx</text:p>
        <text:p text:style-name="Preformatted_20_Text"><text:s text:c="3"/>│ <text:s text:c="2"/>MAC: 你 → 路由器</text:p>
        <text:p text:style-name="Preformatted_20_Text"><text:s text:c="3"/>▼</text:p>
        <text:p text:style-name="Preformatted_20_Text">┌──────────────┐</text:p>
        <text:p text:style-name="Preformatted_20_Text">│ <text:s text:c="2"/>路由器 <text:s text:c="5"/>│</text:p>
        <text:p text:style-name="Preformatted_20_Text">│ (NAT 發生🔥) │</text:p>
        <text:p text:style-name="Preformatted_20_Text">└──────────────┘</text:p>
        <text:p text:style-name="Preformatted_20_Text"><text:s text:c="3"/>│</text:p>
        <text:p text:style-name="Preformatted_20_Text"><text:s text:c="3"/>│ ④ NAT：改 IP</text:p>
        <text:p text:style-name="Preformatted_20_Text"><text:s text:c="3"/>│ <text:s text:c="2"/>192.168.1.2 → 220.x.x.x</text:p>
        <text:p text:style-name="Preformatted_20_Text"><text:s text:c="3"/>│</text:p>
        <text:p text:style-name="Preformatted_20_Text"><text:s text:c="3"/>│ ⑤ 傳到 Google</text:p>
        <text:p text:style-name="Preformatted_20_Text"><text:s text:c="3"/>▼</text:p>
        <text:p text:style-name="Preformatted_20_Text">🌐 Google 收到請求</text:p>
        <text:p text:style-name="Preformatted_20_Text"><text:s text:c="3"/>▲</text:p>
        <text:p text:style-name="Preformatted_20_Text"><text:s text:c="3"/>│ ⑥ 回應：Google → 220.x.x.x</text:p>
        <text:p text:style-name="Preformatted_20_Text"><text:s text:c="3"/>│</text:p>
        <text:p text:style-name="Preformatted_20_Text">┌──────────────┐</text:p>
        <text:p text:style-name="Preformatted_20_Text">│ <text:s text:c="2"/>路由器 <text:s text:c="5"/>│</text:p>
        <text:p text:style-name="Preformatted_20_Text">│ (NAT 再改回🔥)│</text:p>
        <text:p text:style-name="Preformatted_20_Text">└──────────────┘</text:p>
        <text:p text:style-name="Preformatted_20_Text"><text:s text:c="3"/>│</text:p>
        <text:p text:style-name="Preformatted_20_Text"><text:s text:c="3"/>│ ⑦ NAT 改回：</text:p>
        <text:p text:style-name="Preformatted_20_Text"><text:s text:c="3"/>│ <text:s text:c="2"/>220.x.x.x → 192.168.1.2</text:p>
        <text:p text:style-name="Preformatted_20_Text"><text:s text:c="3"/>│</text:p>
        <text:p text:style-name="Preformatted_20_Text"><text:s text:c="3"/>▼</text:p>
        <text:p text:style-name="Preformatted_20_Text">你電腦收到資料 🎉</text:p>
      </text:section>
      <text:p text:style-name="Horizontal_20_Line"/>
      <text:h text:style-name="Heading_20_1" text:outline-level="1">🧠 每一步「超白話理解」</text:h>
      <text:h text:style-name="Heading_20_2" text:outline-level="2">① DNS（找地址）</text:h>
      <text:p text:style-name="Text_20_body">👉「Google 在哪裡？」</text:p>
      <text:p text:style-name="Horizontal_20_Line"/>
      <text:h text:style-name="Heading_20_2" text:outline-level="2">② ARP（找門口）</text:h>
      <text:p text:style-name="Text_20_body">👉「我要先找到出口（路由器）」</text:p>
      <text:p text:style-name="Horizontal_20_Line"><text:soft-page-break/></text:p>
      <text:h text:style-name="Heading_20_2" text:outline-level="2">③ 傳給路由器</text:h>
      <text:p text:style-name="Text_20_body">👉「先交給門口警衛」</text:p>
      <text:p text:style-name="Horizontal_20_Line"/>
      <text:h text:style-name="Heading_20_2" text:outline-level="2">④ NAT（換身份🔥）</text:h>
      <text:p text:style-name="Text_20_body">👉「幫你用外面看的懂的身份寄信」</text:p>
      <text:p text:style-name="Horizontal_20_Line"/>
      <text:h text:style-name="Heading_20_2" text:outline-level="2">⑤ 傳到 Google</text:h>
      <text:p text:style-name="Text_20_body">👉「真正送到對方」</text:p>
      <text:p text:style-name="Horizontal_20_Line"/>
      <text:h text:style-name="Heading_20_2" text:outline-level="2">⑥ Google 回信</text:h>
      <text:p text:style-name="Text_20_body">👉「寄回你的公網地址」</text:p>
      <text:p text:style-name="Horizontal_20_Line"/>
      <text:h text:style-name="Heading_20_2" text:outline-level="2">⑦ NAT 改回</text:h>
      <text:p text:style-name="Text_20_body">👉「再轉回你家裡的你」</text:p>
      <text:p text:style-name="Horizontal_20_Line"/>
      <text:h text:style-name="Heading_20_1" text:outline-level="1">🔥 最關鍵 3 個核心（一定要記）</text:h>
      <text:h text:style-name="Heading_20_2" text:outline-level="2">🧩 1️⃣ 為什麼要 ARP？</text:h>
      <text:p text:style-name="Text_20_body">👉 因為：<text:line-break/>👉 <text:span text:style-name="Strong_20_Emphasis">送資料要 MAC，但你只有 IP</text:span></text:p>
      <text:p text:style-name="Horizontal_20_Line"/>
      <text:h text:style-name="Heading_20_2" text:outline-level="2">🧩 2️⃣ 為什麼要 NAT？</text:h>
      <text:p text:style-name="Text_20_body">👉 因為：<text:line-break/>👉 <text:span text:style-name="Strong_20_Emphasis">私有 IP 不能上 Internet</text:span></text:p>
      <text:p text:style-name="Horizontal_20_Line"/>
      <text:h text:style-name="Heading_20_2" text:outline-level="2"><text:soft-page-break/>🧩 3️⃣ 為什麼要路由器？</text:h>
      <text:p text:style-name="Text_20_body">👉 因為：<text:line-break/>👉 <text:span text:style-name="Strong_20_Emphasis">你不在 Internet 上，你在家裡</text:span></text:p>
      <text:p text:style-name="Horizontal_20_Line"/>
      <text:h text:style-name="Heading_20_1" text:outline-level="1">💣 再幫你強化「最容易錯的點」</text:h>
      <text:h text:style-name="Heading_20_3" text:outline-level="3">❌ 不是直接送給 Google</text:h>
      <text:p text:style-name="Text_20_body">✔️ 是先送給「路由器」</text:p>
      <text:p text:style-name="Horizontal_20_Line"/>
      <text:h text:style-name="Heading_20_3" text:outline-level="3">❌ ARP 不是找 Google</text:h>
      <text:p text:style-name="Text_20_body">✔️ 是找「路由器 MAC」</text:p>
      <text:p text:style-name="Horizontal_20_Line"/>
      <text:h text:style-name="Heading_20_3" text:outline-level="3">❌ IP 不會一直一樣</text:h>
      <text:p text:style-name="Text_20_body">✔️ NAT 會改</text:p>
      <text:p text:style-name="Horizontal_20_Line"/>
      <text:h text:style-name="Heading_20_1" text:outline-level="1">📝 最終考試版（你可以直接背🔥）</text:h>
      <text:p text:style-name="Text_20_body">👉 如果考「上網流程」：</text:p>
      <text:p text:style-name="Quotations">使用者輸入網址後，先透過 DNS 將網域名稱解析為 IP 位址；接著主機利用 ARP 取得預設閘道（路由器）的 MAC 位址，將封包傳送至路由器；路由器透過 NAT 將私有 IP 轉換為公網 IP 後送往 Internet；目的主機回應後，路由器再透過 NAT 將封包轉回原內部主機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TC" style:font-family-asian="'Noto Serif TC'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TC" style:font-family-asian="'Noto Serif TC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TC" style:font-family-asian="'Noto Serif T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22:04:34.900847600</meta:creation-date>
    <dc:date>2026-04-27T22:05:09.933948200</dc:date>
    <meta:editing-duration>PT35S</meta:editing-duration>
    <meta:editing-cycles>1</meta:editing-cycles>
    <meta:generator>LibreOffice/26.2.2.2$Windows_X86_64 LibreOffice_project/1f77d10d6938fd34972958f64b2bcfa54f8b1ba5</meta:generator>
    <meta:document-statistic meta:table-count="0" meta:image-count="0" meta:object-count="0" meta:page-count="8" meta:paragraph-count="166" meta:word-count="1583" meta:character-count="2786" meta:non-whitespace-character-count="2309"/>
  </office:meta>
</office:document-meta>
</file>