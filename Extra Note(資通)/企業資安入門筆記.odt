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.002cm" fo:margin-top="0cm" fo:margin-bottom="0cm" table:align="left" style:writing-mode="page"/>
    </style:style>
    <style:style style:name="表格1.A" style:family="table-column">
      <style:table-column-properties style:column-width="5.408cm"/>
    </style:style>
    <style:style style:name="表格1.B" style:family="table-column">
      <style:table-column-properties style:column-width="5.4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d6e4f0" fo:padding-left="0.247cm" fo:padding-right="0.247cm" fo:padding-top="0.176cm" fo:padding-bottom="0.176cm" fo:border="0.1pt solid #c5d6e8">
        <style:background-image/>
      </style:table-cell-properties>
    </style:style>
    <style:style style:name="表格2" style:family="table">
      <style:table-properties style:width="16.228cm" fo:margin-left="0.035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-left="2pt solid #2e75b6" fo:border-right="0.1pt solid #2e75b6" fo:border-top="0.1pt solid #2e75b6" fo:border-bottom="0.1pt solid #2e75b6">
        <style:background-image/>
      </style:table-cell-properties>
    </style:style>
    <style:style style:name="表格3" style:family="table">
      <style:table-properties style:width="16.228cm" fo:margin-left="0.035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0ecef" fo:padding-left="0.353cm" fo:padding-right="0.353cm" fo:padding-top="0.212cm" fo:padding-bottom="0.212cm" fo:border-left="2pt solid #17808c" fo:border-right="0.1pt solid #17808c" fo:border-top="0.1pt solid #17808c" fo:border-bottom="0.1pt solid #17808c">
        <style:background-image/>
      </style:table-cell-properties>
    </style:style>
    <style:style style:name="表格4" style:family="table">
      <style:table-properties style:width="12.171cm" fo:margin-left="0.002cm" fo:margin-top="0cm" fo:margin-bottom="0cm" table:align="left" style:writing-mode="page"/>
    </style:style>
    <style:style style:name="表格4.A" style:family="table-column">
      <style:table-column-properties style:column-width="4.057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a3a5c" fo:padding-left="0.282cm" fo:padding-right="0.282cm" fo:padding-top="0.212cm" fo:padding-bottom="0.212cm" fo:border="0.1pt solid #c5d6e8">
        <style:background-image/>
      </style:table-cell-properties>
    </style:style>
    <style:style style:name="表格4.B1" style:family="table-cell">
      <style:table-cell-properties style:vertical-align="middle" fo:background-color="#2e75b6" fo:padding-left="0.282cm" fo:padding-right="0.282cm" fo:padding-top="0.212cm" fo:padding-bottom="0.212cm" fo:border="0.1pt solid #c5d6e8">
        <style:background-image/>
      </style:table-cell-properties>
    </style:style>
    <style:style style:name="表格4.C1" style:family="table-cell">
      <style:table-cell-properties style:vertical-align="middle" fo:background-color="#17808c" fo:padding-left="0.282cm" fo:padding-right="0.282cm" fo:padding-top="0.212cm" fo:padding-bottom="0.212cm" fo:border="0.1pt solid #c5d6e8">
        <style:background-image/>
      </style:table-cell-properties>
    </style:style>
    <style:style style:name="表格4.A2" style:family="table-cell">
      <style:table-cell-properties style:vertical-align="middle" fo:background-color="#f2f2f2" fo:padding-left="0.282cm" fo:padding-right="0.282cm" fo:padding-top="0.176cm" fo:padding-bottom="0.176cm" fo:border="0.1pt solid #c5d6e8">
        <style:background-image/>
      </style:table-cell-properties>
    </style:style>
    <style:style style:name="表格4.B2" style:family="table-cell">
      <style:table-cell-properties style:vertical-align="middle" fo:background-color="#ffffff" fo:padding-left="0.282cm" fo:padding-right="0.282cm" fo:padding-top="0.176cm" fo:padding-bottom="0.176cm" fo:border="0.1pt solid #c5d6e8">
        <style:background-image/>
      </style:table-cell-properties>
    </style:style>
    <style:style style:name="表格5" style:family="table">
      <style:table-properties style:width="16.228cm" fo:margin-left="0.002cm" fo:margin-top="0cm" fo:margin-bottom="0cm" table:align="left" style:writing-mode="page"/>
    </style:style>
    <style:style style:name="表格5.A" style:family="table-column">
      <style:table-column-properties style:column-width="5.408cm"/>
    </style:style>
    <style:style style:name="表格5.B" style:family="table-column">
      <style:table-column-properties style:column-width="5.41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fae8e0" fo:padding-left="0.247cm" fo:padding-right="0.247cm" fo:padding-top="0.176cm" fo:padding-bottom="0.176cm" fo:border="0.1pt solid #c5d6e8">
        <style:background-image/>
      </style:table-cell-properties>
    </style:style>
    <style:style style:name="表格6" style:family="table">
      <style:table-properties style:width="16.228cm" fo:margin-left="0.035cm" fo:margin-top="0cm" fo:margin-bottom="0cm" table:align="left" style:writing-mode="page"/>
    </style:style>
    <style:style style:name="表格6.A" style:family="table-column">
      <style:table-column-properties style:column-width="16.228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e8e0" fo:padding-left="0.353cm" fo:padding-right="0.353cm" fo:padding-top="0.212cm" fo:padding-bottom="0.212cm" fo:border-left="2pt solid #c0572b" fo:border-right="0.1pt solid #c0572b" fo:border-top="0.1pt solid #c0572b" fo:border-bottom="0.1pt solid #c0572b">
        <style:background-image/>
      </style:table-cell-properties>
    </style:style>
    <style:style style:name="表格7" style:family="table">
      <style:table-properties style:width="16.228cm" fo:margin-left="0.002cm" fo:margin-top="0cm" fo:margin-bottom="0cm" table:align="left" style:writing-mode="page"/>
    </style:style>
    <style:style style:name="表格7.A" style:family="table-column">
      <style:table-column-properties style:column-width="8.114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f2f2f2" fo:padding-left="0.353cm" fo:padding-right="0.353cm" fo:padding-top="0.176cm" fo:padding-bottom="0.176cm" fo:border="0.1pt solid #c5d6e8">
        <style:background-image/>
      </style:table-cell-properties>
    </style:style>
    <style:style style:name="表格7.B1" style:family="table-cell">
      <style:table-cell-properties style:vertical-align="middle" fo:background-color="#ead9f5" fo:padding-left="0.353cm" fo:padding-right="0.353cm" fo:padding-top="0.176cm" fo:padding-bottom="0.176cm" fo:border="0.1pt solid #6a3a8c">
        <style:background-image/>
      </style:table-cell-properties>
    </style:style>
    <style:style style:name="表格8" style:family="table">
      <style:table-properties style:width="16.228cm" fo:margin-left="0.035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ad9f5" fo:padding-left="0.353cm" fo:padding-right="0.353cm" fo:padding-top="0.212cm" fo:padding-bottom="0.212cm" fo:border-left="2pt solid #6a3a8c" fo:border-right="0.1pt solid #6a3a8c" fo:border-top="0.1pt solid #6a3a8c" fo:border-bottom="0.1pt solid #6a3a8c">
        <style:background-image/>
      </style:table-cell-properties>
    </style:style>
    <style:style style:name="表格9" style:family="table">
      <style:table-properties style:width="16.228cm" fo:margin-left="0.002cm" fo:margin-top="0cm" fo:margin-bottom="0cm" table:align="left" style:writing-mode="page"/>
    </style:style>
    <style:style style:name="表格9.A" style:family="table-column">
      <style:table-column-properties style:column-width="4.584cm"/>
    </style:style>
    <style:style style:name="表格9.B" style:family="table-column">
      <style:table-column-properties style:column-width="11.643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d6e4f0" fo:padding-left="0.318cm" fo:padding-right="0.318cm" fo:padding-top="0.247cm" fo:padding-bottom="0.247cm" fo:border="0.1pt solid #2e75b6">
        <style:background-image/>
      </style:table-cell-properties>
    </style:style>
    <style:style style:name="表格9.B1" style:family="table-cell">
      <style:table-cell-properties style:vertical-align="middle" fo:background-color="#ffffff" fo:padding-left="0.353cm" fo:padding-right="0.353cm" fo:padding-top="0.247cm" fo:padding-bottom="0.247cm" fo:border="0.1pt solid #2e75b6">
        <style:background-image/>
      </style:table-cell-properties>
    </style:style>
    <style:style style:name="表格9.A2" style:family="table-cell">
      <style:table-cell-properties style:vertical-align="middle" fo:background-color="#d0ecef" fo:padding-left="0.318cm" fo:padding-right="0.318cm" fo:padding-top="0.247cm" fo:padding-bottom="0.247cm" fo:border="0.1pt solid #17808c">
        <style:background-image/>
      </style:table-cell-properties>
    </style:style>
    <style:style style:name="表格9.B2" style:family="table-cell">
      <style:table-cell-properties style:vertical-align="middle" fo:background-color="#ffffff" fo:padding-left="0.353cm" fo:padding-right="0.353cm" fo:padding-top="0.247cm" fo:padding-bottom="0.247cm" fo:border="0.1pt solid #17808c">
        <style:background-image/>
      </style:table-cell-properties>
    </style:style>
    <style:style style:name="表格9.A3" style:family="table-cell">
      <style:table-cell-properties style:vertical-align="middle" fo:background-color="#fae8e0" fo:padding-left="0.318cm" fo:padding-right="0.318cm" fo:padding-top="0.247cm" fo:padding-bottom="0.247cm" fo:border="0.1pt solid #c0572b">
        <style:background-image/>
      </style:table-cell-properties>
    </style:style>
    <style:style style:name="表格9.B3" style:family="table-cell">
      <style:table-cell-properties style:vertical-align="middle" fo:background-color="#ffffff" fo:padding-left="0.353cm" fo:padding-right="0.353cm" fo:padding-top="0.247cm" fo:padding-bottom="0.247cm" fo:border="0.1pt solid #c0572b">
        <style:background-image/>
      </style:table-cell-properties>
    </style:style>
    <style:style style:name="表格9.A4" style:family="table-cell">
      <style:table-cell-properties style:vertical-align="middle" fo:background-color="#ead9f5" fo:padding-left="0.318cm" fo:padding-right="0.318cm" fo:padding-top="0.247cm" fo:padding-bottom="0.247cm" fo:border="0.1pt solid #6a3a8c">
        <style:background-image/>
      </style:table-cell-properties>
    </style:style>
    <style:style style:name="表格9.B4" style:family="table-cell">
      <style:table-cell-properties style:vertical-align="middle" fo:background-color="#ffffff" fo:padding-left="0.353cm" fo:padding-right="0.353cm" fo:padding-top="0.247cm" fo:padding-bottom="0.247cm" fo:border="0.1pt solid #6a3a8c">
        <style:background-image/>
      </style:table-cell-properties>
    </style:style>
    <style:style style:name="表格10" style:family="table">
      <style:table-properties style:width="16.228cm" fo:margin-left="0.002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a3a5c" fo:padding-left="0.706cm" fo:padding-right="0.706cm" fo:padding-top="0.282cm" fo:padding-bottom="0.282cm" fo:border="0.1pt solid #1a3a5c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564cm" style:contextual-spacing="false" fo:text-align="center" style:justify-single-word="false" fo:padding-left="0cm" fo:padding-right="0cm" fo:padding-top="0cm" fo:padding-bottom="0.035cm" fo:border-left="none" fo:border-right="none" fo:border-top="none" fo:border-bottom="1.5pt solid #2e75b6"/>
    </style:style>
    <style:style style:name="P5" style:family="paragraph" style:parent-style-name="Standard">
      <loext:graphic-properties draw:fill="solid" draw:fill-color="#1a3a5c"/>
      <style:paragraph-properties fo:margin-left="0.353cm" fo:margin-top="0.564cm" fo:margin-bottom="0.282cm" style:contextual-spacing="false" fo:background-color="#1a3a5c" fo:padding="0cm" fo:border-left="2.49pt solid #1a3a5c" fo:border-right="0.11pt solid #c5d6e8" fo:border-top="0.11pt solid #c5d6e8" fo:border-bottom="0.11pt solid #c5d6e8" style:shadow="none"/>
    </style:style>
    <style:style style:name="P6" style:family="paragraph" style:parent-style-name="Standard">
      <style:paragraph-properties fo:margin-top="0.106cm" fo:margin-bottom="0.106cm" style:contextual-spacing="false"/>
    </style:style>
    <style:style style:name="P7" style:family="paragraph" style:parent-style-name="List_20_Paragraph" style:list-style-name="WWNum2">
      <style:paragraph-properties fo:margin-top="0.071cm" fo:margin-bottom="0.071cm" style:contextual-spacing="false"/>
    </style:style>
    <style:style style:name="P8" style:family="paragraph" style:parent-style-name="Standard">
      <style:paragraph-properties fo:margin-top="0.141cm" fo:margin-bottom="0.071cm" style:contextual-spacing="false"/>
    </style:style>
    <style:style style:name="P9" style:family="paragraph" style:parent-style-name="Standard">
      <loext:graphic-properties draw:fill="solid" draw:fill-color="#d6e4f0"/>
      <style:paragraph-properties fo:margin-left="0.529cm" fo:margin-top="0.212cm" fo:margin-bottom="0.353cm" style:contextual-spacing="false" fo:text-align="center" style:justify-single-word="false" fo:background-color="#d6e4f0" fo:padding="0cm" fo:border-left="3pt solid #2e75b6" fo:border-right="0.11pt solid #d6e4f0" fo:border-top="0.11pt solid #d6e4f0" fo:border-bottom="0.11pt solid #d6e4f0" style:shadow="none"/>
    </style:style>
    <style:style style:name="P10" style:family="paragraph" style:parent-style-name="Standard">
      <loext:graphic-properties draw:fill="solid" draw:fill-color="#2e75b6"/>
      <style:paragraph-properties fo:margin-left="0.353cm" fo:margin-top="0.564cm" fo:margin-bottom="0.282cm" style:contextual-spacing="false" fo:background-color="#2e75b6" fo:padding="0cm" fo:border-left="2.49pt solid #2e75b6" fo:border-right="0.11pt solid #c5d6e8" fo:border-top="0.11pt solid #c5d6e8" fo:border-bottom="0.11pt solid #c5d6e8" style:shadow="none"/>
    </style:style>
    <style:style style:name="P11" style:family="paragraph" style:parent-style-name="Standard">
      <style:paragraph-properties fo:margin-top="0.353cm" fo:margin-bottom="0.141cm" style:contextual-spacing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0.282cm" fo:margin-bottom="0.071cm" style:contextual-spacing="false"/>
    </style:style>
    <style:style style:name="P14" style:family="paragraph" style:parent-style-name="Standard">
      <style:paragraph-properties fo:margin-top="0.176cm" fo:margin-bottom="0.071cm" style:contextual-spacing="false"/>
    </style:style>
    <style:style style:name="P15" style:family="paragraph" style:parent-style-name="List_20_Paragraph" style:list-style-name="WWNum3">
      <style:paragraph-properties fo:margin-top="0.035cm" fo:margin-bottom="0.035cm" style:contextual-spacing="false"/>
    </style:style>
    <style:style style:name="P16" style:family="paragraph" style:parent-style-name="Standard">
      <style:paragraph-properties fo:margin-top="0.141cm" fo:margin-bottom="0.141cm" style:contextual-spacing="false"/>
    </style:style>
    <style:style style:name="P17" style:family="paragraph" style:parent-style-name="Standard">
      <loext:graphic-properties draw:fill="solid" draw:fill-color="#17808c"/>
      <style:paragraph-properties fo:margin-left="0.353cm" fo:margin-top="0.564cm" fo:margin-bottom="0.282cm" style:contextual-spacing="false" fo:background-color="#17808c" fo:padding="0cm" fo:border-left="2.49pt solid #17808c" fo:border-right="0.11pt solid #c5d6e8" fo:border-top="0.11pt solid #c5d6e8" fo:border-bottom="0.11pt solid #c5d6e8" style:shadow="none"/>
    </style:style>
    <style:style style:name="P18" style:family="paragraph" style:parent-style-name="Standard">
      <style:paragraph-properties fo:margin-top="0.106cm" fo:margin-bottom="0.141cm" style:contextual-spacing="false"/>
    </style:style>
    <style:style style:name="P19" style:family="paragraph" style:parent-style-name="Standard">
      <style:paragraph-properties fo:margin-top="0.212cm" fo:margin-bottom="0.071cm" style:contextual-spacing="false"/>
    </style:style>
    <style:style style:name="P20" style:family="paragraph" style:parent-style-name="Standard">
      <style:paragraph-properties fo:margin-top="0.282cm" fo:margin-bottom="0.141cm" style:contextual-spacing="false"/>
    </style:style>
    <style:style style:name="P21" style:family="paragraph" style:parent-style-name="Standard">
      <loext:graphic-properties draw:fill="solid" draw:fill-color="#c0572b"/>
      <style:paragraph-properties fo:margin-left="0.353cm" fo:margin-top="0.564cm" fo:margin-bottom="0.282cm" style:contextual-spacing="false" fo:background-color="#c0572b" fo:padding="0cm" fo:border-left="2.49pt solid #c0572b" fo:border-right="0.11pt solid #c5d6e8" fo:border-top="0.11pt solid #c5d6e8" fo:border-bottom="0.11pt solid #c5d6e8" style:shadow="none"/>
    </style:style>
    <style:style style:name="P22" style:family="paragraph" style:parent-style-name="Standard">
      <loext:graphic-properties draw:fill="solid" draw:fill-color="#fae8e0"/>
      <style:paragraph-properties fo:margin-left="0.529cm" fo:margin-top="0.176cm" fo:margin-bottom="0.106cm" style:contextual-spacing="false" fo:text-align="center" style:justify-single-word="false" fo:background-color="#fae8e0" fo:padding="0cm" fo:border-left="3pt solid #c0572b" fo:border-right="0.11pt solid #fae8e0" fo:border-top="0.11pt solid #fae8e0" fo:border-bottom="0.11pt solid #fae8e0" style:shadow="none"/>
    </style:style>
    <style:style style:name="P23" style:family="paragraph" style:parent-style-name="Standard">
      <loext:graphic-properties draw:fill="solid" draw:fill-color="#fae8e0"/>
      <style:paragraph-properties fo:margin-left="0.529cm" fo:margin-top="0cm" fo:margin-bottom="0.282cm" style:contextual-spacing="false" fo:text-align="center" style:justify-single-word="false" fo:background-color="#fae8e0" fo:padding="0cm" fo:border-left="3pt solid #c0572b" fo:border-right="0.11pt solid #fae8e0" fo:border-top="0.11pt solid #fae8e0" fo:border-bottom="0.11pt solid #fae8e0" style:shadow="none"/>
    </style:style>
    <style:style style:name="P24" style:family="paragraph" style:parent-style-name="Standard">
      <loext:graphic-properties draw:fill="solid" draw:fill-color="#6a3a8c"/>
      <style:paragraph-properties fo:margin-left="0.353cm" fo:margin-top="0.564cm" fo:margin-bottom="0.282cm" style:contextual-spacing="false" fo:background-color="#6a3a8c" fo:padding="0cm" fo:border-left="2.49pt solid #6a3a8c" fo:border-right="0.11pt solid #c5d6e8" fo:border-top="0.11pt solid #c5d6e8" fo:border-bottom="0.11pt solid #c5d6e8" style:shadow="none"/>
    </style:style>
    <style:style style:name="P25" style:family="paragraph" style:parent-style-name="Standard">
      <style:paragraph-properties fo:margin-top="0.247cm" fo:margin-bottom="0.071cm" style:contextual-spacing="false"/>
    </style:style>
    <style:style style:name="P26" style:family="paragraph" style:parent-style-name="Standard">
      <loext:graphic-properties draw:fill="solid" draw:fill-color="#f2f2f2"/>
      <style:paragraph-properties fo:margin-left="0.353cm" fo:margin-top="0.212cm" fo:margin-bottom="0.212cm" style:contextual-spacing="false" fo:text-align="center" style:justify-single-word="false" fo:background-color="#f2f2f2" fo:padding="0cm" fo:border-left="2.49pt solid #6a3a8c" fo:border-right="0.11pt solid #c5d6e8" fo:border-top="0.11pt solid #c5d6e8" fo:border-bottom="0.11pt solid #c5d6e8" style:shadow="none"/>
    </style:style>
    <style:style style:name="P27" style:family="paragraph" style:parent-style-name="Standard">
      <style:paragraph-properties fo:margin-top="0cm" fo:margin-bottom="0.106cm" style:contextual-spacing="false"/>
    </style:style>
    <style:style style:name="P28" style:family="paragraph" style:parent-style-name="Standard">
      <style:paragraph-properties fo:margin-top="0.353cm" fo:margin-bottom="0cm" style:contextual-spacing="false"/>
    </style:style>
    <style:style style:name="P29" style:family="paragraph" style:parent-style-name="Standard">
      <style:paragraph-properties fo:margin-top="0.282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c5d6e8" fo:border-bottom="none"/>
    </style:style>
    <style:style style:name="T1" style:family="text">
      <style:text-properties fo:color="#1a3a5c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2" style:family="text">
      <style:text-properties fo:color="#2e75b6" loext:opacity="100%" style:font-name="Arial" fo:font-size="13pt" style:font-name-asian="Arial2" style:font-size-asian="13pt" style:font-name-complex="Arial2" style:font-size-complex="13pt"/>
    </style:style>
    <style:style style:name="T3" style:family="text">
      <style:text-properties fo:color="#4a4a4a" loext:opacity="100%" style:font-name="Arial" fo:font-size="10.5pt" style:font-name-asian="Arial2" style:font-size-asian="10.5pt" style:font-name-complex="Arial2" style:font-size-complex="10.5pt"/>
    </style:style>
    <style:style style:name="T4" style:family="text">
      <style:text-properties fo:color="#ffffff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5" style:family="text">
      <style:text-properties fo:color="#4a4a4a" loext:opacity="100%" style:font-name="Arial" fo:font-size="11pt" style:font-name-asian="Arial2" style:font-size-asian="11pt" style:font-name-complex="Arial2" style:font-size-complex="11pt"/>
    </style:style>
    <style:style style:name="T6" style:family="text">
      <style:text-properties fo:color="#4a4a4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7" style:family="text"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8" style:family="text">
      <style:text-properties fo:color="#4a4a4a" loext:opacity="100%" style:font-name="Arial" fo:font-size="12pt" style:font-name-asian="Arial2" style:font-size-asian="12pt" style:font-name-complex="Arial2" style:font-size-complex="12pt"/>
    </style:style>
    <style:style style:name="T9" style:family="text">
      <style:text-properties fo:color="#1a3a5c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0" style:family="text"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4a4a4a" loext:opacity="100%" style:font-name="Arial" fo:font-size="10pt" style:font-name-asian="Arial2" style:font-size-asian="10pt" style:font-name-complex="Arial2" style:font-size-complex="10pt"/>
    </style:style>
    <style:style style:name="T12" style:family="text">
      <style:text-properties fo:color="#4a4a4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7808c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4" style:family="text">
      <style:text-properties fo:color="#17808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5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" style:family="text">
      <style:text-properties fo:color="#4a4a4a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7" style:family="text">
      <style:text-properties fo:color="#4a4a4a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18" style:family="text">
      <style:text-properties fo:color="#c0572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9" style:family="text">
      <style:text-properties fo:color="#c0572b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0" style:family="text">
      <style:text-properties fo:color="#4a4a4a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21" style:family="text">
      <style:text-properties fo:color="#c057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6a3a8c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6a3a8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color="#4a4a4a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5" style:family="text">
      <style:text-properties fo:color="#c0392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6" style:family="text">
      <style:text-properties fo:color="#1f7a4d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7" style:family="text">
      <style:text-properties fo:color="#2e75b6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T28" style:family="text">
      <style:text-properties fo:color="#17808c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T29" style:family="text">
      <style:text-properties fo:color="#c0572b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T30" style:family="text">
      <style:text-properties fo:color="#6a3a8c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T31" style:family="text">
      <style:text-properties fo:color="#ffffff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T32" style:family="text">
      <style:text-properties fo:color="#aaaaaa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企業資安入門筆記</text:span></text:p>
      <text:p text:style-name="P3"><text:span text:style-name="T2">EDR・MDR・MITRE ATT&amp;CK・數位韌性</text:span></text:p>
      <text:p text:style-name="P4"><text:span text:style-name="T3">超級新手友善版｜一看就懂的資安防護概念</text:span></text:p>
      <text:p text:style-name="P5"><text:span text:style-name="T4">📌 <text:s/>先了解大背景：資安的世界變了</text:span></text:p>
      <text:p text:style-name="P6"><text:span text:style-name="T5">以前，大家以為裝了防毒軟體就萬無一失；但現代駭客的手法早已大幅進化。他們不一定會放病毒，而是：</text:span></text:p>
      <text:list text:style-name="WWNum2">
        <text:list-item text:start-value="1">
          <text:p text:style-name="P7"><text:span text:style-name="T6">偷取登入帳號，偽裝成正常使用者</text:span></text:p>
        </text:list-item>
        <text:list-item>
          <text:p text:style-name="P7"><text:span text:style-name="T6">慢慢滲透，長期潛伏於系統內部</text:span></text:p>
        </text:list-item>
        <text:list-item>
          <text:p text:style-name="P7"><text:span text:style-name="T6">利用合法工具發動攻擊，難以察覺</text:span></text:p>
        </text:list-item>
      </text:list>
      <text:p text:style-name="P8"/>
      <text:p text:style-name="P6"><text:span text:style-name="T5">因此，現代資安的核心重點已從「防毒」轉向——</text:span></text:p>
      <text:p text:style-name="P9"><text:span text:style-name="T7">🔥 <text:s/>持續監控電腦行為，即時偵測並快速應變</text:span></text:p>
      <text:p text:style-name="P10"><text:span text:style-name="T4">🛡 <text:s/>第一部分：EDR — 自行監控的資安工具</text:span></text:p>
      <text:p text:style-name="P11"><text:span text:style-name="T7">什麼是 EDR？</text:span></text:p>
      <text:p text:style-name="P6"><text:span text:style-name="T7">EDR</text:span><text:span text:style-name="T8"> 全名：</text:span><text:span text:style-name="T9">Endpoint Detection and Response</text:span></text:p>
      <table:table table:name="表格1" table:style-name="表格1">
        <table:table-column table:style-name="表格1.A"/>
        <table:table-column table:style-name="表格1.B" table:number-columns-repeated="2"/>
        <table:table-row table:style-name="表格1.1">
          <table:table-cell table:style-name="表格1.A1" office:value-type="string">
            <text:p text:style-name="P12"><text:span text:style-name="T10">Endpoint</text:span></text:p>
            <text:p text:style-name="P12"><text:span text:style-name="T11">端點（電腦、伺服器）</text:span></text:p>
          </table:table-cell>
          <table:table-cell table:style-name="表格1.A1" office:value-type="string">
            <text:p text:style-name="P12"><text:span text:style-name="T10">Detection</text:span></text:p>
            <text:p text:style-name="P12"><text:span text:style-name="T11">偵測異常行為</text:span></text:p>
          </table:table-cell>
          <table:table-cell table:style-name="表格1.A1" office:value-type="string">
            <text:p text:style-name="P12"><text:span text:style-name="T10">Response</text:span></text:p>
            <text:p text:style-name="P12"><text:span text:style-name="T11">即時回應處理</text:span></text:p>
          </table:table-cell>
        </table:table-row>
      </table:table>
      <text:p text:style-name="P13"/>
      <text:p text:style-name="P11"><text:span text:style-name="T7">白話比喻</text:span></text:p>
      <text:p text:style-name="P6"><text:span text:style-name="T5">想像公司每台電腦旁邊都站著一位保全，全程監視以下行為：</text:span></text:p>
      <text:list text:continue-numbering="true" text:style-name="WWNum2">
        <text:list-item>
          <text:p text:style-name="P7"><text:span text:style-name="T6">有人開啟可疑程式或大量加密檔案</text:span></text:p>
        </text:list-item>
        <text:list-item>
          <text:p text:style-name="P7"><text:span text:style-name="T6">有程式偷偷對外連線（例如連到境外 IP）</text:span></text:p>
        </text:list-item>
        <text:list-item>
          <text:p text:style-name="P7"><text:span text:style-name="T6">有系統檔案被異常修改</text:span></text:p>
        </text:list-item>
      </text:list>
      <text:p text:style-name="P14"/>
      <text:p text:style-name="P11"><text:span text:style-name="T7">EDR 的三大偵測範圍</text:span></text:p>
      <text:list xml:id="list222728602279519" text:continue-numbering="true" text:style-name="WWNum2">
        <text:list-item>
          <text:p text:style-name="P7"><text:span text:style-name="T12">檔案行為：大量加密或修改系統檔案 → 可能是勒索病毒</text:span></text:p>
        </text:list-item>
      </text:list>
      <text:list xml:id="list3312787980" text:style-name="WWNum3">
        <text:list-item text:start-value="1">
          <text:p text:style-name="P15"><text:span text:style-name="T11">例：所有文件突然被加密並要求付款</text:span></text:p>
        </text:list-item>
      </text:list>
      <text:list xml:id="list222727767405876" text:continue-list="list222728602279519" text:style-name="WWNum2">
        <text:list-item>
          <text:p text:style-name="P7"><text:span text:style-name="T12">程式行為：Office 軟體偷偷開啟命令列工具 → 明顯異常</text:span></text:p>
        </text:list-item>
      </text:list>
      <text:list xml:id="list222728843789879" text:continue-list="list3312787980" text:style-name="WWNum3">
        <text:list-item>
          <text:p text:style-name="P15"><text:span text:style-name="T11">例：Word 開啟 PowerShell 執行指令</text:span></text:p>
        </text:list-item>
      </text:list>
      <text:list xml:id="list222728818158663" text:continue-list="list222727767405876" text:style-name="WWNum2">
        <text:list-item>
          <text:p text:style-name="P7"><text:span text:style-name="T12">網路行為：電腦突然連線至境外 IP → 可能已遭入侵</text:span></text:p>
        </text:list-item>
      </text:list>
      <text:list text:continue-list="list222728843789879" text:style-name="WWNum3">
        <text:list-item>
          <text:p text:style-name="P15"><text:span text:style-name="T11">例：自動連線至俄羅斯或朝鮮的 IP 位址</text:span></text:p>
        </text:list-item>
      </text:list>
      <text:p text:style-name="P14"/>
      <text:p text:style-name="P11"><text:span text:style-name="T7">EDR 的三大回應動作</text:span></text:p>
      <text:list text:continue-list="list222728818158663" text:style-name="WWNum2">
        <text:list-item>
          <text:p text:style-name="P7"><text:span text:style-name="T6">中斷程序：立即殺掉可疑的惡意程式</text:span></text:p>
        </text:list-item>
        <text:list-item>
          <text:p text:style-name="P7"><text:span text:style-name="T6">隔離主機：切斷該電腦與公司內網的連線，防止病毒擴散</text:span></text:p>
        </text:list-item>
        <text:list-item>
          <text:p text:style-name="P7"><text:span text:style-name="T6">封鎖連線：禁止電腦與駭客伺服器通訊</text:span></text:p>
        </text:list-item>
      </text:list>
      <text:p text:style-name="P16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Standard"><text:span text:style-name="T10">💡 核心觀念： <text:s/></text:span><text:span text:style-name="T5">EDR 是「買工具、自己守」。企業需要有內部資安人員負責查看警報並處理事件。</text:span></text:p>
          </table:table-cell>
        </table:table-row>
      </table:table>
      <text:p text:style-name="P17"><text:span text:style-name="T4">👥 <text:s/>第二部分：MDR — 委外的資安託管服務</text:span></text:p>
      <text:p text:style-name="P11"><text:span text:style-name="T13">什麼是 MDR？</text:span></text:p>
      <text:p text:style-name="P18"><text:span text:style-name="T13">MDR</text:span><text:span text:style-name="T8"> 全名：</text:span><text:span text:style-name="T9">Managed Detection and Response</text:span></text:p>
      <text:p text:style-name="P6"><text:span text:style-name="T5">重點就在「Managed（託管）」這個字——你不需要自己有資安團隊，直接花錢請外部資安公司 24 小時幫你守。</text:span></text:p>
      <text:p text:style-name="P19"/>
      <text:p text:style-name="P11"><text:span text:style-name="T13">MDR 服務包含哪些？</text:span></text:p>
      <text:list text:continue-numbering="true" text:style-name="WWNum2">
        <text:list-item>
          <text:p text:style-name="P7"><text:span text:style-name="T12">SOC（資安監控中心）：由一群專業資安人員 24 小時盯著警報、網路流量與可疑行為</text:span></text:p>
        </text:list-item>
        <text:list-item>
          <text:p text:style-name="P7"><text:span text:style-name="T12">IDS（入侵偵測系統）：像門口的警報器，只要有可疑入侵行為就立即發出警告</text:span></text:p>
        </text:list-item>
        <text:list-item>
          <text:p text:style-name="P7"><text:span text:style-name="T12">漏洞掃描：定期幫企業找出過期系統、未更新漏洞、弱密碼等風險點</text:span></text:p>
        </text:list-item>
      </text:list>
      <text:p text:style-name="P14"/>
      <text:p text:style-name="P11"><text:span text:style-name="T13">MDR 的應變服務</text:span></text:p>
      <text:list text:continue-numbering="true" text:style-name="WWNum2">
        <text:list-item>
          <text:p text:style-name="P7"><text:span text:style-name="T6">威脅分析：研判是勒索病毒、帳號竊取還是其他類型的攻擊</text:span></text:p>
        </text:list-item>
        <text:list-item>
          <text:p text:style-name="P7"><text:span text:style-name="T6">應變建議：告訴你下一步該怎麼做（例如：立刻斷網）</text:span></text:p>
        </text:list-item>
        <text:list-item>
          <text:p text:style-name="P7"><text:span text:style-name="T6">事件處理：遠端隔離受感染主機、清除惡意程式、調查攻擊來源</text:span></text:p>
        </text:list-item>
      </text:list>
      <text:p text:style-name="P16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Standard"><text:span text:style-name="T14">💡 核心觀念： <text:s/></text:span><text:span text:style-name="T5">MDR 是「請保全公司、委外守」。不需要自建資安團隊，特別適合中小企業。</text:span></text:p>
          </table:table-cell>
        </table:table-row>
      </table:table>
      <text:p text:style-name="P20"/>
      <text:p text:style-name="P11"><text:span text:style-name="T9">EDR vs MDR 一眼看清楚</text:span>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2"><text:span text:style-name="T15">比較項目</text:span></text:p>
          </table:table-cell>
          <table:table-cell table:style-name="表格4.B1" office:value-type="string">
            <text:p text:style-name="P12"><text:span text:style-name="T15">EDR</text:span></text:p>
          </table:table-cell>
          <table:table-cell table:style-name="表格4.C1" office:value-type="string">
            <text:p text:style-name="P12"><text:span text:style-name="T15">MDR</text:span></text:p>
          </table:table-cell>
        </table:table-row>
        <table:table-row table:style-name="表格4.1">
          <table:table-cell table:style-name="表格4.A2" office:value-type="string">
            <text:p text:style-name="P12"><text:span text:style-name="T16">管理方式</text:span></text:p>
          </table:table-cell>
          <table:table-cell table:style-name="表格4.B2" office:value-type="string">
            <text:p text:style-name="P12"><text:span text:style-name="T17">自行管理</text:span></text:p>
          </table:table-cell>
          <table:table-cell table:style-name="表格4.B2" office:value-type="string">
            <text:p text:style-name="P12"><text:span text:style-name="T17">委外管理</text:span></text:p>
          </table:table-cell>
        </table:table-row>
        <table:table-row table:style-name="表格4.1">
          <table:table-cell table:style-name="表格4.A2" office:value-type="string">
            <text:p text:style-name="P12"><text:span text:style-name="T16">監控時間</text:span></text:p>
          </table:table-cell>
          <table:table-cell table:style-name="表格4.B2" office:value-type="string">
            <text:p text:style-name="P12"><text:span text:style-name="T17">視團隊而定</text:span></text:p>
          </table:table-cell>
          <table:table-cell table:style-name="表格4.B2" office:value-type="string">
            <text:p text:style-name="P12"><text:span text:style-name="T17">24 / 7 全天</text:span></text:p>
          </table:table-cell>
        </table:table-row>
        <table:table-row table:style-name="表格4.1">
          <table:table-cell table:style-name="表格4.A2" office:value-type="string">
            <text:p text:style-name="P12"><text:span text:style-name="T16">所需能力</text:span></text:p>
          </table:table-cell>
          <table:table-cell table:style-name="表格4.B2" office:value-type="string">
            <text:p text:style-name="P12"><text:span text:style-name="T17">需內部資安人員</text:span></text:p>
          </table:table-cell>
          <table:table-cell table:style-name="表格4.B2" office:value-type="string">
            <text:p text:style-name="P12"><text:span text:style-name="T17">無須自建團隊</text:span></text:p>
          </table:table-cell>
        </table:table-row>
        <table:table-row table:style-name="表格4.1">
          <table:table-cell table:style-name="表格4.A2" office:value-type="string">
            <text:p text:style-name="P12"><text:span text:style-name="T16">適合對象</text:span></text:p>
          </table:table-cell>
          <table:table-cell table:style-name="表格4.B2" office:value-type="string">
            <text:p text:style-name="P12"><text:span text:style-name="T17">大型企業</text:span></text:p>
          </table:table-cell>
          <table:table-cell table:style-name="表格4.B2" office:value-type="string">
            <text:p text:style-name="P12"><text:span text:style-name="T17">中小企業</text:span></text:p>
          </table:table-cell>
        </table:table-row>
        <table:table-row table:style-name="表格4.1">
          <table:table-cell table:style-name="表格4.A2" office:value-type="string">
            <text:p text:style-name="P12"><text:span text:style-name="T16">成本模式</text:span></text:p>
          </table:table-cell>
          <table:table-cell table:style-name="表格4.B2" office:value-type="string">
            <text:p text:style-name="P12"><text:span text:style-name="T17">工具費 + 人力</text:span></text:p>
          </table:table-cell>
          <table:table-cell table:style-name="表格4.B2" office:value-type="string">
            <text:p text:style-name="P12"><text:span text:style-name="T17">月費 / 年費訂閱</text:span></text:p>
          </table:table-cell>
        </table:table-row>
      </table:table>
      <text:p text:style-name="P21"><text:span text:style-name="T4">📖 <text:s/>第三部分：MITRE ATT&amp;CK — 駭客招式大全</text:span></text:p>
      <text:p text:style-name="P11"><text:span text:style-name="T18">什麼是 MITRE ATT&amp;CK？</text:span></text:p>
      <text:p text:style-name="P6"><text:span text:style-name="T5">資安界發現，駭客的攻擊模式其實相當固定，例如：先寄釣魚信、偷帳號、開後門、橫向移動、最後竊取資料。</text:span></text:p>
      <text:p text:style-name="P6"><text:span text:style-name="T5">於是 MITRE 公司將所有已知的駭客攻擊手法，整理成一個全球通用的知識庫，稱為：</text:span></text:p>
      <text:p text:style-name="P22"><text:span text:style-name="T19">MITRE ATT&amp;CK</text:span></text:p>
      <text:p text:style-name="P23"><text:span text:style-name="T20">Adversarial Tactics, Techniques, and Common Knowledge</text:span></text:p>
      <text:p text:style-name="P11"><text:soft-page-break/><text:span text:style-name="T18">TTP 是什麼？</text:span></text:p>
      <table:table table:name="表格5" table:style-name="表格5">
        <table:table-column table:style-name="表格5.A"/>
        <table:table-column table:style-name="表格5.B" table:number-columns-repeated="2"/>
        <table:table-row table:style-name="表格5.1">
          <table:table-cell table:style-name="表格5.A1" office:value-type="string">
            <text:p text:style-name="P12"><text:span text:style-name="T21">T - Tactics</text:span></text:p>
            <text:p text:style-name="P12"><text:span text:style-name="T11">戰術（攻擊目的）</text:span></text:p>
          </table:table-cell>
          <table:table-cell table:style-name="表格5.A1" office:value-type="string">
            <text:p text:style-name="P12"><text:span text:style-name="T21">T - Techniques</text:span></text:p>
            <text:p text:style-name="P12"><text:span text:style-name="T11">技術（使用方法）</text:span></text:p>
          </table:table-cell>
          <table:table-cell table:style-name="表格5.A1" office:value-type="string">
            <text:p text:style-name="P12"><text:span text:style-name="T21">P - Procedures</text:span></text:p>
            <text:p text:style-name="P12"><text:span text:style-name="T11">流程（實際操作步驟）</text:span></text:p>
          </table:table-cell>
        </table:table-row>
      </table:table>
      <text:p text:style-name="P13"/>
      <text:p text:style-name="P11"><text:span text:style-name="T18">ATT&amp;CK 的三大用途</text:span></text:p>
      <text:list text:continue-numbering="true" text:style-name="WWNum2">
        <text:list-item>
          <text:p text:style-name="P7"><text:span text:style-name="T6">威脅分析：了解目前攻擊對應哪一種駭客手法，快速定性事件性質</text:span></text:p>
        </text:list-item>
        <text:list-item>
          <text:p text:style-name="P7"><text:span text:style-name="T6">防禦對應：針對常見攻擊手法（如 PowerShell 攻擊）加強特定監控</text:span></text:p>
        </text:list-item>
        <text:list-item>
          <text:p text:style-name="P7"><text:span text:style-name="T6">主動防禦：根據駭客行為模式，預測下一步，提前部署防線</text:span></text:p>
        </text:list-item>
      </text:list>
      <text:p text:style-name="P16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Standard"><text:span text:style-name="T21">💡 核心觀念： <text:s/></text:span><text:span text:style-name="T5">ATT&amp;CK 就像「警察研究犯罪手法的教材」——整理成冊，讓所有人都能對照使用。</text:span></text:p>
          </table:table-cell>
        </table:table-row>
      </table:table>
      <text:p text:style-name="P24"><text:span text:style-name="T4">💪 <text:s/>第四部分：數位韌性（Digital Resilience）</text:span></text:p>
      <text:p text:style-name="P11"><text:span text:style-name="T22">觀念轉變</text:span>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12"><text:span text:style-name="T12">❌ <text:s/>以前的想法</text:span></text:p>
            <text:p text:style-name="P12"><text:span text:style-name="T5">「不能被攻擊」</text:span></text:p>
            <text:p text:style-name="P12"><text:span text:style-name="T11">重點：阻止所有入侵</text:span></text:p>
          </table:table-cell>
          <table:table-cell table:style-name="表格7.B1" office:value-type="string">
            <text:p text:style-name="P12"><text:span text:style-name="T23">✅ <text:s/>現在的思維</text:span></text:p>
            <text:p text:style-name="P12"><text:span text:style-name="T23">「被打了還能撐住並快速恢復」</text:span></text:p>
            <text:p text:style-name="P12"><text:span text:style-name="T11">重點：強化復原能力</text:span></text:p>
          </table:table-cell>
        </table:table-row>
      </table:table>
      <text:p text:style-name="P25"/>
      <text:p text:style-name="P11"><text:span text:style-name="T22">數位韌性的核心循環</text:span></text:p>
      <text:p text:style-name="P6"><text:span text:style-name="T5">現代資安不再是一道牆，而是一個持續運作的防護循環：</text:span></text:p>
      <text:p text:style-name="P26"><text:span text:style-name="T7">🔵 預防</text:span><text:span text:style-name="T24"> <text:s/>→ <text:s/></text:span><text:span text:style-name="T18">🟡 偵測</text:span><text:span text:style-name="T24"> <text:s/>→ <text:s/></text:span><text:span text:style-name="T25">🔴 回應</text:span><text:span text:style-name="T24"> <text:s/>→ <text:s/></text:span><text:span text:style-name="T26">🟢 復原</text:span></text:p>
      <text:p text:style-name="P19"/>
      <text:p text:style-name="P11"><text:span text:style-name="T22">實際例子</text:span></text:p>
      <text:p text:style-name="P6"><text:span text:style-name="T5">假設公司遭受勒索病毒攻擊，「有韌性」的公司會是：</text:span></text:p>
      <text:list text:continue-numbering="true" text:style-name="WWNum2">
        <text:list-item>
          <text:p text:style-name="P7"><text:span text:style-name="T6">備份完整且未受感染，可立即還原</text:span></text:p>
        </text:list-item>
        <text:list-item>
          <text:p text:style-name="P7"><text:span text:style-name="T6">重要系統能快速切換至備援環境</text:span></text:p>
        </text:list-item>
        <text:list-item>
          <text:p text:style-name="P7"><text:span text:style-name="T6">攻擊發生後幾小時內恢復正常營運</text:span></text:p>
        </text:list-item>
      </text:list>
      <text:p text:style-name="P16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Standard"><text:span text:style-name="T23">💡 核心觀念： <text:s/></text:span><text:span text:style-name="T5">數位韌性就像「地震後的快速重建能力」——不是說不會有地震，而是震後能迅速站起來。</text:span></text:p>
          </table:table-cell>
        </table:table-row>
      </table:table>
      <text:p text:style-name="P5"><text:span text:style-name="T4">📝 <text:s/>總結：超白話一行記憶法</text:span></text:p>
      <text:p text:style-name="P6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2"><text:span text:style-name="T27">🛡 <text:s/>EDR</text:span></text:p>
          </table:table-cell>
          <table:table-cell table:style-name="表格9.B1" office:value-type="string">
            <text:p text:style-name="Standard"><text:span text:style-name="T3">自行購買工具，監控企業電腦端點行為，即時偵測並自動回應威脅。</text:span></text:p>
          </table:table-cell>
        </table:table-row>
        <table:table-row table:style-name="表格9.1">
          <table:table-cell table:style-name="表格9.A2" office:value-type="string">
            <text:p text:style-name="P12"><text:span text:style-name="T28">👥 MDR</text:span></text:p>
          </table:table-cell>
          <table:table-cell table:style-name="表格9.B2" office:value-type="string">
            <text:p text:style-name="Standard"><text:span text:style-name="T3">委託外部專業資安公司，全天候代為監控、分析威脅並協助應變。</text:span></text:p>
          </table:table-cell>
        </table:table-row>
        <table:table-row table:style-name="表格9.1">
          <table:table-cell table:style-name="表格9.A3" office:value-type="string">
            <text:p text:style-name="P12"><text:span text:style-name="T29">📖 MITRE ATT&amp;CK</text:span></text:p>
          </table:table-cell>
          <table:table-cell table:style-name="表格9.B3" office:value-type="string">
            <text:p text:style-name="Standard"><text:span text:style-name="T3">全球通用的駭客攻擊手法知識庫，協助企業了解並防禦常見攻擊套路。</text:span></text:p>
          </table:table-cell>
        </table:table-row>
        <text:soft-page-break/>
        <table:table-row table:style-name="表格9.1">
          <table:table-cell table:style-name="表格9.A4" office:value-type="string">
            <text:p text:style-name="P12"><text:span text:style-name="T30">💪 數位韌性</text:span></text:p>
          </table:table-cell>
          <table:table-cell table:style-name="表格9.B4" office:value-type="string">
            <text:p text:style-name="Standard"><text:span text:style-name="T3">不求零失誤，而是確保遭受攻擊後能快速復原、持續運作的能力。</text:span></text:p>
          </table:table-cell>
        </table:table-row>
      </table:table>
      <text:p text:style-name="P11"/>
      <text:p text:style-name="P2"><text:span text:style-name="T12">考試 / 面試速記版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7"><text:span text:style-name="T31">🛡 <text:s/>EDR　　→　自己買工具守</text:span></text:p>
            <text:p text:style-name="P27"><text:span text:style-name="T31">👥 MDR　　→　請公司幫你守</text:span></text:p>
            <text:p text:style-name="P27"><text:span text:style-name="T31">📖 ATT&amp;CK →　駭客招式教材</text:span></text:p>
            <text:p text:style-name="Standard"><text:span text:style-name="T31">💪 韌性　　→　撐住、快速復原</text:span></text:p>
          </table:table-cell>
        </table:table-row>
      </table:table>
      <text:p text:style-name="P28"/>
      <text:p text:style-name="P29"><text:span text:style-name="T32">本筆記由 Claude 整理製作｜資安觀念入門系列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4a4a4a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4a4a4a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494cm" fo:margin-bottom="0.247cm" style:contextual-spacing="false"/>
      <style:text-properties fo:color="#1a3a5c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53cm" fo:margin-bottom="0.176c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0.988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623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117cm" fo:margin-bottom="2.117cm" fo:margin-left="2.469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5-06T14:25:43.161000000</meta:creation-date>
    <dc:date>2026-05-06T14:25:43.161000000</dc:date>
    <meta:document-statistic meta:table-count="10" meta:image-count="0" meta:object-count="0" meta:page-count="4" meta:paragraph-count="118" meta:word-count="1671" meta:character-count="2136" meta:non-whitespace-character-count="1990"/>
    <meta:generator>LibreOffice/26.2.2.2$Windows_X86_64 LibreOffice_project/1f77d10d6938fd34972958f64b2bcfa54f8b1ba5</meta:generator>
  </office:meta>
</office:document-meta>
</file>