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768cm" fo:margin-left="0cm" fo:margin-top="0cm" fo:margin-bottom="0cm" table:align="left" style:writing-mode="page"/>
    </style:style>
    <style:style style:name="表格1.A" style:family="table-column">
      <style:table-column-properties style:column-width="16.76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ff6ff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3a6b" fo:padding-left="0.423cm" fo:padding-right="0.423cm" fo:padding-top="0.212cm" fo:padding-bottom="0.212cm" fo:border="none">
        <style:background-image/>
      </style:table-cell-properties>
    </style:style>
    <style:style style:name="表格4" style:family="table">
      <style:table-properties style:width="16.51cm" fo:margin-left="0.035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eafe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5" style:family="table">
      <style:table-properties style:width="16.51cm" fo:margin-left="0.018cm" fo:margin-top="0cm" fo:margin-bottom="0cm" table:align="left" style:writing-mode="page"/>
    </style:style>
    <style:style style:name="表格5.A" style:family="table-column">
      <style:table-column-properties style:column-width="4.937cm"/>
    </style:style>
    <style:style style:name="表格5.B" style:family="table-column">
      <style:table-column-properties style:column-width="11.57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5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5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eafe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7" style:family="table">
      <style:table-properties style:width="16.51cm" fo:margin-left="0.018cm" fo:margin-top="0cm" fo:margin-bottom="0cm" table:align="left" style:writing-mode="page"/>
    </style:style>
    <style:style style:name="表格7.A" style:family="table-column">
      <style:table-column-properties style:column-width="4.937cm"/>
    </style:style>
    <style:style style:name="表格7.B" style:family="table-column">
      <style:table-column-properties style:column-width="11.57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7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7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8" style:family="table">
      <style:table-properties style:width="16.51cm" fo:margin-left="0.018cm" fo:margin-top="0cm" fo:margin-bottom="0cm" table:align="left" style:writing-mode="page"/>
    </style:style>
    <style:style style:name="表格8.A" style:family="table-column">
      <style:table-column-properties style:column-width="4.937cm"/>
    </style:style>
    <style:style style:name="表格8.B" style:family="table-column">
      <style:table-column-properties style:column-width="11.57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8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8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eafe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e6b3e" fo:padding-left="0.423cm" fo:padding-right="0.423cm" fo:padding-top="0.212cm" fo:padding-bottom="0.212cm" fo:border="none">
        <style:background-image/>
      </style:table-cell-properties>
    </style:style>
    <style:style style:name="表格11" style:family="table">
      <style:table-properties style:width="16.51cm" fo:margin-left="0.018cm" fo:margin-top="0cm" fo:margin-bottom="0cm" table:align="left" style:writing-mode="page"/>
    </style:style>
    <style:style style:name="表格11.A" style:family="table-column">
      <style:table-column-properties style:column-width="4.937cm"/>
    </style:style>
    <style:style style:name="表格11.B" style:family="table-column">
      <style:table-column-properties style:column-width="11.57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1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1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cfce7" fo:padding-left="0.353cm" fo:padding-right="0.353cm" fo:padding-top="0.212cm" fo:padding-bottom="0.212cm" fo:border-left="2pt solid #1e6b3e" fo:border-right="0.5pt solid #1e6b3e" fo:border-top="1pt solid #1e6b3e" fo:border-bottom="0.5pt solid #1e6b3e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7c2d12" fo:padding-left="0.423cm" fo:padding-right="0.423cm" fo:padding-top="0.212cm" fo:padding-bottom="0.212cm" fo:border="none">
        <style:background-image/>
      </style:table-cell-properties>
    </style:style>
    <style:style style:name="表格14" style:family="table">
      <style:table-properties style:width="16.51cm" fo:margin-left="0.035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edd5" fo:padding-left="0.353cm" fo:padding-right="0.353cm" fo:padding-top="0.212cm" fo:padding-bottom="0.212cm" fo:border-left="2pt solid #7c2d12" fo:border-right="0.5pt solid #7c2d12" fo:border-top="1pt solid #7c2d12" fo:border-bottom="0.5pt solid #7c2d12">
        <style:background-image/>
      </style:table-cell-properties>
    </style:style>
    <style:style style:name="表格15" style:family="table">
      <style:table-properties style:width="16.51cm" fo:margin-left="0.018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57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5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5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edd5" fo:padding-left="0.353cm" fo:padding-right="0.353cm" fo:padding-top="0.212cm" fo:padding-bottom="0.212cm" fo:border-left="2pt solid #7c2d12" fo:border-right="0.5pt solid #7c2d12" fo:border-top="1pt solid #7c2d12" fo:border-bottom="0.5pt solid #7c2d12">
        <style:background-image/>
      </style:table-cell-properties>
    </style:style>
    <style:style style:name="表格17" style:family="table">
      <style:table-properties style:width="16.51cm" fo:margin-left="0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581c87" fo:padding-left="0.423cm" fo:padding-right="0.423cm" fo:padding-top="0.212cm" fo:padding-bottom="0.212cm" fo:border="none">
        <style:background-image/>
      </style:table-cell-properties>
    </style:style>
    <style:style style:name="表格18" style:family="table">
      <style:table-properties style:width="16.51cm" fo:margin-left="0.018cm" fo:margin-top="0cm" fo:margin-bottom="0cm" table:align="left" style:writing-mode="page"/>
    </style:style>
    <style:style style:name="表格18.A" style:family="table-column">
      <style:table-column-properties style:column-width="4.937cm"/>
    </style:style>
    <style:style style:name="表格18.B" style:family="table-column">
      <style:table-column-properties style:column-width="11.57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18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18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19" style:family="table">
      <style:table-properties style:width="16.51cm" fo:margin-left="0.035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3e8ff" fo:padding-left="0.353cm" fo:padding-right="0.353cm" fo:padding-top="0.212cm" fo:padding-bottom="0.212cm" fo:border-left="2pt solid #581c87" fo:border-right="0.5pt solid #581c87" fo:border-top="1pt solid #581c87" fo:border-bottom="0.5pt solid #581c87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0f5132" fo:padding-left="0.423cm" fo:padding-right="0.423cm" fo:padding-top="0.212cm" fo:padding-bottom="0.212cm" fo:border="none">
        <style:background-image/>
      </style:table-cell-properties>
    </style:style>
    <style:style style:name="表格21" style:family="table">
      <style:table-properties style:width="16.51cm" fo:margin-left="0.018cm" fo:margin-top="0cm" fo:margin-bottom="0cm" table:align="left" style:writing-mode="page"/>
    </style:style>
    <style:style style:name="表格21.A" style:family="table-column">
      <style:table-column-properties style:column-width="4.937cm"/>
    </style:style>
    <style:style style:name="表格21.B" style:family="table-column">
      <style:table-column-properties style:column-width="11.573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1.A2" style:family="table-cell">
      <style:table-cell-properties fo:background-color="#f3f4f6" fo:padding-left="0.282cm" fo:padding-right="0.282cm" fo:padding-top="0.176cm" fo:padding-bottom="0.176cm" fo:border="0.5pt solid #cbd5e1">
        <style:background-image/>
      </style:table-cell-properties>
    </style:style>
    <style:style style:name="表格21.B2" style:family="table-cell">
      <style:table-cell-properties fo:background-color="#ffffff" fo:padding-left="0.282cm" fo:padding-right="0.282cm" fo:padding-top="0.176cm" fo:padding-bottom="0.176cm" fo:border="0.5pt solid #cbd5e1">
        <style:background-image/>
      </style:table-cell-properties>
    </style:style>
    <style:style style:name="表格22" style:family="table">
      <style:table-properties style:width="16.51cm" fo:margin-left="0.018cm" fo:margin-top="0cm" fo:margin-bottom="0cm" table:align="left" style:writing-mode="page"/>
    </style:style>
    <style:style style:name="表格22.A" style:family="table-column">
      <style:table-column-properties style:column-width="4.937cm"/>
    </style:style>
    <style:style style:name="表格22.B" style:family="table-column">
      <style:table-column-properties style:column-width="11.573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2.A2" style:family="table-cell">
      <style:table-cell-properties fo:background-color="#f3f4f6" fo:padding-left="0.282cm" fo:padding-right="0.282cm" fo:padding-top="0.176cm" fo:padding-bottom="0.176cm" fo:border="0.5pt solid #cbd5e1">
        <style:background-image/>
      </style:table-cell-properties>
    </style:style>
    <style:style style:name="表格22.B2" style:family="table-cell">
      <style:table-cell-properties fo:background-color="#ffffff" fo:padding-left="0.282cm" fo:padding-right="0.282cm" fo:padding-top="0.176cm" fo:padding-bottom="0.176cm" fo:border="0.5pt solid #cbd5e1">
        <style:background-image/>
      </style:table-cell-properties>
    </style:style>
    <style:style style:name="表格23" style:family="table">
      <style:table-properties style:width="16.51cm" fo:margin-left="0.018cm" fo:margin-top="0cm" fo:margin-bottom="0cm" table:align="left" style:writing-mode="page"/>
    </style:style>
    <style:style style:name="表格23.A" style:family="table-column">
      <style:table-column-properties style:column-width="4.937cm"/>
    </style:style>
    <style:style style:name="表格23.B" style:family="table-column">
      <style:table-column-properties style:column-width="11.573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3.A2" style:family="table-cell">
      <style:table-cell-properties fo:background-color="#f3f4f6" fo:padding-left="0.282cm" fo:padding-right="0.282cm" fo:padding-top="0.141cm" fo:padding-bottom="0.141cm" fo:border="0.5pt solid #cbd5e1">
        <style:background-image/>
      </style:table-cell-properties>
    </style:style>
    <style:style style:name="表格23.B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1fae5" fo:padding-left="0.353cm" fo:padding-right="0.353cm" fo:padding-top="0.212cm" fo:padding-bottom="0.212cm" fo:border-left="2pt solid #0f5132" fo:border-right="0.5pt solid #0f5132" fo:border-top="1pt solid #0f5132" fo:border-bottom="0.5pt solid #0f5132">
        <style:background-image/>
      </style:table-cell-properties>
    </style:style>
    <style:style style:name="表格25" style:family="table">
      <style:table-properties style:width="16.51cm" fo:margin-left="0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c2626" fo:padding-left="0.423cm" fo:padding-right="0.423cm" fo:padding-top="0.212cm" fo:padding-bottom="0.212cm" fo:border="none">
        <style:background-image/>
      </style:table-cell-properties>
    </style:style>
    <style:style style:name="表格26" style:family="table">
      <style:table-properties style:width="16.51cm" fo:margin-left="0.018cm" fo:margin-top="0cm" fo:margin-bottom="0cm" table:align="left" style:writing-mode="page"/>
    </style:style>
    <style:style style:name="表格26.A" style:family="table-column">
      <style:table-column-properties style:column-width="5.50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c2626" fo:padding-left="0.282cm" fo:padding-right="0.282cm" fo:padding-top="0.141cm" fo:padding-bottom="0.141cm" fo:border="1pt solid #dc2626">
        <style:background-image/>
      </style:table-cell-properties>
    </style:style>
    <style:style style:name="表格26.B1" style:family="table-cell">
      <style:table-cell-properties fo:background-color="#166534" fo:padding-left="0.282cm" fo:padding-right="0.282cm" fo:padding-top="0.141cm" fo:padding-bottom="0.141cm" fo:border="1pt solid #166534">
        <style:background-image/>
      </style:table-cell-properties>
    </style:style>
    <style:style style:name="表格26.C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6.A2" style:family="table-cell">
      <style:table-cell-properties fo:background-color="#ffffff" fo:padding-left="0.282cm" fo:padding-right="0.282cm" fo:padding-top="0.141cm" fo:padding-bottom="0.141cm" fo:border="0.5pt solid #fecaca">
        <style:background-image/>
      </style:table-cell-properties>
    </style:style>
    <style:style style:name="表格26.B2" style:family="table-cell">
      <style:table-cell-properties fo:background-color="#ffffff" fo:padding-left="0.282cm" fo:padding-right="0.282cm" fo:padding-top="0.141cm" fo:padding-bottom="0.141cm" fo:border="0.5pt solid #bbf7d0">
        <style:background-image/>
      </style:table-cell-properties>
    </style:style>
    <style:style style:name="表格26.C2" style:family="table-cell">
      <style:table-cell-properties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6.A3" style:family="table-cell">
      <style:table-cell-properties fo:background-color="#fff5f5" fo:padding-left="0.282cm" fo:padding-right="0.282cm" fo:padding-top="0.141cm" fo:padding-bottom="0.141cm" fo:border="0.5pt solid #fecaca">
        <style:background-image/>
      </style:table-cell-properties>
    </style:style>
    <style:style style:name="表格26.B3" style:family="table-cell">
      <style:table-cell-properties fo:background-color="#fff5f5" fo:padding-left="0.282cm" fo:padding-right="0.282cm" fo:padding-top="0.141cm" fo:padding-bottom="0.141cm" fo:border="0.5pt solid #bbf7d0">
        <style:background-image/>
      </style:table-cell-properties>
    </style:style>
    <style:style style:name="表格26.C3" style:family="table-cell">
      <style:table-cell-properties fo:background-color="#fff5f5" fo:padding-left="0.282cm" fo:padding-right="0.282cm" fo:padding-top="0.141cm" fo:padding-bottom="0.141cm" fo:border="0.5pt solid #cbd5e1">
        <style:background-image/>
      </style:table-cell-properties>
    </style:style>
    <style:style style:name="表格27" style:family="table">
      <style:table-properties style:width="16.51cm" fo:margin-left="0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b3a6b" fo:padding-left="0.423cm" fo:padding-right="0.423cm" fo:padding-top="0.212cm" fo:padding-bottom="0.212cm" fo:border="none">
        <style:background-image/>
      </style:table-cell-properties>
    </style:style>
    <style:style style:name="表格28" style:family="table">
      <style:table-properties style:width="16.51cm" fo:margin-left="0.018cm" fo:margin-top="0cm" fo:margin-bottom="0cm" table:align="left" style:writing-mode="page"/>
    </style:style>
    <style:style style:name="表格28.A" style:family="table-column">
      <style:table-column-properties style:column-width="0.704cm"/>
    </style:style>
    <style:style style:name="表格28.B" style:family="table-column">
      <style:table-column-properties style:column-width="8.255cm"/>
    </style:style>
    <style:style style:name="表格28.C" style:family="table-column">
      <style:table-column-properties style:column-width="2.117cm"/>
    </style:style>
    <style:style style:name="表格28.D" style:family="table-column">
      <style:table-column-properties style:column-width="5.435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1b3a6b" fo:padding-left="0.282cm" fo:padding-right="0.282cm" fo:padding-top="0.141cm" fo:padding-bottom="0.141cm" fo:border="1pt solid #1b3a6b">
        <style:background-image/>
      </style:table-cell-properties>
    </style:style>
    <style:style style:name="表格28.A2" style:family="table-cell">
      <style:table-cell-properties style:vertical-align="" fo:background-color="#ffffff" fo:padding-left="0.212cm" fo:padding-right="0.212cm" fo:padding-top="0.141cm" fo:padding-bottom="0.141cm" fo:border="0.5pt solid #cbd5e1">
        <style:background-image/>
      </style:table-cell-properties>
    </style:style>
    <style:style style:name="表格28.B2" style:family="table-cell">
      <style:table-cell-properties style:vertical-align="" fo:background-color="#ffffff" fo:padding-left="0.282cm" fo:padding-right="0.282cm" fo:padding-top="0.141cm" fo:padding-bottom="0.141cm" fo:border="0.5pt solid #cbd5e1">
        <style:background-image/>
      </style:table-cell-properties>
    </style:style>
    <style:style style:name="表格28.A3" style:family="table-cell">
      <style:table-cell-properties style:vertical-align="" fo:background-color="#f8faff" fo:padding-left="0.212cm" fo:padding-right="0.212cm" fo:padding-top="0.141cm" fo:padding-bottom="0.141cm" fo:border="0.5pt solid #cbd5e1">
        <style:background-image/>
      </style:table-cell-properties>
    </style:style>
    <style:style style:name="表格28.B3" style:family="table-cell">
      <style:table-cell-properties style:vertical-align="" fo:background-color="#f8faff" fo:padding-left="0.282cm" fo:padding-right="0.282cm" fo:padding-top="0.141cm" fo:padding-bottom="0.141cm" fo:border="0.5pt solid #cbd5e1">
        <style:background-image/>
      </style:table-cell-properties>
    </style:style>
    <style:style style:name="表格29" style:family="table">
      <style:table-properties style:width="16.51cm" fo:margin-left="0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374151" fo:padding-left="0.423cm" fo:padding-right="0.423cm" fo:padding-top="0.212cm" fo:padding-bottom="0.212cm" fo:border="none">
        <style:background-image/>
      </style:table-cell-properties>
    </style:style>
    <style:style style:name="表格30" style:family="table">
      <style:table-properties style:width="16.51cm" fo:margin-left="0.009cm" fo:margin-top="0cm" fo:margin-bottom="0cm" table:align="left" style:writing-mode="page"/>
    </style:style>
    <style:style style:name="表格30.A" style:family="table-column">
      <style:table-column-properties style:column-width="3.173cm"/>
    </style:style>
    <style:style style:name="表格30.B" style:family="table-column">
      <style:table-column-properties style:column-width="13.33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b3a6b" fo:padding-left="0.282cm" fo:padding-right="0.282cm" fo:padding-top="0.176cm" fo:padding-bottom="0.176cm" fo:border="0.5pt solid #3b82f6">
        <style:background-image/>
      </style:table-cell-properties>
    </style:style>
    <style:style style:name="表格30.B1" style:family="table-cell">
      <style:table-cell-properties style:vertical-align="middle" fo:background-color="#ffffff" fo:padding-left="0.282cm" fo:padding-right="0.282cm" fo:padding-top="0.176cm" fo:padding-bottom="0.176cm" fo:border="0.5pt solid #cbd5e1">
        <style:background-image/>
      </style:table-cell-properties>
    </style:style>
    <style:style style:name="表格30.A2" style:family="table-cell">
      <style:table-cell-properties style:vertical-align="middle" fo:background-color="#243b6e" fo:padding-left="0.282cm" fo:padding-right="0.282cm" fo:padding-top="0.176cm" fo:padding-bottom="0.176cm" fo:border="0.5pt solid #3b82f6">
        <style:background-image/>
      </style:table-cell-properties>
    </style:style>
    <style:style style:name="表格30.B2" style:family="table-cell">
      <style:table-cell-properties style:vertical-align="middle" fo:background-color="#f8faff" fo:padding-left="0.282cm" fo:padding-right="0.282cm" fo:padding-top="0.176cm" fo:padding-bottom="0.176cm" fo:border="0.5pt solid #cbd5e1">
        <style:background-image/>
      </style:table-cell-properties>
    </style:style>
    <style:style style:name="表格31" style:family="table">
      <style:table-properties style:width="16.51cm" fo:margin-left="0.035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ff6ff" fo:padding-left="0.353cm" fo:padding-right="0.353cm" fo:padding-top="0.212cm" fo:padding-bottom="0.212cm" fo:border-left="2pt solid #2563eb" fo:border-right="0.5pt solid #2563eb" fo:border-top="1pt solid #2563eb" fo:border-bottom="0.5pt solid #2563eb">
        <style:background-image/>
      </style:table-cell-properties>
    </style:style>
    <style:style style:name="表格33" style:family="table">
      <style:table-properties style:width="16.51cm" fo:margin-left="0.018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beb" fo:padding-left="0.529cm" fo:padding-right="0.529cm" fo:padding-top="0.353cm" fo:padding-bottom="0.353cm" fo:border="1pt solid #d97706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fo:color="#ffffff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color="#93c5fd" loext:opacity="100%"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353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margin-top="0.106cm" fo:margin-bottom="0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7" style:family="paragraph" style:parent-style-name="Standard">
      <style:paragraph-properties fo:margin-top="0.212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margin-top="0.141cm" fo:margin-bottom="0cm" style:contextual-spacing="false"/>
    </style:style>
    <style:style style:name="P10" style:family="paragraph" style:parent-style-name="Standard">
      <style:paragraph-properties fo:margin-top="0cm" fo:margin-bottom="0.106cm" style:contextual-spacing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.141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12" style:family="paragraph" style:parent-style-name="Standard">
      <style:paragraph-properties fo:margin-top="0cm" fo:margin-bottom="0.106cm" style:contextual-spacing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.106cm" fo:margin-bottom="0cm" style:contextual-spacing="false"/>
    </style:style>
    <style:style style:name="P15" style:family="paragraph" style:parent-style-name="Standard">
      <style:paragraph-properties fo:margin-top="0.176cm" fo:margin-bottom="0cm" style:contextual-spacing="false"/>
    </style:style>
    <style:style style:name="P16" style:family="paragraph" style:parent-style-name="Standard">
      <style:paragraph-properties fo:margin-top="0cm" fo:margin-bottom="0.141cm" style:contextual-spacing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10pt" style:font-name-asian="Arial2" style:font-size-asian="10pt" style:font-name-complex="Arial2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21" style:family="paragraph" style:parent-style-name="Standard">
      <style:paragraph-properties fo:margin-top="0.282cm" fo:margin-bottom="0cm" style:contextual-spacing="false"/>
    </style:style>
    <style:style style:name="P22" style:family="paragraph" style:parent-style-name="Standard">
      <style:paragraph-properties fo:margin-top="0cm" fo:margin-bottom="0.106cm" style:contextual-spacing="false"/>
      <style:text-properties fo:color="#1e6b3e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top="0cm" fo:margin-bottom="0.141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4" style:family="paragraph" style:parent-style-name="Standard">
      <style:paragraph-properties fo:margin-top="0cm" fo:margin-bottom="0.106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fo:color="#1e6b3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c2d1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7" style:family="paragraph" style:parent-style-name="Standard">
      <style:paragraph-properties fo:margin-top="0cm" fo:margin-bottom="0.141cm" style:contextual-spacing="false"/>
    </style:style>
    <style:style style:name="P28" style:family="paragraph" style:parent-style-name="Standard">
      <style:paragraph-properties fo:margin-top="0cm" fo:margin-bottom="0.106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margin-top="0cm" fo:margin-bottom="0cm" style:contextual-spacing="false"/>
      <style:text-properties fo:color="#7c2d1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margin-top="0cm" fo:margin-bottom="0.141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style:paragraph-properties fo:margin-top="0cm" fo:margin-bottom="0cm" style:contextual-spacing="false"/>
      <style:text-properties fo:color="#7c2d1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cm" fo:margin-bottom="0.141cm" style:contextual-spacing="false"/>
      <style:text-properties fo:color="#581c87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3" style:family="paragraph" style:parent-style-name="Standard">
      <style:paragraph-properties fo:margin-top="0cm" fo:margin-bottom="0.106cm" style:contextual-spacing="false"/>
      <style:text-properties fo:color="#581c8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color="#581c8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5" style:family="paragraph" style:parent-style-name="Standard">
      <style:paragraph-properties fo:margin-top="0cm" fo:margin-bottom="0.106cm" style:contextual-spacing="false"/>
      <style:text-properties fo:color="#0f513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6" style:family="paragraph" style:parent-style-name="Standard">
      <style:paragraph-properties fo:margin-top="0cm" fo:margin-bottom="0.071cm" style:contextual-spacing="false"/>
      <style:text-properties fo:color="#1b3a6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.071cm" style:contextual-spacing="false"/>
      <style:text-properties fo:color="#0f5132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38" style:family="paragraph" style:parent-style-name="Standard">
      <style:paragraph-properties fo:margin-top="0cm" fo:margin-bottom="0.035cm" style:contextual-spacing="false"/>
      <style:text-properties fo:color="#374151" loext:opacity="100%" style:font-name="Arial" fo:font-size="9.5pt" style:font-name-asian="Arial2" style:font-size-asian="9.5pt" style:font-name-complex="Arial2" style:font-size-complex="9.5pt"/>
    </style:style>
    <style:style style:name="P39" style:family="paragraph" style:parent-style-name="Standard">
      <style:paragraph-properties fo:margin-top="0cm" fo:margin-bottom="0.106cm" style:contextual-spacing="false"/>
      <style:text-properties fo:color="#374151" loext:opacity="100%" style:font-name="Arial" fo:font-size="9.5pt" style:font-name-asian="Arial2" style:font-size-asian="9.5pt" style:font-name-complex="Arial2" style:font-size-complex="9.5pt"/>
    </style:style>
    <style:style style:name="P40" style:family="paragraph" style:parent-style-name="Standard">
      <style:paragraph-properties fo:margin-top="0cm" fo:margin-bottom="0.071cm" style:contextual-spacing="false"/>
      <style:text-properties fo:color="#2563eb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color="#dc2626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P42" style:family="paragraph" style:parent-style-name="Standard">
      <style:paragraph-properties fo:margin-top="0cm" fo:margin-bottom="0.071cm" style:contextual-spacing="false"/>
      <style:text-properties fo:color="#1b3a6b" loext:opacity="100%" style:font-name="Arial" fo:font-size="10pt" fo:font-weight="bold" officeooo:paragraph-rsid="00236817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9.5pt" style:font-name-asian="Arial2" style:font-size-asian="9.5pt" style:font-name-complex="Arial2" style:font-size-complex="9.5pt"/>
    </style:style>
    <style:style style:name="P44" style:family="paragraph" style:parent-style-name="Standard">
      <style:paragraph-properties fo:margin-top="0cm" fo:margin-bottom="0.071cm" style:contextual-spacing="false"/>
      <style:text-properties fo:color="#1b3a6b" loext:opacity="100%" style:font-name="Arial" fo:font-size="10pt" fo:font-weight="bold" officeooo:paragraph-rsid="00253ead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color="#0f513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style:contextual-spacing="false"/>
      <style:text-properties fo:color="#dc2626" loext:opacity="100%" style:font-name="Arial" fo:font-size="9.5pt" style:font-name-asian="Arial2" style:font-size-asian="9.5pt" style:font-name-complex="Arial2" style:font-size-complex="9.5pt"/>
    </style:style>
    <style:style style:name="P47" style:family="paragraph" style:parent-style-name="Standard">
      <style:paragraph-properties fo:margin-top="0cm" fo:margin-bottom="0cm" style:contextual-spacing="false"/>
      <style:text-properties fo:color="#166534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48" style:family="paragraph" style:parent-style-name="Standard">
      <style:paragraph-properties fo:margin-top="0cm" fo:margin-bottom="0cm" style:contextual-spacing="false"/>
      <style:text-properties fo:color="#1b3a6b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49" style:family="paragraph" style:parent-style-name="Standard">
      <style:paragraph-properties fo:margin-top="0cm" fo:margin-bottom="0cm" style:contextual-spacing="false"/>
      <style:text-properties fo:color="#2563e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.071cm" style:contextual-spacing="false"/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.035cm" style:contextual-spacing="false"/>
      <style:text-properties fo:color="#9ca3af" loext:opacity="100%" style:font-name="Arial" fo:font-size="9pt" style:font-name-asian="Arial2" style:font-size-asian="9pt" style:font-name-complex="Arial2" style:font-size-complex="9pt"/>
    </style:style>
    <style:style style:name="P52" style:family="paragraph" style:parent-style-name="Standard">
      <style:paragraph-properties fo:margin-top="0cm" fo:margin-bottom="0.035cm" style:contextual-spacing="false"/>
      <style:text-properties fo:color="#166534" loext:opacity="100%" style:font-name="Arial" fo:font-size="9pt" style:font-name-asian="Arial2" style:font-size-asian="9pt" style:font-name-complex="Arial2" style:font-size-complex="9pt"/>
    </style:style>
    <style:style style:name="P53" style:family="paragraph" style:parent-style-name="Standard">
      <style:paragraph-properties fo:margin-top="0cm" fo:margin-bottom="0cm" style:contextual-spacing="false"/>
      <style:text-properties fo:color="#16653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fo:color="#374151" loext:opacity="100%" style:font-name="Arial" fo:font-size="9pt" style:font-name-asian="Arial2" style:font-size-asian="9pt" style:font-name-complex="Arial2" style:font-size-complex="9pt"/>
    </style:style>
    <style:style style:name="P55" style:family="paragraph" style:parent-style-name="Standard">
      <style:paragraph-properties fo:margin-top="0cm" fo:margin-bottom="0.035cm" style:contextual-spacing="false"/>
    </style:style>
    <style:style style:name="P56" style:family="paragraph" style:parent-style-name="Standard">
      <style:paragraph-properties fo:margin-top="0cm" fo:margin-bottom="0.106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margin-top="0cm" fo:margin-bottom="0.212cm" style:contextual-spacing="false" fo:text-align="center" style:justify-single-word="false"/>
      <style:text-properties fo:color="#d9770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T1" style:family="text">
      <style:text-properties fo:color="#1b3a6b" loext:opacity="100%" style:font-name="Arial" fo:font-weight="bold" style:font-name-asian="Arial2" style:font-weight-asian="bold" style:font-name-complex="Arial2" style:font-weight-complex="bold"/>
    </style:style>
    <style:style style:name="T2" style:family="text">
      <style:text-properties fo:color="#374151" loext:opacity="100%" style:font-name="Arial" fo:font-size="10pt" style:font-name-asian="Arial2" style:font-size-asian="10pt" style:font-name-complex="Arial2" style:font-size-complex="10pt"/>
    </style:style>
    <style:style style:name="T3" style:family="text">
      <style:text-properties fo:color="#dc2626" loext:opacity="100%" style:font-name="Arial" fo:font-weight="bold" style:font-name-asian="Arial2" style:font-weight-asian="bold" style:font-name-complex="Arial2" style:font-weight-complex="bold"/>
    </style:style>
    <style:style style:name="T4" style:family="text">
      <style:text-properties fo:color="#2563eb" loext:opacity="100%" style:font-name="Arial" fo:font-weight="bold" style:font-name-asian="Arial2" style:font-weight-asian="bold" style:font-name-complex="Arial2" style:font-weight-complex="bold"/>
    </style:style>
    <style:style style:name="T5" style:family="text">
      <style:text-properties fo:background-color="#ffeb3b" loext:char-shading-value="0"/>
    </style:style>
    <style:style style:name="T6" style:family="text">
      <style:text-properties fo:color="#ffbf00" loext:opacity="100%" fo:font-weight="bold" fo:background-color="#3e2723" loext:char-shading-value="0" style:font-weight-asian="bold" style:font-weight-complex="bold"/>
    </style:style>
    <style:style style:name="T7" style:family="text">
      <style:text-properties fo:color="#69f0ae" loext:opacity="100%" fo:font-weight="bold" fo:background-color="#3e2723" loext:char-shading-value="0" style:font-weight-asian="bold" style:font-weight-complex="bold"/>
    </style:style>
    <style:style style:name="T8" style:family="text">
      <style:text-properties fo:color="#166534" loext:opacity="100%" style:font-name="Arial" fo:font-size="9pt" style:font-name-asian="Arial2" style:font-size-asian="9pt" style:font-name-complex="Arial2" style:font-size-complex="9pt"/>
    </style:style>
    <style:style style:name="T9" style:family="text">
      <style:text-properties fo:color="#2563e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6b3e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" style:family="text">
      <style:text-properties fo:color="#7c2d1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" style:family="text">
      <style:text-properties fo:color="#0f513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1e6b3e" loext:opacity="100%" style:font-name="Arial" fo:font-weight="bold" style:font-name-asian="Arial2" style:font-weight-asian="bold" style:font-name-complex="Arial2" style:font-weight-complex="bold"/>
    </style:style>
    <style:style style:name="T14" style:family="text">
      <style:text-properties fo:color="#7c2d12" loext:opacity="100%" style:font-name="Arial" fo:font-weight="bold" style:font-name-asian="Arial2" style:font-weight-asian="bold" style:font-name-complex="Arial2" style:font-weight-complex="bold"/>
    </style:style>
    <style:style style:name="T15" style:family="text">
      <style:text-properties fo:color="#581c87" loext:opacity="100%" style:font-name="Arial" fo:font-weight="bold" style:font-name-asian="Arial2" style:font-weight-asian="bold" style:font-name-complex="Arial2" style:font-weight-complex="bold"/>
    </style:style>
    <style:style style:name="T16" style:family="text">
      <style:text-properties fo:color="#0f5132" loext:opacity="100%" style:font-name="Arial" fo:font-weight="bold" style:font-name-asian="Arial2" style:font-weight-asian="bold" style:font-name-complex="Arial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>🌐 <text:s/>網路系統觀念完整筆記</text:p>
            <text:p text:style-name="P3">SDN <text:s/>· <text:s/>Load Balancing <text:s/>· <text:s/>CDN <text:s/>· <text:s/>5G <text:s/>· <text:s/>WiFi &amp; Bluetooth</text:p>
          </table:table-cell>
        </table:table-row>
      </table:table>
      <text:p text:style-name="P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">📌 本筆記涵蓋 5 大主題：</text:p>
            <text:p text:style-name="P6">① SDN（軟體定義網路）— 網路如何被控制</text:p>
            <text:p text:style-name="P6">② Load Balancing（負載平衡）— 流量如何分配</text:p>
            <text:p text:style-name="P6">③ CDN（內容傳遞網路）— 網站如何加速</text:p>
            <text:p text:style-name="P6">④ 5G — 新世代行動網路特性</text:p>
            <text:p text:style-name="P6">⑤ WiFi vs Bluetooth — 無線傳輸技術比較</text:p>
          </table:table-cell>
        </table:table-row>
      </table:table>
      <text:p text:style-name="P7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🟦 <text:s/>SECTION 1：SDN（軟體定義網路）</text:p>
          </table:table-cell>
        </table:table-row>
      </table:table>
      <text:p text:style-name="P9"/>
      <text:p text:style-name="P10">SDN 是什麼？</text:p>
      <text:p text:style-name="P11">SDN（Software Defined Networking）的核心概念是：將「控制平面」與「資料平面」分離。傳統網路中，路由器和交換器同時負責「決定資料走哪條路」和「實際傳送資料」兩件事，SDN 則把「決策」這件事抽出來，交給集中式的 Controller 統一管理。</text:p>
      <text:p text:style-name="P12">▶ 核心概念（考試最常考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3"><text:span text:style-name="T1">控制平面（Control Plane）</text:span><text:span text:style-name="T2">：決定資料「怎麼走」—— 負責路由決策的大腦</text:span></text:p>
            <text:p text:style-name="P14"><text:span text:style-name="T1">資料平面（Data Plane）</text:span><text:span text:style-name="T2">：負責資料「實際傳送」—— 執行指令的手腳</text:span></text:p>
            <text:p text:style-name="P14"><text:span text:style-name="T3">🔑 關鍵：</text:span><text:span text:style-name="T2">兩者分離，是 SDN 最核心的設計原則</text:span></text:p>
          </table:table-cell>
        </table:table-row>
      </table:table>
      <text:p text:style-name="P15"/>
      <text:p text:style-name="P16">▶ SDN 三層架構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7">Layer 名稱</text:p>
            </table:table-cell>
            <table:table-cell table:style-name="表格5.A1" office:value-type="string">
              <text:p text:style-name="P18">說明與功能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9">🟦 Application Layer（應用層）</text:p>
          </table:table-cell>
          <table:table-cell table:style-name="表格5.B2" office:value-type="string">
            <text:p text:style-name="P20">使用者所使用的服務，如網頁、API、App 等。 白話：「你真正在用的東西」</text:p>
          </table:table-cell>
        </table:table-row>
        <table:table-row table:style-name="表格5.1">
          <table:table-cell table:style-name="表格5.A2" office:value-type="string">
            <text:p text:style-name="P19">🟨 Control Layer（控制層）</text:p>
          </table:table-cell>
          <table:table-cell table:style-name="表格5.B2" office:value-type="string">
            <text:p text:style-name="P20">SDN Controller（大腦）—— 決定資料流向，集中管理整個網路。 白話：「交通指揮中心」</text:p>
          </table:table-cell>
        </table:table-row>
        <table:table-row table:style-name="表格5.1">
          <table:table-cell table:style-name="表格5.A2" office:value-type="string">
            <text:p text:style-name="P19">🟩 Infrastructure Layer（基礎層）</text:p>
          </table:table-cell>
          <table:table-cell table:style-name="表格5.B2" office:value-type="string">
            <text:p text:style-name="P20">真正在傳送資料的設備，如 Router、Switch 等。 白話：「路、車道和車子」</text:p>
          </table:table-cell>
        </table:table-row>
      </table:table>
      <text:p text:style-name="P15"/>
      <text:p text:style-name="P12">▶ 記憶口訣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">「SDN 分平面、三層 App-控-基」</text:p>
            <text:p text:style-name="P6">→ 分平面 = 控制 / 資料分離　　→ 三層 = Application / Control / Infrastructure</text:p>
          </table:table-cell>
        </table:table-row>
      </table:table>
      <text:p text:style-name="P7"/>
      <text:p text:style-name="P12">▶ 深入理解：SDN 究竟改變了什麼？</text:p>
      <text:p text:style-name="P11">很多新手會以為「SDN 取代了 Router 和 Switch」，這是常見誤解。正確的說法是：SDN 讓 Router 和 Switch 的「角色改變」，設備本身仍然存在，只是它們不再需要自己做決策。</text:p>
      <table:table table:name="表格7" table:style-name="表格7">
        <table:table-column table:style-name="表格7.A"/>
        <table:table-column table:style-name="表格7.B"/>
        <table:table-header-rows>
          <text:soft-page-break/>
          <table:table-row table:style-name="表格7.1">
            <table:table-cell table:style-name="表格7.A1" office:value-type="string">
              <text:p text:style-name="P17">架構比較</text:p>
            </table:table-cell>
            <table:table-cell table:style-name="表格7.A1" office:value-type="string">
              <text:p text:style-name="P18">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9">傳統網路（無 SDN）</text:p>
          </table:table-cell>
          <table:table-cell table:style-name="表格7.B2" office:value-type="string">
            <text:p text:style-name="P20">Router / Switch 同時負責兩件事： ① 控制平面：自己決定資料怎麼走 ② 資料平面：自己負責轉送封包 → 好比一個員工又當主管、又自己跑腿</text:p>
          </table:table-cell>
        </table:table-row>
        <table:table-row table:style-name="表格7.1">
          <table:table-cell table:style-name="表格7.A2" office:value-type="string">
            <text:p text:style-name="P19">SDN 網路（有 Controller）</text:p>
          </table:table-cell>
          <table:table-cell table:style-name="表格7.B2" office:value-type="string">
            <text:p text:style-name="P20">控制平面集中到 SDN Controller： ① Controller：統一決定所有路由策略 ② Router / Switch：只負責乖乖轉送 → 好比中央導航指揮，設備照指令執行</text:p>
          </table:table-cell>
        </table:table-row>
      </table:table>
      <text:p text:style-name="P9"/>
      <text:p text:style-name="P12">▶ Router vs Switch：兩種不同設備，但架構概念相同</text:p>
      <table:table table:name="表格8" table:style-name="表格8">
        <table:table-column table:style-name="表格8.A"/>
        <table:table-column table:style-name="表格8.B"/>
        <table:table-header-rows>
          <table:table-row table:style-name="表格8.1">
            <table:table-cell table:style-name="表格8.A1" office:value-type="string">
              <text:p text:style-name="P17">設備</text:p>
            </table:table-cell>
            <table:table-cell table:style-name="表格8.A1" office:value-type="string">
              <text:p text:style-name="P18">功能說明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9">Router（路由器）</text:p>
          </table:table-cell>
          <table:table-cell table:style-name="表格8.B2" office:value-type="string">
            <text:p text:style-name="P20">負責「不同網路之間」傳遞資料。 例如：你家連到 Internet、公司連到外部網路。 白話：「跨城市導航」</text:p>
          </table:table-cell>
        </table:table-row>
        <table:table-row table:style-name="表格8.1">
          <table:table-cell table:style-name="表格8.A2" office:value-type="string">
            <text:p text:style-name="P19">Switch（交換器）</text:p>
          </table:table-cell>
          <table:table-cell table:style-name="表格8.B2" office:value-type="string">
            <text:p text:style-name="P20">負責「同一個網路內部」傳遞資料。 例如：公司內部電腦之間互傳檔案。 白話：「同一棟辦公室內部傳文件」</text:p>
          </table:table-cell>
        </table:table-row>
      </table:table>
      <text:p text:style-name="P14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9">🔑 重要觀念：</text:p>
            <text:p text:style-name="P6">Router 和 Switch 功能不同，但在傳統網路中，兩者都同時具備「控制平面＋資料平面」。</text:p>
            <text:p text:style-name="P6">SDN 的作用是把兩者的「控制平面」集中到 Controller，設備本身並未消失。</text:p>
          </table:table-cell>
        </table:table-row>
      </table:table>
      <text:p text:style-name="P2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>⚖️ <text:s/>SECTION 2：Load Balancing（負載平衡）</text:p>
          </table:table-cell>
        </table:table-row>
      </table:table>
      <text:p text:style-name="P9"/>
      <text:p text:style-name="P22">負載平衡是什麼？</text:p>
      <text:p text:style-name="P11">當大量使用者同時存取同一網站時，單一台伺服器會不堪負荷。負載平衡器（Load Balancer）負責將流量「智慧分配」到多台伺服器，確保每台伺服器都不會過載，提升整體服務的穩定性與效能。</text:p>
      <text:p text:style-name="P23">▶ 三種負載平衡策略</text:p>
      <table:table table:name="表格11" table:style-name="表格11">
        <table:table-column table:style-name="表格11.A"/>
        <table:table-column table:style-name="表格11.B"/>
        <table:table-header-rows>
          <table:table-row table:style-name="表格11.1">
            <table:table-cell table:style-name="表格11.A1" office:value-type="string">
              <text:p text:style-name="P17">策略名稱</text:p>
            </table:table-cell>
            <table:table-cell table:style-name="表格11.A1" office:value-type="string">
              <text:p text:style-name="P18">說明、優缺點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9">① Round Robin（輪詢）</text:p>
          </table:table-cell>
          <table:table-cell table:style-name="表格11.B2" office:value-type="string">
            <text:p text:style-name="P20">依序將請求輪流分配給每台伺服器。不考慮伺服器效能或目前負載。 ✓ 優點：簡單易實作　✗ 缺點：未考量伺服器能力差異</text:p>
          </table:table-cell>
        </table:table-row>
        <table:table-row table:style-name="表格11.1">
          <table:table-cell table:style-name="表格11.A2" office:value-type="string">
            <text:p text:style-name="P19">② Weighted Round Robin （加權輪詢）</text:p>
          </table:table-cell>
          <table:table-cell table:style-name="表格11.B2" office:value-type="string">
            <text:p text:style-name="P20">根據各伺服器的處理能力設定「權重」，能力強的分到更多流量。 ✓ 優點：更智慧地利用資源　✗ 缺點：需手動設定權重</text:p>
          </table:table-cell>
        </table:table-row>
        <table:table-row table:style-name="表格11.1">
          <table:table-cell table:style-name="表格11.A2" office:value-type="string">
            <text:p text:style-name="P19">③ Session Stickiness （會話黏著）</text:p>
          </table:table-cell>
          <table:table-cell table:style-name="表格11.B2" office:value-type="string">
            <text:p text:style-name="P20">確保同一位使用者的所有請求，都固定導向同一台伺服器，維持連線狀態（如購物車、登入資訊等）。 ✓ 優點：保持狀態一致性　✗ 缺點：可能造成某台過載</text:p>
          </table:table-cell>
        </table:table-row>
      </table:table>
      <text:p text:style-name="P15"/>
      <text:p text:style-name="P24">▶ 記憶口訣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5">「LB 輪、重、黏」</text:p>
            <text:p text:style-name="P6">輪 = Round Robin（輪流）　重 = Weighted RR（加權）　黏 = Stickiness（固定同一台）</text:p>
          </table:table-cell>
        </table:table-row>
      </table:table>
      <text:p text:style-name="P2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>🌍 <text:s/>SECTION 3：CDN（內容傳遞網路）</text:p>
          </table:table-cell>
        </table:table-row>
      </table:table>
      <text:p text:style-name="P9"/>
      <text:p text:style-name="P26">CDN 是什麼？</text:p>
      <text:p text:style-name="P27"><text:span text:style-name="T2">CDN（Content Delivery Network）是一種透過在全球各地部署「邊緣伺服器（Edge Server）」來加速內容</text:span><text:soft-page-break/><text:span text:style-name="T2">傳遞的技術。當你開啟 Google 或 YouTube，不需要跨越太平洋連到美國總部，而是連到你附近的 CDN 節點，大幅縮短延遲。</text:span></text:p>
      <text:p text:style-name="P28">▶ CDN 完整流程（一定要記住）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9">完整請求流程：</text:p>
            <text:p text:style-name="P14"><text:span text:style-name="T4">Step 1</text:span><text:span text:style-name="T2"> 使用者輸入網址（如 www.example.com）</text:span></text:p>
            <text:p text:style-name="P14"><text:span text:style-name="T4">Step 2</text:span><text:span text:style-name="T2"> DNS 解析網址，找到對應 CDN 的 CNAME 記錄</text:span></text:p>
            <text:p text:style-name="P14"><text:span text:style-name="T4">Step 3</text:span><text:span text:style-name="T2"> CNAME 將請求轉向 CDN 服務商（如 cdn.example.net）</text:span></text:p>
            <text:p text:style-name="P14"><text:span text:style-name="T4">Step 4</text:span><text:span text:style-name="T2"> CDN 根據使用者地理位置，選擇最近的 Edge 伺服器</text:span></text:p>
            <text:p text:style-name="P14"><text:span text:style-name="T4">Step 5</text:span><text:span text:style-name="T2"> Edge 伺服器將快取內容回傳給使用者，完成請求</text:span></text:p>
          </table:table-cell>
        </table:table-row>
      </table:table>
      <text:p text:style-name="P9"/>
      <text:p text:style-name="P30">▶ 兩個關鍵名詞</text:p>
      <table:table table:name="表格15" table:style-name="表格15">
        <table:table-column table:style-name="表格15.A"/>
        <table:table-column table:style-name="表格15.B"/>
        <table:table-header-rows>
          <table:table-row table:style-name="表格15.1">
            <table:table-cell table:style-name="表格15.A1" office:value-type="string">
              <text:p text:style-name="P17">名詞</text:p>
            </table:table-cell>
            <table:table-cell table:style-name="表格15.A1" office:value-type="string">
              <text:p text:style-name="P18">說明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9">CNAME（別名記錄）</text:p>
          </table:table-cell>
          <table:table-cell table:style-name="表格15.B2" office:value-type="string">
            <text:p text:style-name="P20">DNS 的一種記錄類型，作用是「網址指向另一個網址」（不是 IP）。 範例：www.example.com → cdn.example.net</text:p>
          </table:table-cell>
        </table:table-row>
        <table:table-row table:style-name="表格15.1">
          <table:table-cell table:style-name="表格15.A2" office:value-type="string">
            <text:p text:style-name="P19">Edge Server（邊緣伺服器）</text:p>
          </table:table-cell>
          <table:table-cell table:style-name="表格15.B2" office:value-type="string">
            <text:p text:style-name="P20">部署在全球各地靠近使用者的伺服器，負責快取並就近回應請求，大幅減少延遲。</text:p>
          </table:table-cell>
        </table:table-row>
      </table:table>
      <text:p text:style-name="P15"/>
      <text:p text:style-name="P28">▶ 記憶口訣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1">「CDN：網址轉轉轉，資料找最近」</text:p>
            <text:p text:style-name="P6">CNAME = 網址 → 網址（不是 IP！）</text:p>
            <text:p text:style-name="P6">Edge = 就近服務，不用跑遠</text:p>
          </table:table-cell>
        </table:table-row>
      </table:table>
      <text:p text:style-name="P2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">📶 <text:s/>SECTION 4：5G 新世代行動網路</text:p>
          </table:table-cell>
        </table:table-row>
      </table:table>
      <text:p text:style-name="P9"/>
      <text:p text:style-name="P32">5G 的四大核心特性</text:p>
      <table:table table:name="表格18" table:style-name="表格18">
        <table:table-column table:style-name="表格18.A"/>
        <table:table-column table:style-name="表格18.B"/>
        <table:table-header-rows>
          <table:table-row table:style-name="表格18.1">
            <table:table-cell table:style-name="表格18.A1" office:value-type="string">
              <text:p text:style-name="P17">5G 特性</text:p>
            </table:table-cell>
            <table:table-cell table:style-name="表格18.A1" office:value-type="string">
              <text:p text:style-name="P18">說明 / 應用場景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9">① 高速傳輸（eMBB）</text:p>
          </table:table-cell>
          <table:table-cell table:style-name="表格18.B2" office:value-type="string">
            <text:p text:style-name="P20">Enhanced Mobile Broadband —— 比 4G 快數十倍，適合高畫質影音串流、AR/VR 應用。</text:p>
          </table:table-cell>
        </table:table-row>
        <table:table-row table:style-name="表格18.1">
          <table:table-cell table:style-name="表格18.A2" office:value-type="string">
            <text:p text:style-name="P19">② 超低延遲（URLLC）</text:p>
          </table:table-cell>
          <table:table-cell table:style-name="表格18.B2" office:value-type="string">
            <text:p text:style-name="P20">Ultra-Reliable Low Latency —— 延遲低至 1ms 以下，適合自動駕駛、遠端手術、即時控制。</text:p>
          </table:table-cell>
        </table:table-row>
        <table:table-row table:style-name="表格18.1">
          <table:table-cell table:style-name="表格18.A2" office:value-type="string">
            <text:p text:style-name="P19">③ 大量連線（mMTC）</text:p>
          </table:table-cell>
          <table:table-cell table:style-name="表格18.B2" office:value-type="string">
            <text:p text:style-name="P20">Massive Machine Type —— 每平方公里可連接數百萬台裝置，適合 IoT（物聯網）大規模部署。</text:p>
          </table:table-cell>
        </table:table-row>
        <table:table-row table:style-name="表格18.1">
          <table:table-cell table:style-name="表格18.A2" office:value-type="string">
            <text:p text:style-name="P19">④ Network Slicing（網路切片）</text:p>
          </table:table-cell>
          <table:table-cell table:style-name="表格18.B2" office:value-type="string">
            <text:p text:style-name="P20">將同一物理網路虛擬化為多個獨立「切片」，各自有不同 QoS 設定。 例如：一片給醫療（高可靠）、一片給遊戲（低延遲）。</text:p>
          </table:table-cell>
        </table:table-row>
      </table:table>
      <text:p text:style-name="P15"/>
      <text:p text:style-name="P33">▶ 記憶口訣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34">「5G 快、低、多、切」</text:p>
            <text:p text:style-name="P6">快（eMBB）= 高速傳輸　低（URLLC）= 超低延遲　多（mMTC）= 大量連線　切 = 網路切片</text:p>
          </table:table-cell>
        </table:table-row>
      </table:table>
      <text:p text:style-name="P2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>📡 <text:s/>SECTION 5：WiFi vs Bluetooth（無線通訊比較）</text:p>
          </table:table-cell>
        </table:table-row>
      </table:table>
      <text:p text:style-name="P9"><text:soft-page-break/></text:p>
      <text:p text:style-name="P35">▶ WiFi（802.11 標準）</text:p>
      <table:table table:name="表格21" table:style-name="表格21">
        <table:table-column table:style-name="表格21.A"/>
        <table:table-column table:style-name="表格21.B"/>
        <table:table-header-rows>
          <table:table-row table:style-name="表格21.1">
            <table:table-cell table:style-name="表格21.A1" office:value-type="string">
              <text:p text:style-name="P17">WiFi 技術</text:p>
            </table:table-cell>
            <table:table-cell table:style-name="表格21.A1" office:value-type="string">
              <text:p text:style-name="P17">說明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6">CSMA/CA（Carrier Sense Multiple Access with Collision Avoidance，載波偵聽多路存取/衝突避免）</text:p>
            <text:p text:style-name="P19">（先聽再傳）</text:p>
          </table:table-cell>
          <table:table-cell table:style-name="表格21.B2" office:value-type="string">
            <text:p text:style-name="P37">🗣️ 白 話 說 明</text:p>
            <text:p text:style-name="P38">想像大家共用一支麥克風開會：</text:p>
            <text:p text:style-name="P38">→ 在你開口前，先靜下來聽聽有沒有人在講話</text:p>
            <text:p text:style-name="P38">→ 沒有人講才輪到你說</text:p>
            <text:p text:style-name="P39">→ 這樣就不會兩個人同時開口互相蓋掉</text:p>
            <text:p text:style-name="P40">🔧 技術說明</text:p>
            <text:p text:style-name="P38">傳送前先「監聽」頻道是否有人使用，若有則等待，確認空閒後再發送，以「避免（CA）」碰撞，而非偵測碰撞後才處理。</text:p>
            <text:p text:style-name="P41">⚠️ 注意：WiFi 用 CA（Collision Avoidance，避免）≠ 有線 Ethernet 的 CD（Collision Detection，偵測到再處理）</text:p>
          </table:table-cell>
        </table:table-row>
        <table:table-row table:style-name="表格21.1">
          <table:table-cell table:style-name="表格21.A2" office:value-type="string">
            <text:p text:style-name="P42">OFDM（Orthogonal Frequency-Division Multiplexing，正交分頻多工）</text:p>
            <text:p text:style-name="P19">（多線並行傳輸）</text:p>
          </table:table-cell>
          <table:table-cell table:style-name="表格21.B2" office:value-type="string">
            <text:p text:style-name="P37">🗣️ 白 話 說 明</text:p>
            <text:p text:style-name="P38">想像高速公路：</text:p>
            <text:p text:style-name="P38">→ 舊方法：只有一條車道，一次只能一台車通過</text:p>
            <text:p text:style-name="P38">→ OFDM：蓋成八線道高速公路，很多台車同時跑</text:p>
            <text:p text:style-name="P39">→ 結論：資料被拆成很多份同時傳，速度因此大增</text:p>
            <text:p text:style-name="P40">🔧 技術說明</text:p>
            <text:p text:style-name="P43">將資料分成多個子頻道（子載波）同時傳輸，讓頻寬利用率大幅提升，是現代 WiFi（802.11a/g/n/ac/ax）高速傳輸的基礎技術。</text:p>
          </table:table-cell>
        </table:table-row>
      </table:table>
      <text:p text:style-name="P9"/>
      <text:p text:style-name="P35">▶ Bluetooth（藍牙）</text:p>
      <table:table table:name="表格22" table:style-name="表格22">
        <table:table-column table:style-name="表格22.A"/>
        <table:table-column table:style-name="表格22.B"/>
        <table:table-header-rows>
          <table:table-row table:style-name="表格22.1">
            <table:table-cell table:style-name="表格22.A1" office:value-type="string">
              <text:p text:style-name="P17">Bluetooth 技術</text:p>
            </table:table-cell>
            <table:table-cell table:style-name="表格22.A1" office:value-type="string">
              <text:p text:style-name="P17">說明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6">Master-Slave 架構</text:p>
            <text:p text:style-name="P19">（一個主控，多個跟隨）</text:p>
          </table:table-cell>
          <table:table-cell table:style-name="表格22.B2" office:value-type="string">
            <text:p text:style-name="P37">🗣️ 白 話 說 明</text:p>
            <text:p text:style-name="P38">想像一個老師帶著一群學生：</text:p>
            <text:p text:style-name="P38">→ 老師（Master）= 你的手機或電腦，負責發號施令</text:p>
            <text:p text:style-name="P38">→ 學生（Slave）= 耳機、鍵盤、滑鼠等，乖乖聽指令</text:p>
            <text:p text:style-name="P39">→ 生活舉例：手機同時連藍牙耳機＋無線鍵盤，手機就是那個 Master</text:p>
            <text:p text:style-name="P40">🔧 技術說明</text:p>
            <text:p text:style-name="P43">一個主設備（Master）可同時控制最多 7 個從設備（Slave），負責協調通訊時間與頻道分配。這種架構稱為 Piconet（微網路），常見於耳機、鍵盤等周邊裝置連接。</text:p>
          </table:table-cell>
        </table:table-row>
        <table:table-row table:style-name="表格22.1">
          <table:table-cell table:style-name="表格22.A2" office:value-type="string">
            <text:p text:style-name="P44">FHSS（Frequency-Hopping Spread Spectrum，跳頻展頻或跳頻擴頻）</text:p>
            <text:p text:style-name="P19">（一直換頻道，干擾不到）</text:p>
          </table:table-cell>
          <table:table-cell table:style-name="表格22.B2" office:value-type="string">
            <text:p text:style-name="P37">🗣️ 白 話 說 明</text:p>
            <text:p text:style-name="P38">想像你在擁擠的市場講電話，旁邊很吵：</text:p>
            <text:p text:style-name="P38">→ <text:span text:style-name="T5">普通方式：固定在一個頻道</text:span>，一旦被干擾就整段聽不清</text:p>
            <text:p text:style-name="P38">→ FHSS 方式：<text:span text:style-name="T6">每秒自動換好幾百次頻道</text:span>，干擾只影響一瞬間，馬上就切走了</text:p>
            <text:p text:style-name="P39">→ 結論：Bluetooth <text:span text:style-name="T7">靠「一直換頻道」來躲干擾</text:span>，所以耳機不容易斷線</text:p>
            <text:p text:style-name="P40">🔧 技術說明</text:p>
            <text:p text:style-name="P43">Frequency Hopping Spread Spectrum（FHSS）：在 2.4GHz 頻段中，每秒快速切換數百次頻道（Bluetooth 每秒換 1600 次），即使某個頻道被干擾，影響時間極短，通訊品質幾乎不受影響。</text:p>
          </table:table-cell>
        </table:table-row>
      </table:table>
      <text:p text:style-name="P9"/>
      <text:p text:style-name="P35">▶ WiFi vs Bluetooth：一眼看懂差在哪</text:p>
      <table:table table:name="表格23" table:style-name="表格23">
        <table:table-column table:style-name="表格23.A"/>
        <table:table-column table:style-name="表格23.B"/>
        <table:table-header-rows>
          <table:table-row table:style-name="表格23.1">
            <table:table-cell table:style-name="表格23.A1" office:value-type="string">
              <text:p text:style-name="P17">比一比</text:p>
            </table:table-cell>
            <table:table-cell table:style-name="表格23.A1" office:value-type="string">
              <text:p text:style-name="P18">WiFi vs Bluetooth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9">可以傳多遠？</text:p>
          </table:table-cell>
          <table:table-cell table:style-name="表格23.B2" office:value-type="string">
            <text:p text:style-name="P20">WiFi：幾十公尺（整層辦公室都能用） Bluetooth：約 10 公尺（差不多一個房間內）</text:p>
          </table:table-cell>
        </table:table-row>
        <table:table-row table:style-name="表格23.1">
          <table:table-cell table:style-name="表格23.A2" office:value-type="string">
            <text:p text:style-name="P19">傳多快？</text:p>
          </table:table-cell>
          <table:table-cell table:style-name="表格23.B2" office:value-type="string">
            <text:p text:style-name="P20">WiFi：快，適合看影片、傳大檔 Bluetooth：慢，適合傳控制指令（如暫停、音量）</text:p>
          </table:table-cell>
        </table:table-row>
        <text:soft-page-break/>
        <table:table-row table:style-name="表格23.1">
          <table:table-cell table:style-name="表格23.A2" office:value-type="string">
            <text:p text:style-name="P19">怎麼避免衝突？</text:p>
          </table:table-cell>
          <table:table-cell table:style-name="表格23.B2" office:value-type="string">
            <text:p text:style-name="P20">WiFi：先靜下來聽，沒人再傳（CSMA/CA） Bluetooth：一直換頻道，被干擾也無所謂（FHSS）</text:p>
          </table:table-cell>
        </table:table-row>
        <table:table-row table:style-name="表格23.1">
          <table:table-cell table:style-name="表格23.A2" office:value-type="string">
            <text:p text:style-name="P19">誰管誰？</text:p>
          </table:table-cell>
          <table:table-cell table:style-name="表格23.B2" office:value-type="string">
            <text:p text:style-name="P20">WiFi：無線基地台（AP）管所有連進來的裝置 Bluetooth：主設備（手機/電腦）管所有配對的裝置</text:p>
          </table:table-cell>
        </table:table-row>
        <table:table-row table:style-name="表格23.1">
          <table:table-cell table:style-name="表格23.A2" office:value-type="string">
            <text:p text:style-name="P19">日常用在哪？</text:p>
          </table:table-cell>
          <table:table-cell table:style-name="表格23.B2" office:value-type="string">
            <text:p text:style-name="P20">WiFi：上網、看 YouTube、視訊會議 Bluetooth：藍牙耳機、無線鍵盤、滑鼠、手環</text:p>
          </table:table-cell>
        </table:table-row>
      </table:table>
      <text:p text:style-name="P15"/>
      <text:p text:style-name="P35">▶ 記憶口訣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5">「WiFi 先聽再說，Bluetooth 一直換頻道」</text:p>
            <text:p text:style-name="P6">WiFi = 開口前先聽有沒有人在說（才不會撞在一起）</text:p>
            <text:p text:style-name="P6">Bluetooth = 不停換頻道講話（就算被干擾也只影響一瞬間）</text:p>
          </table:table-cell>
        </table:table-row>
      </table:table>
      <text:p text:style-name="P21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">⚠️ <text:s/>SECTION 6：常見考試陷阱（超容易錯！）</text:p>
          </table:table-cell>
        </table:table-row>
      </table:table>
      <text:p text:style-name="P9"/>
      <text:p text:style-name="P11">以下是各主題最容易在考試中「設圈套」的觀念，請務必熟記正確答案：</text:p>
      <table:table table:name="表格26" table:style-name="表格26">
        <table:table-column table:style-name="表格26.A" table:number-columns-repeated="3"/>
        <table:table-header-rows>
          <table:table-row table:style-name="表格26.1">
            <table:table-cell table:style-name="表格26.A1" office:value-type="string">
              <text:p text:style-name="P17">❌ 常見錯誤觀念</text:p>
            </table:table-cell>
            <table:table-cell table:style-name="表格26.B1" office:value-type="string">
              <text:p text:style-name="P17">✅ 正確答案</text:p>
            </table:table-cell>
            <table:table-cell table:style-name="表格26.C1" office:value-type="string">
              <text:p text:style-name="P17">主題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46">SDN 是把控制與資料整合</text:p>
          </table:table-cell>
          <table:table-cell table:style-name="表格26.B2" office:value-type="string">
            <text:p text:style-name="P47">SDN = 控制與資料「分離」</text:p>
          </table:table-cell>
          <table:table-cell table:style-name="表格26.C2" office:value-type="string">
            <text:p text:style-name="P48">SDN</text:p>
          </table:table-cell>
        </table:table-row>
        <table:table-row table:style-name="表格26.1">
          <table:table-cell table:style-name="表格26.A3" office:value-type="string">
            <text:p text:style-name="P46">Round Robin 會考慮伺服器效能</text:p>
          </table:table-cell>
          <table:table-cell table:style-name="表格26.B3" office:value-type="string">
            <text:p text:style-name="P47">RR 不看效能，Weighted RR 才看</text:p>
          </table:table-cell>
          <table:table-cell table:style-name="表格26.C3" office:value-type="string">
            <text:p text:style-name="P48">Load Balancing</text:p>
          </table:table-cell>
        </table:table-row>
        <table:table-row table:style-name="表格26.1">
          <table:table-cell table:style-name="表格26.A2" office:value-type="string">
            <text:p text:style-name="P46">Stickiness 是平均分配流量</text:p>
          </table:table-cell>
          <table:table-cell table:style-name="表格26.B2" office:value-type="string">
            <text:p text:style-name="P47">Stickiness = 固定同一台 Server</text:p>
          </table:table-cell>
          <table:table-cell table:style-name="表格26.C2" office:value-type="string">
            <text:p text:style-name="P48">Load Balancing</text:p>
          </table:table-cell>
        </table:table-row>
        <table:table-row table:style-name="表格26.1">
          <table:table-cell table:style-name="表格26.A3" office:value-type="string">
            <text:p text:style-name="P46">CDN 是把資料放在中心機房</text:p>
          </table:table-cell>
          <table:table-cell table:style-name="表格26.B3" office:value-type="string">
            <text:p text:style-name="P47">CDN 放在靠近使用者的 Edge 節點</text:p>
          </table:table-cell>
          <table:table-cell table:style-name="表格26.C3" office:value-type="string">
            <text:p text:style-name="P48">CDN</text:p>
          </table:table-cell>
        </table:table-row>
        <table:table-row table:style-name="表格26.1">
          <table:table-cell table:style-name="表格26.A2" office:value-type="string">
            <text:p text:style-name="P46">CNAME 是 IP 位址的對應</text:p>
          </table:table-cell>
          <table:table-cell table:style-name="表格26.B2" office:value-type="string">
            <text:p text:style-name="P47">CNAME = 網址 → 網址（非 IP）</text:p>
          </table:table-cell>
          <table:table-cell table:style-name="表格26.C2" office:value-type="string">
            <text:p text:style-name="P48">CDN</text:p>
          </table:table-cell>
        </table:table-row>
        <table:table-row table:style-name="表格26.1">
          <table:table-cell table:style-name="表格26.A3" office:value-type="string">
            <text:p text:style-name="P46">WiFi 使用 CSMA/CD</text:p>
          </table:table-cell>
          <table:table-cell table:style-name="表格26.B3" office:value-type="string">
            <text:p text:style-name="P47">WiFi 用 CSMA/CA（CD 是有線網路）</text:p>
          </table:table-cell>
          <table:table-cell table:style-name="表格26.C3" office:value-type="string">
            <text:p text:style-name="P48">WiFi</text:p>
          </table:table-cell>
        </table:table-row>
        <table:table-row table:style-name="表格26.1">
          <table:table-cell table:style-name="表格26.A2" office:value-type="string">
            <text:p text:style-name="P46">Bluetooth 使用固定頻率傳輸</text:p>
          </table:table-cell>
          <table:table-cell table:style-name="表格26.B2" office:value-type="string">
            <text:p text:style-name="P47">Bluetooth FHSS = 持續跳頻</text:p>
          </table:table-cell>
          <table:table-cell table:style-name="表格26.C2" office:value-type="string">
            <text:p text:style-name="P48">Bluetooth</text:p>
          </table:table-cell>
        </table:table-row>
        <table:table-row table:style-name="表格26.1">
          <table:table-cell table:style-name="表格26.A3" office:value-type="string">
            <text:p text:style-name="P46">5G 只是速度變快</text:p>
          </table:table-cell>
          <table:table-cell table:style-name="表格26.B3" office:value-type="string">
            <text:p text:style-name="P47">5G 還有低延遲、大量連線、網路切片</text:p>
          </table:table-cell>
          <table:table-cell table:style-name="表格26.C3" office:value-type="string">
            <text:p text:style-name="P48">5G</text:p>
          </table:table-cell>
        </table:table-row>
      </table:table>
      <text:p text:style-name="P21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>🎯 <text:s/>SECTION 7：模擬選擇題 10 題（含解析）</text:p>
          </table:table-cell>
        </table:table-row>
      </table:table>
      <text:p text:style-name="P9"/>
      <text:p text:style-name="P11">以下 10 題模擬國考難度，請先自行作答再對答案：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17">#</text:p>
            </table:table-cell>
            <table:table-cell table:style-name="表格28.A1" office:value-type="string">
              <text:p text:style-name="P17">題目</text:p>
            </table:table-cell>
            <table:table-cell table:style-name="表格28.A1" office:value-type="string">
              <text:p text:style-name="P17">答案</text:p>
            </table:table-cell>
            <table:table-cell table:style-name="表格28.A1" office:value-type="string">
              <text:p text:style-name="P17">解析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9">Q1</text:p>
          </table:table-cell>
          <table:table-cell table:style-name="表格28.B2" office:value-type="string">
            <text:p text:style-name="P50">SDN 的核心設計理念為何？</text:p>
            <text:p text:style-name="P51">A. 控制與資料整合</text:p>
            <text:p text:style-name="P52">B. 控制與資料分離</text:p>
            <text:p text:style-name="P51">C. 提高頻寬</text:p>
            <text:p text:style-name="P51">D. 減少封包大小</text:p>
          </table:table-cell>
          <table:table-cell table:style-name="表格28.A2" office:value-type="string">
            <text:p text:style-name="P53">B</text:p>
          </table:table-cell>
          <table:table-cell table:style-name="表格28.B2" office:value-type="string">
            <text:p text:style-name="P54">SDN 最核心 = 控制平面與資料平面分離，這是與傳統網路最大的差異。</text:p>
          </table:table-cell>
        </table:table-row>
        <table:table-row table:style-name="表格28.1">
          <table:table-cell table:style-name="表格28.A3" office:value-type="string">
            <text:p text:style-name="P49">Q2</text:p>
          </table:table-cell>
          <table:table-cell table:style-name="表格28.B3" office:value-type="string">
            <text:p text:style-name="P50">下列何者屬於 SDN 的 Control Layer？</text:p>
            <text:p text:style-name="P51">A. Router</text:p>
            <text:p text:style-name="P51">B. Switch</text:p>
            <text:p text:style-name="P55"><text:soft-page-break/><text:span text:style-name="T8">C. SDN Controller</text:span></text:p>
            <text:p text:style-name="P51">D. Web Server</text:p>
          </table:table-cell>
          <table:table-cell table:style-name="表格28.A3" office:value-type="string">
            <text:p text:style-name="P53">C</text:p>
          </table:table-cell>
          <table:table-cell table:style-name="表格28.B3" office:value-type="string">
            <text:p text:style-name="P54">Controller 是集中決策的大腦，Router/Switch 屬於 Infrastructure Layer。</text:p>
          </table:table-cell>
        </table:table-row>
        <table:table-row table:style-name="表格28.1">
          <table:table-cell table:style-name="表格28.A2" office:value-type="string">
            <text:p text:style-name="P49">Q3</text:p>
          </table:table-cell>
          <table:table-cell table:style-name="表格28.B2" office:value-type="string">
            <text:p text:style-name="P50">Round Robin 負載平衡的特性為何？</text:p>
            <text:p text:style-name="P51">A. 根據效能分配</text:p>
            <text:p text:style-name="P51">B. 根據延遲分配</text:p>
            <text:p text:style-name="P52">C. 平均輪流分配</text:p>
            <text:p text:style-name="P51">D. 固定同一台</text:p>
          </table:table-cell>
          <table:table-cell table:style-name="表格28.A2" office:value-type="string">
            <text:p text:style-name="P53">C</text:p>
          </table:table-cell>
          <table:table-cell table:style-name="表格28.B2" office:value-type="string">
            <text:p text:style-name="P54">Round Robin 純粹輪流，不考慮伺服器效能。Weighted RR 才考慮效能。</text:p>
          </table:table-cell>
        </table:table-row>
        <table:table-row table:style-name="表格28.1">
          <table:table-cell table:style-name="表格28.A3" office:value-type="string">
            <text:p text:style-name="P49">Q4</text:p>
          </table:table-cell>
          <table:table-cell table:style-name="表格28.B3" office:value-type="string">
            <text:p text:style-name="P50">Weighted Round Robin 的用途為何？</text:p>
            <text:p text:style-name="P51">A. 固定連線至同一台</text:p>
            <text:p text:style-name="P51">B. 分配相同流量給每台</text:p>
            <text:p text:style-name="P52">C. 根據伺服器權重分配</text:p>
            <text:p text:style-name="P51">D. 避免封包碰撞</text:p>
          </table:table-cell>
          <table:table-cell table:style-name="表格28.A3" office:value-type="string">
            <text:p text:style-name="P53">C</text:p>
          </table:table-cell>
          <table:table-cell table:style-name="表格28.B3" office:value-type="string">
            <text:p text:style-name="P54">WRR 根據伺服器能力設定權重，能力強的分到更多流量，更智慧地利用資源。</text:p>
          </table:table-cell>
        </table:table-row>
        <table:table-row table:style-name="表格28.1">
          <table:table-cell table:style-name="表格28.A2" office:value-type="string">
            <text:p text:style-name="P49">Q5</text:p>
          </table:table-cell>
          <table:table-cell table:style-name="表格28.B2" office:value-type="string">
            <text:p text:style-name="P50">Session Stickiness 的主要功能為何？</text:p>
            <text:p text:style-name="P51">A. 平均分配流量</text:p>
            <text:p text:style-name="P52">B. 同一使用者固定連同一台伺服器</text:p>
            <text:p text:style-name="P51">C. 隨機分配</text:p>
            <text:p text:style-name="P51">D. 提升傳輸頻寬</text:p>
          </table:table-cell>
          <table:table-cell table:style-name="表格28.A2" office:value-type="string">
            <text:p text:style-name="P53">B</text:p>
          </table:table-cell>
          <table:table-cell table:style-name="表格28.B2" office:value-type="string">
            <text:p text:style-name="P54">Stickiness 確保同一用戶持續連向同一台伺服器，適合維持購物車或登入狀態。</text:p>
          </table:table-cell>
        </table:table-row>
        <table:table-row table:style-name="表格28.1">
          <table:table-cell table:style-name="表格28.A3" office:value-type="string">
            <text:p text:style-name="P49">Q6</text:p>
          </table:table-cell>
          <table:table-cell table:style-name="表格28.B3" office:value-type="string">
            <text:p text:style-name="P50">CDN 的主要目的是？</text:p>
            <text:p text:style-name="P51">A. 增加 IP 數量</text:p>
            <text:p text:style-name="P51">B. 提高資安防護</text:p>
            <text:p text:style-name="P52">C. 就近提供內容降低延遲</text:p>
            <text:p text:style-name="P51">D. 壓縮封包大小</text:p>
          </table:table-cell>
          <table:table-cell table:style-name="表格28.A3" office:value-type="string">
            <text:p text:style-name="P53">C</text:p>
          </table:table-cell>
          <table:table-cell table:style-name="表格28.B3" office:value-type="string">
            <text:p text:style-name="P54">CDN 核心 = 在全球部署 Edge 節點，讓使用者就近取得內容，降低延遲。</text:p>
          </table:table-cell>
        </table:table-row>
        <table:table-row table:style-name="表格28.1">
          <table:table-cell table:style-name="表格28.A2" office:value-type="string">
            <text:p text:style-name="P49">Q7</text:p>
          </table:table-cell>
          <table:table-cell table:style-name="表格28.B2" office:value-type="string">
            <text:p text:style-name="P50">DNS 中 CNAME 記錄的功能為何？</text:p>
            <text:p text:style-name="P51">A. IP → IP</text:p>
            <text:p text:style-name="P51">B. IP → 網址</text:p>
            <text:p text:style-name="P52">C. 網址 → 網址</text:p>
            <text:p text:style-name="P51">D. 網址 → IP</text:p>
          </table:table-cell>
          <table:table-cell table:style-name="表格28.A2" office:value-type="string">
            <text:p text:style-name="P53">C</text:p>
          </table:table-cell>
          <table:table-cell table:style-name="表格28.B2" office:value-type="string">
            <text:p text:style-name="P54">CNAME 是別名記錄，將一個網址指向另一個網址（不是 IP），CDN 常用此機制導流。</text:p>
          </table:table-cell>
        </table:table-row>
        <table:table-row table:style-name="表格28.1">
          <table:table-cell table:style-name="表格28.A3" office:value-type="string">
            <text:p text:style-name="P49">Q8</text:p>
          </table:table-cell>
          <table:table-cell table:style-name="表格28.B3" office:value-type="string">
            <text:p text:style-name="P50">下列何者「不是」5G 的特性？</text:p>
            <text:p text:style-name="P51">A. 高速傳輸（eMBB）</text:p>
            <text:p text:style-name="P51">B. 超低延遲（URLLC）</text:p>
            <text:p text:style-name="P51">C. 大量連線（mMTC）</text:p>
            <text:p text:style-name="P52">D. 高碰撞率</text:p>
          </table:table-cell>
          <table:table-cell table:style-name="表格28.A3" office:value-type="string">
            <text:p text:style-name="P53">D</text:p>
          </table:table-cell>
          <table:table-cell table:style-name="表格28.B3" office:value-type="string">
            <text:p text:style-name="P54">5G 的三大服務特性為 eMBB、URLLC、mMTC，加上 Network Slicing。高碰撞率不是 5G 特性。</text:p>
          </table:table-cell>
        </table:table-row>
        <table:table-row table:style-name="表格28.1">
          <table:table-cell table:style-name="表格28.A2" office:value-type="string">
            <text:p text:style-name="P49">Q9</text:p>
          </table:table-cell>
          <table:table-cell table:style-name="表格28.B2" office:value-type="string">
            <text:p text:style-name="P50">WiFi 使用哪種機制避免傳輸碰撞？</text:p>
            <text:p text:style-name="P51">A. CSMA/CD</text:p>
            <text:p text:style-name="P52">B. CSMA/CA</text:p>
            <text:p text:style-name="P51">C. TDMA</text:p>
            <text:p text:style-name="P51">D. FDMA</text:p>
          </table:table-cell>
          <table:table-cell table:style-name="表格28.A2" office:value-type="string">
            <text:p text:style-name="P53">B</text:p>
          </table:table-cell>
          <table:table-cell table:style-name="表格28.B2" office:value-type="string">
            <text:p text:style-name="P54">WiFi 使用 CSMA/CA（Collision Avoidance）。CSMA/CD（Collision Detection）是有線乙太網路使用的，務必區分！</text:p>
          </table:table-cell>
        </table:table-row>
        <table:table-row table:style-name="表格28.1">
          <table:table-cell table:style-name="表格28.A3" office:value-type="string">
            <text:p text:style-name="P49">Q10</text:p>
          </table:table-cell>
          <table:table-cell table:style-name="表格28.B3" office:value-type="string">
            <text:p text:style-name="P50">Bluetooth 使用 FHSS 技術的主要目的為？</text:p>
            <text:p text:style-name="P51">A. 提高傳輸功率</text:p>
            <text:p text:style-name="P51">B. 固定在同一頻道傳輸</text:p>
            <text:p text:style-name="P52">C. 透過跳頻避免干擾</text:p>
            <text:p text:style-name="P51">D. 增加傳輸延遲</text:p>
          </table:table-cell>
          <table:table-cell table:style-name="表格28.A3" office:value-type="string">
            <text:p text:style-name="P53">C</text:p>
          </table:table-cell>
          <table:table-cell table:style-name="表格28.B3" office:value-type="string">
            <text:p text:style-name="P54">FHSS（跳頻展頻）讓 Bluetooth 在 2.4GHz 頻段不斷切換頻道，以避免與其他設備產生干擾。</text:p>
          </table:table-cell>
        </table:table-row>
      </table:table>
      <text:p text:style-name="P2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>🧠 <text:s/>SECTION 8：考前速記總整理（10 秒版）</text:p>
          </table:table-cell>
        </table:table-row>
      </table:table>
      <text:p text:style-name="P9"/>
      <text:p text:style-name="P56">▶ 文字心智圖</text:p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57">🟦 SDN</text:p>
          </table:table-cell>
          <table:table-cell table:style-name="表格30.B1" office:value-type="string">
            <text:p text:style-name="P43">控制 / 資料「分離」│ 三層：Application → Control（SDN Controller）→ Infrastructure（Router/Switch）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57">⚖️ Load Bal.</text:p>
          </table:table-cell>
          <table:table-cell table:style-name="表格30.B2" office:value-type="string">
            <text:p text:style-name="P43">三策略：RR（輪流）→ WRR（加權）→ Stickiness（同人同台）</text:p>
          </table:table-cell>
        </table:table-row>
        <table:table-row table:style-name="表格30.1">
          <table:table-cell table:style-name="表格30.A1" office:value-type="string">
            <text:p text:style-name="P57">🌍 CDN</text:p>
          </table:table-cell>
          <table:table-cell table:style-name="表格30.B1" office:value-type="string">
            <text:p text:style-name="P43">流程：URL → DNS → CNAME → CDN → 最近 Edge 節點│ CNAME = 網址→網址（非 IP）</text:p>
          </table:table-cell>
        </table:table-row>
        <table:table-row table:style-name="表格30.1">
          <table:table-cell table:style-name="表格30.A2" office:value-type="string">
            <text:p text:style-name="P57">📶 5G</text:p>
          </table:table-cell>
          <table:table-cell table:style-name="表格30.B2" office:value-type="string">
            <text:p text:style-name="P43">四特性：快（eMBB）/ 低延遲（URLLC）/ 多連線（mMTC）/ 切片（Network Slicing）</text:p>
          </table:table-cell>
        </table:table-row>
        <table:table-row table:style-name="表格30.1">
          <table:table-cell table:style-name="表格30.A1" office:value-type="string">
            <text:p text:style-name="P57">📡 WiFi</text:p>
          </table:table-cell>
          <table:table-cell table:style-name="表格30.B1" office:value-type="string">
            <text:p text:style-name="P43">CSMA/CA（先偵聽，再傳送）+ OFDM（多子頻道傳輸）</text:p>
          </table:table-cell>
        </table:table-row>
        <table:table-row table:style-name="表格30.1">
          <table:table-cell table:style-name="表格30.A2" office:value-type="string">
            <text:p text:style-name="P57">🔵 Bluetooth</text:p>
          </table:table-cell>
          <table:table-cell table:style-name="表格30.B2" office:value-type="string">
            <text:p text:style-name="P43">Master-Slave 架構 + FHSS（跳頻展頻，避開干擾）</text:p>
          </table:table-cell>
        </table:table-row>
      </table:table>
      <text:p text:style-name="P15"/>
      <text:p text:style-name="P56">▶ 使用情境串連（理解記憶）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9">想像你用手機打開 App：</text:p>
            <text:p text:style-name="P14"><text:span text:style-name="T2">① 你開啟 App </text:span><text:span text:style-name="T9">→ Application Layer</text:span></text:p>
            <text:p text:style-name="P14"><text:span text:style-name="T2">② SDN Controller 決定資料怎麼走 </text:span><text:span text:style-name="T9">→ Control Layer</text:span></text:p>
            <text:p text:style-name="P14"><text:span text:style-name="T2">③ Router / Switch 實際傳送資料 </text:span><text:span text:style-name="T9">→ Infrastructure Layer</text:span></text:p>
            <text:p text:style-name="P14"><text:span text:style-name="T2">④ Load Balancer 把你的請求分配到空閒的伺服器 </text:span><text:span text:style-name="T10">→ Load Balancing</text:span></text:p>
            <text:p text:style-name="P14"><text:span text:style-name="T2">⑤ CDN 找最近的節點傳回網頁內容 </text:span><text:span text:style-name="T11">→ CDN Edge</text:span></text:p>
            <text:p text:style-name="P14"><text:span text:style-name="T2">⑥ 資料透過 WiFi 或 5G 傳到你的手機 </text:span><text:span text:style-name="T12">→ WiFi / 5G</text:span></text:p>
          </table:table-cell>
        </table:table-row>
      </table:table>
      <text:p text:style-name="P15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⚡ 考前 10 秒速背版</text:p>
            <text:p text:style-name="P59"><text:span text:style-name="T1">SDN</text:span><text:span text:style-name="T2"> 分離三層　</text:span><text:span text:style-name="T13">LB</text:span><text:span text:style-name="T2"> 輪重黏　</text:span><text:span text:style-name="T14">CDN</text:span><text:span text:style-name="T2"> CNAME→最近　</text:span><text:span text:style-name="T15">5G</text:span><text:span text:style-name="T2"> 快低多切　</text:span><text:span text:style-name="T16">WiFi</text:span><text:span text:style-name="T2"> 聽　</text:span><text:span text:style-name="T16">BT</text:span><text:span text:style-name="T2"> 跳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 fo:padding-left="0cm" fo:padding-right="0cm" fo:padding-top="0cm" fo:padding-bottom="0.035cm" fo:border-left="none" fo:border-right="none" fo:border-top="none" fo:border-bottom="0.74pt solid #3b82f6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563eb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表格32" style:family="table">
      <style:table-properties style:width="16.768cm" fo:margin-left="0cm" fo:margin-top="0cm" fo:margin-bottom="0cm" table:align="left" style:writing-mode="page"/>
    </style:style>
    <style:style style:name="表格32.A" style:family="table-column">
      <style:table-column-properties style:column-width="13.238cm"/>
    </style:style>
    <style:style style:name="表格32.B" style:family="table-column">
      <style:table-column-properties style:column-width="3.5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b3a6b" fo:padding-left="0.353cm" fo:padding-right="0.353cm" fo:padding-top="0.141cm" fo:padding-bottom="0.141cm" fo:border="none">
        <style:background-image/>
      </style:table-cell-properties>
    </style:style>
    <style:style style:name="表格32.B1" style:family="table-cell">
      <style:table-cell-properties style:vertical-align="middle" fo:background-color="#3b82f6" fo:padding-left="0.353cm" fo:padding-right="0.353cm" fo:padding-top="0.141cm" fo:padding-bottom="0.141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/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/>
      <style:text-properties fo:color="#9ca3af" loext:opacity="100%" style:font-name="Arial" fo:font-size="8pt" style:font-name-asian="Arial2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表格32" table:style-name="表格32">
          <table:table-column table:style-name="表格32.A"/>
          <table:table-column table:style-name="表格32.B"/>
          <table:table-row table:style-name="表格32.1">
            <table:table-cell table:style-name="表格32.A1" office:value-type="string">
              <text:p text:style-name="MP1">網路系統觀念完整筆記｜SDN / LB / CDN / 5G / WiFi &amp; Bluetooth</text:p>
            </table:table-cell>
            <table:table-cell table:style-name="表格32.B1" office:value-type="string">
              <text:p text:style-name="MP2">考試專用版</text:p>
            </table:table-cell>
          </table:table-row>
        </table:table>
      </style:header>
      <style:footer>
        <text:p text:style-name="MP3">網路系統觀念完整筆記 <text:s text:c="2"/>· <text:s text:c="2"/>Page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9</meta:editing-cycles>
    <meta:creation-date>2026-05-06T13:38:14.451000000</meta:creation-date>
    <dc:date>2026-05-06T22:00:41.175448200</dc:date>
    <meta:generator>LibreOffice/26.2.2.2$Windows_X86_64 LibreOffice_project/1f77d10d6938fd34972958f64b2bcfa54f8b1ba5</meta:generator>
    <meta:editing-duration>PT19M4S</meta:editing-duration>
    <meta:document-statistic meta:table-count="33" meta:image-count="0" meta:object-count="0" meta:page-count="7" meta:paragraph-count="299" meta:word-count="4174" meta:character-count="6805" meta:non-whitespace-character-count="6162"/>
  </office:meta>
</office:document-meta>
</file>